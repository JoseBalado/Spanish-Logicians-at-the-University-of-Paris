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B70000084BEFD195D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1829adf" officeooo:paragraph-rsid="01829adf"/>
    </style:style>
    <style:style style:name="P2" style:family="paragraph" style:parent-style-name="Text_20_body">
      <style:text-properties officeooo:rsid="0183a8ef" officeooo:paragraph-rsid="0183a8ef"/>
    </style:style>
    <style:style style:name="P3" style:family="paragraph" style:parent-style-name="Text_20_body">
      <style:text-properties officeooo:rsid="0184f623" officeooo:paragraph-rsid="0184f623"/>
    </style:style>
    <style:style style:name="P4" style:family="paragraph" style:parent-style-name="Text_20_body">
      <style:text-properties officeooo:rsid="019ad833" officeooo:paragraph-rsid="019ad833"/>
    </style:style>
    <style:style style:name="P5" style:family="paragraph" style:parent-style-name="Text_20_body">
      <style:text-properties officeooo:rsid="01a2835d" officeooo:paragraph-rsid="01a2835d"/>
    </style:style>
    <style:style style:name="P6" style:family="paragraph" style:parent-style-name="Text_20_body">
      <style:text-properties officeooo:rsid="01a3693b" officeooo:paragraph-rsid="01a3693b"/>
    </style:style>
    <style:style style:name="P7" style:family="paragraph" style:parent-style-name="Text_20_body">
      <style:text-properties officeooo:rsid="01a51f05" officeooo:paragraph-rsid="01a51f05"/>
    </style:style>
    <style:style style:name="P8" style:family="paragraph" style:parent-style-name="Text_20_body">
      <style:text-properties officeooo:rsid="01a51f05" officeooo:paragraph-rsid="01a7016e"/>
    </style:style>
    <style:style style:name="P9" style:family="paragraph" style:parent-style-name="Text_20_body">
      <style:text-properties officeooo:rsid="01a85c89" officeooo:paragraph-rsid="01a85c89"/>
    </style:style>
    <style:style style:name="P10" style:family="paragraph" style:parent-style-name="Text_20_body">
      <style:text-properties officeooo:rsid="01a85c89" officeooo:paragraph-rsid="01aa0789"/>
    </style:style>
    <style:style style:name="P11" style:family="paragraph" style:parent-style-name="Text_20_body">
      <style:text-properties officeooo:paragraph-rsid="01aa0789"/>
    </style:style>
    <style:style style:name="P12" style:family="paragraph" style:parent-style-name="Text_20_body">
      <style:text-properties officeooo:rsid="01aadd77" officeooo:paragraph-rsid="01aadd77"/>
    </style:style>
    <style:style style:name="P13" style:family="paragraph" style:parent-style-name="Text_20_body">
      <style:text-properties officeooo:rsid="01b166ae" officeooo:paragraph-rsid="01b166ae"/>
    </style:style>
    <style:style style:name="P14" style:family="paragraph" style:parent-style-name="Text_20_body">
      <style:text-properties officeooo:rsid="01b50fc3" officeooo:paragraph-rsid="01b684d1"/>
    </style:style>
    <style:style style:name="P15" style:family="paragraph" style:parent-style-name="Text_20_body">
      <style:text-properties officeooo:rsid="01b50fc3" officeooo:paragraph-rsid="01b6c227"/>
    </style:style>
    <style:style style:name="P16" style:family="paragraph" style:parent-style-name="Text_20_body">
      <style:text-properties officeooo:rsid="01b50fc3" officeooo:paragraph-rsid="01b73f5b"/>
    </style:style>
    <style:style style:name="P17" style:family="paragraph" style:parent-style-name="Text_20_body">
      <style:text-properties officeooo:rsid="01b6c227" officeooo:paragraph-rsid="01b6c227"/>
    </style:style>
    <style:style style:name="P18" style:family="paragraph" style:parent-style-name="Text_20_body">
      <style:text-properties officeooo:rsid="01b73f5b" officeooo:paragraph-rsid="01b73f5b"/>
    </style:style>
    <style:style style:name="P19" style:family="paragraph" style:parent-style-name="Text_20_body">
      <style:text-properties officeooo:rsid="01bc9cb3" officeooo:paragraph-rsid="01bc9cb3"/>
    </style:style>
    <style:style style:name="P20" style:family="paragraph" style:parent-style-name="Text_20_body">
      <style:text-properties officeooo:rsid="01bc9cb3" officeooo:paragraph-rsid="01be67c2"/>
    </style:style>
    <style:style style:name="P21" style:family="paragraph" style:parent-style-name="Text_20_body">
      <style:text-properties officeooo:rsid="01bc9cb3" officeooo:paragraph-rsid="01bfc4bc"/>
    </style:style>
    <style:style style:name="P22" style:family="paragraph" style:parent-style-name="Text_20_body">
      <style:text-properties officeooo:rsid="01c6a78e" officeooo:paragraph-rsid="01c6a78e"/>
    </style:style>
    <style:style style:name="P23" style:family="paragraph" style:parent-style-name="Text_20_body">
      <style:text-properties officeooo:rsid="01cb4477" officeooo:paragraph-rsid="01cb4477"/>
    </style:style>
    <style:style style:name="P24" style:family="paragraph" style:parent-style-name="Text_20_body">
      <style:text-properties officeooo:rsid="01d284ca" officeooo:paragraph-rsid="01d284ca"/>
    </style:style>
    <style:style style:name="P25" style:family="paragraph" style:parent-style-name="Text_20_body">
      <style:text-properties officeooo:rsid="01da6761" officeooo:paragraph-rsid="01da6761"/>
    </style:style>
    <style:style style:name="P26" style:family="paragraph" style:parent-style-name="Text_20_body">
      <style:text-properties officeooo:rsid="01db5f3b" officeooo:paragraph-rsid="01db5f3b"/>
    </style:style>
    <style:style style:name="P27" style:family="paragraph" style:parent-style-name="Text_20_body">
      <style:text-properties officeooo:rsid="01e2b640" officeooo:paragraph-rsid="01e2b640"/>
    </style:style>
    <style:style style:name="P28" style:family="paragraph" style:parent-style-name="Text_20_body">
      <style:text-properties officeooo:rsid="01e4b036" officeooo:paragraph-rsid="01e4b036"/>
    </style:style>
    <style:style style:name="P29" style:family="paragraph" style:parent-style-name="Text_20_body">
      <style:text-properties officeooo:rsid="01e6865f" officeooo:paragraph-rsid="01e6865f"/>
    </style:style>
    <style:style style:name="P30" style:family="paragraph" style:parent-style-name="Text_20_body">
      <style:text-properties officeooo:rsid="01e71de1" officeooo:paragraph-rsid="01e71de1"/>
    </style:style>
    <style:style style:name="P31" style:family="paragraph" style:parent-style-name="Text_20_body">
      <style:text-properties officeooo:rsid="01e7c963" officeooo:paragraph-rsid="01e7c963"/>
    </style:style>
    <style:style style:name="P32" style:family="paragraph" style:parent-style-name="Text_20_body">
      <style:text-properties officeooo:rsid="01ea8dc7" officeooo:paragraph-rsid="01ea8dc7"/>
    </style:style>
    <style:style style:name="P33" style:family="paragraph" style:parent-style-name="Text_20_body">
      <style:text-properties officeooo:rsid="01eb28a2" officeooo:paragraph-rsid="01eb28a2"/>
    </style:style>
    <style:style style:name="P34" style:family="paragraph" style:parent-style-name="Text_20_body">
      <style:text-properties officeooo:rsid="01ebade7" officeooo:paragraph-rsid="01ebade7"/>
    </style:style>
    <style:style style:name="P35" style:family="paragraph" style:parent-style-name="Text_20_body">
      <style:text-properties officeooo:rsid="01ebfb55" officeooo:paragraph-rsid="01ebfb55"/>
    </style:style>
    <style:style style:name="P36" style:family="paragraph" style:parent-style-name="Text_20_body">
      <style:text-properties officeooo:rsid="01ebfb55" officeooo:paragraph-rsid="01ec8752"/>
    </style:style>
    <style:style style:name="P37" style:family="paragraph" style:parent-style-name="Text_20_body">
      <style:text-properties officeooo:rsid="01ec8752" officeooo:paragraph-rsid="01ec8752"/>
    </style:style>
    <style:style style:name="P38" style:family="paragraph" style:parent-style-name="Text_20_body">
      <style:text-properties officeooo:rsid="01def7d2" officeooo:paragraph-rsid="01def7d2"/>
    </style:style>
    <style:style style:name="P39" style:family="paragraph" style:parent-style-name="Text_20_body">
      <style:text-properties officeooo:rsid="019ccc35" officeooo:paragraph-rsid="01f69589"/>
    </style:style>
    <style:style style:name="P40" style:family="paragraph" style:parent-style-name="Text_20_body">
      <style:text-properties officeooo:rsid="02015e60" officeooo:paragraph-rsid="02015e60"/>
    </style:style>
    <style:style style:name="P41" style:family="paragraph" style:parent-style-name="Text_20_body">
      <style:text-properties officeooo:rsid="01f5f46e" officeooo:paragraph-rsid="01f5f46e"/>
    </style:style>
    <style:style style:name="P42" style:family="paragraph" style:parent-style-name="Text_20_body">
      <style:text-properties officeooo:rsid="02074acd" officeooo:paragraph-rsid="02074acd"/>
    </style:style>
    <style:style style:name="P43" style:family="paragraph" style:parent-style-name="Text_20_body">
      <style:text-properties officeooo:rsid="02074acd" officeooo:paragraph-rsid="02083566"/>
    </style:style>
    <style:style style:name="P44" style:family="paragraph" style:parent-style-name="Text_20_body">
      <style:text-properties officeooo:rsid="0208e494" officeooo:paragraph-rsid="0208e494"/>
    </style:style>
    <style:style style:name="P45" style:family="paragraph" style:parent-style-name="Text_20_body">
      <style:text-properties officeooo:rsid="020c16ae" officeooo:paragraph-rsid="020c16ae"/>
    </style:style>
    <style:style style:name="P46" style:family="paragraph" style:parent-style-name="Text_20_body">
      <style:text-properties officeooo:rsid="020da5a8" officeooo:paragraph-rsid="020da5a8"/>
    </style:style>
    <style:style style:name="P47" style:family="paragraph" style:parent-style-name="Text_20_body">
      <style:text-properties officeooo:rsid="020da5a8" officeooo:paragraph-rsid="0210edbd"/>
    </style:style>
    <style:style style:name="P48" style:family="paragraph" style:parent-style-name="Text_20_body">
      <style:text-properties officeooo:rsid="020da5a8" officeooo:paragraph-rsid="020feace"/>
    </style:style>
    <style:style style:name="P49" style:family="paragraph" style:parent-style-name="Text_20_body">
      <style:text-properties officeooo:rsid="0210edbd" officeooo:paragraph-rsid="0210edbd"/>
    </style:style>
    <style:style style:name="P50" style:family="paragraph" style:parent-style-name="Text_20_body">
      <style:text-properties officeooo:rsid="02117808" officeooo:paragraph-rsid="02117808"/>
    </style:style>
    <style:style style:name="P51" style:family="paragraph" style:parent-style-name="Text_20_body">
      <style:text-properties officeooo:rsid="02083566" officeooo:paragraph-rsid="02083566"/>
    </style:style>
    <style:style style:name="P52" style:family="paragraph" style:parent-style-name="Text_20_body">
      <style:text-properties officeooo:rsid="02136e6f" officeooo:paragraph-rsid="02156c21"/>
    </style:style>
    <style:style style:name="P53" style:family="paragraph" style:parent-style-name="Text_20_body">
      <style:text-properties officeooo:rsid="021748fe" officeooo:paragraph-rsid="021748fe"/>
    </style:style>
    <style:style style:name="P54" style:family="paragraph" style:parent-style-name="Text_20_body">
      <style:text-properties officeooo:rsid="0219fa4d" officeooo:paragraph-rsid="0219fa4d"/>
    </style:style>
    <style:style style:name="P55" style:family="paragraph" style:parent-style-name="Text_20_body">
      <style:text-properties officeooo:rsid="021adc31" officeooo:paragraph-rsid="021adc31"/>
    </style:style>
    <style:style style:name="P56" style:family="paragraph" style:parent-style-name="Text_20_body">
      <style:text-properties officeooo:rsid="021b5c8c" officeooo:paragraph-rsid="021b5c8c"/>
    </style:style>
    <style:style style:name="P57" style:family="paragraph" style:parent-style-name="Text_20_body">
      <style:text-properties officeooo:rsid="021b5c8c" officeooo:paragraph-rsid="07b4fcb8"/>
    </style:style>
    <style:style style:name="P58" style:family="paragraph" style:parent-style-name="Text_20_body">
      <style:text-properties officeooo:rsid="021b5c8c" officeooo:paragraph-rsid="07b52936"/>
    </style:style>
    <style:style style:name="P59" style:family="paragraph" style:parent-style-name="Text_20_body">
      <style:paragraph-properties fo:margin-left="1in" fo:margin-right="0in" fo:text-indent="0in" style:auto-text-indent="false"/>
      <style:text-properties officeooo:rsid="021b5c8c" officeooo:paragraph-rsid="07b52936"/>
    </style:style>
    <style:style style:name="P60" style:family="paragraph" style:parent-style-name="Text_20_body">
      <style:text-properties officeooo:rsid="02214db6" officeooo:paragraph-rsid="02214db6"/>
    </style:style>
    <style:style style:name="P61" style:family="paragraph" style:parent-style-name="Text_20_body">
      <style:text-properties officeooo:rsid="02228b6e" officeooo:paragraph-rsid="02228b6e"/>
    </style:style>
    <style:style style:name="P62" style:family="paragraph" style:parent-style-name="Text_20_body">
      <style:text-properties officeooo:rsid="02228b6e" officeooo:paragraph-rsid="022290c6"/>
    </style:style>
    <style:style style:name="P63" style:family="paragraph" style:parent-style-name="Text_20_body">
      <style:text-properties officeooo:rsid="02247d52" officeooo:paragraph-rsid="02247d52"/>
    </style:style>
    <style:style style:name="P64" style:family="paragraph" style:parent-style-name="Text_20_body">
      <style:text-properties officeooo:rsid="02256f17" officeooo:paragraph-rsid="02256f17"/>
    </style:style>
    <style:style style:name="P65" style:family="paragraph" style:parent-style-name="Text_20_body">
      <style:text-properties officeooo:rsid="02271b63" officeooo:paragraph-rsid="02271b63"/>
    </style:style>
    <style:style style:name="P66" style:family="paragraph" style:parent-style-name="Text_20_body">
      <style:text-properties officeooo:rsid="0228234a" officeooo:paragraph-rsid="0228234a"/>
    </style:style>
    <style:style style:name="P67" style:family="paragraph" style:parent-style-name="Text_20_body">
      <style:text-properties officeooo:rsid="02287ffd" officeooo:paragraph-rsid="02287ffd"/>
    </style:style>
    <style:style style:name="P68" style:family="paragraph" style:parent-style-name="Text_20_body">
      <style:text-properties officeooo:rsid="022e57d1" officeooo:paragraph-rsid="022e57d1"/>
    </style:style>
    <style:style style:name="P69" style:family="paragraph" style:parent-style-name="Text_20_body">
      <style:text-properties officeooo:rsid="022f9efb" officeooo:paragraph-rsid="022f9efb"/>
    </style:style>
    <style:style style:name="P70" style:family="paragraph" style:parent-style-name="Text_20_body">
      <style:text-properties officeooo:rsid="022f9efb" officeooo:paragraph-rsid="0232c4b6"/>
    </style:style>
    <style:style style:name="P71" style:family="paragraph" style:parent-style-name="Text_20_body">
      <style:text-properties officeooo:rsid="0232c4b6" officeooo:paragraph-rsid="0232c4b6"/>
    </style:style>
    <style:style style:name="P72" style:family="paragraph" style:parent-style-name="Text_20_body">
      <style:text-properties officeooo:rsid="0232c4b6" officeooo:paragraph-rsid="02d27e8f"/>
    </style:style>
    <style:style style:name="P73" style:family="paragraph" style:parent-style-name="Text_20_body">
      <style:text-properties officeooo:rsid="023397b8" officeooo:paragraph-rsid="023397b8"/>
    </style:style>
    <style:style style:name="P74" style:family="paragraph" style:parent-style-name="Text_20_body">
      <style:text-properties officeooo:rsid="023499b8" officeooo:paragraph-rsid="023499b8"/>
    </style:style>
    <style:style style:name="P75" style:family="paragraph" style:parent-style-name="Text_20_body">
      <style:text-properties officeooo:rsid="02365374" officeooo:paragraph-rsid="02365374"/>
    </style:style>
    <style:style style:name="P76" style:family="paragraph" style:parent-style-name="Text_20_body">
      <style:text-properties officeooo:paragraph-rsid="0239e793"/>
    </style:style>
    <style:style style:name="P77" style:family="paragraph" style:parent-style-name="Text_20_body">
      <style:text-properties officeooo:rsid="023e5c31" officeooo:paragraph-rsid="023e5c31"/>
    </style:style>
    <style:style style:name="P78" style:family="paragraph" style:parent-style-name="Text_20_body">
      <style:text-properties officeooo:rsid="023e5c31" officeooo:paragraph-rsid="024001ab"/>
    </style:style>
    <style:style style:name="P79" style:family="paragraph" style:parent-style-name="Text_20_body">
      <style:text-properties officeooo:rsid="024001ab" officeooo:paragraph-rsid="024001ab"/>
    </style:style>
    <style:style style:name="P80" style:family="paragraph" style:parent-style-name="Text_20_body">
      <style:text-properties officeooo:rsid="02403319" officeooo:paragraph-rsid="02403319"/>
    </style:style>
    <style:style style:name="P81" style:family="paragraph" style:parent-style-name="Text_20_body">
      <style:text-properties officeooo:rsid="024320de" officeooo:paragraph-rsid="024320de"/>
    </style:style>
    <style:style style:name="P82" style:family="paragraph" style:parent-style-name="Text_20_body">
      <style:text-properties officeooo:rsid="02455972" officeooo:paragraph-rsid="02455972"/>
    </style:style>
    <style:style style:name="P83" style:family="paragraph" style:parent-style-name="Text_20_body">
      <style:text-properties officeooo:rsid="0246405e" officeooo:paragraph-rsid="0246405e"/>
    </style:style>
    <style:style style:name="P84" style:family="paragraph" style:parent-style-name="Text_20_body">
      <style:text-properties officeooo:rsid="0246fcdf" officeooo:paragraph-rsid="0246fcdf"/>
    </style:style>
    <style:style style:name="P85" style:family="paragraph" style:parent-style-name="Text_20_body">
      <style:text-properties officeooo:paragraph-rsid="024811fa"/>
    </style:style>
    <style:style style:name="P86" style:family="paragraph" style:parent-style-name="Text_20_body">
      <style:text-properties officeooo:rsid="024b1a36" officeooo:paragraph-rsid="024cef7a"/>
    </style:style>
    <style:style style:name="P87" style:family="paragraph" style:parent-style-name="Text_20_body">
      <style:text-properties officeooo:rsid="024cef7a" officeooo:paragraph-rsid="024cef7a"/>
    </style:style>
    <style:style style:name="P88" style:family="paragraph" style:parent-style-name="Text_20_body">
      <style:text-properties officeooo:rsid="024fc994" officeooo:paragraph-rsid="024fc994"/>
    </style:style>
    <style:style style:name="P89" style:family="paragraph" style:parent-style-name="Text_20_body">
      <style:text-properties officeooo:rsid="02510c58" officeooo:paragraph-rsid="02510c58"/>
    </style:style>
    <style:style style:name="P90" style:family="paragraph" style:parent-style-name="Text_20_body">
      <style:text-properties officeooo:rsid="0254ced0" officeooo:paragraph-rsid="0254ced0"/>
    </style:style>
    <style:style style:name="P91" style:family="paragraph" style:parent-style-name="Text_20_body">
      <style:text-properties officeooo:rsid="0256cc10" officeooo:paragraph-rsid="0256cc10"/>
    </style:style>
    <style:style style:name="P92" style:family="paragraph" style:parent-style-name="Text_20_body">
      <style:text-properties officeooo:rsid="0257842d" officeooo:paragraph-rsid="0257842d"/>
    </style:style>
    <style:style style:name="P93" style:family="paragraph" style:parent-style-name="Text_20_body">
      <style:text-properties officeooo:rsid="025b61c3" officeooo:paragraph-rsid="025b61c3"/>
    </style:style>
    <style:style style:name="P94" style:family="paragraph" style:parent-style-name="Text_20_body">
      <style:text-properties officeooo:rsid="025dad66" officeooo:paragraph-rsid="025dad66"/>
    </style:style>
    <style:style style:name="P95" style:family="paragraph" style:parent-style-name="Text_20_body">
      <style:text-properties officeooo:rsid="025e9ee7" officeooo:paragraph-rsid="025e9ee7"/>
    </style:style>
    <style:style style:name="P96" style:family="paragraph" style:parent-style-name="Text_20_body">
      <style:text-properties officeooo:rsid="02605fba" officeooo:paragraph-rsid="02605fba"/>
    </style:style>
    <style:style style:name="P97" style:family="paragraph" style:parent-style-name="Text_20_body">
      <style:text-properties officeooo:rsid="02664734" officeooo:paragraph-rsid="02664734"/>
    </style:style>
    <style:style style:name="P98" style:family="paragraph" style:parent-style-name="Text_20_body">
      <style:text-properties officeooo:rsid="026a75f2" officeooo:paragraph-rsid="026a75f2"/>
    </style:style>
    <style:style style:name="P99" style:family="paragraph" style:parent-style-name="Text_20_body">
      <style:text-properties officeooo:rsid="026c1fa6" officeooo:paragraph-rsid="026dc296"/>
    </style:style>
    <style:style style:name="P100" style:family="paragraph" style:parent-style-name="Text_20_body">
      <style:text-properties officeooo:rsid="026f6d5a" officeooo:paragraph-rsid="026f6d5a"/>
    </style:style>
    <style:style style:name="P101" style:family="paragraph" style:parent-style-name="Text_20_body">
      <style:text-properties officeooo:rsid="02701720" officeooo:paragraph-rsid="02701720"/>
    </style:style>
    <style:style style:name="P102" style:family="paragraph" style:parent-style-name="Text_20_body">
      <style:text-properties officeooo:rsid="026dc296" officeooo:paragraph-rsid="026dc296"/>
    </style:style>
    <style:style style:name="P103" style:family="paragraph" style:parent-style-name="Text_20_body">
      <style:text-properties officeooo:rsid="0273ba3d" officeooo:paragraph-rsid="0273ba3d"/>
    </style:style>
    <style:style style:name="P104" style:family="paragraph" style:parent-style-name="Text_20_body">
      <style:text-properties officeooo:rsid="02752708" officeooo:paragraph-rsid="02752708"/>
    </style:style>
    <style:style style:name="P105" style:family="paragraph" style:parent-style-name="Text_20_body">
      <style:text-properties officeooo:rsid="02756f00" officeooo:paragraph-rsid="02756f00"/>
    </style:style>
    <style:style style:name="P106" style:family="paragraph" style:parent-style-name="Text_20_body">
      <style:text-properties officeooo:rsid="0276c690" officeooo:paragraph-rsid="0276c690"/>
    </style:style>
    <style:style style:name="P107" style:family="paragraph" style:parent-style-name="Text_20_body">
      <style:text-properties officeooo:rsid="0278679f" officeooo:paragraph-rsid="0278679f"/>
    </style:style>
    <style:style style:name="P108" style:family="paragraph" style:parent-style-name="Text_20_body">
      <style:text-properties officeooo:rsid="027a1dd8" officeooo:paragraph-rsid="027a1dd8"/>
    </style:style>
    <style:style style:name="P109" style:family="paragraph" style:parent-style-name="Text_20_body">
      <style:text-properties officeooo:rsid="027e223c" officeooo:paragraph-rsid="027e223c"/>
    </style:style>
    <style:style style:name="P110" style:family="paragraph" style:parent-style-name="Text_20_body">
      <style:text-properties officeooo:rsid="02806942" officeooo:paragraph-rsid="02806942"/>
    </style:style>
    <style:style style:name="P111" style:family="paragraph" style:parent-style-name="Text_20_body">
      <style:text-properties officeooo:rsid="028547e4" officeooo:paragraph-rsid="02893b1c"/>
    </style:style>
    <style:style style:name="P112" style:family="paragraph" style:parent-style-name="Text_20_body">
      <style:text-properties officeooo:rsid="028547e4" officeooo:paragraph-rsid="028547e4"/>
    </style:style>
    <style:style style:name="P113" style:family="paragraph" style:parent-style-name="Text_20_body">
      <style:text-properties officeooo:paragraph-rsid="02893b1c"/>
    </style:style>
    <style:style style:name="P114" style:family="paragraph" style:parent-style-name="Text_20_body">
      <style:text-properties officeooo:rsid="028a7d30" officeooo:paragraph-rsid="028a7d30"/>
    </style:style>
    <style:style style:name="P115" style:family="paragraph" style:parent-style-name="Text_20_body">
      <style:text-properties officeooo:paragraph-rsid="028acf76"/>
    </style:style>
    <style:style style:name="P116" style:family="paragraph" style:parent-style-name="Text_20_body">
      <style:text-properties officeooo:rsid="028cfaa2" officeooo:paragraph-rsid="028cfaa2"/>
    </style:style>
    <style:style style:name="P117" style:family="paragraph" style:parent-style-name="Text_20_body">
      <style:text-properties officeooo:rsid="028db501" officeooo:paragraph-rsid="028db501"/>
    </style:style>
    <style:style style:name="P118" style:family="paragraph" style:parent-style-name="Text_20_body">
      <style:text-properties officeooo:rsid="028db501" officeooo:paragraph-rsid="07c83788"/>
    </style:style>
    <style:style style:name="P119" style:family="paragraph" style:parent-style-name="Text_20_body">
      <style:text-properties officeooo:rsid="028fbb53" officeooo:paragraph-rsid="028fbb53"/>
    </style:style>
    <style:style style:name="P120" style:family="paragraph" style:parent-style-name="Text_20_body">
      <style:text-properties officeooo:rsid="02926c11" officeooo:paragraph-rsid="02926c11"/>
    </style:style>
    <style:style style:name="P121" style:family="paragraph" style:parent-style-name="Text_20_body">
      <style:text-properties officeooo:rsid="0292843d" officeooo:paragraph-rsid="0292843d"/>
    </style:style>
    <style:style style:name="P122" style:family="paragraph" style:parent-style-name="Text_20_body">
      <style:text-properties officeooo:paragraph-rsid="0292843d"/>
    </style:style>
    <style:style style:name="P123" style:family="paragraph" style:parent-style-name="Text_20_body">
      <style:text-properties officeooo:rsid="0292eb8b" officeooo:paragraph-rsid="0292eb8b"/>
    </style:style>
    <style:style style:name="P124" style:family="paragraph" style:parent-style-name="Text_20_body">
      <style:text-properties officeooo:rsid="0293d31f" officeooo:paragraph-rsid="0293d31f"/>
    </style:style>
    <style:style style:name="P125" style:family="paragraph" style:parent-style-name="Text_20_body">
      <style:text-properties officeooo:rsid="02916205" officeooo:paragraph-rsid="02916205"/>
    </style:style>
    <style:style style:name="P126" style:family="paragraph" style:parent-style-name="Text_20_body">
      <style:text-properties officeooo:rsid="02965c95" officeooo:paragraph-rsid="02974099"/>
    </style:style>
    <style:style style:name="P127" style:family="paragraph" style:parent-style-name="Text_20_body">
      <style:text-properties officeooo:rsid="029804ed" officeooo:paragraph-rsid="029804ed"/>
    </style:style>
    <style:style style:name="P128" style:family="paragraph" style:parent-style-name="Text_20_body">
      <style:text-properties officeooo:rsid="029804ed" officeooo:paragraph-rsid="02974099"/>
    </style:style>
    <style:style style:name="P129" style:family="paragraph" style:parent-style-name="Text_20_body">
      <style:text-properties officeooo:rsid="0298644c" officeooo:paragraph-rsid="0298644c"/>
    </style:style>
    <style:style style:name="P130" style:family="paragraph" style:parent-style-name="Text_20_body">
      <style:text-properties officeooo:rsid="02a0254f" officeooo:paragraph-rsid="02a1a016"/>
    </style:style>
    <style:style style:name="P131" style:family="paragraph" style:parent-style-name="Text_20_body">
      <style:text-properties officeooo:paragraph-rsid="02a1a016"/>
    </style:style>
    <style:style style:name="P132" style:family="paragraph" style:parent-style-name="Text_20_body">
      <style:text-properties officeooo:rsid="0229c11f" officeooo:paragraph-rsid="0229c11f"/>
    </style:style>
    <style:style style:name="P133" style:family="paragraph" style:parent-style-name="Text_20_body">
      <style:text-properties officeooo:paragraph-rsid="02a836b3"/>
    </style:style>
    <style:style style:name="P134" style:family="paragraph" style:parent-style-name="Text_20_body">
      <style:text-properties officeooo:rsid="02244077" officeooo:paragraph-rsid="02244077"/>
    </style:style>
    <style:style style:name="P135" style:family="paragraph" style:parent-style-name="Text_20_body">
      <style:text-properties officeooo:rsid="031c34a6" officeooo:paragraph-rsid="031c34a6"/>
    </style:style>
    <style:style style:name="P136" style:family="paragraph" style:parent-style-name="Text_20_body">
      <style:text-properties officeooo:rsid="031c34a6" officeooo:paragraph-rsid="031d7019"/>
    </style:style>
    <style:style style:name="P137" style:family="paragraph" style:parent-style-name="Text_20_body">
      <style:text-properties officeooo:rsid="031d7019" officeooo:paragraph-rsid="032287ca"/>
    </style:style>
    <style:style style:name="P138" style:family="paragraph" style:parent-style-name="Text_20_body">
      <style:text-properties officeooo:rsid="031d7019" officeooo:paragraph-rsid="03288328"/>
    </style:style>
    <style:style style:name="P139" style:family="paragraph" style:parent-style-name="Text_20_body">
      <style:text-properties officeooo:rsid="0327b191" officeooo:paragraph-rsid="0327b191"/>
    </style:style>
    <style:style style:name="P140" style:family="paragraph" style:parent-style-name="Text_20_body">
      <style:text-properties officeooo:paragraph-rsid="03288328"/>
    </style:style>
    <style:style style:name="P141" style:family="paragraph" style:parent-style-name="Text_20_body">
      <style:text-properties officeooo:rsid="03419401" officeooo:paragraph-rsid="03419401"/>
    </style:style>
    <style:style style:name="P142" style:family="paragraph" style:parent-style-name="Text_20_body">
      <style:text-properties officeooo:rsid="03419401" officeooo:paragraph-rsid="034439cb"/>
    </style:style>
    <style:style style:name="P143" style:family="paragraph" style:parent-style-name="Text_20_body">
      <style:text-properties officeooo:rsid="034b0aae" officeooo:paragraph-rsid="034b0aae"/>
    </style:style>
    <style:style style:name="P144" style:family="paragraph" style:parent-style-name="Text_20_body">
      <style:text-properties officeooo:paragraph-rsid="02287ffd"/>
    </style:style>
    <style:style style:name="P145" style:family="paragraph" style:parent-style-name="Text_20_body">
      <style:text-properties officeooo:rsid="0351fd1e" officeooo:paragraph-rsid="0351fd1e"/>
    </style:style>
    <style:style style:name="P146" style:family="paragraph" style:parent-style-name="Text_20_body">
      <style:text-properties officeooo:paragraph-rsid="0365877f"/>
    </style:style>
    <style:style style:name="P147" style:family="paragraph" style:parent-style-name="Text_20_body">
      <style:text-properties officeooo:rsid="037082af" officeooo:paragraph-rsid="037082af"/>
    </style:style>
    <style:style style:name="P148" style:family="paragraph" style:parent-style-name="Text_20_body">
      <style:text-properties officeooo:rsid="03714f35" officeooo:paragraph-rsid="044c55cf"/>
    </style:style>
    <style:style style:name="P149" style:family="paragraph" style:parent-style-name="Text_20_body">
      <style:text-properties officeooo:rsid="03a67815" officeooo:paragraph-rsid="03b67118"/>
    </style:style>
    <style:style style:name="P150" style:family="paragraph" style:parent-style-name="Text_20_body">
      <style:text-properties officeooo:rsid="03b01ca7" officeooo:paragraph-rsid="03b01ca7"/>
    </style:style>
    <style:style style:name="P151" style:family="paragraph" style:parent-style-name="Text_20_body">
      <style:text-properties officeooo:paragraph-rsid="03b4f32f"/>
    </style:style>
    <style:style style:name="P152" style:family="paragraph" style:parent-style-name="Text_20_body">
      <style:text-properties officeooo:paragraph-rsid="03c1327c"/>
    </style:style>
    <style:style style:name="P153" style:family="paragraph" style:parent-style-name="Text_20_body">
      <style:text-properties officeooo:paragraph-rsid="03c29218"/>
    </style:style>
    <style:style style:name="P154" style:family="paragraph" style:parent-style-name="Text_20_body">
      <style:text-properties officeooo:paragraph-rsid="043b1714"/>
    </style:style>
    <style:style style:name="P155" style:family="paragraph" style:parent-style-name="Text_20_body">
      <style:text-properties officeooo:paragraph-rsid="0441d4c0"/>
    </style:style>
    <style:style style:name="P156" style:family="paragraph" style:parent-style-name="Text_20_body">
      <style:text-properties officeooo:paragraph-rsid="04424d9a"/>
    </style:style>
    <style:style style:name="P157" style:family="paragraph" style:parent-style-name="Text_20_body">
      <style:text-properties officeooo:paragraph-rsid="0446b3b9"/>
    </style:style>
    <style:style style:name="P158" style:family="paragraph" style:parent-style-name="Text_20_body">
      <style:text-properties officeooo:paragraph-rsid="0448c820"/>
    </style:style>
    <style:style style:name="P159" style:family="paragraph" style:parent-style-name="Text_20_body">
      <style:text-properties officeooo:rsid="044d4807" officeooo:paragraph-rsid="044d4807"/>
    </style:style>
    <style:style style:name="P160" style:family="paragraph" style:parent-style-name="Text_20_body">
      <style:text-properties officeooo:rsid="044ebf8e" officeooo:paragraph-rsid="045607ff"/>
    </style:style>
    <style:style style:name="P161" style:family="paragraph" style:parent-style-name="Text_20_body">
      <style:text-properties officeooo:rsid="044ebf8e" officeooo:paragraph-rsid="0458d691"/>
    </style:style>
    <style:style style:name="P162" style:family="paragraph" style:parent-style-name="Text_20_body">
      <style:text-properties officeooo:rsid="044ebf8e" officeooo:paragraph-rsid="04551b52"/>
    </style:style>
    <style:style style:name="P163" style:family="paragraph" style:parent-style-name="Text_20_body">
      <style:text-properties officeooo:rsid="045928df" officeooo:paragraph-rsid="045928df"/>
    </style:style>
    <style:style style:name="P164" style:family="paragraph" style:parent-style-name="Text_20_body">
      <style:text-properties officeooo:rsid="045c12b8" officeooo:paragraph-rsid="045c12b8"/>
    </style:style>
    <style:style style:name="P165" style:family="paragraph" style:parent-style-name="Text_20_body">
      <style:text-properties officeooo:rsid="045d8ec3" officeooo:paragraph-rsid="04600126"/>
    </style:style>
    <style:style style:name="P166" style:family="paragraph" style:parent-style-name="Text_20_body">
      <style:text-properties officeooo:rsid="045d8ec3" officeooo:paragraph-rsid="045d8ec3"/>
    </style:style>
    <style:style style:name="P167" style:family="paragraph" style:parent-style-name="Text_20_body">
      <style:text-properties officeooo:rsid="04612228" officeooo:paragraph-rsid="04612228"/>
    </style:style>
    <style:style style:name="P168" style:family="paragraph" style:parent-style-name="Text_20_body">
      <style:text-properties officeooo:rsid="04632956" officeooo:paragraph-rsid="04632956"/>
    </style:style>
    <style:style style:name="P169" style:family="paragraph" style:parent-style-name="Text_20_body">
      <style:text-properties officeooo:rsid="04651193" officeooo:paragraph-rsid="04651193"/>
    </style:style>
    <style:style style:name="P170" style:family="paragraph" style:parent-style-name="Text_20_body">
      <style:text-properties officeooo:rsid="04681a01" officeooo:paragraph-rsid="04681a01"/>
    </style:style>
    <style:style style:name="P171" style:family="paragraph" style:parent-style-name="Text_20_body">
      <style:text-properties officeooo:rsid="04686a3f" officeooo:paragraph-rsid="04686a3f"/>
    </style:style>
    <style:style style:name="P172" style:family="paragraph" style:parent-style-name="Text_20_body">
      <style:text-properties officeooo:rsid="046d5628" officeooo:paragraph-rsid="046e1aef"/>
    </style:style>
    <style:style style:name="P173" style:family="paragraph" style:parent-style-name="Text_20_body">
      <style:text-properties officeooo:rsid="046e1aef" officeooo:paragraph-rsid="046e1aef"/>
    </style:style>
    <style:style style:name="P174" style:family="paragraph" style:parent-style-name="Text_20_body">
      <style:text-properties officeooo:rsid="047115e7" officeooo:paragraph-rsid="04721c99"/>
    </style:style>
    <style:style style:name="P175" style:family="paragraph" style:parent-style-name="Text_20_body">
      <style:text-properties officeooo:rsid="04737aa1" officeooo:paragraph-rsid="04737aa1"/>
    </style:style>
    <style:style style:name="P176" style:family="paragraph" style:parent-style-name="Text_20_body">
      <style:text-properties officeooo:rsid="0474c617" officeooo:paragraph-rsid="0474c617"/>
    </style:style>
    <style:style style:name="P177" style:family="paragraph" style:parent-style-name="Text_20_body">
      <style:text-properties officeooo:rsid="0475bd18" officeooo:paragraph-rsid="047806da"/>
    </style:style>
    <style:style style:name="P178" style:family="paragraph" style:parent-style-name="Text_20_body">
      <style:text-properties officeooo:rsid="0475bd18" officeooo:paragraph-rsid="047f886c"/>
    </style:style>
    <style:style style:name="P179" style:family="paragraph" style:parent-style-name="Text_20_body">
      <style:text-properties officeooo:rsid="0475bd18" officeooo:paragraph-rsid="04816e12"/>
    </style:style>
    <style:style style:name="P180" style:family="paragraph" style:parent-style-name="Text_20_body">
      <style:text-properties officeooo:rsid="0482eb6f" officeooo:paragraph-rsid="0482eb6f"/>
    </style:style>
    <style:style style:name="P181" style:family="paragraph" style:parent-style-name="Text_20_body">
      <style:text-properties officeooo:rsid="0482eb6f" officeooo:paragraph-rsid="04869e98"/>
    </style:style>
    <style:style style:name="P182" style:family="paragraph" style:parent-style-name="Text_20_body">
      <style:text-properties officeooo:paragraph-rsid="04883187"/>
    </style:style>
    <style:style style:name="P183" style:family="paragraph" style:parent-style-name="Text_20_body">
      <style:text-properties officeooo:paragraph-rsid="0276c690"/>
    </style:style>
    <style:style style:name="P184" style:family="paragraph" style:parent-style-name="Text_20_body">
      <style:text-properties officeooo:rsid="048f47c6" officeooo:paragraph-rsid="048f47c6"/>
    </style:style>
    <style:style style:name="P185" style:family="paragraph" style:parent-style-name="Text_20_body">
      <style:text-properties officeooo:rsid="04869e98" officeooo:paragraph-rsid="04869e98"/>
    </style:style>
    <style:style style:name="P186" style:family="paragraph" style:parent-style-name="Text_20_body">
      <style:text-properties officeooo:rsid="04917709" officeooo:paragraph-rsid="04917709"/>
    </style:style>
    <style:style style:name="P187" style:family="paragraph" style:parent-style-name="Text_20_body">
      <style:text-properties officeooo:rsid="04956bd1" officeooo:paragraph-rsid="04956bd1"/>
    </style:style>
    <style:style style:name="P188" style:family="paragraph" style:parent-style-name="Text_20_body">
      <style:text-properties officeooo:rsid="04975f84" officeooo:paragraph-rsid="04975f84"/>
    </style:style>
    <style:style style:name="P189" style:family="paragraph" style:parent-style-name="Text_20_body">
      <style:text-properties officeooo:rsid="049b7ed9" officeooo:paragraph-rsid="049b7ed9"/>
    </style:style>
    <style:style style:name="P190" style:family="paragraph" style:parent-style-name="Text_20_body">
      <style:text-properties officeooo:paragraph-rsid="049c0b6e"/>
    </style:style>
    <style:style style:name="P191" style:family="paragraph" style:parent-style-name="Text_20_body">
      <style:text-properties officeooo:rsid="049cbb6c" officeooo:paragraph-rsid="049cbb6c"/>
    </style:style>
    <style:style style:name="P192" style:family="paragraph" style:parent-style-name="Text_20_body">
      <style:text-properties officeooo:rsid="049fd7d0" officeooo:paragraph-rsid="049fd7d0"/>
    </style:style>
    <style:style style:name="P193" style:family="paragraph" style:parent-style-name="Text_20_body">
      <style:text-properties officeooo:paragraph-rsid="04a1802c"/>
    </style:style>
    <style:style style:name="P194" style:family="paragraph" style:parent-style-name="Text_20_body">
      <style:text-properties officeooo:rsid="04a541fd" officeooo:paragraph-rsid="04a541fd"/>
    </style:style>
    <style:style style:name="P195" style:family="paragraph" style:parent-style-name="Text_20_body">
      <style:text-properties officeooo:rsid="04ae4247" officeooo:paragraph-rsid="04ae4247"/>
    </style:style>
    <style:style style:name="P196" style:family="paragraph" style:parent-style-name="Text_20_body">
      <style:text-properties officeooo:rsid="04ae4247" officeooo:paragraph-rsid="04b0df47"/>
    </style:style>
    <style:style style:name="P197" style:family="paragraph" style:parent-style-name="Text_20_body">
      <style:text-properties officeooo:paragraph-rsid="04b0df47"/>
    </style:style>
    <style:style style:name="P198" style:family="paragraph" style:parent-style-name="Text_20_body">
      <style:text-properties officeooo:rsid="04b0df47" officeooo:paragraph-rsid="04b0df47"/>
    </style:style>
    <style:style style:name="P199" style:family="paragraph" style:parent-style-name="Text_20_body">
      <style:text-properties officeooo:rsid="04b4292d" officeooo:paragraph-rsid="04b4292d"/>
    </style:style>
    <style:style style:name="P200" style:family="paragraph" style:parent-style-name="Text_20_body">
      <style:text-properties officeooo:rsid="04b56bc2" officeooo:paragraph-rsid="04b56bc2"/>
    </style:style>
    <style:style style:name="P201" style:family="paragraph" style:parent-style-name="Text_20_body">
      <style:text-properties officeooo:rsid="04b83474" officeooo:paragraph-rsid="04b83474"/>
    </style:style>
    <style:style style:name="P202" style:family="paragraph" style:parent-style-name="Text_20_body">
      <style:text-properties officeooo:paragraph-rsid="04b939b8"/>
    </style:style>
    <style:style style:name="P203" style:family="paragraph" style:parent-style-name="Text_20_body">
      <style:text-properties officeooo:rsid="04be721f" officeooo:paragraph-rsid="04be721f"/>
    </style:style>
    <style:style style:name="P204" style:family="paragraph" style:parent-style-name="Text_20_body">
      <style:text-properties officeooo:rsid="04c1291d" officeooo:paragraph-rsid="04c1291d"/>
    </style:style>
    <style:style style:name="P205" style:family="paragraph" style:parent-style-name="Text_20_body">
      <style:text-properties officeooo:rsid="04c27cf2" officeooo:paragraph-rsid="04c27cf2"/>
    </style:style>
    <style:style style:name="P206" style:family="paragraph" style:parent-style-name="Text_20_body">
      <style:text-properties officeooo:rsid="04c326c8" officeooo:paragraph-rsid="04c326c8"/>
    </style:style>
    <style:style style:name="P207" style:family="paragraph" style:parent-style-name="Text_20_body">
      <style:text-properties officeooo:rsid="04c326c8" officeooo:paragraph-rsid="04c42583"/>
    </style:style>
    <style:style style:name="P208" style:family="paragraph" style:parent-style-name="Text_20_body">
      <style:text-properties officeooo:rsid="04c55662" officeooo:paragraph-rsid="04c55662"/>
    </style:style>
    <style:style style:name="P209" style:family="paragraph" style:parent-style-name="Text_20_body">
      <style:text-properties officeooo:rsid="04c709ef" officeooo:paragraph-rsid="04c709ef"/>
    </style:style>
    <style:style style:name="P210" style:family="paragraph" style:parent-style-name="Text_20_body">
      <style:text-properties officeooo:rsid="04c9c22f" officeooo:paragraph-rsid="04c9c22f"/>
    </style:style>
    <style:style style:name="P211" style:family="paragraph" style:parent-style-name="Text_20_body">
      <style:text-properties officeooo:rsid="04d10535" officeooo:paragraph-rsid="04d10535"/>
    </style:style>
    <style:style style:name="P212" style:family="paragraph" style:parent-style-name="Text_20_body">
      <style:text-properties officeooo:rsid="04d1f085" officeooo:paragraph-rsid="04d1f085"/>
    </style:style>
    <style:style style:name="P213" style:family="paragraph" style:parent-style-name="Text_20_body">
      <style:text-properties officeooo:rsid="04d286f5" officeooo:paragraph-rsid="04d29702"/>
    </style:style>
    <style:style style:name="P214" style:family="paragraph" style:parent-style-name="Text_20_body">
      <style:text-properties officeooo:rsid="04d43b96" officeooo:paragraph-rsid="04d43b96"/>
    </style:style>
    <style:style style:name="P215" style:family="paragraph" style:parent-style-name="Text_20_body">
      <style:text-properties officeooo:rsid="04d43b96" officeooo:paragraph-rsid="04d841c0"/>
    </style:style>
    <style:style style:name="P216" style:family="paragraph" style:parent-style-name="Text_20_body">
      <style:text-properties officeooo:rsid="04d43b96" officeooo:paragraph-rsid="04d99fda"/>
    </style:style>
    <style:style style:name="P217" style:family="paragraph" style:parent-style-name="Text_20_body">
      <style:text-properties officeooo:rsid="04d29702" officeooo:paragraph-rsid="04d29702"/>
    </style:style>
    <style:style style:name="P218" style:family="paragraph" style:parent-style-name="Text_20_body">
      <style:text-properties officeooo:paragraph-rsid="04dd3e9d"/>
    </style:style>
    <style:style style:name="P219" style:family="paragraph" style:parent-style-name="Text_20_body">
      <style:text-properties officeooo:rsid="04e3e915" officeooo:paragraph-rsid="04e5a6fa"/>
    </style:style>
    <style:style style:name="P220" style:family="paragraph" style:parent-style-name="Text_20_body">
      <style:text-properties officeooo:paragraph-rsid="04e73bec"/>
    </style:style>
    <style:style style:name="P221" style:family="paragraph" style:parent-style-name="Text_20_body">
      <style:text-properties officeooo:rsid="04dbc645" officeooo:paragraph-rsid="04dbc645"/>
    </style:style>
    <style:style style:name="P222" style:family="paragraph" style:parent-style-name="Text_20_body">
      <style:text-properties officeooo:rsid="04dd3e9d" officeooo:paragraph-rsid="04dd3e9d"/>
    </style:style>
    <style:style style:name="P223" style:family="paragraph" style:parent-style-name="Text_20_body">
      <style:text-properties officeooo:paragraph-rsid="04e9cf81"/>
    </style:style>
    <style:style style:name="P224" style:family="paragraph" style:parent-style-name="Text_20_body">
      <style:text-properties officeooo:paragraph-rsid="04f2cbf4"/>
    </style:style>
    <style:style style:name="P225" style:family="paragraph" style:parent-style-name="Text_20_body">
      <style:text-properties officeooo:rsid="04f68503" officeooo:paragraph-rsid="04f68503"/>
    </style:style>
    <style:style style:name="P226" style:family="paragraph" style:parent-style-name="Text_20_body">
      <style:text-properties officeooo:rsid="04f68503" officeooo:paragraph-rsid="04f7a2aa"/>
    </style:style>
    <style:style style:name="P227" style:family="paragraph" style:parent-style-name="Text_20_body">
      <style:text-properties officeooo:rsid="04f7a2aa" officeooo:paragraph-rsid="04f7a2aa"/>
    </style:style>
    <style:style style:name="P228" style:family="paragraph" style:parent-style-name="Text_20_body">
      <style:text-properties officeooo:rsid="04f860c9" officeooo:paragraph-rsid="04f860c9"/>
    </style:style>
    <style:style style:name="P229" style:family="paragraph" style:parent-style-name="Text_20_body">
      <style:text-properties officeooo:paragraph-rsid="05005608"/>
    </style:style>
    <style:style style:name="P230" style:family="paragraph" style:parent-style-name="Text_20_body">
      <style:text-properties officeooo:rsid="05012485" officeooo:paragraph-rsid="0504e319"/>
    </style:style>
    <style:style style:name="P231" style:family="paragraph" style:parent-style-name="Text_20_body">
      <style:text-properties officeooo:rsid="05012485" officeooo:paragraph-rsid="0501b407"/>
    </style:style>
    <style:style style:name="P232" style:family="paragraph" style:parent-style-name="Text_20_body">
      <style:text-properties officeooo:rsid="0504e319" officeooo:paragraph-rsid="0504e319"/>
    </style:style>
    <style:style style:name="P233" style:family="paragraph" style:parent-style-name="Text_20_body">
      <style:text-properties officeooo:rsid="050721ea" officeooo:paragraph-rsid="0509ede1"/>
    </style:style>
    <style:style style:name="P234" style:family="paragraph" style:parent-style-name="Text_20_body">
      <style:text-properties officeooo:rsid="050721ea" officeooo:paragraph-rsid="050c5428"/>
    </style:style>
    <style:style style:name="P235" style:family="paragraph" style:parent-style-name="Text_20_body">
      <style:text-properties officeooo:rsid="050c5428" officeooo:paragraph-rsid="050c5428"/>
    </style:style>
    <style:style style:name="P236" style:family="paragraph" style:parent-style-name="Text_20_body">
      <style:text-properties officeooo:rsid="050c5428" officeooo:paragraph-rsid="050d8ab4"/>
    </style:style>
    <style:style style:name="P237" style:family="paragraph" style:parent-style-name="Text_20_body">
      <style:text-properties officeooo:rsid="04fa90ab" officeooo:paragraph-rsid="04fa90ab"/>
    </style:style>
    <style:style style:name="P238" style:family="paragraph" style:parent-style-name="Text_20_body">
      <style:text-properties officeooo:rsid="04fb47f8" officeooo:paragraph-rsid="04fcde42"/>
    </style:style>
    <style:style style:name="P239" style:family="paragraph" style:parent-style-name="Text_20_body">
      <style:text-properties officeooo:rsid="05005608" officeooo:paragraph-rsid="05005608"/>
    </style:style>
    <style:style style:name="P240" style:family="paragraph" style:parent-style-name="Text_20_body">
      <style:text-properties officeooo:rsid="0509ede1" officeooo:paragraph-rsid="050c5428"/>
    </style:style>
    <style:style style:name="P241" style:family="paragraph" style:parent-style-name="Text_20_body">
      <style:text-properties officeooo:rsid="050d8ab4" officeooo:paragraph-rsid="0510af92"/>
    </style:style>
    <style:style style:name="P242" style:family="paragraph" style:parent-style-name="Text_20_body">
      <style:text-properties officeooo:rsid="050d8ab4" officeooo:paragraph-rsid="0515ccc4"/>
    </style:style>
    <style:style style:name="P243" style:family="paragraph" style:parent-style-name="Text_20_body">
      <style:text-properties officeooo:rsid="05173d26" officeooo:paragraph-rsid="05173d26"/>
    </style:style>
    <style:style style:name="P244" style:family="paragraph" style:parent-style-name="Text_20_body">
      <style:text-properties officeooo:rsid="0519282d" officeooo:paragraph-rsid="0519282d"/>
    </style:style>
    <style:style style:name="P245" style:family="paragraph" style:parent-style-name="Text_20_body">
      <style:text-properties officeooo:rsid="051ba456" officeooo:paragraph-rsid="051c5b0e"/>
    </style:style>
    <style:style style:name="P246" style:family="paragraph" style:parent-style-name="Text_20_body">
      <style:text-properties officeooo:rsid="051f26b7" officeooo:paragraph-rsid="051f8d32"/>
    </style:style>
    <style:style style:name="P247" style:family="paragraph" style:parent-style-name="Text_20_body">
      <style:text-properties officeooo:rsid="05211119" officeooo:paragraph-rsid="05211119"/>
    </style:style>
    <style:style style:name="P248" style:family="paragraph" style:parent-style-name="Text_20_body">
      <style:text-properties officeooo:rsid="0522de7c" officeooo:paragraph-rsid="0522de7c"/>
    </style:style>
    <style:style style:name="P249" style:family="paragraph" style:parent-style-name="Text_20_body">
      <style:text-properties officeooo:rsid="05328431" officeooo:paragraph-rsid="05328431"/>
    </style:style>
    <style:style style:name="P250" style:family="paragraph" style:parent-style-name="Text_20_body">
      <style:text-properties officeooo:rsid="0533a80e" officeooo:paragraph-rsid="0533a80e"/>
    </style:style>
    <style:style style:name="P251" style:family="paragraph" style:parent-style-name="Text_20_body">
      <style:text-properties officeooo:rsid="05353d9c" officeooo:paragraph-rsid="05399702"/>
    </style:style>
    <style:style style:name="P252" style:family="paragraph" style:parent-style-name="Text_20_body">
      <style:text-properties officeooo:rsid="05399702" officeooo:paragraph-rsid="05399702"/>
    </style:style>
    <style:style style:name="P253" style:family="paragraph" style:parent-style-name="Text_20_body">
      <style:text-properties officeooo:rsid="053b28bc" officeooo:paragraph-rsid="053b28bc"/>
    </style:style>
    <style:style style:name="P254" style:family="paragraph" style:parent-style-name="Text_20_body">
      <style:text-properties officeooo:rsid="053e6eed" officeooo:paragraph-rsid="053e6eed"/>
    </style:style>
    <style:style style:name="P255" style:family="paragraph" style:parent-style-name="Text_20_body">
      <style:text-properties officeooo:rsid="054023df" officeooo:paragraph-rsid="054023df"/>
    </style:style>
    <style:style style:name="P256" style:family="paragraph" style:parent-style-name="Text_20_body">
      <style:text-properties officeooo:rsid="054151cb" officeooo:paragraph-rsid="054151cb"/>
    </style:style>
    <style:style style:name="P257" style:family="paragraph" style:parent-style-name="Text_20_body">
      <style:text-properties officeooo:rsid="0542d14d" officeooo:paragraph-rsid="0542d14d"/>
    </style:style>
    <style:style style:name="P258" style:family="paragraph" style:parent-style-name="Text_20_body">
      <style:text-properties officeooo:rsid="05442813" officeooo:paragraph-rsid="05442813"/>
    </style:style>
    <style:style style:name="P259" style:family="paragraph" style:parent-style-name="Text_20_body">
      <style:text-properties officeooo:rsid="05462f4f" officeooo:paragraph-rsid="05462f4f"/>
    </style:style>
    <style:style style:name="P260" style:family="paragraph" style:parent-style-name="Text_20_body">
      <style:text-properties officeooo:rsid="054cb1ed" officeooo:paragraph-rsid="054cb1ed"/>
    </style:style>
    <style:style style:name="P261" style:family="paragraph" style:parent-style-name="Text_20_body">
      <style:text-properties officeooo:rsid="054cb1ed" officeooo:paragraph-rsid="054cd2ae"/>
    </style:style>
    <style:style style:name="P262" style:family="paragraph" style:parent-style-name="Text_20_body">
      <style:text-properties officeooo:rsid="054dc842" officeooo:paragraph-rsid="054dc842"/>
    </style:style>
    <style:style style:name="P263" style:family="paragraph" style:parent-style-name="Text_20_body">
      <style:text-properties officeooo:rsid="054f9d19" officeooo:paragraph-rsid="054f9d19"/>
    </style:style>
    <style:style style:name="P264" style:family="paragraph" style:parent-style-name="Text_20_body">
      <style:text-properties officeooo:rsid="054fc5c2" officeooo:paragraph-rsid="055011be"/>
    </style:style>
    <style:style style:name="P265" style:family="paragraph" style:parent-style-name="Text_20_body">
      <style:text-properties officeooo:rsid="05516136" officeooo:paragraph-rsid="05516136"/>
    </style:style>
    <style:style style:name="P266" style:family="paragraph" style:parent-style-name="Text_20_body">
      <style:text-properties officeooo:rsid="0551c01b" officeooo:paragraph-rsid="0551d521"/>
    </style:style>
    <style:style style:name="P267" style:family="paragraph" style:parent-style-name="Text_20_body">
      <style:text-properties officeooo:rsid="055736e0" officeooo:paragraph-rsid="055736e0"/>
    </style:style>
    <style:style style:name="P268" style:family="paragraph" style:parent-style-name="Text_20_body">
      <style:text-properties officeooo:rsid="0557771d" officeooo:paragraph-rsid="0557771d"/>
    </style:style>
    <style:style style:name="P269" style:family="paragraph" style:parent-style-name="Text_20_body">
      <style:text-properties officeooo:rsid="05590cc3" officeooo:paragraph-rsid="05590cc3"/>
    </style:style>
    <style:style style:name="P270" style:family="paragraph" style:parent-style-name="Text_20_body">
      <style:text-properties officeooo:rsid="055aa82c" officeooo:paragraph-rsid="055aa82c"/>
    </style:style>
    <style:style style:name="P271" style:family="paragraph" style:parent-style-name="Text_20_body">
      <style:text-properties officeooo:rsid="054cd2ae" officeooo:paragraph-rsid="054cd2ae"/>
    </style:style>
    <style:style style:name="P272" style:family="paragraph" style:parent-style-name="Text_20_body">
      <style:text-properties officeooo:rsid="056db49c" officeooo:paragraph-rsid="05712e8b"/>
    </style:style>
    <style:style style:name="P273" style:family="paragraph" style:parent-style-name="Text_20_body">
      <style:text-properties officeooo:rsid="05712e8b" officeooo:paragraph-rsid="05712e8b"/>
    </style:style>
    <style:style style:name="P274" style:family="paragraph" style:parent-style-name="Text_20_body">
      <style:text-properties officeooo:rsid="057cd2af" officeooo:paragraph-rsid="057cd2af"/>
    </style:style>
    <style:style style:name="P275" style:family="paragraph" style:parent-style-name="Text_20_body">
      <style:text-properties officeooo:rsid="057e5319" officeooo:paragraph-rsid="057e5319"/>
    </style:style>
    <style:style style:name="P276" style:family="paragraph" style:parent-style-name="Text_20_body">
      <style:text-properties officeooo:rsid="057e5319" officeooo:paragraph-rsid="0580091b"/>
    </style:style>
    <style:style style:name="P277" style:family="paragraph" style:parent-style-name="Text_20_body">
      <style:text-properties officeooo:rsid="0580091b" officeooo:paragraph-rsid="0580091b"/>
    </style:style>
    <style:style style:name="P278" style:family="paragraph" style:parent-style-name="Text_20_body">
      <style:text-properties officeooo:rsid="0581e3ec" officeooo:paragraph-rsid="0581e3ec"/>
    </style:style>
    <style:style style:name="P279" style:family="paragraph" style:parent-style-name="Text_20_body">
      <style:text-properties officeooo:rsid="05823277" officeooo:paragraph-rsid="05823277"/>
    </style:style>
    <style:style style:name="P280" style:family="paragraph" style:parent-style-name="Text_20_body">
      <style:text-properties officeooo:rsid="05871fc2" officeooo:paragraph-rsid="05871fc2"/>
    </style:style>
    <style:style style:name="P281" style:family="paragraph" style:parent-style-name="Text_20_body">
      <style:text-properties officeooo:rsid="05890873" officeooo:paragraph-rsid="05890873"/>
    </style:style>
    <style:style style:name="P282" style:family="paragraph" style:parent-style-name="Text_20_body">
      <style:text-properties officeooo:rsid="0589e328" officeooo:paragraph-rsid="0589e328"/>
    </style:style>
    <style:style style:name="P283" style:family="paragraph" style:parent-style-name="Text_20_body">
      <style:text-properties officeooo:rsid="058a8565" officeooo:paragraph-rsid="058a8565"/>
    </style:style>
    <style:style style:name="P284" style:family="paragraph" style:parent-style-name="Text_20_body">
      <style:text-properties officeooo:rsid="058c4de6" officeooo:paragraph-rsid="058c4de6"/>
    </style:style>
    <style:style style:name="P285" style:family="paragraph" style:parent-style-name="Text_20_body">
      <style:text-properties officeooo:rsid="0592066c" officeooo:paragraph-rsid="0592066c"/>
    </style:style>
    <style:style style:name="P286" style:family="paragraph" style:parent-style-name="Text_20_body">
      <style:text-properties officeooo:rsid="059799ed" officeooo:paragraph-rsid="059799ed"/>
    </style:style>
    <style:style style:name="P287" style:family="paragraph" style:parent-style-name="Text_20_body">
      <style:text-properties officeooo:rsid="059a2016" officeooo:paragraph-rsid="059c4215"/>
    </style:style>
    <style:style style:name="P288" style:family="paragraph" style:parent-style-name="Text_20_body">
      <style:text-properties officeooo:rsid="059c4215" officeooo:paragraph-rsid="059c4215"/>
    </style:style>
    <style:style style:name="P289" style:family="paragraph" style:parent-style-name="Text_20_body">
      <style:text-properties officeooo:rsid="05a27797" officeooo:paragraph-rsid="05a27797"/>
    </style:style>
    <style:style style:name="P290" style:family="paragraph" style:parent-style-name="Text_20_body">
      <style:paragraph-properties fo:margin-left="0.5in" fo:margin-right="0in" fo:text-indent="0in" style:auto-text-indent="false"/>
      <style:text-properties officeooo:rsid="05a27797" officeooo:paragraph-rsid="05a27797"/>
    </style:style>
    <style:style style:name="P291" style:family="paragraph" style:parent-style-name="Text_20_body">
      <style:text-properties officeooo:rsid="05ac9579" officeooo:paragraph-rsid="05ac9579"/>
    </style:style>
    <style:style style:name="P292" style:family="paragraph" style:parent-style-name="Text_20_body">
      <style:text-properties officeooo:rsid="05af0422" officeooo:paragraph-rsid="05af0422"/>
    </style:style>
    <style:style style:name="P293" style:family="paragraph" style:parent-style-name="Text_20_body">
      <style:text-properties officeooo:rsid="05b12861" officeooo:paragraph-rsid="05b12861"/>
    </style:style>
    <style:style style:name="P294" style:family="paragraph" style:parent-style-name="Text_20_body">
      <style:text-properties officeooo:rsid="05b21ca2" officeooo:paragraph-rsid="05b21ca2"/>
    </style:style>
    <style:style style:name="P295" style:family="paragraph" style:parent-style-name="Text_20_body">
      <style:text-properties officeooo:rsid="05b1b1b8" officeooo:paragraph-rsid="05b1b1b8"/>
    </style:style>
    <style:style style:name="P296" style:family="paragraph" style:parent-style-name="Text_20_body">
      <style:text-properties officeooo:rsid="05b6d9f6" officeooo:paragraph-rsid="05b6d9f6"/>
    </style:style>
    <style:style style:name="P297" style:family="paragraph" style:parent-style-name="Text_20_body">
      <style:text-properties officeooo:rsid="05b887c6" officeooo:paragraph-rsid="05b9df7a"/>
    </style:style>
    <style:style style:name="P298" style:family="paragraph" style:parent-style-name="Text_20_body">
      <style:text-properties officeooo:rsid="05b887c6" officeooo:paragraph-rsid="05baa31b"/>
    </style:style>
    <style:style style:name="P299" style:family="paragraph" style:parent-style-name="Text_20_body">
      <style:text-properties officeooo:rsid="05b887c6" officeooo:paragraph-rsid="05bb925a"/>
    </style:style>
    <style:style style:name="P300" style:family="paragraph" style:parent-style-name="Text_20_body">
      <style:text-properties officeooo:rsid="05bdb2c9" officeooo:paragraph-rsid="05bdfae7"/>
    </style:style>
    <style:style style:name="P301" style:family="paragraph" style:parent-style-name="Text_20_body">
      <style:text-properties officeooo:rsid="05bdb2c9" officeooo:paragraph-rsid="05c0ac21"/>
    </style:style>
    <style:style style:name="P302" style:family="paragraph" style:parent-style-name="Text_20_body">
      <style:text-properties officeooo:paragraph-rsid="05c2a127"/>
    </style:style>
    <style:style style:name="P303" style:family="paragraph" style:parent-style-name="Text_20_body">
      <style:text-properties officeooo:rsid="05d2af5a" officeooo:paragraph-rsid="05d2af5a"/>
    </style:style>
    <style:style style:name="P304" style:family="paragraph" style:parent-style-name="Text_20_body">
      <style:text-properties officeooo:rsid="05d2af5a" officeooo:paragraph-rsid="05fa5e0a"/>
    </style:style>
    <style:style style:name="P305" style:family="paragraph" style:parent-style-name="Text_20_body">
      <style:text-properties officeooo:rsid="05d51589" officeooo:paragraph-rsid="05d600f5"/>
    </style:style>
    <style:style style:name="P306" style:family="paragraph" style:parent-style-name="Text_20_body">
      <style:text-properties officeooo:rsid="05d51589" officeooo:paragraph-rsid="05d7add2"/>
    </style:style>
    <style:style style:name="P307" style:family="paragraph" style:parent-style-name="Text_20_body">
      <style:text-properties officeooo:rsid="05d51589" officeooo:paragraph-rsid="05d9a1ad"/>
    </style:style>
    <style:style style:name="P308" style:family="paragraph" style:parent-style-name="Text_20_body">
      <style:text-properties officeooo:rsid="05d51589" officeooo:paragraph-rsid="05dacff8"/>
    </style:style>
    <style:style style:name="P309" style:family="paragraph" style:parent-style-name="Text_20_body">
      <style:text-properties officeooo:rsid="05d51589" officeooo:paragraph-rsid="05db8e06"/>
    </style:style>
    <style:style style:name="P310" style:family="paragraph" style:parent-style-name="Text_20_body">
      <style:text-properties officeooo:rsid="05db109e" officeooo:paragraph-rsid="05db109e"/>
    </style:style>
    <style:style style:name="P311" style:family="paragraph" style:parent-style-name="Text_20_body">
      <style:text-properties officeooo:rsid="05f8cb8d" officeooo:paragraph-rsid="05fc033e"/>
    </style:style>
    <style:style style:name="P312" style:family="paragraph" style:parent-style-name="Text_20_body">
      <style:text-properties officeooo:rsid="05fdcb5f" officeooo:paragraph-rsid="05fdcb5f"/>
    </style:style>
    <style:style style:name="P313" style:family="paragraph" style:parent-style-name="Text_20_body">
      <style:text-properties officeooo:paragraph-rsid="0602c843"/>
    </style:style>
    <style:style style:name="P314" style:family="paragraph" style:parent-style-name="Text_20_body">
      <style:text-properties officeooo:rsid="066c3482" officeooo:paragraph-rsid="066c3482"/>
    </style:style>
    <style:style style:name="P315" style:family="paragraph" style:parent-style-name="Text_20_body">
      <style:paragraph-properties fo:margin-left="0in" fo:margin-right="0in" fo:text-indent="0in" style:auto-text-indent="false"/>
      <style:text-properties officeooo:rsid="066c3482" officeooo:paragraph-rsid="066c3482"/>
    </style:style>
    <style:style style:name="P316" style:family="paragraph" style:parent-style-name="Text_20_body">
      <style:text-properties officeooo:rsid="066dad2e" officeooo:paragraph-rsid="066dad2e"/>
    </style:style>
    <style:style style:name="P317" style:family="paragraph" style:parent-style-name="Text_20_body">
      <style:text-properties officeooo:rsid="0670e481" officeooo:paragraph-rsid="0670e481"/>
    </style:style>
    <style:style style:name="P318" style:family="paragraph" style:parent-style-name="Text_20_body">
      <style:text-properties officeooo:rsid="06722c9a" officeooo:paragraph-rsid="06722c9a"/>
    </style:style>
    <style:style style:name="P319" style:family="paragraph" style:parent-style-name="Text_20_body">
      <style:text-properties officeooo:rsid="0673ad10" officeooo:paragraph-rsid="0673ad10"/>
    </style:style>
    <style:style style:name="P320" style:family="paragraph" style:parent-style-name="Text_20_body">
      <style:text-properties officeooo:rsid="0675d1f4" officeooo:paragraph-rsid="0675d1f4"/>
    </style:style>
    <style:style style:name="P321" style:family="paragraph" style:parent-style-name="Text_20_body">
      <style:text-properties officeooo:rsid="067e60f7" officeooo:paragraph-rsid="067e60f7"/>
    </style:style>
    <style:style style:name="P322" style:family="paragraph" style:parent-style-name="Text_20_body">
      <style:text-properties officeooo:rsid="067f4f73" officeooo:paragraph-rsid="067f4f73"/>
    </style:style>
    <style:style style:name="P323" style:family="paragraph" style:parent-style-name="Text_20_body">
      <style:text-properties officeooo:rsid="06804d30" officeooo:paragraph-rsid="06804d30"/>
    </style:style>
    <style:style style:name="P324" style:family="paragraph" style:parent-style-name="Text_20_body">
      <style:text-properties officeooo:rsid="068300dd" officeooo:paragraph-rsid="068300dd"/>
    </style:style>
    <style:style style:name="P325" style:family="paragraph" style:parent-style-name="Text_20_body">
      <style:text-properties officeooo:rsid="06833c1c" officeooo:paragraph-rsid="06833c1c"/>
    </style:style>
    <style:style style:name="P326" style:family="paragraph" style:parent-style-name="Text_20_body">
      <style:text-properties officeooo:rsid="0685004e" officeooo:paragraph-rsid="0685004e"/>
    </style:style>
    <style:style style:name="P327" style:family="paragraph" style:parent-style-name="Text_20_body">
      <style:text-properties officeooo:rsid="0687e126" officeooo:paragraph-rsid="0687e126"/>
    </style:style>
    <style:style style:name="P328" style:family="paragraph" style:parent-style-name="Text_20_body">
      <style:text-properties officeooo:rsid="0688f618" officeooo:paragraph-rsid="0688f618"/>
    </style:style>
    <style:style style:name="P329" style:family="paragraph" style:parent-style-name="Text_20_body">
      <style:text-properties officeooo:rsid="068f67bb" officeooo:paragraph-rsid="068ff205"/>
    </style:style>
    <style:style style:name="P330" style:family="paragraph" style:parent-style-name="Text_20_body">
      <style:text-properties officeooo:rsid="068d92cd" officeooo:paragraph-rsid="068d92cd"/>
    </style:style>
    <style:style style:name="P331" style:family="paragraph" style:parent-style-name="Text_20_body">
      <style:text-properties officeooo:rsid="068ff205" officeooo:paragraph-rsid="0691e31e"/>
    </style:style>
    <style:style style:name="P332" style:family="paragraph" style:parent-style-name="Text_20_body">
      <style:text-properties officeooo:rsid="0697792e" officeooo:paragraph-rsid="0697792e"/>
    </style:style>
    <style:style style:name="P333" style:family="paragraph" style:parent-style-name="Text_20_body">
      <style:text-properties officeooo:rsid="069a6c8e" officeooo:paragraph-rsid="069a6c8e"/>
    </style:style>
    <style:style style:name="P334" style:family="paragraph" style:parent-style-name="Text_20_body">
      <style:text-properties officeooo:rsid="069a77b3" officeooo:paragraph-rsid="069a77b3"/>
    </style:style>
    <style:style style:name="P335" style:family="paragraph" style:parent-style-name="Text_20_body">
      <style:text-properties officeooo:rsid="069a98c9" officeooo:paragraph-rsid="069a98c9"/>
    </style:style>
    <style:style style:name="P336" style:family="paragraph" style:parent-style-name="Text_20_body">
      <style:text-properties officeooo:rsid="069f9ded" officeooo:paragraph-rsid="06a477be"/>
    </style:style>
    <style:style style:name="P337" style:family="paragraph" style:parent-style-name="Text_20_body">
      <style:text-properties officeooo:rsid="069f9ded" officeooo:paragraph-rsid="06aaf8c4"/>
    </style:style>
    <style:style style:name="P338" style:family="paragraph" style:parent-style-name="Text_20_body">
      <style:text-properties officeooo:rsid="069f9ded" officeooo:paragraph-rsid="06abbc5b"/>
    </style:style>
    <style:style style:name="P339" style:family="paragraph" style:parent-style-name="Text_20_body">
      <style:text-properties officeooo:rsid="069f9ded" officeooo:paragraph-rsid="06c0f4b4"/>
    </style:style>
    <style:style style:name="P340" style:family="paragraph" style:parent-style-name="Text_20_body">
      <style:text-properties officeooo:rsid="06af3554" officeooo:paragraph-rsid="06af3554"/>
    </style:style>
    <style:style style:name="P341" style:family="paragraph" style:parent-style-name="Text_20_body">
      <style:text-properties officeooo:rsid="06c292cf" officeooo:paragraph-rsid="06caed9a"/>
    </style:style>
    <style:style style:name="P342" style:family="paragraph" style:parent-style-name="Text_20_body">
      <style:text-properties officeooo:rsid="06c7863d" officeooo:paragraph-rsid="06c7863d"/>
    </style:style>
    <style:style style:name="P343" style:family="paragraph" style:parent-style-name="Text_20_body">
      <style:paragraph-properties fo:margin-left="0.5in" fo:margin-right="0in" fo:text-indent="0in" style:auto-text-indent="false"/>
      <style:text-properties officeooo:rsid="06c7863d" officeooo:paragraph-rsid="06c7863d"/>
    </style:style>
    <style:style style:name="P344" style:family="paragraph" style:parent-style-name="Text_20_body">
      <style:text-properties officeooo:rsid="06c84bb8" officeooo:paragraph-rsid="06c84bb8"/>
    </style:style>
    <style:style style:name="P345" style:family="paragraph" style:parent-style-name="Text_20_body">
      <style:text-properties officeooo:rsid="06cca6b4" officeooo:paragraph-rsid="06cca6b4"/>
    </style:style>
    <style:style style:name="P346" style:family="paragraph" style:parent-style-name="Text_20_body">
      <style:text-properties officeooo:rsid="06ce4d06" officeooo:paragraph-rsid="06ce4d06"/>
    </style:style>
    <style:style style:name="P347" style:family="paragraph" style:parent-style-name="Text_20_body">
      <style:text-properties officeooo:rsid="06cff2a1" officeooo:paragraph-rsid="06cff2a1"/>
    </style:style>
    <style:style style:name="P348" style:family="paragraph" style:parent-style-name="Text_20_body">
      <style:text-properties officeooo:rsid="06d247d1" officeooo:paragraph-rsid="06d247d1"/>
    </style:style>
    <style:style style:name="P349" style:family="paragraph" style:parent-style-name="Text_20_body">
      <style:text-properties officeooo:rsid="06d247d1" officeooo:paragraph-rsid="06d43116"/>
    </style:style>
    <style:style style:name="P350" style:family="paragraph" style:parent-style-name="Text_20_body">
      <style:text-properties officeooo:rsid="06d43116" officeooo:paragraph-rsid="06d73e0c"/>
    </style:style>
    <style:style style:name="P351" style:family="paragraph" style:parent-style-name="Text_20_body">
      <style:text-properties officeooo:rsid="06dc535e" officeooo:paragraph-rsid="06dfe0d4"/>
    </style:style>
    <style:style style:name="P352" style:family="paragraph" style:parent-style-name="Text_20_body">
      <style:text-properties officeooo:rsid="06f92888" officeooo:paragraph-rsid="06f92888"/>
    </style:style>
    <style:style style:name="P353" style:family="paragraph" style:parent-style-name="Text_20_body">
      <style:text-properties officeooo:rsid="06f98726" officeooo:paragraph-rsid="06f98726"/>
    </style:style>
    <style:style style:name="P354" style:family="paragraph" style:parent-style-name="Text_20_body">
      <style:text-properties officeooo:rsid="07064c95" officeooo:paragraph-rsid="07064c95"/>
    </style:style>
    <style:style style:name="P355" style:family="paragraph" style:parent-style-name="Text_20_body">
      <style:paragraph-properties>
        <style:drop-cap/>
      </style:paragraph-properties>
      <style:text-properties officeooo:rsid="07064c95" officeooo:paragraph-rsid="07085c0b"/>
    </style:style>
    <style:style style:name="P356" style:family="paragraph" style:parent-style-name="Text_20_body">
      <style:paragraph-properties fo:margin-left="0.5in" fo:margin-right="0in" fo:text-indent="0in" style:auto-text-indent="false"/>
      <style:text-properties officeooo:rsid="07064c95" officeooo:paragraph-rsid="070746e3"/>
    </style:style>
    <style:style style:name="P357" style:family="paragraph" style:parent-style-name="Text_20_body">
      <style:text-properties officeooo:rsid="070c2974" officeooo:paragraph-rsid="070c2974"/>
    </style:style>
    <style:style style:name="P358" style:family="paragraph" style:parent-style-name="Text_20_body">
      <style:paragraph-properties fo:margin-left="0.5in" fo:margin-right="0in" fo:text-indent="0in" style:auto-text-indent="false"/>
      <style:text-properties officeooo:rsid="070c2974" officeooo:paragraph-rsid="070c2974"/>
    </style:style>
    <style:style style:name="P359" style:family="paragraph" style:parent-style-name="Text_20_body">
      <style:paragraph-properties fo:margin-left="0.5in" fo:margin-right="0in" fo:text-indent="0in" style:auto-text-indent="false"/>
      <style:text-properties officeooo:rsid="070c2974" officeooo:paragraph-rsid="0712fc70"/>
    </style:style>
    <style:style style:name="P360" style:family="paragraph" style:parent-style-name="Text_20_body">
      <style:paragraph-properties fo:margin-left="0in" fo:margin-right="0in" fo:text-indent="0in" style:auto-text-indent="false"/>
      <style:text-properties officeooo:rsid="070c2974" officeooo:paragraph-rsid="0712fc70"/>
    </style:style>
    <style:style style:name="P361" style:family="paragraph" style:parent-style-name="Text_20_body">
      <style:text-properties officeooo:rsid="02a1dd88" officeooo:paragraph-rsid="02a1dd88"/>
    </style:style>
    <style:style style:name="P362" style:family="paragraph" style:parent-style-name="Text_20_body">
      <style:text-properties officeooo:rsid="03d677c4" officeooo:paragraph-rsid="074bfcf0"/>
    </style:style>
    <style:style style:name="P363" style:family="paragraph" style:parent-style-name="Text_20_body">
      <style:paragraph-properties>
        <style:drop-cap/>
      </style:paragraph-properties>
      <style:text-properties officeooo:rsid="058d0cd2" officeooo:paragraph-rsid="058d0cd2"/>
    </style:style>
    <style:style style:name="P364" style:family="paragraph" style:parent-style-name="Text_20_body">
      <style:text-properties officeooo:paragraph-rsid="070bd689"/>
    </style:style>
    <style:style style:name="P365" style:family="paragraph" style:parent-style-name="Text_20_body">
      <style:paragraph-properties>
        <style:drop-cap/>
      </style:paragraph-properties>
    </style:style>
    <style:style style:name="P366" style:family="paragraph" style:parent-style-name="Text_20_body">
      <style:text-properties officeooo:rsid="0760528e" officeooo:paragraph-rsid="0760528e"/>
    </style:style>
    <style:style style:name="P367" style:family="paragraph" style:parent-style-name="Text_20_body">
      <style:text-properties officeooo:rsid="07614dc3" officeooo:paragraph-rsid="07614dc3"/>
    </style:style>
    <style:style style:name="P368" style:family="paragraph" style:parent-style-name="Text_20_body">
      <style:text-properties officeooo:paragraph-rsid="07692e03"/>
    </style:style>
    <style:style style:name="P369" style:family="paragraph" style:parent-style-name="Text_20_body">
      <style:text-properties officeooo:paragraph-rsid="076a9675"/>
    </style:style>
    <style:style style:name="P370" style:family="paragraph" style:parent-style-name="Text_20_body">
      <style:text-properties officeooo:rsid="076adcd0" officeooo:paragraph-rsid="076adcd0"/>
    </style:style>
    <style:style style:name="P371" style:family="paragraph" style:parent-style-name="Text_20_body">
      <style:text-properties officeooo:rsid="0674a277" officeooo:paragraph-rsid="0674a277"/>
    </style:style>
    <style:style style:name="P372" style:family="paragraph" style:parent-style-name="Text_20_body">
      <style:text-properties officeooo:paragraph-rsid="0772f435"/>
    </style:style>
    <style:style style:name="P373" style:family="paragraph" style:parent-style-name="Text_20_body">
      <style:text-properties officeooo:rsid="0683871e" officeooo:paragraph-rsid="0683871e"/>
    </style:style>
    <style:style style:name="P374" style:family="paragraph" style:parent-style-name="Text_20_body">
      <style:text-properties officeooo:paragraph-rsid="07734b6a"/>
    </style:style>
    <style:style style:name="P375" style:family="paragraph" style:parent-style-name="Text_20_body">
      <style:text-properties officeooo:paragraph-rsid="07749589"/>
    </style:style>
    <style:style style:name="P376" style:family="paragraph" style:parent-style-name="Text_20_body">
      <style:text-properties officeooo:paragraph-rsid="0776a119"/>
    </style:style>
    <style:style style:name="P377" style:family="paragraph" style:parent-style-name="Text_20_body">
      <style:text-properties officeooo:paragraph-rsid="0777c618"/>
    </style:style>
    <style:style style:name="P378" style:family="paragraph" style:parent-style-name="Text_20_body">
      <style:text-properties officeooo:paragraph-rsid="077852b2"/>
    </style:style>
    <style:style style:name="P379" style:family="paragraph" style:parent-style-name="Text_20_body">
      <style:text-properties officeooo:paragraph-rsid="077875c8"/>
    </style:style>
    <style:style style:name="P380" style:family="paragraph" style:parent-style-name="Text_20_body">
      <style:text-properties officeooo:paragraph-rsid="03b1bc6d"/>
    </style:style>
    <style:style style:name="P381" style:family="paragraph" style:parent-style-name="Text_20_body">
      <style:text-properties officeooo:paragraph-rsid="07795260"/>
    </style:style>
    <style:style style:name="P382" style:family="paragraph" style:parent-style-name="Text_20_body">
      <style:text-properties officeooo:rsid="06abf21b" officeooo:paragraph-rsid="06c0f4b4"/>
    </style:style>
    <style:style style:name="P383" style:family="paragraph" style:parent-style-name="Text_20_body">
      <style:text-properties officeooo:rsid="03c781f3" officeooo:paragraph-rsid="077b1b26"/>
    </style:style>
    <style:style style:name="P384" style:family="paragraph" style:parent-style-name="Text_20_body">
      <style:text-properties officeooo:rsid="03c781f3" officeooo:paragraph-rsid="077b2ef7"/>
    </style:style>
    <style:style style:name="P385" style:family="paragraph" style:parent-style-name="Text_20_body">
      <style:text-properties officeooo:paragraph-rsid="077c8e61"/>
    </style:style>
    <style:style style:name="P386" style:family="paragraph" style:parent-style-name="Text_20_body">
      <style:text-properties officeooo:paragraph-rsid="077d90a6"/>
    </style:style>
    <style:style style:name="P387" style:family="paragraph" style:parent-style-name="Text_20_body">
      <style:text-properties officeooo:paragraph-rsid="077e8092"/>
    </style:style>
    <style:style style:name="P388" style:family="paragraph" style:parent-style-name="Text_20_body">
      <style:text-properties officeooo:paragraph-rsid="078089d4"/>
    </style:style>
    <style:style style:name="P389" style:family="paragraph" style:parent-style-name="Text_20_body">
      <style:text-properties officeooo:paragraph-rsid="07826e1f"/>
    </style:style>
    <style:style style:name="P390" style:family="paragraph" style:parent-style-name="Text_20_body">
      <style:text-properties officeooo:paragraph-rsid="0783a426"/>
    </style:style>
    <style:style style:name="P391" style:family="paragraph" style:parent-style-name="Text_20_body">
      <style:text-properties officeooo:paragraph-rsid="0783ac3a"/>
    </style:style>
    <style:style style:name="P392" style:family="paragraph" style:parent-style-name="Text_20_body">
      <style:text-properties officeooo:paragraph-rsid="0784c3fe"/>
    </style:style>
    <style:style style:name="P393" style:family="paragraph" style:parent-style-name="Text_20_body">
      <style:text-properties officeooo:paragraph-rsid="0785a983"/>
    </style:style>
    <style:style style:name="P394" style:family="paragraph" style:parent-style-name="Text_20_body">
      <style:text-properties officeooo:paragraph-rsid="078895d0"/>
    </style:style>
    <style:style style:name="P395" style:family="paragraph" style:parent-style-name="Text_20_body">
      <style:text-properties officeooo:paragraph-rsid="07892243"/>
    </style:style>
    <style:style style:name="P396" style:family="paragraph" style:parent-style-name="Text_20_body">
      <style:text-properties officeooo:paragraph-rsid="0789ada4"/>
    </style:style>
    <style:style style:name="P397" style:family="paragraph" style:parent-style-name="Text_20_body">
      <style:text-properties officeooo:paragraph-rsid="0789e624"/>
    </style:style>
    <style:style style:name="P398" style:family="paragraph" style:parent-style-name="Text_20_body">
      <style:text-properties officeooo:paragraph-rsid="078c221f"/>
    </style:style>
    <style:style style:name="P399" style:family="paragraph" style:parent-style-name="Text_20_body">
      <style:text-properties officeooo:paragraph-rsid="078d299a"/>
    </style:style>
    <style:style style:name="P400" style:family="paragraph" style:parent-style-name="Text_20_body">
      <style:text-properties officeooo:paragraph-rsid="078d71f3"/>
    </style:style>
    <style:style style:name="P401" style:family="paragraph" style:parent-style-name="Text_20_body">
      <style:text-properties officeooo:paragraph-rsid="07904ed7"/>
    </style:style>
    <style:style style:name="P402" style:family="paragraph" style:parent-style-name="Text_20_body">
      <style:text-properties officeooo:paragraph-rsid="07926c34"/>
    </style:style>
    <style:style style:name="P403" style:family="paragraph" style:parent-style-name="Text_20_body">
      <style:text-properties officeooo:paragraph-rsid="0793fd38"/>
    </style:style>
    <style:style style:name="P404" style:family="paragraph" style:parent-style-name="Text_20_body">
      <style:text-properties officeooo:paragraph-rsid="04478305"/>
    </style:style>
    <style:style style:name="P405" style:family="paragraph" style:parent-style-name="Text_20_body">
      <style:text-properties officeooo:paragraph-rsid="0795e640"/>
    </style:style>
    <style:style style:name="P406" style:family="paragraph" style:parent-style-name="Text_20_body">
      <style:text-properties officeooo:paragraph-rsid="07975c6c"/>
    </style:style>
    <style:style style:name="P407" style:family="paragraph" style:parent-style-name="Text_20_body">
      <style:text-properties officeooo:paragraph-rsid="0798cce0"/>
    </style:style>
    <style:style style:name="P408" style:family="paragraph" style:parent-style-name="Text_20_body">
      <style:text-properties officeooo:paragraph-rsid="07992d20"/>
    </style:style>
    <style:style style:name="P409" style:family="paragraph" style:parent-style-name="Text_20_body">
      <style:text-properties officeooo:rsid="04721c99" officeooo:paragraph-rsid="04721c99"/>
    </style:style>
    <style:style style:name="P410" style:family="paragraph" style:parent-style-name="Text_20_body">
      <style:text-properties officeooo:paragraph-rsid="079a93ae"/>
    </style:style>
    <style:style style:name="P411" style:family="paragraph" style:parent-style-name="Text_20_body">
      <style:text-properties officeooo:rsid="04883187" officeooo:paragraph-rsid="04883187"/>
    </style:style>
    <style:style style:name="P412" style:family="paragraph" style:parent-style-name="Text_20_body">
      <style:text-properties officeooo:paragraph-rsid="079b6a75"/>
    </style:style>
    <style:style style:name="P413" style:family="paragraph" style:parent-style-name="Text_20_body">
      <style:text-properties officeooo:rsid="04a3d5c0" officeooo:paragraph-rsid="04a975a1"/>
    </style:style>
    <style:style style:name="P414" style:family="paragraph" style:parent-style-name="Text_20_body">
      <style:text-properties officeooo:paragraph-rsid="079bf116"/>
    </style:style>
    <style:style style:name="P415" style:family="paragraph" style:parent-style-name="Text_20_body">
      <style:text-properties officeooo:paragraph-rsid="079c824c"/>
    </style:style>
    <style:style style:name="P416" style:family="paragraph" style:parent-style-name="Text_20_body">
      <style:text-properties officeooo:rsid="04c8adae" officeooo:paragraph-rsid="04c8adae"/>
    </style:style>
    <style:style style:name="P417" style:family="paragraph" style:parent-style-name="Text_20_body">
      <style:text-properties officeooo:paragraph-rsid="079cd47a"/>
    </style:style>
    <style:style style:name="P418" style:family="paragraph" style:parent-style-name="Text_20_body">
      <style:text-properties officeooo:paragraph-rsid="079e3fa3"/>
    </style:style>
    <style:style style:name="P419" style:family="paragraph" style:parent-style-name="Text_20_body">
      <style:text-properties officeooo:rsid="04f4b735" officeooo:paragraph-rsid="04f4b735"/>
    </style:style>
    <style:style style:name="P420" style:family="paragraph" style:parent-style-name="Text_20_body">
      <style:text-properties officeooo:paragraph-rsid="079f4d35"/>
    </style:style>
    <style:style style:name="P421" style:family="paragraph" style:parent-style-name="Text_20_body">
      <style:text-properties officeooo:paragraph-rsid="07a102bf"/>
    </style:style>
    <style:style style:name="P422" style:family="paragraph" style:parent-style-name="Text_20_body">
      <style:text-properties officeooo:paragraph-rsid="07a1cedd"/>
    </style:style>
    <style:style style:name="P423" style:family="paragraph" style:parent-style-name="Text_20_body">
      <style:text-properties officeooo:paragraph-rsid="07a22dd0"/>
    </style:style>
    <style:style style:name="P424" style:family="paragraph" style:parent-style-name="Text_20_body">
      <style:text-properties officeooo:paragraph-rsid="07a3bd71"/>
    </style:style>
    <style:style style:name="P425" style:family="paragraph" style:parent-style-name="Text_20_body">
      <style:text-properties officeooo:paragraph-rsid="07a45000"/>
    </style:style>
    <style:style style:name="P426" style:family="paragraph" style:parent-style-name="Text_20_body">
      <style:text-properties officeooo:rsid="032441f3" officeooo:paragraph-rsid="07a45c52"/>
    </style:style>
    <style:style style:name="P427" style:family="paragraph" style:parent-style-name="Text_20_body">
      <style:text-properties officeooo:paragraph-rsid="07a45c52"/>
    </style:style>
    <style:style style:name="P428" style:family="paragraph" style:parent-style-name="Text_20_body">
      <style:text-properties officeooo:paragraph-rsid="07a5e0bc"/>
    </style:style>
    <style:style style:name="P429" style:family="paragraph" style:parent-style-name="Text_20_body">
      <style:text-properties officeooo:paragraph-rsid="07a7911e"/>
    </style:style>
    <style:style style:name="P430" style:family="paragraph" style:parent-style-name="Text_20_body">
      <style:text-properties officeooo:paragraph-rsid="07a96cc4"/>
    </style:style>
    <style:style style:name="P431" style:family="paragraph" style:parent-style-name="Text_20_body">
      <style:text-properties officeooo:paragraph-rsid="07ab474e"/>
    </style:style>
    <style:style style:name="P432" style:family="paragraph" style:parent-style-name="Text_20_body">
      <style:text-properties officeooo:rsid="01cb9635" officeooo:paragraph-rsid="01cb9635"/>
    </style:style>
    <style:style style:name="P433" style:family="paragraph" style:parent-style-name="Text_20_body">
      <style:text-properties officeooo:paragraph-rsid="07acd5db"/>
    </style:style>
    <style:style style:name="P434" style:family="paragraph" style:parent-style-name="Text_20_body">
      <style:text-properties officeooo:paragraph-rsid="07adc7fb"/>
    </style:style>
    <style:style style:name="P435" style:family="paragraph" style:parent-style-name="Text_20_body">
      <style:text-properties officeooo:rsid="03eb530f" officeooo:paragraph-rsid="0785a983"/>
    </style:style>
    <style:style style:name="P436" style:family="paragraph" style:parent-style-name="Text_20_body">
      <style:text-properties officeooo:paragraph-rsid="07af0c53"/>
    </style:style>
    <style:style style:name="P437" style:family="paragraph" style:parent-style-name="Text_20_body">
      <style:text-properties officeooo:paragraph-rsid="07af4cc0"/>
    </style:style>
    <style:style style:name="P438" style:family="paragraph" style:parent-style-name="Text_20_body">
      <style:text-properties officeooo:paragraph-rsid="07b1078e"/>
    </style:style>
    <style:style style:name="P439" style:family="paragraph" style:parent-style-name="Text_20_body">
      <style:text-properties officeooo:paragraph-rsid="07b1303a"/>
    </style:style>
    <style:style style:name="P440" style:family="paragraph" style:parent-style-name="Text_20_body">
      <style:text-properties officeooo:rsid="01ed8c62" officeooo:paragraph-rsid="01ed8c62"/>
    </style:style>
    <style:style style:name="P441" style:family="paragraph" style:parent-style-name="Text_20_body">
      <style:text-properties officeooo:paragraph-rsid="07b29552"/>
    </style:style>
    <style:style style:name="P442" style:family="paragraph" style:parent-style-name="Text_20_body">
      <style:text-properties officeooo:paragraph-rsid="07b31123"/>
    </style:style>
    <style:style style:name="P443" style:family="paragraph" style:parent-style-name="Text_20_body">
      <style:text-properties officeooo:rsid="0212e3df" officeooo:paragraph-rsid="0212e3df"/>
    </style:style>
    <style:style style:name="P444" style:family="paragraph" style:parent-style-name="Text_20_body">
      <style:text-properties officeooo:paragraph-rsid="07b4d488"/>
    </style:style>
    <style:style style:name="P445" style:family="paragraph" style:parent-style-name="Text_20_body">
      <style:text-properties officeooo:paragraph-rsid="07b874b4"/>
    </style:style>
    <style:style style:name="P446" style:family="paragraph" style:parent-style-name="Text_20_body">
      <style:text-properties officeooo:paragraph-rsid="07b9f524"/>
    </style:style>
    <style:style style:name="P447" style:family="paragraph" style:parent-style-name="Text_20_body">
      <style:text-properties officeooo:paragraph-rsid="07bad3e4"/>
    </style:style>
    <style:style style:name="P448" style:family="paragraph" style:parent-style-name="Text_20_body">
      <style:text-properties officeooo:paragraph-rsid="07bb004d"/>
    </style:style>
    <style:style style:name="P449" style:family="paragraph" style:parent-style-name="Text_20_body">
      <style:text-properties officeooo:paragraph-rsid="07bd1b20"/>
    </style:style>
    <style:style style:name="P450" style:family="paragraph" style:parent-style-name="Text_20_body">
      <style:text-properties officeooo:rsid="02520942" officeooo:paragraph-rsid="02520942"/>
    </style:style>
    <style:style style:name="P451" style:family="paragraph" style:parent-style-name="Text_20_body">
      <style:text-properties officeooo:paragraph-rsid="07bd729c"/>
    </style:style>
    <style:style style:name="P452" style:family="paragraph" style:parent-style-name="Text_20_body">
      <style:text-properties officeooo:paragraph-rsid="07bf342a"/>
    </style:style>
    <style:style style:name="P453" style:family="paragraph" style:parent-style-name="Text_20_body">
      <style:text-properties officeooo:paragraph-rsid="07c0f418"/>
    </style:style>
    <style:style style:name="P454" style:family="paragraph" style:parent-style-name="Text_20_body">
      <style:text-properties officeooo:paragraph-rsid="07c5a307"/>
    </style:style>
    <style:style style:name="P455" style:family="paragraph" style:parent-style-name="Text_20_body">
      <style:text-properties officeooo:paragraph-rsid="07c77547"/>
    </style:style>
    <style:style style:name="P456" style:family="paragraph" style:parent-style-name="Text_20_body">
      <style:text-properties officeooo:paragraph-rsid="07c83788"/>
    </style:style>
    <style:style style:name="P457" style:family="paragraph" style:parent-style-name="Text_20_body">
      <style:text-properties officeooo:paragraph-rsid="07c8825d"/>
    </style:style>
    <style:style style:name="P458" style:family="paragraph" style:parent-style-name="Text_20_body">
      <style:text-properties officeooo:rsid="0298ef19" officeooo:paragraph-rsid="0298ef19"/>
    </style:style>
    <style:style style:name="P459" style:family="paragraph" style:parent-style-name="Text_20_body">
      <style:text-properties officeooo:paragraph-rsid="07c9df82"/>
    </style:style>
    <style:style style:name="P460" style:family="paragraph" style:parent-style-name="Quotations">
      <style:text-properties officeooo:paragraph-rsid="055decf0"/>
    </style:style>
    <style:style style:name="P461" style:family="paragraph" style:parent-style-name="Quotations">
      <style:text-properties officeooo:paragraph-rsid="05f74c19"/>
    </style:style>
    <style:style style:name="P462" style:family="paragraph" style:parent-style-name="Text_20_body">
      <style:paragraph-properties fo:margin-left="0.5in" fo:margin-right="0in" fo:text-indent="0in" style:auto-text-indent="false"/>
      <style:text-properties officeooo:rsid="05a498e6" officeooo:paragraph-rsid="05ab1407"/>
    </style:style>
    <style:style style:name="P463" style:family="paragraph" style:parent-style-name="Text_20_body">
      <style:paragraph-properties fo:margin-left="0.5in" fo:margin-right="0in" fo:text-indent="0in" style:auto-text-indent="false"/>
      <style:text-properties officeooo:rsid="05e08cde" officeooo:paragraph-rsid="05e08cde"/>
    </style:style>
    <style:style style:name="P464" style:family="paragraph" style:parent-style-name="Text_20_body">
      <style:paragraph-properties fo:margin-left="0.5in" fo:margin-right="0in" fo:text-indent="0in" style:auto-text-indent="false"/>
      <style:text-properties officeooo:rsid="05db8e06" officeooo:paragraph-rsid="05db8e06"/>
    </style:style>
    <style:style style:name="P465" style:family="paragraph" style:parent-style-name="Text_20_body">
      <style:paragraph-properties fo:margin-left="0.5in" fo:margin-right="0in" fo:text-indent="0in" style:auto-text-indent="false"/>
      <style:text-properties officeooo:rsid="05e92807" officeooo:paragraph-rsid="05e92807"/>
    </style:style>
    <style:style style:name="P466" style:family="paragraph" style:parent-style-name="Text_20_body">
      <style:paragraph-properties fo:margin-left="1in" fo:margin-right="0in" fo:text-indent="0in" style:auto-text-indent="false"/>
      <style:text-properties officeooo:rsid="05e92807" officeooo:paragraph-rsid="05ea316d"/>
    </style:style>
    <style:style style:name="P467" style:family="paragraph" style:parent-style-name="Text_20_body">
      <style:paragraph-properties fo:margin-left="1in" fo:margin-right="0in" fo:text-indent="0in" style:auto-text-indent="false"/>
      <style:text-properties officeooo:rsid="05e92807" officeooo:paragraph-rsid="05ebb2b0"/>
    </style:style>
    <style:style style:name="P468" style:family="paragraph" style:parent-style-name="Text_20_body">
      <style:paragraph-properties fo:margin-left="0.5in" fo:margin-right="0in" fo:text-indent="0in" style:auto-text-indent="false"/>
      <style:text-properties officeooo:rsid="038cd55a" officeooo:paragraph-rsid="0444fbfe"/>
    </style:style>
    <style:style style:name="P469" style:family="paragraph" style:parent-style-name="Text_20_body">
      <style:paragraph-properties fo:margin-left="0.5in" fo:margin-right="0in" fo:text-indent="0in" style:auto-text-indent="false"/>
      <style:text-properties officeooo:paragraph-rsid="060942e6"/>
    </style:style>
    <style:style style:name="P470" style:family="paragraph" style:parent-style-name="Text_20_body">
      <style:paragraph-properties fo:margin-left="0.5in" fo:margin-right="0in" fo:text-indent="0in" style:auto-text-indent="false"/>
      <style:text-properties officeooo:rsid="06148c11" officeooo:paragraph-rsid="06148c11"/>
    </style:style>
    <style:style style:name="P471" style:family="paragraph" style:parent-style-name="Text_20_body">
      <style:paragraph-properties fo:margin-left="0in" fo:margin-right="0in" fo:text-indent="0in" style:auto-text-indent="false"/>
      <style:text-properties officeooo:rsid="06148c11" officeooo:paragraph-rsid="06148c11"/>
    </style:style>
    <style:style style:name="P472" style:family="paragraph" style:parent-style-name="Text_20_body">
      <style:paragraph-properties fo:margin-left="0.5in" fo:margin-right="0in" fo:text-indent="0in" style:auto-text-indent="false"/>
      <style:text-properties officeooo:rsid="06163bcc" officeooo:paragraph-rsid="061643a2"/>
    </style:style>
    <style:style style:name="P473" style:family="paragraph" style:parent-style-name="Text_20_body">
      <style:paragraph-properties fo:margin-left="0in" fo:margin-right="0in" fo:text-indent="0in" style:auto-text-indent="false"/>
      <style:text-properties officeooo:rsid="06163bcc" officeooo:paragraph-rsid="061643a2"/>
    </style:style>
    <style:style style:name="P474" style:family="paragraph" style:parent-style-name="Text_20_body">
      <style:paragraph-properties fo:margin-left="0.5in" fo:margin-right="0in" fo:text-indent="0in" style:auto-text-indent="false"/>
      <style:text-properties officeooo:rsid="0634754a" officeooo:paragraph-rsid="0634754a"/>
    </style:style>
    <style:style style:name="P475" style:family="paragraph" style:parent-style-name="Text_20_body">
      <style:paragraph-properties fo:margin-left="0in" fo:margin-right="0in" fo:text-indent="0in" style:auto-text-indent="false"/>
      <style:text-properties officeooo:rsid="0634754a" officeooo:paragraph-rsid="0634754a"/>
    </style:style>
    <style:style style:name="P476" style:family="paragraph" style:parent-style-name="Text_20_body">
      <style:paragraph-properties fo:margin-left="0.5in" fo:margin-right="0in" fo:text-indent="0in" style:auto-text-indent="false"/>
      <style:text-properties officeooo:rsid="0636ed39" officeooo:paragraph-rsid="0636ed39"/>
    </style:style>
    <style:style style:name="P477" style:family="paragraph" style:parent-style-name="Text_20_body">
      <style:paragraph-properties fo:margin-left="0in" fo:margin-right="0in" fo:text-indent="0in" style:auto-text-indent="false"/>
      <style:text-properties officeooo:rsid="0636ed39" officeooo:paragraph-rsid="0638ea8a"/>
    </style:style>
    <style:style style:name="P478" style:family="paragraph" style:parent-style-name="Text_20_body">
      <style:paragraph-properties fo:margin-left="0.5in" fo:margin-right="0in" fo:text-indent="0in" style:auto-text-indent="false"/>
      <style:text-properties officeooo:rsid="0654364a" officeooo:paragraph-rsid="0654364a"/>
    </style:style>
    <style:style style:name="P479" style:family="paragraph" style:parent-style-name="Text_20_body">
      <style:paragraph-properties fo:margin-left="0in" fo:margin-right="0in" fo:text-indent="0in" style:auto-text-indent="false"/>
      <style:text-properties officeooo:rsid="0654364a" officeooo:paragraph-rsid="0654364a"/>
    </style:style>
    <style:style style:name="P480" style:family="paragraph" style:parent-style-name="Text_20_body">
      <style:paragraph-properties fo:margin-left="1in" fo:margin-right="0in" fo:text-indent="0in" style:auto-text-indent="false"/>
      <style:text-properties officeooo:rsid="0654364a" officeooo:paragraph-rsid="0654364a"/>
    </style:style>
    <style:style style:name="P481" style:family="paragraph" style:parent-style-name="Text_20_body">
      <style:paragraph-properties fo:margin-left="0.5in" fo:margin-right="0in" fo:text-indent="0in" style:auto-text-indent="false"/>
      <style:text-properties officeooo:rsid="06900090" officeooo:paragraph-rsid="06900090"/>
    </style:style>
    <style:style style:name="P482" style:family="paragraph" style:parent-style-name="Text_20_body">
      <style:paragraph-properties fo:margin-left="0.5in" fo:margin-right="0in" fo:text-indent="0in" style:auto-text-indent="false"/>
      <style:text-properties officeooo:rsid="0717f823" officeooo:paragraph-rsid="0717f823"/>
    </style:style>
    <style:style style:name="P483" style:family="paragraph" style:parent-style-name="Text_20_body">
      <style:paragraph-properties fo:margin-left="0in" fo:margin-right="0in" fo:text-indent="0in" style:auto-text-indent="false"/>
      <style:text-properties officeooo:rsid="0717f823" officeooo:paragraph-rsid="0717f823"/>
    </style:style>
    <style:style style:name="P484" style:family="paragraph" style:parent-style-name="Text_20_body">
      <style:paragraph-properties fo:margin-left="0in" fo:margin-right="0in" fo:text-indent="0in" style:auto-text-indent="false"/>
      <style:text-properties officeooo:rsid="0717f823" officeooo:paragraph-rsid="0718992b"/>
    </style:style>
    <style:style style:name="P485" style:family="paragraph" style:parent-style-name="Text_20_body">
      <style:paragraph-properties fo:margin-left="0.5in" fo:margin-right="0in" fo:text-indent="0in" style:auto-text-indent="false"/>
      <style:text-properties officeooo:paragraph-rsid="0790a433"/>
    </style:style>
    <style:style style:name="P486" style:family="paragraph" style:parent-style-name="Text_20_body">
      <style:paragraph-properties fo:margin-left="0.5in" fo:margin-right="0in" fo:text-indent="0in" style:auto-text-indent="false"/>
      <style:text-properties officeooo:rsid="0414d852" officeooo:paragraph-rsid="0790a433"/>
    </style:style>
    <style:style style:name="P487" style:family="paragraph" style:parent-style-name="Text_20_body">
      <style:paragraph-properties fo:margin-left="0.5in" fo:margin-right="0in" fo:text-indent="0in" style:auto-text-indent="false"/>
      <style:text-properties officeooo:rsid="021c94f3" officeooo:paragraph-rsid="07b52936"/>
    </style:style>
    <style:style style:name="P488" style:family="paragraph" style:parent-style-name="Text_20_body">
      <style:paragraph-properties fo:margin-left="0.5in" fo:margin-right="0in" fo:text-indent="0in" style:auto-text-indent="false"/>
      <style:text-properties officeooo:rsid="021dc693" officeooo:paragraph-rsid="07b52936"/>
    </style:style>
    <style:style style:name="P489" style:family="paragraph" style:parent-style-name="Text_20_body">
      <style:paragraph-properties fo:margin-left="0in" fo:margin-right="0in" fo:text-indent="0in" style:auto-text-indent="false"/>
      <style:text-properties officeooo:rsid="05e1d622" officeooo:paragraph-rsid="05e1d622"/>
    </style:style>
    <style:style style:name="P490" style:family="paragraph" style:parent-style-name="Text_20_body">
      <style:paragraph-properties fo:margin-left="0in" fo:margin-right="0in" fo:text-indent="0in" style:auto-text-indent="false"/>
      <style:text-properties officeooo:rsid="05e317f7" officeooo:paragraph-rsid="05e317f7"/>
    </style:style>
    <style:style style:name="P491" style:family="paragraph" style:parent-style-name="Text_20_body">
      <style:paragraph-properties fo:margin-left="0in" fo:margin-right="0in" fo:text-indent="0in" style:auto-text-indent="false"/>
      <style:text-properties officeooo:rsid="05e4c123" officeooo:paragraph-rsid="05e4c123"/>
    </style:style>
    <style:style style:name="P492" style:family="paragraph" style:parent-style-name="Text_20_body">
      <style:paragraph-properties fo:margin-left="0in" fo:margin-right="0in" fo:text-indent="0in" style:auto-text-indent="false"/>
      <style:text-properties officeooo:rsid="05e59667" officeooo:paragraph-rsid="05e59667"/>
    </style:style>
    <style:style style:name="P493" style:family="paragraph" style:parent-style-name="Text_20_body">
      <style:paragraph-properties fo:margin-left="0in" fo:margin-right="0in" fo:text-indent="0in" style:auto-text-indent="false"/>
      <style:text-properties officeooo:rsid="05e5d0f8" officeooo:paragraph-rsid="05e5d0f8"/>
    </style:style>
    <style:style style:name="P494" style:family="paragraph" style:parent-style-name="Text_20_body">
      <style:paragraph-properties fo:margin-left="0in" fo:margin-right="0in" fo:text-indent="0in" style:auto-text-indent="false"/>
      <style:text-properties officeooo:rsid="05e76623" officeooo:paragraph-rsid="05e76623"/>
    </style:style>
    <style:style style:name="P495" style:family="paragraph" style:parent-style-name="Text_20_body">
      <style:paragraph-properties fo:margin-left="0in" fo:margin-right="0in" fo:text-indent="0in" style:auto-text-indent="false"/>
      <style:text-properties officeooo:rsid="05f700d3" officeooo:paragraph-rsid="05f74c19"/>
    </style:style>
    <style:style style:name="P496" style:family="paragraph" style:parent-style-name="Text_20_body">
      <style:paragraph-properties fo:margin-left="0in" fo:margin-right="0in" fo:text-indent="0in" style:auto-text-indent="false"/>
      <style:text-properties officeooo:rsid="05ebb2b0" officeooo:paragraph-rsid="05eecd1c"/>
    </style:style>
    <style:style style:name="P497" style:family="paragraph" style:parent-style-name="Text_20_body">
      <style:paragraph-properties fo:margin-left="0in" fo:margin-right="0in" fo:text-indent="0in" style:auto-text-indent="false"/>
      <style:text-properties officeooo:rsid="05f0368f" officeooo:paragraph-rsid="05f0368f"/>
    </style:style>
    <style:style style:name="P498" style:family="paragraph" style:parent-style-name="Text_20_body">
      <style:paragraph-properties fo:margin-left="0in" fo:margin-right="0in" fo:text-indent="0in" style:auto-text-indent="false"/>
      <style:text-properties officeooo:rsid="05ff6bcf" officeooo:paragraph-rsid="05ff6bcf"/>
    </style:style>
    <style:style style:name="P499" style:family="paragraph" style:parent-style-name="Text_20_body">
      <style:paragraph-properties fo:margin-left="0in" fo:margin-right="0in" fo:text-indent="0in" style:auto-text-indent="false"/>
      <style:text-properties officeooo:rsid="060edb8a" officeooo:paragraph-rsid="060edb8a"/>
    </style:style>
    <style:style style:name="P500" style:family="paragraph" style:parent-style-name="Text_20_body">
      <style:paragraph-properties fo:margin-left="0in" fo:margin-right="0in" fo:text-indent="0in" style:auto-text-indent="false"/>
      <style:text-properties officeooo:rsid="060f83cf" officeooo:paragraph-rsid="060f83cf"/>
    </style:style>
    <style:style style:name="P501" style:family="paragraph" style:parent-style-name="Text_20_body">
      <style:paragraph-properties fo:margin-left="0in" fo:margin-right="0in" fo:text-indent="0in" style:auto-text-indent="false"/>
      <style:text-properties officeooo:rsid="0612a762" officeooo:paragraph-rsid="0612a762"/>
    </style:style>
    <style:style style:name="P502" style:family="paragraph" style:parent-style-name="Text_20_body">
      <style:paragraph-properties fo:margin-left="0in" fo:margin-right="0in" fo:text-indent="0in" style:auto-text-indent="false"/>
      <style:text-properties officeooo:rsid="061a01d9" officeooo:paragraph-rsid="061a01d9"/>
    </style:style>
    <style:style style:name="P503" style:family="paragraph" style:parent-style-name="Text_20_body">
      <style:paragraph-properties fo:margin-left="0in" fo:margin-right="0in" fo:text-indent="0in" style:auto-text-indent="false"/>
      <style:text-properties officeooo:rsid="061afb56" officeooo:paragraph-rsid="061afb56"/>
    </style:style>
    <style:style style:name="P504" style:family="paragraph" style:parent-style-name="Text_20_body">
      <style:paragraph-properties fo:margin-left="0in" fo:margin-right="0in" fo:text-indent="0in" style:auto-text-indent="false"/>
      <style:text-properties officeooo:rsid="061bcb80" officeooo:paragraph-rsid="061dc2e2"/>
    </style:style>
    <style:style style:name="P505" style:family="paragraph" style:parent-style-name="Text_20_body">
      <style:paragraph-properties fo:margin-left="0in" fo:margin-right="0in" fo:text-indent="0in" style:auto-text-indent="false"/>
      <style:text-properties officeooo:rsid="061dc2e2" officeooo:paragraph-rsid="0620a167"/>
    </style:style>
    <style:style style:name="P506" style:family="paragraph" style:parent-style-name="Text_20_body">
      <style:paragraph-properties fo:margin-left="0in" fo:margin-right="0in" fo:text-indent="0in" style:auto-text-indent="false"/>
      <style:text-properties officeooo:rsid="061dc2e2" officeooo:paragraph-rsid="06219d51"/>
    </style:style>
    <style:style style:name="P507" style:family="paragraph" style:parent-style-name="Text_20_body">
      <style:paragraph-properties fo:margin-left="0in" fo:margin-right="0in" fo:text-indent="0in" style:auto-text-indent="false"/>
      <style:text-properties officeooo:rsid="0620a167" officeooo:paragraph-rsid="06219d51"/>
    </style:style>
    <style:style style:name="P508" style:family="paragraph" style:parent-style-name="Text_20_body">
      <style:paragraph-properties fo:margin-left="0in" fo:margin-right="0in" fo:text-indent="0in" style:auto-text-indent="false"/>
      <style:text-properties officeooo:rsid="062600a7" officeooo:paragraph-rsid="062600a7"/>
    </style:style>
    <style:style style:name="P509" style:family="paragraph" style:parent-style-name="Text_20_body">
      <style:paragraph-properties fo:margin-left="0in" fo:margin-right="0in" fo:text-indent="0in" style:auto-text-indent="false"/>
      <style:text-properties officeooo:rsid="062600a7" officeooo:paragraph-rsid="062726f5"/>
    </style:style>
    <style:style style:name="P510" style:family="paragraph" style:parent-style-name="Text_20_body">
      <style:paragraph-properties fo:margin-left="0in" fo:margin-right="0in" fo:text-indent="0in" style:auto-text-indent="false"/>
      <style:text-properties officeooo:rsid="0628fc53" officeooo:paragraph-rsid="0628fc53"/>
    </style:style>
    <style:style style:name="P511" style:family="paragraph" style:parent-style-name="Text_20_body">
      <style:paragraph-properties fo:margin-left="0in" fo:margin-right="0in" fo:text-indent="0in" style:auto-text-indent="false"/>
      <style:text-properties officeooo:rsid="062c3469" officeooo:paragraph-rsid="062c3469"/>
    </style:style>
    <style:style style:name="P512" style:family="paragraph" style:parent-style-name="Text_20_body">
      <style:paragraph-properties fo:margin-left="0in" fo:margin-right="0in" fo:text-indent="0in" style:auto-text-indent="false"/>
      <style:text-properties officeooo:rsid="063237fd" officeooo:paragraph-rsid="063237fd"/>
    </style:style>
    <style:style style:name="P513" style:family="paragraph" style:parent-style-name="Text_20_body">
      <style:paragraph-properties fo:margin-left="0in" fo:margin-right="0in" fo:text-indent="0in" style:auto-text-indent="false"/>
      <style:text-properties officeooo:rsid="062726f5" officeooo:paragraph-rsid="062726f5"/>
    </style:style>
    <style:style style:name="P514" style:family="paragraph" style:parent-style-name="Text_20_body">
      <style:paragraph-properties fo:margin-left="0in" fo:margin-right="0in" fo:text-indent="0in" style:auto-text-indent="false"/>
      <style:text-properties officeooo:rsid="063c5339" officeooo:paragraph-rsid="063c5339"/>
    </style:style>
    <style:style style:name="P515" style:family="paragraph" style:parent-style-name="Text_20_body">
      <style:paragraph-properties fo:margin-left="0in" fo:margin-right="0in" fo:text-indent="0in" style:auto-text-indent="false"/>
      <style:text-properties officeooo:rsid="06402642" officeooo:paragraph-rsid="06402642"/>
    </style:style>
    <style:style style:name="P516" style:family="paragraph" style:parent-style-name="Text_20_body">
      <style:paragraph-properties fo:margin-left="0in" fo:margin-right="0in" fo:text-indent="0in" style:auto-text-indent="false"/>
      <style:text-properties officeooo:rsid="0642df6c" officeooo:paragraph-rsid="0643dfed"/>
    </style:style>
    <style:style style:name="P517" style:family="paragraph" style:parent-style-name="Text_20_body">
      <style:paragraph-properties fo:margin-left="0in" fo:margin-right="0in" fo:text-indent="0in" style:auto-text-indent="false"/>
      <style:text-properties officeooo:rsid="064535ae" officeooo:paragraph-rsid="064535ae"/>
    </style:style>
    <style:style style:name="P518" style:family="paragraph" style:parent-style-name="Text_20_body">
      <style:paragraph-properties fo:margin-left="0in" fo:margin-right="0in" fo:text-indent="0in" style:auto-text-indent="false"/>
      <style:text-properties officeooo:rsid="06475efd" officeooo:paragraph-rsid="06475efd"/>
    </style:style>
    <style:style style:name="P519" style:family="paragraph" style:parent-style-name="Text_20_body">
      <style:paragraph-properties fo:margin-left="0in" fo:margin-right="0in" fo:text-indent="0in" style:auto-text-indent="false"/>
      <style:text-properties officeooo:rsid="064a7090" officeooo:paragraph-rsid="064a7090"/>
    </style:style>
    <style:style style:name="P520" style:family="paragraph" style:parent-style-name="Text_20_body">
      <style:paragraph-properties fo:margin-left="0in" fo:margin-right="0in" fo:text-indent="0in" style:auto-text-indent="false"/>
      <style:text-properties officeooo:rsid="064e085a" officeooo:paragraph-rsid="064e085a"/>
    </style:style>
    <style:style style:name="P521" style:family="paragraph" style:parent-style-name="Text_20_body">
      <style:paragraph-properties fo:margin-left="0in" fo:margin-right="0in" fo:text-indent="0in" style:auto-text-indent="false"/>
      <style:text-properties officeooo:rsid="06562a98" officeooo:paragraph-rsid="06562a98"/>
    </style:style>
    <style:style style:name="P522" style:family="paragraph" style:parent-style-name="Text_20_body">
      <style:paragraph-properties fo:margin-left="0in" fo:margin-right="0in" fo:text-indent="0in" style:auto-text-indent="false"/>
      <style:text-properties officeooo:rsid="06576d8a" officeooo:paragraph-rsid="06576d8a"/>
    </style:style>
    <style:style style:name="P523" style:family="paragraph" style:parent-style-name="Text_20_body">
      <style:paragraph-properties fo:margin-left="0in" fo:margin-right="0in" fo:text-indent="0in" style:auto-text-indent="false"/>
      <style:text-properties officeooo:rsid="065dd85e" officeooo:paragraph-rsid="065dd85e"/>
    </style:style>
    <style:style style:name="P524" style:family="paragraph" style:parent-style-name="Text_20_body">
      <style:paragraph-properties fo:margin-left="0in" fo:margin-right="0in" fo:text-indent="0in" style:auto-text-indent="false"/>
      <style:text-properties officeooo:rsid="0664fe1a" officeooo:paragraph-rsid="0664fe1a"/>
    </style:style>
    <style:style style:name="P525" style:family="paragraph" style:parent-style-name="Text_20_body">
      <style:paragraph-properties fo:margin-left="0in" fo:margin-right="0in" fo:text-indent="0in" style:auto-text-indent="false"/>
      <style:text-properties officeooo:rsid="066b2381" officeooo:paragraph-rsid="066b2381"/>
    </style:style>
    <style:style style:name="P526" style:family="paragraph" style:parent-style-name="Text_20_body">
      <style:paragraph-properties fo:margin-left="0in" fo:margin-right="0in" fo:text-indent="0in" style:auto-text-indent="false"/>
      <style:text-properties officeooo:rsid="066bb09e" officeooo:paragraph-rsid="066bb09e"/>
    </style:style>
    <style:style style:name="P527" style:family="paragraph" style:parent-style-name="Text_20_body">
      <style:paragraph-properties fo:margin-left="0in" fo:margin-right="0in" fo:text-indent="0in" style:auto-text-indent="false"/>
      <style:text-properties officeooo:paragraph-rsid="0716299f"/>
    </style:style>
    <style:style style:name="P528" style:family="paragraph" style:parent-style-name="Text_20_body">
      <style:paragraph-properties fo:margin-left="0in" fo:margin-right="0in" fo:text-indent="0in" style:auto-text-indent="false"/>
      <style:text-properties officeooo:rsid="0718992b" officeooo:paragraph-rsid="0718992b"/>
    </style:style>
    <style:style style:name="P529" style:family="paragraph" style:parent-style-name="Text_20_body">
      <style:paragraph-properties fo:margin-left="0in" fo:margin-right="0in" fo:text-indent="0in" style:auto-text-indent="false"/>
      <style:text-properties officeooo:rsid="071a0ebd" officeooo:paragraph-rsid="071a0ebd"/>
    </style:style>
    <style:style style:name="P530" style:family="paragraph" style:parent-style-name="Text_20_body">
      <style:paragraph-properties fo:margin-left="0in" fo:margin-right="0in" fo:text-indent="0in" style:auto-text-indent="false"/>
      <style:text-properties officeooo:rsid="071dec59" officeooo:paragraph-rsid="071ed799"/>
    </style:style>
    <style:style style:name="P531" style:family="paragraph" style:parent-style-name="Text_20_body">
      <style:paragraph-properties fo:margin-left="0in" fo:margin-right="0in" fo:text-indent="0in" style:auto-text-indent="false"/>
      <style:text-properties officeooo:rsid="07229d9f" officeooo:paragraph-rsid="07229d9f"/>
    </style:style>
    <style:style style:name="P532" style:family="paragraph" style:parent-style-name="Text_20_body">
      <style:paragraph-properties fo:margin-left="0in" fo:margin-right="0in" fo:text-indent="0in" style:auto-text-indent="false"/>
      <style:text-properties officeooo:rsid="072466c9" officeooo:paragraph-rsid="072466c9"/>
    </style:style>
    <style:style style:name="P533" style:family="paragraph" style:parent-style-name="Text_20_body">
      <style:paragraph-properties fo:margin-left="0in" fo:margin-right="0in" fo:text-indent="0in" style:auto-text-indent="false"/>
      <style:text-properties officeooo:paragraph-rsid="0727fa8d"/>
    </style:style>
    <style:style style:name="P534" style:family="paragraph" style:parent-style-name="Text_20_body">
      <style:paragraph-properties fo:margin-left="0in" fo:margin-right="0in" fo:text-indent="0in" style:auto-text-indent="false"/>
      <style:text-properties officeooo:rsid="0729fb03" officeooo:paragraph-rsid="0729fb03"/>
    </style:style>
    <style:style style:name="P535" style:family="paragraph" style:parent-style-name="Text_20_body">
      <style:paragraph-properties fo:margin-left="0in" fo:margin-right="0in" fo:text-indent="0in" style:auto-text-indent="false"/>
      <style:text-properties officeooo:rsid="072b4ec3" officeooo:paragraph-rsid="072b4ec3"/>
    </style:style>
    <style:style style:name="P536" style:family="paragraph" style:parent-style-name="Text_20_body">
      <style:paragraph-properties fo:margin-left="0in" fo:margin-right="0in" fo:text-indent="0in" style:auto-text-indent="false"/>
      <style:text-properties officeooo:rsid="072e6860" officeooo:paragraph-rsid="072e6860"/>
    </style:style>
    <style:style style:name="P537" style:family="paragraph" style:parent-style-name="Text_20_body">
      <style:paragraph-properties fo:margin-left="0in" fo:margin-right="0in" fo:text-indent="0in" style:auto-text-indent="false"/>
      <style:text-properties officeooo:rsid="0731581b" officeooo:paragraph-rsid="0731581b"/>
    </style:style>
    <style:style style:name="P538" style:family="paragraph" style:parent-style-name="Text_20_body">
      <style:paragraph-properties fo:margin-left="0in" fo:margin-right="0in" fo:text-indent="0in" style:auto-text-indent="false"/>
      <style:text-properties officeooo:rsid="071ed799" officeooo:paragraph-rsid="071ed799"/>
    </style:style>
    <style:style style:name="P539" style:family="paragraph" style:parent-style-name="Text_20_body">
      <style:paragraph-properties fo:margin-left="0in" fo:margin-right="0in" fo:text-indent="0in" style:auto-text-indent="false"/>
      <style:text-properties officeooo:rsid="073a400d" officeooo:paragraph-rsid="073a400d"/>
    </style:style>
    <style:style style:name="P540" style:family="paragraph" style:parent-style-name="Text_20_body">
      <style:paragraph-properties fo:margin-left="0in" fo:margin-right="0in" fo:text-indent="0in" style:auto-text-indent="false"/>
      <style:text-properties officeooo:rsid="073c9300" officeooo:paragraph-rsid="073c9300"/>
    </style:style>
    <style:style style:name="P541" style:family="paragraph" style:parent-style-name="Text_20_body">
      <style:paragraph-properties fo:margin-left="0in" fo:margin-right="0in" fo:text-indent="0in" style:auto-text-indent="false"/>
      <style:text-properties officeooo:rsid="073dfb49" officeooo:paragraph-rsid="073dfb49"/>
    </style:style>
    <style:style style:name="P542" style:family="paragraph" style:parent-style-name="Text_20_body">
      <style:paragraph-properties fo:margin-left="0in" fo:margin-right="0in" fo:text-indent="0in" style:auto-text-indent="false"/>
      <style:text-properties officeooo:rsid="073febe8" officeooo:paragraph-rsid="073febe8"/>
    </style:style>
    <style:style style:name="P543" style:family="paragraph" style:parent-style-name="Text_20_body">
      <style:paragraph-properties fo:margin-left="0in" fo:margin-right="0in" fo:text-indent="0in" style:auto-text-indent="false"/>
      <style:text-properties officeooo:rsid="075d5dc5" officeooo:paragraph-rsid="075d5dc5"/>
    </style:style>
    <style:style style:name="P544" style:family="paragraph" style:parent-style-name="Text_20_body">
      <style:paragraph-properties fo:margin-left="0in" fo:margin-right="0in" fo:text-indent="0in" style:auto-text-indent="false"/>
      <style:text-properties officeooo:rsid="0760fdae" officeooo:paragraph-rsid="0760fdae"/>
    </style:style>
    <style:style style:name="P545" style:family="paragraph" style:parent-style-name="Text_20_body">
      <style:paragraph-properties fo:margin-left="0in" fo:margin-right="0in" fo:text-indent="0in" style:auto-text-indent="false"/>
      <style:text-properties officeooo:rsid="07443c84" officeooo:paragraph-rsid="07443c84"/>
    </style:style>
    <style:style style:name="P546" style:family="paragraph" style:parent-style-name="Text_20_body">
      <style:paragraph-properties fo:margin-left="0in" fo:margin-right="0in" fo:text-indent="0in" style:auto-text-indent="false"/>
      <style:text-properties officeooo:rsid="076384fd" officeooo:paragraph-rsid="07641aea"/>
    </style:style>
    <style:style style:name="P547" style:family="paragraph" style:parent-style-name="Text_20_body">
      <style:paragraph-properties fo:margin-left="0in" fo:margin-right="0in" fo:text-indent="0in" style:auto-text-indent="false"/>
      <style:text-properties officeooo:rsid="07641aea" officeooo:paragraph-rsid="07641aea"/>
    </style:style>
    <style:style style:name="P548" style:family="paragraph" style:parent-style-name="Text_20_body">
      <style:paragraph-properties fo:margin-left="0in" fo:margin-right="0in" fo:text-indent="0in" style:auto-text-indent="false"/>
      <style:text-properties officeooo:rsid="07641aea" officeooo:paragraph-rsid="0765c733"/>
    </style:style>
    <style:style style:name="P549" style:family="paragraph" style:parent-style-name="Text_20_body">
      <style:paragraph-properties fo:margin-left="0in" fo:margin-right="0in" fo:text-indent="0in" style:auto-text-indent="false"/>
      <style:text-properties officeooo:rsid="0765c733" officeooo:paragraph-rsid="0765c733"/>
    </style:style>
    <style:style style:name="P550" style:family="paragraph" style:parent-style-name="Text_20_body">
      <style:paragraph-properties fo:margin-left="0in" fo:margin-right="0in" fo:text-indent="0in" style:auto-text-indent="false"/>
      <style:text-properties officeooo:rsid="07674b93" officeooo:paragraph-rsid="07674b93"/>
    </style:style>
    <style:style style:name="P551" style:family="paragraph" style:parent-style-name="Text_20_body">
      <style:paragraph-properties fo:margin-left="0in" fo:margin-right="0in" fo:text-indent="0in" style:auto-text-indent="false"/>
      <style:text-properties officeooo:rsid="07688847" officeooo:paragraph-rsid="07688847"/>
    </style:style>
    <style:style style:name="P552" style:family="paragraph" style:parent-style-name="Text_20_body">
      <style:paragraph-properties fo:margin-left="0in" fo:margin-right="0in" fo:text-indent="0in" style:auto-text-indent="false"/>
      <style:text-properties officeooo:rsid="05a8fdca" officeooo:paragraph-rsid="05ab1407"/>
    </style:style>
    <style:style style:name="P553" style:family="paragraph" style:parent-style-name="Text_20_body">
      <style:paragraph-properties fo:margin-left="0in" fo:margin-right="0in" fo:text-indent="0in" style:auto-text-indent="false"/>
      <style:text-properties officeooo:rsid="07436bc5" officeooo:paragraph-rsid="07436bc5"/>
    </style:style>
    <style:style style:name="P554" style:family="paragraph" style:parent-style-name="Text_20_body">
      <style:paragraph-properties fo:margin-left="0in" fo:margin-right="0in" fo:text-indent="0in" style:auto-text-indent="false"/>
      <style:text-properties officeooo:paragraph-rsid="05f0368f"/>
    </style:style>
    <style:style style:name="P555" style:family="paragraph" style:parent-style-name="Text_20_body">
      <style:paragraph-properties fo:margin-left="0in" fo:margin-right="0in" fo:text-indent="0in" style:auto-text-indent="false"/>
      <style:text-properties officeooo:paragraph-rsid="076c4a28"/>
    </style:style>
    <style:style style:name="P556" style:family="paragraph" style:parent-style-name="Text_20_body">
      <style:paragraph-properties fo:margin-left="0in" fo:margin-right="0in" fo:text-indent="0in" style:auto-text-indent="false"/>
      <style:text-properties officeooo:rsid="061643a2" officeooo:paragraph-rsid="061643a2"/>
    </style:style>
    <style:style style:name="P557" style:family="paragraph" style:parent-style-name="Text_20_body">
      <style:paragraph-properties fo:margin-left="0in" fo:margin-right="0in" fo:text-indent="0in" style:auto-text-indent="false"/>
      <style:text-properties officeooo:paragraph-rsid="076d907b"/>
    </style:style>
    <style:style style:name="P558" style:family="paragraph" style:parent-style-name="Text_20_body">
      <style:paragraph-properties fo:margin-left="0in" fo:margin-right="0in" fo:text-indent="0in" style:auto-text-indent="false"/>
      <style:text-properties officeooo:paragraph-rsid="076f2918"/>
    </style:style>
    <style:style style:name="P559" style:family="paragraph" style:parent-style-name="Text_20_body">
      <style:paragraph-properties fo:margin-left="0in" fo:margin-right="0in" fo:text-indent="0in" style:auto-text-indent="false"/>
      <style:text-properties officeooo:rsid="063df75b" officeooo:paragraph-rsid="063df75b"/>
    </style:style>
    <style:style style:name="P560" style:family="paragraph" style:parent-style-name="Text_20_body">
      <style:paragraph-properties fo:margin-left="0in" fo:margin-right="0in" fo:text-indent="0in" style:auto-text-indent="false"/>
      <style:text-properties officeooo:rsid="076f7927" officeooo:paragraph-rsid="076f7927"/>
    </style:style>
    <style:style style:name="P561" style:family="paragraph" style:parent-style-name="Text_20_body">
      <style:paragraph-properties fo:margin-left="0in" fo:margin-right="0in" fo:text-indent="0in" style:auto-text-indent="false"/>
      <style:text-properties officeooo:rsid="0646df6e" officeooo:paragraph-rsid="0646df6e"/>
    </style:style>
    <style:style style:name="P562" style:family="paragraph" style:parent-style-name="Text_20_body">
      <style:paragraph-properties fo:margin-left="0in" fo:margin-right="0in" fo:text-indent="0in" style:auto-text-indent="false"/>
      <style:text-properties officeooo:paragraph-rsid="077098d4"/>
    </style:style>
    <style:style style:name="P563" style:family="paragraph" style:parent-style-name="Text_20_body">
      <style:paragraph-properties fo:margin-left="0in" fo:margin-right="0in" fo:text-indent="0in" style:auto-text-indent="false"/>
      <style:text-properties officeooo:rsid="0660f571" officeooo:paragraph-rsid="0660f571"/>
    </style:style>
    <style:style style:name="P564" style:family="paragraph" style:parent-style-name="Text_20_body">
      <style:paragraph-properties fo:margin-left="0in" fo:margin-right="0in" fo:text-indent="0in" style:auto-text-indent="false"/>
      <style:text-properties officeooo:paragraph-rsid="0770f347"/>
    </style:style>
    <style:style style:name="P565" style:family="paragraph" style:parent-style-name="Text_20_body">
      <style:paragraph-properties fo:margin-left="0in" fo:margin-right="0in" fo:text-indent="0in" style:auto-text-indent="false"/>
      <style:text-properties officeooo:paragraph-rsid="077146b6"/>
    </style:style>
    <style:style style:name="P566" style:family="paragraph" style:parent-style-name="Text_20_body">
      <style:paragraph-properties fo:margin-left="0in" fo:margin-right="0in" fo:text-indent="0in" style:auto-text-indent="false"/>
      <style:text-properties officeooo:paragraph-rsid="07756b9c"/>
    </style:style>
    <style:style style:name="P567" style:family="paragraph" style:parent-style-name="Quotations">
      <style:paragraph-properties fo:break-before="page"/>
      <style:text-properties officeooo:paragraph-rsid="07475686"/>
    </style:style>
    <style:style style:name="P568" style:family="paragraph" style:parent-style-name="Text_20_body">
      <style:paragraph-properties fo:break-before="page">
        <style:drop-cap/>
      </style:paragraph-properties>
      <style:text-properties officeooo:rsid="05645b32" officeooo:paragraph-rsid="05645b32"/>
    </style:style>
    <style:style style:name="P569" style:family="paragraph" style:parent-style-name="Heading_20_1">
      <style:paragraph-properties fo:break-before="page"/>
    </style:style>
    <style:style style:name="P570" style:family="paragraph" style:parent-style-name="Heading_20_1">
      <style:paragraph-properties fo:break-before="page"/>
      <style:text-properties officeooo:paragraph-rsid="055daab5"/>
    </style:style>
    <style:style style:name="P571" style:family="paragraph" style:parent-style-name="Heading_20_1">
      <style:paragraph-properties fo:break-before="page"/>
      <style:text-properties officeooo:paragraph-rsid="070bd689"/>
    </style:style>
    <style:style style:name="P572" style:family="paragraph" style:parent-style-name="Heading_20_2">
      <style:text-properties officeooo:paragraph-rsid="02a60f82"/>
    </style:style>
    <style:style style:name="P573" style:family="paragraph" style:parent-style-name="Heading_20_2">
      <style:text-properties officeooo:rsid="023397b8" officeooo:paragraph-rsid="02a457a5"/>
    </style:style>
    <style:style style:name="P574" style:family="paragraph" style:parent-style-name="Heading_20_3">
      <style:text-properties officeooo:rsid="054023df" officeooo:paragraph-rsid="05414b69"/>
    </style:style>
    <style:style style:name="P575" style:family="paragraph" style:parent-style-name="Heading_20_3">
      <style:text-properties officeooo:rsid="031d7019" officeooo:paragraph-rsid="032a7588"/>
    </style:style>
    <style:style style:name="P576" style:family="paragraph" style:parent-style-name="Heading_20_3">
      <style:text-properties officeooo:paragraph-rsid="076384fd"/>
    </style:style>
    <style:style style:name="P57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578" style:family="paragraph">
      <style:paragraph-properties fo:margin-left="0in" fo:margin-right="0in" fo:text-indent="0in"/>
    </style:style>
    <style:style style:name="P579" style:family="paragraph" style:parent-style-name="Comment">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580" style:family="paragraph" style:parent-style-name="Comment">
      <style:paragraph-properties fo:margin-left="0in" fo:margin-right="0in" fo:text-indent="0in"/>
    </style:style>
    <style:style style:name="T1" style:family="text">
      <style:text-properties officeooo:rsid="0188ae24"/>
    </style:style>
    <style:style style:name="T2" style:family="text">
      <style:text-properties officeooo:rsid="018d10bd"/>
    </style:style>
    <style:style style:name="T3" style:family="text">
      <style:text-properties officeooo:rsid="019dd4f1"/>
    </style:style>
    <style:style style:name="T4" style:family="text">
      <style:text-properties officeooo:rsid="01a3693b"/>
    </style:style>
    <style:style style:name="T5" style:family="text">
      <style:text-properties officeooo:rsid="01a63bae"/>
    </style:style>
    <style:style style:name="T6" style:family="text">
      <style:text-properties officeooo:rsid="01a7016e"/>
    </style:style>
    <style:style style:name="T7" style:family="text">
      <style:text-properties officeooo:rsid="01a8e9d1"/>
    </style:style>
    <style:style style:name="T8" style:family="text">
      <style:text-properties officeooo:rsid="01a95ef6"/>
    </style:style>
    <style:style style:name="T9" style:family="text">
      <style:text-properties officeooo:rsid="01aa0789"/>
    </style:style>
    <style:style style:name="T10" style:family="text">
      <style:text-properties officeooo:rsid="01aa949c"/>
    </style:style>
    <style:style style:name="T11" style:family="text">
      <style:text-properties officeooo:rsid="01aadd77"/>
    </style:style>
    <style:style style:name="T12" style:family="text">
      <style:text-properties officeooo:rsid="01ac0d8b"/>
    </style:style>
    <style:style style:name="T13" style:family="text">
      <style:text-properties officeooo:rsid="01ad73b4"/>
    </style:style>
    <style:style style:name="T14" style:family="text">
      <style:text-properties officeooo:rsid="01aea29f"/>
    </style:style>
    <style:style style:name="T15" style:family="text">
      <style:text-properties officeooo:rsid="01af3344"/>
    </style:style>
    <style:style style:name="T16" style:family="text">
      <style:text-properties officeooo:rsid="01b166ae"/>
    </style:style>
    <style:style style:name="T17" style:family="text">
      <style:text-properties officeooo:rsid="01b35b24"/>
    </style:style>
    <style:style style:name="T18" style:family="text">
      <style:text-properties officeooo:rsid="01b41334"/>
    </style:style>
    <style:style style:name="T19" style:family="text">
      <style:text-properties officeooo:rsid="01b684d1"/>
    </style:style>
    <style:style style:name="T20" style:family="text">
      <style:text-properties officeooo:rsid="01b6c227"/>
    </style:style>
    <style:style style:name="T21" style:family="text">
      <style:text-properties officeooo:rsid="01b73f5b"/>
    </style:style>
    <style:style style:name="T22" style:family="text">
      <style:text-properties officeooo:rsid="01ba007c"/>
    </style:style>
    <style:style style:name="T23" style:family="text">
      <style:text-properties officeooo:rsid="01be67c2"/>
    </style:style>
    <style:style style:name="T24" style:family="text">
      <style:text-properties officeooo:rsid="01bfc4bc"/>
    </style:style>
    <style:style style:name="T25" style:family="text">
      <style:text-properties officeooo:rsid="01c7e5f0"/>
    </style:style>
    <style:style style:name="T26" style:family="text">
      <style:text-properties officeooo:rsid="01c95578"/>
    </style:style>
    <style:style style:name="T27" style:family="text">
      <style:text-properties officeooo:rsid="01cb9635"/>
    </style:style>
    <style:style style:name="T28" style:family="text">
      <style:text-properties officeooo:rsid="01cce27b"/>
    </style:style>
    <style:style style:name="T29" style:family="text">
      <style:text-properties officeooo:rsid="01cdd4d9"/>
    </style:style>
    <style:style style:name="T30" style:family="text">
      <style:text-properties officeooo:rsid="01d141af"/>
    </style:style>
    <style:style style:name="T31" style:family="text">
      <style:text-properties officeooo:rsid="01d47018"/>
    </style:style>
    <style:style style:name="T32" style:family="text">
      <style:text-properties officeooo:rsid="01d48a20"/>
    </style:style>
    <style:style style:name="T33" style:family="text">
      <style:text-properties officeooo:rsid="01d5fac4"/>
    </style:style>
    <style:style style:name="T34" style:family="text">
      <style:text-properties officeooo:rsid="01d7d8e3"/>
    </style:style>
    <style:style style:name="T35" style:family="text">
      <style:text-properties officeooo:rsid="01d8c6f8"/>
    </style:style>
    <style:style style:name="T36" style:family="text">
      <style:text-properties officeooo:rsid="01da6761"/>
    </style:style>
    <style:style style:name="T37" style:family="text">
      <style:text-properties officeooo:rsid="01db5f3b"/>
    </style:style>
    <style:style style:name="T38" style:family="text">
      <style:text-properties officeooo:rsid="01de661d"/>
    </style:style>
    <style:style style:name="T39" style:family="text">
      <style:text-properties officeooo:rsid="01def7d2"/>
    </style:style>
    <style:style style:name="T40" style:family="text">
      <style:text-properties officeooo:rsid="01dff61e"/>
    </style:style>
    <style:style style:name="T41" style:family="text">
      <style:text-properties officeooo:rsid="01e0c44c"/>
    </style:style>
    <style:style style:name="T42" style:family="text">
      <style:text-properties officeooo:rsid="01e1a8fb"/>
    </style:style>
    <style:style style:name="T43" style:family="text">
      <style:text-properties officeooo:rsid="01e2b640"/>
    </style:style>
    <style:style style:name="T44" style:family="text">
      <style:text-properties officeooo:rsid="01e2d507"/>
    </style:style>
    <style:style style:name="T45" style:family="text">
      <style:text-properties officeooo:rsid="01e4b036"/>
    </style:style>
    <style:style style:name="T46" style:family="text">
      <style:text-properties officeooo:rsid="01e6865f"/>
    </style:style>
    <style:style style:name="T47" style:family="text">
      <style:text-properties officeooo:rsid="01ea8dc7"/>
    </style:style>
    <style:style style:name="T48" style:family="text">
      <style:text-properties officeooo:rsid="01eb28a2"/>
    </style:style>
    <style:style style:name="T49" style:family="text">
      <style:text-properties officeooo:rsid="01ebade7"/>
    </style:style>
    <style:style style:name="T50" style:family="text">
      <style:text-properties officeooo:rsid="01ebfb55"/>
    </style:style>
    <style:style style:name="T51" style:family="text">
      <style:text-properties officeooo:rsid="01ec8752"/>
    </style:style>
    <style:style style:name="T52" style:family="text">
      <style:text-properties officeooo:rsid="01ed8c62"/>
    </style:style>
    <style:style style:name="T53" style:family="text">
      <style:text-properties officeooo:rsid="01effee8"/>
    </style:style>
    <style:style style:name="T54" style:family="text">
      <style:text-properties officeooo:rsid="01f53bcb"/>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style:font-size-asian="12pt"/>
    </style:style>
    <style:style style:name="T57" style:family="text">
      <style:text-properties officeooo:rsid="01fc5d94"/>
    </style:style>
    <style:style style:name="T58" style:family="text">
      <style:text-properties officeooo:rsid="01fca489"/>
    </style:style>
    <style:style style:name="T59" style:family="text">
      <style:text-properties officeooo:rsid="01fe6845"/>
    </style:style>
    <style:style style:name="T60" style:family="text">
      <style:text-properties officeooo:rsid="01ff3d21"/>
    </style:style>
    <style:style style:name="T61" style:family="text">
      <style:text-properties officeooo:rsid="0206d0d9"/>
    </style:style>
    <style:style style:name="T62" style:family="text">
      <style:text-properties officeooo:rsid="02079e06"/>
    </style:style>
    <style:style style:name="T63" style:family="text">
      <style:text-properties officeooo:rsid="02083566"/>
    </style:style>
    <style:style style:name="T64" style:family="text">
      <style:text-properties officeooo:rsid="0208bbad"/>
    </style:style>
    <style:style style:name="T65" style:family="text">
      <style:text-properties officeooo:rsid="0208e494"/>
    </style:style>
    <style:style style:name="T66" style:family="text">
      <style:text-properties officeooo:rsid="020c16ae"/>
    </style:style>
    <style:style style:name="T67" style:family="text">
      <style:text-properties officeooo:rsid="020da5a8"/>
    </style:style>
    <style:style style:name="T68" style:family="text">
      <style:text-properties officeooo:rsid="020dee0e"/>
    </style:style>
    <style:style style:name="T69" style:family="text">
      <style:text-properties officeooo:rsid="020feace"/>
    </style:style>
    <style:style style:name="T70" style:family="text">
      <style:text-properties officeooo:rsid="0210edbd"/>
    </style:style>
    <style:style style:name="T71" style:family="text">
      <style:text-properties officeooo:rsid="02136e6f"/>
    </style:style>
    <style:style style:name="T72" style:family="text">
      <style:text-properties officeooo:rsid="02156c21"/>
    </style:style>
    <style:style style:name="T73" style:family="text">
      <style:text-properties officeooo:rsid="0216206f"/>
    </style:style>
    <style:style style:name="T74" style:family="text">
      <style:text-properties officeooo:rsid="02167e76"/>
    </style:style>
    <style:style style:name="T75" style:family="text">
      <style:text-properties officeooo:rsid="0218a927"/>
    </style:style>
    <style:style style:name="T76" style:family="text">
      <style:text-properties officeooo:rsid="0218b86f"/>
    </style:style>
    <style:style style:name="T77" style:family="text">
      <style:text-properties officeooo:rsid="0219fa4d"/>
    </style:style>
    <style:style style:name="T78" style:family="text">
      <style:text-properties officeooo:rsid="021adc31"/>
    </style:style>
    <style:style style:name="T79" style:family="text">
      <style:text-properties officeooo:rsid="021b5c8c"/>
    </style:style>
    <style:style style:name="T80" style:family="text">
      <style:text-properties officeooo:rsid="021c94f3"/>
    </style:style>
    <style:style style:name="T81" style:family="text">
      <style:text-properties officeooo:rsid="021dc693"/>
    </style:style>
    <style:style style:name="T82" style:family="text">
      <style:text-properties officeooo:rsid="021f94e8"/>
    </style:style>
    <style:style style:name="T83" style:family="text">
      <style:text-properties officeooo:rsid="02214db6"/>
    </style:style>
    <style:style style:name="T84" style:family="text">
      <style:text-properties officeooo:rsid="02228b6e"/>
    </style:style>
    <style:style style:name="T85" style:family="text">
      <style:text-properties officeooo:rsid="022290c6"/>
    </style:style>
    <style:style style:name="T86" style:family="text">
      <style:text-properties officeooo:rsid="0222a9cc"/>
    </style:style>
    <style:style style:name="T87" style:family="text">
      <style:text-properties officeooo:rsid="02244077"/>
    </style:style>
    <style:style style:name="T88" style:family="text">
      <style:text-properties officeooo:rsid="02247d52"/>
    </style:style>
    <style:style style:name="T89" style:family="text">
      <style:text-properties officeooo:rsid="02256f17"/>
    </style:style>
    <style:style style:name="T90" style:family="text">
      <style:text-properties officeooo:rsid="0228234a"/>
    </style:style>
    <style:style style:name="T91" style:family="text">
      <style:text-properties officeooo:rsid="02287ffd"/>
    </style:style>
    <style:style style:name="T92" style:family="text">
      <style:text-properties officeooo:rsid="022965c0"/>
    </style:style>
    <style:style style:name="T93" style:family="text">
      <style:text-properties officeooo:rsid="022e57d1"/>
    </style:style>
    <style:style style:name="T94" style:family="text">
      <style:text-properties officeooo:rsid="0230815a"/>
    </style:style>
    <style:style style:name="T95" style:family="text">
      <style:text-properties officeooo:rsid="0232c4b6"/>
    </style:style>
    <style:style style:name="T96" style:family="text">
      <style:text-properties officeooo:rsid="023397b8"/>
    </style:style>
    <style:style style:name="T97" style:family="text">
      <style:text-properties officeooo:rsid="02382c91"/>
    </style:style>
    <style:style style:name="T98" style:family="text">
      <style:text-properties officeooo:rsid="0239ab07"/>
    </style:style>
    <style:style style:name="T99" style:family="text">
      <style:text-properties officeooo:rsid="0239e793"/>
    </style:style>
    <style:style style:name="T100" style:family="text">
      <style:text-properties officeooo:rsid="023ad51b"/>
    </style:style>
    <style:style style:name="T101" style:family="text">
      <style:text-properties officeooo:rsid="023cb517"/>
    </style:style>
    <style:style style:name="T102" style:family="text">
      <style:text-properties officeooo:rsid="024001ab"/>
    </style:style>
    <style:style style:name="T103" style:family="text">
      <style:text-properties officeooo:rsid="0240f9dc"/>
    </style:style>
    <style:style style:name="T104" style:family="text">
      <style:text-properties officeooo:rsid="0243e0d0"/>
    </style:style>
    <style:style style:name="T105" style:family="text">
      <style:text-properties officeooo:rsid="0244e1ea"/>
    </style:style>
    <style:style style:name="T106" style:family="text">
      <style:text-properties officeooo:rsid="02455972"/>
    </style:style>
    <style:style style:name="T107" style:family="text">
      <style:text-properties officeooo:rsid="024621b4"/>
    </style:style>
    <style:style style:name="T108" style:family="text">
      <style:text-properties officeooo:rsid="0246405e"/>
    </style:style>
    <style:style style:name="T109" style:family="text">
      <style:text-properties officeooo:rsid="024811fa"/>
    </style:style>
    <style:style style:name="T110" style:family="text">
      <style:text-properties officeooo:rsid="02493f6b"/>
    </style:style>
    <style:style style:name="T111" style:family="text">
      <style:text-properties officeooo:rsid="0249649e"/>
    </style:style>
    <style:style style:name="T112" style:family="text">
      <style:text-properties officeooo:rsid="024cef7a"/>
    </style:style>
    <style:style style:name="T113" style:family="text">
      <style:text-properties officeooo:rsid="024e563f"/>
    </style:style>
    <style:style style:name="T114" style:family="text">
      <style:text-properties officeooo:rsid="0253bca1"/>
    </style:style>
    <style:style style:name="T115" style:family="text">
      <style:text-properties officeooo:rsid="0255062b"/>
    </style:style>
    <style:style style:name="T116" style:family="text">
      <style:text-properties officeooo:rsid="0257842d"/>
    </style:style>
    <style:style style:name="T117" style:family="text">
      <style:text-properties officeooo:rsid="0258b149"/>
    </style:style>
    <style:style style:name="T118" style:family="text">
      <style:text-properties officeooo:rsid="0259d9fc"/>
    </style:style>
    <style:style style:name="T119" style:family="text">
      <style:text-properties officeooo:rsid="0259fded"/>
    </style:style>
    <style:style style:name="T120" style:family="text">
      <style:text-properties officeooo:rsid="025cada9"/>
    </style:style>
    <style:style style:name="T121" style:family="text">
      <style:text-properties officeooo:rsid="025e9ee7"/>
    </style:style>
    <style:style style:name="T122" style:family="text">
      <style:text-properties officeooo:rsid="02605fba"/>
    </style:style>
    <style:style style:name="T123" style:family="text">
      <style:text-properties officeooo:rsid="02612d58"/>
    </style:style>
    <style:style style:name="T124" style:family="text">
      <style:text-properties officeooo:rsid="02664734"/>
    </style:style>
    <style:style style:name="T125" style:family="text">
      <style:text-properties officeooo:rsid="0268a6cc"/>
    </style:style>
    <style:style style:name="T126" style:family="text">
      <style:text-properties officeooo:rsid="026a75f2"/>
    </style:style>
    <style:style style:name="T127" style:family="text">
      <style:text-properties officeooo:rsid="026dc296"/>
    </style:style>
    <style:style style:name="T128" style:family="text">
      <style:text-properties officeooo:rsid="026f6d5a"/>
    </style:style>
    <style:style style:name="T129" style:family="text">
      <style:text-properties officeooo:rsid="02701720"/>
    </style:style>
    <style:style style:name="T130" style:family="text">
      <style:text-properties officeooo:rsid="02752708"/>
    </style:style>
    <style:style style:name="T131" style:family="text">
      <style:text-properties officeooo:rsid="02757dcb"/>
    </style:style>
    <style:style style:name="T132" style:family="text">
      <style:text-properties officeooo:rsid="0278679f"/>
    </style:style>
    <style:style style:name="T133" style:family="text">
      <style:text-properties officeooo:rsid="027b6ca7"/>
    </style:style>
    <style:style style:name="T134" style:family="text">
      <style:text-properties officeooo:rsid="027c73cb"/>
    </style:style>
    <style:style style:name="T135" style:family="text">
      <style:text-properties officeooo:rsid="027e223c"/>
    </style:style>
    <style:style style:name="T136" style:family="text">
      <style:text-properties officeooo:rsid="027f4d3c"/>
    </style:style>
    <style:style style:name="T137" style:family="text">
      <style:text-properties officeooo:rsid="02806942"/>
    </style:style>
    <style:style style:name="T138" style:family="text">
      <style:text-properties officeooo:rsid="0286f494"/>
    </style:style>
    <style:style style:name="T139" style:family="text">
      <style:text-properties officeooo:rsid="0288a89e"/>
    </style:style>
    <style:style style:name="T140" style:family="text">
      <style:text-properties officeooo:rsid="02893b1c"/>
    </style:style>
    <style:style style:name="T141" style:family="text">
      <style:text-properties officeooo:rsid="028a7d30"/>
    </style:style>
    <style:style style:name="T142" style:family="text">
      <style:text-properties officeooo:rsid="028acf76"/>
    </style:style>
    <style:style style:name="T143" style:family="text">
      <style:text-properties officeooo:rsid="028caf64"/>
    </style:style>
    <style:style style:name="T144" style:family="text">
      <style:text-properties officeooo:rsid="028e7851"/>
    </style:style>
    <style:style style:name="T145" style:family="text">
      <style:text-properties officeooo:rsid="0292843d"/>
    </style:style>
    <style:style style:name="T146" style:family="text">
      <style:text-properties officeooo:rsid="0292eb8b"/>
    </style:style>
    <style:style style:name="T147" style:family="text">
      <style:text-properties officeooo:rsid="0293d31f"/>
    </style:style>
    <style:style style:name="T148" style:family="text">
      <style:text-properties officeooo:rsid="0294acd0"/>
    </style:style>
    <style:style style:name="T149" style:family="text">
      <style:text-properties officeooo:rsid="0294b1db"/>
    </style:style>
    <style:style style:name="T150" style:family="text">
      <style:text-properties officeooo:rsid="0296935f"/>
    </style:style>
    <style:style style:name="T151" style:family="text">
      <style:text-properties officeooo:rsid="02974099"/>
    </style:style>
    <style:style style:name="T152" style:family="text">
      <style:text-properties officeooo:rsid="0298104c"/>
    </style:style>
    <style:style style:name="T153" style:family="text">
      <style:text-properties officeooo:rsid="0298ef19"/>
    </style:style>
    <style:style style:name="T154" style:family="text">
      <style:text-properties officeooo:rsid="029995cf"/>
    </style:style>
    <style:style style:name="T155" style:family="text">
      <style:text-properties officeooo:rsid="02a1a016"/>
    </style:style>
    <style:style style:name="T156" style:family="text">
      <style:text-properties officeooo:rsid="02a1dd88"/>
    </style:style>
    <style:style style:name="T157" style:family="text">
      <style:text-properties officeooo:rsid="01a85c89"/>
    </style:style>
    <style:style style:name="T158" style:family="text">
      <style:text-properties officeooo:rsid="02abd0d3"/>
    </style:style>
    <style:style style:name="T159" style:family="text">
      <style:text-properties officeooo:rsid="02acb00a"/>
    </style:style>
    <style:style style:name="T160" style:family="text">
      <style:text-properties officeooo:rsid="02ad5126"/>
    </style:style>
    <style:style style:name="T161" style:family="text">
      <style:text-properties officeooo:rsid="02b1b722"/>
    </style:style>
    <style:style style:name="T162" style:family="text">
      <style:text-properties officeooo:rsid="02bcaf84"/>
    </style:style>
    <style:style style:name="T163" style:family="text">
      <style:text-properties style:font-name="Liberation Sans" fo:font-size="14.1000003814697pt" fo:font-weight="bold" officeooo:rsid="02c64a2e" style:font-name-asian="Noto Sans CJK SC" style:font-size-asian="14.1000003814697pt" style:font-weight-asian="bold" style:font-name-complex="Lohit Devanagari1" style:font-size-complex="14.1000003814697pt" style:font-weight-complex="bold"/>
    </style:style>
    <style:style style:name="T164" style:family="text">
      <style:text-properties style:font-name="Liberation Sans" fo:font-size="14.1000003814697pt" fo:font-weight="bold" officeooo:rsid="02e566e4" style:font-name-asian="Noto Sans CJK SC" style:font-size-asian="14.1000003814697pt" style:font-weight-asian="bold" style:font-name-complex="Lohit Devanagari1" style:font-size-complex="14.1000003814697pt" style:font-weight-complex="bold"/>
    </style:style>
    <style:style style:name="T165" style:family="text">
      <style:text-properties style:font-name="Liberation Sans" fo:font-size="14.1000003814697pt" fo:font-weight="bold" officeooo:rsid="0302f675" style:font-name-asian="Noto Sans CJK SC" style:font-size-asian="14.1000003814697pt" style:font-weight-asian="bold" style:font-name-complex="Lohit Devanagari1" style:font-size-complex="14.1000003814697pt" style:font-weight-complex="bold"/>
    </style:style>
    <style:style style:name="T166" style:family="text">
      <style:text-properties style:font-name="Liberation Sans" fo:font-size="28pt" fo:font-weight="bold" officeooo:rsid="07d431be" style:font-name-asian="Noto Sans CJK SC" style:font-size-asian="28pt" style:font-weight-asian="bold" style:font-name-complex="Lohit Devanagari1" style:font-size-complex="28pt" style:font-weight-complex="bold"/>
    </style:style>
    <style:style style:name="T167" style:family="text">
      <style:text-properties officeooo:rsid="02403319"/>
    </style:style>
    <style:style style:name="T168" style:family="text">
      <style:text-properties officeooo:rsid="02c792a1"/>
    </style:style>
    <style:style style:name="T169" style:family="text">
      <style:text-properties officeooo:rsid="02c98b24"/>
    </style:style>
    <style:style style:name="T170" style:family="text">
      <style:text-properties officeooo:rsid="02cf79cb"/>
    </style:style>
    <style:style style:name="T171" style:family="text">
      <style:text-properties officeooo:rsid="02d08ffd"/>
    </style:style>
    <style:style style:name="T172" style:family="text">
      <style:text-properties officeooo:rsid="02d27e8f"/>
    </style:style>
    <style:style style:name="T173" style:family="text">
      <style:text-properties officeooo:rsid="026c1fa6"/>
    </style:style>
    <style:style style:name="T174" style:family="text">
      <style:text-properties officeooo:rsid="02d762a9"/>
    </style:style>
    <style:style style:name="T175" style:family="text">
      <style:text-properties officeooo:rsid="02d85ab9"/>
    </style:style>
    <style:style style:name="T176" style:family="text">
      <style:text-properties officeooo:rsid="02d9cd5c"/>
    </style:style>
    <style:style style:name="T177" style:family="text">
      <style:text-properties officeooo:rsid="02dfa889"/>
    </style:style>
    <style:style style:name="T178" style:family="text">
      <style:text-properties officeooo:rsid="02e049a2"/>
    </style:style>
    <style:style style:name="T179" style:family="text">
      <style:text-properties officeooo:rsid="02e1af04"/>
    </style:style>
    <style:style style:name="T180" style:family="text">
      <style:text-properties officeooo:rsid="02ee48d5"/>
    </style:style>
    <style:style style:name="T181" style:family="text">
      <style:text-properties officeooo:rsid="02f07ce7"/>
    </style:style>
    <style:style style:name="T182" style:family="text">
      <style:text-properties officeooo:rsid="02f4b6ea"/>
    </style:style>
    <style:style style:name="T183" style:family="text">
      <style:text-properties officeooo:rsid="0309436e"/>
    </style:style>
    <style:style style:name="T184" style:family="text">
      <style:text-properties officeooo:rsid="030e4e90"/>
    </style:style>
    <style:style style:name="T185" style:family="text">
      <style:text-properties officeooo:rsid="030ee4c4"/>
    </style:style>
    <style:style style:name="T186" style:family="text">
      <style:text-properties officeooo:rsid="03151ad2"/>
    </style:style>
    <style:style style:name="T187" style:family="text">
      <style:text-properties officeooo:rsid="031f1484"/>
    </style:style>
    <style:style style:name="T188" style:family="text">
      <style:text-properties officeooo:rsid="031f572b"/>
    </style:style>
    <style:style style:name="T189" style:family="text">
      <style:text-properties officeooo:rsid="0320c279"/>
    </style:style>
    <style:style style:name="T190" style:family="text">
      <style:text-properties officeooo:rsid="0325b28b"/>
    </style:style>
    <style:style style:name="T191" style:family="text">
      <style:text-properties officeooo:rsid="0325d5cd"/>
    </style:style>
    <style:style style:name="T192" style:family="text">
      <style:text-properties officeooo:rsid="03288328"/>
    </style:style>
    <style:style style:name="T193" style:family="text">
      <style:text-properties officeooo:rsid="032db8a5"/>
    </style:style>
    <style:style style:name="T194" style:family="text">
      <style:text-properties officeooo:rsid="0334b80f"/>
    </style:style>
    <style:style style:name="T195" style:family="text">
      <style:text-properties officeooo:rsid="0335efc0"/>
    </style:style>
    <style:style style:name="T196" style:family="text">
      <style:text-properties officeooo:rsid="03421cef"/>
    </style:style>
    <style:style style:name="T197" style:family="text">
      <style:text-properties officeooo:rsid="03430acd"/>
    </style:style>
    <style:style style:name="T198" style:family="text">
      <style:text-properties officeooo:rsid="034439cb"/>
    </style:style>
    <style:style style:name="T199" style:family="text">
      <style:text-properties officeooo:rsid="0344ec7a"/>
    </style:style>
    <style:style style:name="T200" style:family="text">
      <style:text-properties officeooo:rsid="03490b89"/>
    </style:style>
    <style:style style:name="T201" style:family="text">
      <style:text-properties officeooo:rsid="0349bbd8"/>
    </style:style>
    <style:style style:name="T202" style:family="text">
      <style:text-properties officeooo:rsid="034a5b26"/>
    </style:style>
    <style:style style:name="T203" style:family="text">
      <style:text-properties officeooo:rsid="034de347"/>
    </style:style>
    <style:style style:name="T204" style:family="text">
      <style:text-properties officeooo:rsid="034eef40"/>
    </style:style>
    <style:style style:name="T205" style:family="text">
      <style:text-properties officeooo:rsid="0350d358"/>
    </style:style>
    <style:style style:name="T206" style:family="text">
      <style:text-properties officeooo:rsid="03510b40"/>
    </style:style>
    <style:style style:name="T207" style:family="text">
      <style:text-properties officeooo:rsid="0355d814"/>
    </style:style>
    <style:style style:name="T208" style:family="text">
      <style:text-properties officeooo:rsid="0359d384"/>
    </style:style>
    <style:style style:name="T209" style:family="text">
      <style:text-properties officeooo:rsid="035fe48f"/>
    </style:style>
    <style:style style:name="T210" style:family="text">
      <style:text-properties officeooo:rsid="036511d5"/>
    </style:style>
    <style:style style:name="T211" style:family="text">
      <style:text-properties officeooo:rsid="0365877f"/>
    </style:style>
    <style:style style:name="T212" style:family="text">
      <style:text-properties officeooo:rsid="03673eba"/>
    </style:style>
    <style:style style:name="T213" style:family="text">
      <style:text-properties officeooo:rsid="0368b297"/>
    </style:style>
    <style:style style:name="T214" style:family="text">
      <style:text-properties officeooo:rsid="036aa36d"/>
    </style:style>
    <style:style style:name="T215" style:family="text">
      <style:text-properties officeooo:rsid="036c90ce"/>
    </style:style>
    <style:style style:name="T216" style:family="text">
      <style:text-properties officeooo:rsid="036de72f"/>
    </style:style>
    <style:style style:name="T217" style:family="text">
      <style:text-properties officeooo:rsid="036e92c1"/>
    </style:style>
    <style:style style:name="T218" style:family="text">
      <style:text-properties officeooo:rsid="03714f35"/>
    </style:style>
    <style:style style:name="T219" style:family="text">
      <style:text-properties officeooo:rsid="0371f19c"/>
    </style:style>
    <style:style style:name="T220" style:family="text">
      <style:text-properties officeooo:rsid="03725bfa"/>
    </style:style>
    <style:style style:name="T221" style:family="text">
      <style:text-properties officeooo:rsid="0372a3f5"/>
    </style:style>
    <style:style style:name="T222" style:family="text">
      <style:text-properties officeooo:rsid="037cd50c"/>
    </style:style>
    <style:style style:name="T223" style:family="text">
      <style:text-properties officeooo:rsid="037e246d"/>
    </style:style>
    <style:style style:name="T224" style:family="text">
      <style:text-properties officeooo:rsid="0381c884"/>
    </style:style>
    <style:style style:name="T225" style:family="text">
      <style:text-properties officeooo:rsid="03864696"/>
    </style:style>
    <style:style style:name="T226" style:family="text">
      <style:text-properties officeooo:rsid="0387ed7d"/>
    </style:style>
    <style:style style:name="T227" style:family="text">
      <style:text-properties officeooo:rsid="038c27ca"/>
    </style:style>
    <style:style style:name="T228" style:family="text">
      <style:text-properties officeooo:rsid="038d5c6a"/>
    </style:style>
    <style:style style:name="T229" style:family="text">
      <style:text-properties officeooo:rsid="038e2ad1"/>
    </style:style>
    <style:style style:name="T230" style:family="text">
      <style:text-properties officeooo:rsid="038f6108"/>
    </style:style>
    <style:style style:name="T231" style:family="text">
      <style:text-properties officeooo:rsid="0390c2ec"/>
    </style:style>
    <style:style style:name="T232" style:family="text">
      <style:text-properties officeooo:rsid="03925031"/>
    </style:style>
    <style:style style:name="T233" style:family="text">
      <style:text-properties officeooo:rsid="039357fb"/>
    </style:style>
    <style:style style:name="T234" style:family="text">
      <style:text-properties officeooo:rsid="039470f3"/>
    </style:style>
    <style:style style:name="T235" style:family="text">
      <style:text-properties officeooo:rsid="0394c8b0"/>
    </style:style>
    <style:style style:name="T236" style:family="text">
      <style:text-properties officeooo:rsid="03965613"/>
    </style:style>
    <style:style style:name="T237" style:family="text">
      <style:text-properties officeooo:rsid="03a0a2f2"/>
    </style:style>
    <style:style style:name="T238" style:family="text">
      <style:text-properties officeooo:rsid="03ac6c19"/>
    </style:style>
    <style:style style:name="T239" style:family="text">
      <style:text-properties officeooo:rsid="03adda04"/>
    </style:style>
    <style:style style:name="T240" style:family="text">
      <style:text-properties officeooo:rsid="03af38a4"/>
    </style:style>
    <style:style style:name="T241" style:family="text">
      <style:text-properties officeooo:rsid="03b01ca7"/>
    </style:style>
    <style:style style:name="T242" style:family="text">
      <style:text-properties officeooo:rsid="03b1bc6d"/>
    </style:style>
    <style:style style:name="T243" style:family="text">
      <style:text-properties officeooo:rsid="03b4f32f"/>
    </style:style>
    <style:style style:name="T244" style:family="text">
      <style:text-properties officeooo:rsid="03badde2"/>
    </style:style>
    <style:style style:name="T245" style:family="text">
      <style:text-properties officeooo:rsid="03bc7d90"/>
    </style:style>
    <style:style style:name="T246" style:family="text">
      <style:text-properties officeooo:rsid="03be98a2"/>
    </style:style>
    <style:style style:name="T247" style:family="text">
      <style:text-properties officeooo:rsid="03c34124"/>
    </style:style>
    <style:style style:name="T248" style:family="text">
      <style:text-properties officeooo:rsid="03c4c615"/>
    </style:style>
    <style:style style:name="T249" style:family="text">
      <style:text-properties officeooo:rsid="03c59a6d"/>
    </style:style>
    <style:style style:name="T250" style:family="text">
      <style:text-properties officeooo:rsid="03cd139b"/>
    </style:style>
    <style:style style:name="T251" style:family="text">
      <style:text-properties officeooo:rsid="03ce4cb5"/>
    </style:style>
    <style:style style:name="T252" style:family="text">
      <style:text-properties officeooo:rsid="03d4c030"/>
    </style:style>
    <style:style style:name="T253" style:family="text">
      <style:text-properties officeooo:rsid="03d6ec3d"/>
    </style:style>
    <style:style style:name="T254" style:family="text">
      <style:text-properties officeooo:rsid="03d89c45"/>
    </style:style>
    <style:style style:name="T255" style:family="text">
      <style:text-properties officeooo:rsid="03da9fdd"/>
    </style:style>
    <style:style style:name="T256" style:family="text">
      <style:text-properties officeooo:rsid="03ddc4d9"/>
    </style:style>
    <style:style style:name="T257" style:family="text">
      <style:text-properties officeooo:rsid="03df0647"/>
    </style:style>
    <style:style style:name="T258" style:family="text">
      <style:text-properties officeooo:rsid="03df1fe2"/>
    </style:style>
    <style:style style:name="T259" style:family="text">
      <style:text-properties officeooo:rsid="03ea1c09"/>
    </style:style>
    <style:style style:name="T260" style:family="text">
      <style:text-properties officeooo:rsid="03eb530f"/>
    </style:style>
    <style:style style:name="T261" style:family="text">
      <style:text-properties officeooo:rsid="03d70bd5"/>
    </style:style>
    <style:style style:name="T262" style:family="text">
      <style:text-properties officeooo:rsid="03ed0601"/>
    </style:style>
    <style:style style:name="T263" style:family="text">
      <style:text-properties officeooo:rsid="03ed153f"/>
    </style:style>
    <style:style style:name="T264" style:family="text">
      <style:text-properties officeooo:rsid="03ed5ddf"/>
    </style:style>
    <style:style style:name="T265" style:family="text">
      <style:text-properties officeooo:rsid="03efb532"/>
    </style:style>
    <style:style style:name="T266" style:family="text">
      <style:text-properties officeooo:rsid="03f1529c"/>
    </style:style>
    <style:style style:name="T267" style:family="text">
      <style:text-properties officeooo:rsid="03f1dfad"/>
    </style:style>
    <style:style style:name="T268" style:family="text">
      <style:text-properties officeooo:rsid="03f6675f"/>
    </style:style>
    <style:style style:name="T269" style:family="text">
      <style:text-properties officeooo:rsid="03f7c321"/>
    </style:style>
    <style:style style:name="T270" style:family="text">
      <style:text-properties officeooo:rsid="03f970cc"/>
    </style:style>
    <style:style style:name="T271" style:family="text">
      <style:text-properties officeooo:rsid="03fa2fc4"/>
    </style:style>
    <style:style style:name="T272" style:family="text">
      <style:text-properties officeooo:rsid="03fbbb4d"/>
    </style:style>
    <style:style style:name="T273" style:family="text">
      <style:text-properties officeooo:rsid="03fbe59c"/>
    </style:style>
    <style:style style:name="T274" style:family="text">
      <style:text-properties officeooo:rsid="040411c8"/>
    </style:style>
    <style:style style:name="T275" style:family="text">
      <style:text-properties officeooo:rsid="0405f667"/>
    </style:style>
    <style:style style:name="T276" style:family="text">
      <style:text-properties officeooo:rsid="0407f6c9"/>
    </style:style>
    <style:style style:name="T277" style:family="text">
      <style:text-properties officeooo:rsid="040b423b"/>
    </style:style>
    <style:style style:name="T278" style:family="text">
      <style:text-properties officeooo:rsid="040c97c9"/>
    </style:style>
    <style:style style:name="T279" style:family="text">
      <style:text-properties officeooo:rsid="040e3339"/>
    </style:style>
    <style:style style:name="T280" style:family="text">
      <style:text-properties officeooo:rsid="040e4a31"/>
    </style:style>
    <style:style style:name="T281" style:family="text">
      <style:text-properties officeooo:rsid="041137aa"/>
    </style:style>
    <style:style style:name="T282" style:family="text">
      <style:text-properties officeooo:rsid="0412cbe5"/>
    </style:style>
    <style:style style:name="T283" style:family="text">
      <style:text-properties officeooo:rsid="0413afc9"/>
    </style:style>
    <style:style style:name="T284" style:family="text">
      <style:text-properties officeooo:rsid="0414d852"/>
    </style:style>
    <style:style style:name="T285" style:family="text">
      <style:text-properties officeooo:rsid="041588cb"/>
    </style:style>
    <style:style style:name="T286" style:family="text">
      <style:text-properties officeooo:rsid="03792807"/>
    </style:style>
    <style:style style:name="T287" style:family="text">
      <style:text-properties officeooo:rsid="04170013"/>
    </style:style>
    <style:style style:name="T288" style:family="text">
      <style:text-properties officeooo:rsid="0391702e"/>
    </style:style>
    <style:style style:name="T289" style:family="text">
      <style:text-properties officeooo:rsid="038cd55a"/>
    </style:style>
    <style:style style:name="T290" style:family="text">
      <style:text-properties officeooo:rsid="038a9abc"/>
    </style:style>
    <style:style style:name="T291" style:family="text">
      <style:text-properties officeooo:rsid="0388d491"/>
    </style:style>
    <style:style style:name="T292" style:family="text">
      <style:text-properties officeooo:rsid="03859dc2"/>
    </style:style>
    <style:style style:name="T293" style:family="text">
      <style:text-properties officeooo:rsid="043d3c42"/>
    </style:style>
    <style:style style:name="T294" style:family="text">
      <style:text-properties officeooo:rsid="04417b90"/>
    </style:style>
    <style:style style:name="T295" style:family="text">
      <style:text-properties officeooo:rsid="0444fbfe"/>
    </style:style>
    <style:style style:name="T296" style:family="text">
      <style:text-properties officeooo:rsid="0446b3b9"/>
    </style:style>
    <style:style style:name="T297" style:family="text">
      <style:text-properties officeooo:rsid="044f550c"/>
    </style:style>
    <style:style style:name="T298" style:family="text">
      <style:text-properties officeooo:rsid="04517ac0"/>
    </style:style>
    <style:style style:name="T299" style:family="text">
      <style:text-properties officeooo:rsid="04551b52"/>
    </style:style>
    <style:style style:name="T300" style:family="text">
      <style:text-properties officeooo:rsid="045607ff"/>
    </style:style>
    <style:style style:name="T301" style:family="text">
      <style:text-properties officeooo:rsid="04575ec7"/>
    </style:style>
    <style:style style:name="T302" style:family="text">
      <style:text-properties officeooo:rsid="0458d691"/>
    </style:style>
    <style:style style:name="T303" style:family="text">
      <style:text-properties officeooo:rsid="045928df"/>
    </style:style>
    <style:style style:name="T304" style:family="text">
      <style:text-properties officeooo:rsid="045a2ed4"/>
    </style:style>
    <style:style style:name="T305" style:family="text">
      <style:text-properties officeooo:rsid="045c12b8"/>
    </style:style>
    <style:style style:name="T306" style:family="text">
      <style:text-properties officeooo:rsid="045e3fcd"/>
    </style:style>
    <style:style style:name="T307" style:family="text">
      <style:text-properties officeooo:rsid="045e7121"/>
    </style:style>
    <style:style style:name="T308" style:family="text">
      <style:text-properties officeooo:rsid="04600126"/>
    </style:style>
    <style:style style:name="T309" style:family="text">
      <style:text-properties officeooo:rsid="04665693"/>
    </style:style>
    <style:style style:name="T310" style:family="text">
      <style:text-properties officeooo:rsid="04683624"/>
    </style:style>
    <style:style style:name="T311" style:family="text">
      <style:text-properties officeooo:rsid="0469c5a5"/>
    </style:style>
    <style:style style:name="T312" style:family="text">
      <style:text-properties officeooo:rsid="046e1aef"/>
    </style:style>
    <style:style style:name="T313" style:family="text">
      <style:text-properties officeooo:rsid="046f8a3e"/>
    </style:style>
    <style:style style:name="T314" style:family="text">
      <style:text-properties officeooo:rsid="0470eae4"/>
    </style:style>
    <style:style style:name="T315" style:family="text">
      <style:text-properties officeooo:rsid="047115e7"/>
    </style:style>
    <style:style style:name="T316" style:family="text">
      <style:text-properties officeooo:rsid="04721c99"/>
    </style:style>
    <style:style style:name="T317" style:family="text">
      <style:text-properties officeooo:rsid="0475bd18"/>
    </style:style>
    <style:style style:name="T318" style:family="text">
      <style:text-properties officeooo:rsid="047806da"/>
    </style:style>
    <style:style style:name="T319" style:family="text">
      <style:text-properties officeooo:rsid="0478080e"/>
    </style:style>
    <style:style style:name="T320" style:family="text">
      <style:text-properties officeooo:rsid="0479568f"/>
    </style:style>
    <style:style style:name="T321" style:family="text">
      <style:text-properties officeooo:rsid="047a9b94"/>
    </style:style>
    <style:style style:name="T322" style:family="text">
      <style:text-properties officeooo:rsid="047c60cd"/>
    </style:style>
    <style:style style:name="T323" style:family="text">
      <style:text-properties officeooo:rsid="047f886c"/>
    </style:style>
    <style:style style:name="T324" style:family="text">
      <style:text-properties officeooo:rsid="0480ef19"/>
    </style:style>
    <style:style style:name="T325" style:family="text">
      <style:text-properties officeooo:rsid="04816e12"/>
    </style:style>
    <style:style style:name="T326" style:family="text">
      <style:text-properties officeooo:rsid="048298f5"/>
    </style:style>
    <style:style style:name="T327" style:family="text">
      <style:text-properties officeooo:rsid="04852e4f"/>
    </style:style>
    <style:style style:name="T328" style:family="text">
      <style:text-properties officeooo:rsid="04883187"/>
    </style:style>
    <style:style style:name="T329" style:family="text">
      <style:text-properties officeooo:rsid="048a6350"/>
    </style:style>
    <style:style style:name="T330" style:family="text">
      <style:text-properties officeooo:rsid="0276c690"/>
    </style:style>
    <style:style style:name="T331" style:family="text">
      <style:text-properties officeooo:rsid="048ce188"/>
    </style:style>
    <style:style style:name="T332" style:family="text">
      <style:text-properties officeooo:rsid="048fb45d"/>
    </style:style>
    <style:style style:name="T333" style:family="text">
      <style:text-properties officeooo:rsid="04917709"/>
    </style:style>
    <style:style style:name="T334" style:family="text">
      <style:text-properties officeooo:rsid="0492d00d"/>
    </style:style>
    <style:style style:name="T335" style:family="text">
      <style:text-properties officeooo:rsid="04941aa7"/>
    </style:style>
    <style:style style:name="T336" style:family="text">
      <style:text-properties officeooo:rsid="04975f84"/>
    </style:style>
    <style:style style:name="T337" style:family="text">
      <style:text-properties officeooo:rsid="0498d461"/>
    </style:style>
    <style:style style:name="T338" style:family="text">
      <style:text-properties officeooo:rsid="0499e333"/>
    </style:style>
    <style:style style:name="T339" style:family="text">
      <style:text-properties officeooo:rsid="049b7ed9"/>
    </style:style>
    <style:style style:name="T340" style:family="text">
      <style:text-properties officeooo:rsid="049cbb6c"/>
    </style:style>
    <style:style style:name="T341" style:family="text">
      <style:text-properties officeooo:rsid="049e1fae"/>
    </style:style>
    <style:style style:name="T342" style:family="text">
      <style:text-properties officeooo:rsid="049fd7d0"/>
    </style:style>
    <style:style style:name="T343" style:family="text">
      <style:text-properties officeooo:rsid="04a1802c"/>
    </style:style>
    <style:style style:name="T344" style:family="text">
      <style:text-properties officeooo:rsid="04a3164c"/>
    </style:style>
    <style:style style:name="T345" style:family="text">
      <style:text-properties officeooo:rsid="04a4ae84"/>
    </style:style>
    <style:style style:name="T346" style:family="text">
      <style:text-properties officeooo:rsid="04afb81b"/>
    </style:style>
    <style:style style:name="T347" style:family="text">
      <style:text-properties officeooo:rsid="04b0df47"/>
    </style:style>
    <style:style style:name="T348" style:family="text">
      <style:text-properties officeooo:rsid="04b25ff1"/>
    </style:style>
    <style:style style:name="T349" style:family="text">
      <style:text-properties officeooo:rsid="04b2e0eb"/>
    </style:style>
    <style:style style:name="T350" style:family="text">
      <style:text-properties officeooo:rsid="04b69c48"/>
    </style:style>
    <style:style style:name="T351" style:family="text">
      <style:text-properties officeooo:rsid="04b939b8"/>
    </style:style>
    <style:style style:name="T352" style:family="text">
      <style:text-properties officeooo:rsid="04bad441"/>
    </style:style>
    <style:style style:name="T353" style:family="text">
      <style:text-properties officeooo:rsid="04bca0cd"/>
    </style:style>
    <style:style style:name="T354" style:family="text">
      <style:text-properties officeooo:rsid="04bf7a05"/>
    </style:style>
    <style:style style:name="T355" style:family="text">
      <style:text-properties officeooo:rsid="04c1291d"/>
    </style:style>
    <style:style style:name="T356" style:family="text">
      <style:text-properties officeooo:rsid="04c42583"/>
    </style:style>
    <style:style style:name="T357" style:family="text">
      <style:text-properties officeooo:rsid="04c54ac3"/>
    </style:style>
    <style:style style:name="T358" style:family="text">
      <style:text-properties officeooo:rsid="04c9c22f"/>
    </style:style>
    <style:style style:name="T359" style:family="text">
      <style:text-properties officeooo:rsid="04cfec33"/>
    </style:style>
    <style:style style:name="T360" style:family="text">
      <style:text-properties officeooo:rsid="04d10535"/>
    </style:style>
    <style:style style:name="T361" style:family="text">
      <style:text-properties officeooo:rsid="04d13576"/>
    </style:style>
    <style:style style:name="T362" style:family="text">
      <style:text-properties officeooo:rsid="04d1f085"/>
    </style:style>
    <style:style style:name="T363" style:family="text">
      <style:text-properties officeooo:rsid="04d286f5"/>
    </style:style>
    <style:style style:name="T364" style:family="text">
      <style:text-properties officeooo:rsid="04d29702"/>
    </style:style>
    <style:style style:name="T365" style:family="text">
      <style:text-properties officeooo:rsid="04d5923f"/>
    </style:style>
    <style:style style:name="T366" style:family="text">
      <style:text-properties officeooo:rsid="04d61a22"/>
    </style:style>
    <style:style style:name="T367" style:family="text">
      <style:text-properties officeooo:rsid="04d841c0"/>
    </style:style>
    <style:style style:name="T368" style:family="text">
      <style:text-properties officeooo:rsid="04d71266"/>
    </style:style>
    <style:style style:name="T369" style:family="text">
      <style:text-properties officeooo:rsid="04d900ab"/>
    </style:style>
    <style:style style:name="T370" style:family="text">
      <style:text-properties officeooo:rsid="04d9491c"/>
    </style:style>
    <style:style style:name="T371" style:family="text">
      <style:text-properties officeooo:rsid="04d99fda"/>
    </style:style>
    <style:style style:name="T372" style:family="text">
      <style:text-properties officeooo:rsid="04def168"/>
    </style:style>
    <style:style style:name="T373" style:family="text">
      <style:text-properties officeooo:rsid="04e19830"/>
    </style:style>
    <style:style style:name="T374" style:family="text">
      <style:text-properties officeooo:rsid="04e3e915"/>
    </style:style>
    <style:style style:name="T375" style:family="text">
      <style:text-properties officeooo:rsid="04e5a6fa"/>
    </style:style>
    <style:style style:name="T376" style:family="text">
      <style:text-properties officeooo:rsid="04e6b101"/>
    </style:style>
    <style:style style:name="T377" style:family="text">
      <style:text-properties officeooo:rsid="04e71c21"/>
    </style:style>
    <style:style style:name="T378" style:family="text">
      <style:text-properties officeooo:rsid="04e73bec"/>
    </style:style>
    <style:style style:name="T379" style:family="text">
      <style:text-properties officeooo:rsid="04e9cf81"/>
    </style:style>
    <style:style style:name="T380" style:family="text">
      <style:text-properties officeooo:rsid="04ec7e6d"/>
    </style:style>
    <style:style style:name="T381" style:family="text">
      <style:text-properties officeooo:rsid="04eef12b"/>
    </style:style>
    <style:style style:name="T382" style:family="text">
      <style:text-properties officeooo:rsid="04efb0ce"/>
    </style:style>
    <style:style style:name="T383" style:family="text">
      <style:text-properties officeooo:rsid="04f2cbf4"/>
    </style:style>
    <style:style style:name="T384" style:family="text">
      <style:text-properties officeooo:rsid="04f4b735"/>
    </style:style>
    <style:style style:name="T385" style:family="text">
      <style:text-properties officeooo:rsid="04f7a2aa"/>
    </style:style>
    <style:style style:name="T386" style:family="text">
      <style:text-properties officeooo:rsid="04f860c9"/>
    </style:style>
    <style:style style:name="T387" style:family="text">
      <style:text-properties officeooo:rsid="04f983c9"/>
    </style:style>
    <style:style style:name="T388" style:family="text">
      <style:text-properties officeooo:rsid="04fa90ab"/>
    </style:style>
    <style:style style:name="T389" style:family="text">
      <style:text-properties officeooo:rsid="04fcde42"/>
    </style:style>
    <style:style style:name="T390" style:family="text">
      <style:text-properties officeooo:rsid="04fd8a2e"/>
    </style:style>
    <style:style style:name="T391" style:family="text">
      <style:text-properties officeooo:rsid="05005608"/>
    </style:style>
    <style:style style:name="T392" style:family="text">
      <style:text-properties officeooo:rsid="05014553"/>
    </style:style>
    <style:style style:name="T393" style:family="text">
      <style:text-properties officeooo:rsid="0501b407"/>
    </style:style>
    <style:style style:name="T394" style:family="text">
      <style:text-properties officeooo:rsid="05035be2"/>
    </style:style>
    <style:style style:name="T395" style:family="text">
      <style:text-properties officeooo:rsid="0504e319"/>
    </style:style>
    <style:style style:name="T396" style:family="text">
      <style:text-properties style:text-underline-style="solid" style:text-underline-width="auto" style:text-underline-color="font-color"/>
    </style:style>
    <style:style style:name="T397" style:family="text">
      <style:text-properties style:text-underline-style="solid" style:text-underline-width="auto" style:text-underline-color="font-color" officeooo:rsid="04f2cbf4"/>
    </style:style>
    <style:style style:name="T398" style:family="text">
      <style:text-properties style:text-underline-style="solid" style:text-underline-width="auto" style:text-underline-color="font-color" officeooo:rsid="06627599"/>
    </style:style>
    <style:style style:name="T399" style:family="text">
      <style:text-properties style:text-underline-style="solid" style:text-underline-width="auto" style:text-underline-color="font-color" officeooo:rsid="066362f2"/>
    </style:style>
    <style:style style:name="T400" style:family="text">
      <style:text-properties style:text-underline-style="solid" style:text-underline-width="auto" style:text-underline-color="font-color" officeooo:rsid="07407848"/>
    </style:style>
    <style:style style:name="T401" style:family="text">
      <style:text-properties officeooo:rsid="050721ea"/>
    </style:style>
    <style:style style:name="T402" style:family="text">
      <style:text-properties officeooo:rsid="0509b99c"/>
    </style:style>
    <style:style style:name="T403" style:family="text">
      <style:text-properties officeooo:rsid="0509ede1"/>
    </style:style>
    <style:style style:name="T404" style:family="text">
      <style:text-properties officeooo:rsid="050c5428"/>
    </style:style>
    <style:style style:name="T405" style:family="text">
      <style:text-properties officeooo:rsid="050d8117"/>
    </style:style>
    <style:style style:name="T406" style:family="text">
      <style:text-properties officeooo:rsid="050d8ab4"/>
    </style:style>
    <style:style style:name="T407" style:family="text">
      <style:text-properties officeooo:rsid="050f8534"/>
    </style:style>
    <style:style style:name="T408" style:family="text">
      <style:text-properties officeooo:rsid="05102b05"/>
    </style:style>
    <style:style style:name="T409" style:family="text">
      <style:text-properties officeooo:rsid="0510af92"/>
    </style:style>
    <style:style style:name="T410" style:family="text">
      <style:text-properties officeooo:rsid="0513d636"/>
    </style:style>
    <style:style style:name="T411" style:family="text">
      <style:text-properties officeooo:rsid="0514bc3e"/>
    </style:style>
    <style:style style:name="T412" style:family="text">
      <style:text-properties officeooo:rsid="0515ccc4"/>
    </style:style>
    <style:style style:name="T413" style:family="text">
      <style:text-properties officeooo:rsid="0519282d"/>
    </style:style>
    <style:style style:name="T414" style:family="text">
      <style:text-properties officeooo:rsid="051c5b0e"/>
    </style:style>
    <style:style style:name="T415" style:family="text">
      <style:text-properties officeooo:rsid="051e3a33"/>
    </style:style>
    <style:style style:name="T416" style:family="text">
      <style:text-properties officeooo:rsid="051f26b7"/>
    </style:style>
    <style:style style:name="T417" style:family="text">
      <style:text-properties officeooo:rsid="051f8d32"/>
    </style:style>
    <style:style style:name="T418" style:family="text">
      <style:text-properties officeooo:rsid="05304149"/>
    </style:style>
    <style:style style:name="T419" style:family="text">
      <style:text-properties officeooo:rsid="05328431"/>
    </style:style>
    <style:style style:name="T420" style:family="text">
      <style:text-properties officeooo:rsid="0532d877"/>
    </style:style>
    <style:style style:name="T421" style:family="text">
      <style:text-properties officeooo:rsid="05353d9c"/>
    </style:style>
    <style:style style:name="T422" style:family="text">
      <style:text-properties officeooo:rsid="053b28bc"/>
    </style:style>
    <style:style style:name="T423" style:family="text">
      <style:text-properties officeooo:rsid="053ba0f7"/>
    </style:style>
    <style:style style:name="T424" style:family="text">
      <style:text-properties officeooo:rsid="053ca6b2"/>
    </style:style>
    <style:style style:name="T425" style:family="text">
      <style:text-properties officeooo:rsid="054168bb"/>
    </style:style>
    <style:style style:name="T426" style:family="text">
      <style:text-properties officeooo:rsid="05433c1d"/>
    </style:style>
    <style:style style:name="T427" style:family="text">
      <style:text-properties officeooo:rsid="05442813"/>
    </style:style>
    <style:style style:name="T428" style:family="text">
      <style:text-properties officeooo:rsid="054cd2ae"/>
    </style:style>
    <style:style style:name="T429" style:family="text">
      <style:text-properties officeooo:rsid="05516136"/>
    </style:style>
    <style:style style:name="T430" style:family="text">
      <style:text-properties officeooo:rsid="0551d521"/>
    </style:style>
    <style:style style:name="T431" style:family="text">
      <style:text-properties officeooo:rsid="0552b5fe"/>
    </style:style>
    <style:style style:name="T432" style:family="text">
      <style:text-properties officeooo:rsid="0553f909"/>
    </style:style>
    <style:style style:name="T433" style:family="text">
      <style:text-properties officeooo:rsid="05569168"/>
    </style:style>
    <style:style style:name="T434" style:family="text">
      <style:text-properties officeooo:rsid="0556e9c0"/>
    </style:style>
    <style:style style:name="T435" style:family="text">
      <style:text-properties officeooo:rsid="0569e532"/>
    </style:style>
    <style:style style:name="T436" style:family="text">
      <style:text-properties officeooo:rsid="056b881e"/>
    </style:style>
    <style:style style:name="T437" style:family="text">
      <style:text-properties officeooo:rsid="056c8f7c"/>
    </style:style>
    <style:style style:name="T438" style:family="text">
      <style:text-properties officeooo:rsid="056db49c"/>
    </style:style>
    <style:style style:name="T439" style:family="text">
      <style:text-properties officeooo:rsid="056f6ece"/>
    </style:style>
    <style:style style:name="T440" style:family="text">
      <style:text-properties officeooo:rsid="0572c101"/>
    </style:style>
    <style:style style:name="T441" style:family="text">
      <style:text-properties officeooo:rsid="057cb8c0"/>
    </style:style>
    <style:style style:name="T442" style:family="text">
      <style:text-properties officeooo:rsid="057e5319"/>
    </style:style>
    <style:style style:name="T443" style:family="text">
      <style:text-properties officeooo:rsid="0580091b"/>
    </style:style>
    <style:style style:name="T444" style:family="text">
      <style:text-properties officeooo:rsid="05834e7c"/>
    </style:style>
    <style:style style:name="T445" style:family="text">
      <style:text-properties officeooo:rsid="05849a6e"/>
    </style:style>
    <style:style style:name="T446" style:family="text">
      <style:text-properties officeooo:rsid="05870ff9"/>
    </style:style>
    <style:style style:name="T447" style:family="text">
      <style:text-properties officeooo:rsid="058e0e53"/>
    </style:style>
    <style:style style:name="T448" style:family="text">
      <style:text-properties officeooo:rsid="058fa870"/>
    </style:style>
    <style:style style:name="T449" style:family="text">
      <style:text-properties officeooo:rsid="059c4215"/>
    </style:style>
    <style:style style:name="T450" style:family="text">
      <style:text-properties officeooo:rsid="05a1f4ea"/>
    </style:style>
    <style:style style:name="T451" style:family="text">
      <style:text-properties officeooo:rsid="05a46f06"/>
    </style:style>
    <style:style style:name="T452" style:family="text">
      <style:text-properties officeooo:rsid="05a498e6"/>
    </style:style>
    <style:style style:name="T453" style:family="text">
      <style:text-properties officeooo:rsid="05a65ca8"/>
    </style:style>
    <style:style style:name="T454" style:family="text">
      <style:text-properties officeooo:rsid="05a775c2"/>
    </style:style>
    <style:style style:name="T455" style:family="text">
      <style:text-properties officeooo:rsid="05a8fdca"/>
    </style:style>
    <style:style style:name="T456" style:family="text">
      <style:text-properties officeooo:rsid="05ae4b1c"/>
    </style:style>
    <style:style style:name="T457" style:family="text">
      <style:text-properties officeooo:rsid="05af2a55"/>
    </style:style>
    <style:style style:name="T458" style:family="text">
      <style:text-properties officeooo:rsid="05b2bcc6"/>
    </style:style>
    <style:style style:name="T459" style:family="text">
      <style:text-properties officeooo:rsid="05b40119"/>
    </style:style>
    <style:style style:name="T460" style:family="text">
      <style:text-properties officeooo:rsid="05b5aef2"/>
    </style:style>
    <style:style style:name="T461" style:family="text">
      <style:text-properties officeooo:rsid="05b81b80"/>
    </style:style>
    <style:style style:name="T462" style:family="text">
      <style:text-properties officeooo:rsid="05baa31b"/>
    </style:style>
    <style:style style:name="T463" style:family="text">
      <style:text-properties officeooo:rsid="05bb925a"/>
    </style:style>
    <style:style style:name="T464" style:family="text">
      <style:text-properties officeooo:rsid="05bc2971"/>
    </style:style>
    <style:style style:name="T465" style:family="text">
      <style:text-properties officeooo:rsid="05bd5e16"/>
    </style:style>
    <style:style style:name="T466" style:family="text">
      <style:text-properties officeooo:rsid="05bdfae7"/>
    </style:style>
    <style:style style:name="T467" style:family="text">
      <style:text-properties officeooo:rsid="05bf1d7f"/>
    </style:style>
    <style:style style:name="T468" style:family="text">
      <style:text-properties officeooo:rsid="05c0ac21"/>
    </style:style>
    <style:style style:name="T469" style:family="text">
      <style:text-properties officeooo:rsid="05c2a127"/>
    </style:style>
    <style:style style:name="T470" style:family="text">
      <style:text-properties officeooo:rsid="05d1b79f"/>
    </style:style>
    <style:style style:name="T471" style:family="text">
      <style:text-properties officeooo:rsid="05d3a9f0"/>
    </style:style>
    <style:style style:name="T472" style:family="text">
      <style:text-properties officeooo:rsid="05d600f5"/>
    </style:style>
    <style:style style:name="T473" style:family="text">
      <style:text-properties officeooo:rsid="05d7add2"/>
    </style:style>
    <style:style style:name="T474" style:family="text">
      <style:text-properties officeooo:rsid="05d9a1ad"/>
    </style:style>
    <style:style style:name="T475" style:family="text">
      <style:text-properties officeooo:rsid="05da22eb"/>
    </style:style>
    <style:style style:name="T476" style:family="text">
      <style:text-properties officeooo:rsid="05dacff8"/>
    </style:style>
    <style:style style:name="T477" style:family="text">
      <style:text-properties officeooo:rsid="05db109e"/>
    </style:style>
    <style:style style:name="T478" style:family="text">
      <style:text-properties officeooo:rsid="05e1d622"/>
    </style:style>
    <style:style style:name="T479" style:family="text">
      <style:text-properties officeooo:rsid="05e59667"/>
    </style:style>
    <style:style style:name="T480" style:family="text">
      <style:text-properties officeooo:rsid="05e5d0f8"/>
    </style:style>
    <style:style style:name="T481" style:family="text">
      <style:text-properties officeooo:rsid="05e92807"/>
    </style:style>
    <style:style style:name="T482" style:family="text">
      <style:text-properties officeooo:rsid="05ea316d"/>
    </style:style>
    <style:style style:name="T483" style:family="text">
      <style:text-properties officeooo:rsid="05ebb2b0"/>
    </style:style>
    <style:style style:name="T484" style:family="text">
      <style:text-properties officeooo:rsid="05ed09d7"/>
    </style:style>
    <style:style style:name="T485" style:family="text">
      <style:text-properties officeooo:rsid="05eecd1c"/>
    </style:style>
    <style:style style:name="T486" style:family="text">
      <style:text-properties officeooo:rsid="05f0368f"/>
    </style:style>
    <style:style style:name="T487" style:family="text">
      <style:text-properties officeooo:rsid="05f58e8a"/>
    </style:style>
    <style:style style:name="T488" style:family="text">
      <style:text-properties officeooo:rsid="05fc033e"/>
    </style:style>
    <style:style style:name="T489" style:family="text">
      <style:text-properties officeooo:rsid="05fdcb5f"/>
    </style:style>
    <style:style style:name="T490" style:family="text">
      <style:text-properties officeooo:rsid="0602c843"/>
    </style:style>
    <style:style style:name="T491" style:family="text">
      <style:text-properties officeooo:rsid="06037de8"/>
    </style:style>
    <style:style style:name="T492" style:family="text">
      <style:text-properties officeooo:rsid="06076491"/>
    </style:style>
    <style:style style:name="T493" style:family="text">
      <style:text-properties officeooo:rsid="0608ac97"/>
    </style:style>
    <style:style style:name="T494" style:family="text">
      <style:text-properties officeooo:rsid="060edb8a"/>
    </style:style>
    <style:style style:name="T495" style:family="text">
      <style:text-properties officeooo:rsid="060f83cf"/>
    </style:style>
    <style:style style:name="T496" style:family="text">
      <style:text-properties officeooo:rsid="061643a2"/>
    </style:style>
    <style:style style:name="T497" style:family="text">
      <style:text-properties officeooo:rsid="061afb56"/>
    </style:style>
    <style:style style:name="T498" style:family="text">
      <style:text-properties officeooo:rsid="061dc2e2"/>
    </style:style>
    <style:style style:name="T499" style:family="text">
      <style:text-properties officeooo:rsid="0620a167"/>
    </style:style>
    <style:style style:name="T500" style:family="text">
      <style:text-properties officeooo:rsid="06219d51"/>
    </style:style>
    <style:style style:name="T501" style:family="text">
      <style:text-properties officeooo:rsid="062726f5"/>
    </style:style>
    <style:style style:name="T502" style:family="text">
      <style:text-properties officeooo:rsid="0628fc53"/>
    </style:style>
    <style:style style:name="T503" style:family="text">
      <style:text-properties officeooo:rsid="062b247e"/>
    </style:style>
    <style:style style:name="T504" style:family="text">
      <style:text-properties officeooo:rsid="062b4f6c"/>
    </style:style>
    <style:style style:name="T505" style:family="text">
      <style:text-properties officeooo:rsid="0631454d"/>
    </style:style>
    <style:style style:name="T506" style:family="text">
      <style:text-properties officeooo:rsid="06355973"/>
    </style:style>
    <style:style style:name="T507" style:family="text">
      <style:text-properties officeooo:rsid="0638ea8a"/>
    </style:style>
    <style:style style:name="T508" style:family="text">
      <style:text-properties officeooo:rsid="063ad798"/>
    </style:style>
    <style:style style:name="T509" style:family="text">
      <style:text-properties officeooo:rsid="063e2dca"/>
    </style:style>
    <style:style style:name="T510" style:family="text">
      <style:text-properties officeooo:rsid="063fba5e"/>
    </style:style>
    <style:style style:name="T511" style:family="text">
      <style:text-properties officeooo:rsid="06402642"/>
    </style:style>
    <style:style style:name="T512" style:family="text">
      <style:text-properties officeooo:rsid="0640360a"/>
    </style:style>
    <style:style style:name="T513" style:family="text">
      <style:text-properties officeooo:rsid="0643dfed"/>
    </style:style>
    <style:style style:name="T514" style:family="text">
      <style:text-properties officeooo:rsid="06480e9a"/>
    </style:style>
    <style:style style:name="T515" style:family="text">
      <style:text-properties officeooo:rsid="06489b78"/>
    </style:style>
    <style:style style:name="T516" style:family="text">
      <style:text-properties officeooo:rsid="064a5d33"/>
    </style:style>
    <style:style style:name="T517" style:family="text">
      <style:text-properties officeooo:rsid="064d1439"/>
    </style:style>
    <style:style style:name="T518" style:family="text">
      <style:text-properties officeooo:rsid="064e085a"/>
    </style:style>
    <style:style style:name="T519" style:family="text">
      <style:text-properties officeooo:rsid="06562a98"/>
    </style:style>
    <style:style style:name="T520" style:family="text">
      <style:text-properties officeooo:rsid="06576d8a"/>
    </style:style>
    <style:style style:name="T521" style:family="text">
      <style:text-properties officeooo:rsid="065dd85e"/>
    </style:style>
    <style:style style:name="T522" style:family="text">
      <style:text-properties officeooo:rsid="0660f571"/>
    </style:style>
    <style:style style:name="T523" style:family="text">
      <style:text-properties officeooo:rsid="06627599"/>
    </style:style>
    <style:style style:name="T524" style:family="text">
      <style:text-properties officeooo:rsid="066362f2"/>
    </style:style>
    <style:style style:name="T525" style:family="text">
      <style:text-properties officeooo:rsid="066b2381"/>
    </style:style>
    <style:style style:name="T526" style:family="text">
      <style:text-properties officeooo:rsid="066bb09e"/>
    </style:style>
    <style:style style:name="T527" style:family="text">
      <style:text-properties officeooo:rsid="066c3482"/>
    </style:style>
    <style:style style:name="T528" style:family="text">
      <style:text-properties officeooo:rsid="066f0ccb"/>
    </style:style>
    <style:style style:name="T529" style:family="text">
      <style:text-properties officeooo:rsid="0670e481"/>
    </style:style>
    <style:style style:name="T530" style:family="text">
      <style:text-properties officeooo:rsid="067c7889"/>
    </style:style>
    <style:style style:name="T531" style:family="text">
      <style:text-properties officeooo:rsid="067d57fe"/>
    </style:style>
    <style:style style:name="T532" style:family="text">
      <style:text-properties officeooo:rsid="0681ff05"/>
    </style:style>
    <style:style style:name="T533" style:family="text">
      <style:text-properties officeooo:rsid="0683871e"/>
    </style:style>
    <style:style style:name="T534" style:family="text">
      <style:text-properties officeooo:rsid="0685004e"/>
    </style:style>
    <style:style style:name="T535" style:family="text">
      <style:text-properties officeooo:rsid="0687c064"/>
    </style:style>
    <style:style style:name="T536" style:family="text">
      <style:text-properties officeooo:rsid="0688eb6e"/>
    </style:style>
    <style:style style:name="T537" style:family="text">
      <style:text-properties officeooo:rsid="06896c39"/>
    </style:style>
    <style:style style:name="T538" style:family="text">
      <style:text-properties officeooo:rsid="068ff205"/>
    </style:style>
    <style:style style:name="T539" style:family="text">
      <style:text-properties officeooo:rsid="06900090"/>
    </style:style>
    <style:style style:name="T540" style:family="text">
      <style:text-properties officeooo:rsid="069a6c8e"/>
    </style:style>
    <style:style style:name="T541" style:family="text">
      <style:text-properties officeooo:rsid="069a77b3"/>
    </style:style>
    <style:style style:name="T542" style:family="text">
      <style:text-properties officeooo:rsid="069adccc"/>
    </style:style>
    <style:style style:name="T543" style:family="text">
      <style:text-properties officeooo:rsid="069ce82d"/>
    </style:style>
    <style:style style:name="T544" style:family="text">
      <style:text-properties officeooo:rsid="069df7ff"/>
    </style:style>
    <style:style style:name="T545" style:family="text">
      <style:text-properties officeooo:rsid="069e0119"/>
    </style:style>
    <style:style style:name="T546" style:family="text">
      <style:text-properties officeooo:rsid="069f2fc8"/>
    </style:style>
    <style:style style:name="T547" style:family="text">
      <style:text-properties officeooo:rsid="06a28dfe"/>
    </style:style>
    <style:style style:name="T548" style:family="text">
      <style:text-properties officeooo:rsid="06a477be"/>
    </style:style>
    <style:style style:name="T549" style:family="text">
      <style:text-properties officeooo:rsid="06a91a04"/>
    </style:style>
    <style:style style:name="T550" style:family="text">
      <style:text-properties officeooo:rsid="06aaf8c4"/>
    </style:style>
    <style:style style:name="T551" style:family="text">
      <style:text-properties officeooo:rsid="06abbc5b"/>
    </style:style>
    <style:style style:name="T552" style:family="text">
      <style:text-properties officeooo:rsid="06abf21b"/>
    </style:style>
    <style:style style:name="T553" style:family="text">
      <style:text-properties officeooo:rsid="06be6a64"/>
    </style:style>
    <style:style style:name="T554" style:family="text">
      <style:text-properties officeooo:rsid="06bed329"/>
    </style:style>
    <style:style style:name="T555" style:family="text">
      <style:text-properties officeooo:rsid="06c433c9"/>
    </style:style>
    <style:style style:name="T556" style:family="text">
      <style:text-properties officeooo:rsid="06c59111"/>
    </style:style>
    <style:style style:name="T557" style:family="text">
      <style:text-properties officeooo:rsid="06c5f344"/>
    </style:style>
    <style:style style:name="T558" style:family="text">
      <style:text-properties officeooo:rsid="06cc0c0a"/>
    </style:style>
    <style:style style:name="T559" style:family="text">
      <style:text-properties officeooo:rsid="06d0587f"/>
    </style:style>
    <style:style style:name="T560" style:family="text">
      <style:text-properties officeooo:rsid="06d43116"/>
    </style:style>
    <style:style style:name="T561" style:family="text">
      <style:text-properties officeooo:rsid="06d5f612"/>
    </style:style>
    <style:style style:name="T562" style:family="text">
      <style:text-properties officeooo:rsid="06d73e0c"/>
    </style:style>
    <style:style style:name="T563" style:family="text">
      <style:text-properties officeooo:rsid="06d876f8"/>
    </style:style>
    <style:style style:name="T564" style:family="text">
      <style:text-properties officeooo:rsid="06d91134"/>
    </style:style>
    <style:style style:name="T565" style:family="text">
      <style:text-properties officeooo:rsid="06ddd318"/>
    </style:style>
    <style:style style:name="T566" style:family="text">
      <style:text-properties officeooo:rsid="06de5034"/>
    </style:style>
    <style:style style:name="T567" style:family="text">
      <style:text-properties officeooo:rsid="06e1de84"/>
    </style:style>
    <style:style style:name="T568" style:family="text">
      <style:text-properties officeooo:rsid="06e37938"/>
    </style:style>
    <style:style style:name="T569" style:family="text">
      <style:text-properties officeooo:rsid="06e54f77"/>
    </style:style>
    <style:style style:name="T570" style:family="text">
      <style:text-properties officeooo:rsid="06e7fe39"/>
    </style:style>
    <style:style style:name="T571" style:family="text">
      <style:text-properties officeooo:rsid="06f98726"/>
    </style:style>
    <style:style style:name="T572" style:family="text">
      <style:text-properties officeooo:rsid="06fb249f"/>
    </style:style>
    <style:style style:name="T573" style:family="text">
      <style:text-properties officeooo:rsid="06fcc2cc"/>
    </style:style>
    <style:style style:name="T574" style:family="text">
      <style:text-properties officeooo:rsid="06fe067d"/>
    </style:style>
    <style:style style:name="T575" style:family="text">
      <style:text-properties officeooo:rsid="070e49f1"/>
    </style:style>
    <style:style style:name="T576" style:family="text">
      <style:text-properties officeooo:rsid="07103623"/>
    </style:style>
    <style:style style:name="T577" style:family="text">
      <style:text-properties officeooo:rsid="0712fc70"/>
    </style:style>
    <style:style style:name="T578" style:family="text">
      <style:text-properties officeooo:rsid="0716299f"/>
    </style:style>
    <style:style style:name="T579" style:family="text">
      <style:text-properties officeooo:rsid="0717f823"/>
    </style:style>
    <style:style style:name="T580" style:family="text">
      <style:text-properties officeooo:rsid="071a0ebd"/>
    </style:style>
    <style:style style:name="T581" style:family="text">
      <style:text-properties officeooo:rsid="071ed799"/>
    </style:style>
    <style:style style:name="T582" style:family="text">
      <style:text-properties officeooo:rsid="07238e87"/>
    </style:style>
    <style:style style:name="T583" style:family="text">
      <style:text-properties officeooo:rsid="0727fa8d"/>
    </style:style>
    <style:style style:name="T584" style:family="text">
      <style:text-properties officeooo:rsid="072934e8"/>
    </style:style>
    <style:style style:name="T585" style:family="text">
      <style:text-properties officeooo:rsid="072b4ec3"/>
    </style:style>
    <style:style style:name="T586" style:family="text">
      <style:text-properties officeooo:rsid="072c54f8"/>
    </style:style>
    <style:style style:name="T587" style:family="text">
      <style:text-properties officeooo:rsid="072f08fb"/>
    </style:style>
    <style:style style:name="T588" style:family="text">
      <style:text-properties officeooo:rsid="073ad677"/>
    </style:style>
    <style:style style:name="T589" style:family="text">
      <style:text-properties officeooo:rsid="073d8146"/>
    </style:style>
    <style:style style:name="T590" style:family="text">
      <style:text-properties officeooo:rsid="07407848"/>
    </style:style>
    <style:style style:name="T591" style:family="text">
      <style:text-properties officeooo:rsid="0741c55e"/>
    </style:style>
    <style:style style:name="T592" style:family="text">
      <style:text-properties officeooo:rsid="075a7b58"/>
    </style:style>
    <style:style style:name="T593" style:family="text">
      <style:text-properties officeooo:rsid="075ae26d"/>
    </style:style>
    <style:style style:name="T594" style:family="text">
      <style:text-properties officeooo:rsid="075ba10c"/>
    </style:style>
    <style:style style:name="T595" style:family="text">
      <style:text-properties officeooo:rsid="075d5dc5"/>
    </style:style>
    <style:style style:name="T596" style:family="text">
      <style:text-properties officeooo:rsid="07641aea"/>
    </style:style>
    <style:style style:name="T597" style:family="text">
      <style:text-properties officeooo:rsid="07692e03"/>
    </style:style>
    <style:style style:name="T598" style:family="text">
      <style:text-properties style:font-name="Liberation Serif" fo:font-size="12pt" fo:font-style="normal" fo:font-weight="normal" style:font-size-asian="12pt" style:font-style-asian="normal" style:font-weight-asian="normal"/>
    </style:style>
    <style:style style:name="T599" style:family="text">
      <style:text-properties style:font-name="Liberation Serif" fo:font-size="12pt" fo:font-style="normal" fo:font-weight="normal" officeooo:rsid="0405f667" style:font-size-asian="12pt" style:font-style-asian="normal" style:font-weight-asian="normal"/>
    </style:style>
    <style:style style:name="T600" style:family="text">
      <style:text-properties style:font-name="Liberation Serif" fo:font-size="12pt" fo:font-style="normal" fo:font-weight="normal" officeooo:rsid="07cc8025" style:font-size-asian="12pt" style:font-style-asian="normal" style:font-weight-asian="normal"/>
    </style:style>
    <style:style style:name="T601" style:family="text">
      <style:text-properties officeooo:rsid="05b21ca2"/>
    </style:style>
    <style:style style:name="T602" style:family="text">
      <style:text-properties officeooo:rsid="076a9675"/>
    </style:style>
    <style:style style:name="T603" style:family="text">
      <style:text-properties officeooo:rsid="076c4a28"/>
    </style:style>
    <style:style style:name="T604" style:family="text">
      <style:text-properties officeooo:rsid="076d907b"/>
    </style:style>
    <style:style style:name="T605" style:family="text">
      <style:text-properties officeooo:rsid="076f2918"/>
    </style:style>
    <style:style style:name="T606" style:family="text">
      <style:text-properties officeooo:rsid="077098d4"/>
    </style:style>
    <style:style style:name="T607" style:family="text">
      <style:text-properties officeooo:rsid="0770f347"/>
    </style:style>
    <style:style style:name="T608" style:family="text">
      <style:text-properties officeooo:rsid="077146b6"/>
    </style:style>
    <style:style style:name="T609" style:family="text">
      <style:text-properties officeooo:rsid="06685525"/>
    </style:style>
    <style:style style:name="T610" style:family="text">
      <style:text-properties officeooo:rsid="0772f435"/>
    </style:style>
    <style:style style:name="T611" style:family="text">
      <style:text-properties officeooo:rsid="07734b6a"/>
    </style:style>
    <style:style style:name="T612" style:family="text">
      <style:text-properties officeooo:rsid="07749589"/>
    </style:style>
    <style:style style:name="T613" style:family="text">
      <style:text-properties officeooo:rsid="0688f618"/>
    </style:style>
    <style:style style:name="T614" style:family="text">
      <style:text-properties officeooo:rsid="07756b9c"/>
    </style:style>
    <style:style style:name="T615" style:family="text">
      <style:text-properties officeooo:rsid="0776a119"/>
    </style:style>
    <style:style style:name="T616" style:family="text">
      <style:text-properties officeooo:rsid="069f9ded"/>
    </style:style>
    <style:style style:name="T617" style:family="text">
      <style:text-properties officeooo:rsid="0777c618"/>
    </style:style>
    <style:style style:name="T618" style:family="text">
      <style:text-properties officeooo:rsid="077852b2"/>
    </style:style>
    <style:style style:name="T619" style:family="text">
      <style:text-properties officeooo:rsid="077875c8"/>
    </style:style>
    <style:style style:name="T620" style:family="text">
      <style:text-properties officeooo:rsid="07795260"/>
    </style:style>
    <style:style style:name="T621" style:family="text">
      <style:text-properties officeooo:rsid="077b1b26"/>
    </style:style>
    <style:style style:name="T622" style:family="text">
      <style:text-properties officeooo:rsid="077b2ef7"/>
    </style:style>
    <style:style style:name="T623" style:family="text">
      <style:text-properties officeooo:rsid="077c8e61"/>
    </style:style>
    <style:style style:name="T624" style:family="text">
      <style:text-properties officeooo:rsid="03c781f3"/>
    </style:style>
    <style:style style:name="T625" style:family="text">
      <style:text-properties officeooo:rsid="077d90a6"/>
    </style:style>
    <style:style style:name="T626" style:family="text">
      <style:text-properties officeooo:rsid="077e8092"/>
    </style:style>
    <style:style style:name="T627" style:family="text">
      <style:text-properties officeooo:rsid="03c80312"/>
    </style:style>
    <style:style style:name="T628" style:family="text">
      <style:text-properties officeooo:rsid="078089d4"/>
    </style:style>
    <style:style style:name="T629" style:family="text">
      <style:text-properties officeooo:rsid="07826e1f"/>
    </style:style>
    <style:style style:name="T630" style:family="text">
      <style:text-properties officeooo:rsid="0783a426"/>
    </style:style>
    <style:style style:name="T631" style:family="text">
      <style:text-properties officeooo:rsid="0783ac3a"/>
    </style:style>
    <style:style style:name="T632" style:family="text">
      <style:text-properties officeooo:rsid="078895d0"/>
    </style:style>
    <style:style style:name="T633" style:family="text">
      <style:text-properties officeooo:rsid="0789ada4"/>
    </style:style>
    <style:style style:name="T634" style:family="text">
      <style:text-properties officeooo:rsid="078b42e7"/>
    </style:style>
    <style:style style:name="T635" style:family="text">
      <style:text-properties officeooo:rsid="078ce80b"/>
    </style:style>
    <style:style style:name="T636" style:family="text">
      <style:text-properties officeooo:rsid="078d71f3"/>
    </style:style>
    <style:style style:name="T637" style:family="text">
      <style:text-properties officeooo:rsid="078f13f0"/>
    </style:style>
    <style:style style:name="T638" style:family="text">
      <style:text-properties officeooo:rsid="07904ed7"/>
    </style:style>
    <style:style style:name="T639" style:family="text">
      <style:text-properties officeooo:rsid="07923153"/>
    </style:style>
    <style:style style:name="T640" style:family="text">
      <style:text-properties officeooo:rsid="07926c34"/>
    </style:style>
    <style:style style:name="T641" style:family="text">
      <style:text-properties officeooo:rsid="0793fd38"/>
    </style:style>
    <style:style style:name="T642" style:family="text">
      <style:text-properties officeooo:rsid="0795e640"/>
    </style:style>
    <style:style style:name="T643" style:family="text">
      <style:text-properties officeooo:rsid="07975c6c"/>
    </style:style>
    <style:style style:name="T644" style:family="text">
      <style:text-properties officeooo:rsid="0798cce0"/>
    </style:style>
    <style:style style:name="T645" style:family="text">
      <style:text-properties officeooo:rsid="07992d20"/>
    </style:style>
    <style:style style:name="T646" style:family="text">
      <style:text-properties officeooo:rsid="079a93ae"/>
    </style:style>
    <style:style style:name="T647" style:family="text">
      <style:text-properties officeooo:rsid="079b6a75"/>
    </style:style>
    <style:style style:name="T648" style:family="text">
      <style:text-properties officeooo:rsid="079bf116"/>
    </style:style>
    <style:style style:name="T649" style:family="text">
      <style:text-properties officeooo:rsid="079c824c"/>
    </style:style>
    <style:style style:name="T650" style:family="text">
      <style:text-properties officeooo:rsid="079cd47a"/>
    </style:style>
    <style:style style:name="T651" style:family="text">
      <style:text-properties officeooo:rsid="079e3fa3"/>
    </style:style>
    <style:style style:name="T652" style:family="text">
      <style:text-properties officeooo:rsid="079f4d35"/>
    </style:style>
    <style:style style:name="T653" style:family="text">
      <style:text-properties officeooo:rsid="07a102bf"/>
    </style:style>
    <style:style style:name="T654" style:family="text">
      <style:text-properties officeooo:rsid="07a1cedd"/>
    </style:style>
    <style:style style:name="T655" style:family="text">
      <style:text-properties officeooo:rsid="07a22dd0"/>
    </style:style>
    <style:style style:name="T656" style:family="text">
      <style:text-properties officeooo:rsid="07a3bd71"/>
    </style:style>
    <style:style style:name="T657" style:family="text">
      <style:text-properties officeooo:rsid="07a45000"/>
    </style:style>
    <style:style style:name="T658" style:family="text">
      <style:text-properties officeooo:rsid="07a45c52"/>
    </style:style>
    <style:style style:name="T659" style:family="text">
      <style:text-properties officeooo:rsid="07a5e0bc"/>
    </style:style>
    <style:style style:name="T660" style:family="text">
      <style:text-properties officeooo:rsid="07a7911e"/>
    </style:style>
    <style:style style:name="T661" style:family="text">
      <style:text-properties officeooo:rsid="07a96cc4"/>
    </style:style>
    <style:style style:name="T662" style:family="text">
      <style:text-properties officeooo:rsid="07ab474e"/>
    </style:style>
    <style:style style:name="T663" style:family="text">
      <style:text-properties officeooo:rsid="07acd5db"/>
    </style:style>
    <style:style style:name="T664" style:family="text">
      <style:text-properties officeooo:rsid="07adc7fb"/>
    </style:style>
    <style:style style:name="T665" style:family="text">
      <style:text-properties officeooo:rsid="01d284ca"/>
    </style:style>
    <style:style style:name="T666" style:family="text">
      <style:text-properties officeooo:rsid="07af0c53"/>
    </style:style>
    <style:style style:name="T667" style:family="text">
      <style:text-properties officeooo:rsid="07af4cc0"/>
    </style:style>
    <style:style style:name="T668" style:family="text">
      <style:text-properties officeooo:rsid="07b1078e"/>
    </style:style>
    <style:style style:name="T669" style:family="text">
      <style:text-properties officeooo:rsid="07b1303a"/>
    </style:style>
    <style:style style:name="T670" style:family="text">
      <style:text-properties officeooo:rsid="07b29552"/>
    </style:style>
    <style:style style:name="T671" style:family="text">
      <style:text-properties officeooo:rsid="07b31123"/>
    </style:style>
    <style:style style:name="T672" style:family="text">
      <style:text-properties officeooo:rsid="07b4d488"/>
    </style:style>
    <style:style style:name="T673" style:family="text">
      <style:text-properties officeooo:rsid="07b52936"/>
    </style:style>
    <style:style style:name="T674" style:family="text">
      <style:text-properties officeooo:rsid="07b874b4"/>
    </style:style>
    <style:style style:name="T675" style:family="text">
      <style:text-properties officeooo:rsid="07b9f524"/>
    </style:style>
    <style:style style:name="T676" style:family="text">
      <style:text-properties officeooo:rsid="07bad3e4"/>
    </style:style>
    <style:style style:name="T677" style:family="text">
      <style:text-properties officeooo:rsid="07bb004d"/>
    </style:style>
    <style:style style:name="T678" style:family="text">
      <style:text-properties officeooo:rsid="07bba123"/>
    </style:style>
    <style:style style:name="T679" style:family="text">
      <style:text-properties officeooo:rsid="02434a34"/>
    </style:style>
    <style:style style:name="T680" style:family="text">
      <style:text-properties officeooo:rsid="07bd1b20"/>
    </style:style>
    <style:style style:name="T681" style:family="text">
      <style:text-properties officeooo:rsid="07bd729c"/>
    </style:style>
    <style:style style:name="T682" style:family="text">
      <style:text-properties officeooo:rsid="07bf342a"/>
    </style:style>
    <style:style style:name="T683" style:family="text">
      <style:text-properties officeooo:rsid="07c0f418"/>
    </style:style>
    <style:style style:name="T684" style:family="text">
      <style:text-properties officeooo:rsid="07c5a307"/>
    </style:style>
    <style:style style:name="T685" style:family="text">
      <style:text-properties officeooo:rsid="07c77547"/>
    </style:style>
    <style:style style:name="T686" style:family="text">
      <style:text-properties officeooo:rsid="07c83788"/>
    </style:style>
    <style:style style:name="T687" style:family="text">
      <style:text-properties officeooo:rsid="07c8825d"/>
    </style:style>
    <style:style style:name="T688" style:family="text">
      <style:text-properties officeooo:rsid="07c9df82"/>
    </style:style>
    <style:style style:name="T689" style:family="text">
      <style:text-properties officeooo:rsid="05a0789c"/>
    </style:style>
    <style:style style:name="T690" style:family="text">
      <style:text-properties officeooo:rsid="07cda4ae"/>
    </style:style>
    <style:style style:name="T691" style:family="text">
      <style:text-properties officeooo:rsid="07ce2404"/>
    </style:style>
    <style:style style:name="T692" style:family="text">
      <style:text-properties officeooo:rsid="07ced67f"/>
    </style:style>
    <style:style style:name="T693" style:family="text">
      <style:text-properties officeooo:rsid="07cf4b49"/>
    </style:style>
    <style:style style:name="T694" style:family="text">
      <style:text-properties officeooo:rsid="07d61060"/>
    </style:style>
    <style:style style:name="T695" style:family="text">
      <style:text-properties officeooo:rsid="07d6e307"/>
    </style:style>
    <style:style style:name="T696" style:family="text">
      <style:text-properties officeooo:rsid="07db2f1a"/>
    </style:style>
    <style:style style:name="T697" style:family="text">
      <style:text-properties officeooo:rsid="07db5f13"/>
    </style:style>
    <style:style style:name="T698" style:family="text">
      <style:text-properties officeooo:rsid="07dbd002"/>
    </style:style>
    <style:style style:name="T699" style:family="text">
      <style:text-properties officeooo:rsid="07dcb5c5"/>
    </style:style>
    <style:style style:name="T700" style:family="text">
      <style:text-properties officeooo:rsid="07deb040"/>
    </style:style>
    <style:style style:name="T701" style:family="text">
      <style:text-properties officeooo:rsid="07df1775"/>
    </style:style>
    <style:style style:name="T702" style:family="text">
      <style:text-properties officeooo:rsid="07e0df46"/>
    </style:style>
    <style:style style:name="T703" style:family="text">
      <style:text-properties officeooo:rsid="07e1731f"/>
    </style:style>
    <style:style style:name="T704" style:family="text">
      <style:text-properties officeooo:rsid="07e2860b"/>
    </style:style>
    <style:style style:name="T705" style:family="text">
      <style:text-properties officeooo:rsid="07e3cde9"/>
    </style:style>
    <style:style style:name="T706" style:family="text">
      <style:text-properties officeooo:rsid="07e468fd"/>
    </style:style>
    <style:style style:name="T707" style:family="text">
      <style:text-properties officeooo:rsid="07e51fa0"/>
    </style:style>
    <style:style style:name="T708" style:family="text">
      <style:text-properties officeooo:rsid="07e6f76c"/>
    </style:style>
    <style:style style:name="T70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a" fo:country="V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dulla <text:span text:style-name="T166">D</text:span>yalectices</text:p>
      <text:p text:style-name="Text_20_body"/>
      <text:p text:style-name="Subtitle">Pardus, Hieronymus</text:p>
      <text:p text:style-name="Text_20_body">Paris, 1505</text:p>
      <text:p text:style-name="Text_20_body">München, Bayerische Staatsbibliothek -- 2 Ph.sp. 35</text:p>
      <text:p text:style-name="P568">Medulla <text:span text:style-name="T438">D</text:span>ialectices edita a perspicacissimo artium praeceptor Hieronymo Pardo. Ferme graviores difficultates logicas acutissimae dissolvens, omnibus dialectice studiosis plurimum accommoda, de novo correcta et emendata cum tabula notabilium et propositionum disputatarum iuxta materiam et ordinem foliorum et capitulorum, per honorandos magistros: magistrum Iohannem Maioris in Sacra Theologia baccalarium, necnon per acutissimi ingenii virum magistrum Iacobum Ortiz, quia postremo ipsam cum augmento castigavit eique tabulam supradictam apposuit.<draw:frame draw:style-name="fr1" draw:name="Image1" text:anchor-type="char" svg:x="0.3508in" svg:y="1.4134in" svg:width="6.1126in" svg:height="8.8701in" draw:z-index="0"><draw:image xlink:href="Pictures/10000000000005B70000084BEFD195DD.jpg" xlink:type="simple" xlink:show="embed" xlink:actuate="onLoad" draw:mime-type="image/jpeg"/></draw:frame></text:p>
      <text:p text:style-name="P567">Iacobus Ortiz illustri viro domino Petro de Meneses, magistro subtilissimo. S<text:span text:style-name="T441">alutem dicit plurimam.</text:span></text:p>
      <text:p text:style-name="P365">Non possem verbis consequi vir inclite quanto ardore, quantoque desiderio saepius affectaverim ut qualicumque officio me, iamdudum tibi amicum, aliquando ad inserviendum <text:span text:style-name="T435">promptissimum esse cognosceres. Cum enim mecum tacitus considero aut potius admiror egregias animi tui dotes, non parvum mihi videtur inter eius amicos iamiam numerari, qui nedum est sanguinis nobilitate, clarissimus verum doctrina et ingenuitate morum ac omni virtutis genere ornatissimus.</text:span></text:p>
      <text:p text:style-name="Text_20_body">Liceat mihi vera referre si mihi data foret facundia laudem tuae domus (quae sicut tuorum maiorum rei militaris scientia, virtute animi, et sua in regendis adversus <text:span text:style-name="T436">Sarracenos aliasque nationes exercitibus auctoritate ac felicitate gestorum, semper claruit). Sic tua sapientia et optimarum litterarum peritia, conservatam, immo, verius adauctam demonstrare conarer. Quo sit ut tu progenies non tamtum armis decorata, sed bonis adornata litteris, in perpetua gloria vivet.</text:span></text:p>
      <text:p text:style-name="Text_20_body">Sed ut ingenue profitear quaedam eloquentissimum oratorem deposcunt haec omnia. Parva tamen istis diebus mihi se obtulit occasio per quam ex re etiam minima meum erga te, animum perpendere possis. <text:span text:style-name="T437">Cum enim magister Durandus Gerlier, huius universitatis bibliopola iuratus et publice utilitatis, studiosissimus quendam magistrum in dialecticis famatissimum rogasset ut, illius Hieronymi Pardo quondam regentis mei occultarum veritatum indagatoris profundissimi, editionem quam Dialectices Medullam dicunt, emendaret. <text:s/></text:span></text:p>
      <text:p text:style-name="P272">Isque emendator pro viribus manum supremam imposuisset, forte tamen aut errorum multitudine taediosa, aut aliis causis impeditus. Non plene in omnibus correctam reliquit huius rei admonitus dictus magister Durandus, me obnixe rogavit ut eam diligentius secundum ipsius authoris phantasiam (quam tum consuetudine tum multis collocutionibus inter me et dictum authorem dum vivere, habitis cognoveram) plenius emendarem. Cuius precibus et propter amicitiam quae mihi fuit intima cum dicto Hieronymo et potissimum ut meum tibi dedicarem laborem, hanc <text:span text:style-name="T439">d</text:span>ialectices <text:span text:style-name="T439">medullam, aliquando tardius cum eius aliquantula pars impressioni fuisset demandata, adhuc tamen opportune emendandam, assumpsi.</text:span></text:p>
      <text:p text:style-name="P273">In ea autem emendatione mihi necesse fuit cum multa ex primo exemplari, quod solum apud me erat, addere tum non pauca quae transmutationem et correctionem desiderabant ex mente authoris immutare. Haec igitur secunda erit priori impressioni fidelior, cui tabulam contentorum declarativam et rerum universarum iudicem addidimus.</text:p>
      <text:p text:style-name="P273">Hanc itaque operam quamtulacumque sit tuo nomini dedicandam curavimus. Non quod intendam te ad studium logices cohortari, quippe qui noverim quantus <text:span text:style-name="T440">qualisque in logicalibus existas et quod eam artem perfectissime calleas, tamen fortasse studiorum voluptate aliquando, recreationis causa, in ea te exercebis. Et ut confido eorum qui, ingenii ruditate eius, argutias intelligere nequeunt, reprimes audaciam.</text:span></text:p>
      <text:p text:style-name="P274">Hic enim, ut cernere licet, plerumque contemptu scientiae tam utilis et ad caeterarum scientiarum apicem, <text:span text:style-name="T442">conscendere volentibus tam necessarie in tanta prorumpunt <text:s/>convicia, ut merito talium sit arguenda temeritas.</text:span></text:p>
      <text:p text:style-name="P275">Eorum tamen insipientiam non multum admiror, satis enim vulgatum est proverbium illud: “Scientia, praeter ignorantem, inimicum habet neminem.”</text:p>
      <text:p text:style-name="P275">Sed haec satis.</text:p>
      <text:p text:style-name="P275"><text:soft-page-break/>Vale et me ut soles ama.</text:p>
      <text:p text:style-name="P275">Ex regali Collegio Navarrae, pridie Idus Decembres, anno domini M.ccccv.</text:p>
      <text:p text:style-name="P275"/>
      <text:p text:style-name="P275">Nicolai Chappusot Bis<text:span text:style-name="T443">u</text:span>ntici Rubei monte<text:span text:style-name="T443">n</text:span>sis ad huiusce operis lectorem epigramma.</text:p>
      <text:p text:style-name="P277">Optima priscorum et aetas celebranda virorum</text:p>
      <text:p text:style-name="P276"><text:tab/><text:span text:style-name="T443">Et merita semper laude ferenda venit.</text:span> </text:p>
      <text:p text:style-name="P277">Sedula namque suis prodesse laboribus optans</text:p>
      <text:p text:style-name="P277"><text:tab/>Traxit ab ingenio postera secla rudi. </text:p>
      <text:p text:style-name="P277">Caecus amor rerum hanc nullis innexuit hamis</text:p>
      <text:p text:style-name="P277"><text:tab/>fortia nec potuit vincere corda labor.</text:p>
      <text:p text:style-name="P278">Quos etenim terrena lues stimulantius urget</text:p>
      <text:p text:style-name="P278"><text:tab/>Praemia nullius laudis habere queunt.</text:p>
      <text:p text:style-name="P278">Horum igitur vacue pulsa caligine mentes</text:p>
      <text:p text:style-name="P278"><text:tab/>Summam operam ingenuis artibus usque dabant.</text:p>
      <text:p text:style-name="P279">Quarum inter logice commer<text:span text:style-name="T444">c</text:span>ia clara renidet.</text:p>
      <text:p text:style-name="P279"><text:tab/><text:span text:style-name="T445">Quae tenero cast</text:span><text:span text:style-name="T446">e</text:span><text:span text:style-name="T445"> Palladis orta sinu est.</text:span></text:p>
      <text:p text:style-name="P280">Haec animos scabra rubigine purgat adesos</text:p>
      <text:p text:style-name="P280"><text:tab/>Squalens ut ferrum vomeris aspra silex.</text:p>
      <text:p text:style-name="P280">Pervius ad reliquas patet hac incessus ad artes</text:p>
      <text:p text:style-name="P280"><text:tab/>Ducit et ad rectam per vada tuta viam.</text:p>
      <text:p text:style-name="P281">Cuius inaudita hic codex rata dogmata pandit</text:p>
      <text:p text:style-name="P281"><text:tab/>Dogmata quae nullis nota fuere viris.</text:p>
      <text:p text:style-name="P282">Nam quae rimari sollerti indagine possunt</text:p>
      <text:p text:style-name="P282"><text:tab/>Hoc opus (et si fas dicere plura) tenet.</text:p>
      <text:p text:style-name="P283">Chrysippi superat centena volumina docti</text:p>
      <text:p text:style-name="P283"><text:tab/>Et quaecumque suo tempore scripta fuerunt.</text:p>
      <text:p text:style-name="P283">Callida si logices te oblectamenta morentur</text:p>
      <text:p text:style-name="P283"><text:tab/>Huc properes celeri culta iuventa gradu.</text:p>
      <text:p text:style-name="P284">Atque Hieronymo tanto pro munere grates</text:p>
      <text:p text:style-name="P284"><text:tab/>Candide mansueto pectore lector habe.</text:p>
      <text:p text:style-name="P277"/>
      <text:h text:style-name="P569" text:outline-level="1">Capitulum primum: <text:span text:style-name="T696">D</text:span>e <text:span text:style-name="T700">V</text:span>eritate <text:span text:style-name="T708">e</text:span>t <text:span text:style-name="T700">F</text:span>alsitate</text:h>
      <text:p text:style-name="P366">[i.ra 22a]</text:p>
      <text:p text:style-name="P363">Apud Platonem entheate scripto relictum est: “Non est divinius aliquid de quo homo consulere queat”, quam de eruditione fuit atque suorum”. Quocirca <text:span text:style-name="T447">creberrimis studiosorum quorundam adolescentium cohortationibus iamdudum adductis, nonnulla quae mihi ad eorum utilitatem visa sunt accommoda, pro exigua virium mearum facultate componere institui. </text:span><text:span text:style-name="T448">Ut autem ipsorum in dialectica augeatur studium. Exponibilium materiam quae amplum requirit tractatum posthac scripturus, difficilem philosophiam quae de intensione dicitur Deo auspice eidem annectam.</text:span></text:p>
      <text:p text:style-name="P285"><office:annotation office:name="__Annotation__4234_1596087392" loext:resolved="false"><dc:creator>Unknown Author</dc:creator><dc:date>2021-09-27T23:43:16.795740943</dc:date><text:p text:style-name="P577"><text:span text:style-name="T709">Logici consideratio circa verum et falsum versatur, quippe, quid propositio vera.</text:span></text:p></office:annotation>Et quoniam logici consideratio circa verum et falsum versatur, in hoc primo capitulo conveniens est declarare quid propositio vera, quid falsa, quid necessaria, quid contingens, quid possibilis et quid impossibilis.<office:annotation-end office:name="__Annotation__4234_1596087392"/></text:p>
      <text:p text:style-name="P286">Pro cuius ostensione sciendum est quod omnes nituntur ostendere veritatem et falsitatem, similiter necessitatem et contingentiam, possibilitatem et impossibilitatem propositionum ex parte significati propositionis, quod vocatur complexe significabile. Ideo primo illucidandum est quid est <office:annotation office:name="__Annotation__4850_1596087392" loext:resolved="false"><dc:creator>Unknown Author</dc:creator><dc:date>2021-09-27T23:50:24.763779138</dc:date><text:p text:style-name="P577"><text:span text:style-name="T709">Complexe significabile est significatum propositionis.</text:span></text:p></office:annotation>complexe significabile seu significatum propositionis<office:annotation-end office:name="__Annotation__4850_1596087392"/>.</text:p>
      <text:h text:style-name="Heading_20_3" text:outline-level="3">Utrum complexe significabile distinguatur a significatis extremorum nec ne</text:h>
      <text:p text:style-name="P287">Et solet quaeri quaestio sub hic verbis an complexe significabile distinguatur a significatis extremorum, <text:span text:style-name="T449">ut ista propositio: “homo est animal”, a significatis extremorum. Ut ista propositio: “homo est animal”, significat ‘hominem esse animal’. Dubium est utrum ‘hominem esse animal’ significat sit ipse homo existens animal, an ab illis distinctum.</text:span></text:p>
      <text:p text:style-name="P288">Unde una conclusio est certa in hac materia, quod complexe significabile non est aliqua compositio terminorum.</text:p>
      <text:p text:style-name="P288">Si enim ‘hominem esse lapidem’ esset aliqua compositio terminorum, sicut ego possem facere istam compositionem terminorum, <text:s/>possem facere ‘hominem esse lapidem’, quod est falsum.</text:p>
      <text:p text:style-name="P288">Ad istam quaestionem est duplex modus respondendi famosus pro primo modo dicendi ponuntur tres conclusiones:</text:p>
      <text:p text:style-name="P367">&lt;Gregorius de Arimino&gt; <text:span text:style-name="T689">Prima conclusio: complexe significabile seu significatum adaequatum propositionis non est aliquis existens ut ista propositio: “homo est animal”, significat ‘hominem esse animal”. </text:span><office:annotation office:name="__Annotation__3583_1356493008" loext:resolved="false"><dc:creator>Unknown Author</dc:creator><dc:date>2021-09-28T21:20:05.867522306</dc:date><text:p text:style-name="P577"><text:span text:style-name="T709">Complexe significabile non est aliquid existens.</text:span></text:p></office:annotation><text:span text:style-name="T689">‘</text:span><text:span text:style-name="T450">Hominem esse animal’ non est aliquid existens</text:span><office:annotation-end office:name="__Annotation__3583_1356493008"/><text:span text:style-name="T450">, similiter dicatur de aliis complexe significabilibus.</text:span></text:p>
      <text:p text:style-name="P289">Et si quaeras utrum possit concedi quod complexe significabilia sint aliquid, respondet haec opinio quod aliquid est et res tripliciter possunt capi:</text:p>
      <text:p text:style-name="P290">Uno modo large, pro omni complexe significabili, sive sit verum sive falsum. <text:span text:style-name="T456">E</text:span>t hoc modo capit Philosophus in Postpraedicamentis cum dicit ab eo quod res est vel non est, oratio vera vel falsa dicitur. Id est, ab eo quod complexe significabile dicitur verum vel falsum, oratio ver<text:span text:style-name="T456">a</text:span> vel falsa dicitur. Sed qualiter propositio dicatur vera vel falsa a complexe significabili postea dicetur. In quo dicto satis patet Aristotelem cepisse rem pro complexe significabile.</text:p>
      <text:p text:style-name="P290"><text:soft-page-break/>Alio modo <text:span text:style-name="T451">ca</text:span><text:span text:style-name="T452">pitur res magis stricte pro complexe significabili vero. </text:span><text:span text:style-name="T453">E</text:span><text:span text:style-name="T452">t hoc modo capit Aristoteles in primo Posteriorum cum dicit quod non est ens non scitur. Vult enim habere quod scientia non habetur de complexe significabili falso, sed solum de complexe significabili vero.</text:span></text:p>
      <text:p text:style-name="P462">Tertio modo capiuntur isti termini: res, ens, aliquid. Strictissime <text:span text:style-name="T454">ut significant aliquam entitatem existentem in rerum natura. </text:span><text:span text:style-name="T455">H</text:span><text:span text:style-name="T454">oc </text:span><text:span text:style-name="T455">modo ens dividitur in substantiam et accidens in creatorem et creaturam. Ita quod nihil est substantia vel accidens, creator vel creatura, nisi sit ens.</text:span></text:p>
      <text:p text:style-name="P462"/>
      <text:p text:style-name="P552">Tertio modo, id est, non sunt aliquid existens, non sunt creator neque creatura, substantia aut accidens. Ita quod si quis quaerat an Deum esse sit Deus, dico quod non est Deus neque creatura, substantia aut accidens, quia solummodo ens tertio modo est substantia vel accidens, Deus vel creatura.</text:p>
      <text:p text:style-name="P544">[i.rb 22b]</text:p>
      <text:p text:style-name="P291">Et si dicas absurdum est dicere quod aliquid est, quod non est Deus neque creatura; ergo complexe significabilia sunt Deus vel creatura, responderet quod inconveniens est quod sit aliquid tertio modo et quod non sit creator neque creatura. Sed non est inconveniens quod aliquid primo vel secundo modo non sit creator neque creatura.</text:p>
      <text:p text:style-name="P292">Quapropter si argueretur: ista propositio: “‘hominem esse animal’, est aliquid”, est una affirmativa cuius subiectum pro nullo supponit; ergo est falsa.</text:p>
      <text:p text:style-name="P292">Respondetur distinguendo antecedens: aut pro nullo supponat, ut ly ‘nullo’ includit ens tertio modo, et sic conceditur. Aut ut includit ens primo vel secundo modo et sic negatur.</text:p>
      <text:p text:style-name="P292">Dico enim quod <text:span text:style-name="T457">sufficit quod subiectum supponat pro aliquo, capiendo aliquid primo, secundo modo, sive tertio modo.</text:span></text:p>
      <text:p text:style-name="P293">Ex isto modo declarandi infertur quod nullae propositiones habent idem significatum, et quod omnes propositiones non sunt aliud quam unus terminus simplex. Idem enim et diversum non proprie attribuitur nisi rei existente. Ideo complexe significabile non et aliud nec idem cum non sit existens.</text:p>
      <text:p text:style-name="P293">Verum multoties doctores utuntur his vocabilis: aliquid, aliud, diversum. Attribuendo non existenti. Nam, inquit Anselmus, multa dicuntur aliquid secundum formam loquendi, quae non sunt aliquid quoniam sic loquimur de eis sicut de rebus exsistentibus. Hoc satis explanat doctor cuius est iste modus dicendi.</text:p>
      <text:p text:style-name="P295">Concedit praeterea doctor iste, quod omnia peccata actualia sunt complexe significabilia. Similiter omnia merita, et si alicubi reperiatur, dilectio Dei est meritum, odium Dei est peccatum, non sunt intelligendae illae propositiones quod illa qualitas existens in anima sit meritum vel peccatum, cum illa effective a Deo producatur.</text:p>
      <text:p text:style-name="P295">Sed Sortem diligere Deum est meritum, et Sortem odire Deum est peccatum. Iuxta illud Iohannis primo. Sine ipso factum est nihil, id est, peccatum quod non est aliqua entitas nec tamen Petrum odire Deum semper fuit peccatum. Sed quando fuit complexe significabile verum.</text:p>
      <text:p text:style-name="P368"><text:soft-page-break/><text:span text:style-name="T601">Contra istam primam conclusionem arguit primo unus doctor </text:span><text:span text:style-name="T597">&lt;</text:span><text:span text:style-name="T598">Andreas </text:span>de Novo Castro<text:span text:style-name="T597">&gt;</text:span><text:span text:style-name="T601">: accepto hoc complexe significabile ‘Deum esse’, quaero an includat formaliter ‘Deum’ aut non. Sed sunt omnino disparata si secundum sequeretur quod aliquis posset intelligere ‘Deum esse’, qui tamen non intelligeret ‘Deum’ , quod est manifeste falsum. Si primum habetur intentum non enim videtur imaginabile aliquid formaliter includere entitatem quin ipsum sit ens.</text:span></text:p>
      <text:p text:style-name="P294">Et confirmatur: <text:span text:style-name="T458">omne illud quod componitur ex aliquibus existentibus </text:span><text:span text:style-name="T459">est aliquid existens, sed complexe significabile componitur ex aliquibus existentibus; igitur complexe significabile est aliquid existens. </text:span><text:span text:style-name="T460">Maior est nota, et minor probatur, quia capio illud complexe significabile ‘hominem esse animal’. Illud complexe significabile componitur ex homine et animali.</text:span></text:p>
      <text:p text:style-name="P296">Pro huius argumenti dissolutione quod opinionem directe impugnat, inquirendum est an illa res quae est homo importetur per ly ‘hominem’, quod si ita est, mirum est quomodo ex illa resultat unum nihil. Scilicet, complexe significabile.</text:p>
      <text:p text:style-name="P296">Respondeo: occulta significatio illius infinitivi ‘esse’ fuit in hanc diversitatem occasio deveniendi, quod enim significatur per ly ‘hominem’ aliquid est. Similiter quod significatur per ly ‘animal’ <text:span text:style-name="T461">aliquid; ergo non existentiam ex parte de ly ‘esse’ coacti ponunt provenire. Quae autem sit significatio de ly ‘est’ postea ostendetur.</text:span></text:p>
      <text:p text:style-name="P297">Istam ergo entitatem fingendo diceretur quod ‘hominem esse animal’ suo modo est una entitas. Sicut aliqua res existens, et quodammodo se habet ad hominem et animal, sicut totum ad partes.</text:p>
      <text:h text:style-name="Heading_20_3" text:outline-level="3">Illa res quae est ‘homo’ est unum incomplexe significabile</text:h>
      <text:p text:style-name="P299">Posset etiam probabiliter dici quod illa res quae est ‘homo’ ut est unum complexe significabile, id est, ut cognita quodammodo potest dici pars illius, et ipsa non habet existentiam ut sic cognita. Quod est dicere quod dato quod non existere, esset incomplexe significabilis, et <text:span text:style-name="T462">pars suo modo complexe significabilis. Et ita assimilaretur illis secundis intentionibus, quas ponit Doctor Subtilis, fundari in re, secundum esse cognitum, et non secundum esse reale.</text:span></text:p>
      <text:p text:style-name="P369"><text:span text:style-name="T602">[</text:span><text:span text:style-name="T598">i.va </text:span><text:s/><text:span text:style-name="T598">23a</text:span><text:span text:style-name="T602">]</text:span></text:p>
      <text:p text:style-name="P298"><text:span text:style-name="T462">Et consequenter diceretur quod sicut iste doctor vocat complexe significabilia entia large, ita incomplexe significabile ut ‘Antichristus’ est ens, large capiendo ‘ens’, ut se extendit ad incomplexe significabile. Nec tamen omnino simile est de complexe significabile et incomplexe significabili, quia illam entitatem, quae de facto est complexe significabile, non es possibile existere in rerum natura, </text:span><text:span text:style-name="T465">b</text:span><text:span text:style-name="T462">ene, autem, </text:span><text:span text:style-name="T463">illam quae est incomplexe </text:span><text:span text:style-name="T464">significabile; ideo difficile est sustinere talia figmenta.</text:span></text:p>
      <text:p text:style-name="P300">Et si quis arguat omen illud quod percipitur a sensu exteriori est aliquid existens, ista propositio a communioribus et verioribus philosophis concessa est. Sed <text:span text:style-name="T466">illa entitas quae est complexe significabile percipitur a senus exteriori. Patet ex eo <text:s/>quod visus percipit ‘albedinem esse’ quae est significatum istius: “albedo est”.</text:span></text:p>
      <text:p text:style-name="P301"><text:span text:style-name="T467">Respondeo: visus non percipit illud complexe significabile, nisi forsitan tenetur quod sensus exterior potest habere notitias propositionales. </text:span><text:span text:style-name="T468">Si ergo concedatur quod percipit ‘albedinem esse’, hoc est verum in isto sensu, id est, percipit albedinem esse, quae de facto est.</text:span></text:p>
      <text:p text:style-name="P302"><text:span text:style-name="T469">Phantasia tamen potest illud percipere tenendo communiorem opinionem. Illa enim potest esse non existens. Per hoc ad argumentum dicendum est enim quod non potest quispiam intelligere ‘Deum </text:span><text:soft-page-break/><text:span text:style-name="T469">esse’ quin intelligat Deum. Saltem sub ratione incomplexe significabilis, quia </text:span><text:span text:style-name="T470">includit</text:span><text:span text:style-name="T469"> illud quasi partem.</text:span></text:p>
      <text:p text:style-name="P304">Secundo arguitur contra conclusionem et gratia exempli capio istam propositionem: </text:p>
      <text:p text:style-name="Quotations">“homo est animal”.</text:p>
      <text:p text:style-name="P303">Si ista propositio: “<text:span text:style-name="T471">homo est animal”, significet ‘hominem esse animal’, quod secundum te non esset aliquod existens, aut significat naturaliter proprie aut naturaliter communiter, aut ad placitum, sed nullum est dicendum.</text:span></text:p>
      <text:p text:style-name="P305">Non primum: quia sola notitia vel conceptus significat naturaliter proprie illud quod per ipsum cognoscitur. <text:span text:style-name="T472">Modo loquor de ista vocali: “homo est animal”, et clarum est de ista vocali: “homo es animal”, quae non significat naturaliter proprie ‘hominem esse animal’.</text:span></text:p>
      <text:p text:style-name="P306"><text:span text:style-name="T472">Neque est dicendum secundum: </text:span><text:span text:style-name="T475">p</text:span><text:span text:style-name="T472">uta quod significet naturaliter communiter ‘hominem esse animal’ quia nihil significat naturaliter communiter alius a se.</text:span></text:p>
      <text:p text:style-name="P307"><text:span text:style-name="T473">N</text:span><text:span text:style-name="T472">eque est dicendum tertium: </text:span><text:span text:style-name="T474">scilicet quod significet ad placitum, quia si significet ad placitum ‘hominem esse animal’ aut hoc esse secundum se totam, aut secundum suas partes non secundum se totam. Quia illud complexe significabile ‘hominem esse animal’ non significatur per aliquam partem istius propositiones: “homo est animal”. </text:span></text:p>
      <text:p text:style-name="P308"><text:span text:style-name="T474">Neque est dicendum primum: puta quod significet ‘hominem esse animal’ secundum se totam quia </text:span><text:span text:style-name="T476">nullus imposuit ad significandum istam propositionem: “homo est animal”, secundum se totam, quia infinite propositiones formarentur, quasi similes, quae numquam fuerunt formatae; ergo non imposuit aliquis ad significandum illas propositiones, vel oporte dicere quod cum quis format propositionem imponit eam ad significandum, quod est inconveniens.</text:span></text:p>
      <text:p text:style-name="P310">Ad istud argumentum respondeo quod ista propositio est vocalis: “homo est animal”, ad placitum significat ‘hominem esse animal’.</text:p>
      <text:p text:style-name="P310">Et cum dicitur ista propositio: “homo est animal”, numquam fuit imposita ad significandum ‘hominem esse animal’.</text:p>
      <text:p text:style-name="P309"><text:span text:style-name="T477">Respondeo: istam orationem: ““homo est animal” esse impositam ad significandum ‘hominem esse animal’”,</text:span><text:span text:style-name="T476"> </text:span><text:span text:style-name="T477">potest intelligi dupliciter:</text:span></text:p>
      <text:p text:style-name="P370">[i.vb 23b]</text:p>
      <text:p text:style-name="P464">Vel quod fuit imposita ad significandum ‘hominem esse animal’ primarie et immediate, et sic dico quod non, quia sola incomplexa primarie et immediate fuerunt imposita ad significandum.</text:p>
      <text:p text:style-name="P463">Alio modo potest intelligi quod fuerit imposita ad significandum mediate, et sic ex consequenti vel secundario. Et sic dico quod sic, nam significatum propositionis quodammodo videtur ex significatis partium resultare. Et ideo <text:span text:style-name="T478">qui imposuit ad significandum partes propositionis ex consequenti imposuit ad significandum ipsam propositionem. Et si arguatur capta ista propositione vocali: “buf est buf”, illa significat ad placitum ‘buf esse buf’. Hoc autem non est ex impositione partium.</text:span></text:p>
      <text:p text:style-name="P489">Respondeo: et si hoc non sit ex impositione subiecti aut praedicati bene tamen ex impositione copulae, ut in secundo capitulo ostenditur.</text:p>
      <text:p text:style-name="P489"><text:soft-page-break/>Si ulterius inferretur si quaelibet propositio habet suum proprium complexe significabile sequeretur quod tot essent complexe significabilia quot sunt propositiones possibiles, et sic actu esset infinita multitudo entium secundo et tertio modo.</text:p>
      <text:p text:style-name="P490">Respondeo: hoc sequens necessario haec opinio habet concedere, ut satis intuenti notissimum est, nec solum oporteret processum infinitum inferre ut aliqui inferunt, quia si ‘homo’ est, ‘hominem esse’ est, et ulterius significatio ‘hominem esse est’ est, et sic <text:s/>in infinitum, sed etiam infinitas est concedenda.</text:p>
      <text:p text:style-name="P491">Tertio sic arguitur: <office:annotation office:name="__Annotation__5420_1919758320" loext:resolved="false"><dc:creator>Unknown Author</dc:creator><dc:date>2021-09-29T21:24:15.897041998</dc:date><text:p text:style-name="P577"><text:span text:style-name="T709">Descartes? Cogito ergo sum.</text:span></text:p></office:annotation><text:span text:style-name="T479">o</text:span>mne illud quod causat suam notitiam est aliquid existens.<office:annotation-end office:name="__Annotation__5420_1919758320"/></text:p>
      <text:p text:style-name="P492">Ista propositio est clara, quia nihil causat suam notitiam quod non est, unde illud quod non est neque totaliter, neque partialiter potest aliquid causare, cum causare saltem in genere causae efficientis materialis vel formalis existentis sit proprietas. Sed complexe significabile causat <text:span text:style-name="T480">suam notitiam; igitur complexe significabile est existens. Minor probatur, quia intellectus cognoscit hominem esse animal et illa notitia non causatur nisi ab illo complexe significabili ‘hominem esse animal; igitur complexe significabile causat notitiam.</text:span></text:p>
      <text:p text:style-name="P493">Respondetur quod necesse est dicere quod notitia quae habetur de complexe significabili non causatur effective ab illo complexe significabili, quia ut bene probat argumentum, illud quod non est existens non potest causare aliquid existens, necesse est ergo dicere quod notitia complexe significabilis ab alio causatur quam a complexe significabili.</text:p>
      <text:p text:style-name="P494">Et si dicas a quo causatur notitia complexe <text:span text:style-name="T481">significabilis, dico quod duplex est:</text:span></text:p>
      <text:p text:style-name="P465">Complexe significabile quoddam est per se notum et notitia illius causatur ex notitiis extremorum ut ista propositio per se nota: “omne totum est maius sua parte”. Notitia sui significati causatur ex notitia totius et ex notitia partis, et ex notitia huius quod est maius.</text:p>
      <text:p text:style-name="P465">Aliud est complexe significabile non per se notum, et illud est duplex: quoddam est contingens aliud est necessarium:</text:p>
      <text:p text:style-name="P466">Tunc dico quod notitia complexe significabilis contingentis causatur ex notitiis extremorum intuitivis vel saltem ex habitibus derelictis ex notitiis intuitivis. Ut notitia huius quod est Petrum currere causatur ex notitia Petri et ex notitia cursus. </text:p>
      <text:p text:style-name="P467">Sed aliud <text:span text:style-name="T482">est complexe significabile necessarium tamen non </text:span><text:span text:style-name="T483">per se notum. Et notitia illius causatur ex notitiis aliorum complexe significabilium. Ut ‘cognosco hominem esse risibilem’, quia cognosco ‘hominem esse rationalem’.</text:span></text:p>
      <text:p text:style-name="P496">Ista tamen materia habet videri in libris Posteriorum. Et licet aliquomodo per ista dicatur de notitia complexe significabilis veri, non tamen de notitia saltem iudicativa complexe significabilis falsi.</text:p>
      <text:p text:style-name="P554"><text:span text:style-name="T483">Sed de ista: erroris causatione Philosophiae relinquitur discutiendum, unde notitiae imperfectae similium: “Erroris </text:span><text:span text:style-name="T484">quo unum creditur aliud sunt causative”. </text:span><text:span text:style-name="T485">Assensus autem, qui fides est, quandocumque ex assensu </text:span><text:span text:style-name="T486">altero causatur, qui opinio est. </text:span><text:span text:style-name="T487">O</text:span><text:span text:style-name="T486">pinio enim, cum affectione voluntatis, assensum firmum, qui fide est, causare potest.</text:span></text:p>
      <text:p text:style-name="P555"><text:span text:style-name="T603">[</text:span><text:span text:style-name="T598">ii.ra 24a</text:span><text:span text:style-name="T603">]</text:span></text:p>
      <text:p text:style-name="P497">Similiter utrum scientia habeatur de conclusione vel de significato conclusionis dubium est, et probabilis est dicere quod habetur de signato propositionis. Sed hoc dimittatur, quia pertinet ad materiam librorum Posteriorum, etiam de ista materia fit mentio in appellatione rationis.</text:p>
      <text:p text:style-name="P495"><text:soft-page-break/>Secunda conclusio principalis quae est de verificatione complexe significabilium ad invicem est ista: </text:p>
      <text:p text:style-name="P461">omnis propositio affirmativa est falsa in qua subiectum supponit pro complexe significabili et praedicatum similiter.</text:p>
      <text:p text:style-name="P311">Nisi complexe significabile importatum per subiectum importetur per propositionem synonymam. Illi quam importat complexe significabile pro quo supponit praedicatum ut ista est vera ‘Marcum currere est Tullium currere”.</text:p>
      <text:p text:style-name="P311"><text:span text:style-name="T488">Ista tamen est falsa: “‘Sortem esse hominem’ est ‘Sortem esse animal’”. </text:span><text:span text:style-name="T489">Haec conclusio est contra doctorem cuius est iste modus qui defenditur. Ipse enim concedit hanc propositionem: “ ‘hominem esse animal’ est ‘hominem esse substantiam”. Quia similiter ista esset vera: “‘Sortem esse Deum’ est ‘ens esse Deum’”, quod est falsum, quia ex ipsa cum una vera sequitur una falsa.</text:span></text:p>
      <text:p text:style-name="P312">Sic arguendo: “‘Sortem esse Deum non est possibile”, sed: “Sortem esse Deum est ‘ens esse Deum”; ergo “‘ens esse Deum’ non est possibile”, consequens est falsum.</text:p>
      <text:p text:style-name="P312">Ergo aliquam praemissarum non maior, ergo minor, et per consequens habetur intentum.</text:p>
      <text:p text:style-name="P498">Contra istam conclusionem arguitur <text:span text:style-name="T494">sic: ista est concedenda: “‘hominem esse animal’ est ‘hominem esse substantiam’”, igitur conclusio falsa”.</text:span></text:p>
      <text:p text:style-name="P499">Antecedens patet quia ista est concedenda: “‘hominem esse anima’ est ‘hominem esse animal’”, et tunc fiat descensus sub subiecto et ita habebitur quod haec est concedenda: “‘hunc hominem esse animal’ est ‘hominem esse animal’”.</text:p>
      <text:h text:style-name="Heading_20_3" text:outline-level="3">Quodlibet complexum supponens pro complexe significabili est terminus singularis</text:h>
      <text:p text:style-name="P499">Respondeo: <office:annotation office:name="__Annotation__3697_2252843519" loext:resolved="false"><dc:creator>Unknown Author</dc:creator><dc:date>2021-09-30T21:19:02.346496191</dc:date><text:p text:style-name="P577"><text:span text:style-name="T709">Significatum est complexe significabile, et complexe significabile est, suo modo, una res singularis.</text:span></text:p><text:p text:style-name="P577"><text:span text:style-name="T709">Significatum </text:span></text:p></office:annotation>quodlibet complexum supponens pro complexe significabile est terminus singularis., <text:span text:style-name="T495">quia sibi repugnat supponere pro pluribus, sicut enim Sortes est una res singularis ita significatum istius “homo est animal” suo modo est una res singularis.</text:span><office:annotation-end office:name="__Annotation__3697_2252843519"/></text:p>
      <text:p text:style-name="P500"><office:annotation office:name="__Annotation__3552_2252843519" loext:resolved="false"><dc:creator>Unknown Author</dc:creator><dc:date>2021-09-30T21:17:34.689503431</dc:date><text:p text:style-name="P577"><text:span text:style-name="T709">Propositiones singulares habent idem complexe significabile.</text:span></text:p></office:annotation>Ex quod patet quod omnium propositionum synonymarum est idem complexe significabile singulare,<office:annotation-end office:name="__Annotation__3552_2252843519"/> et propositionum non synonymarum non potest esse idem complexe significabile. Ideo si aliquae propositiones aequivaleant in inferendo tantum, et non in significando, earum non est idem complexe significabile, licet ad complexe significabile unius sequatur complexe significabile alterius.</text:p>
      <text:p text:style-name="P501">Si ergo istae duae: “non quilibet homo est animal”, et “quidam homo non est animal”, tantum in inferendo aequivalent, earum non est unum complexe significabile.</text:p>
      <text:h text:style-name="Heading_20_3" text:outline-level="3">Unde complexe significabilia dicantur vera aut falsa</text:h>
      <text:p text:style-name="P501">Et si arguatur: sic sequitur ex dictis quod haec negativa est concedenda: “‘hominem esse animal’ non est ‘hominem esse substantiam’”, quod est falsum, quia ex ista infertur haec propositio de praedicato infinito: “‘hominem esse animal’ est ‘non hominem esse substantiam’”, quae falsa est secundum dicta.</text:p>
      <text:p text:style-name="P471">Respondeo: ly ‘non’ ex parte praedicati dupliciter sumi potest: </text:p>
      <text:p text:style-name="P470"><text:soft-page-break/>Uno modo ut se tenet ex parte complexe significabilis illius propositionis: “non homo est substantia”, et sic est falsa, ut patet ex dictis.</text:p>
      <text:p text:style-name="P472">Alio modo capitur ut tantum negat illud complexe significabile ‘hominem esse substantiam’ et non se tenet ex parte complexe significabilis, et sic est vera.</text:p>
      <text:p text:style-name="P473">Et similiter dicendum est de ista propositione: “‘hominem currere’ est ‘hominem currere’ vel ‘hominem non currere’”, nam si ly ‘vel’ capiatur ut se tenet ex parte complexe significabilis illius propositionis: ““homo currit” vel “homo non currit””, falsa est. <text:span text:style-name="T496">Si vero ly ‘vel’ coniungit duo complexe significabilia vera est.</text:span></text:p>
      <text:p text:style-name="P556">Per ista patet ad argumentum, nam non licet sub subiecto descendere eo quod est terminus singularis.</text:p>
      <text:p text:style-name="P557"><text:span text:style-name="T604">[</text:span><text:span text:style-name="T598">ii.rb 24b</text:span><text:span text:style-name="T604">]</text:span></text:p>
      <text:p text:style-name="P502">Sed replicaret quispiam fortiter quaerendo sub ly ‘hominem’ descendendum, <text:span text:style-name="T497">quia ly ‘hominem’ communiter supponit, et sic semper difficultas remanet. Unde capta ista propositione: “‘omnem hominem esse animal’ est ‘omnem hominem esse animal’”, ly ‘hominem’ videtur distribui et facto descensu, descendentes sunt falsae, nam ista est falsa: “‘hunc hominem esse animal’ et ‘omnem hominem esse animal’.</text:span></text:p>
      <text:p text:style-name="P503">Respondeo: secundum unum modum dicendi non liceret sub parte ista descendere, quia totum unica acceptione accipitur, quod si non teneatur, difficile est defendere istum modum de complexe significabilibus, nam si fiat descensus, semper erit falsa ex ea parte qua fit descensus.</text:p>
      <text:p text:style-name="P504">Tertia conclusio: complexe significabilia dicuntur vera vel falsa, necessaria vel contingentia, possibilia vel impossibilia, et a talibus complexe significabilibus propositiones dicuntur verae vel falsae, necessariae vel contingentes, possibiles vel impossibiles.</text:p>
      <text:p text:style-name="P504">Unde si quaeratur isti opinioni: quare aliqua propositio est vera. <text:span text:style-name="T498">Respondet: quia significatum adaequatum est verum. Et quare falsa. Quia significatum adaequatum est falsum.</text:span></text:p>
      <text:p text:style-name="P505">Et secundum hoc bene dicebat Petrus Hispanus: “propositio est oratio verum vel falsum significans”. Similiter propositio dicitur necessaria quia <office:annotation office:name="__Annotation__4467_3639919390" loext:resolved="false"><dc:creator>Unknown Author</dc:creator><dc:date>2021-10-01T00:04:22.218983235</dc:date><text:p text:style-name="P577"><text:span text:style-name="T709">Significatum adaequatum idem est quod complexe significabile.</text:span></text:p></office:annotation>significatum adaequatum seu complexe significabile<office:annotation-end office:name="__Annotation__4467_3639919390"/> est necessarium, et sic de aliis.</text:p>
      <text:p text:style-name="P507">Et si ulterius quaeratur illi opinioni: quare significatum adaequatum alicuius propositionis est verum. Respondet quod ideo, quia est iudicatum a prima veritate quae est Deus, quae est omnium verorum verissimum iudicium. </text:p>
      <text:p text:style-name="P506"><text:span text:style-name="T499">Ideo infero quod </text:span><office:annotation office:name="__Annotation__4919_3639919390" loext:resolved="false"><dc:creator>Unknown Author</dc:creator><dc:date>2021-10-01T00:11:59.635661194</dc:date><text:p text:style-name="P577"><text:span text:style-name="T709">Veritas: </text:span></text:p><text:p text:style-name="P577"><text:span text:style-name="T709">1) Per se et primo.</text:span></text:p><text:p text:style-name="P577"><text:span text:style-name="T709">2) Per se et non primo.</text:span></text:p><text:p text:style-name="P577"><text:span text:style-name="T709">3) Per accidens.</text:span></text:p></office:annotation><text:span text:style-name="T499">veritas primo et per se et principalissime reperitur in iudicio divino seu est iudicium divinum. </text:span><text:span text:style-name="T500">S</text:span><text:span text:style-name="T499">e</text:span><text:span text:style-name="T500">d</text:span><text:span text:style-name="T499"> per se et non primo invenitur in complexe significabili. </text:span><text:span text:style-name="T500">P</text:span><text:span text:style-name="T499">er accidens in signo creato. Puta in propositione vocali, mentali vel scripta</text:span><office:annotation-end office:name="__Annotation__4919_3639919390"/><text:span text:style-name="T499">.</text:span></text:p>
      <text:p text:style-name="P508">Contra istam conclusionem arguitur primo sic: quia licet iste modus ostendat quare complexe significabilia dicantur vera non tamen ostendit quare complexe significabilia dicantur falsa. </text:p>
      <text:p text:style-name="P508">Arguitur enim sic: si complexe significabilia dicuntur vera a prima veritate; ergo complexe significabilia dicuntur falsa ab una prima falsitate, et tunc duo essent ponenda: unum quod non potest iudicare nisi verum, scilicet, Deus, et aliud quod non potest iudicare nisi falsum, quod vocaretur prima falsitas, quod est absurdum et haereticum.</text:p>
      <text:p text:style-name="P509"><text:soft-page-break/><text:span text:style-name="T501">Ad hoc responderetur secundum doctorem istum: quod licet complexe significabilia dicantur vera a prima veritate, non tamen dicuntur falsa a prima falsitate, cum nulla talis sit prima falsitas. Et si quaeras quare, ergo complexe significabilia dicuntur falsa.</text:span> <text:span text:style-name="T501">Dico quod ideo dicuntur falsa, quia non iudicantur a prima veritate seu quia prima veritas non eis assentit. </text:span></text:p>
      <text:p text:style-name="P513">Ut si quaeratur quare ista propositio: “homo est animal”, est vera, respondet: quia significatum eius est verum, scilicet, ‘hominem esse animal’.</text:p>
      <text:p text:style-name="P509"><text:span text:style-name="T501">Et si quaeratur ulterius quare ‘hominem esse animal’ est verum, respondet: </text:span><text:span text:style-name="T502">quia Deus iudicat ‘hominem esse animal’.</text:span></text:p>
      <text:p text:style-name="P510">Et si arguatur si per impossibile Deus non esset, adhuc istud complexe significabile ‘Deus non est’ esset verum et tamen non diceretur verum, quia iudicatur a prima veritate, quia tunc non esset veritas prima; igitur iste modus non est sufficiens.</text:p>
      <text:p text:style-name="P510">Respondeo: <office:annotation office:name="__Annotation__7285_1044815481" loext:resolved="false"><dc:creator>Unknown Author</dc:creator><dc:date>2025-12-08T12:19:41.814355256</dc:date><text:p text:style-name="P579"><text:span text:style-name="T709">Ad impossibile sequitur quodlibet:</text:span></text:p><text:p text:style-name="P580"><text:span text:style-name="T709">Si Deus non esset verum esset ‘Deum non esse’, et falsum esset ‘Deum esse’.</text:span></text:p></office:annotation>ad impossibile sequitur quo<text:span text:style-name="T503">d</text:span>libet, speciali ad illud impossibile, et ideo, si Deus non esset <text:span text:style-name="T504">verum esset ‘Deum non esse’, et falsum esset ‘Deum esse’.</text:span><office:annotation-end office:name="__Annotation__7285_1044815481"/></text:p>
      <text:p text:style-name="P511">Propter illud argumentum ponunt aliqui moderni unum modum dicendi: quod complexe significabile, ideo, dicitur verum quia ita est qualiter est si sit affirmativum, vel quia non est ita qualiter non est, si sit negativum. Sic dico in proposito quod, si per impossibile Deus non esset, ‘Deum non esse’ esset verum. Quia ‘Deum non esse’ taliter non est qualiter non est.</text:p>
      <text:p text:style-name="P558"><text:span text:style-name="T605">[</text:span><text:span text:style-name="T598">ii.va 25a</text:span><text:span text:style-name="T605">]</text:span></text:p>
      <text:p text:style-name="P511">Sed aliter modus dicendi est pulchrior. Dico enim <text:span text:style-name="T505">quod ita esse est a iudicio divino, unde homo est animal, quia Deus iudicat ‘hominem esse animal’ cum solus ipse est via et veritas, et alia quasi extrinseca denominatione dicuntur. Vera pro quanto iudicium divinum super ipsa fertur.</text:span></text:p>
      <text:p text:style-name="P512">Et si iterum dicas: sequitur quod duo sic se habentia quorum unum est necessarium et aliud contingens, diceretur vera ab eadem veritate. Probatur consequentia et capio ista duo complexe significabilia, scilicet: ‘Deum esset’ et ‘hominem currere’. Ista dicuntur vera ab eadem veritate, puta, a prima, et tamen unum est necessarium et aliud contingens.</text:p>
      <text:p text:style-name="P512"><office:annotation office:name="__Annotation__5210_1271831879" loext:resolved="false"><dc:creator>Unknown Author</dc:creator><dc:date>2021-10-01T01:06:46.605658047</dc:date><text:p text:style-name="P577"><text:span text:style-name="T709">Complexe significabile est verum, necessarium et contingens a prima veritate.</text:span></text:p></office:annotation>Respondeo quod illa duo sunt vera a prima veritate et tamen unum est necessarium quia necessario iudicatur a prima veritate, et aliud est contingens, quia contingenter iudicatur a prima veritate, et hoc non est inconveniens.<office:annotation-end office:name="__Annotation__5210_1271831879"/></text:p>
      <text:p text:style-name="P475">Sed adhuc obiiciet aliquis quia si hoc esset verum sequeretur quod aliquae veritates essent aeternae praeter Deum, quod est contra articulum <text:span text:style-name="T506">P</text:span>arisiensem.</text:p>
      <text:p text:style-name="P475">Antecedens patet, quia illud complexe significabile ‘hominem esse animal’ ab aeterno fuisset verum, vel saltem illud ‘hominem non esse asinum’, quia Deus ab aeterno iudicavit hominem non esse asinum.</text:p>
      <text:p text:style-name="P475">Respondetur quod: “esse aliquas veritates ab aeterno”, potest intelligi dupliciter:</text:p>
      <text:p text:style-name="P474">uno modo per denominationem intrinsecam sic, videlicet, quod ab aeterno fuerint aliqua existentia in rerum natura, quae dicuntur vera, et hoc modo dicit quod non. Et istum sensum negat articulus <text:span text:style-name="T506">P</text:span>arisiensis “<text:span text:style-name="T506">aliquas veritates esse ab aeterno”.</text:span></text:p>
      <text:p text:style-name="P476"><text:soft-page-break/>Alio modo potest intelligi quod aliquae veritates sint ab aeterno per denominationem extrinsecam. Ita, videlicet, quod aliqua complexe significabilia quae sint entia large sunt iudicata a Deo esse vera ab aeterno. Et hoc modo non est inconveniens.</text:p>
      <text:p text:style-name="P477">Notitia enim Dei denominatur necessaria vel contingens secundum quod fertur in obiectum necessarium vel contingens. Et ut dictum est de veritate, dicatur de possibilitate.</text:p>
      <text:h text:style-name="Heading_20_3" text:outline-level="3">Utrum ista sit possibilis: “omne ens est Deus”</text:h>
      <text:p text:style-name="P477"><text:span text:style-name="T507">S</text:span>ignificatum <text:span text:style-name="T507">enim dicitur possibile quia potest iudicari a prima veritate, ut si quaeratur utrum ista sit possibilis: “</text:span><text:span text:style-name="T508">omne ens est Deus”.</text:span></text:p>
      <text:p text:style-name="P514">Dico quod sic, quia significatum adaequatum est possibile, scilicet, “omne ens est Deum”, et illud significatum dicitur possibile, quia potest iudicari a prima veritate.</text:p>
      <text:p text:style-name="P514">Et si dicas: “significatum istius propositionis: “omne est est Deus”, non est possibile; ergo ista propositio: “omne ens est Deus”, non est possibilis”.</text:p>
      <text:p text:style-name="P514">Antecedens patet, quia ista propositio: “omne ens est Deus”, significat ‘Sortem esse Deum’ et hoc non est possibile; ergo ista propositio: “omne ens est Deus” non est possibilis.</text:p>
      <text:p text:style-name="P559">Respondeo: ista propositio: “omne ens est Deus”, de significatione inadaequata, seu secundari, seu partiali, quod idem est, significat ‘<text:span text:style-name="T509">Sortem esse Deum’. Non tamen dicitur significatione totali adaequata seu primaria. Immo, de significatione adaequata significat ‘omne ens esse Deum’ et hoc est possibile. ‘Sorte’ tamen, secundum istum modum dicendi, non esset </text:span><text:span text:style-name="T510">dicendum, quod ista: “omne ens est Deus” significat ‘Sortem esse Deum’, id est, hoc complexe significabile ‘Sortem esse Deum’.</text:span></text:p>
      <text:p text:style-name="P560">&lt;Buridanus&gt; <text:span text:style-name="T510">A</text:span><text:span text:style-name="T511">lius est modus dicendi qui licet verus multas tamen oppugnationes patitur, ut contra veritatem plerumque contingere solet.</text:span></text:p>
      <text:p text:style-name="P515">Pro quo ponitur <text:span text:style-name="T512">talis conclusio:</text:span></text:p>
      <text:p text:style-name="Quotations">complexe significabile seu significatum propositionis non distinguitur a significationibus terminorum.</text:p>
      <text:p text:style-name="P516">Ut ista propositio: “<text:span text:style-name="T513">homo est animal”, significat ‘hominem esse animal’. Tunc dicit <text:s/>quod ‘hominem esse animal’ non distinguatur ab hominem, et animali, seu ab illis quae significantur per istos terminos ‘homo’ et ‘animal’.</text:span></text:p>
      <text:p text:style-name="P517">Et si dicas; ergo talia non debent dici complexe significabilia patet, quia non differunt ab illis quae significantur per istos terminos simplices seu incomplexos.</text:p>
      <text:h text:style-name="Heading_20_3" text:outline-level="3">Eadem res potest esse complexe significabile et incomplexe significabile</text:h>
      <text:p text:style-name="P561">Respondet quod eadem res potest dici complexe significabile et incomplexe significabile, nam inquantum potest significari per aliquod complexum vocatur complexe significabile, et inquantum potest significari per aliquod incomplexum vocatur incomplexe significabile.</text:p>
      <text:p text:style-name="P562"><text:span text:style-name="T606">[</text:span><text:span text:style-name="T598">ii.vb 25b</text:span><text:span text:style-name="T606">]</text:span></text:p>
      <text:p text:style-name="P518">Ideo, puta, significari complexe vel incomplexe co<text:span text:style-name="T514">nveniunt alicui per denominationem extrinsecam seu ab extrinseco. Ex quod sequitur quod </text:span><office:annotation office:name="__Annotation__3622_3729557990" loext:resolved="false"><dc:creator>Unknown Author</dc:creator><dc:date>2021-10-02T21:34:37.764587953</dc:date><text:p text:style-name="P577"><text:span text:style-name="T709">Omnia entia mundi possunt dici complexe significabilia.</text:span></text:p></office:annotation><text:span text:style-name="T514">omnia entia mundi possunt dici complexe significabilia </text:span><text:soft-page-break/><text:span text:style-name="T514">quia omne ens, quodcumque sit illud, potest significari per aliquod complexum.</text:span><office:annotation-end office:name="__Annotation__3622_3729557990"/><text:span text:style-name="T514"> </text:span><text:span text:style-name="T515">Et secundum </text:span><text:span text:style-name="T516">istam opinionem est unum fundamentum quod </text:span><office:annotation office:name="__Annotation__4760_3729557990" loext:resolved="false"><dc:creator>Unknown Author</dc:creator><dc:date>2021-10-02T21:58:44.069993048</dc:date><text:p text:style-name="P578"><text:span text:style-name="T709">Omne complexum significat illud idem quod partes seorsum significant.</text:span></text:p></office:annotation><text:span text:style-name="T516">omne complexum seu aggregatum ex partibus aliquibus significat illud idem quod partes seorsum significant.</text:span><office:annotation-end office:name="__Annotation__4760_3729557990"/><text:span text:style-name="T516"> Ita, videlicet, quod si volo cognoscere quid significat aliquod complexum debeo aspicere quid partes seorsum significant.</text:span></text:p>
      <text:p text:style-name="P519"><office:annotation office:name="__Annotation__4758_3729557990" loext:resolved="false"><dc:creator>Unknown Author</dc:creator><dc:date>2021-10-02T21:56:39.035556324</dc:date><text:p text:style-name="P577"><text:span text:style-name="T709">Exempla: Significatum <text:s/>complexe significabilis et suas partes seorsum. </text:span></text:p></office:annotation>Declaratur per exempla ut iste terminus ‘homo irrationalis’ significat omnes homines et omnia irrationabilia. <text:span text:style-name="T517">E</text:span>t iste terminus ‘impossibile’ significat tantum quantum istud complexum ‘non possibile’, et istud complexum ‘non possibile’ significat omnia possibilia ex parte de ly ‘possibilitate’ et aliqualiter, scilicet, negative ex parte de ly ‘non’.<office:annotation-end office:name="__Annotation__4758_3729557990"/></text:p>
      <text:h text:style-name="Heading_20_3" text:outline-level="3">Quid iste terminus ‘chimera’ significat</text:h>
      <text:p text:style-name="P516"><text:s/><office:annotation office:name="__Annotation__4929_3729557990" loext:resolved="false"><dc:creator>Unknown Author</dc:creator><dc:date>2021-10-02T21:59:20.230879336</dc:date><text:p text:style-name="P577"><text:span text:style-name="T709">Chimera significat omnia entia.</text:span></text:p></office:annotation><text:span text:style-name="T517">Et iste terminus ‘chimera’ significat tantum quantum istud complexum ‘ens compositum ex impossibilibus posse componi’. </text:span><text:span text:style-name="T518">Et ideo, iste terminus ‘chimera’ significat omnia entia.</text:span><office:annotation-end office:name="__Annotation__4929_3729557990"/></text:p>
      <text:p text:style-name="P520">Et licet iste terminus ‘chimera’ significat ‘Sortem’, non tamen potest supponere pro Sorte, quia non potest verificari de Sorte propter repugnantiam partium. Et similiter dicatur de istis terminus ‘infinitum vacuum’, secundum Aristotelem quia ponebat talia esse impossibilia.</text:p>
      <text:h text:style-name="Heading_20_3" text:outline-level="3">Quomodo supponunt aggregata ex accusativo et infinitivo secundum Buridanum</text:h>
      <text:p text:style-name="P520">Et si ulterius quaeratur isti modo dicendi pro quo supponunt dicta aggregata ex accusativo et infinitivo, verbi gratia, quaeritur pro quod supponit ‘hominem esse animal’.</text:p>
      <text:p text:style-name="P520">Respondet quod omne aggregatum ex infinitivo et accusativo potest capi dupliciter:</text:p>
      <text:p text:style-name="P478"><text:span text:style-name="T519">U</text:span>no modo materialiter.</text:p>
      <text:p text:style-name="P478"><text:span text:style-name="T519">A</text:span>lio modo significative materialiter adhuc dupliciter:</text:p>
      <text:p text:style-name="P480"><text:span text:style-name="T519">U</text:span>no modo pro tali aggregato et quolibet sibi simili: sive in voce, sive in scripto.</text:p>
      <text:p text:style-name="P480">Alio modo pro propositione quae subiacet tali aggregato.</text:p>
      <text:p text:style-name="P479">Et ad videndum pro quo supponunt talia aggregata si capiantur personaliter, accusativus resolvendus est in nominativum et verbum suum participium. Ut ‘hominem esse animal’ sic resolvitur, id est, “homo existens animal”, ‘hominem currere’ est “homo currens”. </text:p>
      <text:p text:style-name="P479">Et tunc videndum est pro quo supponunt illa aggregata ex nominativo et participio, quia pro illo supponunt aggregata ex infinitivo et accusativo. Resolvendo igitur si quaeratur quid est ‘hominem ese animal’. Et ‘Antichristum fore’ aequivalet huic: “Antichristus futurus”. Et sicut Antichristus futurus non est, sed erit, ita “Antichristum fore” non est, sed aliquid erit.</text:p>
      <text:h text:style-name="Heading_20_3" text:outline-level="3">Hominem esse animal significatur per istum terminum homo</text:h>
      <text:p text:style-name="P521">Ex isto sequuntur aliqua correlaria:</text:p>
      <text:p text:style-name="P521">Primo sequitur: quod ‘hominem esse animal’ significatur <text:span text:style-name="T520">per istum terminum ‘homo’. Probatur quia omnis homo significatur per istum terminum ‘homo’, sed ‘hominem esse animal’ est homo, ergo ‘hominem esse animal’ significatur per istum terminum ‘homo.</text:span></text:p>
      <text:p text:style-name="P522">Secundo sequitur: quod ‘hominem ese animal’ est ‘hominem esse album’, quia sensus <text:span text:style-name="T521">est quod “homo existens animal” est “homo existens album”, et hoc est verum.</text:span></text:p>
      <text:p text:style-name="P523"><text:soft-page-break/>Tertio sequitur: quod nihil est ‘omnem hominem esse animal’, patet quia nihil est “omnis homo existens animal”. Dico tamen quod ‘omnem hominem esse animal est aliquid, quia “omnis homo existens animal” est aliquid. Ideo ista est falsa: “haec propositio: “omnis homo est animal”, significat ‘hominem esse animal”, licet ista sit vera: “‘omnem hominem esse’ animal significat”.</text:p>
      <text:p text:style-name="P523">Quarto sequitur: quod quaelibet <text:span text:style-name="T522">res mundi est ‘nullum hominem esse asinum’, patet quia quaelibet re mundi demonstrata verum est dicere: haec res est “nullus homo existens asinus”. Ibi enim ly ‘nullus’ est negatio infinitans, sicut universaliter contingit quando negatio ponitur post copulam, saltem si non addatur copulae implicationis.</text:span></text:p>
      <text:p text:style-name="P563">Sequitur quinto: quod “Deum posse producere <text:span text:style-name="T396">b</text:span> <text:span text:style-name="T523">angelum” aliquid est, sed “</text:span><text:span text:style-name="T398">b</text:span><text:span text:style-name="T523"> angelum posse produci a Deo” nihil est. Posito quod ‘</text:span><text:span text:style-name="T398">b</text:span><text:span text:style-name="T523"> angelus’ non sit productus, quia “Deum posse producere b angelum” tantum valet sicut “Deus potens producere </text:span><text:span text:style-name="T398">b</text:span><text:span text:style-name="T523"> angelum”, </text:span><text:span text:style-name="T524">et tale aggregatum pro deo supponit. Sed “</text:span><text:span text:style-name="T399">b</text:span><text:span text:style-name="T524"> angelum posse produci a Deo” tantum valet sicut “</text:span><text:span text:style-name="T399">b</text:span><text:span text:style-name="T524"> angelus possibilis a Deo produci” modo tale aggregatum pro nullo supponit.</text:span></text:p>
      <text:p text:style-name="P564"><text:span text:style-name="T607">[</text:span><text:span text:style-name="T598">iii.ra 26a</text:span><text:span text:style-name="T607">]</text:span></text:p>
      <text:p text:style-name="P524">Et similiter ‘Deum cognoscere Antichristum’ aliquid est, sed “Antichristum cognosci a Deo” nihil est.</text:p>
      <text:p text:style-name="P565"><text:span text:style-name="T609">Contra istam conclusionem eo modo quo declaratum est arguit primo unus doctor </text:span><text:span text:style-name="T608">&lt;</text:span><text:span text:style-name="T598">Petrus de </text:span>Aliaco<text:span text:style-name="T608">&gt;</text:span><text:span text:style-name="T609"> significatum istius propositionis: “homo est animal”, nihil est. </text:span><text:span text:style-name="T525">E</text:span><text:span text:style-name="T609">t tamen aliquid esset sic explicando ‘hominem esse animal’,“</text:span><text:span text:style-name="T525">homo existens animal”. Igitur illa declaratio est minus bene posita.</text:span></text:p>
      <text:p text:style-name="P525">Minor patet quia haec oratio infinitivi modi ‘hominem esse animal’ capta significative non supponit pro aliqua re, quod probatur ex eo, quia illa oratio sic sumpta significat plura, scilicet, omnia quae significat propositio; ergo non est minor ratio quare supponat pro uno illorum significatorum magis quam pro alio; ergo vel pro quolibet vel pro nullo.</text:p>
      <text:p text:style-name="P525">Sed nullius <text:span text:style-name="T526">diceret quod pro quolibet, quia sic illa oratio ‘hominem esse animal’ supponeret pro asino, ergo pro nullo.</text:span></text:p>
      <text:p text:style-name="P526">Pro solutione sciendum est quod est una opinio quae primo modo dicendi est adversa. Sed cum secundo non omnino habet convenientiam ad cuius ostensionem ponit aliquas conclusiones.</text:p>
      <text:p text:style-name="P526">Prima conclusio: licet <office:annotation office:name="__Annotation__4087_3896190841" loext:resolved="false"><dc:creator>Unknown Author</dc:creator><dc:date>2021-10-03T21:25:26.579591960</dc:date><text:p text:style-name="P577"><text:span text:style-name="T709">Omne quod est, est complexe significabile.</text:span></text:p></office:annotation>omne quod est sit complexe significabile<office:annotation-end office:name="__Annotation__4087_3896190841"/>, tamen nihil est significatum adaequatum seu totale alicuius propositionis. Patet, <text:span text:style-name="T527">quia quaelibet talis ratione suarum partium quibus aequivalet in significando plura significat adinvicem distincta, et non est maior ratio quod supponat pro uno quam pro alio, ut deducebatur in argumento principali.</text:span></text:p>
      <text:p text:style-name="P315">Ex illa propositio sequitur correlarium: </text:p>
      <text:p text:style-name="Quotations"><text:span text:style-name="T527">Q</text:span>uod nullius propositionis oratio infinitivi modi, sibi correspondens, supponit pro aliqua re significative sumpta.</text:p>
      <text:p text:style-name="P314">Hoc probatum est de sito dicto ‘hominem esse animal’, quia non est maior ratio quod supponat pro homine quam pro asino, et ultra superaddit iste doctor, quod ista quaestio est derisoria et incongrua, quid est ‘hominem esse animal’, sicut quaeretur quid est hominem.</text:p>
      <text:p text:style-name="P314">Ad cuius declarationem ponit aliqua documenta grammaticalia:</text:p>
      <text:p text:style-name="P314"><text:soft-page-break/>Primum: quaelibet oratio in qua, a parte subiecti, ponitur verbum infinitivi modi significative sumptum existens totale subiectum, et acceptum verbaliter, est incongrua. Quia verbum significative sumptum non potest reddere suppositum verbo; ideo haec est incongrua: “studere est”.</text:p>
      <text:p text:style-name="P314">Dicitur notanter, verbum acceptum personaliter et verbaliter, quia quandoque verbum infinitivi modi accipitur significative nominaliter, loco unius nominis verbalis, et tunc est nomen, ut in ista: “sedere est quiescere”, quae tantum valet sicut ista: “sedens est quiescens”, et in ista: “legere et non intelligere negligere est”, et in similibus.</text:p>
      <text:h text:style-name="Heading_20_3" text:outline-level="3">Utrum generare sit generans</text:h>
      <text:p text:style-name="P316">Ex quod infert quod illa quaestio est valde superflua, quam aliqui valde curiose disputant, scilicet, utrum generare sit genera<text:span text:style-name="T528">n</text:span>s. <text:span text:style-name="T529">Quia si ‘generare’ capiatur verbaliter est incongrua, si nominaliter tunc est quaere utrum generans sit generas, et manifestum est quod sic.</text:span></text:p>
      <text:p text:style-name="P317">Ex isto documento sequitur correlarium:</text:p>
      <text:p text:style-name="Quotations">Quod qualibet oratio in qua a parte subiecti ponitur verbum infinitivi modi cum accusativo sequente est incongrua.</text:p>
      <text:p text:style-name="P318">Ut ista est incongrua: ‘hominem esse animal’ significatur per istam: “homo est animal”.</text:p>
      <text:p text:style-name="P319">Et si arguatur: bene sequitur: “homo est animal” significat ‘hominem esse animal’, ergo ‘hominem esse animal’ significatur. Ille modus arguendi non valet sicut net iste: ‘homo’ significat ‘hominem’; ergo ‘hominem’ significatur antecedens. Enim est congruum et consequens incongruum.</text:p>
      <text:p text:style-name="P371">Ideo si quis quaereret an ‘hominem esse animal’ est verum, illa distinguenda est, et omnes consimiles aut ly ‘hominem esse animal’ accipitur materialiter pro propositione quae sibi subiacet, et tunc est vera, aut ly ‘hominem esse animal’ accipitur significative et tunc illa est congrua. Et ita in aliis est distinguendum.</text:p>
      <text:p text:style-name="P372"><text:span text:style-name="T610">[</text:span><text:span text:style-name="T598">iii.rb 26b</text:span><text:span text:style-name="T610">]</text:span></text:p>
      <text:p text:style-name="P320">Sequitur secundo: quod respectu huius verbi ‘est’ significative sum<text:span text:style-name="T530">pti neque a parte ante neque a parte post unquam construitur infinitivus verbaliter sumptus, vel oratio </text:span><text:span text:style-name="T531">infinitivi modi, vel etiam propositio significative sumpta. Unde etiam istae sunt incongruae loquendo significative seu personaliter: “legere est bonum”, “occidere est malum”. Nisi capiantur illi infinitivi materialiter aut nominaliter pro istis nominibus verbalibus: ‘lectio’, ‘occisio’.</text:span></text:p>
      <text:p text:style-name="P321">Similiter istae sunt incongruae: “‘hominem esse animal’ est idem quod “homo est animal””, “‘hominem esse animal’ est idem quod hominem esse substantiam animatam sensitivam”. Et hoc loquendo proprie. Improprie tamen, et causa brevitatis, tales propositiones seu locutiones admittuntur ad hunc sensum quod non stat, ita esse quod “homo est animal” quin ita sit quod homo sit substantia sensibilis.</text:p>
      <text:p text:style-name="P322">Secundum documentum est quod in talibus verbis solum a parte post construi potest infinitivus personaliter verbaliter et significative sumptus, cum quibus potest construi haec oratio imperfecta, quod sic est, verbi gratia, sicut congrue dicitur: “volo Sortes currat”, “scio quod homo est animal”. Haec oratio significat quod deus est. Ita congrue dicitur: “volo Sortem currere”, et sic de aliis, et ideo istae sunt congrue: “video Sortem currere”, “sentio ignem esse calidum”.</text:p>
      <text:p text:style-name="P323"><text:soft-page-break/>Secunda conclusio: <text:span text:style-name="T532">licet quidquid significatur per aliquam propositionem, secundum eius totam significationem, significetur per aliquam eius parte, tamen aliqualiter significatur per propositionem qualiter non significatur per eius partes. Secunda pars declaratur et de prima notum est, nam omnibus tenetur qui negant primum modum dicendi ista propositio: ““homo est animal” significat ‘hominem esse animal’”, secundum eius totalem significationem, qualiter non significatur per aliquam eius partem. Istum modum dicendi quod ad aliqua difficile est sustinere.</text:span></text:p>
      <text:p text:style-name="P324">Contra ipsum tamen arguitur, nam secundo conclusio manifeste repugnat primae, quod ostenditur. Nam in secunda conclusione concedit hanc propositionem: “haec propositio: “homo est animal” significat ‘hominem ese animal’”. Quaeritur pro quod supponit ly ‘hominem esse animal’: aut per aliquo, aut pro nullo.</text:p>
      <text:p text:style-name="P324">Si pro aliquo ergo maledicit in prima conclusione, quod nullus propositionis significatum adaequatum est aliquid. Hoc etiam idem probatur per suam rationem, quia non est maior ratio quod supponat pro homine quam pro asino; ergo vel pro utroque vel pro neutro. Sed non pro utroque; ergo pro neutro, et ita habet quod pro nullo supponit et per consequens est falsa.</text:p>
      <text:p text:style-name="P324">Hanc rationem evadere non posset, nisi dicendo quod ly ‘hominem esse animal’ pro omni ente supponit propter ampliationem quam quam habet ab illo verbo significat, quod ampliat usque ad imaginabilia vel potius intelligibilia, et ita ly ‘hominem esse animal’ stat pro illo quod potest intelligi ‘hominem esse animal’. Sed omne est potest intelligi ‘homine esse animal’; ergo stat pro omni ente.</text:p>
      <text:p text:style-name="P325">Ista evasio non est multum ad propositum, etiam talis larga ampliatio in materia ampliationum impugnabitur. Item, simpliciter loquendo, falsa est illa prima conclusio eo modo universaliter intellecta sicut ab eo ponitur, nam significatum istius: “Deus est Deus”, aliquid <text:s/>est. Neque de illo praecedit sua probatio, ut constat per illam enim propositionem, solus Deus significatur. Quo ad illa quae superaddit de congruitate.</text:p>
      <text:p text:style-name="P325">Secundum documentum non videtur verum, nam istae propositiones sunt congruae: “Sortes incipit moveri”, “Sortes <text:span text:style-name="T533">deberet solvere”. Et tamen istae sunt incongruae: “Sortes incipit quod moveatur”, “Sortes debet quod solvat”. Et ita secundum documentum falsum.</text:span></text:p>
      <text:p text:style-name="P373">Sed quo ad primum documentum satis esse se defendere, neque ipse propter illud deberet subterfugere difficultates. <text:span text:style-name="T534">P</text:span>ostquam intentio quaestionis const<text:span text:style-name="T534">a</text:span>t, <text:span text:style-name="T534">posset tamen aliqualiter argui.</text:span></text:p>
      <text:p text:style-name="P374"><text:span text:style-name="T611">[</text:span><text:span text:style-name="T598">iii.va 27a</text:span><text:span text:style-name="T611">]</text:span></text:p>
      <text:p text:style-name="P326">Primo quia omnis pro<text:span text:style-name="T535">positio de verbo activo potest inferre propositionem de verbo passivo; ergo ista propositio: “volo legere epistulam”, quam est de verbo activo potest inferre propositionem de verbo passivo. Et non aliam quam istam: “legere epistulam est volitum a me”. Igitur illa est congrua si Sorte dicatur, quod illa est congrua capiendo ly ‘legere’ nominaliter et non verbaliter.</text:span></text:p>
      <text:p text:style-name="P327">Contra: ly ‘epistulam’ est accusativi casus et tamen <text:span text:style-name="T536">si ly ‘legere’ esse nomen, deberet esse genitivi casus, ut patet ex grammatica senus, enim illius esset istae lectio: “epistulae est volita a me”.</text:span></text:p>
      <text:p text:style-name="P328">Secundo Aristoteles videtur dicere contra illud documentum in Postpraedicamentis cum ait quod ‘hominem esse’ et istam esse veram: ‘homo’ est convertuntur secundum essendi consequentiam, ubi clarum est quod ly ‘hominem esse’ non accipitur nominaliter. Sed tantum significative et personaliter.</text:p>
      <text:p text:style-name="P328"><text:soft-page-break/>Item post Aristoteles dicit quod ‘esse hominem’ est causa veritatis orationis, qua dicitur quod homo est ubi ly ‘esse hominem’ personaliter accipitur.</text:p>
      <text:p text:style-name="P375"><text:span text:style-name="T613">Posset </text:span><text:span text:style-name="T537">igitur probabiliter dici ut dicit unus doctor </text:span><text:span text:style-name="T612">&lt;</text:span> <text:span text:style-name="T598">Magister </text:span>Martinus Magistri<text:span text:style-name="T612">&gt;</text:span><text:span text:style-name="T537">: omnes istas esse congruas quas negat esse congruas. Dicendo quod infinitivus cum accusativo potest esse suppositum verbi passivi quando illud significat illud in quod transit actus importatur per verbum activum, servata congruitate locutionis.</text:span></text:p>
      <text:p text:style-name="P330">Sed sic est quod accusativus cum infinitivo significat id in quod transit actus importatus per verbum activum, cum regatur ab eo ex vi transitionis. Actus enim volendi potest transire super actum comedendi; ergo non videtur repugnare quod terminus infinitivi modi significet id in quod transit actus importatus per verbum activum, habens significationem activam.</text:p>
      <text:p text:style-name="P330">Ergo omnis talis terminus potest esse suppositum respectu verbi passivi, quod significat id in quod transit actus importatus per verbum activum. Haec consequentia tenet, quia idem est in quod transit actus et quod recipit, et idem est actus importatus per verbum activum et passivum. Et cum dicebat quod ista est incongrua: “lego est”, ergo et ista: “legere est”, verbaliter capiendo ly ‘legere’.</text:p>
      <text:p text:style-name="P329">Respondeo: infinitivus caret certo numero et determinata persona, alia autem verba numerum et personam determinatam habent, ideo rationabile videtur ut infinitivus possit habere locum personae. Alia autem verba personam debent habere ex sua natura, id est, debent esse apposita respectu primae, secundae, tertiae personae, ideo non possunt supplere vicem suppositorum.</text:p>
      <text:p text:style-name="P329"><text:span text:style-name="T538">Sed unum quod haec opinio tangebat, videlicet, quod infinitivus dupliciter dictum propter multas propositiones quae solent concedi et alias quae solent negari, et quando accipitur verbaliter exponendae sunt tales propositiones per participium, eo quod participium quodammodo </text:span><text:s/><text:span text:style-name="T538">retinet significationem verbi. Sed quando accipitur nominaliter per nomen, venit exponenda talis propositio sicut ista propositio: “ad mereri sequitur praemiari”, recte sic exponitur: “ad meritum sequitur praemium”, et non sic recte explicaretur: “ad merentem sequitur praemians”. Et si aliquis casus poneretur post ly ‘mereri’ deberet esset genitivus vel capi loco genitivi.</text:span></text:p>
      <text:h text:style-name="Heading_20_3" text:outline-level="3">Adaequatum significatum propositionis potest dupliciter sumi</text:h>
      <text:p text:style-name="P331">Tunc respondendum est <text:span text:style-name="T539">ad rationem principalem quae in primo documento declarabatur quod totale seu adaequatum significatum alicuius propositionis potest dupliciter sumi:</text:span></text:p>
      <text:p text:style-name="P481">Uno modo pro aggregato ex omnibus obiectis intelligibilibus significatis per propositionem. Et sic dico quod significatum adaequatum istius propositionis: “homo est animal”, non est ‘hominem esse animal’.</text:p>
      <text:p text:style-name="P481">Alio modo capitur significatum adaequatum propositionis pro illo pro quo supponit aggregatum ex infinitivo et accusativo, seu pro quod supponit dictum sibi correspondens, et hoc modum ‘hominem esse animal’ est significatum adaequatum illius propositionis: “homo est animal”. Ideo ‘homo’ est significatum adaequatum illius propositionis cum ‘homo’ sit ‘hominem esse animal’. Et cum dicitur quod non <text:s/>est ratio quare ly ‘hominem esse animal’ non supponat pro asino.</text:p>
      <text:p text:style-name="P566"><text:span text:style-name="T614">[</text:span><text:span text:style-name="T598">iii.vb 27b</text:span><text:span text:style-name="T614">]</text:span></text:p>
      <text:p text:style-name="P332">Respondeo quod immo, quia ly ‘animal’ restringitur per ly ‘hominem’.</text:p>
      <text:p text:style-name="P332"><text:soft-page-break/>Si autem quaeras cur restringitur ly ‘animal’ dicendo ‘hominem esse animal’ et non dicendo: “homo est animal”.</text:p>
      <text:p text:style-name="P332">Respondeo quandocumque aliqua se habent ut diversa extrema non tanquam constituentia unum extremum, tunc ambo restringunt se invicem. Sed quando se habent tanquam <text:span text:style-name="T540">constituentia, unum extremum totum habet suam acceptionem et una pars alteram</text:span> <text:span text:style-name="T540">restringit secundum sui exigentiam, quia tunc alterum se habet per modum indistans in ordine ad aliud.</text:span></text:p>
      <text:p text:style-name="P333">Tunc ad propositum dico quod si totum hoc: “homo est animal”, accipiatur in aliqua oratione ut unum extremum, tunc illa duo ‘homo’ et ‘animal’ se invicem restringunt. Ut si admittatur iste modus loquendi “homo est animal est homo”, accipiendo ly ‘homo et animal’ personaliter, <text:span text:style-name="T541">tunc ly ‘homo est animal’ solum supponit pro homine, quod enim una tota propositio possit personaliter supponere in sequentibus ostendetur.</text:span></text:p>
      <text:p text:style-name="P334">Sed capiendo ly “homo est animal” non er modum unius extremi, tunc ly ‘animal’ et ly ‘homo’ se habent tanquam diversa extrema et non sunt partes unius extremi. Ideo non se invicem restringunt.</text:p>
      <text:p text:style-name="P334">Ideo ex his concludendum est quod quando totum: “hoc hominem esse animal”, se habet per modum unius extremi, tunc ly ‘animal’ et ly ‘hominem’ se invicem restringunt. Et per consequens ly ‘animal’ non supponit pro asino cum quaeritur quid est ‘hominem esse animal’, et ita vere responderetur quod est homo existens animal.</text:p>
      <text:h text:style-name="Heading_20_3" text:outline-level="3">Sortem esse patrem Platonis. Deus potest facere se solo</text:h>
      <text:p text:style-name="P335">Secundo arguitur sic: <text:span text:style-name="T542">si praedicta conclusio sit vera, sequitur quod ‘</text:span><text:span text:style-name="T543">Sortem esse Patrem Platonis’ vel ‘generare Platonem’ esset aliquid. </text:span><text:span text:style-name="T544">P</text:span><text:span text:style-name="T543">osito quod Sortes sit pater Platonis </text:span><text:span text:style-name="T544">consequentia est nota et falsitas consequentis probatur, quia tunc sequeretur quod esset aliqua entitas realis positiva quam Deus non posset causare s</text:span><text:span text:style-name="T545">e</text:span><text:span text:style-name="T544"> sol</text:span><text:span text:style-name="T545">o effective, quod est falsum, quia</text:span><text:span text:style-name="T543"> </text:span><text:span text:style-name="T545">secundum articulum Parisiensem: “quidquid Deus potest cum causa secunda in genere causae efficientis, potest se solo”. Sed Deus non potest facere Sortem esse Parem Platonis</text:span><text:span text:style-name="T542"> </text:span><text:span text:style-name="T546">absque Sorte; igitur ‘Sortem esse Patrem Platonis’ non est aliqua entitas.</text:span></text:p>
      <text:p text:style-name="P376"><text:span text:style-name="T616">Ad hoc argumentum respondeo sicut respondet unus </text:span><text:span text:style-name="T615">d</text:span><text:span text:style-name="T616">octor </text:span><text:span text:style-name="T615">&lt;</text:span><text:span text:style-name="T598">Andreas </text:span>de Novo Castro<text:span text:style-name="T615">&gt;</text:span><text:span text:style-name="T616">, quod ista propositio: “‘Sortem esse patrem Platonis’ Deus potest facere se solo”, potest habere duplicem sensum divisionis, scilicet, et compositionis:</text:span></text:p>
      <text:p text:style-name="P336"><office:annotation office:name="__Annotation__3782_704605856" loext:resolved="false"><dc:creator>Unknown Author</dc:creator><dc:date>2021-10-06T21:16:15.554568018</dc:date><text:p text:style-name="P577"><text:span text:style-name="T709">In sensu divisionis</text:span></text:p></office:annotation>In sensu divisionis <text:span text:style-name="T547">vera est, quia sensus eius est verus, scilicet, iste: “istam rem quae est vel potest esse: ‘Sortem esse Patrem Platonis’, Deus potest facere se solo”, et hoc est verum, quia: </text:span><text:span text:style-name="T548">Sortes est illa res quae est vel potest esse ‘Sortem esse patrem Platonis’, et Sortem Deus potest facere se solo.</text:span><office:annotation-end office:name="__Annotation__3782_704605856"/></text:p>
      <text:p text:style-name="P337"><office:annotation office:name="__Annotation__3983_3884685328" loext:resolved="false"><dc:creator>Unknown Author</dc:creator><dc:date>2021-10-06T23:15:49.905259309</dc:date><text:p text:style-name="P577"><text:span text:style-name="T709">In sensu compositionis</text:span></text:p></office:annotation><text:span text:style-name="T548">Sed in sensu co</text:span><text:span text:style-name="T549">mpositionis </text:span><text:span text:style-name="T550">falsa est, quia sensus est iste: talis propositio est possibilis: “Sortem esse patrem Platonis Deus facit se solo”. Veruntamen ista est falsa, etiam, in sensu divisio: “Deus possibiliter facit se solo Sortem esse patrem Platonis”, quia praedicatum illius modalis divisae est: “illud sed solo faciens ‘Sortem esse patrem Platonis”, quod pro nullo potest supponere cum de quolibet haec sit impossibilis, hoc est: “faciens se solo ‘Sortem esse patrem Platonis’”. De similibus in materia modalium ample declarabitur.</text:span><office:annotation-end office:name="__Annotation__3983_3884685328"/></text:p>
      <text:p text:style-name="P338"><text:span text:style-name="T551">Et per idem videretur quod ista esse falsa etiam in sensu divisionis: “‘Sortem</text:span><text:span text:style-name="T550"> </text:span><text:span text:style-name="T551">esse patrem Platonis” Deus potest facere se solo”, quia praedicatum est istud: “‘Sortem esse patrem Platonis’ faciens se solo”, quod pro nullo potest supponere.</text:span></text:p>
      <text:p text:style-name="P382"><text:soft-page-break/>Sed sophista responderet quod immo mediante copula de possibili, quod nihil est sicut ostenditur in modalibus, in ista tamen propositione ‘Sortem esse patrem Platonis’ non solum est difficultas modales respiciens, sed etiam ex parte illius ‘Sortem esse patrem Platonis’.</text:p>
      <text:p text:style-name="P377"><text:span text:style-name="T617">[</text:span><text:span text:style-name="T598">iiii.ra 28a</text:span><text:span text:style-name="T617">]</text:span></text:p>
      <text:p text:style-name="P339"><text:span text:style-name="T554">I</text:span><text:span text:style-name="T552">n casu posito tamen de illa difficultate suppositionis obliquorum in materia de descensu prolixe pertractatur. Satis ergo sit propter argumentum quod illa propositio: “‘Sortem esse patrem Platonis’ Deus possibiliter faci</text:span><text:span text:style-name="T553">t</text:span><text:span text:style-name="T552"> se solo”, in sensu divisionis vera est, in sensu compositionis falsa.</text:span></text:p>
      <text:p text:style-name="P340">Unde breviter eodem modo dicendum est de ista: “‘Sortem esse patrem Platonis’ Deus potest facere se solo”, sicut de ista: “‘Sortem existentem patrem Platonis’ Deus potest facere se solo”.</text:p>
      <text:h text:style-name="Heading_20_3" text:outline-level="3">Voluntatem libere causare potest esse effectiva a solo Deo</text:h>
      <text:p text:style-name="P341">Ista consimiliter esse distinguenda: “‘voluntatem libere causare’ potest esse effective a solo Deo”, vel de ista: “‘voluntatem causare’ potest esse totaliter a Deo”.</text:p>
      <text:h text:style-name="Heading_20_3" text:outline-level="3">Deum esse dominum creaturae non potest intelligi absque creatura</text:h>
      <text:p text:style-name="P341"><text:span text:style-name="T556">E</text:span>t etiam ista: “‘Deum esse dominum creaturae’ non potest intelligi absque creatura”, <text:span text:style-name="T556">a</text:span><text:span text:style-name="T555">rgueretur enim sic: “Deus potest intelligi absque creatura, et ‘Deum esse dominum creaturae’ non potes</text:span><text:span text:style-name="T557">t</text:span><text:span text:style-name="T555"> intelligi absque creatura; ergo ‘Deum esse dominum creaturae’ non est Deus”.</text:span></text:p>
      <text:p text:style-name="P342">Respondendum esset quod illa minor habet duplicem sensum:</text:p>
      <text:p text:style-name="P343">Unus senus est: illa res quae est ‘Deum esse Dominum creaturae’ non potest intelligi absque creatura, et hoc est falsum.</text:p>
      <text:p text:style-name="P343">Alius sensus est quod hace est impossibilis intelligitur ‘Deum esse dominum creaturae’, et non intelligitur Deus, et iste sensus est verus.</text:p>
      <text:h text:style-name="Heading_20_3" text:outline-level="3">Facio Sortem transire per pontem</text:h>
      <text:p text:style-name="P344">Per idem solvitur argumentum, quia si iste modus dicendi sit verus sequeretur quod non possem facere Sortem <text:span text:style-name="T558">transire per potem quin facerem Sortem. Quod probatur ex eo, quia secundum istum modum dicendi ‘Sortem transire per pontem’ non est nisi Sortes. Si ergo possum facere Sortem transire per pontem, possum facere Sortem.</text:span></text:p>
      <text:p text:style-name="P345">Respondeo: hoc argumentum difficultatem habet ex parte appellationis, nam si dicam: “facio ‘Sortem transire per potem’”, ly ‘facio’ appellat factionem covenire connotationi inclusae in hoc complexo ‘Sortem transire per pontem’. Sensus enim illius est quod Sortes transit per pontem et Sortes non transit per pontem nisi me efficiente vel saltem cogente ad huiusmodi transitionem.</text:p>
      <text:p text:style-name="P345">Sed cum dico: “‘Sortem transire per pontem’ facio”, ly ‘faciens’ appellat factionem illius rei quae est ‘Sortem transire per pontem’. Ideo ad veritatem illius propositionis requireretur Sortem facere. Sed de istis in materia appellationem ample dicetur.</text:p>
      <text:h text:style-name="Heading_20_3" text:outline-level="3">‘Sortem odire deum’ est Sortes</text:h>
      <text:p text:style-name="P346">Tertio arguitur sic et capio istud complexe significabile: “‘Sortem diligere deum’ si ‘Sortem diligere deum’ esset Sortes; ergo ‘Sortem odire Deum’ est Sortes”.</text:p>
      <text:p text:style-name="P347"><text:soft-page-break/>Tunc arguitur sic: “‘Sortem diligere Deum’ est sortes, ‘Sortem odire Deum est sortes’; <text:span text:style-name="T559">ergo ‘Sortem diligere Deum’ est ‘Sortes odire Deum’”, quod est falsum.</text:span></text:p>
      <text:p text:style-name="P348">Respondetur quod ‘Sortem diligere Deum’ est Sortes si Sortes diligit Deum, et ‘Sortem odire Deum’ est sortes si Sortes odi<text:span text:style-name="T560">a</text:span>t Deum.</text:p>
      <text:p text:style-name="P349">Et ratio huius est quia ‘Sortem diligere Deum’ est Sortes diligens deum. Modo ista est vera: “‘Sortes diligens Deum’ est Sortes”, si sortes diligit Deum, <text:span text:style-name="T560">e</text:span>t est falsa si Sortes odi<text:span text:style-name="T561">a</text:span>t <text:span text:style-name="T560">D</text:span>eum, <text:span text:style-name="T560">quia est una affirmativa cuius subiectum pro nullo supponit et ideo illa est falsa.</text:span></text:p>
      <text:p text:style-name="P349"><text:span text:style-name="T560">Ideo illae duae propositiones: “‘Sortem</text:span> <text:span text:style-name="T560">diligere Deum’ est sortes”, et “‘Sortem odire deum’ est Sortes” repugnant adinvicem utendo tempore praesenti et indivisibili, et quando una est vera, reliqua est falsa. Et sic patet solutio ad argumentum.</text:span></text:p>
      <text:p text:style-name="P350">Cautela ergo ad videndum an tales propositiones, in quibus ponuntur complexe significabilia, sint verae. Oportet, ut dictum est, resolvere accusativum in nominativum et verbum in suum participium, ita quod si quaeratur an Sortem currere sit Sortes, videndum est an ista sit vera: “Sortes currens est Sortes”, et tunc dicendum est quod Sortes currens est Sortes si Sortes currat <text:span text:style-name="T562">et ‘Sortem currere’ non est Sortes si Sortes non currat.</text:span></text:p>
      <text:p text:style-name="P350"><text:span text:style-name="T562">Sunt tamen aliquae propositiones quarum significata non exprimuntur per infinitivum et accusativum, quemadmodum esset in conditionalibus ut</text:span> <text:span text:style-name="T562">istius: “si Sortes currit Sortes movetur”, non exprimeretur significatum per infinitivum et accusativum de quibus tamen possint verificari talia si</text:span><text:span text:style-name="T563">gnificata vel complexa accepta pro talibus significatis, ex his quae in hypotheticis de conditionatis dicuntur facile co</text:span><text:span text:style-name="T564">g</text:span><text:span text:style-name="T563">noscitur.</text:span></text:p>
      <text:p text:style-name="P378"><text:span text:style-name="T618">[</text:span><text:span text:style-name="T598">iiii.rb 28b</text:span><text:span text:style-name="T618">]</text:span></text:p>
      <text:h text:style-name="Heading_20_3" text:outline-level="3">Deus non semper erit Deum velle Antichristum fore</text:h>
      <text:p text:style-name="P351">Facta igitur tali resolutione accusativum in nominativum, et infinitivi in participium, statim videtur veritas, et circa talia multa sophismata fiunt quibus similibus fiunt in terminis connotativis, ut ponatur quod Deus nunc de facto velit <text:span text:style-name="T566">Antichristum</text:span> fore, et arguatur sic: <text:span text:style-name="T565">Deus semper erit Deus, sed non semper erit ‘Deum velle </text:span><text:span text:style-name="T566">Antichristum</text:span><text:span text:style-name="T565"> fore’; ergo ‘Deum velle </text:span><text:span text:style-name="T566">Antichristum</text:span><text:span text:style-name="T565"> fore’ non est Deus. </text:span><text:span text:style-name="T567">V</text:span><text:span text:style-name="T565">el sic: aliquando Deus desinet ‘velle </text:span><text:span text:style-name="T566">Antichristum</text:span><text:span text:style-name="T565"> fore, </text:span><text:span text:style-name="T568">s</text:span><text:span text:style-name="T565">ed numquam desinet esse Deus; ergo ‘Deum velle </text:span><text:span text:style-name="T566">Antichristum</text:span><text:span text:style-name="T565"> fore’ non est Deus.</text:span></text:p>
      <text:p text:style-name="P352">Respondetur quod Deus non semper erit ‘Deum velle Antichristum fore’. Tamen ‘Deum velle Antichristum fore’ semper erit Deus.</text:p>
      <text:p text:style-name="P352">Similiter Deus desinet esse ‘Deum velle Antichristum fore’ et tamen ‘Deum velle Antichristum <text:span text:style-name="T571">fore’ numquam desinet esse Deus.</text:span></text:p>
      <text:p text:style-name="P353">Et si arguatur: ad ‘Deum velle Antichristum fore’ requiritur Antichristum fore, sed ad ‘Deum non requiritur Antichristum fore’; ergo Deus non est ‘Deum velle Antichristum fore’.</text:p>
      <text:p text:style-name="P353">Respondeo: illa propositio: “ad ‘Deum <text:span text:style-name="T572">velle Antichristum fore’, requiritur Antichristum fore”, si in sensu quem formaliter videtur habere capiatur </text:span><text:span text:style-name="T573">f</text:span><text:span text:style-name="T572">alsa est, quia nulla est res quae sit ‘Deum velle Antichristum’, aut quae possit esse ‘Deum velle Antichristum fore”, ad quam necessario requiratur </text:span><text:span text:style-name="T574">Antichristum fore. Si vero illa caperetur ut ly ‘requiritur’ dicit necessitatem consequentiae, itaque sit sensus: haec consequentia est bona et necessaria: Deus vult Antichristum fore; ergo erit. Sed ex hoc </text:span><text:soft-page-break/><text:span text:style-name="T574">non sequitur illa conclusio quod Deus non sit ‘Deum velle Antichristum fore”, sed potius sequeretur quod Deus non necessario est ‘Deum velle Antichristum fore’.</text:span></text:p>
      <text:h text:style-name="Heading_20_3" text:outline-level="3">Ly “homo est asinus” quid significat</text:h>
      <text:p text:style-name="P149">Quarto arguitur sic. Ista propositio: “homo est asinus”, significat aliquod complexe significabile quod distinguitur a significatis extremorum; ergo <text:span text:style-name="T238">praedicta opinio est falsa, antecedens patet quia ista propositio: “homo est asinus”, significat hominem esse asinum, et hominem esse asinum non significatur pro istum terminum ‘homo’, neque per istum terminum ‘asinus’; ergo ista propositio “homo est asinus” significat aliquod complexe significabile distinctum a significatis terminorum. Respondeo: necessarium est dicere, propter hoc argumentum tenentibus hunc modum dicendi, quod ista propositio: “homo est asinus”, non significat hominem esse asinum, ut bene probat ratio, si enim illa propositio: “homo est asinus”, significaret hominem esse asinum, iam propositio haberet aliquod significatum praeter significata terminorum, quod est contrarium isti propositioni, veruntamen circa hoc implicatur unum dubium, </text:span><text:span text:style-name="T239">an impossibilia sint significabilia. </text:span></text:p>
      <text:h text:style-name="Heading_20_3" text:outline-level="3">Utrum impossibile est significabile</text:h>
      <text:p text:style-name="P379"><text:span text:style-name="T619">&lt;</text:span><text:span text:style-name="T598">Buridanus</text:span><text:span text:style-name="T619">&gt; </text:span><text:span text:style-name="T239">Ad quod dubium est duplex modus </text:span><text:span text:style-name="T240">dicendi: unus modus dicendi est quod impossibilia non sunt significabilia, ideo secundum istum modum dicendi ista propositio: “homo est asinus”, non significat hominem esse asinum cum hominem esse asinum non sit possibile, et si quaeras quid significat ista: “homo est asinus”, dico quod significat omnes homines et omnes asinos, quia secundum istam opinionem posita est regula generalis:</text:span></text:p>
      <text:p text:style-name="Quotations">quod nullum complexum aliquid significat praeter illud quod suae partes seorsum significant.</text:p>
      <text:p text:style-name="P150">Sed contra istum modum dicendi arguitur omne illud quod post intelligi potest significari ista maior est nota, quia si aliquid intellectus intelligit, sed multa impossibilia intellectus intelligit, quia intellectus potest intelligere hominem esse asinum, intellectus etiam potest intelligere: “hominem esse irrationalem”, et sic de multis aliis impossibilibus.</text:p>
      <text:p text:style-name="P380"><text:span text:style-name="T241">Respondeo secundum istum modum dicendi: omnes istae de rigore sunt falsae, impossibile est intelligibile </text:span><text:span text:style-name="T250">chimera</text:span><text:span text:style-name="T241">, est intelligibilis hominem esse asinum significatur hominem </text:span><text:span text:style-name="T242">esse</text:span><text:span text:style-name="T241"> asinum intelligitur, quia omnes istae sunt propositiones affirmative quarum subiecta pro nullo supponunt, ideo sunt falsae.</text:span></text:p>
      <text:p text:style-name="P381"><text:span text:style-name="T620">[</text:span><text:span text:style-name="T598">iiii.va 29a</text:span><text:span text:style-name="T620">]</text:span></text:p>
      <text:p text:style-name="P151"><text:span text:style-name="T242">Et si obiicias </text:span><text:span text:style-name="T243">non est salvabile quin impossibile sit intelligibile et opinabile; igitur opinio ista no est sufficiens, antecedens patet et gratia exempli capio aliquos doctores quorum unus assentit uni opinioni, alter vero oppositae, aliquando ita est quod illud cui assentit aliquis illorum est omnino impossibile; ergo impossibile est intelligibile, multi enim credunt aliqua esse vera quae sunt impossibilia.</text:span></text:p>
      <text:p text:style-name="P152"><text:span text:style-name="T243">Respondeo: </text:span><text:span text:style-name="T244">quicunque doctores contrarias habent opiniones, non habent liqua impossibilia obiective terminantia eorum iudicia, unde sicut aliquis non habet notitiam terminatam ad aliquod intelligibile quod dicatur hominem esse asinum sic, neque aliquis illorum doctorum habet notitiam terminatam ad aliquod impossibile. </text:span></text:p>
      <text:h text:style-name="Heading_20_3" text:outline-level="3"><text:soft-page-break/>Quomodo quis intelligit hominem esse asinum</text:h>
      <text:p text:style-name="P153"><text:span text:style-name="T244">Et si dicas aliquis dicitur intelligere hominem esse asinum. Respondeo: aliquem intelligere hominem esse asinum potest intelligi dupliciter, </text:span><text:span text:style-name="T245">uno modo in sensu quam formaliter habet propositio, et sic dico quod est falsa. Alius sensus est quod quis intelligat hominem esse asinum, id est, quod quis intelligat hominem esse asinum eo modo quo ista propositio significa hominem esse asinum, scilicet, affirmative, et sic est vera, etiam quis dicitur intelligere non-ens quia intelligit modum secundum quem omnia entia negative significantur, et iste terminus non-intelligibile significat omnia intelligibilia </text:span><text:span text:style-name="T246">negative, de quo plura in secundo capitulo, et sic de aliis dicatur et secundum istam opinionem ponenda est. </text:span></text:p>
      <text:h text:style-name="Heading_20_3" text:outline-level="3">“Deus non est” significat ‘deum esse’</text:h>
      <text:p text:style-name="P153"><text:span text:style-name="T246">Regula generalis: “idem omnino significatur per unum contradictorium et per reliquum, sed liter et aliter”, ut ista propositio: “Deus est”, significat deum esse, dico consimiliter quod ista propositio: “Deus non est”, significat etiam Deum esse, sed aliter et aliter </text:span><text:span text:style-name="T247">quia ista propositio: “Deus est”, significat deum esse affirmative, et ista propositio: “Deus non est”, significat deum esse negative, non tamen ista propositio: “Deus non est”, significat deum esse formaliter, unde aliquam propositionem significare formaliter deum esse, non solum importat quod significatum per eam sit realiter Deum esse, sed etiam quod taliter significat Deum esse qualiter exprimitur affirmando Deum esse, ideo dicendum est, si quaeratur an illa propositio: </text:span><office:annotation office:name="__Annotation__1967_340173390" loext:resolved="false"><dc:creator>Unknown Author</dc:creator><dc:date>2021-09-13T21:11:01.045643704</dc:date><text:p text:style-name="P577"><text:span text:style-name="T709">“</text:span><text:span text:style-name="T709">Deus non est”, significat deum esse de significatione materiali, sed non formali.</text:span></text:p></office:annotation><text:span text:style-name="T247">“Deus non est”, significat deum esse, dico quod sic de significatione materiali, sed non de significatione formali</text:span><office:annotation-end office:name="__Annotation__1967_340173390"/><text:span text:style-name="T247">, et si arguas: ergo ista propositio: “Deus non est”, est vera patet quia significat Deum esse, et ita est quod Deus est; </text:span><text:span text:style-name="T248">ergo ista propositio: “Deus non est”, est vera. Respondeo: licet ista propositio: “Deus non est”, significet Deum esse, tamen false significat deum esse, quia non significat Deum esse taliter qualiter debet significare Deum esse, quia ad hoc quod aliqua pro</text:span><text:span text:style-name="T249">positio quae significat Deum esse sit vera requiritur quod significet Deum esse affirmative et non sufficit quod significet Deum esse negative; patet ergo quod quis dicitur assentire hominem esse asinum, quia assentire homini et asino eo modo quo significantur per istam propositionem: “homo est asinus”.</text:span></text:p>
      <text:p text:style-name="P383">Et quanvis iste sit improprius modus loquendi assentio ‘homini’ et ‘asino’, eo quod terminus significans notitiam iudicativam requirit aliquod complexum distans tanquam significans id in quod transit obiective notitia iudicativa, aliquando tamen non vere exprimitur per tale complexum, sicut haec non est concedenda in sensu quam formaliter habet: “iudico quod homo est asinus”, nec ista: “iudico de homine quod est asinus”, propter defectum suppositionis illorum complexorum significantium. </text:p>
      <text:p text:style-name="P385"><text:span text:style-name="T621">I</text:span><text:span text:style-name="T624">d ad quod terminantur actus iudicandi, veritas tamen magis curanda est quam modum loquendi; si ergo dicatur assentio ‘homini’ et ‘asino’ affirmative intelligo quod nihil terminat actum iudicandi praeter illam rem quae est homo, et illam rem quae est asinus, unde posset distingui ista propositio: “Deus iudicatur a iudicante quod Deus est Deus”, ut distinguit unus doctor </text:span><text:span text:style-name="T623">&lt;</text:span><text:span text:style-name="T598">Andreas </text:span>de Novo Castro<text:span text:style-name="T623">&gt;</text:span><text:span text:style-name="T624">, quia unus sensus est quod illud quod immediate terminat notitiam illam iudicativam est Deus, et sic est verum.</text:span></text:p>
      <text:p text:style-name="P386"><text:span text:style-name="T625">[</text:span><text:span text:style-name="T598">iiii.vb 29b</text:span><text:span text:style-name="T625">]</text:span></text:p>
      <text:p text:style-name="P384"><text:span text:style-name="T622">A</text:span>lius sensus est quod actus iudicandi sit actus incomplexus significans formaliter et aequivalenter pure nominaliter, quemadmodum iste terminus ‘Deus’ significa Deum et sic est falsum, immo, ille <text:soft-page-break/>actus iudicandi est complexus et praesupponit apprehensionem complexam veram et falsam, quam dicitur compositio vel divisio sicut in materia appellationis rationis pertractatur.</text:p>
      <text:h text:style-name="Heading_20_3" text:outline-level="3">De propositione possibili impossibili et caetera secundum multorum opinionem</text:h>
      <text:p text:style-name="P387"><text:span text:style-name="T626">&lt;</text:span><text:span text:style-name="T598">Opinio antiquorum </text:span><text:span text:style-name="T56">doctorum</text:span><text:span text:style-name="T626">&gt; </text:span><text:span text:style-name="T627">Sed alius est modus </text:span><text:span text:style-name="T250">dicendi quod impossibile est intelligibile et significabile, ideo omnes istae propositiones sunt verae: iste terminus ‘chimera’ significat ‘chimera</text:span><text:span text:style-name="T251">m’, iste terminus ‘homo irrationalis’ significat ‘hominem irrationalem’, ista propositio “homo est asinus” significat ‘hominem esse asinum’, et si arguas bene sequitur: </text:span><text:span text:style-name="T252">ista propositio: “homo est asinus”, significat ‘hominem esse asinum’; ergo ‘hominem esse asinum’ significatur per istam propositionem: “homo est asinus”, illa consequentia patet ab activo ad passivum, sed falsitas consequentis probatur quia consequens est una propositio affirmativa cuius subiectum pro nullo supponit; ergo est falsa, et similiter si arguatur de ista propositione: “‘chimera’ significatur ‘chimera’”, intelligitur et sic de similibus, ab hoc respondet quod dicendo ‘hominem esse asinum’ significatur, licet ‘hominem esse asinum’ non supponat pro illo quod est, nec quod fuit, nec quod erit, nec quod potest esse, supponit tamen pro illo quod potest intelligi esse, et hoc sufficit unde dicit quod ista verba ‘significatur’ intelligitur ampliant ad illud quod est, fuit, erit, quod potest esse, et quod potest intelligi esse.</text:span></text:p>
      <text:p text:style-name="P362">Sed contra istum modum dicendi <text:span text:style-name="T253">arguitur sic: aliquod impossibile non est intelligibile, et non est maior ratio de uno quam de alio; ergo nullum impossibile est intelligibile nec per consequens significabile, maior probatur et capio illud impossibile non intelligibile, tunc arguitur sic: istud impossibile, puta, non-intelligibile non est intelligibile, igitur aliquod impossibile non est intelligibile, antecedens patet, quia tunc ista esset vera: “non intelligibile est intelligibile”, et hoc capiendo terminos significative, sed videtur valde difficile concedere istam propositionem: “non-intelligibile est intelligibile”.</text:span></text:p>
      <text:p text:style-name="P388"><text:span text:style-name="T253">Ad hoc argumentum dicunt aliqui </text:span><text:span text:style-name="T628">&lt;</text:span><text:span text:style-name="T598">Hentisberus</text:span><text:span text:style-name="T628">&gt;</text:span><text:span text:style-name="T253"> ista: “quod est vera intelligibile est non intelligibile”, et ista similiter: “quod non potest intelligi potest intelligi”.</text:span></text:p>
      <text:p text:style-name="P389"><text:span text:style-name="T261">Sed contra praedictam solutionem arguitur, bene sequitur: “non-intelligibile est intelligibile; ergo intelligibile est non-intelligibile”, patet consequentia per conversionem simplicem, sed consequens est falsum quia bene sequitur: “</text:span><text:span text:style-name="T254">intelligibile est non-intelligibile; ergo intelligibile non est intelligibile”. </text:span></text:p>
      <text:p text:style-name="P390"><text:span text:style-name="T629">P</text:span><text:span text:style-name="T254">atet consequentia ab affirmativa de praedicato infinito ad negativam de praedicato finito, </text:span><text:span text:style-name="T255">sed consequens est falsum. </text:span><text:span text:style-name="T629">P</text:span><text:span text:style-name="T255">atet quia sua contradictoria est vera, scilicet, ista: “omne intelligibile est intelligibile”, ideo magis videtur tenendum secundum istum modum dicendi de complexe significabilibus quod impossibile non est obiectum terminans intellectionem, immo etiam secundum primum modum dicendi de complexe significabilibus posset dici quod nihil est intelligibile nisi sit ens primo, secundo vel tertio modo, quapropter primus modus dicendi concederet hanc propositionem: ““homo est asinus” significat ‘hominem esse asinum’”, sed secundus modus dicendi non concederet neque aliquid facit illa ampliatio quae ponitur huius complexi ‘hominem esse asinum’, sicut clare in materia ampliation</text:span><text:span text:style-name="T256">u</text:span><text:span text:style-name="T255">m monstratur.</text:span></text:p>
      <text:p text:style-name="P391"><text:span text:style-name="T631">[</text:span><text:span text:style-name="T598">v.ra 30a</text:span><text:span text:style-name="T631">]</text:span></text:p>
      <text:p text:style-name="P392"><text:span text:style-name="T630">P</text:span><text:span text:style-name="T255">onunt enim </text:span><text:span text:style-name="T257">aliqui quod ista sit vera: “‘hominem esse asinum’ significatur eo quod ly ‘hominem esse asinum’ stat pro omni eo quod potest intelligi ‘hominem esse asinum’”, sed omne ens </text:span><text:span text:style-name="T258">potest </text:span><text:soft-page-break/><text:span text:style-name="T258">intelligi ‘hominem </text:span><text:span text:style-name="T259">esse asinum’; ergo stat pro omni ente, hoc nihil est dicere, quia si illa sit ver eo quod ly ‘hominem esse asinum’ pro aliquo supponit, iam non exprimitur quod illa notitia </text:span><text:span text:style-name="T260">terminetur obiective ad aliquod impossibile, immo, totali facta resolutione sensus ad possibilis tantum invenies terminarem notitiam.</text:span></text:p>
      <text:p text:style-name="P393"><office:annotation office:name="__Annotation__2205_4133436512" loext:resolved="false"><dc:creator>Unknown Author</dc:creator><dc:date>2021-09-15T21:31:37.287250114</dc:date><text:p text:style-name="P577"><text:span text:style-name="T709">Impossibile non est intelligibile nec pariforma volibile.</text:span></text:p></office:annotation><text:span text:style-name="T260">Ideo dico quod impossibile non est intelligibile et etiam pariforma non est volibile.</text:span><office:annotation-end office:name="__Annotation__2205_4133436512"/></text:p>
      <text:p text:style-name="P435">Et si dicas: “Lucifer volebat esse aequalem Deo; igitur impossibile est volibile”.</text:p>
      <text:p text:style-name="P394"><text:span text:style-name="T260">Respondeo: falsa est haec propositio in sensu quem formaliter habet Lucifer volebat esse aequalem Deo, si ergo in aliquo sensu veritatem habeat in isto quod Deus et aequalitas terminantia illam volitionem, ideo non esset concedendum quod unus dotor </text:span><text:span text:style-name="T632">&lt;</text:span><text:span text:style-name="T598">Scotus</text:span><text:span text:style-name="T632">&gt;</text:span><text:span text:style-name="T260"> concedit quaerens utrum impossibile sit intelligibile dicit quod non, intellectione simplici, sed bene intellectione comparativa seu collativa, </text:span><text:span text:style-name="T262">similiter impossibile non est volibile volitione simplici, sed bene volitione comparativa, et si dicas: “dicit Aristoteles tertio Ethicorum quod voluntas est impossibilium”, respondeo: ista propositio: “voluntas est impossibilium”, sic debe intelligi: voluntas est impossibilium, id est, voluntas est possibilium quodammodo impossibili significatorum, id est, ut significantur per propositionem impossibilem, sed de hoc magis in sequenti argumento.</text:span></text:p>
      <text:p text:style-name="P395"><text:span text:style-name="T263">Quinto arguitur sic: iste modus ponendi complexe significabilia destruit modum diffiniendi quid est propositio vera, quid falsa, quid possibilis, quid impossibilis, quid necessaria, quid contingens; ergo iste modus non est sufficiens, antecedens patet, et primo ostendo quod destruit modum diffiniendi quid est propositio vera, nam propositio vera sic diffinitur: “est quae qualitercumque ipsa significat ita est in re”, tunc si iste modus non potest salvare istam diffinitionem; ergo iste modus est insufficiens antecedens, patet quia si ista diffinitio esset bona sequeretur quod ista esset vera: “homo est, </text:span><text:span text:style-name="T264">est</text:span><text:span text:style-name="T263"> asinus”, </text:span><text:span text:style-name="T264">patet, quia ista est in re sicut per ipsam significatur; igitur est vera antecedens patet, nam per ipsam non significatur nisi homo et asinus, sed ista vere sunt in re; ergo ita est in re sicut per eam significantur.</text:span></text:p>
      <text:p text:style-name="P396"><text:span text:style-name="T265">Sed quod iste modus non salvet diffinitionem propositionis possibilis ostenditur sic, nam sic diffinitur: “propositio possibilis est illa quae qualiter per ipsam significatur possibile est ita esse”, sed iste modus non potest salvare istam diffinitionem; igitur non est sufficiens minor probatur, nam si ista diffinitio esset bona sequeretur quod ista non esset possibilis: “Antichristus est”, patet quia si esset possibilis, </text:span><text:span text:style-name="T266">possibile esset ita esse, sicut per eam significatur, sed consequens est falsum quia ista est falsa: “possibile est Antichristum esse”, cum praedicatum non supponit cum de nullo verum sit dicere, hoc est Antichristum esse, seu Antichristus existens.</text:span></text:p>
      <text:p text:style-name="P396"><text:span text:style-name="T633">I</text:span><text:span text:style-name="T266">tem capio istam propositionem: “chimera non est”, et admittamus quod ista propositio: “chimera non est”, significat chimeram non esse, tunc arguo sic: non est possibile ita esse sicut per ipsam significatur; igitur non est possibilis antecedens patet, quia per ipsam significatur chimeram non esse, sed non est possibile </text:span><text:span text:style-name="T267">chimeram non esse; igitur minor patet, quia ista est falsa: “possibile est chimeram non esse”, quia est una affirmativa cuius praedicatum pro nullo supponit, quia de nullo verum est dicere quod sit chimeram non esse, seu chimera non existens.</text:span></text:p>
      <text:p text:style-name="P397"><text:span text:style-name="T267">Sed quod iste modus non salvet diffinitionem propositionis necessarie ostendo, nam propositio necessaria sic significatur de significatione totali, sed iste modus non salvat istam </text:span><text:span text:style-name="T268">diffinitionem; igitur minor patet, tunc ista non esset necessaria: “Petrus non est Paulus”, quia non est necesse ita esse sicut per eam significatur, quia res per eam significata contingens est, scilicet, Petrum non esse Paulum, nam quia Petrum non esse Paulum est Petrus non existens Paulus, quod est res contingens </text:span><text:soft-page-break/><text:span text:style-name="T268">non necessaria. </text:span><text:span text:style-name="T634">E</text:span><text:span text:style-name="T268">t confirmatur: “</text:span><text:span text:style-name="T269">chimera</text:span><text:span text:style-name="T268"> non est”, non esset necessaria quia ista est falsa: “Necesse est </text:span><text:span text:style-name="T269">chimera</text:span><text:span text:style-name="T268">m non esse”, </text:span><text:span text:style-name="T270">quia est una affirmativa cuius praedicatum pro nullo supponit.</text:span></text:p>
      <text:p text:style-name="P398"><text:span text:style-name="T634">[</text:span><text:span text:style-name="T598">v.rb 30b</text:span><text:span text:style-name="T634">]</text:span></text:p>
      <text:p text:style-name="P397"><text:span text:style-name="T270">Item capio istam disiunctivam: “tu curris vel tu non curris”, non est necesse ita esse sicut per eam significatur; ergo non est necessaria, antecedens patet quia per eam significatur te currere vel te non currere, sed quacumque re demonstrata de qua verum est dicere quod est te currere vel te non currere, id est: “tu currens vel tu non currens”, illa est contingens; ergo contingens est ista esse sicut per ipsam significatur quantum est ex parte rei significate. Etiam non videtur salvari diffinitio propositionis impossibiles sic enim diffinitur: </text:span><office:annotation office:name="__Annotation__1893_846259663" loext:resolved="false"><dc:creator>Unknown Author</dc:creator><dc:date>2021-09-16T21:11:39.300042452</dc:date><text:p><text:span text:style-name="T709">Propositio impossibilis est per quam impossibile est ita esse sicut per eam significatur.</text:span></text:p></office:annotation><text:span text:style-name="T270">“propositio impossibilis est per quam impossibile est ita esse sicut per eam significatur”</text:span><office:annotation-end office:name="__Annotation__1893_846259663"/><text:span text:style-name="T270">, hanc diffinitionem non salvat, quia tunc ista non esset impossibilis: “Deus non est Deus”, patet per eam non significatur nisi Deus, et Deus non est aliquid impossibile, immo, necessarium. Et consimiliter arguitur quod non salvat diffinitionem propositionis contingentis, quia propositio contingens sic diffinitur: </text:span><office:annotation office:name="__Annotation__1998_846259663" loext:resolved="false"><dc:creator>Unknown Author</dc:creator><dc:date>2021-09-16T21:14:08.886012090</dc:date><text:p><text:span text:style-name="T709">Propositio contingens est propositio quae qualiter significat contingens.</text:span></text:p></office:annotation><text:span text:style-name="T270">“Propositio contingens est propositio quae qualiter </text:span><text:span text:style-name="T271">significat contingens”</text:span><office:annotation-end office:name="__Annotation__1998_846259663"/><text:span text:style-name="T271">, est ita esse quam diffinitionem non salvat, </text:span><text:span text:style-name="T272">nam ista est contingens: “Deus creat”, et tamen non est contingens ita esse sicut per eam significatur, ipsa enim significat deum creare et deum creare non est res contingens, immo necessaria secundum istum modum dicendi; igitur Deum creare est contingens et ex hoc argueretur quod Deum creare non sit Deus quia Deum creare non est contingens et: “Deus est res necessaria; ergo Deum creare non est Deus”, praeter haec argumenta posset argui quod iste modus non salvat diffinitionem bonae consequentiae in qua sic dicitur: “bona consequentia est per quam impossibile est ita esse sicut significatur per antecedens quin ita sit sicut significatur per consequens”, </text:span><text:span text:style-name="T273">quod ostenditur quia tunc ista consequentia esse</text:span><text:span text:style-name="T274">t</text:span><text:span text:style-name="T273"> bona: “homo est homo et asinus est asinus; ergo homo est asinus”, </text:span><text:span text:style-name="T275">patet quia impossibile est ita esse sicut significatur per antecedens quin ita sit sicut significatur per consequens, scilicet homines et asini.</text:span></text:p>
      <text:p text:style-name="P399"><text:span text:style-name="T275"><text:s/></text:span><text:span text:style-name="T635">&lt;</text:span><text:span text:style-name="T599">Opinio </text:span><text:span text:style-name="T275">Buridanis</text:span><text:span text:style-name="T635">&gt; </text:span><text:span text:style-name="T275">Propter haec argumenta doctor tenens istum modum dicendi ponit </text:span><text:span text:style-name="T276">veritatem vel falsitatem propositionis non debere aspici ex parte eius significati, videlicet, quod sit in re sicut per eam significatur vel quia aliter sit in re quam per ipsam significatur, sed secundum diversitatem propositionum diversae sunt regulae assignandae quare propositiones sunt verae, quae ex suppositionibus vel acceptionibus terminorum sumuntur aliter et aliter. De propositione universali, aliter de particulari, secundum regulas quae communiter solent poni.</text:span></text:p>
      <text:p text:style-name="P400"><text:span text:style-name="T276">Alius doctor </text:span><text:span text:style-name="T636">&lt;</text:span><text:span text:style-name="T598">Hentisberus</text:span><text:span text:style-name="T636">&gt;</text:span><text:span text:style-name="T276"> dicit quod diffiniuntur propositio vera et falsa per taliter vel aliqualiter, </text:span><text:span text:style-name="T277">quia non innotescit nobis, alius modus ostendendi veritatem </text:span><text:span text:style-name="T278">et falsitatem nisi per taliter et qualiter, quamvis hoc non possit salvari.</text:span></text:p>
      <text:p text:style-name="P485"><text:span text:style-name="T278">Alius doctor </text:span><text:span text:style-name="T637">&lt;</text:span><text:span text:style-name="T598">Petrus </text:span>Mantuanus<text:span text:style-name="T637">&gt;</text:span><text:span text:style-name="T278"> his argumentis coactus diffinit </text:span><text:span text:style-name="T279">aliter membra praedicata dicens: “propositio vera est oratio indicativa perfecta univoca per quam adaequate intellectus redditur rectus”.</text:span></text:p>
      <text:p text:style-name="P485"><text:span text:style-name="T279">“</text:span><text:span text:style-name="T280">Propositio autem </text:span><text:span text:style-name="T281">falsa est oratio indicativa perfecta univoca per quam adaequate intellectus non redditur rectus”.</text:span></text:p>
      <text:p text:style-name="P401"><text:span text:style-name="T638">[</text:span><text:span text:style-name="T598">v.va 31a</text:span><text:span text:style-name="T638">]</text:span></text:p>
      <text:p text:style-name="P485"><text:span text:style-name="T281">“Propositio possibilis </text:span><text:span text:style-name="T282">vera est oratio indicativa perfecta univoca per quam intellectus adaequate aut per secum convertibilem sic significantem potest reddi verus; aut saltem possit deducta terminorum repugnantia”.</text:span></text:p>
      <text:p text:style-name="P485"><text:soft-page-break/><text:span text:style-name="T282">“</text:span><text:span text:style-name="T283">Propositio impossibilis est oratio indicativa </text:span><text:span text:style-name="T284">perfecta univoca per quam sic significantem adaequate intellectus non potest reddi verus nec per secum convertibilem nec posset etiam deducta terminorum repugnantia”.</text:span></text:p>
      <text:p text:style-name="P486">“Propositio contingens est oratio indicativa perfecta univoca per quam sic significantem adaequate intellectus potest reddi verus et etiam reddi falsus vel per secum convertibilem posset, deducta terminorum repugnantia”.</text:p>
      <text:p text:style-name="P485"><text:span text:style-name="T284">“Necessaria autem propositio est oratio indicativa perfecta univoca per quam sic significantem adaequate non potest intellectus reddi falsus nec per secum convertibilem posset, deducta terminorum repugnantia”, quod dicitur propter tales propositione</text:span><text:span text:style-name="T639">s</text:span><text:span text:style-name="T284">.</text:span></text:p>
      <text:p text:style-name="P154"><text:span text:style-name="T285">Aliqua propositio est vera, propositio est et caetera, haec propositio: “Sortes non est quae sit in mente Sortis”, sed iste modus petit principium, quia si inquiratur cur intellectus redditur rectus iam respondendum est quia concipit, ita esse sicut est, et tunc remanent difficultates praetactae insolutae, ut patet intuenti, s</text:span><text:span text:style-name="T286">ed quod necesse sit et veritatem et falsitatem, et necessitatem et contingentiam, possibilitatem et impossibilitatem ex parte significati propositionis </text:span><text:span text:style-name="T222">sumi quod negabat unus doctor, ostenditur maxime de necessitate et impossibilitate sic: “Propositio non dicitur necessaria vel impossibilis per intrinsecam denominationem, secundum formalem necessitatem vel impossibilitatem suae entitatis, quia ipsa formaliter est res contingens dicitur; ergo necessaria vel impossibilis per extrinsecam denominationem, et non nisi quia ei correspondet aliquod intelligibile et necessarium vel impossibile pro suo per se significato, cuius oppositum probatum est de aliqui</text:span><text:span text:style-name="T287">bus</text:span><text:span text:style-name="T222"> propositionibus, quae sunt necessarie quibus non correspondet tanquam significatum, nisi aliquod intelligibile contingens”. </text:span></text:p>
      <text:p text:style-name="P402"><text:span text:style-name="T222">Etiam probatum est quod nulli propositioni impossibili correspondet aliquod intelligibile, impossibile tanquam eius per se significatum. </text:span><text:span text:style-name="T223">Ad quod respondet alius doctor </text:span><text:span text:style-name="T640">&lt;</text:span><text:span text:style-name="T598">Andreas </text:span><text:span text:style-name="T56">de Novo Castro</text:span><text:span text:style-name="T640">&gt;</text:span><text:span text:style-name="T223"> quod per propositiones illas quae sunt necessariae, de quibus probatum est quod non significatur per eas, nisi res contingens apprehenditur, quoddam quasi intelligibile necessarium in proportione et figura vel forma loquendi, quia intellectus fertur super obiecta intelligibilia, quasi sibi corresponderet tale intelligibile necessarium </text:span><text:span text:style-name="T224">significabile complexum, sed non est ita secundum veritatem et proprietatem rei sicut intellectus apprehendendo universaliter videtur per conceptum communem, apprehendere aliquod universale intelligibile extra animam et tamen no est ita in re, unde declarat doctor iste subtiliter causam erroris quam habet primus modus dicendi, quia sicut respectu rerum singularium formamus conceptus individuales et specificos et generales.</text:span></text:p>
      <text:p text:style-name="P403"><text:span text:style-name="T293">I</text:span><text:span text:style-name="T224">deo ex hoc aliqui sunt imaginati huiusmodi varietati conceptuum correspondere extra animam proportionabiliter de istis modis obiectorum intelligibilium, quorum unum esset singulare et inferius, aliud minus commune, aliud magis commune, et inquisiverunt quid sunt et ubi sunt ita in proposito, quia de rebus existentibus et possibilibus apprehensiones varia formamus quasdam incomplexas et quasdam complexas, et harum quasdam affirmativas et quasdam negativas, et quasdam veras et quasdam falsas, quasdam contingentes et quasdam necessarias, quasdam possibiles et quasdam impossibiles, ex hoc imaginati sunt quod huiusmodi diversitati apprehensionum correspondet proportionabiliter differentia intelligibilium obiective terminantium, et quia non potuerunt salvare esse incomplexe significabilia, posuerunt ista esse quorundam intelligibilium complexe significabilium.</text:span></text:p>
      <text:p text:style-name="P403"><text:span text:style-name="T641">[</text:span><text:span text:style-name="T598">v.vb 31b</text:span><text:span text:style-name="T641">]</text:span></text:p>
      <text:p text:style-name="P403"><text:soft-page-break/><text:span text:style-name="T641">S</text:span><text:span text:style-name="T224">ed non ita est secundum veritatem et rei proprietatem, sed tantum secundum similitudinem et modum intelligendi intelligimus enim variae, et res dicuntur variari quasi esset talis diversitas in re.</text:span></text:p>
      <text:p text:style-name="P155"><text:span text:style-name="T292">Sed adhuc iste doctor non videtur satisfacere, quia ut dicit per tales propositiones necessarias, aut etiam impossibiles, solum apprehenditur aliquod intelligibile quasi necessarium, et non quod ita sit in re, sed tantum secundum quandam figuram et modum loquendi; infero ergo etiam tales propositiones secundum rei veritatem non debent dici necessariae vel impossibiles sed tantum secundum figuram et modum loquendi, quia ut argumentum est, propositio non dicitur necessaria vel impossibilis per denominationem intrinsecam, sed tantum per denominationem extrinsecam a suo significato. </text:span><text:span text:style-name="T294">S</text:span><text:span text:style-name="T292">ed per ipsum suum significatum non dicitur necessarium secundum veritatem, sed tantum secundum similitudinem et figuram, et ita non sufficienter assignat rationem necessitatis contingentiae possibilitatis vel impossibilitatis propositionum.</text:span></text:p>
      <text:p text:style-name="P156"><text:span text:style-name="T292">Item sic arguo: </text:span><office:annotation office:name="__Annotation__3257_1325379973" loext:resolved="false"><dc:creator>Unknown Author</dc:creator><dc:date>2021-09-30T18:18:27.628126679</dc:date><text:p text:style-name="P577"><text:span text:style-name="T709">Res concipitur per propositionem, sed non tantum in conceptu est consideranda, nam intellectus movetur a re. </text:span></text:p></office:annotation><text:span text:style-name="T292">aliter concipit</text:span><text:span text:style-name="T225">ur res aliqua per propositionem contingentem et aliter per propositionem impossibilem, et illa alietas non tantum in conceptu est consideranda, intellectus enim movetur a re</text:span><office:annotation-end office:name="__Annotation__3257_1325379973"/><text:span text:style-name="T225">, si ergo res non aliter se habet ut concipitur per unam propositionem et per aliam non videtur, unde una propositio dicatur possibilis, et alia impossibilis, et non capio ly ‘ut’ causaliter, </text:span><text:span text:style-name="T226">ita quod causa quare res aliter se habet sit quia cognoscitur per talem notitiam. </text:span><text:span text:style-name="T291">Et confirmatur quia </text:span><office:annotation office:name="__Annotation__3258_1325379973" loext:resolved="false"><dc:creator>Unknown Author</dc:creator><dc:date>2021-09-30T18:20:32.045716119</dc:date><text:p text:style-name="P577"><text:span text:style-name="T709">Complexe significabile est habitudo propositioni ad rem?</text:span></text:p></office:annotation><text:span text:style-name="T291">seclusa omni operatione intellectus, quaero an necesse sit ita esse taliter qualiter significabatur per istam: “Sortes possibiliter est albus”</text:span><office:annotation-end office:name="__Annotation__3258_1325379973"/><text:span text:style-name="T291">, aut non, si dicatur quod non quaeratur unde sumit illa propositio suam necessitatem quando est. </text:span><text:span text:style-name="T290">Si dicatur quod sic, ergo aliqua necessitas est in re significata propter quam res apprehensa secundum talem necessitatem dicitur necessaria.</text:span></text:p>
      <text:p text:style-name="P313"><office:annotation office:name="__Annotation__4166_2834789904" loext:resolved="false"><dc:creator>Unknown Author</dc:creator><dc:date>2021-09-30T13:10:03.778746116</dc:date><text:p><text:span text:style-name="T709">Estene Pardus realis?</text:span></text:p><text:p><text:span text:style-name="T709">A re sumenda est veritas et falsitas, possibilitas et impossibilitas, necessitas et contingentia, ita quod in re, seclusa omni operatione intellectus, reperitur veritas vel falsitas, necessitas vel contingentia, possibilitas vel impossibilitas.</text:span></text:p><text:p><text:span text:style-name="T709"/></text:p><text:p><text:span text:style-name="T709">Seclusa omni operatione intellectus? Distinctio formalis Scoti non operatur hic, ideo est omnino in re et non distinctio qua mens operatur.</text:span></text:p></office:annotation><text:span text:style-name="T290">Dico ergo, salvo meliori iudicio, quo a re sumenda est veritas et falsitas, possibilitas et impossibilitas, necessitas et contingentia, ita quod in re, seclusa omni operatione intellectus, reperitur veritas vel falsitas, necessitas vel contingentia, possibilitas vel impossibilitas.</text:span><office:annotation-end office:name="__Annotation__4166_2834789904"/></text:p>
      <text:p text:style-name="P313"><text:span text:style-name="T490">A</text:span><text:span text:style-name="T290">d quod deducendum pono talem disti</text:span><text:span text:style-name="T227">n</text:span><text:span text:style-name="T290">ctionem:</text:span></text:p>
      <text:p text:style-name="P468">Duplex est necessitas, scilicet: absoluta et simpliciter dicta, <text:span text:style-name="T493">a</text:span>lia est necessitas relativa. <text:span text:style-name="T491">S</text:span>eu aliquid dicitur necessarium dupliciter, scilicet, absolute et relative.</text:p>
      <text:p text:style-name="P469"><text:span text:style-name="T295">S</text:span><text:span text:style-name="T289">imiliter de contingentia dicendum est quod est duplex: absoluta et relativa.</text:span></text:p>
      <text:p text:style-name="P469"><text:span text:style-name="T492">E</text:span><text:span text:style-name="T289">t pariforma impossibilitas dicenda est duplex: absoluta et relativa.</text:span></text:p>
      <text:p text:style-name="P157"><office:annotation office:name="__Annotation__1616_131245571" loext:resolved="false"><dc:creator>Unknown Author</dc:creator><dc:date>2021-09-12T20:38:53.334265168</dc:date><text:p text:style-name="P577"><text:span text:style-name="T709">Propositio “Homo non est asinus”, homo negative se habens in ordine ad asinum.</text:span></text:p></office:annotation><text:span text:style-name="T289">Exemplum circumscripta omni operatione intellectus, homo et asinus sunt res diversae, hoc cuilibet est manifestum, si ergo sunt res diversae habent quandam divisionem inter se, propter quam diversitatem, intellectus potest cognoscere hominem non esse asinum, est ergo prius in re divisio quam in intellectu, immo ille actus cognoscendi hoc nomen ‘divisionis’ propter </text:span><text:span text:style-name="T228">res ab eo repraesentatas sumpsit, ideo ‘homo’ relative dicitur </text:span><text:span text:style-name="T229">ad asinu</text:span><text:span text:style-name="T230">m</text:span><text:span text:style-name="T229"> negative seu divisive, ideo negatio in re importata per istam propositionem: “homo non est asinus”, est homo negative </text:span><text:span text:style-name="T231">se habens in ordine ad asinum, a qua negatione notitia illa qua cognoscitur homo negative in ordine ad asinum, habet quod dicatur negatio</text:span><office:annotation-end office:name="__Annotation__1616_131245571"/>.</text:p>
      <text:p text:style-name="P404"><text:span text:style-name="T296">E</text:span><text:span text:style-name="T231">t hoc videtur dicere Commentator sexto Metaphysicae, commento octavo dicens quod vera affirmativa significat compositionem in entibus, et vera negativa divisionem in entibus.</text:span></text:p>
      <text:p text:style-name="P405"><text:span text:style-name="T642">[</text:span><text:span text:style-name="T598">vi.ra 32a</text:span><text:span text:style-name="T642">]</text:span></text:p>
      <text:p text:style-name="P158"><text:span text:style-name="T288">Et ‘homo’ similiter in ordine ad ‘asinum’ se habet negative, non solum negative, sed vere negative. Et ideo est veritas relativa in re, puta, ipse asinus relative se habens in ordine ad hominem, et vere </text:span><text:soft-page-break/><text:span text:style-name="T288">est amplius necessitas relativa, nam homo non solum </text:span><text:span text:style-name="T232">negative et vere refertur ad asinum, sed etiam relative necessario, ita quod </text:span><office:annotation office:name="__Annotation__1644_131245571" loext:resolved="false"><dc:creator>Unknown Author</dc:creator><dc:date>2021-09-12T20:41:22.400895600</dc:date><text:p text:style-name="P577"><text:span text:style-name="T709">Homo est quid necessarium necessitate relativa in ordine ad asinum.</text:span></text:p></office:annotation><text:span text:style-name="T232">homo est quid necessarium necessitate relativa in ordine ad asinum negative, homo enim necessario non est asinus</text:span><office:annotation-end office:name="__Annotation__1644_131245571"/><text:span text:style-name="T232">, licet non sit quid necessarium necessitate absoluta. </text:span><office:annotation office:name="__Annotation__1645_131245571" loext:resolved="false"><dc:creator>Unknown Author</dc:creator><dc:date>2021-09-12T20:42:15.706430943</dc:date><text:p text:style-name="P577"><text:span text:style-name="T709">Necessarium necessitate absoluta est quod non potest non existere in rerum natura.</text:span></text:p></office:annotation><text:span text:style-name="T233">Illud enim dicitur necessarium necessitate absoluta quod non potest no existere in rerum natura</text:span><office:annotation-end office:name="__Annotation__1645_131245571"/><text:span text:style-name="T233">, homo igitur et asinus habent necessitatem relativam in re a qua necessitate propositio habet quod dicatur necessaria. Et si quaeras an illa res quae est homo se habet relative affirmative ad asinum.</text:span></text:p>
      <text:p text:style-name="P158"><text:span text:style-name="T233">Respondeo: </text:span><office:annotation office:name="__Annotation__1751_131245571" loext:resolved="false"><dc:creator>Unknown Author</dc:creator><dc:date>2021-09-12T20:48:49.833561555</dc:date><text:p text:style-name="P577"><text:span text:style-name="T709">Homo se habet relative affirmative false ad asinum. Et non solum relative false.</text:span></text:p></office:annotation><text:span text:style-name="T233">homo se habeat relative affirmative ad asinum sed non relative vere, sed relative false</text:span><office:annotation-end office:name="__Annotation__1751_131245571"/><text:span text:style-name="T233">, ita quod est </text:span><text:span text:style-name="T234">ponenda falsitas relativa in re quae est </text:span><office:annotation office:name="__Annotation__1791_131245571" loext:resolved="false"><dc:creator>Unknown Author</dc:creator><dc:date>2021-09-12T20:53:23.790544459</dc:date><text:p text:style-name="P577"><text:span text:style-name="T709">Asinus se habet relative affirmative false et impossibiliter ad hominem.</text:span></text:p></office:annotation><text:span text:style-name="T234">ipse asinus relative affirmative, et false se habens in ordine ad hominem, et non solum relative false se habens in ordine ad hominem, </text:span><text:span text:style-name="T235">sed relative impossibiliter</text:span><office:annotation-end office:name="__Annotation__1791_131245571"/><text:span text:style-name="T235">, ita quod asinus est impossibilis impossibilitate relativa a qua impossibilitate relativa in re existente, propositio illa: “homo est asinus”, dicitur </text:span><text:span text:style-name="T236">impossibilis, ideo bene concedo quod non est aliquid impossibile in re impossibilitate absoluta, </text:span><office:annotation office:name="__Annotation__1713_131245571" loext:resolved="false"><dc:creator>Unknown Author</dc:creator><dc:date>2021-09-12T20:45:37.277861096</dc:date><text:p text:style-name="P577"><text:span text:style-name="T709">Impossibile impossibilitate absoluta est quod non potest existere in rerum natura.</text:span></text:p></office:annotation><text:span text:style-name="T236">illud enim dicitur impossibile impossibilitate absoluta quod non potest existere in rerum natura</text:span><office:annotation-end office:name="__Annotation__1713_131245571"/><text:span text:style-name="T236">, sed aliquid bene </text:span><text:span text:style-name="T237">potest</text:span><text:span text:style-name="T236"> esse in re impossibile impossibilitate relativa.</text:span></text:p>
      <text:h text:style-name="Heading_20_3" text:outline-level="3">Qu<text:span text:style-name="T372">o</text:span><text:span text:style-name="T207">d</text:span> a re ab extra sumenda est veritas et falsitas</text:h>
      <text:p text:style-name="P141">Et si obiiciatur auctoritate Aristotelis primo Peri Hermeneias qui ait in sola compositione et divisione intellectus esse veritatem vel falsitatem, non ergo in re est veritas vel falsitas.</text:p>
      <text:p text:style-name="P142">Respondeo: ea quae logice signis attribuuntur metaphysice rebus ipsis signatis, attribuuntur sicut est de illis affirmatio/negatio, veritas/falsitas, possibilitas/impossibilitas, necessitas/contingentia, quae logicus signis, puta propositionibus, <text:span text:style-name="T196">attribuitur, metaphysicus vero significantis propositionum et si omnino contendas in re seclusa omni operatione intellectus, nihil dici verum vel falsum, immo, res tamtum dicitur vera quando supra ipsam cadit actus intelligendi aut saltem cognoscendi, de nomine tantum contendis ut constat, non de re, ideo, si non placet appellare veritatem nisi </text:span><text:span text:style-name="T197">quando supra ipsam fertur actus intelligendi, non contradico, sed satis est quod in re ponendum est a quo propositio denominetur illis denominationibus, quo nomine appelletur non curremus.</text:span></text:p>
      <text:p text:style-name="P142"><text:span text:style-name="T198">Sed moralis philosophus fortasse obiceret quod etiam bonitas et malitia secluso actu volen</text:span><text:span text:style-name="T200">d</text:span><text:span text:style-name="T198">i reperire</text:span><text:span text:style-name="T200">n</text:span><text:span text:style-name="T198">tur in re volita</text:span> <text:span text:style-name="T199">vel nolita, sed dico quod hoc non est concedendum, licet in aliis </text:span><text:span text:style-name="T200">sit concedendum, actus enim volendi vel nolendi, </text:span><text:span text:style-name="T201">per denominationem intrinsecam, dicitur bonus vel malus et non er denominationem extrinsecam. Et si diceretur quod unum actus volendi unum actum exteriorem peior est altero, et hoc non est nisi quia in obiecto uno est maior malitia, etiam seclusa volitione quam in altero obiecto, respondeo: hoc ideo </text:span><text:span text:style-name="T202">est quia ratio dictat unum esse magis nolendum quam alterum, cuius ulterior non est assignanda causa de hoc non plura, quia alienae est investigationis.</text:span></text:p>
      <text:p text:style-name="P143">Sed praeterea sophista investigaret huiusmodi veritatem vel falsitatem relativam nam capiatur illa propositio: “homo non est asinus”, et ponatur quod nullus sit homo neque asinus, tunc nulla est veritas relativa quia neque homo neque asinus.</text:p>
      <text:p text:style-name="P143">Respondeo: ‘homo’ et ‘asinus’ <text:span text:style-name="T203">sunt veritas relativa sic intelligendo quod ‘homo’ et ‘asinus’</text:span> referuntur ad invicem vere negative, quod est dicere quod homo non est asinus cum enim dico “homo non est asinus”, ly ‘est’ subordinatur uni conceptui quo concipiuntur homo et asinus relative, <text:span text:style-name="T204">puta unitive negative, et sic se habent negative, ideo copula modum illum relationis dat intelligere de quo </text:span><text:span text:style-name="T205">in </text:span><text:span text:style-name="T204">sequenti capitulo, et </text:span><text:span text:style-name="T206">ita de aliis propositionibus dissentiendum est, nec profecto, in hac </text:span><text:soft-page-break/><text:span text:style-name="T206">magna difficultate verba et rigor logices in modo loquendi est tantum aspiciendus quamtum sententia.</text:span></text:p>
      <text:p text:style-name="P406"><text:span text:style-name="T643">[</text:span><text:span text:style-name="T598">vi.rb 32b</text:span><text:span text:style-name="T643">]</text:span></text:p>
      <text:p text:style-name="P145">Sed ulterius <text:span text:style-name="T208">instaretur quia capta ista propositione: “omne ens est Deus”, ipsa non esset possibilis quod est falsum, consequentia tamen probatur, quia per eam significatur asinus secundum quod refertur ad Deum affirmative et taliter refertur impossibiliter; ergo ab illa impossibilitate illa propositio debet denominari impossibilis. Respondeo: </text:span><text:span text:style-name="T210">illa propositio simpliciter denominatur possibilis, quia licet per eam tunc significetur asinus ut se habet relative, affirmative ad Deum significatione accepta ex acceptione terminorum tamen posito, quod solus Deus sit, non significabitur asinus ut relative ad Deum se habens significatione accepta ex acceptione terminorum penes quam </text:span><text:span text:style-name="T211">significationem sumitur possibilitas vel impossibilitas propositionum ut declarabitur postea.</text:span></text:p>
      <text:p text:style-name="P146"><text:span text:style-name="T211">Ad rationes ad primam, respondeo quod propositio vera recte sic diffinitur per propositio </text:span><text:span text:style-name="T212">vera est qua significat taliter qualiter est et accipitur qualiter est large ut se extendit ad significatum propositionis de praesenti, praeterito et futuro, quia de hoc po</text:span><text:span text:style-name="T213">ste fiet mentio, et in secunda diffinitione per ly ‘qualiter est’ explicatur modus se habendi unius extremi vere ad alterum, ideo </text:span><text:span text:style-name="T214">ad formam argumenti cum dicitur quod ista propositio: </text:span><office:annotation office:name="__Annotation__1851_991890246" loext:resolved="false"><dc:creator>Unknown Author</dc:creator><dc:date>2021-09-11T21:02:27.236500774</dc:date><text:p text:style-name="P577"><text:span text:style-name="T709">Propositio est falsa quando non significat taliter qualiter est, quia <text:s/>illi affirmationi unius extremi ad alterum, non correspondet veritas relativa in ordine ad idem extremum.</text:span></text:p></office:annotation><text:span text:style-name="T214">“homo est asinus”, </text:span><text:span text:style-name="T215">esset</text:span><text:span text:style-name="T214"> vera negatur, et ratio est quia non significat taliter qualiter est, significat </text:span><text:span text:style-name="T216">enim ‘hominem’ et ‘asinum’ affirmative, et non est vere quia </text:span><text:span text:style-name="T217">illi affirmationi unius extremi ad alterum extremum non correspondet veritas relativa in ordine ad idem extremum.</text:span><office:annotation-end office:name="__Annotation__1851_991890246"/></text:p>
      <text:p text:style-name="P147">Et si dicas <text:span text:style-name="T218">bene sequitur ista: “homo est asinus”, significat hominem et asinum affirmative, et affirmative se habet homo in ordine ad asinum; ergo significat taliter qualiter est.</text:span></text:p>
      <text:p text:style-name="P148">Respondeo ut dictum est per ly ‘qualiter esse’ intelligo vere esse, et ideo ad pleniorem diffinitionis praedicte explicationem dicendum est quod propositio vera est significat taliter esse, qualiter vere est, intelligendo <text:span text:style-name="T219">copulative ita quod sensus sit quod significat aliqualiter esse et taliter vere est, et ideo ista: “homo est asinus”, est falsa, quia significat hominem est asinum affirmative et non taliter vere est veritate relativa correspondente affirmationi, unde per illos modos verum es falsum signantur veritas et falsitas relativa, ideo hoc resolvendo si quaeratur </text:span><text:span text:style-name="T220">quare ista est falsa: “homo est asinus”.</text:span></text:p>
      <text:p text:style-name="P148"><text:span text:style-name="T220">Respondeo quod, ideo, quia significat hominem affirmative in ordine ad asinum</text:span><text:span text:style-name="T219"> </text:span><text:span text:style-name="T220">qualiter non vere est, immo falsae, ideo propositio falsa posset sic diffiniri: </text:span><office:annotation office:name="__Annotation__2043_991890246" loext:resolved="false"><dc:creator>Unknown Author</dc:creator><dc:date>2021-09-11T21:29:23.552311988</dc:date><text:p text:style-name="P577"><text:span text:style-name="T709">“</text:span><text:span text:style-name="T709">Homo false est asinus” quia asinum relative false se habere ad hominem, id est, vere relative asinus false se habet ad hominem.</text:span></text:p></office:annotation><text:span text:style-name="T220">“Propositio falsa est quae significat taliter qualiter falsae est, id est, </text:span><text:span text:style-name="T221">significat aliqualiter, et taliter falsae est”, ideo ista est vera: “homo false est asinus”, quia significat quod homo falsae se habet ad asinum, et taliter vere est, ideo patet quod ad asinum relative false se habere ad hominem, sequitur quod vere relative asinus, false se habet ad hominem</text:span><office:annotation-end office:name="__Annotation__2043_991890246"/><text:span text:style-name="T221">, </text:span><office:annotation office:name="__Annotation__4643_1240597907" loext:resolved="false"><dc:creator>Unknown Author</dc:creator><dc:date>2021-11-01T13:48:57.825231970</dc:date><text:p text:style-name="P577"><text:span text:style-name="T709">Res <text:s/>infinitis modis se habet, sed modum se habendi non est realiter distinctum a re quae se habet.</text:span></text:p></office:annotation><text:span text:style-name="T221">neque est inconveniens aliquam rem infinitis modis se habere, et in illis modis se habendi procedatur in infinitum, non tamen dico ut modum se habendi de quod in praesenti est mentio realiter distinctum a re quae se habet.</text:span><office:annotation-end office:name="__Annotation__4643_1240597907"/></text:p>
      <text:p text:style-name="P159">Ad duas rationes probantes quod non posset recte diffiniri propositio possibilis, dico quod hoc est falsum unde propositio possibilis sic diffinitur: “<office:annotation office:name="__Annotation__2092_3723830195" loext:resolved="false"><dc:creator>Unknown Author</dc:creator><dc:date>2021-09-18T21:30:09.334369355</dc:date><text:p><text:span text:style-name="T709">Propositio possibilis est propositio quae significat taliter <text:s/>qualiter possibile est esse.</text:span></text:p></office:annotation>Propositio possibilis est propositio quae qualiter significat, vel significare potest manente significatione terminorum, taliter possibile est esse<office:annotation-end office:name="__Annotation__2092_3723830195"/>”, et tunc ad rationes.</text:p>
      <text:p text:style-name="P162"><text:soft-page-break/>Ad primam dico <text:span text:style-name="T297">quod ista propositio: “Antichristus est”, es possibilis quia significat taliter qualiter possibile est esse. Significat enim Antichristum </text:span><text:span text:style-name="T298">affirmative in ordine ad existentiam et Antichristus possibiliter est, ideo Antichristus relative et affirmative possibiliter refertur ad existentiam, quae possibilitas relativa importatur per ly ‘possibiliter’, cum dicitur: “Antichristus possibiliter est existens”.</text:span></text:p>
      <text:p text:style-name="P407"><text:span text:style-name="T644">[</text:span><text:span text:style-name="T598">vi.va 33a</text:span><text:span text:style-name="T644">]</text:span></text:p>
      <text:p text:style-name="P160"><text:span text:style-name="T299">Syncategoremata enim, ut in secundo capitulo dicetur, significant aliquid vel aliqua aliqualiter qualiter non significatur per categoremata, et cum dicis illa propositio significat Antichristum esse, concedo et non est possibile Antichristum esse. Concedo ista enim non est vera eo quod est una affirmativa cuius praedicatum non supponit. Sed Propterea non sequitur quod non significet taliter qualiter possibile est esse. Immo istae duae stant in veritate: “Non est possibile Antichristum esse”, et illa propositio: “Antichristus est”, significat taliter qualiter possibile ese esse, unde posset concedi quod Antichristum esse est possibile possibilitate relativa per quod tantum intelligitur ac si dicerem: “Antichristu</text:span><text:span text:style-name="T300">s possibiliter est”, et ad illum intellectum negaretur quod non est possibile Antichristum esse possibilitate relativa importata per ly ‘possibile’, dum modo argumenta non inquirant illum strictum rigorem loquendi, quoniam si argumentis omnino exquiratur dentur sensus, in quibus capiuntur tales propositiones et cessabunt argumenta.</text:span></text:p>
      <text:p text:style-name="P161"><text:span text:style-name="T301">Ad aliam rationem impugnantem possibilitatem propositionis dico quod non est admittendum, secundum istum modum dicendi, quod ista propositio: “chimera non est”, significat </text:span><text:span text:style-name="T302">chimeram non esse, quia chimeram non esse non est</text:span><text:span text:style-name="T301"> </text:span><text:span text:style-name="T302">possibile neque intelligibile.</text:span></text:p>
      <text:p text:style-name="P161"><text:span text:style-name="T302">Dico tamen quod ipsa est possibilis quia significat taliter qualiter possibile est esse, et ut hoc manifestetur accipio hanc propositionem: </text:span><office:annotation office:name="__Annotation__2665_3723830195" loext:resolved="false"><dc:creator>Unknown Author</dc:creator><dc:date>2021-09-18T23:34:23.530988402</dc:date><text:p><text:span text:style-name="T709">Sortes affirmative et false relatus ad asinum vere negative refertur ad seipsum, ideo vera est; igitur significat taliter qualiter vere est.</text:span></text:p></office:annotation><text:span text:style-name="T302">“</text:span><text:span text:style-name="T303">Sortes qui est asinus non est Sortes”. Illa possibilis est vera,</text:span><text:span text:style-name="T301"> </text:span><text:span text:style-name="T303">nam Sortes affirmative et false relatus ad asinum, vere negative refertur ad seipsum, ideo vera est; igitur significat taliter qualiter vere est. Significat enim Sortem relative affirmative ad asinum relatum, negative se habere ad seipsum, et taliter non est, quia vere non est.</text:span><office:annotation-end office:name="__Annotation__2665_3723830195"/></text:p>
      <text:p text:style-name="P163">Et sic clare <text:span text:style-name="T304">ostenditur </text:span><text:span text:style-name="T305">possibilitas et veritas istius quid enim intelligo quando dico: “Sortes qui est asinus”, intelligitur cum dico chimera, per istum enim terminum ‘chimera’ significatur quaelibet res possibilis relative univite in ordine ad quamlibet aliam rem possibilem et incompossibilem.</text:span></text:p>
      <text:p text:style-name="P164">Ad alias rationes probantes quod non possit salvari diffinitio propositionis necessariae.</text:p>
      <text:p text:style-name="P164">“P<office:annotation office:name="__Annotation__2727_3723830195" loext:resolved="false"><dc:creator>Unknown Author</dc:creator><dc:date>2021-09-18T23:44:07.293756080</dc:date><text:p><text:span text:style-name="T709">Propositio necessaria est quae significat taliter qualiter necesse est esse.</text:span></text:p></office:annotation>ropositio necessaria est quae significat taliter qualiter necesse est esse<office:annotation-end office:name="__Annotation__2727_3723830195"/>”, et per hoc confirmatur, quod bene diffiniretur propositio vera hoc pacto: “<office:annotation office:name="__Annotation__2731_3723830195" loext:resolved="false"><dc:creator>Unknown Author</dc:creator><dc:date>2021-09-18T23:45:14.134746210</dc:date><text:p><text:span text:style-name="T709">Propositio vera est quae significat taliter qualiter vere est.</text:span></text:p></office:annotation>Propositio vera est quae significat taliter qualiter vere est<office:annotation-end office:name="__Annotation__2731_3723830195"/>”, sicut diffinitur propositio necessaria est quae significat taliter qualiter necesse est esse.</text:p>
      <text:p text:style-name="P166">Et ad primam rationem de illa propositione: “Petrus non est Paulus”, patet ex dictis quod Petrus est necessarius necessitate relativa negative se habens ad Paulum. Ideo aliqualiter significatur per eam et taliter necesse est esse.</text:p>
      <text:h text:style-name="Heading_20_3" text:outline-level="3">Res ad extra per propositiones significatae contradicunt</text:h>
      <text:p text:style-name="P165">Et si quaeras <text:span text:style-name="T306">an contradictio inveniatur in rebus significatis sicut in propositionibus, verbi gratia, sicut istae contradicunt: “Petrus est Paulus”, “Petrus non est Paulus”, sic etiam res significat</text:span><text:span text:style-name="T307">ae</text:span><text:span text:style-name="T306"> opponuntur contradictorie. </text:span><text:span text:style-name="T307">Respondeo: contradictoria in re est a qua propositiones habent quod dicantur contradictorie. Dico enim quod Petrus et Paulus affirmative se habentes contradicunt sibimet negative se habentibus, ita quod ipsimet se habentes, affirmative referuntur ad seipsos ut </text:span><text:soft-page-break/><text:span text:style-name="T307">negative se habentes contradictorie. Et hoc videtur Aristoteles sensisse in postpraedicamentis, cum </text:span><text:span text:style-name="T308">inquit: “res subiecte affirmationi et negationi opponuntur sicut affirmatio et negatio”, ubi per res subiectas affirmationi et negationi intelligit res significatas per propositionem affirmativam et negativam.</text:span></text:p>
      <text:p text:style-name="P167">Ad aliam de necessitate illius: “chimera non est”, patet solutio.</text:p>
      <text:p text:style-name="P408"><text:span text:style-name="T645">[</text:span><text:span text:style-name="T598">vi.vb 33b</text:span><text:span text:style-name="T645">]</text:span></text:p>
      <text:p text:style-name="P167">Ad aliam de ista: “Sortes currit vel Sortes non currit”, dico quod est necessaria quia significat taliter qualiter necesse est esse. Unde dicitur quod Sortes currens relatus disiunctive ad seipsum relatum affirmative, et etiam negative habet necessitatem relativam quae concomitatur illum modum se habendi disiunctive affirmative, et ita conceditur quod Sortes currens est necessarius necessitate relativa, a qua necessitate illa propositio habet quod necessaria nominetur.</text:p>
      <text:p text:style-name="P168">Ad aliam rationem quae probat quod non potest salvari diffinitio propositionis impossibilis.</text:p>
      <text:p text:style-name="P169">Respondetur quod <text:span text:style-name="T309">potest, sic enim debet diffiniri: “propositio impossibilis est illa quae aliqualiter <text:s/>significat taliter impossibile est esse”, quandocumque ipsa significat quod dicitur propter illam: “omne ens est Deus”, de qua postea dicetur. Ideo bene posset propositio falsa sic diffinire.</text:span></text:p>
      <text:p text:style-name="P170">Propositio falsa est quae qualiter significat taliter false, est quemadmodum propositio impossibilis sic diffinitur: “<office:annotation office:name="__Annotation__2086_482218211" loext:resolved="false"><dc:creator>Unknown Author</dc:creator><dc:date>2021-09-19T02:00:40.518153336</dc:date><text:p><text:span text:style-name="T709">Propositio impossibilis est quae taliter significat qualiter impossibile est esse.</text:span></text:p></office:annotation>Propositio impossibilis est quae taliter significat qualiter impossibile est esse<office:annotation-end office:name="__Annotation__2086_482218211"/>”. <text:span text:style-name="T310">De illa autem propositione: “Deus non est”, quae in argumento proponitur, dico quod ipsa significat Deum qui Deus est</text:span> <text:span text:style-name="T310">impossibilis impossibilitate relativa, ut relatus negative ad seipsum.</text:span></text:p>
      <text:p text:style-name="P171">Ad rationem quae probat quod non potest salvari diffinitio propositionis contingentis, potest aliquis respondere ad id quod argumentum praetendit. Dico enim quod ipse Deus relatus affirmative ad seipsum relatum ad creaturam quae connotatur per ly ‘creans’, dicitur contingens relative. Ideo concederem quod Deum creare est necessarium, hoc est, ipse Deus creans est necessarius et etiam est contingens, contingentia relativa, taliter qualiter significatur per istam: “Deus <text:span text:style-name="T311">crea”, neque aliud argumentum probat, verumtamen est difficultas: qualiter debeat diffiniri propositio contingens, nam ista est contingens: “omne ens est Deus”, et tamen clarum est quod quicquid per eam significatur taliter qualiter per eam significatur necessario aut impossibiliter se habet, quod ostenditur, nam vel significatur Deus ut relative se habens ad creaturam et affirmative, et tunc est impossibilis impossibilitate relativa. Non ergo a suo significato illa propositio suam contingentiam habet.</text:span></text:p>
      <text:h text:style-name="Heading_20_3" text:outline-level="3">Propositio duplici de causa potest contingens nominari</text:h>
      <text:p text:style-name="P172">Respondeo aliqua propositio duplici de causa potest <text:span text:style-name="T312">contingens nominari: </text:span></text:p>
      <text:p text:style-name="P173">Prima, quando contingit taliter esse qualiter per eam significatur ut ista: “Sortes est albus”, et credo quod illa contingentia non sit nisi veritas vel falsitas relativa. Et superaddit quod non necessario neque impossibiliter insit ita quod ipse Sortes relatus vere ad album vel false, non tamen necessario neque impossibiliter dicitur contingens contingentia relativa.</text:p>
      <text:p text:style-name="P173">Secundo modo aliqua propositio dicitur contingens quia potest significare taliter qualiter est in re, et potest non significare taliter qualiter non est in re ut ista propositio: “omne ens est Deus”, est contingens quia in casu potest significare taliter qualiter est in re significatione accepta ex acceptione terminorum, ut posito quod solus Deus sit, et in casu potest non significare taliter qualiter est in re ut nunc significat quamobrem propositio contingens sic diffiniri habet: “<office:annotation office:name="__Annotation__2172_1591185167" loext:resolved="false"><dc:creator>Unknown Author</dc:creator><dc:date>2021-09-19T21:18:19.115662727</dc:date><text:p><text:span text:style-name="T709">Propositio contingens est propositio quae potest significare taliter qualiter est et potest non significare taliter qualiter est.</text:span></text:p></office:annotation><text:span text:style-name="T313">Propositio </text:span><text:soft-page-break/><text:span text:style-name="T313">contingens est propositio quae potest significare taliter qualiter est, et potest non significare taliter qualiter est</text:span><office:annotation-end office:name="__Annotation__2172_1591185167"/><text:span text:style-name="T313">”, et haec diffinitio omni propositioni contingenti convenit, neque </text:span><text:span text:style-name="T314">debet sic diffiniri quae qualiter significat taliter contingenter est. </text:span><text:span text:style-name="T315">Sed si placet ponere ly ‘significat’ taliter ut sequatur illum <text:s/>terminum contingenter, ut sic dicatur: “propositio contingens est propositio quae contingenter significat taliter qualiter est”, tunc bene diffiniretur ut patet exponendo ly ‘contingenter’.</text:span></text:p>
      <text:p text:style-name="P174">Ex his patet ergo quod bene dicunt aliqui quod modus ille qui facit modalem divisam includitur in diffinitione modi verificabilis de tota propositione inquantum propositio est nam ut declaratum <text:span text:style-name="T316">est in diffinitione de ly ‘verum’, et de ly ‘falsum’, de ly ‘possibile’, et de ly ‘impossibile’.</text:span></text:p>
      <text:p text:style-name="P409">Inquantum denominant propositiones includunt illi termini ‘vere’, ‘false’, ‘possibiliter’, ‘impossibiliter’, ‘necessario’, ‘contingenter’, ut faciunt modalem divisam.</text:p>
      <text:p text:style-name="P410"><text:span text:style-name="T646">[</text:span><text:span text:style-name="T598">vii.ra 34a</text:span><text:span text:style-name="T646">]</text:span></text:p>
      <text:p text:style-name="P175">Ad aliam rationem quae oppugnat bonitatem consequentiae. Dico quod ille modus non destruit artem diffiniendi bonam consequentiam, sic enim diffinitur bona consequentia: “<office:annotation office:name="__Annotation__2072_2704329175" loext:resolved="false"><dc:creator>Unknown Author</dc:creator><dc:date>2021-09-20T00:49:17.530885210</dc:date><text:p><text:span text:style-name="T709">Bona consequentia est in qua impossibile est taliter esse qualiter significatur antecedens quin taliter sit qualiter significatur per consequens.</text:span></text:p></office:annotation>Bona consequentia est in qua impossibile est taliter esse qualiter significatur antecedens quin taliter sit qualiter significatur per consequens<office:annotation-end office:name="__Annotation__2072_2704329175"/>”, et capio taliter esse et qualiter esse ut nominant quodcumque significatum cuiuscumque propositionis.</text:p>
      <text:h text:style-name="Heading_20_3" text:outline-level="3">Quid est antecedens et quid consequens</text:h>
      <text:p text:style-name="P176">Et ad argumentum dicendum quod illa consequentia non valet: “homo est homo et asinus est asinus; ergo homo est asinus”, quia vere est sicut significatur per antecedens, id est, per propositionem illam quae vocatur ‘antecedens’, et tamen non vere est sicut significatur per consequens.</text:p>
      <text:p text:style-name="P176">Pono tamen significatum illius propositionis quae dicitur ‘antecedens’: “<text:span text:style-name="T322">d</text:span><text:span text:style-name="T317">ici antecedens seclusa omni intellectus operatione”, et similiter significatum illius propositionis quae dicitur consequens, unde </text:span><office:annotation office:name="__Annotation__2299_2704329175" loext:resolved="false"><dc:creator>Unknown Author</dc:creator><dc:date>2021-09-20T01:09:25.246954908</dc:date><text:p text:style-name="P577"><text:span text:style-name="T709">Antecedens et antecedentia diffinitiones.</text:span></text:p></office:annotation><text:span text:style-name="T317">antecedens est aliquid vel aliqua se habentia relative ad aliquid vel aliqua alia, ita quod non possunt vere se habere quin alia verae se habeant. Ille modus se habendi potest vocari antecedentia.</text:span><office:annotation-end office:name="__Annotation__2299_2704329175"/></text:p>
      <text:p text:style-name="P177">Sed <office:annotation office:name="__Annotation__2300_2704329175" loext:resolved="false"><dc:creator>Unknown Author</dc:creator><dc:date>2021-09-20T01:09:48.175564679</dc:date><text:p text:style-name="P577"><text:span text:style-name="T709">Consequens et consequentia diffinitiones.</text:span></text:p></office:annotation>consequens est aliquid vel aliqua sic se habentia ad aliquid vel aliqua alia quod non possunt se false habere quin alia false se habent, et ille modus se habendi vocatur consequentia<office:annotation-end office:name="__Annotation__2300_2704329175"/>.</text:p>
      <text:p text:style-name="P178">Ut si dicam: “<text:span text:style-name="T318">homo est asinus; ergo homo est rudibilis”, ‘</text:span><text:span text:style-name="T319">homo’ et ‘asinus’ affirmative se habentia denominantur ‘</text:span><office:annotation office:name="__Annotation__2869_2704329175" loext:resolved="false"><dc:creator>Unknown Author</dc:creator><dc:date>2021-09-20T01:22:27.527206951</dc:date><text:p><text:span text:style-name="T709">Antecedens pro quanto relative.</text:span></text:p></office:annotation><text:span text:style-name="T319">antecedens pro quanto relative</text:span><office:annotation-end office:name="__Annotation__2869_2704329175"/><text:span text:style-name="T319">’, scilicet, antecedenter se habent ad hominem et rudibilem affirmative se habentia. </text:span><text:span text:style-name="T320">E</text:span><text:span text:style-name="T319">t homo et rudibile affirmative se habentia denominantur ‘c</text:span><office:annotation office:name="__Annotation__2871_2704329175" loext:resolved="false"><dc:creator>Unknown Author</dc:creator><dc:date>2021-09-20T01:22:49.103629236</dc:date><text:p text:style-name="P577"><text:span text:style-name="T709">Consequens pro quanto relative.</text:span></text:p></office:annotation><text:span text:style-name="T319">onsequens pro quanto relative</text:span><office:annotation-end office:name="__Annotation__2871_2704329175"/><text:span text:style-name="T319">’, scilicet, consequentialiter se habent ad hominem et asinum affirmative se habentia. </text:span></text:p>
      <text:p text:style-name="P179"><text:span text:style-name="T320">Ideo non est inconvenie</text:span><text:span text:style-name="T321">n</text:span><text:span text:style-name="T320">s </text:span><text:span text:style-name="T323">quod idem sit antecedens et consequens, etiam respectu eiusdem </text:span><text:span text:style-name="T324">tamen sic dicendo: “homo est asinus; ergo homo est rudibilis”, vocatur “homo est asinus” antecedens et “homo est rudibilis” consequens. Institutum enim est, propter maiorem cognitionem, quando aliqua propositio praecedit illam notam ‘ergo’, det intelligere illum modum antecedenti, et propositio posterius posita det intelligere consequentiam, </text:span><text:span text:style-name="T325">licet illae non sit assuetus modus loquendi per ista ingeniosus poterit defendere quascumque alias rationes quae circa hanc materiam applicari possent.</text:span></text:p>
      <text:h text:style-name="Heading_20_3" text:outline-level="3"><text:span text:style-name="T326">Utrum aliqua res dicatur universalis seclusa operatione intellectus</text:span><text:span text:style-name="T324"> </text:span></text:h>
      <text:p text:style-name="P180">Sed an aliqua res dicatur universalis seclusa omni intellectus operatione.</text:p>
      <text:p text:style-name="P181"><text:soft-page-break/>Respondetur quod <office:annotation office:name="__Annotation__2472_2244551053" loext:resolved="false"><dc:creator>Unknown Author</dc:creator><dc:date>2021-09-20T21:07:27.882600052</dc:date><text:p text:style-name="P577"><text:span text:style-name="T709">Universale quid sit?</text:span></text:p><text:p><text:span text:style-name="T709">Nihil dicitur universale nisi inquantum cognoscitur vel natum est cognosci per conceptum universalem.</text:span></text:p></office:annotation>nihil dicitur universale nisi inquantum cognoscitur vel natum est cognosci per conceptum universalem<office:annotation-end office:name="__Annotation__2472_2244551053"/>. <office:annotation office:name="__Annotation__2654_2244551053" loext:resolved="false"><dc:creator>Unknown Author</dc:creator><dc:date>2021-09-20T21:11:54.118917764</dc:date><text:p text:style-name="P577"><text:span text:style-name="T709">Genus et species, quid sit?</text:span></text:p></office:annotation>Posset enim dici quod Sortes, inquantum est natus causare conceptum specificum, dicitur species. <text:span text:style-name="T327">I</text:span>nquantum <text:span text:style-name="T327">natus est causare conceptum genericum dicitur genus.</text:span><office:annotation-end office:name="__Annotation__2654_2244551053"/><text:span text:style-name="T327"> </text:span><office:annotation office:name="__Annotation__2655_2244551053" loext:resolved="false"><dc:creator>Unknown Author</dc:creator><dc:date>2021-09-20T21:13:10.536930900</dc:date><text:p text:style-name="P577"><text:span text:style-name="T709">Naturas communes, Omittit? Esne Pardus Realis an Nominalis? </text:span></text:p></office:annotation><text:span text:style-name="T327">Omitto nunc naturas illas communes quas aliqui ponunt, quia hoc non est praesentis negotii.</text:span><office:annotation-end office:name="__Annotation__2655_2244551053"/></text:p>
      <text:p text:style-name="P185">Patet igitur declaratus duplex modus dicendi de complexe significabilibus, quorum secundum iudico, esse verum. Alterum vero improbabilem qui licet appareat multis inexpugnabilis difficiles tamen ratione habet contra se, et pene insolubiles sicut patet dicta consideranti.</text:p>
      <text:p text:style-name="P185">Et quanvis ex dictis satis posset patere de veritate et falsitate, possibilitate et impossibilitate propositionis quod in hoc capitulo erat ostendendum, tamen de quolibet illorum per ordinem aliqua communia dicenda sunt. Sed ubi argumenta praedictam inquirent difficultatem ad dicta recurrendum est.</text:p>
      <text:h text:style-name="Heading_20_3" text:outline-level="3">De veritate propositionis</text:h>
      <text:p text:style-name="P411">Primo igitur dicendum est de veritate propositionis de qua communiter ponuntur aliquae propositiones.</text:p>
      <text:p text:style-name="P412"><text:span text:style-name="T647">[</text:span><text:span text:style-name="T598">vii.rb 34b</text:span><text:span text:style-name="T647">]</text:span></text:p>
      <text:p text:style-name="P182"><text:span text:style-name="T328">Prima: </text:span><office:annotation office:name="__Annotation__3426_2244551053" loext:resolved="false"><dc:creator>Unknown Author</dc:creator><dc:date>2021-09-20T21:30:31.018123622</dc:date><text:p><text:span text:style-name="T709">Propositio vocalis et scripta dicunt vere vel falsa secundum quod subordinantur mentalibus veris vel falsis.</text:span></text:p></office:annotation><text:span text:style-name="T328">propositio vocalis et scripta </text:span><text:span text:style-name="T329">dicunt vere vel falsa secundum quod subordinantur mentalibus veris vel falsis. Ex quod sequitur </text:span><text:span text:style-name="T338">correlarium</text:span><text:span text:style-name="T329">, </text:span><text:span text:style-name="T331">quod veritas et falsitas non conveniunt propositioni vocali vel scriptae, nisi mediante mentali. Dico enim quod si non habeantur actualiter mentalis propositio correspondens propositioni vocali, tunc propositio vocalis non est vera neque falsa, immo, non est propositio, quia non significat</text:span><office:annotation-end office:name="__Annotation__3426_2244551053"/><text:span text:style-name="T331">. Numquam enim aliquid significat nisi</text:span><text:span text:style-name="T329"> </text:span><text:span text:style-name="T331">actualiter habeatur notitia de illo quod significatur.</text:span></text:p>
      <text:p text:style-name="P184">Sed circa haec solet quaeri unum dubium. Utrum veritas vel falsitas propositionis mentalis distinguatur ab ipsa propositione mentali vera vel falsa, <text:span text:style-name="T332">ad hoc dicant tenentes respectu seu relationes distingui a suis fundamentis quod veritas et falsitas distinguuntur a propositione mentali.</text:span></text:p>
      <text:h text:style-name="Heading_20_3" text:outline-level="3">Utrum veritas mentalis distinguatur ab ipsa mentali.</text:h>
      <text:p text:style-name="P190"><text:span text:style-name="T333">Et si quaeras </text:span><office:annotation office:name="__Annotation__2194_4193909040" loext:resolved="false"><dc:creator>Unknown Author</dc:creator><dc:date>2021-09-20T23:01:31.845036343</dc:date><text:p text:style-name="P577"><text:span text:style-name="T709">Veritas est conformitas propositionis mentalis ad suum significatum.</text:span></text:p></office:annotation><text:span text:style-name="T333">quid est veritas dicunt quod nihil aliud est conformitas propositionis mentalis ad suum significatum</text:span><office:annotation-end office:name="__Annotation__2194_4193909040"/><text:span text:style-name="T333">, </text:span><office:annotation office:name="__Annotation__2404_4193909040" loext:resolved="false"><dc:creator>Unknown Author</dc:creator><dc:date>2021-09-20T23:04:27.312370542</dc:date><text:p text:style-name="P577"><text:span text:style-name="T709">Propositio quam significat ita esse sicut est habet conformitatem ad suum significatum.</text:span></text:p></office:annotation><text:span text:style-name="T333">nam ex eo quod propositio significat ita esse sicut est, propositio habet </text:span><text:span text:style-name="T334">conformitatem</text:span><text:span text:style-name="T333"> ad suum significatum </text:span><office:annotation-end office:name="__Annotation__2404_4193909040"/><text:span text:style-name="T333">quae </text:span><office:annotation office:name="__Annotation__2298_4193909040" loext:resolved="false"><dc:creator>Unknown Author</dc:creator><dc:date>2021-09-20T23:02:28.109969599</dc:date><text:p><text:span text:style-name="T709">Conformitas est ipsa veritas quae distinguitur ad ipsa propositione</text:span></text:p></office:annotation><text:span text:style-name="T333">conformitas est ipsa veritas quae distinguitur ad ipsa propositione</text:span><office:annotation-end office:name="__Annotation__2298_4193909040"/><text:span text:style-name="T333">,</text:span></text:p>
      <text:h text:style-name="Heading_20_3" text:outline-level="3">Quid est veritas propositionis secundum reales</text:h>
      <text:p text:style-name="P190"><office:annotation office:name="__Annotation__3593_4193909040" loext:resolved="false"><dc:creator>Unknown Author</dc:creator><dc:date>2021-09-20T23:26:58.840371112</dc:date><text:p text:style-name="P577"><text:span text:style-name="T709">Estne ratione commune aequalis universale, apud eos et apud Pardus?</text:span></text:p></office:annotation><text:span text:style-name="T333">quod probant ratione communi apud eos.</text:span><office:annotation-end office:name="__Annotation__3593_4193909040"/></text:p>
      <text:p text:style-name="P186">Quandoque <text:span text:style-name="T335">aliqua sic se habent quod unum est quando aliud non est, illa realiter distinguuntur, sed aliquando ista propositio: “homo currit”, est quando sua veritas non est; ergo distinguuntur de quo modo arguendi, alibi discutitur.</text:span></text:p>
      <text:p text:style-name="P187">Sed contra <text:span text:style-name="T336">hunc modum dicendi sunt aliquae instantiae.</text:span></text:p>
      <text:p text:style-name="P188">Prima: Si ista opinio esse vera sequerentur <text:span text:style-name="T337">tria, scilicet: unum impossibile, unum haereticum, et unum ridiculosum. Ergo </text:span><text:span text:style-name="T339">ista opinio non est vera consequentia probatur.</text:span></text:p>
      <text:h text:style-name="Heading_20_3" text:outline-level="3"><text:soft-page-break/>Deus nihil causat</text:h>
      <text:p text:style-name="P189">Et primo quod sequitur unum impossibile patet, quia sequeretur quod Deus aliquid causaret et nihil causaret, sed hoc est impossibile; igitur consequentia probatur, et volo quod quis habet in mente istam propositionem mentalem: “Deus nihil causat”, <text:span text:style-name="T340">tunc volo quod sit vera, quia ita sit in re, quod Deus nihil producat. De novo tunc arguo sic: veritas istius propositionis est aliquid, et ista veritas causatur a Deo; ergo aliquid causatur a Deo, et per consequens habentur ista duo: quod Deus aliquid causat et quod Deus nihil casat, quod est impossibile.</text:span></text:p>
      <text:p text:style-name="P191">Sed <text:span text:style-name="T341">quod </text:span><text:span text:style-name="T342">veritas istius propositiones causetur a Deo patet, quia ista propositio nunc de novo est vera. Sed quod sequitur unum haereticum ostendo, quia sequeretur quod Deus necessario aliquid causaret, quod est haereticum. Patet consequentia, quia Deus non posset facere quod ista esset vera: “Deus nihil causat”, nisi necessario causaret suam veritatem.</text:span></text:p>
      <text:p text:style-name="P192">Sed quod sequatur unum ridiculosum patet, quia sequeretur quod avis volando causaret novas entitates in intellectibus angelorum, quod est unum ridiculum, et consequentia probatur, nam volo quod angeli habeant istam mentalem: “avis volat”. Tunc si avis volet causabitur in intellectu angeli una entitas, scilicet, falsitas.</text:p>
      <text:p text:style-name="P193"><text:span text:style-name="T343">Respondeo: ista propositio: “Deus nihil causat”, non potest esse vera, quia se aliquo modo falsificat. Unde sicut ista propositio: “nulla propositio est vera”, non potest esse vera, quia significat se non esse veram. Sic ista propositio: “Deus nihil causat”, significat </text:span><text:span text:style-name="T344">se non esse veram. Hoc declaro, nam significat quod Deus nihil causat et si nihil causat non causat suam veritatem, et per consequens illa non potest esse vera, quia significat veritatem non esse in ea, quia non potest esse in ea nisi causetur, et sic patet quod duo prima inconvenientia non sufficienter probantur.</text:span></text:p>
      <text:h text:style-name="Heading_20_3" text:outline-level="3">Deus aliquid causat de novo</text:h>
      <text:p text:style-name="P413">Et si dicas: capiatur ista propositio: “Deus aliquid causat de novo”, quae sit scripta in pariete, vel sit in mente Sortis mentalis ei correspondens, et volo quod Deus nihil causet de novo, tunc sequitur contradictio si falsitas distinguitur a propositione falsa, nam bene sequitur: “haec falsitas est aliquid, et haec falsitas causatur a Deo; ergo aliquid causatur a Deo et tamen nihil causatur a Deo”, per casum. Et intelligo semper ‘causare’ pro causare de novo, et ita habentur <text:span text:style-name="T345">contradictoria quod aliquid causatur a Deo de novo et quod nihil causatur a Deo de novo.</text:span></text:p>
      <text:p text:style-name="P414"><text:span text:style-name="T648">[</text:span><text:span text:style-name="T598">vii.va 35a</text:span><text:span text:style-name="T648">]</text:span></text:p>
      <text:p text:style-name="P194">Respondebit aliquis fortasse non admittendo casum, quod maneat illa propositio cum sua significatione, et quod Deus nihil causet de novo.</text:p>
      <text:p text:style-name="P195">Contra quia non est necesse propter conservationem illius propositionis Deum causare aliquid absolutum, neque etiam aliquid respectivum; igitur nihil necesse ese de novo causare quod non aliquid absolutum manifestum est, quod non aliquid respectivum. Probo quia vel illud respectivum esset falsitas illius propositionis vel aliquod aliud respectivum non est, dicendum quod illud respectivum sit falsitas illius propositionis, quia tunc ipsa esset falsa. Et ultra sequitur ergo ita est sicut per eam significatur, sed per eam significatur ‘Deum nihil causat de novo’; ergo ita est quod Deus nihil causat de novo, et tamen causat falsitatem eius de novo ut concedis; ergo aliquid causat de novo et nihil causat de novo. Sed quod non necesse sit Deum causare aliquod aliud respectivum ab illo propter conservationem illius propositionis patet, quia non est dabile tale respectivum quod Deus necessario causat necessitate conditionata posita, scilicet, conservatione illius propositionis.</text:p>
      <text:p text:style-name="P196"><text:soft-page-break/>Ad hoc argumentum difficile est respondere. Diceretur tamen quod non est possibile illam conservari <text:span text:style-name="T346">et quod Deus nihil de novo causet quin aliquid de novo destruat, scilicet, illam significationem illius propositionis qua destructa iam non est falsitas neque veritas ut in sequenti instantia declaratur.</text:span></text:p>
      <text:p text:style-name="P196"><text:span text:style-name="T346">Miror </text:span><text:span text:style-name="T347">tamen quomodo ponitur ibi aliqua entitas quae dicatur falsitas distincta a propositione falsa, cum relatio secundum istam viam non magis habeat esse qua fundamentum et terminus, cum ab illis <text:s/>quodammodo habeat suam entitatem. Sed terminus falsitatis non est aliqua entitas ut terminus falsitatis istius propositionis: “Adam non fuit”, non est aliqua entitas; ergo nec ipsa falsitas est aliquid exsistens.</text:span></text:p>
      <text:p text:style-name="P198">Et confirmatur, quia relatio ei correspondens non est aliquid existens, nam illam non habet pro fundamento significatum illius quod non est aliquid existens; ergo nec illa relatio quae est falsitas qua fundatur in illa propositione quae terminatur ad eius significatum est aliquid existens.</text:p>
      <text:p text:style-name="P197"><text:span text:style-name="T347">Ad tertium, quod sequitur unum ridiculosum, diceretur quod non est ridiculosum nisi vera dicantur ridiculosa, scilicet, </text:span><text:span text:style-name="T348">diceretur quod hoc est verum, quia ad motum avis producuntur novae entitates in intellectibus angelorum et hoc maxime non est inconveniens de entitatibus </text:span><text:span text:style-name="T349">respectivis</text:span><text:span text:style-name="T348"> cuiusmodi sunt veritas et falsitas.</text:span></text:p>
      <text:p text:style-name="P199">Secunda instantia est veritas istius propositionis mentalis: “Deus est”, non distinguitur ab ista propositione mentali: “Deus est”, igitur antecedens patet, illa quae non possunt separari non distinguuntur, sed illa propositio: “Deus est”, non potest esse sine sua veritate; ergo illa propositio: “Deus est”, mentalis non distinguitur a sua veritate.</text:p>
      <text:p text:style-name="P200">Respondeo: <text:span text:style-name="T350">alicui forsitan videretur propter istud argumentum quod veritas propositionis necessariae non distinguitur ab ipsamet propositione. Tamen potest oppositum defendi dicendo quod notitia duo importat, scilicet, unum absolutum, puta unam qualitatem et unum respectivum, scilicet, attingentiam ad obiectum, seu repraesentationem obiecti ad oppositum, applicando de propositione mentali notitia qua cognosco Deum esse est una qualitas cui convenit, quod repraesentet Deum esset, et illa qualitas numquam diceretur proposito neque vera neque falsa, nisi repraesentaret tale significatum. Unde iste terminus ‘propositio mentalis’ supponit pro una qualitate existente in anima, connotando talem qualitatem repraesentare ita esse vel non esse.</text:span></text:p>
      <text:p text:style-name="P201">Tunc dico quod si deus per suam potentiam faceret quod illa qualitas quae repraesentat Deum esse non repraesentare Deum esse, iam non esset vera neque falsa, immo, neque esset propositio, unde bene concedo quod illa qualitas non potest esse proposito mentalis quin sit vera.</text:p>
      <text:p text:style-name="P201">Sufficit tamen ad hoc quod veritas distinguatur ab ea quod illa qualitas quae est propositio mentalis possit non habere veritatem. Si tamen repraesentatio illa seu tendentia ad ita esse dicatur veritas, dubium est, nam in propositione necessaria forte eius repraesentatio diceretur eius veritas.</text:p>
      <text:p text:style-name="P415"><text:span text:style-name="T649">[</text:span><text:span text:style-name="T598">vii.vb 35b</text:span><text:span text:style-name="T649">]</text:span></text:p>
      <text:p text:style-name="P202"><text:span text:style-name="T351">Tertia instantia: </text:span><text:span text:style-name="T381">c</text:span><text:span text:style-name="T351">apiatur </text:span><text:span text:style-name="T352">ista propositio: “Antichristus erit”, quae est vera. Si veritas illius propositionis distingueretur ab illa propositione, </text:span><text:span text:style-name="T353">sequitur quod aliqua entitas fuit quam possibile est numquam fuisse. Patet de illo respectu quem vocas veritatem, qui de facto fuit et tamen possibile est eam non fuisse, tanta probabilitate quanta possibile est Antichristum non fore.</text:span></text:p>
      <text:p text:style-name="P203">Respondeo: Ista propositio: “Hace veritas fuit”, dato etiam quod teneatur illam veritatem, distingui ab illa propositione dependet ex propositione de futuo contingenti, nam relatio ex fundamento et <text:soft-page-break/>termino dependet. Terminus autem illius veritatis dependet ex una propositione de futuro contingenti, et per eam non solum datur intelligi illam relationem fuisse, sed etiam secundario datur intelligi terminus illius relationis, scilicet, Antichristum fore. Sed de ista dependentia ex propositione de futuro in modalibus aliquantula fit mentio.</text:p>
      <text:p text:style-name="P203">Quarta instantia quam praedictis superaddo est supponendo <text:span text:style-name="T354">unum fundamentum quod est verum, tenendo relationes aliquo modo esse distinctas a suis fundamentis. Fundamentum est istud quod fundamentum et terminus alicuius respectus saltem </text:span><text:span text:style-name="T355">natura debent praecedere ipsum respectum. Tunc arguitur sic: fundamentum et terminus istius respectus, qui est veritas, non praecedunt istum respectum; igitur non est ponendus aliquis talis respectus.</text:span></text:p>
      <text:p text:style-name="P204">Antecedens patet et gratia exempli capio istam propositionem: “haec est vera”, seipsa demonstrata fundamentum istius respectus quae est veritas, et ista propositio: “haec est vera”, et terminus est ‘hanc esse veram’. Tunc arguo sic: non est prius natura hanc propositionem esse veram, quam quod veritas sit in ea, quia eam esse veram est ipsam habere veritatem; ergo terminus istius respectus non praecedit natura ipsum respectum.</text:p>
      <text:p text:style-name="P204">Et similiter posset argui de falsitate istius propositionis: “haec est falsa”, seipsa demonstrata solutionem quaere, sed argumentum quod ponitur pro opposito istius propositionis alibi solvitur.</text:p>
      <text:p text:style-name="P205">Secunda propositio. Propositio eo dicitur vera quia qualitercumque per ipsam significatur sententia totali et propositionali: esse vel non esse, fuisse vel non fuisse, fore vel non fore, aut possibiliter vel impossibiliter, necessario vel contingenter, ita est vel non est, fuit vel non fuit, erit vel non erit.</text:p>
      <text:p text:style-name="P206">In ista diffinitione tangitur quare propositio de praesenti, de praeterito, et de futuro dicatur vera, sive sit affirmativa sive negativa, sive modalis sive de inesse, quae satis patent intuenti diffinitionem et non de propositione hypothetica.</text:p>
      <text:p text:style-name="P207">Ex ista probatione inferri potest alia, quod si aliqua propositio potest probari esse vera probatur a priori per argumentum cuius antecedens est copulativa affirmativa composita ex illa propositione et alia quae exprimit, quid praecise significet talis propositio significatione totali et propositionali, ut ad probandum: “hanc esse veram”, “homo est animal”, <text:span text:style-name="T356">sic est arguendum: “homo est animal” et ipsa significat praecis</text:span><text:span text:style-name="T380">e</text:span><text:span text:style-name="T356"> ‘hominem esse animal’; ergo est vera.</text:span></text:p>
      <text:p text:style-name="P207"><text:span text:style-name="T357">Et notanter apponitur si potest probari illa propositio est vera, quia aliquando non potest probari esse vera per tale argumentum ut hic non est probatio: “haec est vera”, et haec significat ‘hanc esse veram’; ergo haec propositio: “haec est vera, est vera”, immo, est </text:span><office:annotation office:name="__Annotation__2888_3410507616" loext:resolved="false"><dc:creator>Unknown Author</dc:creator><dc:date>2021-09-22T00:29:10.763868843</dc:date><text:p text:style-name="P577"><text:span text:style-name="T709">Petitio principii: Antecedens est aeque ignotum sicut consequens.</text:span></text:p></office:annotation><text:span text:style-name="T357">petitio principii, quia antecedens est aeque ignotum sicut consequens</text:span><office:annotation-end office:name="__Annotation__2888_3410507616"/><text:span text:style-name="T357">.</text:span><text:span text:style-name="T356"> </text:span></text:p>
      <text:p text:style-name="P208">Ex ista propositione sequitur alia, quod quaecumque propositio potest probari esse falsa. Probatur a priori per argumentum cuius antecedens est propositio copulativa affirmativa composita ex contradictoria eius et propositione quae significat ipsam. Sic significare significatione totali, ut probatur hanc esse falsam: “homo est asinus”. Sic nullus homo est asinus et ista: “homo est asinus”, significat quod homo est asinus; ergo est falsa.</text:p>
      <text:p text:style-name="P209">Et notanter dicitur ex contradictorio, quia non satis esset sumere subcontrariam, et hoc est quia subcontraria possunt stare in veritate.</text:p>
      <text:h text:style-name="Heading_20_3" text:outline-level="3"><text:soft-page-break/>Haec propositio praecise significat sicut est</text:h>
      <text:p text:style-name="P416">Sed contra istam diffinitionem instaret aliquis stat, quod aliqua propositio significet praecise sicut est, et tamen sit falsa; ergo etiam stat quod aliqua <text:span text:style-name="T358">propositio sit falsa quae significat sicut est de sententia totali et propositionali consequentia videtur nota, quia idem est dicere praecise significat sicut est et significat sicut est de significatione totali et propositionali.</text:span></text:p>
      <text:p text:style-name="P417"><text:span text:style-name="T650">[</text:span><text:span text:style-name="T598">viii.ra 36a</text:span><text:span text:style-name="T650">]</text:span></text:p>
      <text:p text:style-name="P210">Antecedens patet <text:span text:style-name="T359">quia </text:span><text:span text:style-name="T360">ista propositio: “Deus est et homo est asinus”, significat praecise sicut est, et tamen est falsa; igitur maior patet, quia significat sicut est et non aliter quam sicut est; ergo significat praecise sicut est antecedens. Patet, quia significat ‘Deum esse et Deum esse est sicut est’, et non aliter quam sicut est; ergo significat praecise sicut est. Consequentia tenet ab exponente ad exposita.</text:span></text:p>
      <text:p text:style-name="P211">Respondeo: de hanc materiam differendum est usque ad materiam ex<text:span text:style-name="T361">ponibilium. Tamen quantum spectat ad praesens </text:span><text:span text:style-name="T362">dici potest quod illa est falsa: “haec propositio praecise significat sicut est illa”, enim est de copula exclusa, et sic habet exponi: “haec propositio significat sicut est et haec propositio non aliter est significans quam sicut est”, quod est falsum, ut probat argumentum.</text:span></text:p>
      <text:p text:style-name="P212">Ista tamen posset concedi: “<text:span text:style-name="T363">haec propositio significat praecise sicut est”, ut exclusio a parte praedicati se tenet et sensus sic haec propositio significat id quod est, sicut est, et non aliter quam sicut est.</text:span></text:p>
      <text:p text:style-name="P213">Et per hoc patet quid esse dicendum de istis propositionibus: “haec propositio significat totaliter sicut est”, aliqualiter est totaliter sicut est, qualiter ista propositio significat illae, enim sunt verae. Et istae falsae totaliter significat sicut est: “<text:span text:style-name="T364">haec propositio totaliter sicut significat est”. </text:span></text:p>
      <text:p text:style-name="P217">Patet igitur ad argumentum quod illa est concedenda: “haec propositio significat praecise sicut est”, et ille sensus est verus, significat sicut est, et non aliter quam sicut est, ut est propositio de copulato.</text:p>
      <text:p text:style-name="P217">Sed de his suis logicis relinquuntur discutienda satis tamen est. In proposito dicere propositio vera est, quae de significatione totali primaria est adaequata, significat sicut est per illa. Tamen dicat subtilius et verius exprimeretur, quid sit propositio vera ut patuit quae multum veritatem investiganti dicantur.</text:p>
      <text:h text:style-name="Heading_20_3" text:outline-level="3">De propositionis affirmativae et negativae veritate</text:h>
      <text:p text:style-name="P214">Tertia propositio. Licet omnis propositio affirmativa cuius subiectum et praedicatum pro diversis supponunt sit falsa, non tamen sit subiectum et praedicatum pro eodem supponunt propter hoc est vera:</text:p>
      <text:p text:style-name="P214">Prima pars probatur, quia si subiectum et praedicatum pro diversis supponant, et sit affirmativa iam denotabitur quod una rest sit alia ab eo diversa, quod est impossibile.</text:p>
      <text:p text:style-name="P214">Secunda pars probatur de multis propositionibus quae sunt affirmative falsae cuius subiectum et praedicatum pro eodem supponunt. Primo de ista: “omnis homo omnis homo est”, quae est falsa et tamen subiectum et praedicatum pro eodem supponunt. Similiter de ista: “aliquod animal omnis homo est”. Secundo de ista: “Deus necessario est creans”, quae est falsa et tamen subiectum et praedicatum pro eodem supponunt.</text:p>
      <text:p text:style-name="P214"><text:soft-page-break/>Secundum communiorem opinionem oppositum tamen est verum, ut in materia ampliationum et modalium clare ostenditur, in insolubilibus possit dari instantia, sed de eis non est tractatus specialis in hoc libro, ideo omitto. </text:p>
      <text:p text:style-name="P215">In exponibilibus <text:span text:style-name="T365">etiam possit instantia dari ut de ista: “Deus contingenter est Deus”, quae est falsa, subiectum et praedicatum pro eodem supponunt. </text:span><text:span text:style-name="T366">Si teneatur quod praedicatum supponit credo tamen quod raro invenientur instantia in propositione affirmativa non exponibili, et in qua nulla ponitur distributio si subiectum et praedicatum pro eodem supponunt quin sit vera. Si tamen inveniatur aliqua instantia bene quidem, quia iam negatur hoc esse efficax argumentum ad concludendum propositionem affirmativam esse veram, per hoc quod subiectum et praedicatum pro eodem supponunt. </text:span><text:span text:style-name="T368">Ista tamen consequentia est bona </text:span><text:span text:style-name="T367">et vera; ergo subiectum et praedicatum pro eodem supponunt.</text:span></text:p>
      <text:p text:style-name="P216"><text:span text:style-name="T367">“Omnis tamen affirmativa falsa est”, ratione aliquorum diversorum pro quo denotatur verificari propositio, quod enim ista sit falsa: “omnis homo omnis homo est”, hoc est propter hoc quod denotatur Sortem esse Platonem. </text:span><text:span text:style-name="T369">Ideo concedi possit quod omnis affirmativa est falsa ratione diversitatis, </text:span><text:span text:style-name="T370">e</text:span><text:span text:style-name="T369">t omnis affirmativa est vera </text:span><text:span text:style-name="T370">ratione idemptitatis. </text:span><text:span text:style-name="T371">Non quidem idemptitatis suppositionis, quia hoc est sophistice aspicere, sed idemptitatis verificationis.</text:span></text:p>
      <text:p text:style-name="P418"><text:span text:style-name="T651">[</text:span><text:span text:style-name="T598">viii.ra 36b</text:span><text:span text:style-name="T651">]</text:span></text:p>
      <text:p text:style-name="P221">Et si arguas contra istam propositionem: “ista est vera, homo non contingenter non est asinus”, et tamen subiectum et praedicatum non supponunt pro eodem; ergo propositio est falsa. Maior patet, quia aequivalet uni disiunctive verae, scilicet: “iste homo necessario est asinus, vel homo impossibiliter est asinus”, et illa est vera.</text:p>
      <text:p text:style-name="P222">Ad istud argumentum dico quod ista regula debet intelligi si talis propositio sit pure affirmativa, ita quod ad sui veritatem vel in eius expositione non includat unam negativam gratia formae. Hoc patet per exemplum de ista propositione: “non tantum homo non est asinus”, quae est vera sicut patet exponendo saltem si teneatur communis logicorum expositio et tamen subiectum et praedicatum non supponunt pro eodem.</text:p>
      <text:p text:style-name="P218"><text:span text:style-name="T372">Quarta propositio: omnis propositio affirmativa cuius subiectum vel praedicatum pro nullo supponit est falsa. Utrum autem haec regula habet veritatem in propositione affirmativa de praedicato infinito </text:span><text:span text:style-name="T373">aliis videbitur, ex quod patet quod omnes istae sunt falsa: “chimera est chimera”, “homo</text:span><text:span text:style-name="T372"> </text:span><text:span text:style-name="T374">irrationalis est homo irrationalis”, et sic de similibus.</text:span></text:p>
      <text:p text:style-name="P219">Neganti istam regulam posset probari, nam capta ista propositione: “homo irrationalis est homo irrationalis”, probo eam esse falsam, nam sequitur bene: “homo irrationalis est homo irrationalis; ergo homo irrationalis est homo”, et per conversionem simplicem: “homo est homo irrationalis”. Et ultra sequitur ergo: “aliquis homo est irrationalis”, non enim et intelligibile esse hominem irrationalem <text:span text:style-name="T375">quoniam sit homo; ergo de primo ad ultimum sequitur: “homo irrationalis est homo irrationalis; ergo aliquis homo est irrationalis”.</text:span></text:p>
      <text:p text:style-name="P220"><text:span text:style-name="T375">Et ita arguitur quod ista </text:span><text:span text:style-name="T376">est falsa: “chimera est chimera”, quia bene sequitur “chimera est chimera; ergo ens compositum ex impossibilibus posse componi, est, ens compositum ex impossibilibus posse componi”, quod est impossibile. </text:span><text:span text:style-name="T377">Ex qua deducitur quod aliquod ens est compositum ex impossibilibus posse componi, quod est impossibile dictum.</text:span></text:p>
      <text:p text:style-name="P223"><text:span text:style-name="T377">Autem Boethii in quo ait nulla est verior </text:span><text:span text:style-name="T378">praedicatio illa in qua idem praedicatur de seipso ut plurimum verum est, et non universaliter cum saepissime fallat.</text:span><text:span text:style-name="T377"> </text:span><text:span text:style-name="T379">Ideo non est immorandum in </text:span><text:soft-page-break/><text:span text:style-name="T379">assignatione exceptionum ab illa regula. Ista etiam regula habet intelligi in pure affirmativa, non negativa, quae non includit negativam is sua expositione quod additur propter istas propositiones: “non tamtum chimera non est chimera”, “chimera non contingenter non est chimera”, quae sunt verae etiam tenendo exponibiles esse categoricas, licet de prima specialis sit difficultas ut in materia exponibilium ostendetur.</text:span></text:p>
      <text:h text:style-name="Heading_20_3" text:outline-level="3">Chimaera est animal si est rubidile</text:h>
      <text:p text:style-name="P224"><text:span text:style-name="T379">Neque regulae obstat de ista propositione: “chimera est animal si est rudibile”, ipsa enim simpliciter falsa est, quia bene sequitur: “</text:span><text:span text:style-name="T382">chimera est animal si est rudibile; ergo animal si est rudibile est chimera”, per conversionem simplicem. </text:span><text:span text:style-name="T383">Sed consequens est falsum, quia omnes descendentes sunt falsae, nam si aliqua est vera maxime ista: “hoc animal, si est rubidile est chimera”, demonstrando id quod demonstrandum est ad hoc, quod sit vera. Sed probo quod illa sit falsa, quia sequitur bene: “nulla chimera est chimera, hoc animal si est rudibile est chimera; ergo hoc animal si est rudibile non est chimera”, sed praemissae sunt verae per te; ergo et conclusio et consequentia est in Ferio. Sed de huius resolutione diffusae tractatur in materia de conditionatis.</text:span></text:p>
      <text:p text:style-name="P224"><text:span text:style-name="T383">Quinta propositio: non sequitur: “est propositio negativa, et subiectum et praedicatum pro eodem supponunt; ergo est falsa”. Haec patet, nam ista est vera: “homo aliquid animal non est, et tamen subiectum et praedicatum supponunt pro eodem”. Similiter ista est vera: “</text:span><text:span text:style-name="T397">a</text:span><text:span text:style-name="T383"> homo non est animal”, supposito quod ly ‘a’ faciat supponere </text:span><text:span text:style-name="T384">confuse tantum terminum immediate sequentem, et tamen subiectum et praedicatum pro eodem supponunt.</text:span></text:p>
      <text:p text:style-name="P419">Sexta propositio: duae sunt causae sufficientes ad hoc quod propositio negativa dicatur vera:</text:p>
      <text:p text:style-name="P420"><text:span text:style-name="T652">[</text:span><text:span text:style-name="T598">viii.va 37a</text:span><text:span text:style-name="T652">]</text:span></text:p>
      <text:p text:style-name="P225">Prima est quod subiectum vel praedicatum pro nullo supponat, quod debet intelligi de pure negativa, nam ista est falsa: “chimera contingenter non est chimera”, et tamen subiectum pro nullo supponit.</text:p>
      <text:p text:style-name="P226">Secunda causa sufficiens ad veritatem negativae est quod subiectum et praedicatum pro omnino diversis supponant, et ideo ista consequentia est bona: “ista propositio est negativa, et subiectum vel praedicatum pro nullo supponit; ergo est vera”. Etiam illa consequentia est bona: “<text:span text:style-name="T385">ista propositio est negativa, et subiectum et praedicatu pro diversis supponunt; ergo est vera”, et hoc semper loquendo de pure negativa.</text:span></text:p>
      <text:p text:style-name="P227">Ex dictis satis patet quod quicquid requiritur ad veritatem affirmativae, illud requiritur ad falsitatem negativae. Illud sufficit ad veritatem negativae contradictoriae. Et certe, ad cognoscendum veritatem vel falsitatem negativae, multum confert aspicere ad veritatem vel falsitatem suae contradictoriae. </text:p>
      <text:p text:style-name="P227">Affirmativae de possibilitate ponuntur aliquae propositiones:</text:p>
      <text:h text:style-name="Heading_20_3" text:outline-level="3">Nulla propositio est negativa</text:h>
      <text:p text:style-name="P226"><text:span text:style-name="T385">Prima propositio: non dicitur possibilis eo quod possit esse vera, similiter, </text:span><text:span text:style-name="T386">non dicitur impossibilis ex eo quod non possit esse vera. Patet quia tunc sequeretur quod illa propositio: “nulla propositio est negativa”, esset impossibilis, patet quia non potest esse vera, quia si ipsa esset vera, aliqua propositio est negativa, puta ipsamet, sed de istis propositionibus habentibus reflectionem alibi habet videri.</text:span><text:span text:style-name="T385"> </text:span><text:s/></text:p>
      <text:h text:style-name="Heading_20_3" text:outline-level="3"><text:soft-page-break/>Omne existens est Deus</text:h>
      <text:p text:style-name="P228">Secunda propositio: ideo dicitur <text:span text:style-name="T387">possibilis, quia qualitercumque per ipsam significatur significationi totali et propositionali ita potest esse, manente significatione terminorum, ut ista est possibilis: “omne existens est Deus”, quia possibile est ita esse quod omne existens sit Deus, </text:span><text:span text:style-name="T388">unde si solus Deus esset omne existens esset Deus.</text:span></text:p>
      <text:p text:style-name="P237">Et notanter ponitur in diffinitione totali significatione, quia ad videndum possibilitatem propositionis non sufficit aspicere ad significationem partialem inadaequatam seu secundariam. Sed oportet aspicere ad significationem totalem adaequatam seu primariam.</text:p>
      <text:p text:style-name="P238">Sed contra istam diffinitionem sunt aliquae instantiae. Prima est si ista diffinitio esset bona sequeretur quod ista non esset possibilis: “omne existens est Deus”, sed consequens est falsum; igitur consequentia probatur, quia non est possibile ita esse qualitercumque ipsa significat; ergo non est possibilis antecedens. Patet quia ista propositione: “Omne existens est Deus”, significat ‘Sortem esse Deum’, et hoc non est possibile.</text:p>
      <text:p text:style-name="P229"><text:span text:style-name="T389">Ad hoc argumentum responderi posset quod licet significet ‘Sorte esse Deum’, non tamen de significatione totali. </text:span><text:span text:style-name="T390">Ipsa enim </text:span><text:span text:style-name="T391">de significatione totali significat ‘omne ens esse Deum’, et hoc est possibile,</text:span><text:span text:style-name="T388"> </text:span><text:span text:style-name="T391">nam si ponatur quod solus Deus sit, tunc omne ens est Deus.</text:span></text:p>
      <text:p text:style-name="P239">Additur tamen communiter in diffinitione qualitercumque significat vel significare potest, quia licet non possibile sit ita esse sicut per eam significatur, tamen possibile est ita esse sicut per eam potest significari significatione accepta ex acceptione terminorum, de qua statim dicetur, ut positio quod Deus solus esset praecise significaret ‘hoc ens esse Deum’, et ita esset. Sed animadvertere debes quod si in hac materia fueris argumentatione coactus dicere veritatem, recurre ad iam dicta de ista: “omne existens est Deus”, et de modo descendendi in materia de descensu agitur.</text:p>
      <text:p text:style-name="P231">Tertia instantia est probando idem quod prius quod ista non sit possibilis: “<text:span text:style-name="T392">omne existens est Deus”, quia qualitercumque ipsa significat vel significare potest, non est possibile ita esse. Patet quia ipsa significat omne existens, quod est et quod fuit et quod erit, et quod potest esse, esse Deum. Sed hoc non est possibile; igitur patet quia propositio significat quicquid termini significant, sed iste terminus ‘existens’ significat o</text:span><text:span text:style-name="T393">mne existens quod est, et quod fuit, et quod erit, et quod potest esse. Cum iste terminus ‘significat’ ampliet ad illud quod est, et quod fuit, et quod erit, et quod potest esse; ergo ista propositio: “omne existens quod est, et quod fuit, et quod erit, et quod potest esse”, ‘esse Deum’ significat.</text:span></text:p>
      <text:p text:style-name="P421"><text:span text:style-name="T653">[</text:span><text:span text:style-name="T598">viii.vb 37b</text:span><text:span text:style-name="T653">]</text:span></text:p>
      <text:p text:style-name="P230"><text:span text:style-name="T394">Quarta instantia est probando quod in diffinitione non debet addi illa particula manente significatione terminorum.</text:span><text:span text:style-name="T392"> </text:span><text:span text:style-name="T395">Nam si hoc esset sequeretur quod multae propositiones quae sunt possibiles dicerentur impossibiles.</text:span></text:p>
      <text:p text:style-name="P232">Consequentia probatur:</text:p>
      <text:h text:style-name="Heading_20_3" text:outline-level="3">‘A’ imponitur ad significandum</text:h>
      <text:p text:style-name="P232">Tum primo: de ista propositione ‘a’, <text:span text:style-name="T401">imponitur ad significandum, quae non potest esse vera nisi ‘a’ imponatur ad significandum; ergo iam non manet significatio terminorum.</text:span></text:p>
      <text:h text:style-name="Heading_20_3" text:outline-level="3"><text:soft-page-break/>“Haec est vera: homo est asinus”</text:h>
      <text:p text:style-name="P233">Tum secundo: quia ista ista non esset possibilis: “haec est vera: <text:span text:style-name="T402">homo est asinus”, </text:span><text:span text:style-name="T403">quod videtur falsum. Nam est possibile quod ista propositio: “homo est asinus”, significet ‘hominem esse animal’, quo facto ista est vera: “homo est asinus”.</text:span></text:p>
      <text:p text:style-name="P240">Sed quod non fit possibilis probatur:</text:p>
      <text:p text:style-name="P234"><text:span text:style-name="T404">T</text:span><text:span text:style-name="T403">um </text:span><text:span text:style-name="T404">primo: quia non potest ita esse sicut per eam significatur manente significatione terminorum.</text:span></text:p>
      <text:p text:style-name="P235">Tum: quia bene sequitur: “haec est vera: homo est asinus; ergo homo est asinus”, sed consequens est impossibile; ergo et antecedens. Et consequentia probatur per Aristotelem in postpraedicamentis, quia dicit quod ad propositionem esse veram, ad ita esse, est bona consequentia, et econtra, quia ab eo quod res est vel non est, oratio vera vel falsa dicitur; ergo bene sequitur: “haec est vera: homo est asinus; ergo ita est quod homo est asinus”.</text:p>
      <text:h text:style-name="Heading_20_3" text:outline-level="3">Duplex est significatio propos<text:span text:style-name="T408">i</text:span>tionis</text:h>
      <text:p text:style-name="P236">Pro solutione istorum argumentorum solet poni talis distinctio: “<text:span text:style-name="T406">d</text:span><text:span text:style-name="T405">uplex est significatio propositionis: quaedam est quae attenditur ex parte significatio propositionis; quaedam est quae attenditur ex parte significationis terminorum.”</text:span></text:p>
      <text:p text:style-name="P241">Hoc modo propositio significat quidquid termini <text:span text:style-name="T407">significant, et ideo </text:span><text:span text:style-name="T409">ista significatio convenit propositioni quandocumque termini significant, et numquam variatur, manente significatione terminorum, et penes istam significationem non attenditur veritas vel falsitas propositionis, neque possibilitas, neque impossibilitas, sicut bene probat argumentum.</text:span></text:p>
      <text:p text:style-name="P242"><text:span text:style-name="T409">Alia est significatio propositionis </text:span><text:span text:style-name="T410">quae convenit propositioni ex acceptione terminorum in tali propositione. Hoc modo pro propositio significat illa pro quibus termini accipiuntur, et istam significationem potest mutare propositio (ut dicitur communiter, sed Sorte est falsum ut in secundo capitulo declaratur) secundum</text:span><text:span text:style-name="T409"> <text:s/></text:span><text:span text:style-name="T410">quod termini pro aliis et aliis accipiuntur. Unde ista propositio: “omne existens est Deus”, significat ‘sorte esse Deum’, quia </text:span><text:span text:style-name="T411">ly ‘existens’ supponit pro Sorte. </text:span><text:span text:style-name="T412">Et secundum istam significationem attenditur veritas vel falsitas propositionis, possibilitas vel impossibilitas, et sic de singulis.</text:span></text:p>
      <text:p text:style-name="P242"><text:span text:style-name="T412">Ideo cum</text:span><text:span text:style-name="T411"> </text:span><text:span text:style-name="T412">de istis diffinitionibus ponitur ponitur, manente significatione terminorum, debet glosari. Id est, manente eadem acceptione terminorum. Ex quo patet quod ista propositio est possibilis ‘a’ imponitur ad significandum. Et cum dicitur quod non potest ita esse sicut per eam significatur, manente significatione terminorum, hoc nego.</text:span></text:p>
      <text:p text:style-name="P243">Et cum probatur quia si ista sit vera ‘a’ imponitur ad significandum iam variatur significatio. Distinguo aut significatio, id est, nova impositio terminorum et sic concedo aut quod variatur significatio, id est, acceptio terminorum in tali propositione, et sic nego. Nam dato quod ‘a’ impon<text:span text:style-name="T413">a</text:span>tur <text:span text:style-name="T413">ad significandum adhuc dicendo ‘a’ imponitur ad significandum sive non. Ex quo sequitur ulterius quod ista propositio est possibilis: “haec est vera: homo est asinus”, quia potest ita esse sicut per eam significatur, manente eadem acceptione terminorum in illa propositione. Nam positio quod ista propositio: “homo est asinus”, significaret ‘hominem esse animal’, tunc ista esse vera: “haec est vera: homo est asinus”, ergo ita est in re quod haec est vera: “homo est asinus”.</text:span></text:p>
      <text:p text:style-name="P244">Et si dicas bene sequitur: “hace est vera, homo est asinus”, ergo ita est in re quod homo est asinus, sed consequens est impossibile; ergo et antecedens.</text:p>
      <text:p text:style-name="P244"><text:soft-page-break/>Respondetur quod illa consequentia non valet, sed oportet sic arguere: “haec est vera: homo est asinus”, et significat ‘hominem ese asinum’; ergo ita est quod homo est asinus. Sed sicut consequens est falsum ita totale antecedens quia partes adinvicem repugnant, et sic patet quid sit dicendum ad Aristotelem qui dicit quod ad propositionem esse veram ad ita esse est bona consequentia. Dico quod verum est si in antecedente significatio talis propositionis exprimatur sicut dictum est, ita quod in antecedente ponatur pro positio exprimens talem significationem.</text:p>
      <text:p text:style-name="P422"><text:span text:style-name="T654">[</text:span><text:span text:style-name="T598">ix.ra 38a</text:span><text:span text:style-name="T654">]</text:span></text:p>
      <text:p text:style-name="P245">Et si obiicias: non sequitur etiam addita tali propositione in antecedente ut non sequitur: “<text:span text:style-name="T414">haec est vera: homo est asinus”, significat ‘hominem esse asinum’; ergo homo est asinus, quia antecedens est possibile et consequens impossibile. Possibilitas antecedentis declaratur, quia casu posito quod “homo est asinus” significet tantum quantum ista: “homo est animal”, tunc illae duae praemissae sunt verae, scilicet “haec est vera: homo est asinus”, et significat ‘hominem esse asinum’.</text:span></text:p>
      <text:p text:style-name="P245"><text:span text:style-name="T415">Respondeo illae duae praemissae adinvicem repugnant in illa, enim haec propositio significat ‘hominem esse asinum’, ly ‘significat’ appellat significationem huius, quod est ‘hominem esse asinum’, puta huius quod est “hoc esse hoc”,</text:span><text:span text:style-name="T414"> </text:span><text:span text:style-name="T415">per primum ‘hoc’ demonstrando hominem et per secundum ‘hoc’ demonstrando asinum, cum autem ponitur quod illa: “homo est asinus”, significet tantum quamtum haec propositio: “homo est animal”. Sic dicendo: “homo est asinus”, significat ‘hominem esse asinum’, ly ‘significat’ appellat aliam significationem, scilicet, huius quod est ‘hominem esse animal. Et ad formam argumenti quae videtur dif</text:span><text:span text:style-name="T416">ficilis cum dicitur ille duae sunt verae casu posito.</text:span></text:p>
      <text:p text:style-name="P246">Respondeo: casu illo posito non est eadem propositio <text:span text:style-name="T417">quae est modo, sicut enim non est eadem propositio</text:span> <text:s/>ista: “homo est asinus”, secundum impositionem quam nunc habent termini et mutando illam impositionem illorum terminorum. Sic etiam cum dico: haec propositio “homo est asinus” significat ‘hominem esse asinum’, si auferatur significatio quam nunc habet, ly ‘hominem esse asinum’, tunc non est eadem propositio.</text:p>
      <text:p text:style-name="P247">Et si dicas tunc sequitur quod ista est necessaria: haec propositio “homo est asinus”, significat <text:s/>‘hominem esse asinum’, patet quia non potest esse falsa manente significatione terminorum.</text:p>
      <text:p text:style-name="P247">Respondeo: licet non posset esse falsa, tamen potest aliter esse quam ipsa nunc de facto significat, ita videlicet quod demonstrato illo significato “haec est vera” hoc potest esse aliter. Clarum enim est quod illa propositione non existente, ipsa non significat ‘hominem esse asinum’.</text:p>
      <text:p text:style-name="P248">Sed adhuc instaret aliquis quod ista non sit possibilis: “haec est vera: homo est asinus”, <text:span text:style-name="T418">patet quia </text:span><text:span text:style-name="T419">pari ratione ista esset possibilis: “haec est falsa”, per ly ‘haec’ demonstrando illam propositionem: “haec non est falsa”, in qua ly ‘haec’ demonstrat seipsam quod si conceditur.</text:span></text:p>
      <text:p text:style-name="P249">In Ferio ergo possibile contradicit necessario. Patet <text:span text:style-name="T420">sic ista est necessaria: “haec non est falsa”, per ly ‘haec’ demonstrando seipsam, quia non potest aliter esse quam per ipsam significatur, et tamen illa est sua contradictoria, quia sunt duae singulares, una affirmativa et alia negativa, neque aliqua conditio deest ad contradictorias.</text:span></text:p>
      <text:p text:style-name="P250">Respondeo: quantum ad praesens dici potest illa propositio est contingens seipsa demonstrata, licet enim illa non posset esse falsa, tamen potest aliter esse quam per ipsam significatur vel significari potest a parte rei, nam ponatur quod illa vocalis: “haec non est falsa”, significet quod homo est asinus. Aliter est a parte rei quam per eam significabatur, nam significabatur quod illa: “haec non est falsa”, est falsa et ita est.</text:p>
      <text:h text:style-name="Heading_20_3" text:outline-level="3"><text:soft-page-break/>Utrum ista sit possibilis: “Adam non fuit”</text:h>
      <text:p text:style-name="P250">Quinta instantia: Si illa diffinitio propositionis possibilis esset bona sequeretur <text:span text:style-name="T421">quod ista propositio: “Adam non fuit”, non esset possibilis. Sed consequens est falsum, quia ista propositio: “Adam non fuit”, aliquando fuit vera, puta, ante productionem ipsius Adae; ergo ese possibilis. Sed consequentia probatur, quia non potest ita esse sicut per eam significatur; igitur antecedens patet, quia ipsa significat ‘Adam non fuisse’, et non potest esse quod Adam non fuerit.</text:span></text:p>
      <text:h text:style-name="Heading_20_3" text:outline-level="3">Impossibile simpliciter, secundum quid et per refl<text:span text:style-name="T423">e</text:span>xionem</text:h>
      <text:p text:style-name="P251">Ad hoc argumentum solet dici quod duplex est impossibile: quoddam est impossibile simpliciter, aliud est impossibile secundum quid. </text:p>
      <text:p text:style-name="P251">Unde impossibile simpliciter est illud quod est impossibile in ordine ad quamlibet differentiam temporis, et est illud quod sic se habet, quod non potest, neque potuit, neque poterit sic esse sicut per ipsum significatur et hoc modo ista propositio: “Deus non est”, dicetur impossibilis et hoc modo repugnat propositioni impossibili quod fit, aut fuerit, aut quod possit esse vera.</text:p>
      <text:p text:style-name="P423"><text:span text:style-name="T655">[</text:span><text:span text:style-name="T598">ix.rb 38b</text:span><text:span text:style-name="T655">]</text:span></text:p>
      <text:p text:style-name="P252">Aliud est impossibile secundum quid, puta quo ad aliquam differentiam temporis, et hoc modo propositio falsa de praeterito est impossibilis, quia postquam fuit, falsa impossibile est, quod sit vera, ut ista propositio est impossibilis secundum quid: “<text:span text:style-name="T422">Adam non fuit”, quia impossibile est quod Adam non fuerit et hoc tenendo quod ad praeteritum non est potentia.</text:span></text:p>
      <text:p text:style-name="P253">Praeter istud tamen duplex impossibile iam dictum solet assignari aliud impossibile, quod vocatur impossibile per reflexionem <text:span text:style-name="T424">sicut ista propositio est impossibilis: “hoc est impossibilis”, se ipsa demonstrata ipsa tamen est dicenda simpliciter contingens, quia sua contradictoria est contingens.</text:span></text:p>
      <text:p text:style-name="P254">De propositione necessaria ponuntur aliquae propositiones:</text:p>
      <text:p text:style-name="P255">Prima propositio non dicitur necessario eo quod non possit esse falsa, manente significatione terminorum in tali propositione. Ista propositio probatur primo, quia tunc sequeretur quod ista propositio esset necessaria: “ista propositio est particularis”, quia non potest esse falsa, quia si sit falsa ipsa est, et si ipsa est, aliqua propositio est particularis.</text:p>
      <text:p text:style-name="P255">Secundo: Patet de ista: “Anima Sortis non est”, quae est contingens, posito quod in mente Sortis, et tamen non potest esse falsa, quia si esse falsa Sorte non esset neque etiam, neque etiam anima eius, et per consequens ipsa non esset quod repugnat. Scilicet, quod non sit et quod sit falsa.</text:p>
      <text:h text:style-name="P574" text:outline-level="3">Utrum ista propositio sit necessaria: “omne ens est”</text:h>
      <text:p text:style-name="P255">Secunda: Propositio non dicitur necessaria quia qualitercumque per ipsam significatur vel significari potest, necesse est ita esse, quia tunc sequeretur vel significari potest. Necesse est ita esse, quia tunc sequeretur quod ista esset necessaria: “omne ens est”, Deus posito, casu quod solus Deus esset. Tunc enim non significaret nisi ‘deum esse’, et hoc est necesse.</text:p>
      <text:p text:style-name="P256">Item sequeretur quod ista propositio: “omne ens est”, non esset necessaria, quia aliqualiter per ipsam significatur, scilicet ‘Sortem esse”, et non est necesse ita esse.</text:p>
      <text:p text:style-name="P256">Tertia: <office:annotation office:name="__Annotation__4068_2615572816" loext:resolved="false"><dc:creator>Unknown Author</dc:creator><dc:date>2021-09-25T21:35:44.984445659</dc:date><text:p text:style-name="P577"><text:span text:style-name="T709">Diffinitio propositionis necessariae.</text:span></text:p></office:annotation>Propositio dicitur necessaria quia non potest aliter esse quam per ipsam significatur vel significari potest de significatione totali et adaequata seu primaria.<office:annotation-end office:name="__Annotation__4068_2615572816"/> Et hoc manente significatione terminorum in tali propositione.</text:p>
      <text:p text:style-name="P256"><text:soft-page-break/>Et si arguas tunc sequeretur quod ista non esset necessaria: “omne ens est”, quia non est necesse ita esse sicut per eam significatur, quia per eam significatur ‘Sortem esse’, et hoc non est necesse.</text:p>
      <text:p text:style-name="P256">Ad hoc respondeo <text:span text:style-name="T425">quod necesse est ita esse sicut per eam significatur significatione totali, sed nego quod ista propositio: “omne ens est”, significatione totali significet ‘Sortem esse”, sed significat significatione totali ‘omne ens esse’.</text:span></text:p>
      <text:p text:style-name="P257">Et adverte quo si in istis diffinitionibus <text:span text:style-name="T426">ponatur ista particula ‘qualitercumque’ intelligendo ‘qualitercumque’ et ‘quocumque’ modo significat, </text:span><text:span text:style-name="T427">possunt fieri multae importunationes contra diffinitiones assignatas. Ideo melius est dicere quod per qualitercumque intelligitur, id est, de significatione adaequata. Et similiter debet intelligi in diffinitione propositionis possibilis. Unde arguebatur contra diffinitionem propositionis possibilis quod ista esset impossibilis: “omne ens est Deus”, quia significat ‘Sortem esse Deum’, et sic facilius solvitur argumentum.</text:span></text:p>
      <text:h text:style-name="Heading_20_3" text:outline-level="3">Necessarium simpliciter et secundum quid</text:h>
      <text:p text:style-name="P258">Et memorandum est quod sicut dictum est duplex esse: impossibile simpliciter, et secundum quid. Ita dicendum est duplex esse necessarium, scilicet, simpliciter et per se. Aliud secundum quid seu per accidens, unde necessarium simpliciter sue per se est necessarium quo ad omnem differentiam temporis. Et est illud quod qualiter significat sententia totali et propositionali: Taliter necessario est, et taliter necessario fuit, et necessario erit.</text:p>
      <text:p text:style-name="P259">Aliud est impossibile per accidens seu quo ad aliquam differentiam temporis. Et est illud quod necessario est vel quod necessario fuit taliter quod non potest aliter esse virtute divina, quam ipsum significat, et hoc modo est necessarium Adam fuisse, quia non potest taliter esse, et hoc tenendo quod ad praeteritum nulla est potentia.</text:p>
      <text:p text:style-name="P259">Et de isto solet poni una regula:</text:p>
      <text:p text:style-name="Quotations">Omnis propositio affirmativa de praeterito vera est necessaria.</text:p>
      <text:p text:style-name="P259">Cuius exceptiones aliis locis declarantur.</text:p>
      <text:p text:style-name="P424"><text:span text:style-name="T656">[</text:span><text:span text:style-name="T598">ix.va 39a</text:span><text:span text:style-name="T656">]</text:span></text:p>
      <text:p text:style-name="P260">Sed finaliter circa totam istam materiam quaero unum dubium.</text:p>
      <text:h text:style-name="Heading_20_3" text:outline-level="3">Utrum propositio mentalis vera contingens possit falsificari</text:h>
      <text:p text:style-name="P261">Utrum propositio mentalis vera contingens possit falsificari, <text:span text:style-name="T428">et notanter apponitur falsificari: Aliud est enim posse propositionem esse falsam, et aliud posse falsificari.</text:span></text:p>
      <text:p text:style-name="P271">Unde non est dubium quin propositio mentalis vera contingens potest esse falsa, sed dubium est apud doctores an possit falsificari, id est, postquam fuit vera an possit esse falsa, quia propositio falsificatur quando postquam fuit vera, de novo est falsa.</text:p>
      <text:p text:style-name="P262">Ad dubium respondent aliqui quod propositio mentalis vera contingens postquam est vera non potest falsificari.</text:p>
      <text:p text:style-name="P262">Et si quaeratur quare magis de mentali quam de vocali ad hoc adducitur una ratio pro qua suppono quod propositio mentalis naturaliter significat, et per consequens necessario significat illud quod significat, sed non vocalis.</text:p>
      <text:p text:style-name="P262"><text:soft-page-break/>Tunc arguo sic et capio istam mentalem: “Sortes currit”, qua volo esse veram. Ista significat naturaliter ‘Sortem currere’ in tempore praesenti; ergo postquam naturaliter significat semper idem significat. Ergo postquam Sortes desinit currere significat ‘Sortem’ in tali tempore in quo currebat, cucurrisse. Neque valet dicere quod ipsa est falsa, quia significat ‘Sortem currere’ eo tempore quo Sortes non currit.</text:p>
      <text:p text:style-name="P263">Nam contra hoc arguitur quando Sortem currere in isto tempore; ergo nunc non significat ‘Sortem currere’ in isto tempore. Patet consequentia quia naturaliter significat; ergo idem semper significat; ergo habetur intentum quod postquam Sortes desinit currere illa mentalis significat ‘Sortem cucurrisse’ illo tempore in quo currebat, quia aliter mutaretur eius significatio quod non est possibile, quia naturaliter significat.</text:p>
      <text:p text:style-name="P263">Et sic propter istam rationem tenent aliqui quod propositio mentalis contingens vera non potest falsificari. Dico tamen quod si teneretur distinctio illa de significatione propositionis, probabilius est dicere quod propositio mentalis contingens vera potest falsificari.</text:p>
      <text:p text:style-name="P264">Ad cuius intelligentiam videretur applicanda in proposito distinctio illa prius posita, scilicet, quod duplex est significatio propositionis quaedam est quae convenit propositioni ex parte significationis terminorum, et illa semper convenit propositioni mentali, nec unquam variatur sicut nec significatio terminorum. Et hoc modo ista propositio: “Sortes est currens”, significat illud quod ille terminus ‘Sortes’, puta Sortem qui est, et qui fuit, et qui erit, et qui potest esse, et ly ‘est’ connotat vel consignificat tempus praesens quod est, vel quod fuit, vel quid erit, vel quod potest esse. Ex quo sequitur quod ly ‘est’ tempus praeteritum significat, quia tempus praeteritum est illud quod est, vel quod fuit, vel potest esse tempus praesens.</text:p>
      <text:p text:style-name="P264">Dicitur tamen communi<text:span text:style-name="T429">ter quod non significat tempus praeteritum, propter appellationem rationis, quam ponunt de ly ‘praeteritum’ propter illud verbum significat.</text:span></text:p>
      <text:p text:style-name="P265">Alia est significatio propositionis mentalis quae convenit propositioni ex acceptione terminorum, et ista significatio variatur, ut solet dici, secundum quod termini pro alio vel alio accipiuntur. Et secundum hoc diceretur quod ista significatio secunda, a qua sumitur veritas propositionis sicut dictum est, non convenit propositioni naturaliter et necessario. Et ista significatio variatur sicut variatur acceptio terminorum, et sicut acceptio terminorum non convenit propositioni mentali naturaliter, sic nec ista significatio. Ex quo patet correlarium quod postquam Sortes cucurrit ista propositio: “Sortes currit”, significat ‘Sortem cucurrisse in isto tempore praesenti in quo sumus. Et huius ratio est quia ly ‘est’ accipitur pro isto tempore in quo sumus.</text:p>
      <text:p text:style-name="P266">Et s<text:span text:style-name="T430">i</text:span> quaeras: <text:span text:style-name="T430">nonne ista propositio “Sortes currit”, significat ‘Sortem cucurrisse’ in illo tempore praeterito quod erat praesens quando currebat.</text:span></text:p>
      <text:p text:style-name="P266"><text:span text:style-name="T430">Ad istud respondetur quod non significat ‘Sortem cucurrisse’ </text:span><text:span text:style-name="T431">i</text:span><text:span text:style-name="T430">sta secunda significatione de </text:span><text:span text:style-name="T431">qua est loquendum. </text:span><text:span text:style-name="T432">Et huius ratio est, quia ly ‘est’ non supponit pro eodem tempore praesenti pro quo prius supponebat, quia non accipitur pro tempore quod nunc est praesens, et tunc accipiebatur pro tempore quod nunc est praesens, et tunc accipiebatur pro tempore quod erat praesens. </text:span><text:span text:style-name="T433">Et secundum hoc argumentum praesupponebat falsum, quod illa </text:span><text:span text:style-name="T434">significatio, penes quam attenditur veritas vel falsitas propositionis, conveniat propositioni naturaliter et necessario.</text:span></text:p>
      <text:p text:style-name="P425"><text:span text:style-name="T657">[</text:span><text:span text:style-name="T598">ix.vb 39b</text:span><text:span text:style-name="T657">]</text:span></text:p>
      <text:p text:style-name="P267">Ex ista ergo, solutione, formaretur argumentum contra praedictum modum dicendi, quia si ille modus dicendi sit verus, sequitur etiam quod propositio vocalis contingens non possset falsificari <text:soft-page-break/>cum ipsa non mutet significationem, absque nova impositione terminorum quod si concedatur sequitur primo quod propter corruptionem rerum, termini non desinerent supponere in vocali ut, puta, si in pariete sit ista scripta: “Petrus est existens”, et postea Petrus desinat esse illi, termini non desinerent supponere, quia si desinerent supponere, illa propositio fieret falsa. Si concedas quod non desinerent supponere.</text:p>
      <text:p text:style-name="P268">Contra quia post corruptionem, tales termini non verificarentur in ordine ad talem copulam; ergo non supponerent.</text:p>
      <text:p text:style-name="P269">Sequeretur secundo quod ista esse impossibilis: “omne ens est Deus”. Patet quia illa possibilitas propositionis habet sumi penes significationem terminorum, secundum illum modum. </text:p>
      <text:p text:style-name="P269">Talem autem significationem aspiciendo illa esset impossibilis, ut uno argumento prius arguebatur. Si igitur talis possibilitas oritur ex significatione accepta, ex acceptione terminorum, habet dicere, ut videtur quod ipsa potest verificari et falsificari.</text:p>
      <text:p text:style-name="P269"/>
      <text:p text:style-name="P460">Finis primi capituli</text:p>
      <text:p text:style-name="P270"/>
      <text:p text:style-name="Quotations">Incipit secundum</text:p>
      <text:h text:style-name="P570" text:outline-level="1">Capitulum secundum: <text:span text:style-name="T699">D</text:span>e <text:span text:style-name="T699">C</text:span>onsequentiis</text:h>
      <text:p text:style-name="P1"/>
      <text:h text:style-name="Heading_20_1" text:outline-level="1">Capitulum tertium: <text:span text:style-name="T699">D</text:span>e <text:span text:style-name="T699">C</text:span>ontradictoriis</text:h>
      <text:p text:style-name="Text_20_body"/>
      <text:h text:style-name="Heading_20_1" text:outline-level="1">Capitulum quartum: <text:span text:style-name="T701">D</text:span>e <text:span text:style-name="T701">C</text:span>onversionibus</text:h>
      <text:p text:style-name="P2"/>
      <text:h text:style-name="Heading_20_1" text:outline-level="1">Capitulum quintum: <text:span text:style-name="T701">D</text:span>e <text:span text:style-name="T701">H</text:span>ypotheticis</text:h>
      <text:p text:style-name="P3"/>
      <text:h text:style-name="Heading_20_2" text:outline-level="2">De copulativis</text:h>
      <text:h text:style-name="Heading_20_2" text:outline-level="2">De copulatis</text:h>
      <text:h text:style-name="Heading_20_2" text:outline-level="2">De temporalibus</text:h>
      <text:h text:style-name="Heading_20_2" text:outline-level="2">De disiunctivis</text:h>
      <text:h text:style-name="Heading_20_2" text:outline-level="2">De rationali decim<text:span text:style-name="T1">a</text:span>quinta regula</text:h>
      <text:h text:style-name="Heading_20_2" text:outline-level="2">De causalibus decimasexta regula</text:h>
      <text:h text:style-name="Heading_20_1" text:outline-level="1">Capitulum sextum: <text:span text:style-name="T702">D</text:span>e <text:span text:style-name="T702">A</text:span>mpliationibus</text:h>
      <text:h text:style-name="Heading_20_1" text:outline-level="1">Capitulum septimum: <text:span text:style-name="T702">D</text:span>e <text:span text:style-name="T702">A</text:span>ppe<text:span text:style-name="T2">ll</text:span>atio<text:span text:style-name="T186">ne </text:span><text:span text:style-name="T702">P</text:span><text:span text:style-name="T186">rimo </text:span><text:span text:style-name="T703">D</text:span><text:span text:style-name="T186">e </text:span><text:span text:style-name="T702">F</text:span><text:span text:style-name="T186">ormali</text:span></text:h>
      <text:p text:style-name="P135"/>
      <text:h text:style-name="Heading_20_3" text:outline-level="3">Contra solicite inquirentes numerum categoricarum</text:h>
      <text:p text:style-name="P136"><office:annotation office:name="__Annotation__1388_1867773820" loext:resolved="false"><dc:creator>Unknown Author</dc:creator><dc:date>2021-09-10T21:02:30.160588901</dc:date><text:p text:style-name="P577"><text:span text:style-name="T709">‘</text:span><text:span text:style-name="T709">Sortes’ non debet ponit in praedicamento substantiae, id est, suppositionem, sed in connotationem, quia ‘Sortes’ est terminus significans totum et per consequens habet partes.</text:span></text:p></office:annotation>Ex istis posset deduci altercatio difficilis contra inquirentes sollicite numerum praedicamentorum quod isti termini ‘Sortes’, ‘Plato’, et caetera, non ponantur in praedicamento substantiae quia quando est terminus connotativus non debet poni in praedicamento penes suppositionem, sed penes connotationem, et sic concluderetur quod nullus terminus significans totum, habens partes, poneretur in praedicamento substantiae.<office:annotation-end office:name="__Annotation__1388_1867773820"/></text:p>
      <text:p text:style-name="P137"><office:annotation office:name="__Annotation__1399_1867773820" loext:resolved="false"><dc:creator>Unknown Author</dc:creator><dc:date>2021-09-10T21:09:34.103662562</dc:date><text:p text:style-name="P577"><text:span text:style-name="T709">Numerum praedicamentorum inveniri non potest.</text:span></text:p></office:annotation>Sed certe illa disputatio de numero praedicamentorum eo modo quo solet fieri est multum inutilis, forsitan enim quaeretur quod inveniri non potest<office:annotation-end office:name="__Annotation__1399_1867773820"/>, satis enim est quod <office:annotation office:name="__Annotation__1400_1867773820" loext:resolved="false"><dc:creator>Unknown Author</dc:creator><dc:date>2021-09-10T21:09:45.128303207</dc:date><text:p text:style-name="P577"><text:span text:style-name="T709">Decem praedicamenta sunt termini optime declarantes omnem rem et omnem modum se habendi omnium rerum.</text:span></text:p></office:annotation>decem sunt termini optime <text:soft-page-break/>declarantes ac optime explicantes omnem rem et omnem modum se habendi omnium rerum quae in mundo continentur.<office:annotation-end office:name="__Annotation__1400_1867773820"/></text:p>
      <text:h text:style-name="Heading_20_3" text:outline-level="3">In quo praedicamento ponitur ly ‘Sortes’</text:h>
      <text:p text:style-name="P140"><text:span text:style-name="T187">Si ergo quaeratur ‘Sortes’ in quo praedicamento. Respondendum est si teneatur eum esse connotativum quod ea parte, qua significat substantiam in praedicamento substantiae, sed ea parte, qua significa modum se habendi informative, pertinet ad aliquod praedicamentorum relationis, unde </text:span><text:span text:style-name="T188">rem aliquam poni in praedicamento substantiae, est cognoscere ream aliquam esse de numero substantiarum.</text:span></text:p>
      <text:h text:style-name="P575" text:outline-level="3">Quid est rem poni in praedicamento substa<text:span text:style-name="T192">n</text:span>tiae</text:h>
      <text:p text:style-name="P138"><text:span text:style-name="T188">Et si velis omnino dicere quod terminus ponatur in praedicamento praecise secundum connotationem, videas quid connotat, et consequenter dic talem terminum esse ponendum in praedicamento, et ideo si ponatur quod ly ‘Sortes’ est terminus connotativus informationis, consequenter dicendum est quod non ponitur in praedicamento substantiae, </text:span><text:span text:style-name="T189">et ita si complete fuit aut erit probatum quod ‘Sortes’ sit terminus connotativus iam destruuntur praedicamenta ad intensionem illorum, etiam si teneatur sicut multum, probabile est quod termini connotativi subordinantur conceptui complexo, cum sola incomplexa ponantur in praedicamento, iam tolluntur praedicamenta ad intentionem illorum.</text:span></text:p>
      <text:p text:style-name="P426"><office:annotation office:name="__Annotation__1401_1867773820" loext:resolved="false"><dc:creator>Unknown Author</dc:creator><dc:date>2021-09-10T21:12:43.411242788</dc:date><text:p text:style-name="P577"><text:span text:style-name="T709">Decem sunt praedicamenta quia decem sunt rerum principia</text:span></text:p></office:annotation>Dico ergo quod decem sunt praedicamenta, hoc est, decem rerum prima principia, quia sunt decem termini omnem rem et omnem modum rerum optime declarantes<office:annotation-end office:name="__Annotation__1401_1867773820"/>, ita quod nullus terminus importat aliquam rem aliquo modo relative, qui per aliquem illorum terminorum illo modo importetur illa res, illa ergo inquisitio an illa decem sint generalissima, ita ut non habeant genera superiora val<text:span text:style-name="T193">d</text:span>e inutil<text:span text:style-name="T192">i</text:span>s est, si enim dicatur quod nullum illorum est generalissimum ut quidam dicunt non est magnum damnum.</text:p>
      <text:p text:style-name="P427"><text:span text:style-name="T658">[</text:span><text:span text:style-name="T598">lxxxvi.vb 217b</text:span><text:span text:style-name="T658">]</text:span></text:p>
      <text:p text:style-name="P426"><text:span text:style-name="T658">I</text:span>deo sola auctoritas Aristotelis et aliorum praedecessorum philosophorum cui de facili non debet aliquis contradicere, facit in hac re difficultatem, simpliciter tamen magis curanda est ratio quam auctoritas esset cert<text:span text:style-name="T194">e</text:span> alia inquisitio dignior disputare de multis modis se habendi an significentur per aliquem illorum decem terminorum. <text:span text:style-name="T190">Ulterius </text:span><text:span text:style-name="T191">ex illa probatione adducta quae multum dat cognitionem terminorum connotativorum deducitur quod ly ‘hominis’ sit terminus connotativus, nam sit Brunellus asinus qui ab aliquo homine possideatur, hoc complexum ‘asinus hominis’ supponit pro Brunello </text:span><text:span text:style-name="T195">cum haec sit vera: “Brunellus est asinus hominis”, desinat Brunellus possideri ab homine non amplius ly ‘asinus hominis’ supponit pro Brunello</text:span><text:span text:style-name="T191">, ergo hoc est propter aliquam connotationem importatam, per aliquem illorum terminorum, illa connotatio est de ly ‘hominis’, quia videlicet ly ‘hominis’ appellat ‘hominem’ convenire ‘asino’ per modum possessoris. Sic ergo patet quod illud illatum in argumento principali contra unam diffinitionem de termino connotativo quod ly ‘hominis’ sit terminus connotativus non debet falsum imputari, immo, valde consonum, per haec dicta satis patet ad argumentum principale.</text:span></text:p>
      <text:h text:style-name="Heading_20_3" text:outline-level="3">Sortes et album sunt idem</text:h>
      <text:p text:style-name="P139">Secundo arguitur sic, si regula esset vera sequeretur quod ista esset falsa: “Sortes et album sunt idem”, posito quod Sortes non sit albus, consequentia est nota, quia ly</text:p>
      <text:p text:style-name="P137"><text:soft-page-break/></text:p>
      <text:h text:style-name="Heading_20_2" text:outline-level="2"><text:soft-page-break/>De appellatione rationis</text:h>
      <text:h text:style-name="Heading_20_2" text:outline-level="2">De apparentiis argumento octavo</text:h>
      <text:h text:style-name="Heading_20_1" text:outline-level="1">Capitulum octavum: <text:span text:style-name="T705">D</text:span>e <text:span text:style-name="T705">M</text:span>odalibus</text:h>
      <text:h text:style-name="Heading_20_2" text:outline-level="2">De modalibus de ly necesse</text:h>
      <text:h text:style-name="Heading_20_2" text:outline-level="2">De modalibus de ly possibiliter</text:h>
      <text:h text:style-name="Heading_20_2" text:outline-level="2">De futuris contingentibus</text:h>
      <text:h text:style-name="Heading_20_2" text:outline-level="2">De modalibus de ly contingenter</text:h>
      <text:h text:style-name="Heading_20_2" text:outline-level="2">De modalibus de ly vere et false</text:h>
      <text:h text:style-name="Heading_20_2" text:outline-level="2">De modalibus de ly essentialiter per se et per accidens</text:h>
      <text:h text:style-name="Heading_20_2" text:outline-level="2">De modalibus de ly scio et dubito</text:h>
      <text:h text:style-name="Heading_20_1" text:outline-level="1">Capitulum nonum: <text:span text:style-name="T706">D</text:span>e <text:span text:style-name="T706">S</text:span>yllogismis <text:span text:style-name="T706">D</text:span>e <text:span text:style-name="T706">M</text:span>edio <text:span text:style-name="T706">C</text:span>ommuni </text:h>
      <text:h text:style-name="Heading_20_2" text:outline-level="2">Celarent et Ferio</text:h>
      <text:h text:style-name="Heading_20_2" text:outline-level="2">Baralipton et dabitis</text:h>
      <text:h text:style-name="Heading_20_2" text:outline-level="2">Celantes</text:h>
      <text:h text:style-name="Heading_20_2" text:outline-level="2">Fapesmo</text:h>
      <text:h text:style-name="Heading_20_2" text:outline-level="2">Cesare et Festino</text:h>
      <text:h text:style-name="Heading_20_2" text:outline-level="2">Camestres</text:h>
      <text:h text:style-name="Heading_20_2" text:outline-level="2">Baroco</text:h>
      <text:h text:style-name="Heading_20_2" text:outline-level="2">Darapti et Datissi</text:h>
      <text:h text:style-name="Heading_20_2" text:outline-level="2">Bocardo</text:h>
      <text:h text:style-name="Heading_20_2" text:outline-level="2">Ferison</text:h>
      <text:h text:style-name="Heading_20_2" text:outline-level="2"><text:soft-page-break/>De mixtionibus syllogismorum</text:h>
      <text:h text:style-name="Heading_20_2" text:outline-level="2">De syllogismis ex obliquis</text:h>
      <text:h text:style-name="Heading_20_2" text:outline-level="2">De syllogismo de medio singulari</text:h>
      <text:p text:style-name="P133">Postremo de syllogismo cuius medium <text:span text:style-name="T55">est sing</text:span>ulare, qui syllogismus expositorius dicitur et apud aliquos resolutorius qui inter omnes argumentationes syllogisticas principatum obtinet determinandum est de quo sit talis conclusio.</text:p>
      <text:h text:style-name="Heading_20_3" text:outline-level="3">Syllogismus expositorius est bonus in quacumque figura fiat</text:h>
      <text:p text:style-name="P133">Syllogismi expositori sed resolutori sunt boni quacumque figura formetur sive in prima sive in secunda sive in tertia.</text:p>
      <text:h text:style-name="Heading_20_3" text:outline-level="3">Syllogismi expositori duplici principio probantur esse boni</text:h>
      <text:p text:style-name="P428"><text:span text:style-name="T659">[</text:span><text:span text:style-name="T598">cxl.ra 324a</text:span><text:span text:style-name="T659">]</text:span></text:p>
      <text:p text:style-name="P39">Et probantur esse boni per duo principia metaphysica quorum <text:span text:style-name="T3">unum est: “quaecumque sunt ea</text:span><text:span text:style-name="T690">e</text:span><text:span text:style-name="T3">dem uni tertio inter se sunt ea</text:span><text:span text:style-name="T690">e</text:span><text:span text:style-name="T3">dem”, quod principium logicaliter sic ponitur quicumque termini verificantur de se univocem de uno tertio verificantur, puta de eodem termino singulari illud enim tertium quod metaphysicus ponit logicus per terminum singularem designat.</text:span></text:p>
      <text:p text:style-name="P5">Ex ista intelligentia patet quod illud argumentum quod sit ad probandum materiam et formam esse ea<text:span text:style-name="T691">e</text:span>dem inter se, per hoc quod sunt ea<text:span text:style-name="T691">e</text:span>dem uni tertio scilicet, composito, non valet. Cum enim dicitur quaecumque sunt eadem uni tertio sic intelligi habet quacumque sic se habent et quod utrumque illorum est idem uni tertio illa inter se sunt ea<text:span text:style-name="T692">e</text:span>dem falsum autem est quod materia et forma sic se habent quod utrumque eorum est idem composito. Istud autem magis patet ex logic declaratione illius principii exponitur enim sic logicaliter quod cuicumque termini divisim hoc est in diversis propositionibus de uno tertio singulari verificantur et caetera.</text:p>
      <text:p text:style-name="P5">Ut ideo illud principium metaphysice acceptum quod illa sunt idem illi tertio divisive capiendo ly illa est intelligendum.</text:p>
      <text:p text:style-name="P5">Per hanc propo<text:span text:style-name="T4">sitionem probantur syllogismi expositori affirmativi ut quod bene sequatur: “Sortes est homo, Sortes est animal; ergo homo est animal”, quia si homo et animal verificantur de uno tertio, puta de Sorte, debent de se invicem verificari, in illis autem praemissis denotantur illi duo verificari de illo tertio singulari Sortes in conclusione vero denotantur de se invicem verificari, igitur syllogismus expositorius tenet in virtute talis principii.</text:span></text:p>
      <text:p text:style-name="P6">Et etiam aliud principium metaphysicum huic annexum quaecumque de se invicem verificantur, verificantur de uno tertio.</text:p>
      <text:p text:style-name="P6">Aliud est principium metaphysicum virtute cuius syllogismi expositori negativi tenent scilicet quorumcumque quorum unum est idem alicuius, reliquum non est idem, illa inter se non sunt eadem, hoc principium logicaliter sic ponitur: “<text:span text:style-name="T159">q</text:span>uaecumque de eodem tertio, unum negative, et alterum affirmative, verificantur unum de altero, vere negatur”, et hoc maxime negatum de affirmato.</text:p>
      <text:p text:style-name="P7"><text:soft-page-break/>Per hoc principium probantur syllogismi expositori negativi, quia bene sequitur: “Sortes non currit et Sortes est animal; ergo animal non currit”. In illis enim praemissis denotatur negari “currens” de Sorte et affirmari “animal” de Sorte, et in conclusionem denotatur currens negari de animali”. Talis igitur syllogismus expositorius tenet in virtute illius principii.</text:p>
      <text:p text:style-name="P7">Si autem non ponatur in huiusmodi principiis de eodem tertio singulari posset sic poni affirmativum, hoc modo quicumque termini divisim vere dicuntur de uno termino communi ratione eiusdem rei pro qua ille terminus communis supponit, illi termini vere affirmantur inter se ut si Sortes est homo et Plato est idem homo, sequitur quod Sortes est Plato. Et sic ponendo tale principium applicabitur in <text:span text:style-name="T693">s</text:span>yllogismis de medio communi.</text:p>
      <text:p text:style-name="P8"><text:span text:style-name="T5">Similiter principium syllogismorum negativorum posset sic poni: “Quamcumque </text:span><text:span text:style-name="T6">de uno termino etiam communi ratione eiusdem rei pro qua ille terminus supponit, sic se habent quod unum vere affirmatur et alterum vere negatur, tunc negatum de affirmato vere negatur.</text:span></text:p>
      <text:h text:style-name="Heading_20_3" text:outline-level="3">Filius est pater</text:h>
      <text:p text:style-name="Text_20_body">Contra istam conclusionem arguitur <text:span text:style-name="T157">Primo sic, probando quod in prima figura non valet, nam non sequitur: “</text:span><text:span text:style-name="T158">h</text:span><text:span text:style-name="T157">aec essentia divina est pater, filius est haec essentia divina, ergo filius est pater”, et tamen arguitur expositorie, igitur syllogismus expositorius non valet in omni figura.</text:span></text:p>
      <text:p text:style-name="P9">Si dicas quod non bene arguitur ex eo quod ad bene arguendum expositorie requiritur quod maior inferat unam de omni, ista autem propositio “haec essentia divina est pater” non infert unam de omni, scilicet, istam omne quod est haec essentia divina est pater.</text:p>
      <text:p text:style-name="P9">Contra hoc non obstante ille syllogismus expositorius est bonus, igitur.</text:p>
      <text:p text:style-name="P10">Quod probo ille syllogismus expositorius est bonus quia innititur <text:span text:style-name="T7">principio infallibili per quod dicuntur tenere syllogismi expositori, sed iste syllogismus est huiusmodi, nam </text:span><text:span text:style-name="T8">innititur illi principio “quaecumque sunt eadem uni tertio, inter se sunt eadem”, in illis enim praemissis denotatur quod pater et filius sint eadem uni tertio, </text:span><text:span text:style-name="T9">puta huic essentiae et de facto sunt eadem illi tertio, ergo inter se sunt eadem et per consequens illa conclusio est vera “pater et filius”.</text:span></text:p>
      <text:p text:style-name="P429"><text:span text:style-name="T660">[</text:span><text:span text:style-name="T598">cxl.rb 324b</text:span><text:span text:style-name="T660">]</text:span></text:p>
      <text:p text:style-name="P11"><text:span text:style-name="T9">Et similiter </text:span><text:span text:style-name="T10">arguitur quod syllogismus expositorius negativus non valet, quia non sequitur: “</text:span><text:span text:style-name="T160">h</text:span><text:span text:style-name="T10">ic pater non est filius, sed essentia divina est hic pater, ergo essentia divina non est filius”. Et tamen est verus syllogismus expositorius negativus, quod patet ex eo quia innititur illi principio per quod dicuntur tenere syllogismi expositori negativum, nam quicumque termini sic se habent quod unus vere affirmatur de aliquo et alter vere negatur de eodem, negatum vere negatur de affirmato. Si ergo filius vere negatur de hoc </text:span><text:span text:style-name="T11">patre,</text:span><text:span text:style-name="T10"> et essentia divina vere affirmatur de hoc patre, </text:span><text:span text:style-name="T11">sequitur quod filius vere negatur de essentia et ita ad illas praemissas sequitur illa conclusio infallibiliter.</text:span></text:p>
      <text:h text:style-name="Heading_20_3" text:outline-level="3">Quaecumque sunt eadem uni tertio, sunt eadem inter se </text:h>
      <text:p text:style-name="P12">Respondeo: difficile est illam propositionem, “quaecumque sunt eadem uni tertio, inter se sunt eadem”, salvare esse veram in illo enarrabili trinitatis mysterio ut enim <text:span text:style-name="T12">arguitur ex fide habemus, quod pater et filius sunt eadem huic essentiae, et tamen </text:span><text:span text:style-name="T13">non sunt eadem inter se.</text:span></text:p>
      <text:p text:style-name="P430"><text:span text:style-name="T13">Verumtamen quidam </text:span><text:span text:style-name="T14">doctor </text:span><text:span text:style-name="T661">&lt;</text:span><text:span text:style-name="T598">Scotus</text:span><text:span text:style-name="T661">&gt;</text:span><text:span text:style-name="T14"> hanc propositionem conatur defendere non esse repugnantem, huic materiae de trinitate dicens propositionem illam debere intelligi de uniformi </text:span><text:soft-page-break/><text:span text:style-name="T14">unitate, illorum inter se, et illorum ad illud tertium. Ita quod sic intelligi habet “quaecumque sunt</text:span><text:span text:style-name="T13"> </text:span><text:span text:style-name="T15">eadem uni tertio, aliqua idemptitate, sunt eadem inter se tali idemptitate, quali sunt eadem illi tertio”, et secundum illam propositionem sic intellectam dicit tenere omnem formam syllogisticam. Si enim </text:span><text:span text:style-name="T16">maior idemptitas </text:span><text:span text:style-name="T15"><text:s/></text:span><text:span text:style-name="T16">denotetur in conclusione quam in praemissis non est syllogismus sed paralogismus accidentis. Ideo non valet iste syllogismus, “haec essentia divina est pater, et haec essentia divina est filius, ergo filius est pater”, quia maiore idemptitas denotatur extremorum inter se per conclusionem quam extremorum ad medium, id est, eorum quae significantur per extrema ad id quod significatur vel pro quo supponit medium denotatur, enim, in conclusione idemptitas suppositalis patris et filii in antecedente vero, solum denotatur idemptitas essentialis patris et filii, per hoc quod ambo sunt eadem essentia.</text:span></text:p>
      <text:p text:style-name="P13">Sed contra hanc solutionem replicat quia, non obstante, illa intelligentia illa propositio habet instantiam in proposito, enim, pater et filius habent aliquam idemptitatem ad essentiam et non habent inter se, igitur non quaecumque sunt eadem alicui tertio, aliqua idemptitate. Tali idemptitate sunt <text:span text:style-name="T17">eadem inter se, antecedens patet quia pater et filius idemptitate reali </text:span><text:span text:style-name="T18">sunt eadem uni tertio, scilicet, essentiae divinae, et tamen idemptitate reali </text:span><text:span text:style-name="T17">non sunt eadem inter se.</text:span></text:p>
      <text:p text:style-name="P14">Ad hanc replicam quia difficilis est satis obscure, respondetur <text:span text:style-name="T19">ille doctor potest tamen dici si quis proterviat hanc propositionem continue defendendo non obviare materie de trinitate quod tali idemptitate pater et filius sunt eadem inter se, unde idemptitas realis patris et filii ad essentiam est idemptitas essentialis patris et filii inter se.</text:span></text:p>
      <text:p text:style-name="P15"><text:span text:style-name="T19">Et ideo cum obicitur quod idemptitate reali pater et filius sunt eadem essentiae concedo. Et cum ulterius dicis et tali idemptitate non sunt eadem inter se nego, immo eadem i</text:span><text:span text:style-name="T20">demptitate sunt eadem inter se, quia illa idemptitas non est nisi idemptitas essentialis patris et filii, et idemptitate essentiali sunt idem inter se.</text:span></text:p>
      <text:p text:style-name="P17">Cum autem concluditur illa conclusio syllogistica “pater est filius” denotatur idemptitas suppositalis <text:s/>patris et filii quam maior est idemptitate essentiali deberet itaque concludi conclusio in qua solum denotaretur idemptitas essentialis patris et filii, ut puta quod pater est idem essentialiter filio.</text:p>
      <text:p text:style-name="P16"><text:span text:style-name="T20">Sed ad huc aliquis instaret adversus illam propositionem quia non magis videtur quod “quaecumque sunt eadem uni tertio, inter se sun</text:span><text:span text:style-name="T21">t eadem” quam quod “quaecumque sunt simul uni tertio, inter se sint simul” sed stat quod aliqua sint simul uni tertio et tamen inter se non sunt simul. Quod patet tum primo, quia caput et pes sunt simul uni tertio, puta animae intellectivae, et tamen non su</text:span><text:span text:style-name="T22">n</text:span><text:span text:style-name="T21">t simul inter se.</text:span></text:p>
      <text:p text:style-name="P431"><text:span text:style-name="T662">[</text:span><text:span text:style-name="T598">cxl.va 325a</text:span><text:span text:style-name="T662">]</text:span></text:p>
      <text:p text:style-name="P18">Tum secundo, quia omnia corpora sunt simul ipsi deo immenso qui in omnibus est per praesentiam, et tamen omnia corpora non sunt simul inter se.</text:p>
      <text:p text:style-name="P19">Tum tertio, quia si aliquis esset in diversis locis, scilicet, Parisiis et Romae per divinam potentiam, illa essent simul uni tertio, et tamen non essent simul inter se.</text:p>
      <text:p text:style-name="P20">Tum quarto, quia de facto <text:span text:style-name="T23">sacramentum et coelum sunt simul cum Corpore Christi, et tamen non sunt simul iter se.</text:span></text:p>
      <text:p text:style-name="P21"><office:annotation office:name="__Annotation__242_1567198481" loext:resolved="false"><dc:creator>Unknown Author</dc:creator><dc:date>2021-03-24T18:40:09.655243689</dc:date><text:p text:style-name="P577"><text:span text:style-name="T709">“</text:span><text:span text:style-name="T709">quaecumque sunt eadem uni tertio, sunt eadem inter se” no se cumple de la esencia divina.</text:span></text:p></office:annotation><text:span text:style-name="T23">Respondeo: licet quam difficile sit intellectui nostro pro statu isto capere seu intelligere quod aliqua sunt simul uni tertio non tamen sint simul inter se, propter phantasiam quam adeo rem phantasiatur cum conditionibus loci, et <text:s/>figuret ut qui in eodem loco sunt eadem esse credat et si pluribus </text:span><text:soft-page-break/><text:span text:style-name="T23">praesens sit plura esse credat tamen per rationem potet capi quod aliquis sint similiter uni tertio, non tamen sint simul inter se, et hoc propter perfectionem illius tertii, propter quam sic est limitatum ad plura. Ideo anima ex sua magna perfectione habet quod possit esse simul praesens pluribus partibus corporis, et tamen partes non sunt simul inter se. Et angelus, quia perfectior est, potest esse praesens pluribus locis quam anima, et quia Deus est infinitae perfectionis potest esse, immo de facto est praesens cuicumque loco absque hoc quod loca sint simul inter se et non solum habet hoc Deus seu divina essentia, sed habet ex sua magna perfectione quod possit communicari pluribus per idemptitatem absque hoc quod illa sunt eadem inter se. Ideo credo sicut credit unus doctor quod illa propositio “quaecumque sunt eadem uni tertio, sunt eadem inter se” simpliciter habet instantiam de divina essentia, </text:span><text:span text:style-name="T24">cui aliqua sunt idem, scilicet, pater et filius quae tamen non sunt eadem inter se quemadmodum illa propositio “quaecumque sunt simul uni tertio, sunt simul inter se”, quamvis tamen sit multum apparens habet tamen instantiam de angelorum ipso Deo, et de quocumque corporeo per divinam potentiam posset illa propositio falsificari.</text:span><office:annotation-end office:name="__Annotation__242_1567198481"/></text:p>
      <text:p text:style-name="P22">Si ergo illa propositio quae principium apud philosophos reputatur de divina essentia, habet in instantiam, aut dicendum est, quod syllogismi expositori non tenent in divinis, sicut dicendum est, si <text:span text:style-name="T25">fides</text:span> cogat, aut quod non sufficiat ad hoc, quod syllogismi expositorium sint boni quod <text:span text:style-name="T25">illi propositioni in</text:span><text:span text:style-name="T26">n</text:span><text:span text:style-name="T25">itatur. </text:span><office:annotation office:name="__Annotation__262_1567198481" loext:resolved="false"><dc:creator>Unknown Author</dc:creator><dc:date>2021-03-24T19:02:45.340279324</dc:date><text:p text:style-name="P577"><text:span text:style-name="T709">Así que prefiere basar el silogismos expositorio en el principio dici de omni, et dici de nullo.</text:span></text:p></office:annotation><text:span text:style-name="T26">Sed quia conveniens est non negare syllogismum expositorium formatum ex terminis divinis aliae regulae accipiendae sunt, per quas syllogismi expositori regulari dicantur et possent poni illa duo principia, scilicet per dici de omni et per dici de nullo. Per dici de omni pro syllogismis expositoriis affirmativus, per dici de nullo per syllogismis expositoriis negativus.</text:span><office:annotation-end office:name="__Annotation__262_1567198481"/></text:p>
      <text:p text:style-name="P23">Diceretur ergo, secundum hoc ad primum syllogismum factum, scilicet haec essentia divina est pater, distinguendo aut illa propositio accipitur in sensu de omni aut non, si sic dico, quod bene est regula de omni et syllogismus ile regulatur per dici de omni quia sensus maioris est iste, de quocumque verum est dicere quod est haec essentia divina, verum est dicere quod est pater, et in minori dico de aliquo, puta de filio quod est haec essentia divina, ergo in conclusione de eodem debeo dicere quod est pater, et tunc sicut conclusio est falsa, ita et maior aut maior non est de omni et tunc non valet, quia non regulatur per dici de omni, non enim potest regulari per dici de omni nisi maior sit de omni.</text:p>
      <text:p text:style-name="P23">Ad aliam similiter dico quod si illa maior “hic pater” non <text:span text:style-name="T27">est est filius sit de nullo, tunc ille syllogismus bene regulatur per dici de nullo, sed maior est falsa. Si vero maior non sit de nullo tunc non est bonus syllogismus expositorius, quia non regulatur per dici de nullo.</text:span></text:p>
      <text:p text:style-name="P432">Se<text:span text:style-name="T57">d</text:span> aliquis instaret contra solutiones probando maiores illas esse veras primam ut est de omni, secundam ut est de nullo, quia <text:span text:style-name="T58">nisi </text:span>sic esset sequeretur quod duae contradictoriae essent simul falsae, quod est impossibile, et consequentia probatur, quia ista est falsa “<text:span text:style-name="T60">o</text:span>mne quod <text:span text:style-name="T28">est </text:span><text:span text:style-name="T29">haec essentia divina est pater”, </text:span><text:span text:style-name="T59">e</text:span><text:span text:style-name="T29">t ista similiter “</text:span><text:span text:style-name="T60">o</text:span><text:span text:style-name="T29">mne quod est haec essentia divina non est pater”, et sunt contradictoriae quod pater ex eo quia duae singulares, una affirmativa et alia negativa eiusdem subiecti et eiusdem praedicati vere contradicunt, </text:span><text:span text:style-name="T30">sed istae sunt huiusmodi ut satis notum est cum subiectum discrete supponat.</text:span></text:p>
      <text:p text:style-name="P433"><text:span text:style-name="T663">[</text:span><text:span text:style-name="T598">cxl.vb 325b</text:span><text:span text:style-name="T663">]</text:span></text:p>
      <text:p text:style-name="P24">Et similiter arguitur de illis duabus “omne quod est hic pater, non est filius” demonstrando patrem in divinis et “omne quod est hic pater est filius” quae sunt contradictoriae et sunt simul falsae.</text:p>
      <text:h text:style-name="Heading_20_3" text:outline-level="3"><text:soft-page-break/>Multiplex est suppositio discreta secundum Rovauld</text:h>
      <text:p text:style-name="P434"><text:span text:style-name="T665">Ad hanc obiectionem forte responderet aliquis </text:span><text:span text:style-name="T664">&lt;</text:span><text:span text:style-name="T598">Petrus Rovauld</text:span><text:span text:style-name="T664">&gt;</text:span><text:span text:style-name="T665"> subtiliter ut audivi aliquem respondisse quo istae non sunt contradictoriae “omne quod est haec essentia divina est pater” et “omne quod est haec essentia divina non est pater”, eo quod non sunt simpliciter singulares, quia subiecta earum non simpliciter discrete supponit. Se</text:span><text:span text:style-name="T31">d</text:span><text:span text:style-name="T665"> discrete </text:span><text:span text:style-name="T32">distributive unde opinatur quattuor esse species suppositionum discretam. Est quaedam simpliciter singularis, quadam determinata, quadam confusa tantum, quaedam <text:s/></text:span><text:span text:style-name="T33">confusa</text:span><text:span text:style-name="T32"> et distributiva, </text:span><text:span text:style-name="T33">discreta simpliciter est terminus discrete supponens cui nullum additur confusionis signum aut determinationis ut cum dicitur “Sortes currit”. Sed discreta determinata est terminus discrete supponens cui additur signum particulare ut si hoc nomen ‘a’ significaret simpliciter et immediate essentiam divinam. Tunc haec propositio negaretur: “</text:span><text:span text:style-name="T34">a non potest communicari multis”, sicut et haec: “essentia divina non est communicabilis”, et tamen haec bene concederetur: “aliquid quod est ‘a’ non potest communicari”, sicut et haec: “aliquid quod est essentia divina non est communicabile”. </text:span><text:span text:style-name="T569">U</text:span><text:span text:style-name="T34">t patet, non ergo videtur propter quid una concedatur et alia negetur nisi quia ly ‘a’ supponit utrobique discrete cum sit nomen proprium supponens sed in prima suppo</text:span><text:span text:style-name="T35">nit discrete simpliciter et in alia discrete determinate. Sed suppositio discreta confusa tantum est terminus supponens discrete qui mediate sequitur signum distributivum affirmativum ut cum dicitur omne quod est Deus est ‘a’. Sed discreta distributiva est cum tali termino discrete supponenti proponitur </text:span><text:span text:style-name="T36">signum universale, ut dicendo omen quod est ‘a’ est Deus.</text:span></text:p>
      <text:p text:style-name="P25">Et probatur haec opinio, quia differt plurimum sic syllogizare: “‘a’ est communicabile et pater divinus est ‘a’, ergo pater divinus est communicabilis”, et syllogizare sic: “omne quod est ‘a’ est communicabile, sed pater divinus est ‘a’, ergo est communicabilis”. <text:span text:style-name="T570">N</text:span><text:span text:style-name="T37">am prima oratio non est bonus syllogismus et secunda optimus, et tamen medium utrobique tenetur singulariter, quia supponimus quod ly ‘a’ sit nomen proprium essentiae divinae, ergo causa diversitatis provenit quia ly ‘a’ in prima accipitur discrete simpliciter quod non sufficit ad syllogismum expositorium sed in secundae accipitur discrete distributive.</text:span></text:p>
      <text:p text:style-name="P26">Et <text:span text:style-name="T38">confirmatur quod dictum est nam logici communiter dicunt ad hoc quod sit bonus syllogismus expositorius primae figurae oportet maiorem aequivalere uni de omni. Sed </text:span><text:span text:style-name="T39">quid est propositionem singularem aequivalere uni de omni nisi subiectum eius distribui singulariter, igitur est aliqua suppositio singularis distributiva. Et si quis contra istum modum dicendi arguat sub omni termino supponente distributive valet descensus copulative, sed sub termino singulari non potest descendere copulative, ergo nulla suppositio est singularis distributiva et ita videntur illae particulae, scilicet singularis et distributiva ad invicem repugnare.</text:span></text:p>
      <text:p text:style-name="P38">Re<text:span text:style-name="T40">spondetur quod quamvis non fiat descensus, fieri solitus, tamen sub termino qui significat rem quae est ab alia distincta personaliter descenditur per terminos qui singulariter significant illas personas.</text:span></text:p>
      <text:p text:style-name="P436"><text:span text:style-name="T666">&lt;</text:span><text:span text:style-name="T598">Contra </text:span><text:s/><text:span text:style-name="T598">Rovauld.</text:span><text:span text:style-name="T666">&gt; </text:span><text:span text:style-name="T40">Sed haec opinio non clare satisfacit difficultari sed sed sub quadam novitate verborum veritatem occultat. Sic enim arguo non propterea aliqua debet dici suppositio distributiva, quia subiecto addatur sinum universale, igitur declaratio non est sufficiens antecedens patet, quia si ‘a’ imponeretur ad significandum aliquam animam singularem sic dicendo </text:span><text:span text:style-name="T54">omne</text:span><text:span text:style-name="T41"> quod est ‘a’ est in corpore Platonis, tunc ly ‘a’ non distribueretur discrete, immo ta</text:span><text:span text:style-name="T42">ntu</text:span><text:span text:style-name="T41">m discrete supponeret. </text:span><text:span text:style-name="T43">Sicut si dicerem ‘a’ est in corpore Platonis quod patet ex eo, quia tamen ei repugnat accipi pro pluribus posito illo signo sicut eo ablato, ergo non magis distribuitur propter additionem signi quam non apposito signo.</text:span></text:p>
      <text:p text:style-name="P437"><text:soft-page-break/><text:span text:style-name="T667">[</text:span><text:span text:style-name="T598">cxli.ra</text:span> <text:span text:style-name="T598">326a</text:span><text:span text:style-name="T667">]</text:span></text:p>
      <text:p text:style-name="P27">Et confirmatur, quia istae denominationes distributiva determinata confusa tantum non dicuntur alicui termino convenire propter solam additionem alicuius signi, sed quia signo addito intellectus mediante eo tamquam instrumento accipit illum terminum pro omnibus suis significatis copulative vel disiunctive, et sic de aliis sed in proposito ita est quod repugnat intellectum accipere ly ‘a’ aliquo illorum modorum aeque bene sicut si dicer<text:span text:style-name="T44">es</text:span> ‘a’ est in corpore Platonis, ergo tam discrete supponit signo non addito sicut addito.</text:p>
      <text:p text:style-name="P27">Praeterea sic arguo si aliquis terminus per additionem signi particularis potest accipi pro aliquo vel aliquibus <text:span text:style-name="T45">disiunctive eodem modo potest accipi sine additione signi, si ergo supponat determinate discrete per additionem signi particularis etiam supponet determinate discrete tali signo ablato.</text:span></text:p>
      <text:p text:style-name="P28">Item sic arguo iste modus non salvat quin duae contradictoriae sint simul verae, nam capio istas duas, “ens quod est haec essentia divina est pater”, “ens quod est haec essentia divina non est pater”, sunt contradictoriae cum subiectum supponat in utraque simpliciter discrete secundum illum modum, sicut <text:span text:style-name="T46">dicendo, “omne ens quod est haec essentia divina est pater”, subiectum supponit distributive discrete quia ei non additur aliquod signum universale vel particulare, sed solum singulare.</text:span></text:p>
      <text:p text:style-name="P29">Et ita iste modus relinquitur propter istas rationes.</text:p>
      <text:p text:style-name="P438"><text:span text:style-name="T46">Ideo aliter fortasse alicui </text:span><text:span text:style-name="T668">&lt;</text:span><text:span text:style-name="T598">Maioris</text:span><text:span text:style-name="T668">&gt;</text:span><text:span text:style-name="T46"> videretur dicendum quod ille non sunt contradictoriae: “omne quod est haec essentia divina est pater”, “omne quod est haec essentia non est pater”, quia diceret ambas esse universales quapropter non dantur duae singulares diverse qualitatis simul vere. Ideo negaretur illum esse syllogismus expositorium: “haec essentia divina est pater, haec essentia divina est filius, ergo filius est pater”, propterea quia arguitur ex puris indefinitis.</text:span></text:p>
      <text:h text:style-name="Heading_20_3" text:outline-level="3">Utrum ly ‘haec essentia divina’ sit terminus communis </text:h>
      <text:p text:style-name="P30">Qualis enim ly ‘haec essentia divina’ sit terminus communis sit terminus communis videtur ex hoc quia ly ‘haec essentia divina’ supponit supponit pro pluribus divisim, igitur est terminus communis.</text:p>
      <text:p text:style-name="P31">Ad hoc etiam dicendum sufficienter videtur movere argumentum illud de illis duabus, “omne quod est haec essentia divina est pater”, “omne quod est haec essentia divina non est pater”, si enim ly ‘haec essentia divina’ esset terminus singularis singularizaret terminum communem cui additur, et tale illae duae essent singulares et per consequens contradictoriae.</text:p>
      <text:p text:style-name="P31">Contra istum modum dicenti essent aliquae instantiae.</text:p>
      <text:p text:style-name="P31">Prima est quaelibet propositio indefinita per additio signi singularis potest fieri singularis, haec enim est una conditio propositionis indefinitae quod ex additione signi singularis relinquitur una propositio singularis. Sed ista est “indefinita essentia divina est pater”, ergo per additionem signi singularis ad subiectum sit una propositio singularis, et per consequens ista est singularis: “haec essentia divina est pater”.</text:p>
      <text:p text:style-name="P40">Ad hanc instantiam respondetur quod illa propositio vera est si ille terminus sit singularizabilis, modo dico quod ly ‘essentia divina’ non est terminus singularizabilis, et hoc provenit quia significat talem rem quae non solum est una res sed etiam plures et quaelibet earum seorsum, ideo ex parte significate accidit quod non possit ille terminus singularizari.</text:p>
      <text:p text:style-name="P31"><text:soft-page-break/>Secunda instantia est, quia tunc contradictio non esset oppositio formalis, patet quia istae duae non contradicerent formaliter: “haec domus est bona” “haec domus non est bona”, cum in simili forma darentur propositiones non contradicentes, videlicet, istae duae: “haec essentia divina est pater” “haec essentia divina non est pater”.</text:p>
      <text:p text:style-name="P439"><text:span text:style-name="T669">[</text:span><text:span text:style-name="T598">cxli.rb 326b</text:span><text:span text:style-name="T669">]</text:span></text:p>
      <text:p text:style-name="P31">Ad hanc instantia respondetur quod illae non sunt similis formae ex eo quod quantitas quae ex parte formae contradictionis se tenet non est similis in utrisque.</text:p>
      <text:p text:style-name="P31">Tertia instantia est quia vel est possibile dare <text:span text:style-name="T47">aliquam singularem in terminis divinis vel nullam non est dicendum primum, quia aequalis videtur ratio utrobique neque est dicendum secundum, quia in terminis personalibus saltem videtur dicendum quod sint dabiles aliquae singulares propositiones.</text:span></text:p>
      <text:h text:style-name="Heading_20_3" text:outline-level="3">Utrum sit dabilis singularis in terminis divinis</text:h>
      <text:p text:style-name="P32">Ad hanc instantiam respondetur quod <text:span text:style-name="T48">possibile est da</text:span><text:span text:style-name="T161">r</text:span><text:span text:style-name="T48">e aliquas singulares in terminis divinis quando illi termini capiuntur personaliter pro suppositis immediatis. Sed si tales termini capiantur pro mediatis et immediatis idem est iudicium de terminis essentialibus et personalibus ut patet de istis duabus: “omnis res quae est hic pater est pater”, et “omnis res quae est hic pater non est patrer”, quarum utraque est falsa.</text:span></text:p>
      <text:p text:style-name="P33">Et si dicas sequitur sed ista quod non est modus solvendi hunc paralogismum: “hic pater non est filius, hic pater est essentia divina, ergo essentia divina non est filius”, <text:span text:style-name="T49">cum praemissae sint verae et conclusio haeretica.</text:span></text:p>
      <text:p text:style-name="P34">Respondetur distinguendo quod conclusio sit haeretica aut si subiectum conclusionis complete particularizetur, et sic nego ut patet per istam: “omnis essentia divina est pater”, quae est sua contradictoria et est falsa si subiectum complete distribuatur aut incomplete particularizatur, <text:span text:style-name="T50">et tunc et falsa.</text:span></text:p>
      <text:p text:style-name="P35">Si dicas volo capere eam ut subiectum incomplete particularizetur quo facto non videtur quid dicendum ad illum syllogismum expositorius.</text:p>
      <text:p text:style-name="P35">Respondeo: hic modus dicendi coitum ad illam solutionem redire quam vitare credebat, quaero enim aut illa maior: “hic pater non est filius” est vera aut non. Si dicat sicut habet dicere eius dicta sequendo quod non sequitur ex eo quod arguitur ex propositionibus indefinitis, quia illae praemissae sunt indefinitae.</text:p>
      <text:p text:style-name="P36">Contra hoc arguo quia tunc sequitur quod ista propositio de rigore esset concedenda: “hic pater in divinis est filius”, quam negat <text:span text:style-name="T51">ecclesia, sed consequentia probatur, quando sensus est aliquid quod est: “hic pater est filius”, quae propositio est vera.</text:span></text:p>
      <text:p text:style-name="P37">Si dicas: “Dico quod illa propositio ‘hic pater est filius’ distinguenda est”. Aut ly ‘pater’ capitur personaliter secundum suppositionem immediatam, et sic negat ecclesia. Aut accipitur tam secundum suppositionem mediatam quam immediatam et tunc est indefinita et vera.</text:p>
      <text:p text:style-name="P37">Patet quomodo istae modus incidit in solutionem quam credit evitare, nam dicat arguens quod intendit capere ut sunt singulares, tunc non assignat defectum in illo syllogismo expositorio.</text:p>
      <text:p text:style-name="P37">Item de illa propositione: “haec essentia divina est pater”, consimili ratione videretur dicendum quod esset singularis <text:span text:style-name="T52">accipiendo subiectum secundum suppositionem immediatam. Quod si </text:span><text:soft-page-break/><text:span text:style-name="T52">concedat arguo per suam rationem quod ly ‘haec essentia divina’, capiendo secundum suppositionem immediatam non sit terminus singularis quia illo modo accipiendo adhuc istae sunt simul falsae: “omne quod est haec essentia divina est pater” et “omne quod est haec essentia divina non est pater”, quod non esset si ly “haec essentia divina esset terminus singularis”. Si enim ly ‘haec essentia divina’ posset esse terminus singularis ut arguit totum hoc ens quod est “haec essentia” esset terminus singularis. Si dica quod non est simile de terminis personalibus et essentialibus. Arguatur de illis duabus omnis res quae est: “hic pater est pater”, “nulla res quae est hic pater est pater”, quae sunt simul falsae, ut dicit et ita ibi remanet difficultas.</text:span></text:p>
      <text:p text:style-name="P440">Ideo omnibus his inspectis et consideratis praeter dicta in principio huius capituli, aliter mihi videtur dicendum, supponendo illum communiorem modum dicendi, quod terminus non propterea debet negari singularis quia supponat pro pluribus, nisi supponat pro illis pluribus immediate, ideo si ly ‘a’ imponatur ad significandum ‘hanc essentiam divinam’ est terminus discretus quia licet supponat <text:span text:style-name="T53">pro patre et filio et spiritu santo, non tum immediate se mediate. Tum dico quod non est simile de ly ‘a’ et de hoc composito ens quod est ‘a’. Istud enim complexum ens quod est ‘a’, est terminus communis et non ly ‘a’.</text:span></text:p>
      <text:p text:style-name="P441"><text:span text:style-name="T670">[</text:span><text:span text:style-name="T598">cxli.va 327a</text:span><text:span text:style-name="T670">]</text:span></text:p>
      <text:p text:style-name="P41">Hoc <text:span text:style-name="T61">sit ostendo, quia ly ‘ens’ quod est ‘a’ supponit immediate pro pluribus, scilicet, pro pater et filio et spiritu sancto, non sic ly ‘a’.</text:span></text:p>
      <text:p text:style-name="P42">Et si dicas omnis terminus discretus singularizat terminum communem cui additur.</text:p>
      <text:h text:style-name="Heading_20_3" text:outline-level="3">Qui terminus discretus potest singularizare terminum communem</text:h>
      <text:p text:style-name="P43">Respondendo terminus discretus qui tam mediate quam immediate supponit pro uno et non pro pluribus divisive singularizat terminum communem cui additur, non autem terminus singularis qui supponit mediate pro pluribus, ideo ly ‘a’ seu ly ‘essentia’ cum mediate supponat pro pluribus non op<text:span text:style-name="T62">o</text:span>rtet <text:span text:style-name="T62">u</text:span><text:span text:style-name="T63">t restringat ly ‘ens’ cui convenit supponere pro illis pluribus etiam immediate.</text:span></text:p>
      <text:p text:style-name="P51">Ex istis patet quod iste terminus ‘ens’ quod est ‘hic pater’ est terminus discretus, quia immediate supponit pro uno solo, et quia illud pro quo supponit immediate est aliqua plura et quodlibet eorum seorsum, ideo ex consequenti mediate et ratione sui significati immediati supponit pro pluribus mediate.</text:p>
      <text:p text:style-name="P43"><text:span text:style-name="T63">Et si contra ista obiciatur, quia si ista essent vera sequeretur quod sic arguendo non esset syllogismus </text:span><text:span text:style-name="T64">expositorius: “omne ens quod est haec essentia divina </text:span><text:span text:style-name="T65">est pater, filius est ens quod est haec essentia divina, ergo filius est pater”.</text:span></text:p>
      <text:p text:style-name="P44">Respondeo: concedendo quod non est syllogismus expositorius, sed est syllogismus factus in Darii. Et si dicas quid ergo dicendum ad illum syllogismum “haec essentia divina est pater, filius est haec essentia divina; ergo filius est pater”.</text:p>
      <text:h text:style-name="Heading_20_3" text:outline-level="3">Maior debet inferre unam de omni in syllogismo expositorio</text:h>
      <text:p text:style-name="P44">Respondeo: ponitur conditio ad bonum syllogismum expositorium quod maior inferat unam de omni quia illa maior non infert unam de omni, ideo non est syllogismus expositorius.</text:p>
      <text:p text:style-name="P44">Et per hoc patet ad motivum quod habet primus modus dicendi. Dico enim concedendo maiorem illam assumptam quod plurimum est differt sic syllogizare ‘a’ est communicabile et pater divinus <text:soft-page-break/>est ‘a’, ergo pater divinus est communicabilis, et sic omne quod est ‘a’, est communicabile, sed pater divinus est ‘a’, ergo pater divinus est communicabilis. Nam in prima argumentatione medium est terminus discretus, in secundavero terminus communis. Et ideo minor falsa est dicens quod non est alia differentia nisi quia in una medium stat simpliciter discrete, in alia vero discrete distributive.</text:p>
      <text:p text:style-name="P44">Et ad <text:span text:style-name="T66">confirmationem concedo maiorem, et cum dicitur in minori quod maiorem syllogismi expositori aequivalere uni de omni, nihil aliud est nisi quod in ea subiectum supponit discrete distributive. Nego sed est eam inferre unam de omni, et econtra ita quod sit quaedam aequivalentia in inferendo, aliter maior non poterit esse sufficienter regula de omni nisi inferat illam de omni.</text:span></text:p>
      <text:p text:style-name="P45">Et si dicas ergo saltem habetur quod ly ‘a’ non potest summi pro medio ad arguendum expositorie, et ita ex terminis divinis singularibus non poterunt fieri boni syllogismi expositorie, nam <text:span text:style-name="T67">si sic arguatur haec essentia, ergo filius est pater, praemissae sunt verae et conclusio falsa, et ita non est bonus syllogismus expositorius.</text:span></text:p>
      <text:p text:style-name="P46">Si dicas quod non est bonus syllogismus expositorius et hoc si maior accipiatur in sensu de omni. Contra, quia sic capiendo non est syllogismus factus in Darii, quia medium non est terminus communis.</text:p>
      <text:p text:style-name="P48">Responderet fortasse aliquis concedendo quod duplices sunt termini singulares in divinis, quidam sunt essentiales, et sunt illi qui pro uno immediate supponunt et mediate pro pluribus, et de istis non habeo pro inconvenienti quod ex eis sumptis pro medio non potest fieri bonus syllogismus expositorius, ita ut sit consequentia syllogistica gratia formae tenens. Alii sunt termini singulares notionales seu personales et sunt qui <text:span text:style-name="T68">neque immediate neque mediate supponunt pro pluribus ex illis sumptis pro medio, bene potest fieri syllogismus expositorius, nam dato quod maior formetur in sensu de omni adhuc semper est propositio singularis ut si sic arguatur “hic pater non est filius, essentia divina est hic pater, ergo essentia divina non est filius”, si maior accipiatur loco unius de omni adhuc maior est propositio singularis et est falsa.</text:span></text:p>
      <text:p text:style-name="P442"><text:span text:style-name="T671">[</text:span><text:span text:style-name="T598">cxli.vb 327b</text:span><text:span text:style-name="T671">]</text:span></text:p>
      <text:p text:style-name="P47"><text:span text:style-name="T69">Sed dico hanc solutionem non esse veram, sed concedendum est dicta sequendo quae vera sunt quod ille non est bonus syllogismus expositorius nam illa maior non infert unam de omni, igitur </text:span><text:span text:style-name="T70">non est bonus syllogismus expositorius. Non enim sequitur “hic pater non est filius, ergo omne quod est hic pater non est filius.</text:span></text:p>
      <text:p text:style-name="P49">Si dicas quod est syllogismus expositorius capiendo illam maiorem loco unius propositionis de omni.</text:p>
      <text:p text:style-name="P49">Contra capiatur ista “omne ens quod est hic pater, est pater”. Iste syllogismus expositorius non valet “omne ens quod est hic pater est pater, filius est ens quod est hic pater, ergo filius est pater”, cum praemissae sint verae et conclusio falsa.</text:p>
      <text:p text:style-name="P49">Si dicas quod est syllogismus expositorius: <text:span text:style-name="T162">s</text:span>i illa maior capiatur in sensu de omni.</text:p>
      <text:p text:style-name="P49">Contra sensus de omni est propositio universalis, et ita non est syllogismus expositorius, sed magis syllogismus in Darii, unde ille terminus ‘ens’ quod est ens quod est ‘hic pater’ est terminus communis, licet iste terminus ‘ens’ quod est hic pater sit terminus discretus.</text:p>
      <text:h text:style-name="Heading_20_3" text:outline-level="3"><text:soft-page-break/>Ex terminis singularibus divinis non sit syllogismus expositorius</text:h>
      <text:p text:style-name="P49">Ideo respondeo simpliciter concedendo quod ex terminus singularibus divinis non potest fieri bonus syllogismus expositorius neque hoc est contra fidem.</text:p>
      <text:p text:style-name="P49">Et si arguas ex dictis, sequitur hanc esse simpliciter, concedendam omnis essentia divina est pater.</text:p>
      <text:h text:style-name="Heading_20_3" text:outline-level="3">Maior debet inferre unam de omni in syllogismo expositorio</text:h>
      <text:p text:style-name="P49">Respondeo: multum favet fidei eam simpliciter concedere et ad illum syllogismum “omnis essentia divina est pater, filius in divinis est essentia divina, ergo filius in divinis est pater”, dicendum est quod non valet. Ratio autem quare non valet est quia ad bene arguendum in Barbara ponitur quod maior inferat unam de omni illa, autem maior non inferat unam de omni.</text:p>
      <text:h text:style-name="Heading_20_3" text:outline-level="3">Ex terminis singularibus divinis non sit syllogismus</text:h>
      <text:p text:style-name="P50">Ideo solutio dicentium quod syllogismi non tenent in terminis divinis, non est multum reprobanda, attamen hoc absolute non est dicendum propter adversarios fidei, sed dicendum est quod non tenent tales syllogismi quando maior non est regula de moni, quod non potest fieri nisi quando maior infert unam de omni, et quia illa maior non infert unam de omni, ideo non est bonus syllogismus. Si autem capiatur ista maior “omne ens quod est essentia divina est pater”, bene poterit fieri syllogismus et hoc forte quod quidam voluerunt dicere quod tales consequentiae non sunt formales, nisi subiectum determinetur per ly ‘ens’ quod est. Et si quaeras: Nonne illa propositio conceditur falsa a logicis omnis, “omnis essentia divina est pater” si sit distributio completa?</text:p>
      <text:p text:style-name="P50">Respondeo: non sanum videtur illam negare “omnis essentia divina est pater in rigore logices. Sed logici sophismatibus violati assueti sunt eam distinguere, aut est distributio completa, et sic est falsa, aut incompleta et sic est vera.</text:p>
      <text:p text:style-name="P443">Dico ergo illum modum dicendi logicorum quo usus sum in principio syllogismorum glossando quod per illam esse falsam intelligunt quod ista est falsa “omne ens quod est essentia divina est pater”, ita quod volunt dicere quod ipsa est falsa, si ly ‘essentia divina’ distribuatur pro patre, filio et spiritu sancto, sicut ly ‘ens’ quod est essentia divina, distribuitur immediate pro illis. Sed in rei veritate ly ‘essentia divina’ non distribuitur immediate pro pater, filio et spiritu sancto, ideo ipsa non est falsa. Ideo, dato quod ly ‘essentia divina’ supponat mediate pro patre, filio et spiritu sancto, non propterea dicenda est falsa. Non enim potest ly ‘essentia divina’ supponere pro essentia immediate quam supponat pro personis mediate, et hoc maxime tenendo quod non potest intelligi essentia quin intelligamur personae, saltem <text:span text:style-name="T71">terminus aliquis non potest supponere immediate pro persona quin supponat pro essentia mediate vel immediate, et si hoc sufficiat sequitur quod ista est vera “pater in divinis est filius”, quia aliquid quod est pater in divinis est filius. Ideo dicendum est quod illa suppositio mediata pro essentia non sufficit ad eius veritatem.</text:span></text:p>
      <text:p text:style-name="P444"><text:span text:style-name="T672">[</text:span><text:span text:style-name="T598">cxlii.ra 328a</text:span><text:span text:style-name="T672">]</text:span></text:p>
      <text:h text:style-name="Heading_20_3" text:outline-level="3">Essentia divina <text:span text:style-name="T163">filius non est</text:span></text:h>
      <text:p text:style-name="Text_20_body">Secundo arguitur sic. Quasi replicam <text:span text:style-name="T71">adiungendo </text:span><text:span text:style-name="T72">praedictae solutioni non sequitur: “Hic pater est essentia divina, filius in divinis non est hic pater; ergo essentia divina filius in divinis non est”. Et tamen maior infert unam de omni, neque est aliquid ad syllogismum expositorium requisitum quod in propositio desit.</text:span></text:p>
      <text:p text:style-name="P52"><text:soft-page-break/><text:span text:style-name="T72">Respondeo: </text:span><text:span text:style-name="T73">I</text:span><text:span text:style-name="T72">ste syllogismus difficilis es solutionis si non aliae conditiones necessariae sint ad debite syllogizandum expositorie quam illae quam solent apponi, ab illa enim maiori, ad un</text:span><text:span text:style-name="T74">am</text:span><text:span text:style-name="T72"> de omni, est bona consequentia, et medium est terminus singularis singulariter et univoce tentus.</text:span></text:p>
      <text:p text:style-name="P53">Possunt etiam reduci multi alli syllogismi qui ex parte sequenti poterunt innotescere, quorum difficile esse dare solutiones non alium modum quem communem modum solvendi inveniendo. Posset dari exemplum de istis: “Sortis asinus est Brunellus, et Plato non est Sortes; ergo Brunellus Platonis asinus non est”, <text:span text:style-name="T75">q</text:span>ui non est bonus, quia in casu quo non esset nisi unus asinus, qui possideretur a Sorte et Platone, antecedens esset verum, et consequens falsum, et tamen non videtur quae conditio desit ad bonum syllogismum expositorium.</text:p>
      <text:h text:style-name="Heading_20_3" text:outline-level="3">Sortes vel asinus est rudibilis</text:h>
      <text:p text:style-name="P53">Posset etiam argui de isto: “<text:span text:style-name="T76">Sortes vel asinus est rudibilis, </text:span><text:span text:style-name="T77">Brunellus non est Sortes; ergo rudibile Brunellus vel asinus non est”, qui non est bonus, et tamen non videtur quid desit ad bonum syllogismum expositorium.</text:span></text:p>
      <text:p text:style-name="P54">Si dicas quod non bene arguitur ex eo quod in prima figura minor non debet esse negativa.</text:p>
      <text:p text:style-name="P54">Contra: In Fapesmo bene arguitur minore negativa et cum omnis syllogismus expositorius qui praecise differt a syllogismo de medio communi per hoc quod medium, unius est singulare, et medium alterius est commune, est bonus, sequitur quod cum satis syllogismus in quo minor est negativa in prima figura non differat a syllogismo facto in Fapesmo, nisi per medium quod ille est bonus.</text:p>
      <text:p text:style-name="P54">Dico ergo quemadmodum prius fiebat mentio proportionabiliter applicanda sunt illa duo principia de omni, scilicet, et de nullo, circa syllogismos expositorios solvendos, et ut applicabantur circa syllogismos de medio communi, ita quod quidam sunt syllogismi expositori qui <text:span text:style-name="T78">immediate aut mediate per dici de omni aut de nullo regulantur et illi boni sunt. Syllogismos autem expositorios regulari mediate cognoscendum est per eorum reductionem ad eos qui immediate regulantur.</text:span></text:p>
      <text:p text:style-name="P55">Si vero syllogismus expositorius non regulatur mediate aut immediate per dici de omni non est bonus syllogismus, ut huius vere solutionis practica habeatur potest deduci assignando modos <text:s/>arguendi expositorie in prima, secunda et tertia figuris, ut in syllogismis de medio communi assignabantur ponendo aliquas propositiones.</text:p>
      <text:p text:style-name="P55">Prima propositio syllogismus debete factus in Darii expositorie arguendo est bonus, et non intelligendum est per ly ‘a’ propositionem universalem aut de termino distributo, sed intelligenda est maior capta in sensu de omni, quae habet modum universalis. Haec propositio <text:span text:style-name="T79">probatur e eo quod omnis talis syllogismus immediate regulatur per dici de omni, ut patet intuenti,ergo est bonus.</text:span></text:p>
      <text:p text:style-name="P56">Contra hanc propositionem sunt aliquae instantiae.</text:p>
      <text:p text:style-name="P56">Prima instantia. Non sequitur: “Iste homo vel asinus est asinus, homo est iste homo vel asinus; ergo homo est asinus”, et tamen arguitur in Darii expositione, igitur.</text:p>
      <text:h text:style-name="Heading_20_3" text:outline-level="3">Sortes si est homo est asinus</text:h>
      <text:p text:style-name="P58">Ad hanc rationem breviter respondetur distinguendo aut ly ‘iste’ singularizat totum <text:span text:style-name="T80">disiunctum unica singularizatione aut non:</text:span></text:p>
      <text:p text:style-name="P445"><text:span text:style-name="T674">[</text:span><text:span text:style-name="T598">cxlii.rb 328b</text:span><text:span text:style-name="T674">]</text:span></text:p>
      <text:p text:style-name="P487"><text:soft-page-break/>Si primum distinguendum est:</text:p>
      <text:p text:style-name="P59"><text:span text:style-name="T673">A</text:span><text:span text:style-name="T80">ut demonstrat idem in maiore et minore, et sic consequentia est bona. Sed antecedens et falsum sicut et consequens.</text:span></text:p>
      <text:p text:style-name="P59"><text:span text:style-name="T81">A</text:span><text:span text:style-name="T80">ut </text:span><text:span text:style-name="T81">in una demonstrat hominem, et in alia demonstrat asinum, et sic non valet, quia medium tenetur aequivoce.</text:span></text:p>
      <text:p text:style-name="P488">Aut ly ‘iste’ praecise singularizat ly ‘homo’, et tunc dico quod non regulatur per dici de omni, nam sicut posita est una conditio in modis primae figurae ad hoc quod regulantur per dici de omni vel de nullo, quod medium distributum maioris sit praecise praedicatum minoris. Sic etiam in propositio requiritur quod medium singularizatum maioris sit praecise praedicatum minoris. Ideo sic debet dici in minori “homo est iste homo”.</text:p>
      <text:p text:style-name="P57"><text:span text:style-name="T81">Et si quaeratur quomodo debet concludi, dico quod sic debet concludi: “</text:span><text:span text:style-name="T168">e</text:span><text:span text:style-name="T81">rgo homo vel asinus est asinus”, quia ut supra dictum est si aliquid additur medio in maiori debet addi in conclusione minori extremitati in conclusione. Ideo isti syllogismi sunt boni, et debite regulantur per dici de omni: “Sortis asinus currit, quiescens est Sortes; </text:span><text:span text:style-name="T82">e</text:span><text:span text:style-name="T81">rgo quiescentis asinus currit”. </text:span><text:span text:style-name="T82">Similiter iste: “Sort</text:span><text:span text:style-name="T83">e</text:span><text:span text:style-name="T82">s si est hom</text:span><text:span text:style-name="T83">o est asinus, ens est Sortes; ergo ens si est homo et asinus”.</text:span></text:p>
      <text:p text:style-name="P60">Potest <text:span text:style-name="T84">etiam argui ex hypothetica expositorie modo categorico secundum modum supra praetactum ut sic: “Homo est animal et Sortes currit, sed quiescens est Sortes; ergo homo est animal et quiescens currit”.</text:span></text:p>
      <text:h text:style-name="Heading_20_3" text:outline-level="3">Homo essentialiter est albus</text:h>
      <text:p text:style-name="P61">Secunda instantia est non sequitur: “Sortes est albus, et homo essentialiter est Sortes; ergo homo essentialiter est albus”.</text:p>
      <text:h text:style-name="Heading_20_3" text:outline-level="3">Tantum homo est albus</text:h>
      <text:h text:style-name="Heading_20_3" text:outline-level="3">Sortes contingenter non est homo</text:h>
      <text:p text:style-name="P62">Respondetur breviter ut de similibus responsum est supra quod non regulatur immediate per dici de omni, quia ponitur determinationis in conclusione ex parte maioris extremitatis quae non ponitur in maiore ista et multa alia posita circa Barbara et Darii in proposito veniunt applicanda. Patet enim ex illis dictis quod non sequitur: “Sortes est albus, tantum homo est Sortes; ergo tantum homo est albus”. <text:span text:style-name="T85">Bene autem iste esset bonus syllogismus: “Sortes est albus, tamtum homo est Sortes; ergo homo est albus”. Similiter iste est bonus: “Sortes contingenter non est homo, aliquid ens contingenter non est Sortes; ergo aliquod ens possibiliter non est homo”. Hoc patet dando sensum maioris, minoris, et conclusionis.</text:span></text:p>
      <text:h text:style-name="Heading_20_3" text:outline-level="3">Sortes est individuum</text:h>
      <text:p text:style-name="P62"><text:span text:style-name="T85">Debet </text:span><text:span text:style-name="T86">etiam caveri ne varietur supposito secundum modum praetactum quapropter non sequitur: “</text:span><text:span text:style-name="T87">Sortes est individuum, homo est Sortes; ergo homo est individuum”. Neque regulatur per dici de omni, etiam medium in maiori tenetur communiter.</text:span></text:p>
      <text:p text:style-name="P134">Secunda. Propositio <text:span text:style-name="T88">Ferio expositorie arguendo semper est bona consequentia, vel semper Ferio est bona consequentia, sed de rigoroso modo loquendi non curo nisi dum dubium circa haec versatur </text:span><text:soft-page-break/><text:span text:style-name="T88">haec propositio tenet ex eo quia talis syllogismus regulatur per dici de nullo immediate propositionaliter ut Ferio de medio communi.</text:span></text:p>
      <text:h text:style-name="Heading_20_3" text:outline-level="3">Aliquod album necessario est animal</text:h>
      <text:p text:style-name="P63">Contra istam propositionem sic instatur. Non sequitur: “Nullum ens quod est Sortes ne <text:span text:style-name="T89">necessario est animal, aliquod album est ens quod est Sortes; ergo aliquod album necessario non est animal”. Et tamen arguitur in Ferio, igitur.</text:span></text:p>
      <text:p text:style-name="P64">Respondetur quod non regulatur per dici de nullo ut patet dando sensum maioris. Sensus enim maioris est iste: De quocumque verum est dicere quod est ens, quod est Sortes, verum est dicere est dicere quod non est necessario animal. Et in minori dico quod album est ens quod est Sortes, ergo deberem inferre ex virtute maioris quod album non necessario est animal, ideo impedimentum talis regulationis est, quia ly necessario negatur in maiore, et non in conclusione.</text:p>
      <text:p text:style-name="P64">Tertia propositio. Omnes syllogismi debite facti secundum dispositionem de Dabitis et de Dabisti sunt boni. Voco autem syllogismos debite factos secundum dispositionem de Dabitis qui possunt reduci ad Darii per conversionem simplicem conclusionis, et syllogismos debite factos secundum dispositionem de Dabisti qui possunt reduci ad Darii per conversionem simplicem conclusionis et etiam per conversionem et per transpositionem praemissarum.</text:p>
      <text:p text:style-name="P446"><text:span text:style-name="T675">[</text:span><text:span text:style-name="T598">cxlii.va 329a</text:span><text:span text:style-name="T675">]</text:span></text:p>
      <text:p text:style-name="P65">Contra istam propositionem sic instatur, non sequitur: “hoc currens est homo, album possibiliter est hoc currens; ergo homo est albus” et tamen arguitur in Dabisti, igitur.</text:p>
      <text:p text:style-name="P65">Respondentur quod non bene arguitur neque regulatur per dici de omni cuius impedimentum est, quia arguitur a magis amplo ad minus amplum ex parte minoris extremitatis.</text:p>
      <text:p text:style-name="P65">Si dicas saltem, iste erit bonus modus arguendi: “Hoc currens est homo, album possibiliter est hoc currens; ergo homo possibiliter est albus qui est”, quod videtur falsum quia medium pro pluribus stat in minori quam in maiori.</text:p>
      <text:p text:style-name="P65">Respondeo concedendo quod est bonus neque est dabilis casus in quo antecedens sit verum et consequens falsum, eius bonitas ostenditur per reductionem ad Darii, nam ad illas praemissas sequuntur praemissae de Darii et ad praemissas de Darii sequitur conclusio de Darii. Nam bene sequitur: “Hoc currens est homo, et album possibiliter est hoc currens; ergo currens possibiliter est album et homo est hoc currens”, <text:span text:style-name="T90">et ultra sequitur “ergo homo possibiliter est album quod est” vel “ergo homo possibiliter est album”.</text:span></text:p>
      <text:p text:style-name="P66">Et ideo cum dicebatur quod medium pro pluribus tenetur in minori quam in maiore, respondeo ut supra dictum est in syllogismis qui mediate regulantur per dici de omni aut per dici de nullo, ex reductione agnoscendus est defectus, et quia iste reducitur ad Darii per transpositionem praemissarum. In Darii autem autem medium illud magis ample tenetur in maiore quam minore. Ideo debite regulatur: Ideo patet quod si in Dabisti medium magis ample staret in maiori quod in minori hoc esse impedimentum debite regulationis si in Darii esset impedimentum staret pro pluribus in minori quam in maiore.</text:p>
      <text:p text:style-name="P66">Quarta propositio: Omnes syllogismi debite formati secundum dispositionem de Frisesomorum sunt boni, formantur autem secundum dispositionem de Frisesomorum quando <text:span text:style-name="T91">reducuntur ad Ferio per conversionem et per transpositionem praemissarum.</text:span></text:p>
      <text:h text:style-name="Heading_20_3" text:outline-level="3"><text:soft-page-break/>Haec anima et hoc corpus sunt Sortes</text:h>
      <text:p text:style-name="P67">Contra istam propositionem sunt instantiae plus adductae et praeter illas possunt poni istae duae, quia non sequitur: “<text:span text:style-name="T170">h</text:span>oc corpus et haec anima sunt Sortes, homo non est hoc corpus; ergo homo Sortes et haec anima non est”, et tamen arguitur in Frisesomorum quod non sequatur patet, quia in casu in quo solus esset Sortes, antecedens esset verum et consequens falsum.</text:p>
      <text:h text:style-name="Heading_20_3" text:outline-level="3">Divinitas si est lapis non est Deus</text:h>
      <text:p text:style-name="P67">Ali<text:span text:style-name="T171">a</text:span> instantia est, quia non sequitur: “Sortes si et lapis est Deus, divinitas non et Sortes; ergo divinitas si est lapis non est Deus”, quia casu posito quod solus Deus sit, antecedens est verum et consequens falsum.</text:p>
      <text:p text:style-name="P144"><text:span text:style-name="T91">Ad has instantias breviter respondeo. </text:span><text:span text:style-name="T209">A</text:span><text:span text:style-name="T91">d primam quam est in principio principalis argumenti dico quod non sequitur maior, enim de Ferio non infert unam de omni, ideo non est bonus syllogismus expositorius, quia non sequitur: “Hic pater filius in divinis non est; ergo omne ens quod est hic pater, filius in divinis non est.</text:span></text:p>
      <text:p text:style-name="P67">Ad alium dico quod non bene arguitur expositorie in Fapesmo, quia plus subicitur in maiori quam sit praedicatum in minori, et hoc impedit regulationem in Fapesmo, ideo ista esset mala responsio. Nego quod talis syllogismus sit formatus in Fapesmo vel in Frisesomorum, quia plus praedicatur in minori quam sit subiectum in maiori, immo, propter hoc non minus regulatur, ut clare patet reducendo ad Ferio. Ideo iste syllogismus regulatur per dici de nullo: “Sortes est homo, Brunellus non est Sortes <text:span text:style-name="T92">vel asinus; ergo homo vel asinus non est Brunellus”. Vel sic: “Sortes non est homo, Brunellus Sortes vel asinus non est; ergo homo vel asinus non est Brunellus”, ut patet ex eius reductione, quia sic reducitur: “Sortes vel asinus non est Brunellus, homo est Sortes; ergo homo vel Brunellus non est asinus”. Ideo patet quod si in Fapesmo vel in Frisesomorum aliquid additur medio in maiore non debet addi minori extremitati in conclusione, immo per hoc impeditur regulatio.</text:span></text:p>
      <text:p text:style-name="P447"><text:span text:style-name="T676">[</text:span><text:span text:style-name="T598">cxlii.vb 329b</text:span><text:span text:style-name="T676">]</text:span></text:p>
      <text:p text:style-name="P132">Patet etiam quod si <text:span text:style-name="T93">aliquid additur medio in minori debet in conclusione se tenere ex parte minoris extremitatis. Omnia ista sunt nota ex reductione ad illos duos quorum unus est de copulato et alter de conditionato per idem est dicendum. Et multi alii modi possent assignari in prima figura ut notum est bono logico cognoscenti potestates syllogismorum et secundum alium modum alia et alia debet fieri reductio et secundum hoc assignandae sunt conditiones ad bene arguendum in tali modo et caetera. Et similiter de syllogismo expositorio formato secundum dispositionem secundae figurae possunt poni aliquae propositiones.</text:span></text:p>
      <text:h text:style-name="P572" text:outline-level="2">De expositorio secundae figurae</text:h>
      <text:p text:style-name="P68">Prima propositio: <text:span text:style-name="T94">O</text:span>mnes syllogismi debite facti secundum dispositionem de Darii sunt boni, formantur autem secundum dispositionem de Darii quando possunt reduci ad Darii minore conversa simpliciter.</text:p>
      <text:h text:style-name="Heading_20_3" text:outline-level="3">Essentia divina necessario est creans</text:h>
      <text:p text:style-name="P69">Contra istum modum arguitur sic. Non sequitur: “Creans necessario est hic Deus, essentia divina est hic Deus; ergo essentia divina necessario est creans”, et tamen arguitur in Darii.</text:p>
      <text:p text:style-name="P69"><text:soft-page-break/>Respondetur breviter quod non sequitur, quia maiore conversa simpliciter aut saltem per accidens ex parte modi non bene disponuntur in Darii, quia non sequitur: “Hic deus possibiliter est creans, essentia divina est hic Deus; ergo essentia divina necessario est creans.</text:p>
      <text:p text:style-name="P70">Secunda propositio: <text:span text:style-name="T94">Omnes </text:span><text:span text:style-name="T95">syllogismi debite facti secundum dispositionem de Dabitis sunt boni, quia illi reducuntur ad Darii per conversionem simplicem maioris et conclusionis. Et ideo differt a primo per hoc quod primus concludit directe es istae concludit indirecte. Et potest argui sicut contra primum.</text:span></text:p>
      <text:p text:style-name="P71">Tertia propositio: Omnes syllogismi debite facti secundum dispositionem de Dabismis sunt boni, et formantur secundum hanc dispositionem quando reducuntur ad Darii per conversionem simplicem minoris et conclusionis et per transpositionem praemissarum.</text:p>
      <text:h text:style-name="Heading_20_3" text:outline-level="3"><text:s/><text:span text:style-name="T172">Filius est pater</text:span></text:h>
      <text:p text:style-name="P72">Contra istam propositionem arguitur sic. Non sequitur “Pater est haec essentia divina, filius est haec essentia divina; ergo filius est pater”, et tamen arguitur secundum illam dispositionem, igitur.</text:p>
      <text:p text:style-name="P71">Respondeo breviter quod iste syllogismus non valet, quia convertens minoris debet esse maior in Darii et illa non infert unam de omni <text:span text:style-name="T96">vel saltem convertens maioris debet esse maior in Darii et non infert unam de omni.</text:span></text:p>
      <text:p text:style-name="P73">Quarta propositio: Omnes syllogismi debite facti secundum dispositionem de Festino sunt boni, et fiunt secundum illam dispositionem quando reducuntur ad Ferio per conversionem simplicem maioris.</text:p>
      <text:p text:style-name="P73">Quinta propositio: Omnes syllogismi debite formati secundum dispositionem de Camestres sunt boni, et fiunt secundum talem dispositionem quando reducuntur per conversionem, scilicet, minoris et conclusionis et per transpositionem praemissarum.</text:p>
      <text:p text:style-name="P73">Sexta propositio: Omnes syllogismi debite formati secundum dispositionem de Barroco sunt boni et fiunt secundum talem dispositionem quando reducuntur per impossibile ad Darii, capiendo contradictorium conclusiones per minore et maiorem pro maiore inferendo oppositum minoris.</text:p>
      <text:h text:style-name="P573" text:outline-level="2">De expositoriis tertiae figurae</text:h>
      <text:p text:style-name="P73">De modo etiam arguendi expositorie in tertia figura ponuntur propositiones.</text:p>
      <text:p text:style-name="P73">Prima propositio: Omnes syllogismi debite formati secundum dispositionem de Darapti sunt boni, formantur autem secundum talem dispositionem quando possunt reduci ad Darii per conversionem minoris non quidem per conversionem per accidens, sed simplicem. Unde proportionabiliter omnia ista sunt applicanda, ut in syllogismo de medio communi et possent assignari magis appropriati modi quam isti, sed aspicienti isti sufficiunt.</text:p>
      <text:h text:style-name="Heading_20_3" text:outline-level="3">In hoc instanti est Deus</text:h>
      <text:p text:style-name="P74">Contra istam propositionem arguitur sic. Non sequitur: “<text:span text:style-name="T174">i</text:span>n hoc instanti est Deus, in hoc instanti est Diabolus; ergo Deus est <text:span text:style-name="T175">D</text:span>iabolus”.</text:p>
      <text:p text:style-name="P74">Si dicatur quod medium deberet esse totale extremum in altera praemissarum. Arguitur sic saltem bene sequitur: “<text:span text:style-name="T176">i</text:span>n hoc instanti est Deus, hoc instans est instans; ergo instans est Deus”.</text:p>
      <text:p text:style-name="P448"><text:soft-page-break/><text:span text:style-name="T677">[</text:span><text:span text:style-name="T598">cxliii.ra 330a</text:span><text:span text:style-name="T677">]</text:span></text:p>
      <text:p text:style-name="P75">Ad has instantias breviter respondetur. Ad primam <text:span text:style-name="T97">dicitur quod non bene arguitur, quia in reduc</text:span><text:span text:style-name="T98">e</text:span><text:span text:style-name="T97">ndo ad primam figuram </text:span><text:span text:style-name="T98">plus est medium singularizatum maioris quam est praedicatum minoris quod impedit debitam regulationem, nam minior converteretur sic: “</text:span><text:span text:style-name="T99">D</text:span><text:span text:style-name="T98">iabolus est in hoc instanti ens”, ubi praedicatum plus est singularizatum in maiori.</text:span></text:p>
      <text:p text:style-name="P76"><text:span text:style-name="T98">Ad replicam quae adducitur, dicitur quod non bene arguitur sed debet sic concludi: “</text:span><text:span text:style-name="T99">I</text:span><text:span text:style-name="T98">n instanti praesenti </text:span><text:span text:style-name="T99">ens</text:span><text:span text:style-name="T98"> est dia</text:span><text:span text:style-name="T99">bolus”, </text:span><text:span text:style-name="T100">ut patet ex his quam</text:span><text:span text:style-name="T99"> </text:span><text:span text:style-name="T100">dicta sunt circa Darapti de medio co</text:span><text:span text:style-name="T101">m</text:span><text:span text:style-name="T100">muni.</text:span></text:p>
      <text:p text:style-name="P77">Secunda propositio: Omnes syllogismi debite formati secundum dispositionem de Bocardo, expositorie arguendo, sunt boni formantur autem secundum dispositionem de Bocardo quando possunt reduci ad Darii per impossibile, et hoc vel ad Darii expositorium vel ad Darii de medio communi, et debet reduci ut dictum est in syllogismus de medio communi.</text:p>
      <text:h text:style-name="Heading_20_3" text:outline-level="3">Essentia divina non est filius</text:h>
      <text:p text:style-name="P77">Contra istam propositionem instatur sic. Non sequitur: “hic pater non est filius, hic pater est essentia; ergo essentia divina non est filius”.</text:p>
      <text:p text:style-name="P77">Item non sequitur: “<text:span text:style-name="T177">h</text:span>oc currens non est album, hoc currens possibiliter est homo qui est; ergo homo non est albus”, quia in casu in quo omnes homines essent albi antecedens esset verum et consequens falsum. Et tamen arguitur isto modo, igitur.</text:p>
      <text:p text:style-name="P77">Ad primam breviter respondeo quod non bene arguitur in Bocardo, quia ad bene arguendum in Bocardo requiritur quod contradictoria conclusionis inferat unam de omni. Ex eo quod eius contradictoria debet esse maior in Darii, non autem infert in proposito.</text:p>
      <text:p text:style-name="P78">Ad aliam dicitur quod non regulatur mediate per dici de omni et ratio est, quia non potest reduci ad Darii per impossibile, et hoc provenit ex eo quod medium tenetur magis ample in minore quam in maiore, patet quia illud quod erat medium intrat conclusionem. <text:span text:style-name="T102">M</text:span>odo clarum <text:span text:style-name="T102">est quod arguitur in Darii a magis amplo ad minus amplum.</text:span></text:p>
      <text:p text:style-name="P78"><text:span text:style-name="T102">Et per hoc patet quod ad hoc quod bene arguatur in Bocardo requiritur quod medium minoris non stet magis ample quam stat medium maioris, quia per hoc arguitur a magis amplo ad minus amplum sine distributione. Possunt etiam poni multi modi arguendi in tertia figura, scilicet, Darapti, Ferison, Ferismon et aliqui alii quos brevitatis causa omitto.</text:span> </text:p>
      <text:p text:style-name="P79">In quarta figura sunt tot modi quot sunt in prima, quia possunt formari per transpositionem praemissarum modorum primae figurae.</text:p>
      <text:h text:style-name="Heading_20_3" text:outline-level="3">Sortes desinit esse</text:h>
      <text:p text:style-name="Text_20_body">Tertio arguitur sic. Non sequitur: <text:span text:style-name="T167">“Sortes desinit esse, iste binarius est sortes; ergo iste binarius desinit esse”, et tamen arguitur expositorie, igitur.</text:span></text:p>
      <text:h text:style-name="Heading_20_3" text:outline-level="3">Sortes fuit Parisius et Romae</text:h>
      <text:p text:style-name="P80">Item arguitur, non sequitur ponendo per casum quod post mortem Sortis anima fuerit Parisius est corpus Romae: “<text:span text:style-name="T178">i</text:span>ste binarius fuit Parisius et Romae, iste binarius fuit Sortes; ergo Sortes fuit Parisius et Romae”, et tamen arguitur expositorie, igitur.</text:p>
      <text:h text:style-name="Heading_20_3" text:outline-level="3"><text:soft-page-break/>Sortes est perpetuus</text:h>
      <text:p text:style-name="P80">Item arguitur sic. Non sequitur: “<text:span text:style-name="T179">i</text:span>ste binarius est perpetuus”, demonstrando materiam et formam, “iste binarius est Sortes”, tenendo quod Sortes non est aliud a materia prima et anima rationalis, “<text:span text:style-name="T103">e</text:span>rgo Sortes est perpetuus”, et tamen arguitur debite expositorie, igitur.</text:p>
      <text:p text:style-name="P80"/>
      <text:h text:style-name="Heading_20_3" text:outline-level="3">Sortes <text:span text:style-name="T164">semper erit</text:span></text:h>
      <text:p text:style-name="P80">Vel <text:span text:style-name="T103">potest sic argui: “Iste binarius semper erit, iste binarius est sortes; ergo Sortes semper erit”, et tamen arguitur expositorie in tertia figura, igitur.</text:span></text:p>
      <text:h text:style-name="Heading_20_3" text:outline-level="3">Pro quo supponit ly ‘Sortes’ et si connotat aliquid</text:h>
      <text:p text:style-name="P81">Pro solutione, sciendum est quod argumenta ista petunt difficultatem in capitulo appellationum praetactam an, videlicet, illi termini ‘Sortes’, ‘Plato’ et alii termini significantes totum habens partes sint termini connotavi, tenendo totum esse suas partes et probatum fuit, quod sic per hoc quod iste terminus ‘Sortes’ prius supponit per corpore et anima, et postea desinit supponere pro corpore et anima, et non propter defectum corporis et animae, ergo propter defectum connotationis seu appellationis.</text:p>
      <text:p text:style-name="P449"><text:span text:style-name="T679">Ad hanc rationem audivi quendam respondere </text:span><text:span text:style-name="T678">&lt;</text:span><text:span text:style-name="T598">Bricot </text:span>inter examinandum<text:span text:style-name="T678">&gt;</text:span><text:span text:style-name="T679"> quod non provenit propter appellationis defectum sed propter defectum illius pro quo immediate supponit iste terminus ‘Sortes’, quia immediate supponit pro hac entitate, demonstrando illam entitatem quam est Sortes, et postea desinit supponere pro illa entitate quam est Sortes.</text:span></text:p>
      <text:p text:style-name="P449"><text:span text:style-name="T680">[</text:span><text:span text:style-name="T598">cxliii.rb 330b</text:span><text:span text:style-name="T680">]</text:span></text:p>
      <text:p text:style-name="P449"><text:span text:style-name="T680">D</text:span><text:span text:style-name="T104">ebet ergo in illa maiore loco preallegato sic dici, quandocumque aliquis terminus desinit supponere hoc est propter defectum illius pro quo supponit mediate vel immediate, vel propter defectum appellationis quando non sic intelligendum est, id est, propter defectum rei appellate sed appellationis, id est, rei appellate vel quia illa res non taliter se habet qualiter ille terminus eam appellat, quod dico propter eos qui dicunt quod informatio supponit pro ipsa anima </text:span><text:span text:style-name="T105">connotando</text:span><text:span text:style-name="T104"> </text:span><text:span text:style-name="T106">corpus informari ab anima. Illi enim concederent quod informatio desinit pro anima supponere non propter de</text:span><text:span text:style-name="T107">s</text:span><text:span text:style-name="T106">itionem animae aut propter desitionem corporis, sed quia corpus definit taliter se habere qualiter connotatur per ly ‘informatio’.</text:span></text:p>
      <text:p text:style-name="P82">Ad propositum ergo diceretur quod iste terminus Sortes desinit supponere pro corpore et anima dato quod prius supponebat p<text:span text:style-name="T108">ro</text:span> corpore et anima, non propter desitionem <text:span text:style-name="T108">corporis et animae, sed propter desitionem pro quo immediate supponit ly ‘Sortes’, quia immediate supponit ly ‘Sortes’ pro hac entitate et illa entitas desinit esse.</text:span></text:p>
      <text:p text:style-name="P83">Ideo ad primam rationem diceretur quod ille syllogismus non valet ex eo quod virtualiter sunt quattuor termini cum enim dicitur in maiore Sortes desinit esse. Sensus est Sortes est Sortes, desinens esse propter adiectivum a parte praedicati, quod includit substantivum positum a parte subiecti, cum autem dicitur in conclusione: “iste binarius desinit”. Sensus est: “iste binarius est”, “iste binarios desinens esse”, ubi patet quod est aliud praedicatum quam in maiore. Ideo est variatio appellationis ex parte de ly ‘desinens’ quia in una dicit desitionem Sortis, seu huius entitatis, in alia vero dicit desitionem huius binari.</text:p>
      <text:p text:style-name="P84"><text:soft-page-break/>Et consimiliter dicitur ad aliud argumentum in quo sic arguitur: “Iste binarius est perpetuus, iste binarius est Sortes; ergo Sortes est perpetuus”, nam ex parte praedicati in una est ly ‘Sortes”, in alia est binarius. Ideo, resolvendo diceretur ab adversario quod ista est neganda, “Sortes est perpetuus”, <text:span text:style-name="T110">e</text:span>t ista concedenda “Sortes <text:span text:style-name="T109">desinit esse”.</text:span></text:p>
      <text:p text:style-name="P85"><text:span text:style-name="T109">Sed contra. In hac propositione: “Sortes est Sortes desinens esse”, </text:span><text:span text:style-name="T110">l</text:span><text:span text:style-name="T109">y ‘</text:span><text:span text:style-name="T110">desinens esse’ appellat desitionem co</text:span><text:span text:style-name="T111">nv</text:span><text:span text:style-name="T110">enire huic binario iste, autem binarius non desinit esse, ergo falsum est quod Sortes desinit esse. Assumptum probo, quia bene sequitur: “Sorti appellat desitionem convenire, </text:span><text:span text:style-name="T111">Sortes est hic binarius; ergo huic binario appellat desitionem convenire”.</text:span></text:p>
      <text:p text:style-name="P86">Et confirmatur, quia bene sequitur: “Sorti convenit desitio, <text:span text:style-name="T112">Sortes est hic binarius; ergo huic binario convenit desitio”.</text:span></text:p>
      <text:p text:style-name="P87">Ad hanc rationem respondetur continue evadendo concedendo quod huic binario convenit desitio, non quidem desitio huius binarii, <text:span text:style-name="T113">sed desitio huius entis. Etiam concederetur quod huic binario appellat convenire desitionem, non quidem desitionem huius binarii, sed desitionem huius entis.</text:span></text:p>
      <text:p text:style-name="P88">Sed non videtur sufficiens evasio, quia non videtur concedendum secundum illum modum dicendi, quod in hac propositione: “Sortes est, Sortes desinens esse”. Ly ‘desinens esse’ appellet desitionem entis convenire huic binario, cum ibi non ponatur terminus immediate supponens pro isto binario.</text:p>
      <text:p text:style-name="P89">Sed <text:s/>diceret adversarius satis esse quod ly ‘Sortes’ ibi positum, supponat pro hoc binario mediate ad hoc quod ei appellat convenire desitionem entis, pro quo supponit ly ‘Sortes’.</text:p>
      <text:p text:style-name="P450">Sed contra, quia saltem ex dictis sequitur quod Sortes distinguitur realiter ab hoc binario <text:span text:style-name="T114">quod est contra opinionem patet, quia Sortes potest desinere esse et iste binarius non potest desinere esse. Et hoc est sufficiens argumentum ad concludendum quod Sortes distinguitur realiter ab hoc binario. Sed continue proterviendo negabitur illud esse sufficiens argumentum ad illud consequens concedendum.</text:span></text:p>
      <text:p text:style-name="P451"><text:span text:style-name="T681">[</text:span><text:span text:style-name="T598">cxliii.va 331a</text:span><text:span text:style-name="T681">]</text:span></text:p>
      <text:p text:style-name="P90">Confirmatur illa ratio, quia concedendum est quod iste binarius desinit esse Sortes, et negandum est quod desinit esse binarius vel desinit esse. <text:span text:style-name="T115">I</text:span>sta demonstrando corpus et animam. Si autem ly ‘Sortes’ esset terminus absolutus, si una esse vera, et alia.</text:p>
      <text:p text:style-name="P91">Et confirmatur quia ita est vera: “<text:span text:style-name="T169">i</text:span>ste binarius desinit esse Sortes”. Ista autem est falsa: “Sortes desinit esse binarius”. In terminis autem absolutis, non esset ponenda illa differentia, licet enim ista sic vera: “Sortes desinit esse albus”. Quando ista est falsa: “Album desinit esse Sortes”. Non tamen ita esset si essent termini absoluti.</text:p>
      <text:p text:style-name="P91">Sed forsitan diceretur quod si ista est vera: “Iste binarius desinit esse Sortes”. Etiam ista est vera: “Sortes desinit esse binarius”. Probo quod hoc sit falsum, nam quando anima desinit corpus informare ista est vera: “Iste binarius desinit esse Sortes”, ut patet exponendo. Ista autem est falsa: “Sortes desinit esse iste binarius”, quia bene sequitur: “Sortes desinit esse iste binarius, iste binarius est Sortes; ergo iste binarius desinit esse iste binarius”. In hac argumentatione nullus est error, <text:span text:style-name="T116">conclusio est falsa, ergo aliqua praemissarum non minor, ergo maior quod est intentum.</text:span></text:p>
      <text:p text:style-name="P92">Ad aliam rationem diceretur quod non sequitur quia in conclusione non praedicatur maior extremitas de minori, sensus enim maioris est iste: Iste binarius fuit entia Parisius et Romae, in conclusione autem concluditur quod Sortes fuit ens Parisius et Romae.</text:p>
      <text:p text:style-name="P92"><text:soft-page-break/>Sed contra, quia saltem iste modus arguendi est bonus: “Iste binarius fuit iste binarius existens Parisius et Romae, Sortes fuit binarius; ergo Sortes fuit iste binarius existens Parisius et Romae”. Consequens est falsum secundum illum modum, quia consequens est una propositio de praeterito quae nunquam habuit propositionem de praesenti veram, cum numquam fuit verum dicere: “Sortes est iste binarius existens Parisius et Romae”.</text:p>
      <text:h text:style-name="Heading_20_3" text:outline-level="3">Sortes et Plato fuerunt post mortem sortis et Platonis</text:h>
      <text:p text:style-name="P92">Et confirmatur ratio probando hanc propositionem esse veram: “Sortes et Plato fuerunt post mortem Sortis et Platonis”. Quae neganda esset tenendo illos terminos ‘Sortes’ ‘Plato’ esse terminos absolutos, quia bene sequitur, demonstrando materiam Sortis et materiam Platonis. <text:span text:style-name="T118">F</text:span>ormam etiam Sortis e<text:span text:style-name="T119">t</text:span> formam Platonis <text:span text:style-name="T117">ista fuerunt post mortem Sortis et Platonis, ista fuerunt Sortes et Plato, ergo Sortes et Plato fuerunt post mortem Sortis et Platonis.</text:span></text:p>
      <text:p text:style-name="P93">Ad primam diceretur quod non bene argui expositorie ex eo quod ex parte copulae arguitur ex particularibus.</text:p>
      <text:p text:style-name="P93">Ad debite, igitur, arguendum sic debet argui: “Iste binarius fuit binarius existens Parisius et Romae, et Sortes pro eodem ipse fuit iste binarius; ergo Sortes fuit iste binarius existens Parisius et Romae”. Sed sicut conclusio est falsa et minor.</text:p>
      <text:p text:style-name="P93">Sed dicens ergo saltem bene <text:span text:style-name="T120">sequitur tempus importatum per copulam singularizando: “Iste binarius hoc anno fuit iste binarius existens Parisius et Romae, et iste binarius fuit Sortes; ergo Sortes hoc anno fuit iste binarius existens Parisius et Romae.</text:span></text:p>
      <text:p text:style-name="P94">Responderetur quod si praemissae sint verae, conclusio est concedenda, nam si <text:span text:style-name="T121">hoc anno usi fuissemus pro tempore praesenti. Semel fuit verum dicere: “Sortes hoc anno est iste binarius existens Parisius et Romae”, casu quod Sortes illo anno fuerit mortuus et anima fuerit Parisius et corpus Romae.</text:span></text:p>
      <text:p text:style-name="P95">Ad aliam consimiliter respondendum est, ut ad istam dictum est. Diceretur propterea quod sunt plures termini quam tres, nam sensus maioris est iste: <text:span text:style-name="T122">I</text:span>sta fuerunt, <text:span text:style-name="T122">ista entia post mortem Sortis et Platonis. Et sensus conclusionis est iste: Sortes et Plato fuerunt Sortes et Plato existens post mortem Sortis et Platonis.</text:span></text:p>
      <text:p text:style-name="P96">Sed arguo sic. Saltem iste modus arguendi est bonus: “Iste binarius necessario est iste binarius, Sortes est iste binarius; ergo Sortes necessario est iste binarius”. Praemissae sunt verae et conclusio falsa nisi dicatur quod ille terminus ‘Sortes’ est terminus connotativus. Si, enim, sit terminus connotativus, conclusio illa concederetur cum sensus eius sit verus. Scilicet, iste illud vel illa quod vel quae possunt esse Sortes necessario sunt iste binarius quod verum est, nam corpus et anima sunt iste binarius et necessario sunt iste binarius, ergo Sortes necessario est iste binarius. Et debet poni inesse loco subiecti, ponendo pronomen demonstrativum demonstrans illa pro quibus subiectum supponit.</text:p>
      <text:p text:style-name="P452"><text:span text:style-name="T682">[</text:span><text:span text:style-name="T598">cxliii.vb 331b</text:span><text:span text:style-name="T682">]</text:span></text:p>
      <text:p text:style-name="P96"><text:span text:style-name="T123">Constat autem </text:span><text:span text:style-name="T124">quod si ly ‘Sortes’ sit terminus absolutus, illa est falsa, quia sua de inesse non est necessaria, scilicet ista: “Sortes est iste binarius”. Etiam ipsa est falsa in sensu composito, ergo etiam in sensu diviso. Consequentia patet per illam regulam: Quaelibet propositio singularis de necessario, cuius subiectum est pronomen demonstrativum aut nomen proprium, si est vera in sensu </text:span><text:soft-page-break/><text:span text:style-name="T124">diviso, etiam est vera in sensu composito et econtra, nec videtur instantiam habere in propositio secundum illum modum dicendi.</text:span></text:p>
      <text:p text:style-name="P97">Ideo propter istas rationes concludendum est quod illi termini ‘Sortes’ ‘Plato’ et omnes alii termini significantes totum sunt connotativi. <text:span text:style-name="T125">Maxime tamen illa ratio in appellationibus facta ponderanda est, quia si Sortes supponit pro isto binario, et postea desinit supponere pro isto binario, hoc non potest esse nisi propter defectum appellationis, et ita destruuntur praedicamenta ad intentionem illorum numerum eorum solicite inquirentium. </text:span><text:span text:style-name="T126">Ideo ad rationes.</text:span></text:p>
      <text:p text:style-name="P98">Ad primam dicendum est quod sicut conclusio est falsa, ita et maior concedendum est quod sicut conclusio est falsa, ita et maior concedendum enim est sine formidine quod iste binarius sicut bene contra eos probatur.</text:p>
      <text:p text:style-name="P98">Ad aliam dico quod Sortes est Sortes perpetuus, sed non est perpetuus Sortes.</text:p>
      <text:p text:style-name="P98">Ad aliam dici posset quod Sortes semper erit entia, tamen non semper erit ens et posset applicari solutio defendentium quod Sortes non est terminus connotativus.</text:p>
      <text:p text:style-name="P98">Ad aliam posset dici similiter.</text:p>
      <text:h text:style-name="Heading_20_3" text:outline-level="3">Pars Sortis erit Sortes</text:h>
      <text:p text:style-name="Text_20_body">Quarto arguitur sic. Non sequitur: “hoc <text:span text:style-name="T173">erit Sortes demonstrando residuum Sortis praeter digitum, et hoc erit pars Sortis; ergo pars Sortis eris Sortes”, et tamen arguitur expositorie, igitur.</text:span></text:p>
      <text:h text:style-name="Heading_20_3" text:outline-level="3">Petrus non erit cras</text:h>
      <text:p text:style-name="P102">Item pono quod hodie sit aliqua pars in Petro quae non erit cras, quae sit ‘a’ et totum residuum vocetur ‘b’. Tunc sic arguitur non sequitur hoc aggregatum est Petrus, ergo Petrus non erit cras cum praemissae sint verae, et conclusio falsa, et tamen arguitur expositorie, igitur.</text:p>
      <text:h text:style-name="Heading_20_3" text:outline-level="3">Aliquis homo non resurget</text:h>
      <text:p text:style-name="P99"><text:span text:style-name="T127">Et consimiliter arguitur probando quod aliquis homo non resurget in die iudicii signetur aliqua pars valde impura in Petro, quae non resurget in die iudicii, et totum residuum vocetur ‘b’. Tunc </text:span><text:span text:style-name="T128">arguitur sic: Bene sequitur hoc aggregatum ex ‘a’ et ‘b’ non resurget in die iudicii, hoc aggregatum est homo, ergo aliquis homo non resurget in die iudicii. Praemissae sunt verae et conclusio falsa et haeretica ut videtur, et tamen arguitur expositorie, igitur.</text:span></text:p>
      <text:h text:style-name="Heading_20_3" text:outline-level="3">Aliquis homo est ubique</text:h>
      <text:p text:style-name="P100">Item non sequitur: “Hoc est ubique demonstrando Dei filium, et hoc est aliquis homo; ergo aliquis homo est ubique”, et tamen arguitur expositorie. Igitur quod non sequatur patet quia antecedens est verum et consequens est falsum. Si enim aliquis homo est ubique, corpus eius est ubique, nullum autem corpus es ubique.</text:p>
      <text:h text:style-name="Heading_20_3" text:outline-level="3">Lucens actu est extinctum</text:h>
      <text:p text:style-name="P100">Item non sequitur: “<text:span text:style-name="T180">h</text:span>aec candela est extincta, haec candela est vel fuit lucens actu; ergo lucens actu est extinctum”, <text:span text:style-name="T129">cum praemissae sint verae et conclusio falsa et tamen arguitur expositorie, igitur.</text:span></text:p>
      <text:p text:style-name="P101"><text:soft-page-break/>Et consimiliter argueretur, quia non sequitur: “<text:span text:style-name="T181">h</text:span>oc fuit divisum in suas medietates demonstrando aliquod scutum, quod in praeterito tempore fuit divisum, et hoc est vel fuit hoc scutum; ergo hoc scutum fuit divisum in suas medietates.</text:p>
      <text:h text:style-name="Heading_20_3" text:outline-level="3">Aliquis homo praecessit Adam; tamen Adam fuit primus homo, eodem</text:h>
      <text:p text:style-name="P101">Item non sequitur: “<text:span text:style-name="T181">h</text:span>oc praecessit Adam demonstrando dei filium, et hoc fuit aliquis homo; ergo aliquis homo praecessit Adam”, cum praemissae videantur verae et conclusio falsa, nam Adam dicitur fuisse primus homo et tamen arguitur expositorie, igitur.</text:p>
      <text:h text:style-name="Heading_20_3" text:outline-level="3">Non nigrum erit nigrum</text:h>
      <text:p text:style-name="P101">Item non sequitur: “Iste paries est non niger, et iste paries erit niger; ergo non nigrum erit nigrum”, et tamen arguitur expositorie, igitur.</text:p>
      <text:p text:style-name="P453"><text:span text:style-name="T683">[</text:span><text:span text:style-name="T598">cxliiii.ra 332a</text:span><text:span text:style-name="T683">]</text:span></text:p>
      <text:h text:style-name="Heading_20_3" text:outline-level="3">Corpus Christi in Eucharistia Beata Maria genuit</text:h>
      <text:p text:style-name="P103">Item non sequitur: “<text:span text:style-name="T182">h</text:span>oc beata virgo genuit”, demonstrando corpus Christi et “hoc est corpus Christi in eucharistia; ergo corpus Christi in Eucharistia beata virgo genuit”. Praemissae enim videntur verae et conclusio falsa.</text:p>
      <text:h text:style-name="Heading_20_3" text:outline-level="3">Hoc continuum fuit Romae</text:h>
      <text:p text:style-name="P103">Item non sequitur: “<text:span text:style-name="T182">d</text:span>emonstrando aliquas duas partes quae Romae fuerunt discontinuae e<text:span text:style-name="T130">t Parisius, nunc sunt continuae, iste binarius fuit Romae, iste binarius est hoc continuum; ergo hoc continuum fuit Romae”, et tamen arguitur expositorie, igitur.</text:span></text:p>
      <text:h text:style-name="Heading_20_3" text:outline-level="3">Sortes inquantum Sortes currit</text:h>
      <text:p text:style-name="P104">Item non sequitur: “Sortes currit, et Sortes est Sortes inquantum Sortes; ergo Sortes inquantum Sortes currit”, et tamen arguitur expositorie, igitur.</text:p>
      <text:h text:style-name="Heading_20_3" text:outline-level="3">Utrum ly ‘Sortes’ est nomen suppositi</text:h>
      <text:h text:style-name="Heading_20_3" text:outline-level="3">Quid est Suppositum</text:h>
      <text:p text:style-name="P105">Ad has rationes respondetur: Ad primam dico quod si concedatur ly ‘Sortes’ esse nomen suppositi dicendum est quod illa pars, puta, totum residuum Sortis, excepto digito, nunc non est Sortes, et ablato digito esset Sortes, sicut si humanitas quae esse Sortes assumeretur a verbo divino, iam illa amplius non esset Sortes, sed verbum divinum est Sortes, et hoc est satis conforme modo loquendi theologorum. Non enim concedunt quod humanitas assumpta a verbo divino sit homo, sed potius verbum divinum est homo, cum ille terminus homo sit nomen suppositi. Si ergo isti termini: ‘homo’, ‘Sortes’, ‘Plato’, <text:span text:style-name="T131">sunt nomina suppositorum, dicendi sunt termini connotativi connotantes, quod connotant hoc vocabulum suppositum. Hoc autem vocabulum suppositum, supponit pro aliquo singulari connotando, quod non est pars, neque natum est inhaerere, neque informare, neque ab alio sustentari.</text:span></text:p>
      <text:p text:style-name="P106"><text:soft-page-break/>Ex hoc patet intelligentia dicentium quod si ly ‘Sortes’ connotet totalitem tunc pars Sortis non est Sortes. Connotat autem iste terminus ‘Sortes’ totalitatem si nomen suppositi dicatur, neque solum hoc. Sed etiam quod illa res pro qua supponit a nullo sustentetur.</text:p>
      <text:p text:style-name="P183"><text:span text:style-name="T330">Ex quo possunt elici aliqua </text:span><text:span text:style-name="T337">correlaria</text:span><text:span text:style-name="T330">.</text:span></text:p>
      <text:p text:style-name="P106">Primum <text:span text:style-name="T132">est quod aliqua res quae nunc de facto est Sortes potest non esse Sortes absque aliqua eius deperditione. Istud patet primo quia si Sorti, qui nunc est totalis, adiungeretur aliqua pars per continuationem, tunc haec res desinit esse Sortes, et tamen nulla entitas destruitur.</text:span></text:p>
      <text:p text:style-name="P107">Secundo: <text:span text:style-name="T134">s</text:span>i haec entitas assumeretur a verbo divino, tunc haec entitas desinit esse Sortes et tamen nulla res deperditur.</text:p>
      <text:p text:style-name="P108">Secundo: <text:span text:style-name="T133">s</text:span>equitur quod aliqua res potest fieri Sortes absque acquisitione novae rei, ut capiatur totum residuum Sortis, excepto digito. Tunc si aufertur digitus tunc verum est dicere quod haec entitas nunc est Sortes, et prius non erat Sortes, et tamen nulla entitas de novo acquiritur.</text:p>
      <text:p text:style-name="P108">Si etiam verbum divinum assumeret illam entitatem quae nunc de facto est Sortes verbum divinum <text:span text:style-name="T135">nunc inciperet esse Sortes et tamen nulla entitas inciperet esse. Et sic aliquis posset multipliciter uti isto termino ‘Sortes’, sicut aliis terminis connotativis ut constat.</text:span></text:p>
      <text:p text:style-name="P109">Sed quaeres an seclusa connotatione de ly ‘Sortes’, ita ut ly ‘Sortes’ non dicatur nomen suppositi, concedendum sit quod totum residuum, excepto digito, est Sortes.</text:p>
      <text:p text:style-name="P109">Responderi potest quod sic <text:span text:style-name="T136">quia iste terminus Sortes significat omne compositum quod per se potest esse compositum ex hac anima et corpore. Ideo non quaelibet pars Sortis est Sortes, aut etiam homo, quia non quaelibet pars potest esse per se. Hoc est solitarie existens, saltem naturaliter loquendo, </text:span><text:span text:style-name="T137">licet supernaturaliter esset dubium.</text:span></text:p>
      <text:h text:style-name="Heading_20_3" text:outline-level="3">Utrum iste terminus Sortes sit species</text:h>
      <text:p text:style-name="P110">Et si dicas: ergo sequitur quod iste terminus Sortes significa plura quorum quodlibet est Sortes, quae different numero, et per consequens est species et non individuum, quod est contra communem doctrinam.</text:p>
      <text:p text:style-name="P455"><text:span text:style-name="T137">Respondeo: licet soleat fieri difficultas an sit eidem Sortes numero residuum Sortis praeter digitum quod vocetur ‘a’, et compositum est digito et ‘a’ tamen, ut bene dicunt quidam doctores </text:span><text:span text:style-name="T685">&lt;</text:span><text:span text:style-name="T598">Hol</text:span><text:span text:style-name="T600">k</text:span><text:span text:style-name="T598">ot, Petrus Mantuanus</text:span><text:span text:style-name="T685">&gt;</text:span><text:span text:style-name="T137"> loquendo de idemptitate numerali, quali logicus conformis metaphysico, qui absolute docet veritatem rei, rigorose docet esse loquendum clarum est quod ‘a’ non est idem numero cum toto composito ex digito et ‘a’.</text:span></text:p>
      <text:p text:style-name="P454"><text:span text:style-name="T684">[</text:span><text:span text:style-name="T598">cxliiii.rb 332b</text:span><text:span text:style-name="T684">]</text:span></text:p>
      <text:p text:style-name="P112">Quod manifestissime patet. Tum primo: quia nulla pars est suum totum, sed ‘a’ est pars ipsius compositi ex ‘a’, et digito igitur. Tum secundo: quia bene sequitur hoc compositum est ‘a’ et digitus, sed ‘a’ non est ‘a’ et digitus, ergo hoc compositum non est ‘a’.</text:p>
      <text:p text:style-name="P111">Et per idem argueretur quod si nunc ipsi composito ex ‘a’ et digito, adveniret aliqua pars quae dicatur ‘c’, tunc esset <text:span text:style-name="T138">aliquis homo qui numquam </text:span><text:span text:style-name="T139">fuit, nam capio illud compositum est ex ‘a’ digito et ‘c’. Clarum est quod istud compositum est pars compositi ex ‘a’ digito et ‘c’, ergo non est ipsum compositum ex ‘a’ digito et ‘c’. Etiam </text:span><text:span text:style-name="T140">istud compositum ex ‘a’ digito et ‘c’ est ‘a’ digitus et ‘c’. Sed compositum praecise ex digito et ‘a’ est digitus et ‘a’, ergo hoc compositum non est illud, et hoc </text:span><text:soft-page-break/><text:span text:style-name="T140">compositum est aliquis homo, ergo aliquis homo est de novo qui numquam fuit. Ideo sapientes propter modum loquendi vulgarium, qui est contrarium, debent dimittere tales veritates, concedere quando ad eas est demonstratio quemadmodum in proposito est. Et forsitan, illam opinionem intendebat Heraclitus quando dicebat: “</text:span><text:span text:style-name="T141">N</text:span><text:span text:style-name="T140">on rediere eundem equum bis de fluvio”. </text:span><text:span text:style-name="T141">P</text:span><text:span text:style-name="T140">ropterea, quia semper est aliqua nutritio per quam acquiritur aliqua pars et per consequens est novum compositum.</text:span></text:p>
      <text:p text:style-name="P113"><text:span text:style-name="T140">Physice tamen </text:span><text:span text:style-name="T141">loquendo, et non adeo rigorose, dicitur eadem res quando manet altera principalis omnino eadem, et sic dicitur remanere idem homo per totam vitam, pro quanto eadem anima intellectiva manet.</text:span></text:p>
      <text:p text:style-name="P114">Alio modo dicitur idem numero physice loquendo, quando licet sint aliae partes, tamen ille succedunt et fluunt in consimili situ et figura.</text:p>
      <text:p text:style-name="P114">Dico <text:span text:style-name="T142">igitur ad argumentum concedendo quod ille terminus, seclusa connotatione, illa ita ut non dicatur nomen suppositi, licet de facto non sit seclusa, non enim vocamus residuum Sortis, praeter digitum Sortem, quandiu sibi coniungitur digitus, licet ablato digito, illud vocamus Sortem. Si ergo fieret impositio, sicut pono quod fiat ut argumentum habeat locum, opus est respondere.</text:span></text:p>
      <text:h text:style-name="Heading_20_3" text:outline-level="3">Tripliciter aliquis terminus dicitur individuum</text:h>
      <text:p text:style-name="P115"><text:span text:style-name="T142">Ideo forsitan aliquis per distinctionem illa responderet quod aliquis terminus dicitur individuum, seu terminus singularis </text:span><text:span text:style-name="T143">tripliciter. Uno modo aliquis terminus singularis</text:span><text:span text:style-name="T142"> propri</text:span><text:span text:style-name="T143">i</text:span><text:span text:style-name="T142">ssime, et logice loquendo, quando non potet supponere nisi pro una re singulari, quae est eadem primo modo idemptitatis. Scilicet, logice loquendo. Secundo modo minus proprie </text:span><text:span text:style-name="T143">quando non potest supponere nisi pro una re, ita quod potest supponere pro pluribus rebus, quin ille dicantur eadem, secundo modo capiendo idemptitatem. </text:span></text:p>
      <text:p text:style-name="P116">Tertio modo large, quando non potest supponere nisi pro una re ita quod non potest supponere pro pluribus, quin ille sint eadem tertio modo.</text:p>
      <text:p text:style-name="P117">Tunc dicitur quod ille terminus non est singularis primo modo. Sed bene secundo vel tertio modo.</text:p>
      <text:p text:style-name="P117">Sed tunc redit argumentum, quia saltem habetur quod logice loquendo est communis, quia ut opponitur singulari primo modo, et sic est una specie specialissima contenta sub illo termino ‘homo’, et ita ‘homo’ est unum genus.</text:p>
      <text:h text:style-name="Heading_20_3" text:outline-level="3">Aliqua numero differentia magis different numero quam alia</text:h>
      <text:h text:style-name="Heading_20_3" text:outline-level="3">Utrum iste terminus ‘<text:span text:style-name="T165">Sortes</text:span>’ sit species</text:h>
      <text:p text:style-name="P118">Respondeo: si ‘a’ et compositum ex ‘a’ et ‘c’ dicantur habere maiorem convenientiam essentialem quando duo individua, diversas formas habentia, sicut sunt Sortes et Plato, tunc ab illis abstrahibilis est unus conceptus communis, qui dicetur species specialissima. Et quod sit maior convenientia essentialis videtur, quia magis conveniunt essentialiter quae habent eandem formam quam quae non habent eandem formam, licet non essentialiter specifice, tamen essentialiter individualiter, sicut enim stat inter individua eiusdem speciei, unum esse altero perfectius essentialiter, non quidem specifice, sed individualiter, ut hoc lignum est perfectius essentialiter sua medietate, quia continet totam perfectionem essentialem huius medietatis, et adhuc alterius medietatis.</text:p>
      <text:p text:style-name="P456"><text:span text:style-name="T686">[</text:span><text:span text:style-name="T598">cxliiii.va 333a</text:span><text:span text:style-name="T686">]</text:span></text:p>
      <text:p text:style-name="P118"><text:soft-page-break/>Sic etiam stat aliqua numero differentia, magis numero differre quam alia, et ita non tantum differunt essentialiter ‘a’ et compositum ex ‘a’ et digito, quantum differunt Sortes et Plato, et per consequens, ab eis causabilis est unus conceptus communis repr<text:span text:style-name="T144">a</text:span>esentativus eorum quae ex hac anima componuntur.</text:p>
      <text:h text:style-name="Heading_20_3" text:outline-level="3">Utrum iste terminus ‘homo’ sit genus</text:h>
      <text:p text:style-name="P119">Sed dices: “concedendum est ergo, quod ‘homo’ est genus”. Respondeo: ille terminus ‘species specialissima’, censendus est quia significat res solo numero differentes a significato. Enim termini, illas denominationes sumpserunt iste autem terminus ‘homo’, non significat nisi res solo nuero differentes; ideo dicendus est species specialissima.</text:p>
      <text:p text:style-name="P125">Et si dicatur ille terminus non est species specialissima, qui habet aliam inferiorem speciem sub se, sed iste terminus ‘homo’ habet inferiorem speciem, ut patet et, igitur.</text:p>
      <text:p text:style-name="P120">Respondeo: diffinitio optime explicans, quid est species specialissima: est illa species quod praedicatur solum de pluribus differentibus numero in eo quod quid. Ille autem terminus, solum de pluribus differentibus numero praedicatur.</text:p>
      <text:p text:style-name="P121">Et si dicas quod praedicatur de pluribus speciebus; ergo praedicatur de differentibus specie.</text:p>
      <text:h text:style-name="Heading_20_3" text:outline-level="3">Quid est terminos differre specie</text:h>
      <text:p text:style-name="P122"><text:span text:style-name="T145">Respondeo: terminos differre specie, non est eos esse diversas species, quia tunc isti termini ‘Sortes’ ‘Brunellus’ essent diversae species, sed terminos differre specie, hoc est, esse terminos differentes specie est eos supponere adaequate pro rebus specie differentibus, si sint absoluti aut connotare res specie differentes, si sint connotativi vel unum aliqualiter similiter connotare qualiter similiter alter non connotat. Quod dico, quia qui tenent relationem non esse distinctam a suo fundamento, dicerent quod stat esse aliquos terminos eandem rem significare et </text:span><text:span text:style-name="T146">differre specie, quia unus aliqualiter similiter connotat qualiter, similiter non connotat alter. Sed qualiter in re sit sumenda diversitas specifica, hoc in loco dimitto, quia specialem requiret tractatum propter varias controversias.</text:span></text:p>
      <text:h text:style-name="Heading_20_3" text:outline-level="3">Aliquis terminus non est genus qui habet plures species</text:h>
      <text:p text:style-name="P123">Diceretur ad propositum, tenendo probabiliter quod licet iste terminus ‘homo’, dicatur de pluribus terminis specificis, non tamen differentibus specie, quia illi termini supponunt pro rebus solo numero differentibus, et ita concedo quod aliquis terminus non est genus, qui habet plures species, <text:span text:style-name="T147">quia ad esse genus ultra requiritur quod habeat species, quae species significent res specie differentes, aut aliquo illorum modorum dictorum significantes. Et ita diceretur quod ly ‘album’ habet plures species sub se. Scilicet, ly ‘album’, ‘hac albedine’, et scilicet ‘album’, ‘hac albedine’, non tamen propterea dici debet genus. Unde argumentum prius factum deduceretur probando quod rationale non sit differentia specifica specialissima, quia rationale ‘hac anima’ est differentia, ita ut suppleat unum incomplexum et tunc quaeretur cuius speciei est differentia.</text:span></text:p>
      <text:p text:style-name="P124">Sed si ista non placent ex eo quod non videtur, quod ab illis habentibus eandem animam abstrahibilis, sit unus conceptus, propterea, quia non maior est convenientia essentialis inter illa quam inter Sortem et Platonem.</text:p>
      <text:p text:style-name="P124">Diceretur quod ille terminus ‘Sortes’ illa impositione facta aequivoce significat compositum ex ‘a’ et digito, et ipsum ‘a’.</text:p>
      <text:p text:style-name="P124"><text:soft-page-break/>Quibus suppostis respondetur ad secundum argumentum, quod argumentum cogit illam ex vi sermonis concedere: “Petrus non erit cras”, cum ille syllogismus expositorius debite sit formatus, et praemissae sunt verae in rigore logices. De minore notum <text:s/>est, et de maiore probatur, quia bene sequitur ‘a’ non erit cras; ergo aggregatum ex ‘a’ et ‘b’ non erit cras, quia cum totum sit omnes suae partes simul sumptae, non potest esse quin sit omnes suae partes si, aut aliqua eius pars non est iam, <text:s/>non omnes suae partes sunt. Physicaliter <text:span text:style-name="T148">tamen loquendo et etiam vulgariter, solet negari illa: “Petrus non erit cras”, quia illud quod hodie dicitur Petrus </text:span><text:span text:style-name="T149">et quod cras dicetur Petrus esse idem Petrus numero civiliter et vulgariter loquendo, cum modo loquendi quo physicus utitur, utendo negaretur maior sensus, enim maioris daretur iste quod nihil quod est idem secundo ver tertio modo huic aggregato eris cras.</text:span></text:p>
      <text:p text:style-name="P457"><text:span text:style-name="T687">[</text:span><text:span text:style-name="T598">cxliiii.vb 333b</text:span><text:span text:style-name="T687">]</text:span></text:p>
      <text:h text:style-name="Heading_20_3" text:outline-level="3">Rationalis ha<text:span text:style-name="T183">e</text:span>c anima</text:h>
      <text:h text:style-name="Heading_20_3" text:outline-level="3">Aliquis homo damnabitur qui nunquam peccavit</text:h>
      <text:h text:style-name="Heading_20_3" text:outline-level="3">Aliquis <text:span text:style-name="T694">C</text:span>hristianus non est baptizatus</text:h>
      <text:p text:style-name="P126">Et consimiliter dicendum est ad aliam argumentationem quod ipsa cogit conclusionem concedere de vi sermonis. Et cum dicitur quod conclusio est haeretica et probatur, quia habetur in symbolo omnes homines resurgere habent cum corporibus suis. Dico quod sensus theologicus est omnis anima rationalis hominis in dei iudicii informabit corpus aliquod quod, equivalenter et vulgariter loquendo, dicetur corpus quod habet nunc. Et similiter diceretur ad aliqua alia quae possent inferri, quia tunc aliquis homo damnabitur qui numquam peccavit, quod et verum est de vi sermo, satis tamen est quod eius voluntas peccavit, manet eadem anima quae principaliter laudanda est vituperanda est pro bono vel malo. Si inferatur etiam quod tu non est baptizatus si intelligatur quod corpus hoc quod nunc habes non sit aqua baptismali aspersum, <text:span text:style-name="T150">concedendum est de vi sermonis, sed non sequitur quod sis </text:span><text:span text:style-name="T695">C</text:span><text:span text:style-name="T150">hristianus quia habes caracterem chistianitatis a quo caracter homo dicitur </text:span><text:span text:style-name="T695">C</text:span><text:span text:style-name="T150">hristianus, denominatione extrinseca, quia sicut homo dicitur sciens, quia habet scientiam animae inhaerentem ei ita baptizatus a caractere baptismali animae inhaerente. Consimiliter de mulis aliis posset dici. Unde multis propositionibus quae possent adduci quae prima facie videntur periculose, dicendum est quod sunt periculose in sensu quem intendunt eas negantes, non tamen in sensu rigoroso quem illi non praetendunt, neque est praetendendus quan</text:span><text:span text:style-name="T151">do argumenta illam difficultatem non petunt. Ista licet aliquo modo excedentia metas logices dico propter aliquod dicentes se esse logicos trepidantes timore, ubi non est timor de qua materia alibi magis dicam deo dante.</text:span></text:p>
      <text:h text:style-name="Heading_20_3" text:outline-level="3">Aliquis homo est ubique qui <text:span text:style-name="T184">non est ubique homo</text:span></text:h>
      <text:h text:style-name="Heading_20_3" text:outline-level="3">Aliquis homo est in bursa mea qui non habet pedes in bursa mea</text:h>
      <text:p text:style-name="P128">Ad aliam rationem concedo quod aliquis homo est ubique, scilicet, filius <text:span text:style-name="T185">D</text:span>ei, sed non est ubique homo, quia non ubique habet caput, et sic concedendum est quod aliquis homo est in bursa mea, qui non habet pedes in bursa mea.</text:p>
      <text:p text:style-name="P127">Et si quaeras an careat pedibus in bursa mea. Dico quod sic, quia non habet pedes in bursa mea, et natus est habere pedes in bursa mea; igitur caret pedibus in bursa mea.</text:p>
      <text:p text:style-name="P127">Ad alias tres conceduntur conclusiones illae.</text:p>
      <text:h text:style-name="Heading_20_3" text:outline-level="3"><text:soft-page-break/>Adam fuit primus homo et ipse non fuit homo primus</text:h>
      <text:p text:style-name="P127">Et cum dicitur contra tertiam quod Adam fuit primus homo. Conceditur, sed non fuit homo primus. In prima, enim, denotatur prioritas humanitatis in alia vero illius rei, qua dicitur homo, <text:span text:style-name="T152">modo illa res quae dicitur homo. Puta filius Dei praecessit Adam, licet aliter dicitur homo quam Adam, qui Adam dicitur homo, quia est humanitas. Sed Deus dicitur homo quia habet humanitatem.</text:span></text:p>
      <text:p text:style-name="P129">Ad aliam dicitur quod non bene arguitur, nam arguitur a minus amplo ad magis amplum, cum distributione magis ampli, ex parte de ly ‘nigrum’.</text:p>
      <text:p text:style-name="P129">Et si dicas, saltem, ista consequentia est bona: “Iste paries erit non niger, iste paries erit niger; ergo non niger erit niger”.</text:p>
      <text:p text:style-name="P129">Dico quod etiam arguitur a minus amplo ad magis amplum, cum distributione magis ampli.</text:p>
      <text:p text:style-name="P129">Dico praeterea, quod consequentia est bona et sicut consequens est impossibile, ita et totale antecedens ex eo quod praemissae sunt incompossibiles.</text:p>
      <text:p text:style-name="P129">Ad aliam dicitur quam conclusio est concedenda. Unde sicut patet ex appellationibus concedendum est quod corpus <text:span text:style-name="T153">Christi in Eucharistia virgo beata genuit, sed non genuit corpus Christi in Eucharistia.</text:span></text:p>
      <text:p text:style-name="P458">Ad aliam dicitur quod non recte concluditur, sed deberet concludi hoc continuum fuit iste binarius existens Romae. Si enim sensus illius maioris: “iste binarius fuit Romae”, sit “iste binarius fuit iste binarius existens Romae”, id debet esse praediatum conclusionis. Unde in proposito concedente sunt istae propositiones: <text:s/>“<text:span text:style-name="T154">hoc continuum fuit entia Romae”, “hoc continuum fuit continua Romae”. Et istae negandae: “hoc continuum fuit ens Romae”, “hoc continuum fuit continuum Romae”.</text:span></text:p>
      <text:p text:style-name="P459"><text:span text:style-name="T688">[</text:span><text:span text:style-name="T598">cxlv.ra 334a</text:span><text:span text:style-name="T688">]</text:span></text:p>
      <text:p text:style-name="P130">Ad aliam respondeo: si in illa conclusione Sortes inquantum Sortes currit ly ‘inquantum Sortes’, se teneat a parte subiecti, ita quod subiectum sit totum hoc Sortes inquantum Sortes, quemadmodum est praedicatum minoris, bene sequitur. Et si praemissae sint verae, ita et conclusio dicitur vera. Si vero ly ‘inquantum Sortes’ in conclusione se teneat a parte praedicati, ita quod praedicatum <text:span text:style-name="T155">sit istud currens inquantum Sortes, patet quod non bene arguitur quia non deberet praedicari, nisi ly ‘currens’ et praedicatur totum hoc currens inquantum Sortes.</text:span></text:p>
      <text:h text:style-name="Heading_20_3" text:outline-level="3">Quomodo resolvitur propositio indefinita</text:h>
      <text:p text:style-name="P131"><text:span text:style-name="T155">Et sic patet quid sit dicendum de utilissimo modo arguendi, qui syllogismus expositorius dicitur. Aut etiam resolutorius. Resolvitur enim per ipsum propositio indefinita, hoc pacto: “hoc currit, hoc est homo; ergo homo currit”. Etiam particularis hoc </text:span><text:span text:style-name="T156">modo: “hoc currit, hoc aliquis homo est; ergo aliquis homo currit”. Etiam propositio singularis non demonstrativa resolvitur per duo pronomina demonstrativa, sic dicendo: “hoc currit, hoc est Sortes; ergo Sortes currit”. Ampliatio optime declaratur resolutorio, sic arguendo: “hoc disputabit, hoc est vel erit homo; ergo homo disputabit”. Et propositiones de obliquis ut sic dicendo: “huius est asinus, hoc est homo; ergo hominis est asinus”, et ita in aliis casibus propositiones etiam de adverbiis possunt illo pacto declarari sic arguendo: “tunc disputabis, tunc est vel erit cras; ergo cras disputabis”. Et de multis aliis, ex tota deductione, patere potest.</text:span></text:p>
      <text:p text:style-name="P131"/>
      <text:p text:style-name="P361"><text:soft-page-break/>Finis noni capituli. Incipit decimum.</text:p>
      <text:h text:style-name="P571" text:outline-level="1">Capitulum decimum: <text:span text:style-name="T707">D</text:span>e <text:span text:style-name="T707">D</text:span>escensu</text:h>
      <text:p text:style-name="P364"><text:span text:style-name="T592">[</text:span>cxlv.ra 334a<text:span text:style-name="T592">]</text:span></text:p>
      <text:p text:style-name="P355">In hoc decimo capitulo de aptissima disputationis argumentatione quae descensus dicitur conveniens est pertractare, in quod talis conclusio proponitur descendenda.</text:p>
      <text:h text:style-name="Heading_20_3" text:outline-level="3">Omnis descensus debite factus est bona consequentia</text:h>
      <text:p text:style-name="P356">Omnis descensus debite factus est bona consequentia, et e converso.</text:p>
      <text:p text:style-name="P356">Omnis ascensus debite factus est bona consequentia.</text:p>
      <text:p text:style-name="P357">Haec conclusio probatur quia si descensus non concedatur, bona consequentia et similiter ascensus, periret omnis modus cognoscendi veritatem propositiones ex parte suppositionis.</text:p>
      <text:p text:style-name="P358">Veritas enim propositionis in qua est distributio, per descensum copulativum agnoscitur.</text:p>
      <text:p text:style-name="P358">Et propositionis in qua est terminus supponens determinate, per descensum disiuntivum.</text:p>
      <text:p text:style-name="P359">Et termini supponentis confuse tamtum, per descensum disiunctum vel copulatum.</text:p>
      <text:p text:style-name="P360"><text:span text:style-name="T577">Q</text:span>uid enim aliud est terminum distribui quam accipi pro suis significatis copulative, <text:span text:style-name="T577">e</text:span><text:span text:style-name="T575">t terminum supponere determinate quam accipi per suis significatis dis</text:span><text:span text:style-name="T576">i</text:span><text:span text:style-name="T575">un</text:span><text:span text:style-name="T576">c</text:span><text:span text:style-name="T575">tive. </text:span>Illam ergo acceptionem explicare est descendere.</text:p>
      <text:p text:style-name="P357">Si igitur negetur descensus nihil solidum remanet ad cognoscendam veritatem propositionis ex parte suppositionis.</text:p>
      <text:p text:style-name="P527"><text:span text:style-name="T578">De bonitate ascensus patet per Aristotelem secundo Priorum, qui inductionem ponit esse bonam consequentiam. </text:span><text:span text:style-name="T579">Inductio autem quidam ascensus est ad terminum distributum, et sicut ad illum valet consequentia. Ita etiam ad alios supponentes, confuse tamtum vel determinate, consimili ratione valet ascensus.</text:span></text:p>
      <text:p text:style-name="P483">Ex ista declaratione patet quod cum ominis descensus sit copulativus vel disiunctivus, copulatus vel disiunctus.</text:p>
      <text:p text:style-name="P484">Sub termino supponente discrete non potest fieri descensus. Descensus enim consequentia est a termino communiter accepto ad eius singularia.</text:p>
      <text:p text:style-name="P484"><text:span text:style-name="T593">[</text:span>cxlv.rb 334b<text:span text:style-name="T593">]</text:span></text:p>
      <text:p text:style-name="P484">Ideo in ista argumentatione non est descensus licet sit bona consequentia:</text:p>
      <text:p text:style-name="P482">Isti homines currunt; ergo iste homo currit, et iste homo currit.</text:p>
      <text:p text:style-name="P528">Si en<text:span text:style-name="T580">im demonstrarem tres homines ly ‘homines’ tantum supponit pro illis tribus coniunctim, et pro nullo eorum divisim supponit, cum de nullo eorum verificetur.</text:span></text:p>
      <text:p text:style-name="P529">Neque valet dicere quod capiendo ly ‘iste’ divisive ibi est descensus, quia ut alias dictum est, tunc capitur loco unius copulative, scilicet istius: “iste homo currit, et iste homo currit, et iste homo currit”, et qualitercumque fiat non potest salvare quod fiat descensus de ly ‘homines’ per istud singulare ‘iste homo’, cum non verificetur de illo singulari qualitercumque accipiatur ly ‘homines’.</text:p>
      <text:h text:style-name="Heading_20_3" text:outline-level="3"><text:soft-page-break/>Omne currens est asinus</text:h>
      <text:p text:style-name="P530">Contra istam conclusionem arguitur primo sic: non sequitur: “omnem currens est asinus; ergo hoc currens est asinus, et hoc currens est asinus”, casu positio quod soli homines currant <text:span text:style-name="T581">et in consequente demonstrantur homines, et tamen est descensus, puta copulativus. Igitur non omnis descensus est bona consequentia. Maior probatur quia antecedens illius consequentiae est possibile et consequens impossibile.</text:span></text:p>
      <text:p text:style-name="P538">Et consimiliter arguitur quod ascensus non semper sit bona consequentia, quia non sequitur: “hoc currens non est asinus, et hoc currens non est asinus et sic de aliis; ergo nullum currens est asinus”, posito quod soli homines current et illi demonstratur. Cum antecedens sit necessarium et consequens contingens; igitur non omnis ascensus est bona consequentia.</text:p>
      <text:h text:style-name="Heading_20_3" text:outline-level="3">Aliqua universalis est possibilis cuius quaelibet singularis est impossibilis</text:h>
      <text:p text:style-name="P531">Pro solutione sciendum est quod non est inconveniens aliquam universalem esse possibilem cuius quaelibet singularis est impossibilis. <text:span text:style-name="T582">Patet de ista propositione: “omne currens est asinus”, posito quod soli homines currant illa enim est possibilis, et tamen quaelibet singularis est impossibilis.</text:span></text:p>
      <text:p text:style-name="P532">Similiter ista: “omne quod demonstratur est asinus”, posito casu quod solus homo demonstretur est possibilis et tamen quaelibet singularis est impossibilis.</text:p>
      <text:p text:style-name="P532">Etiam aliqua universalis est impossibilis cuius quaelibet singularis est possibilis, ut pate de ista: “omne instans est corruptum”, quam est possibilis naturaliter loquendo, et tamen quaelibet singularis est possibilis.</text:p>
      <text:h text:style-name="Heading_20_3" text:outline-level="3">Aliqua universalis est necessaria cuius quaelibet singularis est contingens</text:h>
      <text:p text:style-name="P533"><text:span text:style-name="T583">Etiam non est inconveniens dare aliquam universalem necessariam, cuius quaelibet singularis est contingens ut ista est necessaria secundum Aristotelem: “omnis homo est”, et </text:span><text:span text:style-name="T584">tamen</text:span><text:span text:style-name="T583"> quaelibet singularis est contingens.</text:span></text:p>
      <text:p text:style-name="P534">Etiam non est inconveniens dare aliquam <text:span text:style-name="T585">universalem contingentem cuius quaelibet singularis est necessaria, ut patet de ista: “omne ens est Deus”, posito quod solus Deus sit, ipsa enim est contingens et tamen quaelibet eius singularis est necessaria, cum non habeat nisi istam: “hoc ens est Deus”.</text:span></text:p>
      <text:p text:style-name="P535">Similiter ista: “nullum animal est asinus”, posito quod solus homo sit, est contingens, et tamen quaelibet singularis est necessaria. Demonstrato enim quolibet homine <text:span text:style-name="T586">ista est necessaria: “hoc animal non est homo, et quaelibet alia”.</text:span></text:p>
      <text:h text:style-name="Heading_20_3" text:outline-level="3">Cuiuslibet universalis verae singulares sunt verae extra insolubilia</text:h>
      <text:p text:style-name="P536">Sed dare aliquam universalem veram cuius singulares sint falsae extra insolubilium materiam non est possibile neque e converso, sicut dat quidam doctor <text:span text:style-name="T594">&lt;Petrus de Aliaco&gt;</text:span> istam: “neutrum contradictoriorum contingentium necessario est verum”, quam dicit esse falsam eo quod sua contradictoria est vera, <text:span text:style-name="T587">s</text:span>cilicet, ista alteratum contradictoriorum contingentium necessario est verum, et tamen quaelibet singularis est vera.</text:p>
      <text:h text:style-name="Heading_20_3" text:outline-level="3"><text:soft-page-break/>Neutrum contradictoriorum contingentium necessario est esse verum</text:h>
      <text:p text:style-name="P537">Sed dico: istam esse veram: “neutrum contradictoriorum contingentium necessario est verum”, bene enim sequitur: “nullum contingens necessario est verum, utrumque contradictoriorum contingentium est contingens; ergo neutrum contradictoriorum contingentium necessario est verum”, consequentia est in Celarent et praemissae sunt verae, igitur et conclusio.</text:p>
      <text:p text:style-name="P543">[cxlv.va 335a]</text:p>
      <text:p text:style-name="P537">Ideo dico illam esse veram et singulares eius esse veras. Similiter suam contradictoriam esse falsam et quamlibet eius singularem esse falsam.</text:p>
      <text:p text:style-name="P539">Sed dare aliquam universalem quae potest esse vera, cuius singulares non possunt esse verae, non est inconveniens, ut ista propositio: “nullum ens demonstratur” potest esse vera, et tamen singulares saltem de propositionibus demonstrativis loquendo de mentalibus non possunt esse verae, scilicet, istae: “hoc ens non demonstratur”, et “hoc ens non demonstratur”. <text:span text:style-name="T588">Si enim illae sunt verae, iam per ly ‘hoc’ aliquid demonstratur et ita sunt falsae.</text:span></text:p>
      <text:p text:style-name="P540">Nec tamen propterea probaretur illum descensum. <text:span text:style-name="T589">Non esse bonam consequentiam: “nullum ens demonstratur; ergo hoc ens non demonstratur, et hoc ens non demonstratur, et sic de aliis”, ut dictum est in regulis generalibus consequentiarum non est inconveniens quod sit aliqua bona consequentia, cuius antecedens potest esse verum et consequens non potest esse verum, sumendo antecedens et consequens per ipsis propositionibus et non pro significatis. Nec tamen est admittendum quod sit antecedens verum et consequens falsum, si enim illud antecedens sit verum consequens non erit, et ita non erit falsum.</text:span></text:p>
      <text:p text:style-name="P541">Ut deductum est de singularibus ex parte termini distributi, sic etiam deduci posset de singularibus ex parte termini supponentis determinate. Et si enim non sit dabilis propositio de termino supponente determinate verae, cuius quaelibet singularis est falsa, dabilis est tamen aliqua necessaria cuius quaelibet singularis est contingens, ut ista es necessaria. Ita est sicut per alterum contradictorium contingentium significatur. Illa enim est necessaria et tamen quaelibet singularis est contingens descendendo ex parte de ly ‘alterum’, et ita posset deduci in aliis, sicut deductum est de propositione universalis.</text:p>
      <text:p text:style-name="P542">Et notanter fuit appositum de singularibus termini supponentis determinate, quia ex parte termini supponentis confus<text:span text:style-name="T591">e</text:span><text:span text:style-name="T590"> tantum bene datur indefinita vera, cuius singulares sunt falsae. Ut ista est vera: “</text:span><text:span text:style-name="T400">a</text:span><text:span text:style-name="T590"> homo non est animal”, et quaelibet singularis est falsa sumpta ex parte de ly ‘homo’, et ratio est quia non oportet illam reddi veram, ex parte alicuius singularis, in ordine ad distributionem, cum talis </text:span><text:span text:style-name="T591">sit natura suppositionis confuse tantum.</text:span></text:p>
      <text:h text:style-name="Heading_20_3" text:outline-level="3">Aliqua universalis est possibilis cuius cuius quaelibet singularis est impossibilis</text:h>
      <text:p text:style-name="P553">Sed contra praedicta obiiceret aliquis quod non omnis descensus sit bona consequentia, et similiter ascensus, quia tunc ex necessario sequeretur contingens et ex possibili impossibile, cum enim ex universali inferentur singulares per descensum si universalis sit possibilis et singulares impossibiles, tunc ex possibili sequeretur impossibile.</text:p>
      <text:h text:style-name="P576" text:outline-level="3"><text:soft-page-break/>Aliqua universalis est necessaria cuius quaelibet singularis est contingens</text:h>
      <text:p text:style-name="P545">Similiter, si universalis sit necessaria et singulares contingentes tunc ex necessario sequeretur contingens.</text:p>
      <text:p text:style-name="P546">Respondeo: <text:s/><text:span text:style-name="T596">ex talibus universalibus non inferuntur singulares nisi cum aliqua additione posita in antecedente sicut debet fieri in descensu quae vocatur constantia vel medium antiquum. Unde constantia est propositio de secundo adiacente sive sit de ly ‘est’, de ly ‘fuit’, aut de ly ‘erit’, aut etiam de ly ‘potest’. Et non praecise propositio de est secundo adiacente, sicut communiter dicitur.</text:span></text:p>
      <text:p text:style-name="P547">Constantia igitur, singularium descensu aut etiam in ascensu, est subiectum et residuum est copula de secundo adiacente.</text:p>
      <text:p text:style-name="P547">Sed medium antiquum est propositio de tertio adiacente, in qua subiicitur pronomen demonstrativum primitivae speciei in plurali numero demonstrans. Significata termini sub quod descenditur. Et praedicatum est aggregatum ex illo termino sumpto pluraliter et signo collectivo sibi addito.</text:p>
      <text:p text:style-name="P548">Dico igitur quod ponendo constantiam in antecedente, ita quod sit pars antecedentis, bene fit descensus, ut sic dicendo:</text:p>
      <text:p text:style-name="Quotations">“omne currens est asinus, et ista sunt omnia currens; ergo istud currens est asinus, et istud currens est asinus et illud currens est asinus.”</text:p>
      <text:p text:style-name="P549">Vel isto modo: </text:p>
      <text:p text:style-name="Quotations">“omne currens est asinus, et istud currens est, et istud currens est; ergo hoc currens est asinus, et hoc currens est asinus.”,</text:p>
      <text:p text:style-name="P550">et tunc totale antecedens est impossibile eo quod una pars est alteri incompossibilis.</text:p>
      <text:p text:style-name="P550"><text:span text:style-name="T595">[cxlv.v</text:span>b<text:span text:style-name="T595"> 335</text:span>b<text:span text:style-name="T595">]</text:span></text:p>
      <text:p text:style-name="P551">Sed contra quia etiam posita constantia non est bonus///</text:p>
      <text:p text:style-name="P536"/>
      <text:p text:style-name="P536"/>
      <text:p text:style-name="P532"/>
      <text:p text:style-name="P532"/>
      <text:p text:style-name="P531"/>
      <text:p text:style-name="P483"/>
      <text:p text:style-name="P483"/>
      <text:p text:style-name="P483"/>
      <text:p text:style-name="P483"/>
      <text:p text:style-name="P483"/>
      <text:p text:style-name="P483"/>
      <text:h text:style-name="Heading_20_2" text:outline-level="2"><text:soft-page-break/>De relativo reciproco</text:h>
      <text:p text:style-name="P35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la" fo:country="V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91237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mment" style:family="paragraph" style:parent-style-name="Standard" style:class="extra">
      <style:text-properties fo:font-size="10pt" style:font-size-asian="10pt" style:font-size-complex="10pt"/>
    </style:style>
    <style:style style:name="Emphasis" style:family="text">
      <style:text-properties fo:font-style="italic"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20:39:21.354766648</meta:creation-date>
    <meta:generator>LibreOffice/24.2.7.2$Linux_X86_64 LibreOffice_project/420$Build-2</meta:generator>
    <dc:date>2026-05-11T13:36:50.727479599</dc:date>
    <meta:editing-duration>P5DT18H15M28S</meta:editing-duration>
    <meta:editing-cycles>1903</meta:editing-cycles>
    <meta:document-statistic meta:table-count="0" meta:image-count="1" meta:object-count="0" meta:page-count="83" meta:paragraph-count="961" meta:word-count="34974" meta:character-count="240436" meta:non-whitespace-character-count="206344"/>
  </office:meta>
</office:document-meta>
</file>