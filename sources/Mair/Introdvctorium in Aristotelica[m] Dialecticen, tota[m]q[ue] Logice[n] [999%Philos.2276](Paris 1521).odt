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fo:language="la" fo:country="VA"/>
    </style:style>
    <style:style style:name="P2" style:family="paragraph" style:parent-style-name="Text_20_body">
      <style:paragraph-properties fo:break-before="page"/>
      <style:text-properties fo:language="la" fo:country="VA"/>
    </style:style>
    <style:style style:name="P3" style:family="paragraph" style:parent-style-name="Text_20_body">
      <style:paragraph-properties fo:text-align="start" style:justify-single-word="false"/>
      <style:text-properties fo:language="la" fo:country="VA" officeooo:rsid="060cb700" officeooo:paragraph-rsid="060cb700"/>
    </style:style>
    <style:style style:name="P4" style:family="paragraph" style:parent-style-name="Text_20_body">
      <style:paragraph-properties fo:text-align="start" style:justify-single-word="false"/>
      <style:text-properties fo:language="la" fo:country="VA" officeooo:rsid="063b0672" officeooo:paragraph-rsid="063b0672"/>
    </style:style>
    <style:style style:name="P5" style:family="paragraph" style:parent-style-name="Text_20_body">
      <style:text-properties fo:language="la" fo:country="VA" officeooo:rsid="07235820" officeooo:paragraph-rsid="07235820"/>
    </style:style>
    <style:style style:name="P6" style:family="paragraph" style:parent-style-name="Text_20_body">
      <style:paragraph-properties fo:text-align="start" style:justify-single-word="false"/>
      <style:text-properties fo:language="la" fo:country="VA" officeooo:rsid="0896b68d" officeooo:paragraph-rsid="0896b68d"/>
    </style:style>
    <style:style style:name="P7" style:family="paragraph" style:parent-style-name="Standard">
      <style:paragraph-properties fo:margin-left="0.5in" fo:margin-right="0in" fo:text-indent="0in" style:auto-text-indent="false"/>
      <style:text-properties fo:language="la" fo:country="VA"/>
    </style:style>
    <style:style style:name="P8" style:family="paragraph" style:parent-style-name="Standard">
      <style:paragraph-properties fo:margin-left="0.5in" fo:text-indent="0in" style:auto-text-indent="false"/>
      <style:text-properties fo:language="la" fo:country="VA"/>
    </style:style>
    <style:style style:name="P9" style:family="paragraph" style:parent-style-name="Standard">
      <style:paragraph-properties fo:margin-left="0in" fo:margin-right="0in" fo:text-indent="0in" style:auto-text-indent="false"/>
      <style:text-properties fo:language="la" fo:country="VA"/>
    </style:style>
    <style:style style:name="P10" style:family="paragraph" style:parent-style-name="Standard">
      <style:text-properties fo:language="la" fo:country="VA"/>
    </style:style>
    <style:style style:name="P11" style:family="paragraph" style:parent-style-name="Subtitle">
      <style:paragraph-properties fo:text-align="start" style:justify-single-word="false"/>
      <style:text-properties fo:language="la" fo:country="VA"/>
    </style:style>
    <style:style style:name="P12" style:family="paragraph" style:parent-style-name="Subtitle">
      <style:paragraph-properties fo:text-align="start" style:justify-single-word="false"/>
      <style:text-properties fo:language="la" fo:country="VA" officeooo:paragraph-rsid="096cc3b4"/>
    </style:style>
    <style:style style:name="P13" style:family="paragraph" style:parent-style-name="Subtitle">
      <style:paragraph-properties fo:text-align="start" style:justify-single-word="false"/>
      <style:text-properties fo:language="la" fo:country="VA" officeooo:paragraph-rsid="0800a2ab"/>
    </style:style>
    <style:style style:name="P14" style:family="paragraph" style:parent-style-name="Subtitle">
      <style:paragraph-properties fo:margin-left="0in" fo:text-align="start" style:justify-single-word="false" fo:text-indent="0in" style:auto-text-indent="false"/>
      <style:text-properties fo:language="la" fo:country="VA"/>
    </style:style>
    <style:style style:name="P15" style:family="paragraph" style:parent-style-name="Text_20_body">
      <style:paragraph-properties fo:text-align="start" style:justify-single-word="false"/>
      <style:text-properties fo:language="la" fo:country="VA" officeooo:paragraph-rsid="0650da7c"/>
    </style:style>
    <style:style style:name="P16" style:family="paragraph" style:parent-style-name="Text_20_body">
      <style:paragraph-properties fo:text-align="start" style:justify-single-word="false"/>
      <style:text-properties fo:language="la" fo:country="VA" officeooo:paragraph-rsid="06342d7f"/>
    </style:style>
    <style:style style:name="P17" style:family="paragraph" style:parent-style-name="Text_20_body">
      <style:paragraph-properties fo:text-align="start" style:justify-single-word="false"/>
      <style:text-properties fo:language="la" fo:country="VA" officeooo:paragraph-rsid="096f5044"/>
    </style:style>
    <style:style style:name="P18" style:family="paragraph" style:parent-style-name="Text_20_body">
      <style:paragraph-properties fo:text-align="start" style:justify-single-word="false"/>
      <style:text-properties fo:language="la" fo:country="VA" officeooo:paragraph-rsid="06731ecb"/>
    </style:style>
    <style:style style:name="P19" style:family="paragraph" style:parent-style-name="Text_20_body">
      <style:paragraph-properties fo:text-align="start" style:justify-single-word="false"/>
      <style:text-properties fo:language="la" fo:country="VA" officeooo:paragraph-rsid="0693dc55"/>
    </style:style>
    <style:style style:name="P20" style:family="paragraph" style:parent-style-name="Text_20_body">
      <style:paragraph-properties fo:text-align="start" style:justify-single-word="false"/>
      <style:text-properties fo:language="la" fo:country="VA" officeooo:paragraph-rsid="0694dd0f"/>
    </style:style>
    <style:style style:name="P21" style:family="paragraph" style:parent-style-name="Text_20_body">
      <style:paragraph-properties fo:text-align="start" style:justify-single-word="false"/>
      <style:text-properties fo:language="la" fo:country="VA" officeooo:paragraph-rsid="06d91cf3"/>
    </style:style>
    <style:style style:name="P22" style:family="paragraph" style:parent-style-name="Text_20_body">
      <style:paragraph-properties fo:text-align="start" style:justify-single-word="false"/>
      <style:text-properties fo:language="la" fo:country="VA" officeooo:paragraph-rsid="0704ecab"/>
    </style:style>
    <style:style style:name="P23" style:family="paragraph" style:parent-style-name="Text_20_body">
      <style:paragraph-properties fo:text-align="start" style:justify-single-word="false"/>
      <style:text-properties fo:language="la" fo:country="VA" officeooo:paragraph-rsid="07555e1a"/>
    </style:style>
    <style:style style:name="P24" style:family="paragraph" style:parent-style-name="Text_20_body">
      <style:paragraph-properties fo:text-align="start" style:justify-single-word="false"/>
      <style:text-properties fo:language="la" fo:country="VA" officeooo:paragraph-rsid="0788f325"/>
    </style:style>
    <style:style style:name="P25" style:family="paragraph" style:parent-style-name="Text_20_body">
      <style:paragraph-properties fo:text-align="start" style:justify-single-word="false"/>
      <style:text-properties fo:language="la" fo:country="VA" officeooo:paragraph-rsid="078d1def"/>
    </style:style>
    <style:style style:name="P26" style:family="paragraph" style:parent-style-name="Text_20_body">
      <style:paragraph-properties fo:text-align="start" style:justify-single-word="false"/>
      <style:text-properties fo:language="la" fo:country="VA" officeooo:paragraph-rsid="07959121"/>
    </style:style>
    <style:style style:name="P27" style:family="paragraph" style:parent-style-name="Text_20_body">
      <style:paragraph-properties fo:text-align="start" style:justify-single-word="false"/>
      <style:text-properties fo:language="la" fo:country="VA" officeooo:paragraph-rsid="0796c75c"/>
    </style:style>
    <style:style style:name="P28" style:family="paragraph" style:parent-style-name="Text_20_body">
      <style:paragraph-properties fo:text-align="start" style:justify-single-word="false"/>
      <style:text-properties fo:language="la" fo:country="VA" officeooo:paragraph-rsid="07972a08"/>
    </style:style>
    <style:style style:name="P29" style:family="paragraph" style:parent-style-name="Title">
      <style:paragraph-properties fo:text-align="start" style:justify-single-word="false"/>
      <style:text-properties fo:language="la" fo:country="VA" officeooo:paragraph-rsid="08a3e430"/>
    </style:style>
    <style:style style:name="P30" style:family="paragraph" style:parent-style-name="Subtitle">
      <style:paragraph-properties fo:text-align="start" style:justify-single-word="false"/>
      <style:text-properties fo:language="la" fo:country="VA" officeooo:paragraph-rsid="0b69380d"/>
    </style:style>
    <style:style style:name="P31" style:family="paragraph" style:parent-style-name="Subtitle">
      <style:paragraph-properties fo:text-align="start" style:justify-single-word="false"/>
      <style:text-properties fo:language="la" fo:country="VA" officeooo:paragraph-rsid="0bf5e157"/>
    </style:style>
    <style:style style:name="P32" style:family="paragraph" style:parent-style-name="Subtitle">
      <style:text-properties fo:language="la" fo:country="VA"/>
    </style:style>
    <style:style style:name="P33" style:family="paragraph" style:parent-style-name="Subtitle">
      <style:paragraph-properties fo:text-align="start" style:justify-single-word="false"/>
      <style:text-properties fo:language="la" fo:country="VA" officeooo:rsid="098221dd"/>
    </style:style>
    <style:style style:name="P34" style:family="paragraph" style:parent-style-name="Subtitle">
      <style:paragraph-properties fo:text-align="start" style:justify-single-word="false"/>
      <style:text-properties fo:language="la" fo:country="VA" officeooo:rsid="0675f75f"/>
    </style:style>
    <style:style style:name="P35" style:family="paragraph" style:parent-style-name="Subtitle">
      <style:text-properties fo:language="la" fo:country="VA" officeooo:rsid="067edbd2" officeooo:paragraph-rsid="067edbd2"/>
    </style:style>
    <style:style style:name="P36" style:family="paragraph" style:parent-style-name="Subtitle">
      <style:paragraph-properties fo:text-align="start" style:justify-single-word="false"/>
      <style:text-properties fo:language="la" fo:country="VA" officeooo:rsid="067edbd2" officeooo:paragraph-rsid="067edbd2"/>
    </style:style>
    <style:style style:name="P37" style:family="paragraph" style:parent-style-name="Subtitle">
      <style:text-properties fo:language="la" fo:country="VA" officeooo:rsid="07083d10" officeooo:paragraph-rsid="07083d10"/>
    </style:style>
    <style:style style:name="P38" style:family="paragraph" style:parent-style-name="Subtitle">
      <style:paragraph-properties fo:text-align="start" style:justify-single-word="false"/>
      <style:text-properties fo:language="la" fo:country="VA" officeooo:rsid="07083d10" officeooo:paragraph-rsid="07083d10"/>
    </style:style>
    <style:style style:name="P39" style:family="paragraph" style:parent-style-name="Subtitle">
      <style:paragraph-properties fo:text-align="start" style:justify-single-word="false"/>
      <style:text-properties fo:language="la" fo:country="VA" officeooo:rsid="08081e5c" officeooo:paragraph-rsid="08081e5c"/>
    </style:style>
    <style:style style:name="P40" style:family="paragraph" style:parent-style-name="Text_20_body">
      <style:text-properties fo:language="la" fo:country="VA"/>
    </style:style>
    <style:style style:name="P41" style:family="paragraph" style:parent-style-name="Text_20_body">
      <style:paragraph-properties fo:text-align="start" style:justify-single-word="false"/>
      <style:text-properties fo:language="la" fo:country="VA" officeooo:rsid="061976b0" officeooo:paragraph-rsid="061976b0"/>
    </style:style>
    <style:style style:name="P42" style:family="paragraph" style:parent-style-name="Text_20_body">
      <style:paragraph-properties fo:text-align="start" style:justify-single-word="false"/>
      <style:text-properties fo:language="la" fo:country="VA" officeooo:rsid="061976b0" officeooo:paragraph-rsid="062060b9"/>
    </style:style>
    <style:style style:name="P43" style:family="paragraph" style:parent-style-name="Text_20_body">
      <style:paragraph-properties fo:text-align="start" style:justify-single-word="false"/>
      <style:text-properties fo:language="la" fo:country="VA" officeooo:rsid="061c5bd8" officeooo:paragraph-rsid="061e1d46"/>
    </style:style>
    <style:style style:name="P44" style:family="paragraph" style:parent-style-name="Text_20_body">
      <style:text-properties fo:language="la" fo:country="VA" officeooo:rsid="0622a0d5" officeooo:paragraph-rsid="0622a0d5"/>
    </style:style>
    <style:style style:name="P45" style:family="paragraph" style:parent-style-name="Text_20_body">
      <style:paragraph-properties fo:text-align="start" style:justify-single-word="false"/>
      <style:text-properties fo:language="la" fo:country="VA" officeooo:rsid="0623f973" officeooo:paragraph-rsid="0623f973"/>
    </style:style>
    <style:style style:name="P46" style:family="paragraph" style:parent-style-name="Text_20_body">
      <style:paragraph-properties fo:text-align="start" style:justify-single-word="false"/>
      <style:text-properties fo:language="la" fo:country="VA" officeooo:rsid="0625cd4d" officeooo:paragraph-rsid="0625cd4d"/>
    </style:style>
    <style:style style:name="P47" style:family="paragraph" style:parent-style-name="Text_20_body">
      <style:paragraph-properties fo:text-align="start" style:justify-single-word="false"/>
      <style:text-properties fo:language="la" fo:country="VA" officeooo:rsid="06291087" officeooo:paragraph-rsid="06291087"/>
    </style:style>
    <style:style style:name="P48" style:family="paragraph" style:parent-style-name="Text_20_body">
      <style:paragraph-properties fo:text-align="start" style:justify-single-word="false"/>
      <style:text-properties fo:language="la" fo:country="VA" officeooo:rsid="0629687b" officeooo:paragraph-rsid="062b7242"/>
    </style:style>
    <style:style style:name="P49" style:family="paragraph" style:parent-style-name="Text_20_body">
      <style:paragraph-properties fo:text-align="start" style:justify-single-word="false"/>
      <style:text-properties fo:language="la" fo:country="VA" officeooo:rsid="062ac5bf" officeooo:paragraph-rsid="062ac5bf"/>
    </style:style>
    <style:style style:name="P50" style:family="paragraph" style:parent-style-name="Text_20_body">
      <style:paragraph-properties fo:text-align="start" style:justify-single-word="false"/>
      <style:text-properties fo:language="la" fo:country="VA" officeooo:rsid="062ac5bf" officeooo:paragraph-rsid="062d658b"/>
    </style:style>
    <style:style style:name="P51" style:family="paragraph" style:parent-style-name="Text_20_body">
      <style:paragraph-properties fo:text-align="start" style:justify-single-word="false"/>
      <style:text-properties fo:language="la" fo:country="VA" officeooo:rsid="0630f021" officeooo:paragraph-rsid="0630f021"/>
    </style:style>
    <style:style style:name="P52" style:family="paragraph" style:parent-style-name="Text_20_body">
      <style:paragraph-properties fo:text-align="start" style:justify-single-word="false"/>
      <style:text-properties fo:language="la" fo:country="VA" officeooo:rsid="06342d7f" officeooo:paragraph-rsid="06342d7f"/>
    </style:style>
    <style:style style:name="P53" style:family="paragraph" style:parent-style-name="Text_20_body">
      <style:text-properties fo:language="la" fo:country="VA" officeooo:rsid="060d675d" officeooo:paragraph-rsid="060d675d"/>
    </style:style>
    <style:style style:name="P54" style:family="paragraph" style:parent-style-name="Text_20_body">
      <style:paragraph-properties fo:text-align="start" style:justify-single-word="false"/>
      <style:text-properties fo:language="la" fo:country="VA" officeooo:rsid="060d675d" officeooo:paragraph-rsid="060d675d"/>
    </style:style>
    <style:style style:name="P55" style:family="paragraph" style:parent-style-name="Text_20_body">
      <style:paragraph-properties fo:text-align="start" style:justify-single-word="false"/>
      <style:text-properties fo:language="la" fo:country="VA" officeooo:rsid="060f7975" officeooo:paragraph-rsid="060f7975"/>
    </style:style>
    <style:style style:name="P56" style:family="paragraph" style:parent-style-name="Text_20_body">
      <style:text-properties fo:language="la" fo:country="VA" officeooo:rsid="0610db3e" officeooo:paragraph-rsid="0610db3e"/>
    </style:style>
    <style:style style:name="P57" style:family="paragraph" style:parent-style-name="Text_20_body">
      <style:text-properties fo:language="la" fo:country="VA" officeooo:rsid="0637c6a4" officeooo:paragraph-rsid="0637c6a4"/>
    </style:style>
    <style:style style:name="P58" style:family="paragraph" style:parent-style-name="Text_20_body">
      <style:paragraph-properties fo:text-align="start" style:justify-single-word="false"/>
      <style:text-properties fo:language="la" fo:country="VA" officeooo:rsid="063b9066" officeooo:paragraph-rsid="063b9066"/>
    </style:style>
    <style:style style:name="P59" style:family="paragraph" style:parent-style-name="Text_20_body">
      <style:paragraph-properties fo:text-align="start" style:justify-single-word="false"/>
      <style:text-properties fo:language="la" fo:country="VA" officeooo:rsid="063de4bb" officeooo:paragraph-rsid="063de4bb"/>
    </style:style>
    <style:style style:name="P60" style:family="paragraph" style:parent-style-name="Text_20_body">
      <style:paragraph-properties fo:text-align="start" style:justify-single-word="false"/>
      <style:text-properties fo:language="la" fo:country="VA" officeooo:rsid="063f678b" officeooo:paragraph-rsid="063f678b"/>
    </style:style>
    <style:style style:name="P61" style:family="paragraph" style:parent-style-name="Text_20_body">
      <style:text-properties fo:language="la" fo:country="VA" style:text-underline-style="none" officeooo:rsid="06414697" officeooo:paragraph-rsid="06414697"/>
    </style:style>
    <style:style style:name="P62" style:family="paragraph" style:parent-style-name="Text_20_body">
      <style:text-properties fo:language="la" fo:country="VA" style:text-underline-style="none" officeooo:rsid="06414697" officeooo:paragraph-rsid="064244e8"/>
    </style:style>
    <style:style style:name="P63" style:family="paragraph" style:parent-style-name="Text_20_body">
      <style:paragraph-properties fo:text-align="start" style:justify-single-word="false"/>
      <style:text-properties fo:language="la" fo:country="VA" officeooo:rsid="0645060f" officeooo:paragraph-rsid="0645060f"/>
    </style:style>
    <style:style style:name="P64" style:family="paragraph" style:parent-style-name="Text_20_body">
      <style:paragraph-properties fo:text-align="start" style:justify-single-word="false"/>
      <style:text-properties fo:language="la" fo:country="VA" officeooo:rsid="0645060f" officeooo:paragraph-rsid="06495b48"/>
    </style:style>
    <style:style style:name="P65" style:family="paragraph" style:parent-style-name="Text_20_body">
      <style:paragraph-properties fo:text-align="start" style:justify-single-word="false"/>
      <style:text-properties fo:language="la" fo:country="VA" officeooo:rsid="06495b48" officeooo:paragraph-rsid="06495b48"/>
    </style:style>
    <style:style style:name="P66" style:family="paragraph" style:parent-style-name="Text_20_body">
      <style:paragraph-properties fo:text-align="start" style:justify-single-word="false"/>
      <style:text-properties fo:language="la" fo:country="VA" officeooo:rsid="064a3f46" officeooo:paragraph-rsid="064a3f46"/>
    </style:style>
    <style:style style:name="P67" style:family="paragraph" style:parent-style-name="Text_20_body">
      <style:text-properties fo:language="la" fo:country="VA" officeooo:rsid="0910d23b" officeooo:paragraph-rsid="0910d23b"/>
    </style:style>
    <style:style style:name="P68" style:family="paragraph" style:parent-style-name="Text_20_body">
      <style:text-properties fo:language="la" fo:country="VA" officeooo:rsid="0911a9f0" officeooo:paragraph-rsid="0911a9f0"/>
    </style:style>
    <style:style style:name="P69" style:family="paragraph" style:parent-style-name="Text_20_body">
      <style:paragraph-properties fo:text-align="start" style:justify-single-word="false"/>
      <style:text-properties fo:language="la" fo:country="VA" officeooo:rsid="09176918" officeooo:paragraph-rsid="0919da7b"/>
    </style:style>
    <style:style style:name="P70" style:family="paragraph" style:parent-style-name="Text_20_body">
      <style:paragraph-properties fo:text-align="start" style:justify-single-word="false"/>
      <style:text-properties fo:language="la" fo:country="VA" officeooo:rsid="09176918" officeooo:paragraph-rsid="09632a80"/>
    </style:style>
    <style:style style:name="P71" style:family="paragraph" style:parent-style-name="Text_20_body">
      <style:paragraph-properties fo:text-align="start" style:justify-single-word="false"/>
      <style:text-properties fo:language="la" fo:country="VA" officeooo:rsid="091bbfe6" officeooo:paragraph-rsid="091bbfe6"/>
    </style:style>
    <style:style style:name="P72" style:family="paragraph" style:parent-style-name="Text_20_body">
      <style:paragraph-properties fo:text-align="start" style:justify-single-word="false"/>
      <style:text-properties fo:language="la" fo:country="VA" officeooo:rsid="091ca0c0" officeooo:paragraph-rsid="091ca0c0"/>
    </style:style>
    <style:style style:name="P73" style:family="paragraph" style:parent-style-name="Text_20_body">
      <style:paragraph-properties fo:text-align="start" style:justify-single-word="false"/>
      <style:text-properties fo:language="la" fo:country="VA" officeooo:rsid="091f5a09" officeooo:paragraph-rsid="091f5a09"/>
    </style:style>
    <style:style style:name="P74" style:family="paragraph" style:parent-style-name="Text_20_body">
      <style:paragraph-properties fo:text-align="start" style:justify-single-word="false"/>
      <style:text-properties fo:language="la" fo:country="VA" officeooo:rsid="0920f197" officeooo:paragraph-rsid="0920f197"/>
    </style:style>
    <style:style style:name="P75" style:family="paragraph" style:parent-style-name="Text_20_body">
      <style:paragraph-properties fo:text-align="start" style:justify-single-word="false"/>
      <style:text-properties fo:language="la" fo:country="VA" officeooo:rsid="0921baa8" officeooo:paragraph-rsid="092340ad"/>
    </style:style>
    <style:style style:name="P76" style:family="paragraph" style:parent-style-name="Text_20_body">
      <style:paragraph-properties fo:text-align="start" style:justify-single-word="false"/>
      <style:text-properties fo:language="la" fo:country="VA" officeooo:rsid="0921baa8" officeooo:paragraph-rsid="09277548"/>
    </style:style>
    <style:style style:name="P77" style:family="paragraph" style:parent-style-name="Text_20_body">
      <style:paragraph-properties fo:text-align="start" style:justify-single-word="false"/>
      <style:text-properties fo:language="la" fo:country="VA" officeooo:rsid="0921baa8" officeooo:paragraph-rsid="09281c81"/>
    </style:style>
    <style:style style:name="P78" style:family="paragraph" style:parent-style-name="Text_20_body">
      <style:paragraph-properties fo:text-align="start" style:justify-single-word="false"/>
      <style:text-properties fo:language="la" fo:country="VA" officeooo:rsid="0921baa8" officeooo:paragraph-rsid="0929ed22"/>
    </style:style>
    <style:style style:name="P79" style:family="paragraph" style:parent-style-name="Text_20_body">
      <style:paragraph-properties fo:text-align="start" style:justify-single-word="false"/>
      <style:text-properties fo:language="la" fo:country="VA" officeooo:rsid="09246be4" officeooo:paragraph-rsid="09246be4"/>
    </style:style>
    <style:style style:name="P80" style:family="paragraph" style:parent-style-name="Text_20_body">
      <style:text-properties fo:language="la" fo:country="VA" officeooo:rsid="09399671" officeooo:paragraph-rsid="09399671"/>
    </style:style>
    <style:style style:name="P81" style:family="paragraph" style:parent-style-name="Text_20_body">
      <style:text-properties fo:language="la" fo:country="VA" officeooo:rsid="093a0c7a" officeooo:paragraph-rsid="093a0c7a"/>
    </style:style>
    <style:style style:name="P82" style:family="paragraph" style:parent-style-name="Text_20_body">
      <style:text-properties fo:language="la" fo:country="VA" officeooo:rsid="093a82f3" officeooo:paragraph-rsid="093a82f3"/>
    </style:style>
    <style:style style:name="P83" style:family="paragraph" style:parent-style-name="Text_20_body">
      <style:text-properties fo:language="la" fo:country="VA" officeooo:rsid="093d839b" officeooo:paragraph-rsid="093d839b"/>
    </style:style>
    <style:style style:name="P84" style:family="paragraph" style:parent-style-name="Text_20_body">
      <style:text-properties fo:language="la" fo:country="VA" officeooo:rsid="093f345a" officeooo:paragraph-rsid="093f345a"/>
    </style:style>
    <style:style style:name="P85" style:family="paragraph" style:parent-style-name="Text_20_body">
      <style:text-properties fo:language="la" fo:country="VA" officeooo:rsid="094223d6" officeooo:paragraph-rsid="094223d6"/>
    </style:style>
    <style:style style:name="P86" style:family="paragraph" style:parent-style-name="Text_20_body">
      <style:paragraph-properties fo:text-align="start" style:justify-single-word="false"/>
      <style:text-properties fo:language="la" fo:country="VA" officeooo:rsid="0943b9e6" officeooo:paragraph-rsid="0943b9e6"/>
    </style:style>
    <style:style style:name="P87" style:family="paragraph" style:parent-style-name="Text_20_body">
      <style:paragraph-properties fo:text-align="start" style:justify-single-word="false"/>
      <style:text-properties fo:language="la" fo:country="VA" officeooo:rsid="0943e45f" officeooo:paragraph-rsid="0943e45f"/>
    </style:style>
    <style:style style:name="P88" style:family="paragraph" style:parent-style-name="Text_20_body">
      <style:paragraph-properties fo:text-align="start" style:justify-single-word="false"/>
      <style:text-properties fo:language="la" fo:country="VA" officeooo:rsid="0945974e" officeooo:paragraph-rsid="0945974e"/>
    </style:style>
    <style:style style:name="P89" style:family="paragraph" style:parent-style-name="Text_20_body">
      <style:paragraph-properties fo:text-align="start" style:justify-single-word="false"/>
      <style:text-properties fo:language="la" fo:country="VA" officeooo:rsid="09471594" officeooo:paragraph-rsid="09471594"/>
    </style:style>
    <style:style style:name="P90" style:family="paragraph" style:parent-style-name="Text_20_body">
      <style:paragraph-properties fo:text-align="start" style:justify-single-word="false"/>
      <style:text-properties fo:language="la" fo:country="VA" officeooo:rsid="0947ade6" officeooo:paragraph-rsid="0947ade6"/>
    </style:style>
    <style:style style:name="P91" style:family="paragraph" style:parent-style-name="Text_20_body">
      <style:paragraph-properties fo:text-align="start" style:justify-single-word="false"/>
      <style:text-properties fo:language="la" fo:country="VA" officeooo:rsid="094e3e6b" officeooo:paragraph-rsid="094e3e6b"/>
    </style:style>
    <style:style style:name="P92" style:family="paragraph" style:parent-style-name="Text_20_body">
      <style:text-properties fo:language="la" fo:country="VA" officeooo:rsid="0950db46" officeooo:paragraph-rsid="0950db46"/>
    </style:style>
    <style:style style:name="P93" style:family="paragraph" style:parent-style-name="Text_20_body">
      <style:text-properties fo:language="la" fo:country="VA" officeooo:rsid="09536f0b" officeooo:paragraph-rsid="09536f0b"/>
    </style:style>
    <style:style style:name="P94" style:family="paragraph" style:parent-style-name="Text_20_body">
      <style:text-properties fo:language="la" fo:country="VA" officeooo:rsid="0954b89b" officeooo:paragraph-rsid="0954b89b"/>
    </style:style>
    <style:style style:name="P95" style:family="paragraph" style:parent-style-name="Text_20_body">
      <style:text-properties fo:language="la" fo:country="VA" officeooo:rsid="09556179" officeooo:paragraph-rsid="09556179"/>
    </style:style>
    <style:style style:name="P96" style:family="paragraph" style:parent-style-name="Text_20_body">
      <style:text-properties fo:language="la" fo:country="VA" officeooo:rsid="09573fae" officeooo:paragraph-rsid="09573fae"/>
    </style:style>
    <style:style style:name="P97" style:family="paragraph" style:parent-style-name="Text_20_body">
      <style:text-properties fo:language="la" fo:country="VA" officeooo:rsid="09583168" officeooo:paragraph-rsid="09583168"/>
    </style:style>
    <style:style style:name="P98" style:family="paragraph" style:parent-style-name="Text_20_body">
      <style:text-properties fo:language="la" fo:country="VA" officeooo:rsid="0959fe16" officeooo:paragraph-rsid="0959fe16"/>
    </style:style>
    <style:style style:name="P99" style:family="paragraph" style:parent-style-name="Text_20_body">
      <style:paragraph-properties fo:text-align="start" style:justify-single-word="false"/>
      <style:text-properties fo:language="la" fo:country="VA" officeooo:rsid="095beb56" officeooo:paragraph-rsid="095beb56"/>
    </style:style>
    <style:style style:name="P100" style:family="paragraph" style:parent-style-name="Text_20_body">
      <style:paragraph-properties fo:text-align="start" style:justify-single-word="false"/>
      <style:text-properties fo:language="la" fo:country="VA" officeooo:rsid="095d5306" officeooo:paragraph-rsid="095d5306"/>
    </style:style>
    <style:style style:name="P101" style:family="paragraph" style:parent-style-name="Text_20_body">
      <style:paragraph-properties fo:text-align="start" style:justify-single-word="false"/>
      <style:text-properties fo:language="la" fo:country="VA" officeooo:rsid="09606507" officeooo:paragraph-rsid="09606507"/>
    </style:style>
    <style:style style:name="P102" style:family="paragraph" style:parent-style-name="Text_20_body">
      <style:paragraph-properties fo:text-align="start" style:justify-single-word="false"/>
      <style:text-properties fo:language="la" fo:country="VA" officeooo:rsid="09630529" officeooo:paragraph-rsid="09630529"/>
    </style:style>
    <style:style style:name="P103" style:family="paragraph" style:parent-style-name="Text_20_body">
      <style:paragraph-properties fo:text-align="start" style:justify-single-word="false"/>
      <style:text-properties fo:language="la" fo:country="VA" officeooo:rsid="09632a80" officeooo:paragraph-rsid="09632a80"/>
    </style:style>
    <style:style style:name="P104" style:family="paragraph" style:parent-style-name="Text_20_body">
      <style:paragraph-properties fo:text-align="start" style:justify-single-word="false"/>
      <style:text-properties fo:language="la" fo:country="VA" officeooo:rsid="09636d5f" officeooo:paragraph-rsid="09636d5f"/>
    </style:style>
    <style:style style:name="P105" style:family="paragraph" style:parent-style-name="Text_20_body">
      <style:paragraph-properties fo:text-align="start" style:justify-single-word="false"/>
      <style:text-properties fo:language="la" fo:country="VA" officeooo:rsid="0965a18c" officeooo:paragraph-rsid="0965ce5b"/>
    </style:style>
    <style:style style:name="P106" style:family="paragraph" style:parent-style-name="Text_20_body">
      <style:paragraph-properties fo:text-align="start" style:justify-single-word="false"/>
      <style:text-properties fo:language="la" fo:country="VA" officeooo:rsid="0965a18c" officeooo:paragraph-rsid="09665788"/>
    </style:style>
    <style:style style:name="P107" style:family="paragraph" style:parent-style-name="Text_20_body">
      <style:paragraph-properties fo:text-align="start" style:justify-single-word="false"/>
      <style:text-properties fo:language="la" fo:country="VA" officeooo:rsid="09665788" officeooo:paragraph-rsid="09665788"/>
    </style:style>
    <style:style style:name="P108" style:family="paragraph" style:parent-style-name="Text_20_body">
      <style:paragraph-properties fo:text-align="start" style:justify-single-word="false"/>
      <style:text-properties fo:language="la" fo:country="VA" officeooo:rsid="09665788" officeooo:paragraph-rsid="0966c933"/>
    </style:style>
    <style:style style:name="P109" style:family="paragraph" style:parent-style-name="Text_20_body">
      <style:paragraph-properties fo:text-align="start" style:justify-single-word="false"/>
      <style:text-properties fo:language="la" fo:country="VA" officeooo:rsid="0966c933" officeooo:paragraph-rsid="0966c933"/>
    </style:style>
    <style:style style:name="P110" style:family="paragraph" style:parent-style-name="Text_20_body">
      <style:paragraph-properties fo:text-align="start" style:justify-single-word="false"/>
      <style:text-properties fo:language="la" fo:country="VA" officeooo:rsid="09690269" officeooo:paragraph-rsid="09690269"/>
    </style:style>
    <style:style style:name="P111" style:family="paragraph" style:parent-style-name="Text_20_body">
      <style:paragraph-properties fo:text-align="start" style:justify-single-word="false"/>
      <style:text-properties fo:language="la" fo:country="VA" officeooo:rsid="096a5722" officeooo:paragraph-rsid="096af4bb"/>
    </style:style>
    <style:style style:name="P112" style:family="paragraph" style:parent-style-name="Text_20_body">
      <style:paragraph-properties fo:text-align="start" style:justify-single-word="false"/>
      <style:text-properties fo:language="la" fo:country="VA" officeooo:rsid="096af4bb" officeooo:paragraph-rsid="096af4bb"/>
    </style:style>
    <style:style style:name="P113" style:family="paragraph" style:parent-style-name="Text_20_body">
      <style:paragraph-properties fo:text-align="start" style:justify-single-word="false"/>
      <style:text-properties fo:language="la" fo:country="VA" officeooo:rsid="096cc3b4" officeooo:paragraph-rsid="096cc3b4"/>
    </style:style>
    <style:style style:name="P114" style:family="paragraph" style:parent-style-name="Text_20_body">
      <style:paragraph-properties fo:text-align="start" style:justify-single-word="false"/>
      <style:text-properties fo:language="la" fo:country="VA" officeooo:rsid="097040a7" officeooo:paragraph-rsid="097040a7"/>
    </style:style>
    <style:style style:name="P115" style:family="paragraph" style:parent-style-name="Text_20_body">
      <style:paragraph-properties fo:text-align="start" style:justify-single-word="false"/>
      <style:text-properties fo:language="la" fo:country="VA" officeooo:rsid="0973d1d9" officeooo:paragraph-rsid="0973d1d9"/>
    </style:style>
    <style:style style:name="P116" style:family="paragraph" style:parent-style-name="Text_20_body">
      <style:paragraph-properties fo:text-align="start" style:justify-single-word="false"/>
      <style:text-properties fo:language="la" fo:country="VA" officeooo:rsid="097ae391" officeooo:paragraph-rsid="097ae391"/>
    </style:style>
    <style:style style:name="P117" style:family="paragraph" style:parent-style-name="Text_20_body">
      <style:paragraph-properties fo:text-align="start" style:justify-single-word="false"/>
      <style:text-properties fo:language="la" fo:country="VA" officeooo:rsid="097d8c68" officeooo:paragraph-rsid="097d8c68"/>
    </style:style>
    <style:style style:name="P118" style:family="paragraph" style:parent-style-name="Text_20_body">
      <style:paragraph-properties fo:text-align="start" style:justify-single-word="false"/>
      <style:text-properties fo:language="la" fo:country="VA" officeooo:rsid="097f4658" officeooo:paragraph-rsid="097f4658"/>
    </style:style>
    <style:style style:name="P119" style:family="paragraph" style:parent-style-name="Text_20_body">
      <style:paragraph-properties fo:text-align="start" style:justify-single-word="false"/>
      <style:text-properties fo:language="la" fo:country="VA" officeooo:rsid="097f4da7" officeooo:paragraph-rsid="097f4da7"/>
    </style:style>
    <style:style style:name="P120" style:family="paragraph" style:parent-style-name="Text_20_body">
      <style:paragraph-properties fo:text-align="start" style:justify-single-word="false"/>
      <style:text-properties fo:language="la" fo:country="VA" officeooo:rsid="097f6e75" officeooo:paragraph-rsid="097f6e75"/>
    </style:style>
    <style:style style:name="P121" style:family="paragraph" style:parent-style-name="Text_20_body">
      <style:paragraph-properties fo:text-align="start" style:justify-single-word="false"/>
      <style:text-properties fo:language="la" fo:country="VA" officeooo:rsid="098134f0" officeooo:paragraph-rsid="098134f0"/>
    </style:style>
    <style:style style:name="P122" style:family="paragraph" style:parent-style-name="Text_20_body">
      <style:paragraph-properties fo:text-align="start" style:justify-single-word="false"/>
      <style:text-properties fo:language="la" fo:country="VA" officeooo:rsid="09829ba0" officeooo:paragraph-rsid="09829ba0"/>
    </style:style>
    <style:style style:name="P123" style:family="paragraph" style:parent-style-name="Text_20_body">
      <style:paragraph-properties fo:text-align="start" style:justify-single-word="false"/>
      <style:text-properties fo:language="la" fo:country="VA" officeooo:rsid="09845f16" officeooo:paragraph-rsid="09845f16"/>
    </style:style>
    <style:style style:name="P124" style:family="paragraph" style:parent-style-name="Text_20_body">
      <style:paragraph-properties fo:text-align="start" style:justify-single-word="false"/>
      <style:text-properties fo:language="la" fo:country="VA" officeooo:rsid="0984e9a6" officeooo:paragraph-rsid="0984e9a6"/>
    </style:style>
    <style:style style:name="P125" style:family="paragraph" style:parent-style-name="Text_20_body">
      <style:paragraph-properties fo:text-align="start" style:justify-single-word="false"/>
      <style:text-properties fo:language="la" fo:country="VA" officeooo:rsid="0986fdee" officeooo:paragraph-rsid="0986fdee"/>
    </style:style>
    <style:style style:name="P126" style:family="paragraph" style:parent-style-name="Text_20_body">
      <style:paragraph-properties fo:text-align="start" style:justify-single-word="false"/>
      <style:text-properties fo:language="la" fo:country="VA" officeooo:rsid="09875631" officeooo:paragraph-rsid="09875631"/>
    </style:style>
    <style:style style:name="P127" style:family="paragraph" style:parent-style-name="Text_20_body">
      <style:paragraph-properties fo:text-align="start" style:justify-single-word="false"/>
      <style:text-properties fo:language="la" fo:country="VA" officeooo:rsid="0989ff21" officeooo:paragraph-rsid="0989ff21"/>
    </style:style>
    <style:style style:name="P128" style:family="paragraph" style:parent-style-name="Text_20_body">
      <style:paragraph-properties fo:text-align="start" style:justify-single-word="false"/>
      <style:text-properties fo:language="la" fo:country="VA" officeooo:rsid="0989ff9b" officeooo:paragraph-rsid="0989ff9b"/>
    </style:style>
    <style:style style:name="P129" style:family="paragraph" style:parent-style-name="Text_20_body">
      <style:paragraph-properties fo:text-align="start" style:justify-single-word="false"/>
      <style:text-properties fo:language="la" fo:country="VA" officeooo:rsid="098b32e3" officeooo:paragraph-rsid="098b32e3"/>
    </style:style>
    <style:style style:name="P130" style:family="paragraph" style:parent-style-name="Text_20_body">
      <style:paragraph-properties fo:text-align="start" style:justify-single-word="false"/>
      <style:text-properties fo:language="la" fo:country="VA" officeooo:rsid="098cd5b7" officeooo:paragraph-rsid="098cd5b7"/>
    </style:style>
    <style:style style:name="P131" style:family="paragraph" style:parent-style-name="Text_20_body">
      <style:paragraph-properties fo:text-align="start" style:justify-single-word="false"/>
      <style:text-properties fo:language="la" fo:country="VA" officeooo:rsid="098d3f60" officeooo:paragraph-rsid="098d3f60"/>
    </style:style>
    <style:style style:name="P132" style:family="paragraph" style:parent-style-name="Text_20_body">
      <style:paragraph-properties fo:text-align="start" style:justify-single-word="false"/>
      <style:text-properties fo:language="la" fo:country="VA" officeooo:rsid="098f1489" officeooo:paragraph-rsid="098f1489"/>
    </style:style>
    <style:style style:name="P133" style:family="paragraph" style:parent-style-name="Text_20_body">
      <style:paragraph-properties fo:text-align="start" style:justify-single-word="false"/>
      <style:text-properties fo:language="la" fo:country="VA" officeooo:rsid="0991d5c1" officeooo:paragraph-rsid="0991d5c1"/>
    </style:style>
    <style:style style:name="P134" style:family="paragraph" style:parent-style-name="Text_20_body">
      <style:text-properties fo:language="la" fo:country="VA" officeooo:rsid="0991d5c1" officeooo:paragraph-rsid="0991d5c1"/>
    </style:style>
    <style:style style:name="P135" style:family="paragraph" style:parent-style-name="Text_20_body">
      <style:text-properties fo:language="la" fo:country="VA" officeooo:rsid="0993b1f6" officeooo:paragraph-rsid="0993b1f6"/>
    </style:style>
    <style:style style:name="P136" style:family="paragraph" style:parent-style-name="Text_20_body">
      <style:text-properties fo:language="la" fo:country="VA" officeooo:rsid="0995dfab" officeooo:paragraph-rsid="0995dfab"/>
    </style:style>
    <style:style style:name="P137" style:family="paragraph" style:parent-style-name="Text_20_body">
      <style:text-properties fo:language="la" fo:country="VA" officeooo:rsid="09970718" officeooo:paragraph-rsid="0996a88d"/>
    </style:style>
    <style:style style:name="P138" style:family="paragraph" style:parent-style-name="Text_20_body">
      <style:text-properties fo:language="la" fo:country="VA" officeooo:rsid="09976fe0" officeooo:paragraph-rsid="099d28b5"/>
    </style:style>
    <style:style style:name="P139" style:family="paragraph" style:parent-style-name="Text_20_body">
      <style:text-properties fo:language="la" fo:country="VA" officeooo:rsid="099d28b5" officeooo:paragraph-rsid="099d28b5"/>
    </style:style>
    <style:style style:name="P140" style:family="paragraph" style:parent-style-name="Text_20_body">
      <style:text-properties fo:language="la" fo:country="VA" officeooo:rsid="099f033e" officeooo:paragraph-rsid="099f033e"/>
    </style:style>
    <style:style style:name="P141" style:family="paragraph" style:parent-style-name="Text_20_body">
      <style:text-properties fo:language="la" fo:country="VA" officeooo:rsid="099f033e" officeooo:paragraph-rsid="09a05a12"/>
    </style:style>
    <style:style style:name="P142" style:family="paragraph" style:parent-style-name="Text_20_body">
      <style:text-properties fo:language="la" fo:country="VA" officeooo:rsid="09a05a12" officeooo:paragraph-rsid="09a05a12"/>
    </style:style>
    <style:style style:name="P143" style:family="paragraph" style:parent-style-name="Text_20_body">
      <style:text-properties fo:language="la" fo:country="VA" officeooo:rsid="09a1427d" officeooo:paragraph-rsid="09a1427d"/>
    </style:style>
    <style:style style:name="P144" style:family="paragraph" style:parent-style-name="Text_20_body">
      <style:text-properties fo:language="la" fo:country="VA" officeooo:rsid="09a2fa24" officeooo:paragraph-rsid="09a2fa24"/>
    </style:style>
    <style:style style:name="P145" style:family="paragraph" style:parent-style-name="Text_20_body">
      <style:text-properties fo:language="la" fo:country="VA" officeooo:rsid="09a39265" officeooo:paragraph-rsid="09a39265"/>
    </style:style>
    <style:style style:name="P146" style:family="paragraph" style:parent-style-name="Text_20_body">
      <style:text-properties fo:language="la" fo:country="VA" officeooo:rsid="09a604ba" officeooo:paragraph-rsid="09a604ba"/>
    </style:style>
    <style:style style:name="P147" style:family="paragraph" style:parent-style-name="Text_20_body">
      <style:text-properties fo:language="la" fo:country="VA" officeooo:rsid="09a6b071" officeooo:paragraph-rsid="09a85a1e"/>
    </style:style>
    <style:style style:name="P148" style:family="paragraph" style:parent-style-name="Text_20_body">
      <style:text-properties fo:language="la" fo:country="VA" officeooo:rsid="09ac5183" officeooo:paragraph-rsid="09ac5183"/>
    </style:style>
    <style:style style:name="P149" style:family="paragraph" style:parent-style-name="Text_20_body">
      <style:text-properties fo:language="la" fo:country="VA" officeooo:rsid="09ae2741" officeooo:paragraph-rsid="09ae2741"/>
    </style:style>
    <style:style style:name="P150" style:family="paragraph" style:parent-style-name="Text_20_body">
      <style:text-properties fo:language="la" fo:country="VA" officeooo:rsid="09af6343" officeooo:paragraph-rsid="09af6343"/>
    </style:style>
    <style:style style:name="P151" style:family="paragraph" style:parent-style-name="Text_20_body">
      <style:text-properties fo:language="la" fo:country="VA" officeooo:rsid="09afeebc" officeooo:paragraph-rsid="09afeebc"/>
    </style:style>
    <style:style style:name="P152" style:family="paragraph" style:parent-style-name="Text_20_body">
      <style:text-properties fo:language="la" fo:country="VA" officeooo:rsid="09b04c69" officeooo:paragraph-rsid="09b04c69"/>
    </style:style>
    <style:style style:name="P153" style:family="paragraph" style:parent-style-name="Text_20_body">
      <style:text-properties fo:language="la" fo:country="VA" officeooo:rsid="09b11c21" officeooo:paragraph-rsid="09b11c21"/>
    </style:style>
    <style:style style:name="P154" style:family="paragraph" style:parent-style-name="Text_20_body">
      <style:text-properties fo:language="la" fo:country="VA" officeooo:rsid="09b26f57" officeooo:paragraph-rsid="09b26f57"/>
    </style:style>
    <style:style style:name="P155" style:family="paragraph" style:parent-style-name="Text_20_body">
      <style:text-properties fo:language="la" fo:country="VA" officeooo:rsid="09b4b244" officeooo:paragraph-rsid="09b4b244"/>
    </style:style>
    <style:style style:name="P156" style:family="paragraph" style:parent-style-name="Text_20_body">
      <style:paragraph-properties fo:text-align="start" style:justify-single-word="false"/>
      <style:text-properties fo:language="la" fo:country="VA" officeooo:rsid="09b77c30" officeooo:paragraph-rsid="09b77c30"/>
    </style:style>
    <style:style style:name="P157" style:family="paragraph" style:parent-style-name="Text_20_body">
      <style:paragraph-properties fo:text-align="start" style:justify-single-word="false"/>
      <style:text-properties fo:language="la" fo:country="VA" officeooo:rsid="09ba423d" officeooo:paragraph-rsid="09ba423d"/>
    </style:style>
    <style:style style:name="P158" style:family="paragraph" style:parent-style-name="Text_20_body">
      <style:paragraph-properties fo:text-align="start" style:justify-single-word="false"/>
      <style:text-properties fo:language="la" fo:country="VA" officeooo:rsid="09bf2891" officeooo:paragraph-rsid="09bf2891"/>
    </style:style>
    <style:style style:name="P159" style:family="paragraph" style:parent-style-name="Text_20_body">
      <style:paragraph-properties fo:text-align="start" style:justify-single-word="false"/>
      <style:text-properties fo:language="la" fo:country="VA" officeooo:rsid="09c1182f" officeooo:paragraph-rsid="09c1182f"/>
    </style:style>
    <style:style style:name="P160" style:family="paragraph" style:parent-style-name="Text_20_body">
      <style:paragraph-properties fo:text-align="start" style:justify-single-word="false"/>
      <style:text-properties fo:language="la" fo:country="VA" officeooo:rsid="09c920d0" officeooo:paragraph-rsid="09c920d0"/>
    </style:style>
    <style:style style:name="P161" style:family="paragraph" style:parent-style-name="Text_20_body">
      <style:paragraph-properties fo:text-align="start" style:justify-single-word="false"/>
      <style:text-properties fo:language="la" fo:country="VA" officeooo:rsid="09d3f879" officeooo:paragraph-rsid="09d3f879"/>
    </style:style>
    <style:style style:name="P162" style:family="paragraph" style:parent-style-name="Text_20_body">
      <style:paragraph-properties fo:text-align="start" style:justify-single-word="false"/>
      <style:text-properties fo:language="la" fo:country="VA" officeooo:rsid="06537a34" officeooo:paragraph-rsid="06537a34"/>
    </style:style>
    <style:style style:name="P163" style:family="paragraph" style:parent-style-name="Text_20_body">
      <style:paragraph-properties fo:text-align="start" style:justify-single-word="false"/>
      <style:text-properties fo:language="la" fo:country="VA" officeooo:rsid="06543065" officeooo:paragraph-rsid="06543065"/>
    </style:style>
    <style:style style:name="P164" style:family="paragraph" style:parent-style-name="Text_20_body">
      <style:paragraph-properties fo:text-align="start" style:justify-single-word="false"/>
      <style:text-properties fo:language="la" fo:country="VA" officeooo:rsid="0654fac1" officeooo:paragraph-rsid="0654fac1"/>
    </style:style>
    <style:style style:name="P165" style:family="paragraph" style:parent-style-name="Text_20_body">
      <style:paragraph-properties fo:text-align="start" style:justify-single-word="false"/>
      <style:text-properties fo:language="la" fo:country="VA" officeooo:rsid="06563192" officeooo:paragraph-rsid="06563192"/>
    </style:style>
    <style:style style:name="P166" style:family="paragraph" style:parent-style-name="Text_20_body">
      <style:paragraph-properties fo:text-align="start" style:justify-single-word="false"/>
      <style:text-properties fo:language="la" fo:country="VA" officeooo:rsid="0657b0a9" officeooo:paragraph-rsid="0657b0a9"/>
    </style:style>
    <style:style style:name="P167" style:family="paragraph" style:parent-style-name="Text_20_body">
      <style:paragraph-properties fo:text-align="start" style:justify-single-word="false"/>
      <style:text-properties fo:language="la" fo:country="VA" officeooo:rsid="0657b0a9" officeooo:paragraph-rsid="0658a708"/>
    </style:style>
    <style:style style:name="P168" style:family="paragraph" style:parent-style-name="Text_20_body">
      <style:paragraph-properties fo:text-align="start" style:justify-single-word="false"/>
      <style:text-properties fo:language="la" fo:country="VA" officeooo:rsid="0657b0a9" officeooo:paragraph-rsid="0659f053"/>
    </style:style>
    <style:style style:name="P169" style:family="paragraph" style:parent-style-name="Text_20_body">
      <style:paragraph-properties fo:text-align="start" style:justify-single-word="false"/>
      <style:text-properties fo:language="la" fo:country="VA" officeooo:rsid="0658a708" officeooo:paragraph-rsid="0658a708"/>
    </style:style>
    <style:style style:name="P170" style:family="paragraph" style:parent-style-name="Text_20_body">
      <style:paragraph-properties fo:text-align="start" style:justify-single-word="false"/>
      <style:text-properties fo:language="la" fo:country="VA" officeooo:rsid="0658a708" officeooo:paragraph-rsid="0ae6bf80"/>
    </style:style>
    <style:style style:name="P171" style:family="paragraph" style:parent-style-name="Text_20_body">
      <style:paragraph-properties fo:text-align="start" style:justify-single-word="false"/>
      <style:text-properties fo:language="la" fo:country="VA" officeooo:rsid="0659f053" officeooo:paragraph-rsid="0659f053"/>
    </style:style>
    <style:style style:name="P172" style:family="paragraph" style:parent-style-name="Text_20_body">
      <style:paragraph-properties fo:text-align="start" style:justify-single-word="false"/>
      <style:text-properties fo:language="la" fo:country="VA" officeooo:rsid="0659f053" officeooo:paragraph-rsid="065bab80"/>
    </style:style>
    <style:style style:name="P173" style:family="paragraph" style:parent-style-name="Text_20_body">
      <style:paragraph-properties fo:text-align="start" style:justify-single-word="false"/>
      <style:text-properties fo:language="la" fo:country="VA" officeooo:rsid="065ac337" officeooo:paragraph-rsid="065ac337"/>
    </style:style>
    <style:style style:name="P174" style:family="paragraph" style:parent-style-name="Text_20_body">
      <style:paragraph-properties fo:text-align="start" style:justify-single-word="false"/>
      <style:text-properties fo:language="la" fo:country="VA" officeooo:rsid="065bab80" officeooo:paragraph-rsid="065bab80"/>
    </style:style>
    <style:style style:name="P175" style:family="paragraph" style:parent-style-name="Text_20_body">
      <style:paragraph-properties fo:text-align="start" style:justify-single-word="false"/>
      <style:text-properties fo:language="la" fo:country="VA" officeooo:rsid="065cd177" officeooo:paragraph-rsid="065cd177"/>
    </style:style>
    <style:style style:name="P176" style:family="paragraph" style:parent-style-name="Text_20_body">
      <style:paragraph-properties fo:text-align="start" style:justify-single-word="false"/>
      <style:text-properties fo:language="la" fo:country="VA" officeooo:rsid="065cd177" officeooo:paragraph-rsid="065e9f9b"/>
    </style:style>
    <style:style style:name="P177" style:family="paragraph" style:parent-style-name="Text_20_body">
      <style:paragraph-properties fo:text-align="start" style:justify-single-word="false"/>
      <style:text-properties fo:language="la" fo:country="VA" officeooo:rsid="065ea7f6" officeooo:paragraph-rsid="065ea7f6"/>
    </style:style>
    <style:style style:name="P178" style:family="paragraph" style:parent-style-name="Text_20_body">
      <style:paragraph-properties fo:text-align="start" style:justify-single-word="false"/>
      <style:text-properties fo:language="la" fo:country="VA" officeooo:rsid="065ea7f6" officeooo:paragraph-rsid="06644bbf"/>
    </style:style>
    <style:style style:name="P179" style:family="paragraph" style:parent-style-name="Text_20_body">
      <style:paragraph-properties fo:text-align="start" style:justify-single-word="false"/>
      <style:text-properties fo:language="la" fo:country="VA" officeooo:rsid="065ea7f6" officeooo:paragraph-rsid="06672bc3"/>
    </style:style>
    <style:style style:name="P180" style:family="paragraph" style:parent-style-name="Text_20_body">
      <style:paragraph-properties fo:text-align="start" style:justify-single-word="false"/>
      <style:text-properties fo:language="la" fo:country="VA" officeooo:rsid="0666433f" officeooo:paragraph-rsid="0666433f"/>
    </style:style>
    <style:style style:name="P181" style:family="paragraph" style:parent-style-name="Text_20_body">
      <style:paragraph-properties fo:text-align="start" style:justify-single-word="false"/>
      <style:text-properties fo:language="la" fo:country="VA" officeooo:rsid="06672bc3" officeooo:paragraph-rsid="06672bc3"/>
    </style:style>
    <style:style style:name="P182" style:family="paragraph" style:parent-style-name="Text_20_body">
      <style:paragraph-properties fo:text-align="start" style:justify-single-word="false"/>
      <style:text-properties fo:language="la" fo:country="VA" officeooo:rsid="066898dd" officeooo:paragraph-rsid="066898dd"/>
    </style:style>
    <style:style style:name="P183" style:family="paragraph" style:parent-style-name="Text_20_body">
      <style:paragraph-properties fo:text-align="start" style:justify-single-word="false"/>
      <style:text-properties fo:language="la" fo:country="VA" officeooo:rsid="0668b688" officeooo:paragraph-rsid="0668b688"/>
    </style:style>
    <style:style style:name="P184" style:family="paragraph" style:parent-style-name="Text_20_body">
      <style:paragraph-properties fo:text-align="start" style:justify-single-word="false"/>
      <style:text-properties fo:language="la" fo:country="VA" officeooo:rsid="066a5fc9" officeooo:paragraph-rsid="066a5fc9"/>
    </style:style>
    <style:style style:name="P185" style:family="paragraph" style:parent-style-name="Text_20_body">
      <style:paragraph-properties fo:text-align="start" style:justify-single-word="false"/>
      <style:text-properties fo:language="la" fo:country="VA" officeooo:rsid="066b6170" officeooo:paragraph-rsid="066b6170"/>
    </style:style>
    <style:style style:name="P186" style:family="paragraph" style:parent-style-name="Text_20_body">
      <style:paragraph-properties fo:text-align="start" style:justify-single-word="false"/>
      <style:text-properties fo:language="la" fo:country="VA" officeooo:rsid="066b9c35" officeooo:paragraph-rsid="066b9c35"/>
    </style:style>
    <style:style style:name="P187" style:family="paragraph" style:parent-style-name="Text_20_body">
      <style:paragraph-properties fo:text-align="start" style:justify-single-word="false"/>
      <style:text-properties fo:language="la" fo:country="VA" officeooo:rsid="066d6e74" officeooo:paragraph-rsid="066d6e74"/>
    </style:style>
    <style:style style:name="P188" style:family="paragraph" style:parent-style-name="Text_20_body">
      <style:paragraph-properties fo:text-align="start" style:justify-single-word="false"/>
      <style:text-properties fo:language="la" fo:country="VA" officeooo:rsid="066dd1d6" officeooo:paragraph-rsid="066dd1d6"/>
    </style:style>
    <style:style style:name="P189" style:family="paragraph" style:parent-style-name="Text_20_body">
      <style:paragraph-properties fo:text-align="start" style:justify-single-word="false"/>
      <style:text-properties fo:language="la" fo:country="VA" officeooo:rsid="066de425" officeooo:paragraph-rsid="066de425"/>
    </style:style>
    <style:style style:name="P190" style:family="paragraph" style:parent-style-name="Text_20_body">
      <style:paragraph-properties fo:text-align="start" style:justify-single-word="false"/>
      <style:text-properties fo:language="la" fo:country="VA" officeooo:rsid="066f6071" officeooo:paragraph-rsid="0670845a"/>
    </style:style>
    <style:style style:name="P191" style:family="paragraph" style:parent-style-name="Text_20_body">
      <style:paragraph-properties fo:text-align="start" style:justify-single-word="false"/>
      <style:text-properties fo:language="la" fo:country="VA" officeooo:rsid="066f6071" officeooo:paragraph-rsid="0672ea1f"/>
    </style:style>
    <style:style style:name="P192" style:family="paragraph" style:parent-style-name="Text_20_body">
      <style:paragraph-properties fo:text-align="start" style:justify-single-word="false"/>
      <style:text-properties fo:language="la" fo:country="VA" officeooo:rsid="067104dd" officeooo:paragraph-rsid="067104dd"/>
    </style:style>
    <style:style style:name="P193" style:family="paragraph" style:parent-style-name="Text_20_body">
      <style:paragraph-properties fo:text-align="start" style:justify-single-word="false"/>
      <style:text-properties fo:language="la" fo:country="VA" officeooo:rsid="0672ea1f" officeooo:paragraph-rsid="0672ea1f"/>
    </style:style>
    <style:style style:name="P194" style:family="paragraph" style:parent-style-name="Text_20_body">
      <style:paragraph-properties fo:text-align="start" style:justify-single-word="false"/>
      <style:text-properties fo:language="la" fo:country="VA" officeooo:rsid="06731ecb" officeooo:paragraph-rsid="06731ecb"/>
    </style:style>
    <style:style style:name="P195" style:family="paragraph" style:parent-style-name="Text_20_body">
      <style:paragraph-properties fo:text-align="start" style:justify-single-word="false"/>
      <style:text-properties fo:language="la" fo:country="VA" officeooo:rsid="0675e702" officeooo:paragraph-rsid="0675e702"/>
    </style:style>
    <style:style style:name="P196" style:family="paragraph" style:parent-style-name="Text_20_body">
      <style:text-properties fo:language="la" fo:country="VA" officeooo:rsid="0651cc1b" officeooo:paragraph-rsid="0651cc1b"/>
    </style:style>
    <style:style style:name="P197" style:family="paragraph" style:parent-style-name="Text_20_body">
      <style:paragraph-properties fo:text-align="start" style:justify-single-word="false"/>
      <style:text-properties fo:language="la" fo:country="VA" officeooo:rsid="06786cde" officeooo:paragraph-rsid="06786cde"/>
    </style:style>
    <style:style style:name="P198" style:family="paragraph" style:parent-style-name="Text_20_body">
      <style:text-properties fo:language="la" fo:country="VA" officeooo:rsid="067b495c" officeooo:paragraph-rsid="067b495c"/>
    </style:style>
    <style:style style:name="P199" style:family="paragraph" style:parent-style-name="Text_20_body">
      <style:text-properties fo:language="la" fo:country="VA" officeooo:rsid="067d24ee" officeooo:paragraph-rsid="067d24ee"/>
    </style:style>
    <style:style style:name="P200" style:family="paragraph" style:parent-style-name="Text_20_body">
      <style:text-properties fo:language="la" fo:country="VA" officeooo:rsid="067e4d13" officeooo:paragraph-rsid="067e4d13"/>
    </style:style>
    <style:style style:name="P201" style:family="paragraph" style:parent-style-name="Text_20_body">
      <style:paragraph-properties fo:text-align="start" style:justify-single-word="false"/>
      <style:text-properties fo:language="la" fo:country="VA" officeooo:rsid="068186fa" officeooo:paragraph-rsid="068186fa"/>
    </style:style>
    <style:style style:name="P202" style:family="paragraph" style:parent-style-name="Text_20_body">
      <style:paragraph-properties fo:text-align="start" style:justify-single-word="false"/>
      <style:text-properties fo:language="la" fo:country="VA" officeooo:rsid="0689e081" officeooo:paragraph-rsid="0689e081"/>
    </style:style>
    <style:style style:name="P203" style:family="paragraph" style:parent-style-name="Text_20_body">
      <style:paragraph-properties fo:text-align="start" style:justify-single-word="false"/>
      <style:text-properties fo:language="la" fo:country="VA" officeooo:rsid="068bb13e" officeooo:paragraph-rsid="068bb13e"/>
    </style:style>
    <style:style style:name="P204" style:family="paragraph" style:parent-style-name="Text_20_body">
      <style:paragraph-properties fo:text-align="start" style:justify-single-word="false"/>
      <style:text-properties fo:language="la" fo:country="VA" officeooo:rsid="068c7682" officeooo:paragraph-rsid="068c7682"/>
    </style:style>
    <style:style style:name="P205" style:family="paragraph" style:parent-style-name="Text_20_body">
      <style:paragraph-properties fo:text-align="start" style:justify-single-word="false"/>
      <style:text-properties fo:language="la" fo:country="VA" officeooo:rsid="068f67ba" officeooo:paragraph-rsid="06903b68"/>
    </style:style>
    <style:style style:name="P206" style:family="paragraph" style:parent-style-name="Text_20_body">
      <style:paragraph-properties fo:text-align="start" style:justify-single-word="false"/>
      <style:text-properties fo:language="la" fo:country="VA" officeooo:rsid="06903b68" officeooo:paragraph-rsid="06903b68"/>
    </style:style>
    <style:style style:name="P207" style:family="paragraph" style:parent-style-name="Text_20_body">
      <style:paragraph-properties fo:text-align="start" style:justify-single-word="false"/>
      <style:text-properties fo:language="la" fo:country="VA" officeooo:rsid="06903b68" officeooo:paragraph-rsid="0b76af89"/>
    </style:style>
    <style:style style:name="P208" style:family="paragraph" style:parent-style-name="Text_20_body">
      <style:paragraph-properties fo:text-align="start" style:justify-single-word="false"/>
      <style:text-properties fo:language="la" fo:country="VA" officeooo:rsid="0692c046" officeooo:paragraph-rsid="0691784f"/>
    </style:style>
    <style:style style:name="P209" style:family="paragraph" style:parent-style-name="Text_20_body">
      <style:paragraph-properties fo:text-align="start" style:justify-single-word="false"/>
      <style:text-properties fo:language="la" fo:country="VA" officeooo:rsid="0692c046" officeooo:paragraph-rsid="0692c046"/>
    </style:style>
    <style:style style:name="P210" style:family="paragraph" style:parent-style-name="Text_20_body">
      <style:paragraph-properties fo:text-align="start" style:justify-single-word="false"/>
      <style:text-properties fo:language="la" fo:country="VA" officeooo:rsid="0692c046" officeooo:paragraph-rsid="0693c87d"/>
    </style:style>
    <style:style style:name="P211" style:family="paragraph" style:parent-style-name="Text_20_body">
      <style:paragraph-properties fo:text-align="start" style:justify-single-word="false"/>
      <style:text-properties fo:language="la" fo:country="VA" officeooo:rsid="0692f662" officeooo:paragraph-rsid="0692f662"/>
    </style:style>
    <style:style style:name="P212" style:family="paragraph" style:parent-style-name="Text_20_body">
      <style:paragraph-properties fo:text-align="start" style:justify-single-word="false"/>
      <style:text-properties fo:language="la" fo:country="VA" officeooo:rsid="0692fd01" officeooo:paragraph-rsid="0692fd01"/>
    </style:style>
    <style:style style:name="P213" style:family="paragraph" style:parent-style-name="Text_20_body">
      <style:paragraph-properties fo:text-align="start" style:justify-single-word="false"/>
      <style:text-properties fo:language="la" fo:country="VA" officeooo:rsid="0693dc55" officeooo:paragraph-rsid="0693dc55"/>
    </style:style>
    <style:style style:name="P214" style:family="paragraph" style:parent-style-name="Text_20_body">
      <style:paragraph-properties fo:text-align="start" style:justify-single-word="false"/>
      <style:text-properties fo:language="la" fo:country="VA" officeooo:rsid="0694b705" officeooo:paragraph-rsid="0694b705"/>
    </style:style>
    <style:style style:name="P215" style:family="paragraph" style:parent-style-name="Text_20_body">
      <style:paragraph-properties fo:text-align="start" style:justify-single-word="false"/>
      <style:text-properties fo:language="la" fo:country="VA" officeooo:rsid="06969785" officeooo:paragraph-rsid="06969785"/>
    </style:style>
    <style:style style:name="P216" style:family="paragraph" style:parent-style-name="Text_20_body">
      <style:paragraph-properties fo:text-align="start" style:justify-single-word="false"/>
      <style:text-properties fo:language="la" fo:country="VA" officeooo:rsid="06980f0e" officeooo:paragraph-rsid="06980f0e"/>
    </style:style>
    <style:style style:name="P217" style:family="paragraph" style:parent-style-name="Text_20_body">
      <style:paragraph-properties fo:text-align="start" style:justify-single-word="false"/>
      <style:text-properties fo:language="la" fo:country="VA" officeooo:rsid="0698a036" officeooo:paragraph-rsid="0698a036"/>
    </style:style>
    <style:style style:name="P218" style:family="paragraph" style:parent-style-name="Text_20_body">
      <style:paragraph-properties fo:text-align="start" style:justify-single-word="false"/>
      <style:text-properties fo:language="la" fo:country="VA" officeooo:rsid="0698cf13" officeooo:paragraph-rsid="0698cf13"/>
    </style:style>
    <style:style style:name="P219" style:family="paragraph" style:parent-style-name="Text_20_body">
      <style:paragraph-properties fo:text-align="start" style:justify-single-word="false"/>
      <style:text-properties fo:language="la" fo:country="VA" officeooo:rsid="06996788" officeooo:paragraph-rsid="06996788"/>
    </style:style>
    <style:style style:name="P220" style:family="paragraph" style:parent-style-name="Text_20_body">
      <style:paragraph-properties fo:text-align="start" style:justify-single-word="false"/>
      <style:text-properties fo:language="la" fo:country="VA" officeooo:rsid="069cf9fc" officeooo:paragraph-rsid="069cf9fc"/>
    </style:style>
    <style:style style:name="P221" style:family="paragraph" style:parent-style-name="Text_20_body">
      <style:paragraph-properties fo:text-align="start" style:justify-single-word="false"/>
      <style:text-properties fo:language="la" fo:country="VA" officeooo:rsid="069eaa17" officeooo:paragraph-rsid="069eaa17"/>
    </style:style>
    <style:style style:name="P222" style:family="paragraph" style:parent-style-name="Text_20_body">
      <style:paragraph-properties fo:text-align="start" style:justify-single-word="false"/>
      <style:text-properties fo:language="la" fo:country="VA" officeooo:rsid="06a42d05" officeooo:paragraph-rsid="06a42d05"/>
    </style:style>
    <style:style style:name="P223" style:family="paragraph" style:parent-style-name="Text_20_body">
      <style:paragraph-properties fo:text-align="start" style:justify-single-word="false"/>
      <style:text-properties fo:language="la" fo:country="VA" officeooo:rsid="06a58db1" officeooo:paragraph-rsid="06a58db1"/>
    </style:style>
    <style:style style:name="P224" style:family="paragraph" style:parent-style-name="Text_20_body">
      <style:text-properties fo:language="la" fo:country="VA" officeooo:rsid="06a67050" officeooo:paragraph-rsid="06a67050"/>
    </style:style>
    <style:style style:name="P225" style:family="paragraph" style:parent-style-name="Text_20_body">
      <style:text-properties fo:language="la" fo:country="VA" officeooo:rsid="06a7aa4f" officeooo:paragraph-rsid="06a7aa4f"/>
    </style:style>
    <style:style style:name="P226" style:family="paragraph" style:parent-style-name="Text_20_body">
      <style:text-properties fo:language="la" fo:country="VA" officeooo:rsid="06a7aa4f" officeooo:paragraph-rsid="06a94d92"/>
    </style:style>
    <style:style style:name="P227" style:family="paragraph" style:parent-style-name="Text_20_body">
      <style:text-properties fo:language="la" fo:country="VA" officeooo:rsid="06aadad4" officeooo:paragraph-rsid="06aadad4"/>
    </style:style>
    <style:style style:name="P228" style:family="paragraph" style:parent-style-name="Text_20_body">
      <style:text-properties fo:language="la" fo:country="VA" officeooo:rsid="06ac0fe9" officeooo:paragraph-rsid="06ac0fe9"/>
    </style:style>
    <style:style style:name="P229" style:family="paragraph" style:parent-style-name="Text_20_body">
      <style:text-properties fo:language="la" fo:country="VA" officeooo:rsid="06ae247f" officeooo:paragraph-rsid="06ae247f"/>
    </style:style>
    <style:style style:name="P230" style:family="paragraph" style:parent-style-name="Text_20_body">
      <style:text-properties fo:language="la" fo:country="VA" officeooo:rsid="06afcaaf" officeooo:paragraph-rsid="06afcaaf"/>
    </style:style>
    <style:style style:name="P231" style:family="paragraph" style:parent-style-name="Text_20_body">
      <style:text-properties fo:language="la" fo:country="VA" officeooo:rsid="06b1b175" officeooo:paragraph-rsid="06b1b175"/>
    </style:style>
    <style:style style:name="P232" style:family="paragraph" style:parent-style-name="Text_20_body">
      <style:text-properties fo:language="la" fo:country="VA" officeooo:rsid="06b2862b" officeooo:paragraph-rsid="06b2862b"/>
    </style:style>
    <style:style style:name="P233" style:family="paragraph" style:parent-style-name="Text_20_body">
      <style:text-properties fo:language="la" fo:country="VA" officeooo:rsid="06b3bcab" officeooo:paragraph-rsid="06b3bcab"/>
    </style:style>
    <style:style style:name="P234" style:family="paragraph" style:parent-style-name="Text_20_body">
      <style:text-properties fo:language="la" fo:country="VA" officeooo:rsid="06b65786" officeooo:paragraph-rsid="06b65786"/>
    </style:style>
    <style:style style:name="P235" style:family="paragraph" style:parent-style-name="Text_20_body">
      <style:text-properties fo:language="la" fo:country="VA" officeooo:rsid="06b66a24" officeooo:paragraph-rsid="06b66a24"/>
    </style:style>
    <style:style style:name="P236" style:family="paragraph" style:parent-style-name="Text_20_body">
      <style:text-properties fo:language="la" fo:country="VA" officeooo:rsid="06b935ea" officeooo:paragraph-rsid="06b935ea"/>
    </style:style>
    <style:style style:name="P237" style:family="paragraph" style:parent-style-name="Text_20_body">
      <style:text-properties fo:language="la" fo:country="VA" officeooo:rsid="06b9d1b8" officeooo:paragraph-rsid="06b9d1b8"/>
    </style:style>
    <style:style style:name="P238" style:family="paragraph" style:parent-style-name="Text_20_body">
      <style:text-properties fo:language="la" fo:country="VA" officeooo:rsid="06bb9191" officeooo:paragraph-rsid="06bb9191"/>
    </style:style>
    <style:style style:name="P239" style:family="paragraph" style:parent-style-name="Text_20_body">
      <style:paragraph-properties fo:text-align="start" style:justify-single-word="false"/>
      <style:text-properties fo:language="la" fo:country="VA" officeooo:rsid="06bc1221" officeooo:paragraph-rsid="06bc1221"/>
    </style:style>
    <style:style style:name="P240" style:family="paragraph" style:parent-style-name="Text_20_body">
      <style:paragraph-properties fo:text-align="start" style:justify-single-word="false"/>
      <style:text-properties fo:language="la" fo:country="VA" officeooo:rsid="06bd62ad" officeooo:paragraph-rsid="06bd62ad"/>
    </style:style>
    <style:style style:name="P241" style:family="paragraph" style:parent-style-name="Text_20_body">
      <style:paragraph-properties fo:text-align="start" style:justify-single-word="false"/>
      <style:text-properties fo:language="la" fo:country="VA" officeooo:rsid="06bd9ed3" officeooo:paragraph-rsid="06bd9ed3"/>
    </style:style>
    <style:style style:name="P242" style:family="paragraph" style:parent-style-name="Text_20_body">
      <style:paragraph-properties fo:text-align="start" style:justify-single-word="false"/>
      <style:text-properties fo:language="la" fo:country="VA" officeooo:rsid="06bdb416" officeooo:paragraph-rsid="06bdb416"/>
    </style:style>
    <style:style style:name="P243" style:family="paragraph" style:parent-style-name="Text_20_body">
      <style:paragraph-properties fo:text-align="start" style:justify-single-word="false"/>
      <style:text-properties fo:language="la" fo:country="VA" officeooo:rsid="06beefbf" officeooo:paragraph-rsid="06beefbf"/>
    </style:style>
    <style:style style:name="P244" style:family="paragraph" style:parent-style-name="Text_20_body">
      <style:paragraph-properties fo:text-align="start" style:justify-single-word="false"/>
      <style:text-properties fo:language="la" fo:country="VA" officeooo:rsid="06c2ab3b" officeooo:paragraph-rsid="06c2ab3b"/>
    </style:style>
    <style:style style:name="P245" style:family="paragraph" style:parent-style-name="Text_20_body">
      <style:paragraph-properties fo:text-align="start" style:justify-single-word="false"/>
      <style:text-properties fo:language="la" fo:country="VA" officeooo:rsid="06c7e265" officeooo:paragraph-rsid="06c7e265"/>
    </style:style>
    <style:style style:name="P246" style:family="paragraph" style:parent-style-name="Text_20_body">
      <style:paragraph-properties fo:text-align="start" style:justify-single-word="false"/>
      <style:text-properties fo:language="la" fo:country="VA" officeooo:rsid="06c9e352" officeooo:paragraph-rsid="06caf37a"/>
    </style:style>
    <style:style style:name="P247" style:family="paragraph" style:parent-style-name="Text_20_body">
      <style:paragraph-properties fo:text-align="start" style:justify-single-word="false"/>
      <style:text-properties fo:language="la" fo:country="VA" officeooo:rsid="06caf37a" officeooo:paragraph-rsid="06caf37a"/>
    </style:style>
    <style:style style:name="P248" style:family="paragraph" style:parent-style-name="Text_20_body">
      <style:paragraph-properties fo:text-align="start" style:justify-single-word="false"/>
      <style:text-properties fo:language="la" fo:country="VA" officeooo:rsid="06ce006a" officeooo:paragraph-rsid="06cfa1dd"/>
    </style:style>
    <style:style style:name="P249" style:family="paragraph" style:parent-style-name="Text_20_body">
      <style:paragraph-properties fo:text-align="start" style:justify-single-word="false"/>
      <style:text-properties fo:language="la" fo:country="VA" officeooo:rsid="06d1361b" officeooo:paragraph-rsid="06d1361b"/>
    </style:style>
    <style:style style:name="P250" style:family="paragraph" style:parent-style-name="Text_20_body">
      <style:paragraph-properties fo:text-align="start" style:justify-single-word="false"/>
      <style:text-properties fo:language="la" fo:country="VA" officeooo:rsid="06d25ce0" officeooo:paragraph-rsid="06d25ce0"/>
    </style:style>
    <style:style style:name="P251" style:family="paragraph" style:parent-style-name="Text_20_body">
      <style:paragraph-properties fo:text-align="start" style:justify-single-word="false"/>
      <style:text-properties fo:language="la" fo:country="VA" officeooo:rsid="06d2fd35" officeooo:paragraph-rsid="06d2fd35"/>
    </style:style>
    <style:style style:name="P252" style:family="paragraph" style:parent-style-name="Text_20_body">
      <style:text-properties fo:language="la" fo:country="VA" officeooo:rsid="06d2fd35" officeooo:paragraph-rsid="06d2fd35"/>
    </style:style>
    <style:style style:name="P253" style:family="paragraph" style:parent-style-name="Text_20_body">
      <style:text-properties fo:language="la" fo:country="VA" officeooo:rsid="06d43135" officeooo:paragraph-rsid="06d557af"/>
    </style:style>
    <style:style style:name="P254" style:family="paragraph" style:parent-style-name="Text_20_body">
      <style:text-properties fo:language="la" fo:country="VA" officeooo:rsid="06d43135" officeooo:paragraph-rsid="06d43135"/>
    </style:style>
    <style:style style:name="P255" style:family="paragraph" style:parent-style-name="Text_20_body">
      <style:text-properties fo:language="la" fo:country="VA" officeooo:rsid="06d47a1d" officeooo:paragraph-rsid="06d47a1d"/>
    </style:style>
    <style:style style:name="P256" style:family="paragraph" style:parent-style-name="Text_20_body">
      <style:text-properties fo:language="la" fo:country="VA" officeooo:rsid="06d557af" officeooo:paragraph-rsid="06d557af"/>
    </style:style>
    <style:style style:name="P257" style:family="paragraph" style:parent-style-name="Text_20_body">
      <style:paragraph-properties fo:text-align="start" style:justify-single-word="false"/>
      <style:text-properties fo:language="la" fo:country="VA" officeooo:rsid="06d683bd" officeooo:paragraph-rsid="06d91cf3"/>
    </style:style>
    <style:style style:name="P258" style:family="paragraph" style:parent-style-name="Text_20_body">
      <style:paragraph-properties fo:text-align="start" style:justify-single-word="false"/>
      <style:text-properties fo:language="la" fo:country="VA" officeooo:rsid="06d91cf3" officeooo:paragraph-rsid="06d91cf3"/>
    </style:style>
    <style:style style:name="P259" style:family="paragraph" style:parent-style-name="Text_20_body">
      <style:text-properties fo:language="la" fo:country="VA" officeooo:rsid="06d91cf3" officeooo:paragraph-rsid="06d91cf3"/>
    </style:style>
    <style:style style:name="P260" style:family="paragraph" style:parent-style-name="Text_20_body">
      <style:text-properties fo:language="la" fo:country="VA" officeooo:rsid="06e0903e" officeooo:paragraph-rsid="06e0903e"/>
    </style:style>
    <style:style style:name="P261" style:family="paragraph" style:parent-style-name="Text_20_body">
      <style:text-properties fo:language="la" fo:country="VA" officeooo:rsid="06e0ad23" officeooo:paragraph-rsid="06e0ad23"/>
    </style:style>
    <style:style style:name="P262" style:family="paragraph" style:parent-style-name="Text_20_body">
      <style:text-properties fo:language="la" fo:country="VA" officeooo:rsid="06e1374c" officeooo:paragraph-rsid="06e1374c"/>
    </style:style>
    <style:style style:name="P263" style:family="paragraph" style:parent-style-name="Text_20_body">
      <style:text-properties fo:language="la" fo:country="VA" officeooo:rsid="06e1374c" officeooo:paragraph-rsid="06e2bb1c"/>
    </style:style>
    <style:style style:name="P264" style:family="paragraph" style:parent-style-name="Text_20_body">
      <style:text-properties fo:language="la" fo:country="VA" officeooo:rsid="06e1374c" officeooo:paragraph-rsid="06e4f93a"/>
    </style:style>
    <style:style style:name="P265" style:family="paragraph" style:parent-style-name="Text_20_body">
      <style:text-properties fo:language="la" fo:country="VA" officeooo:rsid="06e2bb1c" officeooo:paragraph-rsid="06e2bb1c"/>
    </style:style>
    <style:style style:name="P266" style:family="paragraph" style:parent-style-name="Text_20_body">
      <style:text-properties fo:language="la" fo:country="VA" officeooo:rsid="06e2bb1c" officeooo:paragraph-rsid="06e42486"/>
    </style:style>
    <style:style style:name="P267" style:family="paragraph" style:parent-style-name="Text_20_body">
      <style:text-properties fo:language="la" fo:country="VA" officeooo:rsid="06e4f93a" officeooo:paragraph-rsid="06e4f93a"/>
    </style:style>
    <style:style style:name="P268" style:family="paragraph" style:parent-style-name="Text_20_body">
      <style:text-properties fo:language="la" fo:country="VA" officeooo:rsid="06e4f93a" officeooo:paragraph-rsid="06e6cc65"/>
    </style:style>
    <style:style style:name="P269" style:family="paragraph" style:parent-style-name="Text_20_body">
      <style:text-properties fo:language="la" fo:country="VA" officeooo:rsid="06e9e853" officeooo:paragraph-rsid="06ea91a8"/>
    </style:style>
    <style:style style:name="P270" style:family="paragraph" style:parent-style-name="Text_20_body">
      <style:text-properties fo:language="la" fo:country="VA" officeooo:rsid="06e9e853" officeooo:paragraph-rsid="06ed231b"/>
    </style:style>
    <style:style style:name="P271" style:family="paragraph" style:parent-style-name="Text_20_body">
      <style:text-properties fo:language="la" fo:country="VA" officeooo:rsid="06ea91a8" officeooo:paragraph-rsid="06ea91a8"/>
    </style:style>
    <style:style style:name="P272" style:family="paragraph" style:parent-style-name="Text_20_body">
      <style:text-properties fo:language="la" fo:country="VA" officeooo:rsid="06ebae43" officeooo:paragraph-rsid="06ebae43"/>
    </style:style>
    <style:style style:name="P273" style:family="paragraph" style:parent-style-name="Text_20_body">
      <style:paragraph-properties fo:text-align="start" style:justify-single-word="false"/>
      <style:text-properties fo:language="la" fo:country="VA" officeooo:rsid="06f15b27" officeooo:paragraph-rsid="06f15b27"/>
    </style:style>
    <style:style style:name="P274" style:family="paragraph" style:parent-style-name="Text_20_body">
      <style:paragraph-properties fo:text-align="start" style:justify-single-word="false"/>
      <style:text-properties fo:language="la" fo:country="VA" officeooo:rsid="06f1b8b4" officeooo:paragraph-rsid="06f1b8b4"/>
    </style:style>
    <style:style style:name="P275" style:family="paragraph" style:parent-style-name="Text_20_body">
      <style:paragraph-properties fo:text-align="start" style:justify-single-word="false"/>
      <style:text-properties fo:language="la" fo:country="VA" officeooo:rsid="06f1b8b4" officeooo:paragraph-rsid="06f31158"/>
    </style:style>
    <style:style style:name="P276" style:family="paragraph" style:parent-style-name="Text_20_body">
      <style:paragraph-properties fo:text-align="start" style:justify-single-word="false"/>
      <style:text-properties fo:language="la" fo:country="VA" officeooo:rsid="06f1b8b4" officeooo:paragraph-rsid="06f50fd7"/>
    </style:style>
    <style:style style:name="P277" style:family="paragraph" style:parent-style-name="Text_20_body">
      <style:paragraph-properties fo:text-align="start" style:justify-single-word="false"/>
      <style:text-properties fo:language="la" fo:country="VA" officeooo:rsid="06f1b8b4" officeooo:paragraph-rsid="06f5fe90"/>
    </style:style>
    <style:style style:name="P278" style:family="paragraph" style:parent-style-name="Text_20_body">
      <style:paragraph-properties fo:text-align="start" style:justify-single-word="false"/>
      <style:text-properties fo:language="la" fo:country="VA" officeooo:rsid="06f1b8b4" officeooo:paragraph-rsid="0702791e"/>
    </style:style>
    <style:style style:name="P279" style:family="paragraph" style:parent-style-name="Text_20_body">
      <style:paragraph-properties fo:text-align="start" style:justify-single-word="false"/>
      <style:text-properties fo:language="la" fo:country="VA" officeooo:rsid="06f5fe90" officeooo:paragraph-rsid="06f5fe90"/>
    </style:style>
    <style:style style:name="P280" style:family="paragraph" style:parent-style-name="Text_20_body">
      <style:paragraph-properties fo:text-align="start" style:justify-single-word="false"/>
      <style:text-properties fo:language="la" fo:country="VA" officeooo:rsid="0702791e" officeooo:paragraph-rsid="0702791e"/>
    </style:style>
    <style:style style:name="P281" style:family="paragraph" style:parent-style-name="Text_20_body">
      <style:paragraph-properties fo:text-align="start" style:justify-single-word="false"/>
      <style:text-properties fo:language="la" fo:country="VA" officeooo:rsid="0704ecab" officeooo:paragraph-rsid="0704ecab"/>
    </style:style>
    <style:style style:name="P282" style:family="paragraph" style:parent-style-name="Text_20_body">
      <style:text-properties fo:language="la" fo:country="VA" officeooo:rsid="070c8e83" officeooo:paragraph-rsid="070c8e83"/>
    </style:style>
    <style:style style:name="P283" style:family="paragraph" style:parent-style-name="Text_20_body">
      <style:text-properties fo:language="la" fo:country="VA" officeooo:rsid="070c8e83" officeooo:paragraph-rsid="070e71fb"/>
    </style:style>
    <style:style style:name="P284" style:family="paragraph" style:parent-style-name="Text_20_body">
      <style:text-properties fo:language="la" fo:country="VA" officeooo:rsid="070e71fb" officeooo:paragraph-rsid="070e71fb"/>
    </style:style>
    <style:style style:name="P285" style:family="paragraph" style:parent-style-name="Text_20_body">
      <style:text-properties fo:language="la" fo:country="VA" officeooo:rsid="070e71fb" officeooo:paragraph-rsid="070fd727"/>
    </style:style>
    <style:style style:name="P286" style:family="paragraph" style:parent-style-name="Text_20_body">
      <style:text-properties fo:language="la" fo:country="VA" officeooo:rsid="070fd727" officeooo:paragraph-rsid="070fd727"/>
    </style:style>
    <style:style style:name="P287" style:family="paragraph" style:parent-style-name="Text_20_body">
      <style:text-properties fo:language="la" fo:country="VA" officeooo:rsid="0711a290" officeooo:paragraph-rsid="0711a290"/>
    </style:style>
    <style:style style:name="P288" style:family="paragraph" style:parent-style-name="Text_20_body">
      <style:text-properties fo:language="la" fo:country="VA" officeooo:rsid="0711a290" officeooo:paragraph-rsid="07195aa8"/>
    </style:style>
    <style:style style:name="P289" style:family="paragraph" style:parent-style-name="Text_20_body">
      <style:text-properties fo:language="la" fo:country="VA" officeooo:rsid="07195aa8" officeooo:paragraph-rsid="07195aa8"/>
    </style:style>
    <style:style style:name="P290" style:family="paragraph" style:parent-style-name="Text_20_body">
      <style:text-properties fo:language="la" fo:country="VA" officeooo:rsid="071abbea" officeooo:paragraph-rsid="071abbea"/>
    </style:style>
    <style:style style:name="P291" style:family="paragraph" style:parent-style-name="Text_20_body">
      <style:text-properties fo:language="la" fo:country="VA" officeooo:rsid="071c11d0" officeooo:paragraph-rsid="071c11d0"/>
    </style:style>
    <style:style style:name="P292" style:family="paragraph" style:parent-style-name="Text_20_body">
      <style:text-properties fo:language="la" fo:country="VA" officeooo:rsid="071d2d09" officeooo:paragraph-rsid="071d2d09"/>
    </style:style>
    <style:style style:name="P293" style:family="paragraph" style:parent-style-name="Text_20_body">
      <style:text-properties fo:language="la" fo:country="VA" officeooo:rsid="071d2d09" officeooo:paragraph-rsid="071fd522"/>
    </style:style>
    <style:style style:name="P294" style:family="paragraph" style:parent-style-name="Text_20_body">
      <style:text-properties fo:language="la" fo:country="VA" officeooo:rsid="071fd522" officeooo:paragraph-rsid="071fd522"/>
    </style:style>
    <style:style style:name="P295" style:family="paragraph" style:parent-style-name="Text_20_body">
      <style:text-properties fo:language="la" fo:country="VA" officeooo:rsid="0720072d" officeooo:paragraph-rsid="0720072d"/>
    </style:style>
    <style:style style:name="P296" style:family="paragraph" style:parent-style-name="Text_20_body">
      <style:text-properties fo:language="la" fo:country="VA" officeooo:rsid="0720072d" officeooo:paragraph-rsid="07219b44"/>
    </style:style>
    <style:style style:name="P297" style:family="paragraph" style:parent-style-name="Text_20_body">
      <style:text-properties fo:language="la" fo:country="VA" officeooo:rsid="07242819" officeooo:paragraph-rsid="071d2d09"/>
    </style:style>
    <style:style style:name="P298" style:family="paragraph" style:parent-style-name="Text_20_body">
      <style:text-properties fo:language="la" fo:country="VA" officeooo:rsid="07242819" officeooo:paragraph-rsid="07242819"/>
    </style:style>
    <style:style style:name="P299" style:family="paragraph" style:parent-style-name="Text_20_body">
      <style:text-properties fo:language="la" fo:country="VA" officeooo:rsid="07262715" officeooo:paragraph-rsid="07262715"/>
    </style:style>
    <style:style style:name="P300" style:family="paragraph" style:parent-style-name="Text_20_body">
      <style:text-properties fo:language="la" fo:country="VA" officeooo:rsid="07275df0" officeooo:paragraph-rsid="07275df0"/>
    </style:style>
    <style:style style:name="P301" style:family="paragraph" style:parent-style-name="Text_20_body">
      <style:text-properties fo:language="la" fo:country="VA" officeooo:rsid="0727a4b5" officeooo:paragraph-rsid="0727a4b5"/>
    </style:style>
    <style:style style:name="P302" style:family="paragraph" style:parent-style-name="Text_20_body">
      <style:text-properties fo:language="la" fo:country="VA" officeooo:rsid="072834f3" officeooo:paragraph-rsid="072834f3"/>
    </style:style>
    <style:style style:name="P303" style:family="paragraph" style:parent-style-name="Text_20_body">
      <style:text-properties fo:language="la" fo:country="VA" officeooo:rsid="072885cd" officeooo:paragraph-rsid="072885cd"/>
    </style:style>
    <style:style style:name="P304" style:family="paragraph" style:parent-style-name="Text_20_body">
      <style:text-properties fo:language="la" fo:country="VA" officeooo:rsid="0729c6ff" officeooo:paragraph-rsid="0729c6ff"/>
    </style:style>
    <style:style style:name="P305" style:family="paragraph" style:parent-style-name="Text_20_body">
      <style:text-properties fo:language="la" fo:country="VA" officeooo:rsid="072b7543" officeooo:paragraph-rsid="072b7543"/>
    </style:style>
    <style:style style:name="P306" style:family="paragraph" style:parent-style-name="Text_20_body">
      <style:text-properties fo:language="la" fo:country="VA" officeooo:rsid="072b822c" officeooo:paragraph-rsid="072b822c"/>
    </style:style>
    <style:style style:name="P307" style:family="paragraph" style:parent-style-name="Text_20_body">
      <style:text-properties fo:language="la" fo:country="VA" officeooo:rsid="072b9f8c" officeooo:paragraph-rsid="072b9f8c"/>
    </style:style>
    <style:style style:name="P308" style:family="paragraph" style:parent-style-name="Text_20_body">
      <style:text-properties fo:language="la" fo:country="VA" officeooo:rsid="072b9f8c" officeooo:paragraph-rsid="072d6f7f"/>
    </style:style>
    <style:style style:name="P309" style:family="paragraph" style:parent-style-name="Text_20_body">
      <style:text-properties fo:language="la" fo:country="VA" officeooo:rsid="072b9f8c" officeooo:paragraph-rsid="072f58fc"/>
    </style:style>
    <style:style style:name="P310" style:family="paragraph" style:parent-style-name="Text_20_body">
      <style:text-properties fo:language="la" fo:country="VA" officeooo:rsid="072d6f7f" officeooo:paragraph-rsid="072d6f7f"/>
    </style:style>
    <style:style style:name="P311" style:family="paragraph" style:parent-style-name="Text_20_body">
      <style:text-properties fo:language="la" fo:country="VA" officeooo:rsid="072f58fc" officeooo:paragraph-rsid="072f58fc"/>
    </style:style>
    <style:style style:name="P312" style:family="paragraph" style:parent-style-name="Text_20_body">
      <style:text-properties fo:language="la" fo:country="VA" officeooo:rsid="07328e38" officeooo:paragraph-rsid="07328e38"/>
    </style:style>
    <style:style style:name="P313" style:family="paragraph" style:parent-style-name="Text_20_body">
      <style:text-properties fo:language="la" fo:country="VA" officeooo:rsid="0733b4eb" officeooo:paragraph-rsid="0733b4eb"/>
    </style:style>
    <style:style style:name="P314" style:family="paragraph" style:parent-style-name="Text_20_body">
      <style:text-properties fo:language="la" fo:country="VA" officeooo:rsid="0734eb68" officeooo:paragraph-rsid="0734eb68"/>
    </style:style>
    <style:style style:name="P315" style:family="paragraph" style:parent-style-name="Text_20_body">
      <style:text-properties fo:language="la" fo:country="VA" officeooo:rsid="07359737" officeooo:paragraph-rsid="07359737"/>
    </style:style>
    <style:style style:name="P316" style:family="paragraph" style:parent-style-name="Text_20_body">
      <style:text-properties fo:language="la" fo:country="VA" officeooo:rsid="0737502e" officeooo:paragraph-rsid="0737502e"/>
    </style:style>
    <style:style style:name="P317" style:family="paragraph" style:parent-style-name="Text_20_body">
      <style:text-properties fo:language="la" fo:country="VA" officeooo:rsid="07386fa3" officeooo:paragraph-rsid="0739e3ee"/>
    </style:style>
    <style:style style:name="P318" style:family="paragraph" style:parent-style-name="Text_20_body">
      <style:text-properties fo:language="la" fo:country="VA" officeooo:rsid="0739e3ee" officeooo:paragraph-rsid="0739e3ee"/>
    </style:style>
    <style:style style:name="P319" style:family="paragraph" style:parent-style-name="Text_20_body">
      <style:paragraph-properties fo:text-align="start" style:justify-single-word="false"/>
      <style:text-properties fo:language="la" fo:country="VA" officeooo:rsid="0739e3ee" officeooo:paragraph-rsid="0739e3ee"/>
    </style:style>
    <style:style style:name="P320" style:family="paragraph" style:parent-style-name="Text_20_body">
      <style:paragraph-properties fo:text-align="start" style:justify-single-word="false"/>
      <style:text-properties fo:language="la" fo:country="VA" officeooo:rsid="073b7488" officeooo:paragraph-rsid="073c08e3"/>
    </style:style>
    <style:style style:name="P321" style:family="paragraph" style:parent-style-name="Text_20_body">
      <style:paragraph-properties fo:text-align="start" style:justify-single-word="false"/>
      <style:text-properties fo:language="la" fo:country="VA" officeooo:rsid="073b7488" officeooo:paragraph-rsid="073d3891"/>
    </style:style>
    <style:style style:name="P322" style:family="paragraph" style:parent-style-name="Text_20_body">
      <style:paragraph-properties fo:text-align="start" style:justify-single-word="false"/>
      <style:text-properties fo:language="la" fo:country="VA" officeooo:rsid="073e452c" officeooo:paragraph-rsid="073e452c"/>
    </style:style>
    <style:style style:name="P323" style:family="paragraph" style:parent-style-name="Text_20_body">
      <style:paragraph-properties fo:text-align="start" style:justify-single-word="false"/>
      <style:text-properties fo:language="la" fo:country="VA" officeooo:rsid="073f7db3" officeooo:paragraph-rsid="073f7db3"/>
    </style:style>
    <style:style style:name="P324" style:family="paragraph" style:parent-style-name="Text_20_body">
      <style:paragraph-properties fo:text-align="start" style:justify-single-word="false"/>
      <style:text-properties fo:language="la" fo:country="VA" officeooo:rsid="073f7ff3" officeooo:paragraph-rsid="073f7ff3"/>
    </style:style>
    <style:style style:name="P325" style:family="paragraph" style:parent-style-name="Text_20_body">
      <style:paragraph-properties fo:text-align="start" style:justify-single-word="false"/>
      <style:text-properties fo:language="la" fo:country="VA" officeooo:rsid="074137a5" officeooo:paragraph-rsid="07465414"/>
    </style:style>
    <style:style style:name="P326" style:family="paragraph" style:parent-style-name="Text_20_body">
      <style:paragraph-properties fo:text-align="start" style:justify-single-word="false"/>
      <style:text-properties fo:language="la" fo:country="VA" officeooo:rsid="074137a5" officeooo:paragraph-rsid="0747bb6d"/>
    </style:style>
    <style:style style:name="P327" style:family="paragraph" style:parent-style-name="Text_20_body">
      <style:paragraph-properties fo:text-align="start" style:justify-single-word="false"/>
      <style:text-properties fo:language="la" fo:country="VA" officeooo:rsid="074137a5" officeooo:paragraph-rsid="0748be3e"/>
    </style:style>
    <style:style style:name="P328" style:family="paragraph" style:parent-style-name="Text_20_body">
      <style:paragraph-properties fo:text-align="start" style:justify-single-word="false"/>
      <style:text-properties fo:language="la" fo:country="VA" officeooo:rsid="074137a5" officeooo:paragraph-rsid="074ae208"/>
    </style:style>
    <style:style style:name="P329" style:family="paragraph" style:parent-style-name="Text_20_body">
      <style:paragraph-properties fo:text-align="start" style:justify-single-word="false"/>
      <style:text-properties fo:language="la" fo:country="VA" officeooo:rsid="074137a5" officeooo:paragraph-rsid="07555e1a"/>
    </style:style>
    <style:style style:name="P330" style:family="paragraph" style:parent-style-name="Text_20_body">
      <style:paragraph-properties fo:text-align="start" style:justify-single-word="false"/>
      <style:text-properties fo:language="la" fo:country="VA" officeooo:rsid="0742aea0" officeooo:paragraph-rsid="0742aea0"/>
    </style:style>
    <style:style style:name="P331" style:family="paragraph" style:parent-style-name="Text_20_body">
      <style:paragraph-properties fo:text-align="start" style:justify-single-word="false"/>
      <style:text-properties fo:language="la" fo:country="VA" officeooo:rsid="0744ac0e" officeooo:paragraph-rsid="0744ac0e"/>
    </style:style>
    <style:style style:name="P332" style:family="paragraph" style:parent-style-name="Text_20_body">
      <style:paragraph-properties fo:text-align="start" style:justify-single-word="false"/>
      <style:text-properties fo:language="la" fo:country="VA" officeooo:rsid="0748be3e" officeooo:paragraph-rsid="0748be3e"/>
    </style:style>
    <style:style style:name="P333" style:family="paragraph" style:parent-style-name="Text_20_body">
      <style:paragraph-properties fo:text-align="start" style:justify-single-word="false"/>
      <style:text-properties fo:language="la" fo:country="VA" officeooo:rsid="074ae208" officeooo:paragraph-rsid="074ae208"/>
    </style:style>
    <style:style style:name="P334" style:family="paragraph" style:parent-style-name="Text_20_body">
      <style:paragraph-properties fo:text-align="start" style:justify-single-word="false"/>
      <style:text-properties fo:language="la" fo:country="VA" officeooo:rsid="074ae208" officeooo:paragraph-rsid="074ccf06"/>
    </style:style>
    <style:style style:name="P335" style:family="paragraph" style:parent-style-name="Text_20_body">
      <style:paragraph-properties fo:text-align="start" style:justify-single-word="false"/>
      <style:text-properties fo:language="la" fo:country="VA" officeooo:rsid="074ccf06" officeooo:paragraph-rsid="074ccf06"/>
    </style:style>
    <style:style style:name="P336" style:family="paragraph" style:parent-style-name="Text_20_body">
      <style:paragraph-properties fo:text-align="start" style:justify-single-word="false"/>
      <style:text-properties fo:language="la" fo:country="VA" officeooo:rsid="074d4e34" officeooo:paragraph-rsid="074d4e34"/>
    </style:style>
    <style:style style:name="P337" style:family="paragraph" style:parent-style-name="Text_20_body">
      <style:paragraph-properties fo:text-align="start" style:justify-single-word="false"/>
      <style:text-properties fo:language="la" fo:country="VA" officeooo:rsid="074fd5cc" officeooo:paragraph-rsid="074fd5cc"/>
    </style:style>
    <style:style style:name="P338" style:family="paragraph" style:parent-style-name="Text_20_body">
      <style:paragraph-properties fo:text-align="start" style:justify-single-word="false"/>
      <style:text-properties fo:language="la" fo:country="VA" officeooo:rsid="0751bb60" officeooo:paragraph-rsid="0751bb60"/>
    </style:style>
    <style:style style:name="P339" style:family="paragraph" style:parent-style-name="Text_20_body">
      <style:paragraph-properties fo:text-align="start" style:justify-single-word="false"/>
      <style:text-properties fo:language="la" fo:country="VA" officeooo:rsid="07555e1a" officeooo:paragraph-rsid="07555e1a"/>
    </style:style>
    <style:style style:name="P340" style:family="paragraph" style:parent-style-name="Text_20_body">
      <style:paragraph-properties fo:text-align="start" style:justify-single-word="false"/>
      <style:text-properties fo:language="la" fo:country="VA" officeooo:rsid="0758053a" officeooo:paragraph-rsid="075722c6"/>
    </style:style>
    <style:style style:name="P341" style:family="paragraph" style:parent-style-name="Text_20_body">
      <style:paragraph-properties fo:text-align="start" style:justify-single-word="false"/>
      <style:text-properties fo:language="la" fo:country="VA" officeooo:rsid="0758053a" officeooo:paragraph-rsid="0758053a"/>
    </style:style>
    <style:style style:name="P342" style:family="paragraph" style:parent-style-name="Text_20_body">
      <style:paragraph-properties fo:text-align="start" style:justify-single-word="false"/>
      <style:text-properties fo:language="la" fo:country="VA" officeooo:rsid="0759b5ef" officeooo:paragraph-rsid="075cfc26"/>
    </style:style>
    <style:style style:name="P343" style:family="paragraph" style:parent-style-name="Text_20_body">
      <style:paragraph-properties fo:text-align="start" style:justify-single-word="false"/>
      <style:text-properties fo:language="la" fo:country="VA" officeooo:rsid="0759b5ef" officeooo:paragraph-rsid="0760788a"/>
    </style:style>
    <style:style style:name="P344" style:family="paragraph" style:parent-style-name="Text_20_body">
      <style:paragraph-properties fo:text-align="start" style:justify-single-word="false"/>
      <style:text-properties fo:language="la" fo:country="VA" officeooo:rsid="0759b5ef" officeooo:paragraph-rsid="076321ee"/>
    </style:style>
    <style:style style:name="P345" style:family="paragraph" style:parent-style-name="Text_20_body">
      <style:paragraph-properties fo:text-align="start" style:justify-single-word="false"/>
      <style:text-properties fo:language="la" fo:country="VA" officeooo:rsid="0760788a" officeooo:paragraph-rsid="0760788a"/>
    </style:style>
    <style:style style:name="P346" style:family="paragraph" style:parent-style-name="Text_20_body">
      <style:paragraph-properties fo:text-align="start" style:justify-single-word="false"/>
      <style:text-properties fo:language="la" fo:country="VA" officeooo:rsid="07626941" officeooo:paragraph-rsid="07626941"/>
    </style:style>
    <style:style style:name="P347" style:family="paragraph" style:parent-style-name="Text_20_body">
      <style:paragraph-properties fo:text-align="start" style:justify-single-word="false"/>
      <style:text-properties fo:language="la" fo:country="VA" officeooo:rsid="076321ee" officeooo:paragraph-rsid="076321ee"/>
    </style:style>
    <style:style style:name="P348" style:family="paragraph" style:parent-style-name="Text_20_body">
      <style:paragraph-properties fo:text-align="start" style:justify-single-word="false"/>
      <style:text-properties fo:language="la" fo:country="VA" officeooo:rsid="07651192" officeooo:paragraph-rsid="07651192"/>
    </style:style>
    <style:style style:name="P349" style:family="paragraph" style:parent-style-name="Text_20_body">
      <style:paragraph-properties fo:text-align="start" style:justify-single-word="false"/>
      <style:text-properties fo:language="la" fo:country="VA" officeooo:rsid="07651192" officeooo:paragraph-rsid="07664f11"/>
    </style:style>
    <style:style style:name="P350" style:family="paragraph" style:parent-style-name="Text_20_body">
      <style:paragraph-properties fo:text-align="start" style:justify-single-word="false"/>
      <style:text-properties fo:language="la" fo:country="VA" officeooo:rsid="07683c12" officeooo:paragraph-rsid="07683c12"/>
    </style:style>
    <style:style style:name="P351" style:family="paragraph" style:parent-style-name="Text_20_body">
      <style:paragraph-properties fo:text-align="start" style:justify-single-word="false"/>
      <style:text-properties fo:language="la" fo:country="VA" officeooo:rsid="07683c12" officeooo:paragraph-rsid="0769f249"/>
    </style:style>
    <style:style style:name="P352" style:family="paragraph" style:parent-style-name="Text_20_body">
      <style:paragraph-properties fo:text-align="start" style:justify-single-word="false"/>
      <style:text-properties fo:language="la" fo:country="VA" officeooo:rsid="0769f249" officeooo:paragraph-rsid="0769f249"/>
    </style:style>
    <style:style style:name="P353" style:family="paragraph" style:parent-style-name="Text_20_body">
      <style:paragraph-properties fo:text-align="start" style:justify-single-word="false"/>
      <style:text-properties fo:language="la" fo:country="VA" officeooo:rsid="076b8e32" officeooo:paragraph-rsid="076b8e32"/>
    </style:style>
    <style:style style:name="P354" style:family="paragraph" style:parent-style-name="Text_20_body">
      <style:paragraph-properties fo:text-align="start" style:justify-single-word="false"/>
      <style:text-properties fo:language="la" fo:country="VA" officeooo:rsid="076c35e8" officeooo:paragraph-rsid="076c35e8"/>
    </style:style>
    <style:style style:name="P355" style:family="paragraph" style:parent-style-name="Text_20_body">
      <style:paragraph-properties fo:text-align="start" style:justify-single-word="false"/>
      <style:text-properties fo:language="la" fo:country="VA" officeooo:rsid="07718b3b" officeooo:paragraph-rsid="07718b3b"/>
    </style:style>
    <style:style style:name="P356" style:family="paragraph" style:parent-style-name="Text_20_body">
      <style:paragraph-properties fo:text-align="start" style:justify-single-word="false"/>
      <style:text-properties fo:language="la" fo:country="VA" officeooo:rsid="0772c80c" officeooo:paragraph-rsid="0772c80c"/>
    </style:style>
    <style:style style:name="P357" style:family="paragraph" style:parent-style-name="Text_20_body">
      <style:paragraph-properties fo:text-align="start" style:justify-single-word="false"/>
      <style:text-properties fo:language="la" fo:country="VA" officeooo:rsid="0772e0a5" officeooo:paragraph-rsid="0772e0a5"/>
    </style:style>
    <style:style style:name="P358" style:family="paragraph" style:parent-style-name="Text_20_body">
      <style:paragraph-properties fo:text-align="start" style:justify-single-word="false"/>
      <style:text-properties fo:language="la" fo:country="VA" officeooo:rsid="0774219e" officeooo:paragraph-rsid="077615d8"/>
    </style:style>
    <style:style style:name="P359" style:family="paragraph" style:parent-style-name="Text_20_body">
      <style:paragraph-properties fo:text-align="start" style:justify-single-word="false"/>
      <style:text-properties fo:language="la" fo:country="VA" officeooo:rsid="07762ab9" officeooo:paragraph-rsid="07773d96"/>
    </style:style>
    <style:style style:name="P360" style:family="paragraph" style:parent-style-name="Text_20_body">
      <style:paragraph-properties fo:text-align="start" style:justify-single-word="false"/>
      <style:text-properties fo:language="la" fo:country="VA" officeooo:rsid="07762ab9" officeooo:paragraph-rsid="077b6fbb"/>
    </style:style>
    <style:style style:name="P361" style:family="paragraph" style:parent-style-name="Text_20_body">
      <style:paragraph-properties fo:text-align="start" style:justify-single-word="false"/>
      <style:text-properties fo:language="la" fo:country="VA" officeooo:rsid="07762ab9" officeooo:paragraph-rsid="077cb00f"/>
    </style:style>
    <style:style style:name="P362" style:family="paragraph" style:parent-style-name="Text_20_body">
      <style:paragraph-properties fo:text-align="start" style:justify-single-word="false"/>
      <style:text-properties fo:language="la" fo:country="VA" officeooo:rsid="07762ab9" officeooo:paragraph-rsid="077ed417"/>
    </style:style>
    <style:style style:name="P363" style:family="paragraph" style:parent-style-name="Text_20_body">
      <style:paragraph-properties fo:text-align="start" style:justify-single-word="false"/>
      <style:text-properties fo:language="la" fo:country="VA" officeooo:rsid="07762ab9" officeooo:paragraph-rsid="07802f05"/>
    </style:style>
    <style:style style:name="P364" style:family="paragraph" style:parent-style-name="Text_20_body">
      <style:paragraph-properties fo:text-align="start" style:justify-single-word="false"/>
      <style:text-properties fo:language="la" fo:country="VA" officeooo:rsid="077e525c" officeooo:paragraph-rsid="077e525c"/>
    </style:style>
    <style:style style:name="P365" style:family="paragraph" style:parent-style-name="Text_20_body">
      <style:paragraph-properties fo:text-align="start" style:justify-single-word="false"/>
      <style:text-properties fo:language="la" fo:country="VA" officeooo:rsid="07819666" officeooo:paragraph-rsid="07819666"/>
    </style:style>
    <style:style style:name="P366" style:family="paragraph" style:parent-style-name="Text_20_body">
      <style:paragraph-properties fo:text-align="start" style:justify-single-word="false"/>
      <style:text-properties fo:language="la" fo:country="VA" officeooo:rsid="07826717" officeooo:paragraph-rsid="07826717"/>
    </style:style>
    <style:style style:name="P367" style:family="paragraph" style:parent-style-name="Text_20_body">
      <style:paragraph-properties fo:text-align="start" style:justify-single-word="false"/>
      <style:text-properties fo:language="la" fo:country="VA" officeooo:rsid="0784106b" officeooo:paragraph-rsid="0784106b"/>
    </style:style>
    <style:style style:name="P368" style:family="paragraph" style:parent-style-name="Text_20_body">
      <style:paragraph-properties fo:text-align="start" style:justify-single-word="false"/>
      <style:text-properties fo:language="la" fo:country="VA" officeooo:rsid="0784fcde" officeooo:paragraph-rsid="0786507c"/>
    </style:style>
    <style:style style:name="P369" style:family="paragraph" style:parent-style-name="Text_20_body">
      <style:paragraph-properties fo:text-align="start" style:justify-single-word="false"/>
      <style:text-properties fo:language="la" fo:country="VA" officeooo:rsid="0787b643" officeooo:paragraph-rsid="0787b643"/>
    </style:style>
    <style:style style:name="P370" style:family="paragraph" style:parent-style-name="Text_20_body">
      <style:paragraph-properties fo:text-align="start" style:justify-single-word="false"/>
      <style:text-properties fo:language="la" fo:country="VA" officeooo:rsid="0787b643" officeooo:paragraph-rsid="078a3359"/>
    </style:style>
    <style:style style:name="P371" style:family="paragraph" style:parent-style-name="Text_20_body">
      <style:paragraph-properties fo:text-align="start" style:justify-single-word="false"/>
      <style:text-properties fo:language="la" fo:country="VA" officeooo:rsid="078858ed" officeooo:paragraph-rsid="078858ed"/>
    </style:style>
    <style:style style:name="P372" style:family="paragraph" style:parent-style-name="Text_20_body">
      <style:paragraph-properties fo:text-align="start" style:justify-single-word="false"/>
      <style:text-properties fo:language="la" fo:country="VA" officeooo:rsid="078ac0b6" officeooo:paragraph-rsid="078ac0b6"/>
    </style:style>
    <style:style style:name="P373" style:family="paragraph" style:parent-style-name="Text_20_body">
      <style:text-properties fo:language="la" fo:country="VA" officeooo:rsid="078f13a0" officeooo:paragraph-rsid="078f13a0"/>
    </style:style>
    <style:style style:name="P374" style:family="paragraph" style:parent-style-name="Text_20_body">
      <style:paragraph-properties fo:text-align="start" style:justify-single-word="false"/>
      <style:text-properties fo:language="la" fo:country="VA" officeooo:rsid="078f13a0" officeooo:paragraph-rsid="078f13a0"/>
    </style:style>
    <style:style style:name="P375" style:family="paragraph" style:parent-style-name="Text_20_body">
      <style:paragraph-properties fo:text-align="start" style:justify-single-word="false"/>
      <style:text-properties fo:language="la" fo:country="VA" officeooo:rsid="078feea1" officeooo:paragraph-rsid="078feea1"/>
    </style:style>
    <style:style style:name="P376" style:family="paragraph" style:parent-style-name="Text_20_body">
      <style:paragraph-properties fo:text-align="start" style:justify-single-word="false"/>
      <style:text-properties fo:language="la" fo:country="VA" officeooo:rsid="078feea1" officeooo:paragraph-rsid="0790847b"/>
    </style:style>
    <style:style style:name="P377" style:family="paragraph" style:parent-style-name="Text_20_body">
      <style:paragraph-properties fo:text-align="start" style:justify-single-word="false"/>
      <style:text-properties fo:language="la" fo:country="VA" officeooo:rsid="0790847b" officeooo:paragraph-rsid="0790847b"/>
    </style:style>
    <style:style style:name="P378" style:family="paragraph" style:parent-style-name="Text_20_body">
      <style:paragraph-properties fo:text-align="start" style:justify-single-word="false"/>
      <style:text-properties fo:language="la" fo:country="VA" officeooo:rsid="07926b8b" officeooo:paragraph-rsid="07926b8b"/>
    </style:style>
    <style:style style:name="P379" style:family="paragraph" style:parent-style-name="Text_20_body">
      <style:paragraph-properties fo:text-align="start" style:justify-single-word="false"/>
      <style:text-properties fo:language="la" fo:country="VA" officeooo:rsid="07926b8b" officeooo:paragraph-rsid="07952b23"/>
    </style:style>
    <style:style style:name="P380" style:family="paragraph" style:parent-style-name="Text_20_body">
      <style:paragraph-properties fo:text-align="start" style:justify-single-word="false"/>
      <style:text-properties fo:language="la" fo:country="VA" officeooo:rsid="07959121" officeooo:paragraph-rsid="07959121"/>
    </style:style>
    <style:style style:name="P381" style:family="paragraph" style:parent-style-name="Text_20_body">
      <style:paragraph-properties fo:text-align="start" style:justify-single-word="false"/>
      <style:text-properties fo:language="la" fo:country="VA" officeooo:rsid="0796b6cc" officeooo:paragraph-rsid="0796b6cc"/>
    </style:style>
    <style:style style:name="P382" style:family="paragraph" style:parent-style-name="Text_20_body">
      <style:paragraph-properties fo:text-align="start" style:justify-single-word="false"/>
      <style:text-properties fo:language="la" fo:country="VA" officeooo:rsid="0796bbed" officeooo:paragraph-rsid="0796bbed"/>
    </style:style>
    <style:style style:name="P383" style:family="paragraph" style:parent-style-name="Text_20_body">
      <style:paragraph-properties fo:text-align="start" style:justify-single-word="false"/>
      <style:text-properties fo:language="la" fo:country="VA" officeooo:rsid="0796c75c" officeooo:paragraph-rsid="0796c75c"/>
    </style:style>
    <style:style style:name="P384" style:family="paragraph" style:parent-style-name="Text_20_body">
      <style:paragraph-properties fo:text-align="start" style:justify-single-word="false"/>
      <style:text-properties fo:language="la" fo:country="VA" officeooo:rsid="07972a08" officeooo:paragraph-rsid="07972a08"/>
    </style:style>
    <style:style style:name="P385" style:family="paragraph" style:parent-style-name="Text_20_body">
      <style:paragraph-properties fo:text-align="start" style:justify-single-word="false"/>
      <style:text-properties fo:language="la" fo:country="VA" officeooo:rsid="07978f2c" officeooo:paragraph-rsid="07978f2c"/>
    </style:style>
    <style:style style:name="P386" style:family="paragraph" style:parent-style-name="Text_20_body">
      <style:paragraph-properties fo:text-align="start" style:justify-single-word="false"/>
      <style:text-properties fo:language="la" fo:country="VA" officeooo:rsid="07993246" officeooo:paragraph-rsid="07993246"/>
    </style:style>
    <style:style style:name="P387" style:family="paragraph" style:parent-style-name="Text_20_body">
      <style:paragraph-properties fo:text-align="start" style:justify-single-word="false"/>
      <style:text-properties fo:language="la" fo:country="VA" officeooo:rsid="079974e5" officeooo:paragraph-rsid="079974e5"/>
    </style:style>
    <style:style style:name="P388" style:family="paragraph" style:parent-style-name="Text_20_body">
      <style:paragraph-properties fo:text-align="start" style:justify-single-word="false"/>
      <style:text-properties fo:language="la" fo:country="VA" officeooo:rsid="079a4d40" officeooo:paragraph-rsid="079a4d40"/>
    </style:style>
    <style:style style:name="P389" style:family="paragraph" style:parent-style-name="Text_20_body">
      <style:paragraph-properties fo:text-align="start" style:justify-single-word="false"/>
      <style:text-properties fo:language="la" fo:country="VA" officeooo:rsid="079bf57b" officeooo:paragraph-rsid="079bf57b"/>
    </style:style>
    <style:style style:name="P390" style:family="paragraph" style:parent-style-name="Text_20_body">
      <style:paragraph-properties fo:text-align="start" style:justify-single-word="false"/>
      <style:text-properties fo:language="la" fo:country="VA" officeooo:rsid="079ddb13" officeooo:paragraph-rsid="079ddb13"/>
    </style:style>
    <style:style style:name="P391" style:family="paragraph" style:parent-style-name="Text_20_body">
      <style:text-properties fo:language="la" fo:country="VA" officeooo:rsid="07a0b87e" officeooo:paragraph-rsid="07a0b87e"/>
    </style:style>
    <style:style style:name="P392" style:family="paragraph" style:parent-style-name="Text_20_body">
      <style:text-properties fo:language="la" fo:country="VA" officeooo:rsid="07a16606" officeooo:paragraph-rsid="07a16606"/>
    </style:style>
    <style:style style:name="P393" style:family="paragraph" style:parent-style-name="Text_20_body">
      <style:text-properties fo:language="la" fo:country="VA" officeooo:rsid="07a30349" officeooo:paragraph-rsid="07a30349"/>
    </style:style>
    <style:style style:name="P394" style:family="paragraph" style:parent-style-name="Text_20_body">
      <style:text-properties fo:language="la" fo:country="VA" officeooo:rsid="07a45af4" officeooo:paragraph-rsid="07a45af4"/>
    </style:style>
    <style:style style:name="P395" style:family="paragraph" style:parent-style-name="Text_20_body">
      <style:text-properties fo:language="la" fo:country="VA" officeooo:rsid="07a5aa0a" officeooo:paragraph-rsid="07a69dc6"/>
    </style:style>
    <style:style style:name="P396" style:family="paragraph" style:parent-style-name="Text_20_body">
      <style:text-properties fo:language="la" fo:country="VA" officeooo:rsid="07a69dc6" officeooo:paragraph-rsid="07a69dc6"/>
    </style:style>
    <style:style style:name="P397" style:family="paragraph" style:parent-style-name="Text_20_body">
      <style:text-properties fo:language="la" fo:country="VA" officeooo:rsid="07a79c15" officeooo:paragraph-rsid="07a69dc6"/>
    </style:style>
    <style:style style:name="P398" style:family="paragraph" style:parent-style-name="Text_20_body">
      <style:text-properties fo:language="la" fo:country="VA" officeooo:rsid="07a79c15" officeooo:paragraph-rsid="07a79c15"/>
    </style:style>
    <style:style style:name="P399" style:family="paragraph" style:parent-style-name="Text_20_body">
      <style:text-properties fo:language="la" fo:country="VA" officeooo:rsid="07a79c15" officeooo:paragraph-rsid="07a80970"/>
    </style:style>
    <style:style style:name="P400" style:family="paragraph" style:parent-style-name="Text_20_body">
      <style:text-properties fo:language="la" fo:country="VA" officeooo:rsid="07a82b4c" officeooo:paragraph-rsid="07a82b4c"/>
    </style:style>
    <style:style style:name="P401" style:family="paragraph" style:parent-style-name="Text_20_body">
      <style:paragraph-properties fo:text-align="start" style:justify-single-word="false"/>
      <style:text-properties fo:language="la" fo:country="VA" officeooo:rsid="07b09cd8" officeooo:paragraph-rsid="07b09cd8"/>
    </style:style>
    <style:style style:name="P402" style:family="paragraph" style:parent-style-name="Text_20_body">
      <style:text-properties fo:language="la" fo:country="VA" officeooo:rsid="07bdfba6" officeooo:paragraph-rsid="07bdfba6"/>
    </style:style>
    <style:style style:name="P403" style:family="paragraph" style:parent-style-name="Text_20_body">
      <style:text-properties fo:language="la" fo:country="VA" officeooo:rsid="07bffb5d" officeooo:paragraph-rsid="07bffb5d"/>
    </style:style>
    <style:style style:name="P404" style:family="paragraph" style:parent-style-name="Text_20_body">
      <style:text-properties fo:language="la" fo:country="VA" officeooo:rsid="07c0f328" officeooo:paragraph-rsid="07c0f328"/>
    </style:style>
    <style:style style:name="P405" style:family="paragraph" style:parent-style-name="Text_20_body">
      <style:text-properties fo:language="la" fo:country="VA" officeooo:rsid="07c2e51e" officeooo:paragraph-rsid="07c2e51e"/>
    </style:style>
    <style:style style:name="P406" style:family="paragraph" style:parent-style-name="Text_20_body">
      <style:text-properties fo:language="la" fo:country="VA" officeooo:rsid="07c55bd3" officeooo:paragraph-rsid="07c5c74d"/>
    </style:style>
    <style:style style:name="P407" style:family="paragraph" style:parent-style-name="Text_20_body">
      <style:text-properties fo:language="la" fo:country="VA" officeooo:rsid="07c66f9e" officeooo:paragraph-rsid="07c66f9e"/>
    </style:style>
    <style:style style:name="P408" style:family="paragraph" style:parent-style-name="Text_20_body">
      <style:text-properties fo:language="la" fo:country="VA" officeooo:rsid="07cf5f3b" officeooo:paragraph-rsid="07cf5f3b"/>
    </style:style>
    <style:style style:name="P409" style:family="paragraph" style:parent-style-name="Text_20_body">
      <style:text-properties fo:language="la" fo:country="VA" officeooo:rsid="07cf5f3b" officeooo:paragraph-rsid="07d14332"/>
    </style:style>
    <style:style style:name="P410" style:family="paragraph" style:parent-style-name="Text_20_body">
      <style:text-properties fo:language="la" fo:country="VA" officeooo:rsid="07d14332" officeooo:paragraph-rsid="07d14332"/>
    </style:style>
    <style:style style:name="P411" style:family="paragraph" style:parent-style-name="Text_20_body">
      <style:text-properties fo:language="la" fo:country="VA" officeooo:rsid="07d25175" officeooo:paragraph-rsid="07d25175"/>
    </style:style>
    <style:style style:name="P412" style:family="paragraph" style:parent-style-name="Text_20_body">
      <style:text-properties fo:language="la" fo:country="VA" officeooo:rsid="07d5ef55" officeooo:paragraph-rsid="07d5ef55"/>
    </style:style>
    <style:style style:name="P413" style:family="paragraph" style:parent-style-name="Text_20_body">
      <style:text-properties fo:language="la" fo:country="VA" officeooo:rsid="07d5ef55" officeooo:paragraph-rsid="07d6ac2e"/>
    </style:style>
    <style:style style:name="P414" style:family="paragraph" style:parent-style-name="Text_20_body">
      <style:text-properties fo:language="la" fo:country="VA" officeooo:rsid="07d5ef55" officeooo:paragraph-rsid="07d6ad6e"/>
    </style:style>
    <style:style style:name="P415" style:family="paragraph" style:parent-style-name="Text_20_body">
      <style:text-properties fo:language="la" fo:country="VA" officeooo:paragraph-rsid="07d6ad6e"/>
    </style:style>
    <style:style style:name="P416" style:family="paragraph" style:parent-style-name="Text_20_body">
      <style:text-properties fo:language="la" fo:country="VA" officeooo:rsid="07d8c17e" officeooo:paragraph-rsid="07d8c17e"/>
    </style:style>
    <style:style style:name="P417" style:family="paragraph" style:parent-style-name="Text_20_body">
      <style:text-properties fo:language="la" fo:country="VA" officeooo:rsid="07d97062" officeooo:paragraph-rsid="07da2e77"/>
    </style:style>
    <style:style style:name="P418" style:family="paragraph" style:parent-style-name="Text_20_body">
      <style:text-properties fo:language="la" fo:country="VA" officeooo:rsid="07db5fd5" officeooo:paragraph-rsid="07db5fd5"/>
    </style:style>
    <style:style style:name="P419" style:family="paragraph" style:parent-style-name="Text_20_body">
      <style:text-properties fo:language="la" fo:country="VA" officeooo:rsid="07dbee64" officeooo:paragraph-rsid="07dbee64"/>
    </style:style>
    <style:style style:name="P420" style:family="paragraph" style:parent-style-name="Text_20_body">
      <style:text-properties fo:language="la" fo:country="VA" officeooo:rsid="07dc55de" officeooo:paragraph-rsid="07dc55de"/>
    </style:style>
    <style:style style:name="P421" style:family="paragraph" style:parent-style-name="Text_20_body">
      <style:text-properties fo:language="la" fo:country="VA" officeooo:rsid="07dd0227" officeooo:paragraph-rsid="07dd0227"/>
    </style:style>
    <style:style style:name="P422" style:family="paragraph" style:parent-style-name="Text_20_body">
      <style:text-properties fo:language="la" fo:country="VA" officeooo:rsid="07e20456" officeooo:paragraph-rsid="07e20456"/>
    </style:style>
    <style:style style:name="P423" style:family="paragraph" style:parent-style-name="Text_20_body">
      <style:text-properties fo:language="la" fo:country="VA" officeooo:rsid="07e3901d" officeooo:paragraph-rsid="07e3901d"/>
    </style:style>
    <style:style style:name="P424" style:family="paragraph" style:parent-style-name="Text_20_body">
      <style:text-properties fo:language="la" fo:country="VA" officeooo:rsid="07e50c7b" officeooo:paragraph-rsid="07e50c7b"/>
    </style:style>
    <style:style style:name="P425" style:family="paragraph" style:parent-style-name="Text_20_body">
      <style:text-properties fo:language="la" fo:country="VA" officeooo:rsid="07e675b0" officeooo:paragraph-rsid="07e675b0"/>
    </style:style>
    <style:style style:name="P426" style:family="paragraph" style:parent-style-name="Text_20_body">
      <style:text-properties fo:language="la" fo:country="VA" officeooo:rsid="07e6cccd" officeooo:paragraph-rsid="07e6cccd"/>
    </style:style>
    <style:style style:name="P427" style:family="paragraph" style:parent-style-name="Text_20_body">
      <style:text-properties fo:language="la" fo:country="VA" officeooo:rsid="07e81347" officeooo:paragraph-rsid="07eb916b"/>
    </style:style>
    <style:style style:name="P428" style:family="paragraph" style:parent-style-name="Text_20_body">
      <style:text-properties fo:language="la" fo:country="VA" officeooo:rsid="07e81347" officeooo:paragraph-rsid="07ef0adf"/>
    </style:style>
    <style:style style:name="P429" style:family="paragraph" style:parent-style-name="Text_20_body">
      <style:text-properties fo:language="la" fo:country="VA" officeooo:rsid="07eb916b" officeooo:paragraph-rsid="07eb916b"/>
    </style:style>
    <style:style style:name="P430" style:family="paragraph" style:parent-style-name="Text_20_body">
      <style:text-properties fo:language="la" fo:country="VA" officeooo:rsid="07f00ed2" officeooo:paragraph-rsid="07f00ed2"/>
    </style:style>
    <style:style style:name="P431" style:family="paragraph" style:parent-style-name="Text_20_body">
      <style:text-properties fo:language="la" fo:country="VA" officeooo:rsid="07f382d1" officeooo:paragraph-rsid="07f382d1"/>
    </style:style>
    <style:style style:name="P432" style:family="paragraph" style:parent-style-name="Text_20_body">
      <style:text-properties fo:language="la" fo:country="VA" officeooo:rsid="07f541cc" officeooo:paragraph-rsid="07f541cc"/>
    </style:style>
    <style:style style:name="P433" style:family="paragraph" style:parent-style-name="Text_20_body">
      <style:text-properties fo:language="la" fo:country="VA" officeooo:paragraph-rsid="07f72ae2"/>
    </style:style>
    <style:style style:name="P434" style:family="paragraph" style:parent-style-name="Text_20_body">
      <style:text-properties fo:language="la" fo:country="VA" officeooo:rsid="0801cebf" officeooo:paragraph-rsid="0801cebf"/>
    </style:style>
    <style:style style:name="P435" style:family="paragraph" style:parent-style-name="Text_20_body">
      <style:text-properties fo:language="la" fo:country="VA" officeooo:rsid="0802f2c6" officeooo:paragraph-rsid="0802f2c6"/>
    </style:style>
    <style:style style:name="P436" style:family="paragraph" style:parent-style-name="Text_20_body">
      <style:text-properties fo:language="la" fo:country="VA" officeooo:rsid="0803a7be" officeooo:paragraph-rsid="0803a7be"/>
    </style:style>
    <style:style style:name="P437" style:family="paragraph" style:parent-style-name="Text_20_body">
      <style:paragraph-properties fo:text-align="start" style:justify-single-word="false"/>
      <style:text-properties fo:language="la" fo:country="VA" officeooo:rsid="080593e7" officeooo:paragraph-rsid="080593e7"/>
    </style:style>
    <style:style style:name="P438" style:family="paragraph" style:parent-style-name="Text_20_body">
      <style:paragraph-properties fo:text-align="start" style:justify-single-word="false"/>
      <style:text-properties fo:language="la" fo:country="VA" officeooo:rsid="08073b41" officeooo:paragraph-rsid="08073b41"/>
    </style:style>
    <style:style style:name="P439" style:family="paragraph" style:parent-style-name="Text_20_body">
      <style:paragraph-properties fo:text-align="start" style:justify-single-word="false"/>
      <style:text-properties fo:language="la" fo:country="VA" officeooo:rsid="080b1da7" officeooo:paragraph-rsid="080b1da7"/>
    </style:style>
    <style:style style:name="P440" style:family="paragraph" style:parent-style-name="Text_20_body">
      <style:paragraph-properties fo:text-align="start" style:justify-single-word="false"/>
      <style:text-properties fo:language="la" fo:country="VA" officeooo:rsid="080e79c5" officeooo:paragraph-rsid="080e79c5"/>
    </style:style>
    <style:style style:name="P441" style:family="paragraph" style:parent-style-name="Text_20_body">
      <style:paragraph-properties fo:text-align="start" style:justify-single-word="false"/>
      <style:text-properties fo:language="la" fo:country="VA" officeooo:rsid="081116b7" officeooo:paragraph-rsid="081116b7"/>
    </style:style>
    <style:style style:name="P442" style:family="paragraph" style:parent-style-name="Text_20_body">
      <style:paragraph-properties fo:text-align="start" style:justify-single-word="false"/>
      <style:text-properties fo:language="la" fo:country="VA" officeooo:rsid="0813e956" officeooo:paragraph-rsid="0813e956"/>
    </style:style>
    <style:style style:name="P443" style:family="paragraph" style:parent-style-name="Text_20_body">
      <style:paragraph-properties fo:text-align="start" style:justify-single-word="false"/>
      <style:text-properties fo:language="la" fo:country="VA" officeooo:rsid="08151fbc" officeooo:paragraph-rsid="08151fbc"/>
    </style:style>
    <style:style style:name="P444" style:family="paragraph" style:parent-style-name="Text_20_body">
      <style:paragraph-properties fo:text-align="start" style:justify-single-word="false"/>
      <style:text-properties fo:language="la" fo:country="VA" officeooo:rsid="081690de" officeooo:paragraph-rsid="081690de"/>
    </style:style>
    <style:style style:name="P445" style:family="paragraph" style:parent-style-name="Text_20_body">
      <style:paragraph-properties fo:text-align="start" style:justify-single-word="false"/>
      <style:text-properties fo:language="la" fo:country="VA" officeooo:rsid="0818faf6" officeooo:paragraph-rsid="0818faf6"/>
    </style:style>
    <style:style style:name="P446" style:family="paragraph" style:parent-style-name="Text_20_body">
      <style:paragraph-properties fo:text-align="start" style:justify-single-word="false"/>
      <style:text-properties fo:language="la" fo:country="VA" officeooo:rsid="0818faf6" officeooo:paragraph-rsid="081a6565"/>
    </style:style>
    <style:style style:name="P447" style:family="paragraph" style:parent-style-name="Text_20_body">
      <style:paragraph-properties fo:text-align="start" style:justify-single-word="false"/>
      <style:text-properties fo:language="la" fo:country="VA" officeooo:rsid="081deb48" officeooo:paragraph-rsid="081deb48"/>
    </style:style>
    <style:style style:name="P448" style:family="paragraph" style:parent-style-name="Text_20_body">
      <style:paragraph-properties fo:text-align="start" style:justify-single-word="false"/>
      <style:text-properties fo:language="la" fo:country="VA" officeooo:rsid="08217517" officeooo:paragraph-rsid="08217517"/>
    </style:style>
    <style:style style:name="P449" style:family="paragraph" style:parent-style-name="Text_20_body">
      <style:paragraph-properties fo:text-align="start" style:justify-single-word="false"/>
      <style:text-properties fo:language="la" fo:country="VA" officeooo:rsid="08217517" officeooo:paragraph-rsid="082650ff"/>
    </style:style>
    <style:style style:name="P450" style:family="paragraph" style:parent-style-name="Text_20_body">
      <style:paragraph-properties fo:text-align="start" style:justify-single-word="false"/>
      <style:text-properties fo:language="la" fo:country="VA" officeooo:rsid="0827052c" officeooo:paragraph-rsid="0827052c"/>
    </style:style>
    <style:style style:name="P451" style:family="paragraph" style:parent-style-name="Text_20_body">
      <style:paragraph-properties fo:text-align="start" style:justify-single-word="false"/>
      <style:text-properties fo:language="la" fo:country="VA" officeooo:rsid="082927fc" officeooo:paragraph-rsid="082927fc"/>
    </style:style>
    <style:style style:name="P452" style:family="paragraph" style:parent-style-name="Text_20_body">
      <style:paragraph-properties fo:text-align="start" style:justify-single-word="false"/>
      <style:text-properties fo:language="la" fo:country="VA" officeooo:rsid="08294fce" officeooo:paragraph-rsid="08294fce"/>
    </style:style>
    <style:style style:name="P453" style:family="paragraph" style:parent-style-name="Text_20_body">
      <style:paragraph-properties fo:text-align="start" style:justify-single-word="false"/>
      <style:text-properties fo:language="la" fo:country="VA" officeooo:rsid="0829862b" officeooo:paragraph-rsid="0829862b"/>
    </style:style>
    <style:style style:name="P454" style:family="paragraph" style:parent-style-name="Text_20_body">
      <style:paragraph-properties fo:text-align="start" style:justify-single-word="false"/>
      <style:text-properties fo:language="la" fo:country="VA" officeooo:rsid="082ae7e0" officeooo:paragraph-rsid="082ae7e0"/>
    </style:style>
    <style:style style:name="P455" style:family="paragraph" style:parent-style-name="Text_20_body">
      <style:paragraph-properties fo:text-align="start" style:justify-single-word="false"/>
      <style:text-properties fo:language="la" fo:country="VA" officeooo:rsid="082d03ff" officeooo:paragraph-rsid="082d03ff"/>
    </style:style>
    <style:style style:name="P456" style:family="paragraph" style:parent-style-name="Text_20_body">
      <style:paragraph-properties fo:text-align="start" style:justify-single-word="false"/>
      <style:text-properties fo:language="la" fo:country="VA" officeooo:rsid="082ed0b9" officeooo:paragraph-rsid="082f13fc"/>
    </style:style>
    <style:style style:name="P457" style:family="paragraph" style:parent-style-name="Text_20_body">
      <style:paragraph-properties fo:text-align="start" style:justify-single-word="false"/>
      <style:text-properties fo:language="la" fo:country="VA" officeooo:rsid="082ed0b9" officeooo:paragraph-rsid="08312c85"/>
    </style:style>
    <style:style style:name="P458" style:family="paragraph" style:parent-style-name="Text_20_body">
      <style:paragraph-properties fo:text-align="start" style:justify-single-word="false"/>
      <style:text-properties fo:language="la" fo:country="VA" officeooo:rsid="082f13fc" officeooo:paragraph-rsid="083069b6"/>
    </style:style>
    <style:style style:name="P459" style:family="paragraph" style:parent-style-name="Text_20_body">
      <style:paragraph-properties fo:text-align="start" style:justify-single-word="false"/>
      <style:text-properties fo:language="la" fo:country="VA" officeooo:rsid="08312c85" officeooo:paragraph-rsid="08312c85"/>
    </style:style>
    <style:style style:name="P460" style:family="paragraph" style:parent-style-name="Text_20_body">
      <style:paragraph-properties fo:text-align="start" style:justify-single-word="false"/>
      <style:text-properties fo:language="la" fo:country="VA" officeooo:rsid="08335063" officeooo:paragraph-rsid="08335063"/>
    </style:style>
    <style:style style:name="P461" style:family="paragraph" style:parent-style-name="Text_20_body">
      <style:paragraph-properties fo:text-align="start" style:justify-single-word="false"/>
      <style:text-properties fo:language="la" fo:country="VA" officeooo:rsid="08335063" officeooo:paragraph-rsid="08340e6e"/>
    </style:style>
    <style:style style:name="P462" style:family="paragraph" style:parent-style-name="Text_20_body">
      <style:paragraph-properties fo:text-align="start" style:justify-single-word="false"/>
      <style:text-properties fo:language="la" fo:country="VA" officeooo:rsid="08335063" officeooo:paragraph-rsid="083eaf4c"/>
    </style:style>
    <style:style style:name="P463" style:family="paragraph" style:parent-style-name="Text_20_body">
      <style:paragraph-properties fo:text-align="start" style:justify-single-word="false"/>
      <style:text-properties fo:language="la" fo:country="VA" officeooo:rsid="08340e6e" officeooo:paragraph-rsid="08340e6e"/>
    </style:style>
    <style:style style:name="P464" style:family="paragraph" style:parent-style-name="Text_20_body">
      <style:paragraph-properties fo:text-align="start" style:justify-single-word="false"/>
      <style:text-properties fo:language="la" fo:country="VA" officeooo:rsid="083edfe0" officeooo:paragraph-rsid="083edfe0"/>
    </style:style>
    <style:style style:name="P465" style:family="paragraph" style:parent-style-name="Text_20_body">
      <style:paragraph-properties fo:text-align="start" style:justify-single-word="false"/>
      <style:text-properties fo:language="la" fo:country="VA" officeooo:rsid="0843448b" officeooo:paragraph-rsid="0843448b"/>
    </style:style>
    <style:style style:name="P466" style:family="paragraph" style:parent-style-name="Text_20_body">
      <style:paragraph-properties fo:text-align="start" style:justify-single-word="false"/>
      <style:text-properties fo:language="la" fo:country="VA" officeooo:rsid="0845e2dd" officeooo:paragraph-rsid="0845e2dd"/>
    </style:style>
    <style:style style:name="P467" style:family="paragraph" style:parent-style-name="Text_20_body">
      <style:paragraph-properties fo:text-align="start" style:justify-single-word="false"/>
      <style:text-properties fo:language="la" fo:country="VA" officeooo:rsid="08489e3d" officeooo:paragraph-rsid="08489e3d"/>
    </style:style>
    <style:style style:name="P468" style:family="paragraph" style:parent-style-name="Text_20_body">
      <style:paragraph-properties fo:text-align="start" style:justify-single-word="false"/>
      <style:text-properties fo:language="la" fo:country="VA" officeooo:rsid="08498569" officeooo:paragraph-rsid="08498569"/>
    </style:style>
    <style:style style:name="P469" style:family="paragraph" style:parent-style-name="Text_20_body">
      <style:paragraph-properties fo:text-align="start" style:justify-single-word="false"/>
      <style:text-properties fo:language="la" fo:country="VA" officeooo:rsid="084d3f23" officeooo:paragraph-rsid="084df9f9"/>
    </style:style>
    <style:style style:name="P470" style:family="paragraph" style:parent-style-name="Text_20_body">
      <style:paragraph-properties fo:text-align="start" style:justify-single-word="false"/>
      <style:text-properties fo:language="la" fo:country="VA" officeooo:rsid="084df9f9" officeooo:paragraph-rsid="084df9f9"/>
    </style:style>
    <style:style style:name="P471" style:family="paragraph" style:parent-style-name="Text_20_body">
      <style:paragraph-properties fo:text-align="start" style:justify-single-word="false"/>
      <style:text-properties fo:language="la" fo:country="VA" officeooo:rsid="084f632c" officeooo:paragraph-rsid="084f632c"/>
    </style:style>
    <style:style style:name="P472" style:family="paragraph" style:parent-style-name="Text_20_body">
      <style:paragraph-properties fo:text-align="start" style:justify-single-word="false"/>
      <style:text-properties fo:language="la" fo:country="VA" officeooo:rsid="0851144c" officeooo:paragraph-rsid="0851144c"/>
    </style:style>
    <style:style style:name="P473" style:family="paragraph" style:parent-style-name="Text_20_body">
      <style:paragraph-properties fo:text-align="start" style:justify-single-word="false"/>
      <style:text-properties fo:language="la" fo:country="VA" officeooo:rsid="08511f13" officeooo:paragraph-rsid="08511f13"/>
    </style:style>
    <style:style style:name="P474" style:family="paragraph" style:parent-style-name="Text_20_body">
      <style:paragraph-properties fo:text-align="start" style:justify-single-word="false"/>
      <style:text-properties fo:language="la" fo:country="VA" officeooo:rsid="085194fb" officeooo:paragraph-rsid="085194fb"/>
    </style:style>
    <style:style style:name="P475" style:family="paragraph" style:parent-style-name="Text_20_body">
      <style:paragraph-properties fo:text-align="start" style:justify-single-word="false"/>
      <style:text-properties fo:language="la" fo:country="VA" officeooo:rsid="08524ab0" officeooo:paragraph-rsid="08524ab0"/>
    </style:style>
    <style:style style:name="P476" style:family="paragraph" style:parent-style-name="Text_20_body">
      <style:paragraph-properties fo:text-align="start" style:justify-single-word="false"/>
      <style:text-properties fo:language="la" fo:country="VA" officeooo:rsid="08542aca" officeooo:paragraph-rsid="08542aca"/>
    </style:style>
    <style:style style:name="P477" style:family="paragraph" style:parent-style-name="Text_20_body">
      <style:paragraph-properties fo:text-align="start" style:justify-single-word="false"/>
      <style:text-properties fo:language="la" fo:country="VA" officeooo:rsid="08551683" officeooo:paragraph-rsid="08551683"/>
    </style:style>
    <style:style style:name="P478" style:family="paragraph" style:parent-style-name="Text_20_body">
      <style:paragraph-properties fo:text-align="start" style:justify-single-word="false"/>
      <style:text-properties fo:language="la" fo:country="VA" officeooo:rsid="08556244" officeooo:paragraph-rsid="08556244"/>
    </style:style>
    <style:style style:name="P479" style:family="paragraph" style:parent-style-name="Text_20_body">
      <style:paragraph-properties fo:text-align="start" style:justify-single-word="false"/>
      <style:text-properties fo:language="la" fo:country="VA" officeooo:rsid="0857ef8d" officeooo:paragraph-rsid="0857ef8d"/>
    </style:style>
    <style:style style:name="P480" style:family="paragraph" style:parent-style-name="Text_20_body">
      <style:text-properties fo:language="la" fo:country="VA" officeooo:rsid="0857ef8d" officeooo:paragraph-rsid="0857ef8d"/>
    </style:style>
    <style:style style:name="P481" style:family="paragraph" style:parent-style-name="Text_20_body">
      <style:text-properties fo:language="la" fo:country="VA" officeooo:rsid="0859feab" officeooo:paragraph-rsid="0859feab"/>
    </style:style>
    <style:style style:name="P482" style:family="paragraph" style:parent-style-name="Text_20_body">
      <style:text-properties fo:language="la" fo:country="VA" officeooo:rsid="085c97fa" officeooo:paragraph-rsid="085c97fa"/>
    </style:style>
    <style:style style:name="P483" style:family="paragraph" style:parent-style-name="Text_20_body">
      <style:text-properties fo:language="la" fo:country="VA" officeooo:rsid="085f45b9" officeooo:paragraph-rsid="085f45b9"/>
    </style:style>
    <style:style style:name="P484" style:family="paragraph" style:parent-style-name="Text_20_body">
      <style:text-properties fo:language="la" fo:country="VA" officeooo:rsid="085f45b9" officeooo:paragraph-rsid="0861abf2"/>
    </style:style>
    <style:style style:name="P485" style:family="paragraph" style:parent-style-name="Text_20_body">
      <style:text-properties fo:language="la" fo:country="VA" officeooo:rsid="085f45b9" officeooo:paragraph-rsid="0863f11c"/>
    </style:style>
    <style:style style:name="P486" style:family="paragraph" style:parent-style-name="Text_20_body">
      <style:text-properties fo:language="la" fo:country="VA" officeooo:rsid="085f45b9" officeooo:paragraph-rsid="0863f719"/>
    </style:style>
    <style:style style:name="P487" style:family="paragraph" style:parent-style-name="Text_20_body">
      <style:text-properties fo:language="la" fo:country="VA" officeooo:rsid="085f45b9" officeooo:paragraph-rsid="0864c000"/>
    </style:style>
    <style:style style:name="P488" style:family="paragraph" style:parent-style-name="Text_20_body">
      <style:text-properties fo:language="la" fo:country="VA" officeooo:rsid="085f45b9" officeooo:paragraph-rsid="0865a63a"/>
    </style:style>
    <style:style style:name="P489" style:family="paragraph" style:parent-style-name="Text_20_body">
      <style:text-properties fo:language="la" fo:country="VA" officeooo:rsid="085f45b9" officeooo:paragraph-rsid="0866001d"/>
    </style:style>
    <style:style style:name="P490" style:family="paragraph" style:parent-style-name="Text_20_body">
      <style:text-properties fo:language="la" fo:country="VA" officeooo:rsid="085f4b1b" officeooo:paragraph-rsid="085f4b1b"/>
    </style:style>
    <style:style style:name="P491" style:family="paragraph" style:parent-style-name="Text_20_body">
      <style:text-properties fo:language="la" fo:country="VA" officeooo:paragraph-rsid="085f4b1b"/>
    </style:style>
    <style:style style:name="P492" style:family="paragraph" style:parent-style-name="Text_20_body">
      <style:text-properties fo:language="la" fo:country="VA" officeooo:rsid="0866001d" officeooo:paragraph-rsid="0866001d"/>
    </style:style>
    <style:style style:name="P493" style:family="paragraph" style:parent-style-name="Text_20_body">
      <style:text-properties fo:language="la" fo:country="VA" officeooo:rsid="08673cf1" officeooo:paragraph-rsid="0866001d"/>
    </style:style>
    <style:style style:name="P494" style:family="paragraph" style:parent-style-name="Text_20_body">
      <style:text-properties fo:language="la" fo:country="VA" officeooo:rsid="08673cf1" officeooo:paragraph-rsid="08673cf1"/>
    </style:style>
    <style:style style:name="P495" style:family="paragraph" style:parent-style-name="Text_20_body">
      <style:text-properties fo:language="la" fo:country="VA" officeooo:rsid="08673cf1" officeooo:paragraph-rsid="0869888e"/>
    </style:style>
    <style:style style:name="P496" style:family="paragraph" style:parent-style-name="Text_20_body">
      <style:text-properties fo:language="la" fo:country="VA" officeooo:rsid="0869888e" officeooo:paragraph-rsid="0869888e"/>
    </style:style>
    <style:style style:name="P497" style:family="paragraph" style:parent-style-name="Text_20_body">
      <style:text-properties fo:language="la" fo:country="VA" officeooo:rsid="086a181e" officeooo:paragraph-rsid="086a181e"/>
    </style:style>
    <style:style style:name="P498" style:family="paragraph" style:parent-style-name="Text_20_body">
      <style:text-properties fo:language="la" fo:country="VA" officeooo:rsid="086ac21d" officeooo:paragraph-rsid="086dafc4"/>
    </style:style>
    <style:style style:name="P499" style:family="paragraph" style:parent-style-name="Text_20_body">
      <style:text-properties fo:language="la" fo:country="VA" officeooo:rsid="086dafc4" officeooo:paragraph-rsid="086dafc4"/>
    </style:style>
    <style:style style:name="P500" style:family="paragraph" style:parent-style-name="Text_20_body">
      <style:text-properties fo:language="la" fo:country="VA" officeooo:rsid="086eba20" officeooo:paragraph-rsid="086eba20"/>
    </style:style>
    <style:style style:name="P501" style:family="paragraph" style:parent-style-name="Text_20_body">
      <style:text-properties fo:language="la" fo:country="VA" officeooo:rsid="08704abd" officeooo:paragraph-rsid="08704abd"/>
    </style:style>
    <style:style style:name="P502" style:family="paragraph" style:parent-style-name="Text_20_body">
      <style:text-properties fo:language="la" fo:country="VA" officeooo:rsid="087322db" officeooo:paragraph-rsid="087322db"/>
    </style:style>
    <style:style style:name="P503" style:family="paragraph" style:parent-style-name="Text_20_body">
      <style:text-properties fo:language="la" fo:country="VA" officeooo:rsid="08735ad6" officeooo:paragraph-rsid="08735ad6"/>
    </style:style>
    <style:style style:name="P504" style:family="paragraph" style:parent-style-name="Text_20_body">
      <style:text-properties fo:language="la" fo:country="VA" officeooo:rsid="0876213f" officeooo:paragraph-rsid="0876213f"/>
    </style:style>
    <style:style style:name="P505" style:family="paragraph" style:parent-style-name="Text_20_body">
      <style:text-properties fo:language="la" fo:country="VA" officeooo:rsid="0876213f" officeooo:paragraph-rsid="08771399"/>
    </style:style>
    <style:style style:name="P506" style:family="paragraph" style:parent-style-name="Text_20_body">
      <style:text-properties fo:language="la" fo:country="VA" officeooo:rsid="087700e7" officeooo:paragraph-rsid="087700e7"/>
    </style:style>
    <style:style style:name="P507" style:family="paragraph" style:parent-style-name="Text_20_body">
      <style:text-properties fo:language="la" fo:country="VA" officeooo:rsid="08771399" officeooo:paragraph-rsid="08771399"/>
    </style:style>
    <style:style style:name="P508" style:family="paragraph" style:parent-style-name="Text_20_body">
      <style:text-properties fo:language="la" fo:country="VA" officeooo:rsid="0877933a" officeooo:paragraph-rsid="0877933a"/>
    </style:style>
    <style:style style:name="P509" style:family="paragraph" style:parent-style-name="Text_20_body">
      <style:paragraph-properties fo:text-align="start" style:justify-single-word="false"/>
      <style:text-properties fo:language="la" fo:country="VA" officeooo:rsid="0878a5cd" officeooo:paragraph-rsid="0878a5cd"/>
    </style:style>
    <style:style style:name="P510" style:family="paragraph" style:parent-style-name="Text_20_body">
      <style:paragraph-properties fo:text-align="start" style:justify-single-word="false"/>
      <style:text-properties fo:language="la" fo:country="VA" officeooo:rsid="087a85c8" officeooo:paragraph-rsid="087a85c8"/>
    </style:style>
    <style:style style:name="P511" style:family="paragraph" style:parent-style-name="Text_20_body">
      <style:paragraph-properties fo:text-align="start" style:justify-single-word="false"/>
      <style:text-properties fo:language="la" fo:country="VA" officeooo:rsid="087c24cf" officeooo:paragraph-rsid="087c24cf"/>
    </style:style>
    <style:style style:name="P512" style:family="paragraph" style:parent-style-name="Text_20_body">
      <style:paragraph-properties fo:text-align="start" style:justify-single-word="false"/>
      <style:text-properties fo:language="la" fo:country="VA" officeooo:rsid="087e64ba" officeooo:paragraph-rsid="087e64ba"/>
    </style:style>
    <style:style style:name="P513" style:family="paragraph" style:parent-style-name="Text_20_body">
      <style:paragraph-properties fo:text-align="start" style:justify-single-word="false"/>
      <style:text-properties fo:language="la" fo:country="VA" officeooo:rsid="08829796" officeooo:paragraph-rsid="08829796"/>
    </style:style>
    <style:style style:name="P514" style:family="paragraph" style:parent-style-name="Text_20_body">
      <style:paragraph-properties fo:text-align="start" style:justify-single-word="false"/>
      <style:text-properties fo:language="la" fo:country="VA" officeooo:rsid="0882e0c5" officeooo:paragraph-rsid="0882e0c5"/>
    </style:style>
    <style:style style:name="P515" style:family="paragraph" style:parent-style-name="Text_20_body">
      <style:paragraph-properties fo:text-align="start" style:justify-single-word="false"/>
      <style:text-properties fo:language="la" fo:country="VA" officeooo:rsid="0885f4a7" officeooo:paragraph-rsid="0885f4a7"/>
    </style:style>
    <style:style style:name="P516" style:family="paragraph" style:parent-style-name="Text_20_body">
      <style:paragraph-properties fo:text-align="start" style:justify-single-word="false"/>
      <style:text-properties fo:language="la" fo:country="VA" officeooo:rsid="08891e43" officeooo:paragraph-rsid="08891e43"/>
    </style:style>
    <style:style style:name="P517" style:family="paragraph" style:parent-style-name="Text_20_body">
      <style:paragraph-properties fo:text-align="start" style:justify-single-word="false"/>
      <style:text-properties fo:language="la" fo:country="VA" officeooo:rsid="088a2f5f" officeooo:paragraph-rsid="088a2f5f"/>
    </style:style>
    <style:style style:name="P518" style:family="paragraph" style:parent-style-name="Text_20_body">
      <style:paragraph-properties fo:text-align="start" style:justify-single-word="false"/>
      <style:text-properties fo:language="la" fo:country="VA" officeooo:rsid="088a4460" officeooo:paragraph-rsid="088a4460"/>
    </style:style>
    <style:style style:name="P519" style:family="paragraph" style:parent-style-name="Text_20_body">
      <style:paragraph-properties fo:text-align="start" style:justify-single-word="false"/>
      <style:text-properties fo:language="la" fo:country="VA" officeooo:rsid="088a4460" officeooo:paragraph-rsid="088bf514"/>
    </style:style>
    <style:style style:name="P520" style:family="paragraph" style:parent-style-name="Text_20_body">
      <style:paragraph-properties fo:text-align="start" style:justify-single-word="false"/>
      <style:text-properties fo:language="la" fo:country="VA" officeooo:rsid="088bf514" officeooo:paragraph-rsid="088da097"/>
    </style:style>
    <style:style style:name="P521" style:family="paragraph" style:parent-style-name="Text_20_body">
      <style:paragraph-properties fo:text-align="start" style:justify-single-word="false"/>
      <style:text-properties fo:language="la" fo:country="VA" officeooo:rsid="088da097" officeooo:paragraph-rsid="088da097"/>
    </style:style>
    <style:style style:name="P522" style:family="paragraph" style:parent-style-name="Text_20_body">
      <style:paragraph-properties fo:text-align="start" style:justify-single-word="false"/>
      <style:text-properties fo:language="la" fo:country="VA" officeooo:rsid="088f8778" officeooo:paragraph-rsid="088f8778"/>
    </style:style>
    <style:style style:name="P523" style:family="paragraph" style:parent-style-name="Text_20_body">
      <style:paragraph-properties fo:text-align="start" style:justify-single-word="false"/>
      <style:text-properties fo:language="la" fo:country="VA" officeooo:rsid="088fedfb" officeooo:paragraph-rsid="088fedfb"/>
    </style:style>
    <style:style style:name="P524" style:family="paragraph" style:parent-style-name="Text_20_body">
      <style:paragraph-properties fo:text-align="start" style:justify-single-word="false"/>
      <style:text-properties fo:language="la" fo:country="VA" officeooo:rsid="089204b4" officeooo:paragraph-rsid="089204b4"/>
    </style:style>
    <style:style style:name="P525" style:family="paragraph" style:parent-style-name="Text_20_body">
      <style:paragraph-properties fo:text-align="start" style:justify-single-word="false"/>
      <style:text-properties fo:language="la" fo:country="VA" officeooo:rsid="089336d9" officeooo:paragraph-rsid="0893e5d6"/>
    </style:style>
    <style:style style:name="P526" style:family="paragraph" style:parent-style-name="Text_20_body">
      <style:paragraph-properties fo:text-align="start" style:justify-single-word="false"/>
      <style:text-properties fo:language="la" fo:country="VA" officeooo:rsid="089336d9" officeooo:paragraph-rsid="089605b2"/>
    </style:style>
    <style:style style:name="P527" style:family="paragraph" style:parent-style-name="Text_20_body">
      <style:paragraph-properties fo:text-align="start" style:justify-single-word="false"/>
      <style:text-properties fo:language="la" fo:country="VA" officeooo:rsid="0893e5d6" officeooo:paragraph-rsid="0893e5d6"/>
    </style:style>
    <style:style style:name="P528" style:family="paragraph" style:parent-style-name="Text_20_body">
      <style:paragraph-properties fo:text-align="start" style:justify-single-word="false"/>
      <style:text-properties fo:language="la" fo:country="VA" officeooo:rsid="089605b2" officeooo:paragraph-rsid="089605b2"/>
    </style:style>
    <style:style style:name="P529" style:family="paragraph" style:parent-style-name="Text_20_body">
      <style:text-properties fo:language="la" fo:country="VA" officeooo:rsid="0897bbe3" officeooo:paragraph-rsid="0897bbe3"/>
    </style:style>
    <style:style style:name="P530" style:family="paragraph" style:parent-style-name="Text_20_body">
      <style:text-properties fo:language="la" fo:country="VA" officeooo:rsid="089993c2" officeooo:paragraph-rsid="089993c2"/>
    </style:style>
    <style:style style:name="P531" style:family="paragraph" style:parent-style-name="Text_20_body">
      <style:text-properties fo:language="la" fo:country="VA" officeooo:rsid="089d14a6" officeooo:paragraph-rsid="089d14a6"/>
    </style:style>
    <style:style style:name="P532" style:family="paragraph" style:parent-style-name="Text_20_body">
      <style:text-properties fo:language="la" fo:country="VA" officeooo:rsid="089f0d17" officeooo:paragraph-rsid="089f0d17"/>
    </style:style>
    <style:style style:name="P533" style:family="paragraph" style:parent-style-name="Text_20_body">
      <style:paragraph-properties fo:text-align="start" style:justify-single-word="false"/>
      <style:text-properties fo:language="la" fo:country="VA" officeooo:rsid="08a1041e" officeooo:paragraph-rsid="08a1041e"/>
    </style:style>
    <style:style style:name="P534" style:family="paragraph" style:parent-style-name="Text_20_body">
      <style:text-properties fo:language="la" fo:country="VA" officeooo:rsid="08f355e1" officeooo:paragraph-rsid="08f355e1"/>
    </style:style>
    <style:style style:name="P535" style:family="paragraph" style:parent-style-name="Text_20_body">
      <style:text-properties fo:language="la" fo:country="VA" officeooo:rsid="08f5883a" officeooo:paragraph-rsid="08f5883a"/>
    </style:style>
    <style:style style:name="P536" style:family="paragraph" style:parent-style-name="Text_20_body">
      <style:text-properties fo:language="la" fo:country="VA" officeooo:rsid="08f5883a" officeooo:paragraph-rsid="08f6e051"/>
    </style:style>
    <style:style style:name="P537" style:family="paragraph" style:parent-style-name="Text_20_body">
      <style:text-properties fo:language="la" fo:country="VA" officeooo:rsid="08f5934d" officeooo:paragraph-rsid="08f5934d"/>
    </style:style>
    <style:style style:name="P538" style:family="paragraph" style:parent-style-name="Text_20_body">
      <style:text-properties fo:language="la" fo:country="VA" officeooo:rsid="08fbb20e" officeooo:paragraph-rsid="08fbb20e"/>
    </style:style>
    <style:style style:name="P539" style:family="paragraph" style:parent-style-name="Text_20_body">
      <style:text-properties fo:language="la" fo:country="VA" officeooo:rsid="08fbb20e" officeooo:paragraph-rsid="09f588fb"/>
    </style:style>
    <style:style style:name="P540" style:family="paragraph" style:parent-style-name="Text_20_body">
      <style:text-properties fo:language="la" fo:country="VA" officeooo:rsid="094ce20c" officeooo:paragraph-rsid="094ce20c"/>
    </style:style>
    <style:style style:name="P541" style:family="paragraph" style:parent-style-name="Text_20_body">
      <style:text-properties fo:language="la" fo:country="VA" officeooo:rsid="094ce20c" officeooo:paragraph-rsid="09fa4989"/>
    </style:style>
    <style:style style:name="P542" style:family="paragraph" style:parent-style-name="Text_20_body">
      <style:text-properties fo:language="la" fo:country="VA" officeooo:rsid="08ab8321" officeooo:paragraph-rsid="08ab8321"/>
    </style:style>
    <style:style style:name="P543" style:family="paragraph" style:parent-style-name="Text_20_body">
      <style:text-properties fo:language="la" fo:country="VA" officeooo:rsid="08ab8321" officeooo:paragraph-rsid="08ac39c6"/>
    </style:style>
    <style:style style:name="P544" style:family="paragraph" style:parent-style-name="Text_20_body">
      <style:text-properties fo:language="la" fo:country="VA" officeooo:rsid="08ae15b6" officeooo:paragraph-rsid="08ae595a"/>
    </style:style>
    <style:style style:name="P545" style:family="paragraph" style:parent-style-name="Text_20_body">
      <style:text-properties fo:language="la" fo:country="VA" officeooo:rsid="08ae595a" officeooo:paragraph-rsid="08b00a2e"/>
    </style:style>
    <style:style style:name="P546" style:family="paragraph" style:parent-style-name="Text_20_body">
      <style:text-properties fo:language="la" fo:country="VA" officeooo:rsid="08ae595a" officeooo:paragraph-rsid="08b0115e"/>
    </style:style>
    <style:style style:name="P547" style:family="paragraph" style:parent-style-name="Text_20_body">
      <style:text-properties fo:language="la" fo:country="VA" officeooo:rsid="08b0115e" officeooo:paragraph-rsid="08b0115e"/>
    </style:style>
    <style:style style:name="P548" style:family="paragraph" style:parent-style-name="Text_20_body">
      <style:text-properties fo:language="la" fo:country="VA" officeooo:rsid="08b118bd" officeooo:paragraph-rsid="08b45ca7"/>
    </style:style>
    <style:style style:name="P549" style:family="paragraph" style:parent-style-name="Text_20_body">
      <style:text-properties fo:language="la" fo:country="VA" officeooo:rsid="08b75d87" officeooo:paragraph-rsid="08b75d87"/>
    </style:style>
    <style:style style:name="P550" style:family="paragraph" style:parent-style-name="Text_20_body">
      <style:text-properties fo:language="la" fo:country="VA" officeooo:rsid="08b75d87" officeooo:paragraph-rsid="08bbe467"/>
    </style:style>
    <style:style style:name="P551" style:family="paragraph" style:parent-style-name="Text_20_body">
      <style:text-properties fo:language="la" fo:country="VA" officeooo:rsid="08bd5774" officeooo:paragraph-rsid="08bd5774"/>
    </style:style>
    <style:style style:name="P552" style:family="paragraph" style:parent-style-name="Text_20_body">
      <style:text-properties fo:language="la" fo:country="VA" officeooo:rsid="08be5a69" officeooo:paragraph-rsid="08bdd812"/>
    </style:style>
    <style:style style:name="P553" style:family="paragraph" style:parent-style-name="Text_20_body">
      <style:text-properties fo:language="la" fo:country="VA" officeooo:rsid="08c1b41d" officeooo:paragraph-rsid="08c29a27"/>
    </style:style>
    <style:style style:name="P554" style:family="paragraph" style:parent-style-name="Text_20_body">
      <style:text-properties fo:language="la" fo:country="VA" officeooo:rsid="08c29a27" officeooo:paragraph-rsid="08c29a27"/>
    </style:style>
    <style:style style:name="P555" style:family="paragraph" style:parent-style-name="Text_20_body">
      <style:text-properties fo:language="la" fo:country="VA" officeooo:rsid="08c35deb" officeooo:paragraph-rsid="08c35deb"/>
    </style:style>
    <style:style style:name="P556" style:family="paragraph" style:parent-style-name="Text_20_body">
      <style:text-properties fo:language="la" fo:country="VA" officeooo:rsid="08c43e00" officeooo:paragraph-rsid="08c512e6"/>
    </style:style>
    <style:style style:name="P557" style:family="paragraph" style:parent-style-name="Text_20_body">
      <style:text-properties fo:language="la" fo:country="VA" officeooo:rsid="08c43e00" officeooo:paragraph-rsid="08ca0e49"/>
    </style:style>
    <style:style style:name="P558" style:family="paragraph" style:parent-style-name="Text_20_body">
      <style:text-properties fo:language="la" fo:country="VA" officeooo:rsid="08c43e00" officeooo:paragraph-rsid="08d77b81"/>
    </style:style>
    <style:style style:name="P559" style:family="paragraph" style:parent-style-name="Text_20_body">
      <style:text-properties fo:language="la" fo:country="VA" officeooo:rsid="08c512e6" officeooo:paragraph-rsid="08c512e6"/>
    </style:style>
    <style:style style:name="P560" style:family="paragraph" style:parent-style-name="Text_20_body">
      <style:text-properties fo:language="la" fo:country="VA" officeooo:rsid="08ca0e49" officeooo:paragraph-rsid="08ca0e49"/>
    </style:style>
    <style:style style:name="P561" style:family="paragraph" style:parent-style-name="Text_20_body">
      <style:text-properties fo:language="la" fo:country="VA" officeooo:rsid="08cc50b8" officeooo:paragraph-rsid="08cd9d09"/>
    </style:style>
    <style:style style:name="P562" style:family="paragraph" style:parent-style-name="Text_20_body">
      <style:text-properties fo:language="la" fo:country="VA" officeooo:rsid="08d276c4" officeooo:paragraph-rsid="08d276c4"/>
    </style:style>
    <style:style style:name="P563" style:family="paragraph" style:parent-style-name="Text_20_body">
      <style:text-properties fo:language="la" fo:country="VA" officeooo:rsid="08d39dc2" officeooo:paragraph-rsid="08d39dc2"/>
    </style:style>
    <style:style style:name="P564" style:family="paragraph" style:parent-style-name="Text_20_body">
      <style:text-properties fo:language="la" fo:country="VA" officeooo:rsid="08d39dc2" officeooo:paragraph-rsid="08d61105"/>
    </style:style>
    <style:style style:name="P565" style:family="paragraph" style:parent-style-name="Text_20_body">
      <style:text-properties fo:language="la" fo:country="VA" officeooo:rsid="08d39dc2" officeooo:paragraph-rsid="08d77b81"/>
    </style:style>
    <style:style style:name="P566" style:family="paragraph" style:parent-style-name="Text_20_body">
      <style:text-properties fo:language="la" fo:country="VA" officeooo:rsid="08d39dc2" officeooo:paragraph-rsid="08d88c05"/>
    </style:style>
    <style:style style:name="P567" style:family="paragraph" style:parent-style-name="Text_20_body">
      <style:text-properties fo:language="la" fo:country="VA" officeooo:rsid="08d39dc2" officeooo:paragraph-rsid="08d89873"/>
    </style:style>
    <style:style style:name="P568" style:family="paragraph" style:parent-style-name="Text_20_body">
      <style:text-properties fo:language="la" fo:country="VA" officeooo:rsid="08d77b81" officeooo:paragraph-rsid="08d77b81"/>
    </style:style>
    <style:style style:name="P569" style:family="paragraph" style:parent-style-name="Text_20_body">
      <style:text-properties fo:language="la" fo:country="VA" officeooo:rsid="08db2888" officeooo:paragraph-rsid="08db2888"/>
    </style:style>
    <style:style style:name="P570" style:family="paragraph" style:parent-style-name="Text_20_body">
      <style:text-properties fo:language="la" fo:country="VA" officeooo:rsid="08de230b" officeooo:paragraph-rsid="08de230b"/>
    </style:style>
    <style:style style:name="P571" style:family="paragraph" style:parent-style-name="Text_20_body">
      <style:text-properties fo:language="la" fo:country="VA" officeooo:rsid="08de230b" officeooo:paragraph-rsid="08df5274"/>
    </style:style>
    <style:style style:name="P572" style:family="paragraph" style:parent-style-name="Text_20_body">
      <style:text-properties fo:language="la" fo:country="VA" officeooo:rsid="08de230b" officeooo:paragraph-rsid="08e44b5f"/>
    </style:style>
    <style:style style:name="P573" style:family="paragraph" style:parent-style-name="Text_20_body">
      <style:text-properties fo:language="la" fo:country="VA" officeooo:rsid="08dfee0c" officeooo:paragraph-rsid="08dfee0c"/>
    </style:style>
    <style:style style:name="P574" style:family="paragraph" style:parent-style-name="Text_20_body">
      <style:text-properties fo:language="la" fo:country="VA" officeooo:rsid="08e63888" officeooo:paragraph-rsid="08e63888"/>
    </style:style>
    <style:style style:name="P575" style:family="paragraph" style:parent-style-name="Text_20_body">
      <style:text-properties fo:language="la" fo:country="VA" officeooo:rsid="08e6cb36" officeooo:paragraph-rsid="08e6cb36"/>
    </style:style>
    <style:style style:name="P576" style:family="paragraph" style:parent-style-name="Title">
      <style:text-properties fo:language="la" fo:country="VA" officeooo:paragraph-rsid="0650da7c"/>
    </style:style>
    <style:style style:name="P577" style:family="paragraph" style:parent-style-name="Title">
      <style:text-properties fo:language="la" fo:country="VA"/>
    </style:style>
    <style:style style:name="P578" style:family="paragraph" style:parent-style-name="Text_20_body">
      <style:paragraph-properties fo:text-align="start" style:justify-single-word="false"/>
      <style:text-properties fo:language="la" fo:country="VA" officeooo:rsid="09d5501c" officeooo:paragraph-rsid="09d5501c"/>
    </style:style>
    <style:style style:name="P579" style:family="paragraph" style:parent-style-name="Text_20_body">
      <style:paragraph-properties fo:text-align="start" style:justify-single-word="false"/>
      <style:text-properties fo:language="la" fo:country="VA" officeooo:rsid="09e50872" officeooo:paragraph-rsid="09e50872"/>
    </style:style>
    <style:style style:name="P580" style:family="paragraph" style:parent-style-name="Text_20_body">
      <style:text-properties fo:language="la" fo:country="VA" officeooo:rsid="0a2a2db9" officeooo:paragraph-rsid="0a2a2db9"/>
    </style:style>
    <style:style style:name="P581" style:family="paragraph" style:parent-style-name="Text_20_body">
      <style:text-properties fo:language="la" fo:country="VA" officeooo:rsid="0a2dcf6c" officeooo:paragraph-rsid="0a2dcf6c"/>
    </style:style>
    <style:style style:name="P582" style:family="paragraph" style:parent-style-name="Text_20_body">
      <style:text-properties fo:language="la" fo:country="VA" officeooo:rsid="0a2fce34" officeooo:paragraph-rsid="0a2fce34"/>
    </style:style>
    <style:style style:name="P583" style:family="paragraph" style:parent-style-name="Text_20_body">
      <style:paragraph-properties fo:text-align="start" style:justify-single-word="false"/>
      <style:text-properties fo:language="la" fo:country="VA" officeooo:rsid="0674bf90" officeooo:paragraph-rsid="0674bf90"/>
    </style:style>
    <style:style style:name="P584" style:family="paragraph" style:parent-style-name="Text_20_body">
      <style:paragraph-properties fo:text-align="start" style:justify-single-word="false"/>
      <style:text-properties fo:language="la" fo:country="VA" officeooo:rsid="06a2bd4a" officeooo:paragraph-rsid="0bb344a4"/>
    </style:style>
    <style:style style:name="P585" style:family="paragraph" style:parent-style-name="Text_20_body">
      <style:paragraph-properties fo:text-align="start" style:justify-single-word="false"/>
      <style:text-properties fo:language="la" fo:country="VA" officeooo:rsid="06c737e8" officeooo:paragraph-rsid="06c737e8"/>
    </style:style>
    <style:style style:name="P586" style:family="paragraph" style:parent-style-name="Subtitle">
      <style:paragraph-properties fo:text-align="start" style:justify-single-word="false"/>
    </style:style>
    <style:style style:name="P587" style:family="paragraph" style:parent-style-name="Text_20_body">
      <style:paragraph-properties fo:text-align="start" style:justify-single-word="false"/>
      <style:text-properties officeooo:rsid="09e5f20e" officeooo:paragraph-rsid="09e5f20e"/>
    </style:style>
    <style:style style:name="P588" style:family="paragraph" style:parent-style-name="Text_20_body">
      <style:paragraph-properties fo:text-align="start" style:justify-single-word="false"/>
      <style:text-properties officeooo:rsid="09e6b469" officeooo:paragraph-rsid="09e6b469"/>
    </style:style>
    <style:style style:name="P589" style:family="paragraph" style:parent-style-name="Text_20_body">
      <style:paragraph-properties fo:text-align="start" style:justify-single-word="false"/>
      <style:text-properties officeooo:rsid="09e8afc9" officeooo:paragraph-rsid="09e8afc9"/>
    </style:style>
    <style:style style:name="P590" style:family="paragraph" style:parent-style-name="Text_20_body">
      <style:paragraph-properties fo:text-align="start" style:justify-single-word="false"/>
      <style:text-properties officeooo:rsid="09e93ddf" officeooo:paragraph-rsid="09e93ddf"/>
    </style:style>
    <style:style style:name="P591" style:family="paragraph" style:parent-style-name="Text_20_body">
      <style:paragraph-properties fo:text-align="start" style:justify-single-word="false"/>
      <style:text-properties officeooo:rsid="09ecfc9d" officeooo:paragraph-rsid="09f167b8"/>
    </style:style>
    <style:style style:name="P592" style:family="paragraph" style:parent-style-name="Text_20_body">
      <style:paragraph-properties fo:text-align="start" style:justify-single-word="false"/>
      <style:text-properties officeooo:rsid="09ecfc9d" officeooo:paragraph-rsid="09fd73d3"/>
    </style:style>
    <style:style style:name="P593" style:family="paragraph" style:parent-style-name="Text_20_body">
      <style:paragraph-properties fo:text-align="start" style:justify-single-word="false"/>
      <style:text-properties officeooo:rsid="09ecfc9d" officeooo:paragraph-rsid="09ff2a35"/>
    </style:style>
    <style:style style:name="P594" style:family="paragraph" style:parent-style-name="Text_20_body">
      <style:paragraph-properties fo:text-align="start" style:justify-single-word="false"/>
      <style:text-properties officeooo:rsid="09ecfc9d" officeooo:paragraph-rsid="0a033671"/>
    </style:style>
    <style:style style:name="P595" style:family="paragraph" style:parent-style-name="Text_20_body">
      <style:paragraph-properties fo:text-align="start" style:justify-single-word="false"/>
      <style:text-properties officeooo:rsid="09ecfc9d" officeooo:paragraph-rsid="0a0543cd"/>
    </style:style>
    <style:style style:name="P596" style:family="paragraph" style:parent-style-name="Text_20_body">
      <style:paragraph-properties fo:text-align="start" style:justify-single-word="false"/>
      <style:text-properties officeooo:rsid="0a006b27" officeooo:paragraph-rsid="0a007a60"/>
    </style:style>
    <style:style style:name="P597" style:family="paragraph" style:parent-style-name="Text_20_body">
      <style:paragraph-properties fo:text-align="start" style:justify-single-word="false"/>
      <style:text-properties officeooo:rsid="0a0533ca" officeooo:paragraph-rsid="0a0533ca"/>
    </style:style>
    <style:style style:name="P598" style:family="paragraph" style:parent-style-name="Standard">
      <style:paragraph-properties fo:margin-left="0.5in" fo:text-indent="0in" style:auto-text-indent="false"/>
    </style:style>
    <style:style style:name="P599" style:family="paragraph" style:parent-style-name="Standard">
      <style:paragraph-properties fo:margin-left="1in" fo:text-indent="0in" style:auto-text-indent="false"/>
    </style:style>
    <style:style style:name="P600" style:family="paragraph" style:parent-style-name="Text_20_body">
      <style:paragraph-properties fo:text-align="start" style:justify-single-word="false"/>
      <style:text-properties officeooo:rsid="09fc696a" officeooo:paragraph-rsid="09fc696a"/>
    </style:style>
    <style:style style:name="P601" style:family="paragraph" style:parent-style-name="Text_20_body">
      <style:paragraph-properties fo:text-align="start" style:justify-single-word="false"/>
      <style:text-properties officeooo:rsid="09fd73d3" officeooo:paragraph-rsid="09fd73d3"/>
    </style:style>
    <style:style style:name="P602" style:family="paragraph" style:parent-style-name="Text_20_body">
      <style:paragraph-properties fo:text-align="start" style:justify-single-word="false"/>
      <style:text-properties officeooo:rsid="0a033671" officeooo:paragraph-rsid="0a033671"/>
    </style:style>
    <style:style style:name="P603" style:family="paragraph" style:parent-style-name="Text_20_body">
      <style:paragraph-properties fo:text-align="start" style:justify-single-word="false"/>
      <style:text-properties officeooo:rsid="0a033671" officeooo:paragraph-rsid="0a0543cd"/>
    </style:style>
    <style:style style:name="P604" style:family="paragraph" style:parent-style-name="Text_20_body">
      <style:paragraph-properties fo:text-align="start" style:justify-single-word="false"/>
      <style:text-properties officeooo:rsid="0a059119" officeooo:paragraph-rsid="0a059119"/>
    </style:style>
    <style:style style:name="P605" style:family="paragraph" style:parent-style-name="Text_20_body">
      <style:paragraph-properties fo:text-align="start" style:justify-single-word="false"/>
      <style:text-properties officeooo:rsid="0a061a5c" officeooo:paragraph-rsid="0a061a5c"/>
    </style:style>
    <style:style style:name="P606" style:family="paragraph" style:parent-style-name="Text_20_body">
      <style:paragraph-properties fo:text-align="start" style:justify-single-word="false"/>
      <style:text-properties officeooo:rsid="0a06c14e" officeooo:paragraph-rsid="0a06c14e"/>
    </style:style>
    <style:style style:name="P607" style:family="paragraph" style:parent-style-name="Text_20_body">
      <style:paragraph-properties fo:text-align="start" style:justify-single-word="false"/>
      <style:text-properties officeooo:rsid="0a091790" officeooo:paragraph-rsid="0a091790"/>
    </style:style>
    <style:style style:name="P608" style:family="paragraph" style:parent-style-name="Text_20_body">
      <style:paragraph-properties fo:text-align="start" style:justify-single-word="false"/>
      <style:text-properties officeooo:rsid="0a0ab431" officeooo:paragraph-rsid="0a0ab431"/>
    </style:style>
    <style:style style:name="P609" style:family="paragraph" style:parent-style-name="Text_20_body">
      <style:paragraph-properties fo:text-align="start" style:justify-single-word="false"/>
      <style:text-properties officeooo:rsid="0a0cb468" officeooo:paragraph-rsid="0a0cb468"/>
    </style:style>
    <style:style style:name="P610" style:family="paragraph" style:parent-style-name="Text_20_body">
      <style:paragraph-properties fo:text-align="start" style:justify-single-word="false"/>
      <style:text-properties officeooo:rsid="0a0d67e2" officeooo:paragraph-rsid="0a0d67e2"/>
    </style:style>
    <style:style style:name="P611" style:family="paragraph" style:parent-style-name="Text_20_body">
      <style:paragraph-properties fo:text-align="start" style:justify-single-word="false"/>
      <style:text-properties officeooo:rsid="0a0f36fc" officeooo:paragraph-rsid="0a0f36fc"/>
    </style:style>
    <style:style style:name="P612" style:family="paragraph" style:parent-style-name="Text_20_body">
      <style:paragraph-properties fo:text-align="start" style:justify-single-word="false"/>
      <style:text-properties officeooo:rsid="0a11f5e0" officeooo:paragraph-rsid="0a11f5e0"/>
    </style:style>
    <style:style style:name="P613" style:family="paragraph" style:parent-style-name="Text_20_body">
      <style:paragraph-properties fo:text-align="start" style:justify-single-word="false"/>
      <style:text-properties officeooo:rsid="0a1201ae" officeooo:paragraph-rsid="0a1201ae"/>
    </style:style>
    <style:style style:name="P614" style:family="paragraph" style:parent-style-name="Text_20_body">
      <style:paragraph-properties fo:text-align="start" style:justify-single-word="false"/>
      <style:text-properties officeooo:rsid="0a1380af" officeooo:paragraph-rsid="0a1380af"/>
    </style:style>
    <style:style style:name="P615" style:family="paragraph" style:parent-style-name="Text_20_body">
      <style:paragraph-properties fo:text-align="start" style:justify-single-word="false"/>
      <style:text-properties officeooo:rsid="0a1380af" officeooo:paragraph-rsid="0a16ee9a"/>
    </style:style>
    <style:style style:name="P616" style:family="paragraph" style:parent-style-name="Text_20_body">
      <style:paragraph-properties fo:text-align="start" style:justify-single-word="false"/>
      <style:text-properties officeooo:rsid="0a186411" officeooo:paragraph-rsid="0a186411"/>
    </style:style>
    <style:style style:name="P617" style:family="paragraph" style:parent-style-name="Text_20_body">
      <style:paragraph-properties fo:text-align="start" style:justify-single-word="false"/>
      <style:text-properties officeooo:rsid="0a1bdcc1" officeooo:paragraph-rsid="0a1da37b"/>
    </style:style>
    <style:style style:name="P618" style:family="paragraph" style:parent-style-name="Text_20_body">
      <style:paragraph-properties fo:text-align="start" style:justify-single-word="false"/>
      <style:text-properties officeooo:rsid="0a1bdcc1" officeooo:paragraph-rsid="0a1f89e8"/>
    </style:style>
    <style:style style:name="P619" style:family="paragraph" style:parent-style-name="Text_20_body">
      <style:text-properties officeooo:rsid="0a285b7f" officeooo:paragraph-rsid="0a285b7f"/>
    </style:style>
    <style:style style:name="P620" style:family="paragraph" style:parent-style-name="Text_20_body">
      <style:text-properties officeooo:rsid="0a292fa0" officeooo:paragraph-rsid="0a2a2db9"/>
    </style:style>
    <style:style style:name="P621" style:family="paragraph" style:parent-style-name="Text_20_body">
      <style:text-properties officeooo:rsid="0a2fce34" officeooo:paragraph-rsid="0a2fce34"/>
    </style:style>
    <style:style style:name="P622" style:family="paragraph" style:parent-style-name="Text_20_body">
      <style:text-properties officeooo:rsid="0a33fffa" officeooo:paragraph-rsid="0a35f350"/>
    </style:style>
    <style:style style:name="P623" style:family="paragraph" style:parent-style-name="Text_20_body">
      <style:text-properties officeooo:rsid="0a37e4d8" officeooo:paragraph-rsid="0a37e4d8"/>
    </style:style>
    <style:style style:name="P624" style:family="paragraph" style:parent-style-name="Text_20_body">
      <style:text-properties officeooo:rsid="0a38fd89" officeooo:paragraph-rsid="0a39c153"/>
    </style:style>
    <style:style style:name="P625" style:family="paragraph" style:parent-style-name="Text_20_body">
      <style:text-properties officeooo:rsid="0a38fd89" officeooo:paragraph-rsid="0a3ab717"/>
    </style:style>
    <style:style style:name="P626" style:family="paragraph" style:parent-style-name="Text_20_body">
      <style:text-properties officeooo:rsid="0a41391f" officeooo:paragraph-rsid="0a41391f"/>
    </style:style>
    <style:style style:name="P627" style:family="paragraph" style:parent-style-name="Text_20_body">
      <style:text-properties officeooo:rsid="0a35f350" officeooo:paragraph-rsid="0a35f350"/>
    </style:style>
    <style:style style:name="P628" style:family="paragraph" style:parent-style-name="Text_20_body">
      <style:text-properties officeooo:rsid="0a39c153" officeooo:paragraph-rsid="0a39c153"/>
    </style:style>
    <style:style style:name="P629" style:family="paragraph" style:parent-style-name="Text_20_body">
      <style:text-properties officeooo:rsid="0a3c9248" officeooo:paragraph-rsid="0a3c9248"/>
    </style:style>
    <style:style style:name="P630" style:family="paragraph" style:parent-style-name="Text_20_body">
      <style:text-properties officeooo:rsid="0a49612e" officeooo:paragraph-rsid="0a49612e"/>
    </style:style>
    <style:style style:name="P631" style:family="paragraph" style:parent-style-name="Text_20_body">
      <style:paragraph-properties fo:margin-left="0.5in" fo:text-indent="0in" style:auto-text-indent="false"/>
      <style:text-properties officeooo:rsid="0a49612e" officeooo:paragraph-rsid="0a49612e"/>
    </style:style>
    <style:style style:name="P632" style:family="paragraph" style:parent-style-name="Text_20_body">
      <style:text-properties officeooo:rsid="0a4e0187" officeooo:paragraph-rsid="0a4e0187"/>
    </style:style>
    <style:style style:name="P633" style:family="paragraph" style:parent-style-name="Text_20_body">
      <style:text-properties officeooo:rsid="0a518b02" officeooo:paragraph-rsid="0a518b02"/>
    </style:style>
    <style:style style:name="P634" style:family="paragraph" style:parent-style-name="Text_20_body">
      <style:paragraph-properties fo:text-align="start" style:justify-single-word="false"/>
      <style:text-properties officeooo:rsid="0a5390c4" officeooo:paragraph-rsid="0a5390c4"/>
    </style:style>
    <style:style style:name="P635" style:family="paragraph" style:parent-style-name="Text_20_body">
      <style:paragraph-properties fo:text-align="start" style:justify-single-word="false"/>
      <style:text-properties officeooo:rsid="0a5515b0" officeooo:paragraph-rsid="0a56ea4d"/>
    </style:style>
    <style:style style:name="P636" style:family="paragraph" style:parent-style-name="Text_20_body">
      <style:paragraph-properties fo:text-align="start" style:justify-single-word="false"/>
      <style:text-properties officeooo:rsid="0a5c2daa" officeooo:paragraph-rsid="0a5c2daa"/>
    </style:style>
    <style:style style:name="P637" style:family="paragraph" style:parent-style-name="Text_20_body">
      <style:paragraph-properties fo:text-align="start" style:justify-single-word="false"/>
      <style:text-properties officeooo:rsid="0a5c58b1" officeooo:paragraph-rsid="0a5c58b1"/>
    </style:style>
    <style:style style:name="P638" style:family="paragraph" style:parent-style-name="Text_20_body">
      <style:text-properties officeooo:rsid="0a5d93be" officeooo:paragraph-rsid="0a5d93be"/>
    </style:style>
    <style:style style:name="P639" style:family="paragraph" style:parent-style-name="Text_20_body">
      <style:text-properties officeooo:rsid="0a60287a" officeooo:paragraph-rsid="0a60287a"/>
    </style:style>
    <style:style style:name="P640" style:family="paragraph" style:parent-style-name="Text_20_body">
      <style:text-properties officeooo:rsid="0a614c37" officeooo:paragraph-rsid="0a614c37"/>
    </style:style>
    <style:style style:name="P641" style:family="paragraph" style:parent-style-name="Text_20_body">
      <style:paragraph-properties fo:text-align="start" style:justify-single-word="false"/>
      <style:text-properties officeooo:rsid="0a56ea4d" officeooo:paragraph-rsid="0a56ea4d"/>
    </style:style>
    <style:style style:name="P642" style:family="paragraph" style:parent-style-name="Text_20_body">
      <style:text-properties officeooo:rsid="0a666a30" officeooo:paragraph-rsid="0a666a30"/>
    </style:style>
    <style:style style:name="P643" style:family="paragraph" style:parent-style-name="Text_20_body">
      <style:text-properties officeooo:rsid="0a666a30" officeooo:paragraph-rsid="0a68b566"/>
    </style:style>
    <style:style style:name="P644" style:family="paragraph" style:parent-style-name="Text_20_body">
      <style:text-properties officeooo:paragraph-rsid="0a6bd555"/>
    </style:style>
    <style:style style:name="P645" style:family="paragraph" style:parent-style-name="Text_20_body">
      <style:text-properties officeooo:rsid="0a6ebe76" officeooo:paragraph-rsid="0a6ebe76"/>
    </style:style>
    <style:style style:name="P646" style:family="paragraph" style:parent-style-name="Text_20_body">
      <style:text-properties officeooo:rsid="0a6ef40a" officeooo:paragraph-rsid="0a6ef40a"/>
    </style:style>
    <style:style style:name="P647" style:family="paragraph" style:parent-style-name="Text_20_body">
      <style:text-properties officeooo:rsid="0a7068b2" officeooo:paragraph-rsid="0a7068b2"/>
    </style:style>
    <style:style style:name="P648" style:family="paragraph" style:parent-style-name="Text_20_body">
      <style:text-properties officeooo:rsid="0a7068b2" officeooo:paragraph-rsid="0a74b1d1"/>
    </style:style>
    <style:style style:name="P649" style:family="paragraph" style:parent-style-name="Text_20_body">
      <style:text-properties officeooo:rsid="0a7068b2" officeooo:paragraph-rsid="0a7583c6"/>
    </style:style>
    <style:style style:name="P650" style:family="paragraph" style:parent-style-name="Text_20_body">
      <style:text-properties officeooo:rsid="0a72a720" officeooo:paragraph-rsid="0a72a720"/>
    </style:style>
    <style:style style:name="P651" style:family="paragraph" style:parent-style-name="Text_20_body">
      <style:text-properties officeooo:rsid="0a73a38d" officeooo:paragraph-rsid="0a73a38d"/>
    </style:style>
    <style:style style:name="P652" style:family="paragraph" style:parent-style-name="Text_20_body">
      <style:text-properties officeooo:rsid="0a744120" officeooo:paragraph-rsid="0a74b1d1"/>
    </style:style>
    <style:style style:name="P653" style:family="paragraph" style:parent-style-name="Text_20_body">
      <style:text-properties officeooo:rsid="0a75f3f1" officeooo:paragraph-rsid="0a7583c6"/>
    </style:style>
    <style:style style:name="P654" style:family="paragraph" style:parent-style-name="Text_20_body">
      <style:text-properties officeooo:rsid="0a7ac1e2" officeooo:paragraph-rsid="0a7ac1e2"/>
    </style:style>
    <style:style style:name="P655" style:family="paragraph" style:parent-style-name="Text_20_body">
      <style:text-properties officeooo:rsid="0a7ac1e2" officeooo:paragraph-rsid="0a7bba90"/>
    </style:style>
    <style:style style:name="P656" style:family="paragraph" style:parent-style-name="Text_20_body">
      <style:text-properties officeooo:rsid="0a7c4d46" officeooo:paragraph-rsid="0a7c4d46"/>
    </style:style>
    <style:style style:name="P657" style:family="paragraph" style:parent-style-name="Text_20_body">
      <style:text-properties officeooo:rsid="0a7c4d46" officeooo:paragraph-rsid="0a7d7bda"/>
    </style:style>
    <style:style style:name="P658" style:family="paragraph" style:parent-style-name="Text_20_body">
      <style:text-properties officeooo:rsid="0a7f2775" officeooo:paragraph-rsid="0a7f2775"/>
    </style:style>
    <style:style style:name="P659" style:family="paragraph" style:parent-style-name="Text_20_body">
      <style:text-properties officeooo:rsid="0a82fea0" officeooo:paragraph-rsid="0a82fea0"/>
    </style:style>
    <style:style style:name="P660" style:family="paragraph" style:parent-style-name="Text_20_body">
      <style:text-properties officeooo:rsid="0a8362fb" officeooo:paragraph-rsid="0a8362fb"/>
    </style:style>
    <style:style style:name="P661" style:family="paragraph" style:parent-style-name="Text_20_body">
      <style:text-properties officeooo:rsid="0a8362fb" officeooo:paragraph-rsid="0a85a84c"/>
    </style:style>
    <style:style style:name="P662" style:family="paragraph" style:parent-style-name="Text_20_body">
      <style:text-properties officeooo:rsid="0a85a84c" officeooo:paragraph-rsid="0a85a84c"/>
    </style:style>
    <style:style style:name="P663" style:family="paragraph" style:parent-style-name="Text_20_body">
      <style:text-properties officeooo:rsid="0a877477" officeooo:paragraph-rsid="0a877477"/>
    </style:style>
    <style:style style:name="P664" style:family="paragraph" style:parent-style-name="Text_20_body">
      <style:text-properties officeooo:rsid="0a877477" officeooo:paragraph-rsid="0a8b3899"/>
    </style:style>
    <style:style style:name="P665" style:family="paragraph" style:parent-style-name="Text_20_body">
      <style:text-properties officeooo:rsid="0a877477" officeooo:paragraph-rsid="0a8c7311"/>
    </style:style>
    <style:style style:name="P666" style:family="paragraph" style:parent-style-name="Text_20_body">
      <style:text-properties officeooo:rsid="0a877477" officeooo:paragraph-rsid="0ab32749"/>
    </style:style>
    <style:style style:name="P667" style:family="paragraph" style:parent-style-name="Text_20_body">
      <style:text-properties officeooo:rsid="0a7d7bda" officeooo:paragraph-rsid="0a7d7bda"/>
    </style:style>
    <style:style style:name="P668" style:family="paragraph" style:parent-style-name="Text_20_body">
      <style:text-properties officeooo:rsid="0a96c7d9" officeooo:paragraph-rsid="0a96c7d9"/>
    </style:style>
    <style:style style:name="P669" style:family="paragraph" style:parent-style-name="Text_20_body">
      <style:text-properties officeooo:rsid="0a97ddee" officeooo:paragraph-rsid="0a97ddee"/>
    </style:style>
    <style:style style:name="P670" style:family="paragraph" style:parent-style-name="Text_20_body">
      <style:text-properties officeooo:rsid="0a9833ce" officeooo:paragraph-rsid="0a9833ce"/>
    </style:style>
    <style:style style:name="P671" style:family="paragraph" style:parent-style-name="Text_20_body">
      <style:text-properties officeooo:rsid="0a9a0d57" officeooo:paragraph-rsid="0a9a0d57"/>
    </style:style>
    <style:style style:name="P672" style:family="paragraph" style:parent-style-name="Text_20_body">
      <style:text-properties officeooo:rsid="0a9bf5ec" officeooo:paragraph-rsid="0a9bf5ec"/>
    </style:style>
    <style:style style:name="P673" style:family="paragraph" style:parent-style-name="Text_20_body">
      <style:text-properties officeooo:rsid="0a8b3899" officeooo:paragraph-rsid="0a8b3899"/>
    </style:style>
    <style:style style:name="P674" style:family="paragraph" style:parent-style-name="Text_20_body">
      <style:text-properties officeooo:rsid="0a8c2c21" officeooo:paragraph-rsid="0a8c2c21"/>
    </style:style>
    <style:style style:name="P675" style:family="paragraph" style:parent-style-name="Text_20_body">
      <style:text-properties officeooo:rsid="0a8c7311" officeooo:paragraph-rsid="0a8c7311"/>
    </style:style>
    <style:style style:name="P676" style:family="paragraph" style:parent-style-name="Text_20_body">
      <style:text-properties officeooo:rsid="0a8e0b75" officeooo:paragraph-rsid="0a8e0b75"/>
    </style:style>
    <style:style style:name="P677" style:family="paragraph" style:parent-style-name="Text_20_body">
      <style:text-properties officeooo:rsid="0a9165da" officeooo:paragraph-rsid="0a9165da"/>
    </style:style>
    <style:style style:name="P678" style:family="paragraph" style:parent-style-name="Text_20_body">
      <style:text-properties officeooo:rsid="0a92b895" officeooo:paragraph-rsid="0a92b895"/>
    </style:style>
    <style:style style:name="P679" style:family="paragraph" style:parent-style-name="Text_20_body">
      <style:text-properties officeooo:rsid="0a92cc6e" officeooo:paragraph-rsid="0a92cc6e"/>
    </style:style>
    <style:style style:name="P680" style:family="paragraph" style:parent-style-name="Text_20_body">
      <style:text-properties officeooo:rsid="0a93f872" officeooo:paragraph-rsid="0a93f872"/>
    </style:style>
    <style:style style:name="P681" style:family="paragraph" style:parent-style-name="Text_20_body">
      <style:text-properties officeooo:rsid="0aa32554" officeooo:paragraph-rsid="0aa32554"/>
    </style:style>
    <style:style style:name="P682" style:family="paragraph" style:parent-style-name="Text_20_body">
      <style:text-properties officeooo:rsid="0aa32554" officeooo:paragraph-rsid="0aa7eef9"/>
    </style:style>
    <style:style style:name="P683" style:family="paragraph" style:parent-style-name="Text_20_body">
      <style:paragraph-properties fo:text-align="start" style:justify-single-word="false"/>
      <style:text-properties officeooo:rsid="0aa9f32c" officeooo:paragraph-rsid="0aa9f32c"/>
    </style:style>
    <style:style style:name="P684" style:family="paragraph" style:parent-style-name="Text_20_body">
      <style:paragraph-properties fo:text-align="start" style:justify-single-word="false"/>
      <style:text-properties officeooo:rsid="0aab21bb" officeooo:paragraph-rsid="0aab21bb"/>
    </style:style>
    <style:style style:name="P685" style:family="paragraph" style:parent-style-name="Text_20_body">
      <style:paragraph-properties fo:text-align="start" style:justify-single-word="false"/>
      <style:text-properties officeooo:rsid="0aaffd28" officeooo:paragraph-rsid="0aaffd28"/>
    </style:style>
    <style:style style:name="P686" style:family="paragraph" style:parent-style-name="Text_20_body">
      <style:text-properties officeooo:rsid="0aa3fb89" officeooo:paragraph-rsid="0aa3fb89"/>
    </style:style>
    <style:style style:name="P687" style:family="paragraph" style:parent-style-name="Text_20_body">
      <style:text-properties officeooo:rsid="0aa6adb9" officeooo:paragraph-rsid="0aa6adb9"/>
    </style:style>
    <style:style style:name="P688" style:family="paragraph" style:parent-style-name="Text_20_body">
      <style:text-properties officeooo:rsid="0ab32749" officeooo:paragraph-rsid="0ab32749"/>
    </style:style>
    <style:style style:name="P689" style:family="paragraph" style:parent-style-name="Text_20_body">
      <style:text-properties officeooo:rsid="0a2b2c0d" officeooo:paragraph-rsid="0a2b2c0d"/>
    </style:style>
    <style:style style:name="P690" style:family="paragraph" style:parent-style-name="Standard">
      <style:paragraph-properties fo:margin-left="1in" fo:text-indent="0in" style:auto-text-indent="false"/>
      <style:text-properties officeooo:paragraph-rsid="0aa21783"/>
    </style:style>
    <style:style style:name="P691" style:family="paragraph" style:parent-style-name="Text_20_body">
      <style:paragraph-properties fo:margin-left="0.5in" fo:text-indent="0in" style:auto-text-indent="false"/>
      <style:text-properties officeooo:rsid="0a46ec05" officeooo:paragraph-rsid="0a46ec05"/>
    </style:style>
    <style:style style:name="P692" style:family="paragraph" style:parent-style-name="Text_20_body">
      <style:paragraph-properties fo:margin-left="0.5in" fo:text-indent="0in" style:auto-text-indent="false"/>
      <style:text-properties officeooo:rsid="0a46ec05" officeooo:paragraph-rsid="0b56f260"/>
    </style:style>
    <style:style style:name="P693" style:family="paragraph" style:parent-style-name="Text_20_body">
      <style:paragraph-properties fo:margin-left="0.5in" fo:text-indent="0in" style:auto-text-indent="false"/>
      <style:text-properties officeooo:rsid="0a4b873b" officeooo:paragraph-rsid="0a4b873b"/>
    </style:style>
    <style:style style:name="P694" style:family="paragraph" style:parent-style-name="Text_20_body">
      <style:paragraph-properties fo:margin-left="0.5in" fo:text-indent="0in" style:auto-text-indent="false"/>
      <style:text-properties officeooo:rsid="0a4b873b" officeooo:paragraph-rsid="0b5e163c"/>
    </style:style>
    <style:style style:name="P695" style:family="paragraph" style:parent-style-name="Text_20_body">
      <style:paragraph-properties fo:margin-left="0.5in" fo:text-indent="0in" style:auto-text-indent="false"/>
      <style:text-properties officeooo:rsid="0a4b5132" officeooo:paragraph-rsid="0b5e163c"/>
    </style:style>
    <style:style style:name="P696" style:family="paragraph" style:parent-style-name="Heading_20_1">
      <style:paragraph-properties fo:break-before="page"/>
      <style:text-properties fo:language="la" fo:country="VA"/>
    </style:style>
    <style:style style:name="P697" style:family="paragraph" style:parent-style-name="Heading_20_1">
      <style:paragraph-properties fo:break-before="page"/>
      <style:text-properties fo:language="la" fo:country="VA" officeooo:rsid="0bef3006" officeooo:paragraph-rsid="0bef3006"/>
    </style:style>
    <style:style style:name="P698" style:family="paragraph" style:parent-style-name="Heading_20_2">
      <style:text-properties fo:language="la" fo:country="VA"/>
    </style:style>
    <style:style style:name="P699" style:family="paragraph" style:parent-style-name="Heading_20_2">
      <style:paragraph-properties fo:break-before="page"/>
      <style:text-properties fo:language="la" fo:country="VA"/>
    </style:style>
    <style:style style:name="P700" style:family="paragraph" style:parent-style-name="Heading_20_2">
      <style:text-properties fo:language="la" fo:country="VA" officeooo:paragraph-rsid="09314b14"/>
    </style:style>
    <style:style style:name="P701" style:family="paragraph" style:parent-style-name="Heading_20_2">
      <style:paragraph-properties fo:break-before="page"/>
      <style:text-properties fo:language="la" fo:country="VA" officeooo:paragraph-rsid="08ef2db6"/>
    </style:style>
    <style:style style:name="P702" style:family="paragraph" style:parent-style-name="Heading_20_3">
      <style:text-properties fo:language="la" fo:country="VA"/>
    </style:style>
    <style:style style:name="P703" style:family="paragraph" style:parent-style-name="Heading_20_4">
      <style:text-properties fo:language="la" fo:country="VA"/>
    </style:style>
    <style:style style:name="P704" style:family="paragraph" style:parent-style-name="Heading_20_4">
      <style:text-properties fo:language="la" fo:country="VA" officeooo:rsid="060cb700" officeooo:paragraph-rsid="060cb700"/>
    </style:style>
    <style:style style:name="P705" style:family="paragraph" style:parent-style-name="Heading_20_4">
      <style:text-properties fo:language="la" fo:country="VA" officeooo:paragraph-rsid="0635ddbd"/>
    </style:style>
    <style:style style:name="P706" style:family="paragraph" style:parent-style-name="Heading_20_4">
      <style:paragraph-properties fo:text-align="start" style:justify-single-word="false"/>
      <style:text-properties fo:language="la" fo:country="VA" officeooo:rsid="063b0672" officeooo:paragraph-rsid="063b0672"/>
    </style:style>
    <style:style style:name="P707" style:family="paragraph" style:parent-style-name="Heading_20_4">
      <style:text-properties fo:language="la" fo:country="VA" officeooo:rsid="063fd909"/>
    </style:style>
    <style:style style:name="P708" style:family="paragraph" style:parent-style-name="Heading_20_4">
      <style:text-properties fo:language="la" fo:country="VA" officeooo:rsid="0684d68a" officeooo:paragraph-rsid="0b69380d"/>
    </style:style>
    <style:style style:name="P709" style:family="paragraph" style:parent-style-name="Heading_20_4">
      <style:text-properties fo:language="la" fo:country="VA" officeooo:rsid="07235820" officeooo:paragraph-rsid="07242819"/>
    </style:style>
    <style:style style:name="P710" style:family="paragraph" style:parent-style-name="Heading_20_4">
      <style:text-properties fo:language="la" fo:country="VA" officeooo:rsid="078d1def"/>
    </style:style>
    <style:style style:name="P711" style:family="paragraph" style:parent-style-name="Heading_20_4">
      <style:text-properties fo:language="la" fo:country="VA" officeooo:rsid="0896b68d" officeooo:paragraph-rsid="0896b68d"/>
    </style:style>
    <style:style style:name="P712" style:family="paragraph" style:parent-style-name="Heading_20_4">
      <style:paragraph-properties fo:text-align="start" style:justify-single-word="false"/>
      <style:text-properties fo:language="la" fo:country="VA" officeooo:rsid="0896b68d" officeooo:paragraph-rsid="0896b68d"/>
    </style:style>
    <style:style style:name="P713" style:family="paragraph" style:parent-style-name="Heading_20_4">
      <style:text-properties fo:language="la" fo:country="VA" officeooo:rsid="08aa5031"/>
    </style:style>
    <style:style style:name="P714" style:family="paragraph" style:parent-style-name="Heading_20_4">
      <style:text-properties style:font-name="Liberation Sans" fo:font-size="14.1000003814697pt" fo:language="la" fo:country="VA" fo:font-weight="bold" officeooo:rsid="077615d8" officeooo:paragraph-rsid="077615d8" style:font-name-asian="Noto Sans CJK SC" style:font-size-asian="14.1000003814697pt" style:font-weight-asian="bold" style:font-name-complex="Lohit Devanagari1" style:font-size-complex="14.1000003814697pt" style:font-weight-complex="bold"/>
    </style:style>
    <style:style style:name="P715" style:family="paragraph" style:parent-style-name="Heading_20_4">
      <style:text-properties officeooo:rsid="0a39f11f"/>
    </style:style>
    <style:style style:name="P716" style:family="paragraph" style:parent-style-name="Heading_20_5">
      <style:text-properties fo:language="la" fo:country="VA"/>
    </style:style>
    <style:style style:name="P717" style:family="paragraph" style:parent-style-name="Heading_20_5">
      <style:text-properties fo:language="la" fo:country="VA" officeooo:paragraph-rsid="0bff83cc"/>
    </style:style>
    <style:style style:name="P718" style:family="paragraph" style:parent-style-name="Heading_20_6">
      <style:text-properties fo:language="la" fo:country="VA"/>
    </style:style>
    <style:style style:name="P719" style:family="paragraph" style:parent-style-name="Standard" style:list-style-name="L6">
      <style:text-properties fo:language="la" fo:country="VA"/>
    </style:style>
    <style:style style:name="P720" style:family="paragraph" style:parent-style-name="Standard" style:list-style-name="L7">
      <style:text-properties fo:language="la" fo:country="VA"/>
    </style:style>
    <style:style style:name="P721" style:family="paragraph" style:parent-style-name="Standard" style:list-style-name="L8">
      <style:text-properties fo:language="la" fo:country="VA"/>
    </style:style>
    <style:style style:name="P722" style:family="paragraph" style:parent-style-name="Standard" style:list-style-name="L8">
      <style:text-properties fo:language="la" fo:country="VA" officeooo:paragraph-rsid="0b554060"/>
    </style:style>
    <style:style style:name="P723" style:family="paragraph" style:parent-style-name="Standard" style:list-style-name="L9">
      <style:text-properties fo:language="la" fo:country="VA"/>
    </style:style>
    <style:style style:name="P724" style:family="paragraph" style:parent-style-name="Standard" style:list-style-name="L14">
      <style:text-properties fo:language="la" fo:country="VA"/>
    </style:style>
    <style:style style:name="P725" style:family="paragraph" style:parent-style-name="Standard" style:list-style-name="L15">
      <style:text-properties fo:language="la" fo:country="VA"/>
    </style:style>
    <style:style style:name="P726" style:family="paragraph" style:parent-style-name="Standard" style:list-style-name="L15">
      <style:text-properties fo:language="la" fo:country="VA" officeooo:paragraph-rsid="07d450e1"/>
    </style:style>
    <style:style style:name="P727" style:family="paragraph" style:parent-style-name="Subtitle" style:list-style-name="L1">
      <style:paragraph-properties fo:text-align="start" style:justify-single-word="false"/>
      <style:text-properties fo:language="la" fo:country="VA"/>
    </style:style>
    <style:style style:name="P728" style:family="paragraph" style:parent-style-name="Text_20_body" style:list-style-name="L2">
      <style:text-properties fo:language="la" fo:country="VA" officeooo:rsid="0959fe16" officeooo:paragraph-rsid="0959fe16"/>
    </style:style>
    <style:style style:name="P729" style:family="paragraph" style:parent-style-name="Text_20_body" style:list-style-name="L3">
      <style:paragraph-properties fo:text-align="start" style:justify-single-word="false"/>
      <style:text-properties fo:language="la" fo:country="VA" officeooo:rsid="09bf2891" officeooo:paragraph-rsid="09bf2891"/>
    </style:style>
    <style:style style:name="P730" style:family="paragraph" style:parent-style-name="Text_20_body" style:list-style-name="L3">
      <style:paragraph-properties fo:text-align="start" style:justify-single-word="false"/>
      <style:text-properties fo:language="la" fo:country="VA" officeooo:rsid="09c1182f" officeooo:paragraph-rsid="09c1182f"/>
    </style:style>
    <style:style style:name="P731" style:family="paragraph" style:parent-style-name="Text_20_body" style:list-style-name="L3">
      <style:paragraph-properties fo:text-align="start" style:justify-single-word="false"/>
      <style:text-properties fo:language="la" fo:country="VA" officeooo:rsid="09c73ab8" officeooo:paragraph-rsid="09c73ab8"/>
    </style:style>
    <style:style style:name="P732" style:family="paragraph" style:parent-style-name="Text_20_body" style:list-style-name="L4">
      <style:paragraph-properties fo:text-align="start" style:justify-single-word="false"/>
      <style:text-properties fo:language="la" fo:country="VA" officeooo:rsid="09c920d0" officeooo:paragraph-rsid="09c920d0"/>
    </style:style>
    <style:style style:name="P733" style:family="paragraph" style:parent-style-name="Text_20_body" style:list-style-name="L4">
      <style:paragraph-properties fo:text-align="start" style:justify-single-word="false"/>
      <style:text-properties fo:language="la" fo:country="VA" officeooo:rsid="09c920d0" officeooo:paragraph-rsid="09c972b2"/>
    </style:style>
    <style:style style:name="P734" style:family="paragraph" style:parent-style-name="Text_20_body" style:list-style-name="L5">
      <style:paragraph-properties fo:text-align="start" style:justify-single-word="false"/>
      <style:text-properties fo:language="la" fo:country="VA" officeooo:rsid="0668b688" officeooo:paragraph-rsid="0668b688"/>
    </style:style>
    <style:style style:name="P735" style:family="paragraph" style:parent-style-name="Text_20_body" style:list-style-name="L5">
      <style:paragraph-properties fo:text-align="start" style:justify-single-word="false"/>
      <style:text-properties fo:language="la" fo:country="VA" officeooo:rsid="066987b1" officeooo:paragraph-rsid="066987b1"/>
    </style:style>
    <style:style style:name="P736" style:family="paragraph" style:parent-style-name="Text_20_body" style:list-style-name="L10">
      <style:paragraph-properties fo:text-align="start" style:justify-single-word="false"/>
      <style:text-properties fo:language="la" fo:country="VA" officeooo:rsid="06a2bd4a" officeooo:paragraph-rsid="0bab38d5"/>
    </style:style>
    <style:style style:name="P737" style:family="paragraph" style:parent-style-name="Text_20_body" style:list-style-name="L11">
      <style:paragraph-properties fo:text-align="start" style:justify-single-word="false"/>
      <style:text-properties fo:language="la" fo:country="VA" officeooo:rsid="07664f11" officeooo:paragraph-rsid="07664f11"/>
    </style:style>
    <style:style style:name="P738" style:family="paragraph" style:parent-style-name="Text_20_body" style:list-style-name="L11">
      <style:paragraph-properties fo:text-align="start" style:justify-single-word="false"/>
      <style:text-properties fo:language="la" fo:country="VA" officeooo:rsid="0766fe62" officeooo:paragraph-rsid="0766fe62"/>
    </style:style>
    <style:style style:name="P739" style:family="paragraph" style:parent-style-name="Text_20_body" style:list-style-name="L11">
      <style:paragraph-properties fo:text-align="start" style:justify-single-word="false"/>
      <style:text-properties fo:language="la" fo:country="VA" officeooo:rsid="0759b5ef" officeooo:paragraph-rsid="0766fe62"/>
    </style:style>
    <style:style style:name="P740" style:family="paragraph" style:parent-style-name="Text_20_body" style:list-style-name="L12">
      <style:paragraph-properties fo:text-align="start" style:justify-single-word="false"/>
      <style:text-properties fo:language="la" fo:country="VA" officeooo:rsid="0774219e" officeooo:paragraph-rsid="077615d8"/>
    </style:style>
    <style:style style:name="P741" style:family="paragraph" style:parent-style-name="Text_20_body" style:list-style-name="L12">
      <style:paragraph-properties fo:text-align="start" style:justify-single-word="false"/>
      <style:text-properties fo:language="la" fo:country="VA" officeooo:rsid="077615d8" officeooo:paragraph-rsid="077615d8"/>
    </style:style>
    <style:style style:name="P742" style:family="paragraph" style:parent-style-name="Text_20_body" style:list-style-name="L12">
      <style:paragraph-properties fo:text-align="start" style:justify-single-word="false"/>
      <style:text-properties fo:language="la" fo:country="VA" officeooo:rsid="07762ab9" officeooo:paragraph-rsid="07762ab9"/>
    </style:style>
    <style:style style:name="P743" style:family="paragraph" style:parent-style-name="Text_20_body" style:list-style-name="L13">
      <style:paragraph-properties fo:text-align="start" style:justify-single-word="false"/>
      <style:text-properties fo:language="la" fo:country="VA" officeooo:rsid="079bf57b" officeooo:paragraph-rsid="079bf57b"/>
    </style:style>
    <style:style style:name="P744" style:family="paragraph" style:parent-style-name="Text_20_body" style:list-style-name="L16">
      <style:text-properties fo:language="la" fo:country="VA" officeooo:rsid="085ccdcb" officeooo:paragraph-rsid="085ccdcb"/>
    </style:style>
    <style:style style:name="P745" style:family="paragraph" style:parent-style-name="Text_20_body" style:list-style-name="L17">
      <style:text-properties fo:language="la" fo:country="VA" officeooo:rsid="086dafc4" officeooo:paragraph-rsid="086dafc4"/>
    </style:style>
    <style:style style:name="P746" style:family="paragraph" style:parent-style-name="Text_20_body" style:list-style-name="L18">
      <style:text-properties fo:language="la" fo:country="VA" officeooo:rsid="089d14a6" officeooo:paragraph-rsid="089d14a6"/>
    </style:style>
    <style:style style:name="P747" style:family="paragraph" style:parent-style-name="Text_20_body">
      <style:paragraph-properties fo:text-align="start" style:justify-single-word="false"/>
      <style:text-properties fo:language="la" fo:country="VA" officeooo:rsid="06c50802" officeooo:paragraph-rsid="0c0ff0c8"/>
    </style:style>
    <style:style style:name="P748" style:family="paragraph" style:parent-style-name="Text_20_body">
      <style:paragraph-properties fo:text-align="start" style:justify-single-word="false"/>
      <style:text-properties fo:language="la" fo:country="VA" officeooo:rsid="06d25ce0" officeooo:paragraph-rsid="0c10e019"/>
    </style:style>
    <style:style style:name="P749" style:family="paragraph" style:parent-style-name="Text_20_body" style:list-style-name="L19">
      <style:text-properties officeooo:rsid="0a41391f" officeooo:paragraph-rsid="0a41391f"/>
    </style:style>
    <style:style style:name="P750" style:family="paragraph" style:parent-style-name="Text_20_body" style:list-style-name="L20">
      <style:text-properties officeooo:rsid="0a422108" officeooo:paragraph-rsid="0a422108"/>
    </style:style>
    <style:style style:name="P751" style:family="paragraph" style:parent-style-name="Text_20_body" style:list-style-name="L20">
      <style:text-properties officeooo:rsid="0a422108" officeooo:paragraph-rsid="0b53bc1e"/>
    </style:style>
    <style:style style:name="P752" style:family="paragraph" style:parent-style-name="Text_20_body" style:list-style-name="L20">
      <style:text-properties officeooo:rsid="0a46ec05" officeooo:paragraph-rsid="0b53bc1e"/>
    </style:style>
    <style:style style:name="P753"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loext:hyphenation-no-caps="false"/>
    </style:style>
    <style:style style:name="P754" style:family="paragraph">
      <style:paragraph-properties fo:text-align="start"/>
    </style:style>
    <style:style style:name="T1" style:family="text">
      <style:text-properties officeooo:rsid="0609006b"/>
    </style:style>
    <style:style style:name="T2" style:family="text">
      <style:text-properties officeooo:rsid="0609575c"/>
    </style:style>
    <style:style style:name="T3" style:family="text">
      <style:text-properties officeooo:rsid="060b0357"/>
    </style:style>
    <style:style style:name="T4" style:family="text">
      <style:text-properties officeooo:rsid="0611831e"/>
    </style:style>
    <style:style style:name="T5" style:family="text">
      <style:text-properties officeooo:rsid="06176cb6"/>
    </style:style>
    <style:style style:name="T6" style:family="text">
      <style:text-properties fo:font-style="italic" style:font-style-asian="italic" style:font-style-complex="italic"/>
    </style:style>
    <style:style style:name="T7" style:family="text">
      <style:text-properties fo:font-style="italic" officeooo:rsid="07d6ac2e" style:font-style-asian="italic" style:font-style-complex="italic"/>
    </style:style>
    <style:style style:name="T8" style:family="text">
      <style:text-properties fo:font-style="italic" officeooo:rsid="0841feb3" style:font-style-asian="italic" style:font-style-complex="italic"/>
    </style:style>
    <style:style style:name="T9" style:family="text">
      <style:text-properties fo:font-style="italic" officeooo:rsid="0c0c72ee" style:font-style-asian="italic" style:font-style-complex="italic"/>
    </style:style>
    <style:style style:name="T10" style:family="text">
      <style:text-properties officeooo:rsid="061ae51c"/>
    </style:style>
    <style:style style:name="T11" style:family="text">
      <style:text-properties officeooo:rsid="061e1d46"/>
    </style:style>
    <style:style style:name="T12" style:family="text">
      <style:text-properties officeooo:rsid="062060b9"/>
    </style:style>
    <style:style style:name="T13" style:family="text">
      <style:text-properties officeooo:rsid="06216467"/>
    </style:style>
    <style:style style:name="T14" style:family="text">
      <style:text-properties officeooo:rsid="06284944"/>
    </style:style>
    <style:style style:name="T15" style:family="text">
      <style:text-properties officeooo:rsid="0629687b"/>
    </style:style>
    <style:style style:name="T16" style:family="text">
      <style:text-properties officeooo:rsid="062ac5bf"/>
    </style:style>
    <style:style style:name="T17" style:family="text">
      <style:text-properties officeooo:rsid="062b7242"/>
    </style:style>
    <style:style style:name="T18" style:family="text">
      <style:text-properties officeooo:rsid="062d658b"/>
    </style:style>
    <style:style style:name="T19" style:family="text">
      <style:text-properties officeooo:rsid="062f5e9b"/>
    </style:style>
    <style:style style:name="T20" style:family="text">
      <style:text-properties officeooo:rsid="06328b3f"/>
    </style:style>
    <style:style style:name="T21" style:family="text">
      <style:text-properties officeooo:rsid="0639c445"/>
    </style:style>
    <style:style style:name="T22" style:family="text">
      <style:text-properties officeooo:rsid="06342d7f"/>
    </style:style>
    <style:style style:name="T23" style:family="text">
      <style:text-properties officeooo:rsid="063b140f"/>
    </style:style>
    <style:style style:name="T24" style:family="text">
      <style:text-properties officeooo:rsid="064244e8"/>
    </style:style>
    <style:style style:name="T25" style:family="text">
      <style:text-properties officeooo:rsid="0643a369"/>
    </style:style>
    <style:style style:name="T26" style:family="text">
      <style:text-properties officeooo:rsid="0645060f"/>
    </style:style>
    <style:style style:name="T27" style:family="text">
      <style:text-properties officeooo:rsid="064a3f46"/>
    </style:style>
    <style:style style:name="T28" style:family="text">
      <style:text-properties officeooo:rsid="064d1024"/>
    </style:style>
    <style:style style:name="T29" style:family="text">
      <style:text-properties style:font-name="Liberation Sans" fo:font-size="18pt" officeooo:rsid="07aeb553" style:font-name-asian="Noto Sans CJK SC" style:font-size-asian="18pt" style:font-name-complex="Lohit Devanagari1" style:font-size-complex="18pt"/>
    </style:style>
    <style:style style:name="T30" style:family="text">
      <style:text-properties officeooo:rsid="0650da7c"/>
    </style:style>
    <style:style style:name="T31" style:family="text">
      <style:text-properties officeooo:rsid="0658a708"/>
    </style:style>
    <style:style style:name="T32" style:family="text">
      <style:text-properties officeooo:rsid="0659f053"/>
    </style:style>
    <style:style style:name="T33" style:family="text">
      <style:text-properties officeooo:rsid="065ac337"/>
    </style:style>
    <style:style style:name="T34" style:family="text">
      <style:text-properties officeooo:rsid="065bab80"/>
    </style:style>
    <style:style style:name="T35" style:family="text">
      <style:text-properties officeooo:rsid="065cd177"/>
    </style:style>
    <style:style style:name="T36" style:family="text">
      <style:text-properties officeooo:rsid="065e9f9b"/>
    </style:style>
    <style:style style:name="T37" style:family="text">
      <style:text-properties officeooo:rsid="065ea7f6"/>
    </style:style>
    <style:style style:name="T38" style:family="text">
      <style:text-properties officeooo:rsid="065ff9f4"/>
    </style:style>
    <style:style style:name="T39" style:family="text">
      <style:text-properties officeooo:rsid="066068c4"/>
    </style:style>
    <style:style style:name="T40" style:family="text">
      <style:text-properties officeooo:rsid="0661dbac"/>
    </style:style>
    <style:style style:name="T41" style:family="text">
      <style:text-properties officeooo:rsid="06644bbf"/>
    </style:style>
    <style:style style:name="T42" style:family="text">
      <style:text-properties officeooo:rsid="06667fdb"/>
    </style:style>
    <style:style style:name="T43" style:family="text">
      <style:text-properties officeooo:rsid="06672bc3"/>
    </style:style>
    <style:style style:name="T44" style:family="text">
      <style:text-properties officeooo:rsid="0668b688"/>
    </style:style>
    <style:style style:name="T45" style:family="text">
      <style:text-properties officeooo:rsid="066987b1"/>
    </style:style>
    <style:style style:name="T46" style:family="text">
      <style:text-properties officeooo:rsid="066a5fc9"/>
    </style:style>
    <style:style style:name="T47" style:family="text">
      <style:text-properties officeooo:rsid="066b6170"/>
    </style:style>
    <style:style style:name="T48" style:family="text">
      <style:text-properties officeooo:rsid="066d6e74"/>
    </style:style>
    <style:style style:name="T49" style:family="text">
      <style:text-properties officeooo:rsid="066dd1d6"/>
    </style:style>
    <style:style style:name="T50" style:family="text">
      <style:text-properties officeooo:rsid="066f6071"/>
    </style:style>
    <style:style style:name="T51" style:family="text">
      <style:text-properties officeooo:rsid="0670845a"/>
    </style:style>
    <style:style style:name="T52" style:family="text">
      <style:text-properties officeooo:rsid="067104dd"/>
    </style:style>
    <style:style style:name="T53" style:family="text">
      <style:text-properties officeooo:rsid="0672ea1f"/>
    </style:style>
    <style:style style:name="T54" style:family="text">
      <style:text-properties officeooo:rsid="06731ecb"/>
    </style:style>
    <style:style style:name="T55" style:family="text">
      <style:text-properties officeooo:rsid="0675e702"/>
    </style:style>
    <style:style style:name="T56" style:family="text">
      <style:text-properties officeooo:rsid="0675f75f"/>
    </style:style>
    <style:style style:name="T57" style:family="text">
      <style:text-properties officeooo:rsid="067819a0"/>
    </style:style>
    <style:style style:name="T58" style:family="text">
      <style:text-properties officeooo:rsid="06786cde"/>
    </style:style>
    <style:style style:name="T59" style:family="text">
      <style:text-properties officeooo:rsid="067d667b"/>
    </style:style>
    <style:style style:name="T60" style:family="text">
      <style:text-properties officeooo:rsid="0684d68a"/>
    </style:style>
    <style:style style:name="T61" style:family="text">
      <style:text-properties officeooo:rsid="06903b68"/>
    </style:style>
    <style:style style:name="T62" style:family="text">
      <style:text-properties officeooo:rsid="0692fd01"/>
    </style:style>
    <style:style style:name="T63" style:family="text">
      <style:text-properties officeooo:rsid="0693c87d"/>
    </style:style>
    <style:style style:name="T64" style:family="text">
      <style:text-properties officeooo:rsid="0693dc55"/>
    </style:style>
    <style:style style:name="T65" style:family="text">
      <style:text-properties officeooo:rsid="0694b705"/>
    </style:style>
    <style:style style:name="T66" style:family="text">
      <style:text-properties officeooo:rsid="0694dd0f"/>
    </style:style>
    <style:style style:name="T67" style:family="text">
      <style:text-properties officeooo:rsid="069625d9"/>
    </style:style>
    <style:style style:name="T68" style:family="text">
      <style:text-properties officeooo:rsid="069f86fd"/>
    </style:style>
    <style:style style:name="T69" style:family="text">
      <style:text-properties officeooo:rsid="06a0f385"/>
    </style:style>
    <style:style style:name="T70" style:family="text">
      <style:text-properties officeooo:rsid="06a784b8"/>
    </style:style>
    <style:style style:name="T71" style:family="text">
      <style:text-properties officeooo:rsid="06a94d92"/>
    </style:style>
    <style:style style:name="T72" style:family="text">
      <style:text-properties officeooo:rsid="06aadad4"/>
    </style:style>
    <style:style style:name="T73" style:family="text">
      <style:text-properties officeooo:rsid="06ac0fe9"/>
    </style:style>
    <style:style style:name="T74" style:family="text">
      <style:text-properties officeooo:rsid="06c0bca9"/>
    </style:style>
    <style:style style:name="T75" style:family="text">
      <style:text-properties officeooo:rsid="06c3123a"/>
    </style:style>
    <style:style style:name="T76" style:family="text">
      <style:text-properties officeooo:rsid="06ccb098"/>
    </style:style>
    <style:style style:name="T77" style:family="text">
      <style:text-properties officeooo:rsid="06cfa1dd"/>
    </style:style>
    <style:style style:name="T78" style:family="text">
      <style:text-properties officeooo:rsid="06d683bd"/>
    </style:style>
    <style:style style:name="T79" style:family="text">
      <style:text-properties officeooo:rsid="06d87179"/>
    </style:style>
    <style:style style:name="T80" style:family="text">
      <style:text-properties officeooo:rsid="06d91cf3"/>
    </style:style>
    <style:style style:name="T81" style:family="text">
      <style:text-properties officeooo:rsid="06da1fb7"/>
    </style:style>
    <style:style style:name="T82" style:family="text">
      <style:text-properties officeooo:rsid="06dc0faa"/>
    </style:style>
    <style:style style:name="T83" style:family="text">
      <style:text-properties officeooo:rsid="06dd4ada"/>
    </style:style>
    <style:style style:name="T84" style:family="text">
      <style:text-properties officeooo:rsid="06e2bb1c"/>
    </style:style>
    <style:style style:name="T85" style:family="text">
      <style:text-properties officeooo:rsid="06e42486"/>
    </style:style>
    <style:style style:name="T86" style:family="text">
      <style:text-properties officeooo:rsid="06e4f93a"/>
    </style:style>
    <style:style style:name="T87" style:family="text">
      <style:text-properties officeooo:rsid="06e6cc65"/>
    </style:style>
    <style:style style:name="T88" style:family="text">
      <style:text-properties officeooo:rsid="06ea91a8"/>
    </style:style>
    <style:style style:name="T89" style:family="text">
      <style:text-properties officeooo:rsid="06f31158"/>
    </style:style>
    <style:style style:name="T90" style:family="text">
      <style:text-properties officeooo:rsid="06f50fd7"/>
    </style:style>
    <style:style style:name="T91" style:family="text">
      <style:text-properties officeooo:rsid="06f5fe90"/>
    </style:style>
    <style:style style:name="T92" style:family="text">
      <style:text-properties officeooo:rsid="06f64542"/>
    </style:style>
    <style:style style:name="T93" style:family="text">
      <style:text-properties officeooo:rsid="06f6fcf9"/>
    </style:style>
    <style:style style:name="T94" style:family="text">
      <style:text-properties officeooo:rsid="06f8df83"/>
    </style:style>
    <style:style style:name="T95" style:family="text">
      <style:text-properties officeooo:rsid="06f95283"/>
    </style:style>
    <style:style style:name="T96" style:family="text">
      <style:text-properties officeooo:rsid="06fa8cac"/>
    </style:style>
    <style:style style:name="T97" style:family="text">
      <style:text-properties officeooo:rsid="06fb64fd"/>
    </style:style>
    <style:style style:name="T98" style:family="text">
      <style:text-properties officeooo:rsid="06fd64f8"/>
    </style:style>
    <style:style style:name="T99" style:family="text">
      <style:text-properties officeooo:rsid="06fed907"/>
    </style:style>
    <style:style style:name="T100" style:family="text">
      <style:text-properties officeooo:rsid="06ff3908"/>
    </style:style>
    <style:style style:name="T101" style:family="text">
      <style:text-properties officeooo:rsid="0702791e"/>
    </style:style>
    <style:style style:name="T102" style:family="text">
      <style:text-properties officeooo:rsid="07040507"/>
    </style:style>
    <style:style style:name="T103" style:family="text">
      <style:text-properties officeooo:rsid="0704ecab"/>
    </style:style>
    <style:style style:name="T104" style:family="text">
      <style:text-properties officeooo:rsid="070e71fb"/>
    </style:style>
    <style:style style:name="T105" style:family="text">
      <style:text-properties officeooo:rsid="07173bf9"/>
    </style:style>
    <style:style style:name="T106" style:family="text">
      <style:text-properties officeooo:rsid="0718bc38"/>
    </style:style>
    <style:style style:name="T107" style:family="text">
      <style:text-properties officeooo:rsid="07195aa8"/>
    </style:style>
    <style:style style:name="T108" style:family="text">
      <style:text-properties officeooo:rsid="071d2d09"/>
    </style:style>
    <style:style style:name="T109" style:family="text">
      <style:text-properties officeooo:rsid="071fd522"/>
    </style:style>
    <style:style style:name="T110" style:family="text">
      <style:text-properties officeooo:rsid="0720072d"/>
    </style:style>
    <style:style style:name="T111" style:family="text">
      <style:text-properties officeooo:rsid="07219b44"/>
    </style:style>
    <style:style style:name="T112" style:family="text">
      <style:text-properties officeooo:rsid="0721ce05"/>
    </style:style>
    <style:style style:name="T113" style:family="text">
      <style:text-properties officeooo:rsid="07235820"/>
    </style:style>
    <style:style style:name="T114" style:family="text">
      <style:text-properties officeooo:rsid="07262715"/>
    </style:style>
    <style:style style:name="T115" style:family="text">
      <style:text-properties officeooo:rsid="072834f3"/>
    </style:style>
    <style:style style:name="T116" style:family="text">
      <style:text-properties officeooo:rsid="0729c6ff"/>
    </style:style>
    <style:style style:name="T117" style:family="text">
      <style:text-properties officeooo:rsid="072d6f7f"/>
    </style:style>
    <style:style style:name="T118" style:family="text">
      <style:text-properties officeooo:rsid="072f58fc"/>
    </style:style>
    <style:style style:name="T119" style:family="text">
      <style:text-properties officeooo:rsid="07328e38"/>
    </style:style>
    <style:style style:name="T120" style:family="text">
      <style:text-properties officeooo:rsid="0734eb68"/>
    </style:style>
    <style:style style:name="T121" style:family="text">
      <style:text-properties officeooo:rsid="0737502e"/>
    </style:style>
    <style:style style:name="T122" style:family="text">
      <style:text-properties officeooo:rsid="0739e3ee"/>
    </style:style>
    <style:style style:name="T123" style:family="text">
      <style:text-properties officeooo:rsid="073c08e3"/>
    </style:style>
    <style:style style:name="T124" style:family="text">
      <style:text-properties officeooo:rsid="073d17c7"/>
    </style:style>
    <style:style style:name="T125" style:family="text">
      <style:text-properties officeooo:rsid="073d3891"/>
    </style:style>
    <style:style style:name="T126" style:family="text">
      <style:text-properties officeooo:rsid="0742aea0"/>
    </style:style>
    <style:style style:name="T127" style:family="text">
      <style:text-properties officeooo:rsid="0744ac0e"/>
    </style:style>
    <style:style style:name="T128" style:family="text">
      <style:text-properties officeooo:rsid="0747bb6d"/>
    </style:style>
    <style:style style:name="T129" style:family="text">
      <style:text-properties officeooo:rsid="0748be3e"/>
    </style:style>
    <style:style style:name="T130" style:family="text">
      <style:text-properties officeooo:rsid="074aad0f"/>
    </style:style>
    <style:style style:name="T131" style:family="text">
      <style:text-properties officeooo:rsid="074ae208"/>
    </style:style>
    <style:style style:name="T132" style:family="text">
      <style:text-properties officeooo:rsid="07538e38"/>
    </style:style>
    <style:style style:name="T133" style:family="text">
      <style:text-properties officeooo:rsid="07555e1a"/>
    </style:style>
    <style:style style:name="T134" style:family="text">
      <style:text-properties officeooo:rsid="0755f78e"/>
    </style:style>
    <style:style style:name="T135" style:family="text">
      <style:text-properties officeooo:rsid="07596203"/>
    </style:style>
    <style:style style:name="T136" style:family="text">
      <style:text-properties officeooo:rsid="075b0603"/>
    </style:style>
    <style:style style:name="T137" style:family="text">
      <style:text-properties officeooo:rsid="075cfc26"/>
    </style:style>
    <style:style style:name="T138" style:family="text">
      <style:text-properties officeooo:rsid="075db500"/>
    </style:style>
    <style:style style:name="T139" style:family="text">
      <style:text-properties officeooo:rsid="075df1b4"/>
    </style:style>
    <style:style style:name="T140" style:family="text">
      <style:text-properties officeooo:rsid="075f832c"/>
    </style:style>
    <style:style style:name="T141" style:family="text">
      <style:text-properties officeooo:rsid="07626941"/>
    </style:style>
    <style:style style:name="T142" style:family="text">
      <style:text-properties officeooo:rsid="076321ee"/>
    </style:style>
    <style:style style:name="T143" style:family="text">
      <style:text-properties officeooo:rsid="0766fe62"/>
    </style:style>
    <style:style style:name="T144" style:family="text">
      <style:text-properties officeooo:rsid="07672478"/>
    </style:style>
    <style:style style:name="T145" style:family="text">
      <style:text-properties officeooo:rsid="07683c12"/>
    </style:style>
    <style:style style:name="T146" style:family="text">
      <style:text-properties officeooo:rsid="0769f249"/>
    </style:style>
    <style:style style:name="T147" style:family="text">
      <style:text-properties officeooo:rsid="076e1b65"/>
    </style:style>
    <style:style style:name="T148" style:family="text">
      <style:text-properties officeooo:rsid="07715d8d"/>
    </style:style>
    <style:style style:name="T149" style:family="text">
      <style:text-properties officeooo:rsid="0772c80c"/>
    </style:style>
    <style:style style:name="T150" style:family="text">
      <style:text-properties officeooo:rsid="0772e0a5"/>
    </style:style>
    <style:style style:name="T151" style:family="text">
      <style:text-properties officeooo:rsid="0774219e"/>
    </style:style>
    <style:style style:name="T152" style:family="text">
      <style:text-properties officeooo:rsid="077615d8"/>
    </style:style>
    <style:style style:name="T153" style:family="text">
      <style:text-properties officeooo:rsid="07773d96"/>
    </style:style>
    <style:style style:name="T154" style:family="text">
      <style:text-properties officeooo:rsid="0779ecb0"/>
    </style:style>
    <style:style style:name="T155" style:family="text">
      <style:text-properties officeooo:rsid="077b6fbb"/>
    </style:style>
    <style:style style:name="T156" style:family="text">
      <style:text-properties officeooo:rsid="077cb00f"/>
    </style:style>
    <style:style style:name="T157" style:family="text">
      <style:text-properties officeooo:rsid="077e525c"/>
    </style:style>
    <style:style style:name="T158" style:family="text">
      <style:text-properties officeooo:rsid="077ed417"/>
    </style:style>
    <style:style style:name="T159" style:family="text">
      <style:text-properties officeooo:rsid="07802f05"/>
    </style:style>
    <style:style style:name="T160" style:family="text">
      <style:text-properties officeooo:rsid="078045ec"/>
    </style:style>
    <style:style style:name="T161" style:family="text">
      <style:text-properties officeooo:rsid="07826717"/>
    </style:style>
    <style:style style:name="T162" style:family="text">
      <style:text-properties officeooo:rsid="078443ad"/>
    </style:style>
    <style:style style:name="T163" style:family="text">
      <style:text-properties officeooo:rsid="0786507c"/>
    </style:style>
    <style:style style:name="T164" style:family="text">
      <style:text-properties officeooo:rsid="078858ed"/>
    </style:style>
    <style:style style:name="T165" style:family="text">
      <style:text-properties officeooo:rsid="0788f325"/>
    </style:style>
    <style:style style:name="T166" style:family="text">
      <style:text-properties officeooo:rsid="078a3359"/>
    </style:style>
    <style:style style:name="T167" style:family="text">
      <style:text-properties officeooo:rsid="078b2a3c"/>
    </style:style>
    <style:style style:name="T168" style:family="text">
      <style:text-properties officeooo:rsid="078d1def"/>
    </style:style>
    <style:style style:name="T169" style:family="text">
      <style:text-properties officeooo:rsid="0790847b"/>
    </style:style>
    <style:style style:name="T170" style:family="text">
      <style:text-properties officeooo:rsid="07926b8b"/>
    </style:style>
    <style:style style:name="T171" style:family="text">
      <style:text-properties officeooo:rsid="07935e1d"/>
    </style:style>
    <style:style style:name="T172" style:family="text">
      <style:text-properties officeooo:rsid="07952b23"/>
    </style:style>
    <style:style style:name="T173" style:family="text">
      <style:text-properties officeooo:rsid="07959121"/>
    </style:style>
    <style:style style:name="T174" style:family="text">
      <style:text-properties officeooo:rsid="0796b6cc"/>
    </style:style>
    <style:style style:name="T175" style:family="text">
      <style:text-properties officeooo:rsid="0796bbed"/>
    </style:style>
    <style:style style:name="T176" style:family="text">
      <style:text-properties officeooo:rsid="0796c75c"/>
    </style:style>
    <style:style style:name="T177" style:family="text">
      <style:text-properties officeooo:rsid="07972a08"/>
    </style:style>
    <style:style style:name="T178" style:family="text">
      <style:text-properties officeooo:rsid="079974e5"/>
    </style:style>
    <style:style style:name="T179" style:family="text">
      <style:text-properties officeooo:rsid="079e7610"/>
    </style:style>
    <style:style style:name="T180" style:family="text">
      <style:text-properties officeooo:rsid="07a21ac9"/>
    </style:style>
    <style:style style:name="T181" style:family="text">
      <style:text-properties officeooo:rsid="07a69dc6"/>
    </style:style>
    <style:style style:name="T182" style:family="text">
      <style:text-properties officeooo:rsid="07a80970"/>
    </style:style>
    <style:style style:name="T183" style:family="text">
      <style:text-properties officeooo:rsid="07b02517"/>
    </style:style>
    <style:style style:name="T184" style:family="text">
      <style:text-properties officeooo:rsid="07b0d3fd"/>
    </style:style>
    <style:style style:name="T185" style:family="text">
      <style:text-properties officeooo:rsid="07b69de1"/>
    </style:style>
    <style:style style:name="T186" style:family="text">
      <style:text-properties officeooo:rsid="07bffb5d"/>
    </style:style>
    <style:style style:name="T187" style:family="text">
      <style:text-properties officeooo:rsid="07c0f328"/>
    </style:style>
    <style:style style:name="T188" style:family="text">
      <style:text-properties officeooo:rsid="07c4a3be"/>
    </style:style>
    <style:style style:name="T189" style:family="text">
      <style:text-properties officeooo:rsid="07c5c74d"/>
    </style:style>
    <style:style style:name="T190" style:family="text">
      <style:text-properties officeooo:rsid="07cb46a6"/>
    </style:style>
    <style:style style:name="T191" style:family="text">
      <style:text-properties officeooo:rsid="07cbc35c"/>
    </style:style>
    <style:style style:name="T192" style:family="text">
      <style:text-properties officeooo:rsid="07cdc167"/>
    </style:style>
    <style:style style:name="T193" style:family="text">
      <style:text-properties officeooo:rsid="07d14332"/>
    </style:style>
    <style:style style:name="T194" style:family="text">
      <style:text-properties officeooo:rsid="07d25175"/>
    </style:style>
    <style:style style:name="T195" style:family="text">
      <style:text-properties officeooo:rsid="07d6ac2e"/>
    </style:style>
    <style:style style:name="T196" style:family="text">
      <style:text-properties officeooo:rsid="07d6ad6e"/>
    </style:style>
    <style:style style:name="T197" style:family="text">
      <style:text-properties officeooo:rsid="07d70137"/>
    </style:style>
    <style:style style:name="T198" style:family="text">
      <style:text-properties officeooo:rsid="07d97062"/>
    </style:style>
    <style:style style:name="T199" style:family="text">
      <style:text-properties officeooo:rsid="07da2e77"/>
    </style:style>
    <style:style style:name="T200" style:family="text">
      <style:text-properties officeooo:rsid="07db5fd5"/>
    </style:style>
    <style:style style:name="T201" style:family="text">
      <style:text-properties officeooo:rsid="07e81347"/>
    </style:style>
    <style:style style:name="T202" style:family="text">
      <style:text-properties officeooo:rsid="07e9750b"/>
    </style:style>
    <style:style style:name="T203" style:family="text">
      <style:text-properties officeooo:rsid="07eb916b"/>
    </style:style>
    <style:style style:name="T204" style:family="text">
      <style:text-properties officeooo:rsid="07ed7b21"/>
    </style:style>
    <style:style style:name="T205" style:family="text">
      <style:text-properties officeooo:rsid="07ef0adf"/>
    </style:style>
    <style:style style:name="T206" style:family="text">
      <style:text-properties officeooo:rsid="07f00ed2"/>
    </style:style>
    <style:style style:name="T207" style:family="text">
      <style:text-properties officeooo:rsid="07f541cc"/>
    </style:style>
    <style:style style:name="T208" style:family="text">
      <style:text-properties officeooo:rsid="07f687ed"/>
    </style:style>
    <style:style style:name="T209" style:family="text">
      <style:text-properties officeooo:rsid="07f72ae2"/>
    </style:style>
    <style:style style:name="T210" style:family="text">
      <style:text-properties officeooo:rsid="07f88a4d"/>
    </style:style>
    <style:style style:name="T211" style:family="text">
      <style:text-properties officeooo:rsid="080fc7f2"/>
    </style:style>
    <style:style style:name="T212" style:family="text">
      <style:text-properties officeooo:rsid="0817b6c2"/>
    </style:style>
    <style:style style:name="T213" style:family="text">
      <style:text-properties officeooo:rsid="081a6565"/>
    </style:style>
    <style:style style:name="T214" style:family="text">
      <style:text-properties officeooo:rsid="081c1e30"/>
    </style:style>
    <style:style style:name="T215" style:family="text">
      <style:text-properties officeooo:rsid="081fb9d6"/>
    </style:style>
    <style:style style:name="T216" style:family="text">
      <style:text-properties officeooo:rsid="082371ce"/>
    </style:style>
    <style:style style:name="T217" style:family="text">
      <style:text-properties officeooo:rsid="08256b54"/>
    </style:style>
    <style:style style:name="T218" style:family="text">
      <style:text-properties officeooo:rsid="082650ff"/>
    </style:style>
    <style:style style:name="T219" style:family="text">
      <style:text-properties officeooo:rsid="082ae7e0"/>
    </style:style>
    <style:style style:name="T220" style:family="text">
      <style:text-properties officeooo:rsid="082b6122"/>
    </style:style>
    <style:style style:name="T221" style:family="text">
      <style:text-properties officeooo:rsid="082ed0b9"/>
    </style:style>
    <style:style style:name="T222" style:family="text">
      <style:text-properties officeooo:rsid="082f13fc"/>
    </style:style>
    <style:style style:name="T223" style:family="text">
      <style:text-properties officeooo:rsid="083069b6"/>
    </style:style>
    <style:style style:name="T224" style:family="text">
      <style:text-properties officeooo:rsid="0830e04a"/>
    </style:style>
    <style:style style:name="T225" style:family="text">
      <style:text-properties officeooo:rsid="08340e6e"/>
    </style:style>
    <style:style style:name="T226" style:family="text">
      <style:text-properties officeooo:rsid="083eaf4c"/>
    </style:style>
    <style:style style:name="T227" style:family="text">
      <style:text-properties officeooo:rsid="083edfe0"/>
    </style:style>
    <style:style style:name="T228" style:family="text">
      <style:text-properties officeooo:rsid="0840cde5"/>
    </style:style>
    <style:style style:name="T229" style:family="text">
      <style:text-properties officeooo:rsid="0841feb3"/>
    </style:style>
    <style:style style:name="T230" style:family="text">
      <style:text-properties officeooo:rsid="084b6cd1"/>
    </style:style>
    <style:style style:name="T231" style:family="text">
      <style:text-properties officeooo:rsid="084ce09a"/>
    </style:style>
    <style:style style:name="T232" style:family="text">
      <style:text-properties officeooo:rsid="084df9f9"/>
    </style:style>
    <style:style style:name="T233" style:family="text">
      <style:text-properties officeooo:rsid="08551683"/>
    </style:style>
    <style:style style:name="T234" style:family="text">
      <style:text-properties officeooo:rsid="08556244"/>
    </style:style>
    <style:style style:name="T235" style:family="text">
      <style:text-properties officeooo:rsid="0857ef8d"/>
    </style:style>
    <style:style style:name="T236" style:family="text">
      <style:text-properties officeooo:rsid="085f4b1b"/>
    </style:style>
    <style:style style:name="T237" style:family="text">
      <style:text-properties officeooo:rsid="086039ed"/>
    </style:style>
    <style:style style:name="T238" style:family="text">
      <style:text-properties officeooo:rsid="0861abf2"/>
    </style:style>
    <style:style style:name="T239" style:family="text">
      <style:text-properties officeooo:rsid="0862cf79"/>
    </style:style>
    <style:style style:name="T240" style:family="text">
      <style:text-properties officeooo:rsid="0863f11c"/>
    </style:style>
    <style:style style:name="T241" style:family="text">
      <style:text-properties officeooo:rsid="0863f719"/>
    </style:style>
    <style:style style:name="T242" style:family="text">
      <style:text-properties officeooo:rsid="0864c000"/>
    </style:style>
    <style:style style:name="T243" style:family="text">
      <style:text-properties officeooo:rsid="0865a63a"/>
    </style:style>
    <style:style style:name="T244" style:family="text">
      <style:text-properties officeooo:rsid="0865b0a6"/>
    </style:style>
    <style:style style:name="T245" style:family="text">
      <style:text-properties officeooo:rsid="0866001d"/>
    </style:style>
    <style:style style:name="T246" style:family="text">
      <style:text-properties officeooo:rsid="0867ec6f"/>
    </style:style>
    <style:style style:name="T247" style:family="text">
      <style:text-properties officeooo:rsid="0868706b"/>
    </style:style>
    <style:style style:name="T248" style:family="text">
      <style:text-properties officeooo:rsid="0869888e"/>
    </style:style>
    <style:style style:name="T249" style:family="text">
      <style:text-properties officeooo:rsid="086dafc4"/>
    </style:style>
    <style:style style:name="T250" style:family="text">
      <style:text-properties officeooo:rsid="086eba20"/>
    </style:style>
    <style:style style:name="T251" style:family="text">
      <style:text-properties officeooo:rsid="087155a0"/>
    </style:style>
    <style:style style:name="T252" style:family="text">
      <style:text-properties officeooo:rsid="08771399"/>
    </style:style>
    <style:style style:name="T253" style:family="text">
      <style:text-properties officeooo:rsid="087f7248"/>
    </style:style>
    <style:style style:name="T254" style:family="text">
      <style:text-properties officeooo:rsid="08844811"/>
    </style:style>
    <style:style style:name="T255" style:family="text">
      <style:text-properties officeooo:rsid="0887ec85"/>
    </style:style>
    <style:style style:name="T256" style:family="text">
      <style:text-properties officeooo:rsid="088a2f5f"/>
    </style:style>
    <style:style style:name="T257" style:family="text">
      <style:text-properties officeooo:rsid="088bf514"/>
    </style:style>
    <style:style style:name="T258" style:family="text">
      <style:text-properties officeooo:rsid="0892701b"/>
    </style:style>
    <style:style style:name="T259" style:family="text">
      <style:text-properties officeooo:rsid="0893e5d6"/>
    </style:style>
    <style:style style:name="T260" style:family="text">
      <style:text-properties officeooo:rsid="0894322b"/>
    </style:style>
    <style:style style:name="T261" style:family="text">
      <style:text-properties officeooo:rsid="089605b2"/>
    </style:style>
    <style:style style:name="T262" style:family="text">
      <style:text-properties officeooo:rsid="089deb4a"/>
    </style:style>
    <style:style style:name="T263" style:family="text">
      <style:text-properties officeooo:rsid="08a1b7d0"/>
    </style:style>
    <style:style style:name="T264" style:family="text">
      <style:text-properties officeooo:rsid="08a3e430"/>
    </style:style>
    <style:style style:name="T265" style:family="text">
      <style:text-properties officeooo:rsid="08a8ef62"/>
    </style:style>
    <style:style style:name="T266" style:family="text">
      <style:text-properties officeooo:rsid="08a9e7b6"/>
    </style:style>
    <style:style style:name="T267" style:family="text">
      <style:text-properties officeooo:rsid="08aa2b26"/>
    </style:style>
    <style:style style:name="T268" style:family="text">
      <style:text-properties officeooo:rsid="08ac39c6"/>
    </style:style>
    <style:style style:name="T269" style:family="text">
      <style:text-properties officeooo:rsid="08ae15b6"/>
    </style:style>
    <style:style style:name="T270" style:family="text">
      <style:text-properties officeooo:rsid="08b00a2e"/>
    </style:style>
    <style:style style:name="T271" style:family="text">
      <style:text-properties officeooo:rsid="08b0115e"/>
    </style:style>
    <style:style style:name="T272" style:family="text">
      <style:text-properties officeooo:rsid="08b118bd"/>
    </style:style>
    <style:style style:name="T273" style:family="text">
      <style:text-properties officeooo:rsid="08b29f89"/>
    </style:style>
    <style:style style:name="T274" style:family="text">
      <style:text-properties officeooo:rsid="08b45ca7"/>
    </style:style>
    <style:style style:name="T275" style:family="text">
      <style:text-properties officeooo:rsid="08ba4672"/>
    </style:style>
    <style:style style:name="T276" style:family="text">
      <style:text-properties officeooo:rsid="08bbe467"/>
    </style:style>
    <style:style style:name="T277" style:family="text">
      <style:text-properties officeooo:rsid="08c29a27"/>
    </style:style>
    <style:style style:name="T278" style:family="text">
      <style:text-properties officeooo:rsid="08c512e6"/>
    </style:style>
    <style:style style:name="T279" style:family="text">
      <style:text-properties officeooo:rsid="08c6413c"/>
    </style:style>
    <style:style style:name="T280" style:family="text">
      <style:text-properties officeooo:rsid="08c77989"/>
    </style:style>
    <style:style style:name="T281" style:family="text">
      <style:text-properties officeooo:rsid="08ca0e49"/>
    </style:style>
    <style:style style:name="T282" style:family="text">
      <style:text-properties officeooo:rsid="08cd9d09"/>
    </style:style>
    <style:style style:name="T283" style:family="text">
      <style:text-properties officeooo:rsid="08cea917"/>
    </style:style>
    <style:style style:name="T284" style:family="text">
      <style:text-properties officeooo:rsid="08ceece7"/>
    </style:style>
    <style:style style:name="T285" style:family="text">
      <style:text-properties officeooo:rsid="08d12d28"/>
    </style:style>
    <style:style style:name="T286" style:family="text">
      <style:text-properties officeooo:rsid="08d39dc2"/>
    </style:style>
    <style:style style:name="T287" style:family="text">
      <style:text-properties officeooo:rsid="08d53c25"/>
    </style:style>
    <style:style style:name="T288" style:family="text">
      <style:text-properties officeooo:rsid="08d61105"/>
    </style:style>
    <style:style style:name="T289" style:family="text">
      <style:text-properties officeooo:rsid="08d6a79e"/>
    </style:style>
    <style:style style:name="T290" style:family="text">
      <style:text-properties officeooo:rsid="08d77b81"/>
    </style:style>
    <style:style style:name="T291" style:family="text">
      <style:text-properties officeooo:rsid="08d88c05"/>
    </style:style>
    <style:style style:name="T292" style:family="text">
      <style:text-properties officeooo:rsid="08d89873"/>
    </style:style>
    <style:style style:name="T293" style:family="text">
      <style:text-properties officeooo:rsid="08db2888"/>
    </style:style>
    <style:style style:name="T294" style:family="text">
      <style:text-properties officeooo:rsid="08dccdaf"/>
    </style:style>
    <style:style style:name="T295" style:family="text">
      <style:text-properties officeooo:rsid="08df5274"/>
    </style:style>
    <style:style style:name="T296" style:family="text">
      <style:text-properties officeooo:rsid="08dfee0c"/>
    </style:style>
    <style:style style:name="T297" style:family="text">
      <style:text-properties officeooo:rsid="08e10712"/>
    </style:style>
    <style:style style:name="T298" style:family="text">
      <style:text-properties officeooo:rsid="08e2f602"/>
    </style:style>
    <style:style style:name="T299" style:family="text">
      <style:text-properties officeooo:rsid="08e44b5f"/>
    </style:style>
    <style:style style:name="T300" style:family="text">
      <style:text-properties officeooo:rsid="08e4fa0a"/>
    </style:style>
    <style:style style:name="T301" style:family="text">
      <style:text-properties officeooo:rsid="08edd393"/>
    </style:style>
    <style:style style:name="T302" style:family="text">
      <style:text-properties officeooo:rsid="08f452fd"/>
    </style:style>
    <style:style style:name="T303" style:family="text">
      <style:text-properties officeooo:rsid="08f6e051"/>
    </style:style>
    <style:style style:name="T304" style:family="text">
      <style:text-properties officeooo:rsid="090efdec"/>
    </style:style>
    <style:style style:name="T305" style:family="text">
      <style:text-properties officeooo:rsid="0910d035"/>
    </style:style>
    <style:style style:name="T306" style:family="text">
      <style:text-properties officeooo:rsid="0915c4ab"/>
    </style:style>
    <style:style style:name="T307" style:family="text">
      <style:text-properties officeooo:rsid="09190957"/>
    </style:style>
    <style:style style:name="T308" style:family="text">
      <style:text-properties officeooo:rsid="0919da7b"/>
    </style:style>
    <style:style style:name="T309" style:family="text">
      <style:text-properties officeooo:rsid="091cb0d3"/>
    </style:style>
    <style:style style:name="T310" style:family="text">
      <style:text-properties officeooo:rsid="091f7e34"/>
    </style:style>
    <style:style style:name="T311" style:family="text">
      <style:text-properties officeooo:rsid="092340ad"/>
    </style:style>
    <style:style style:name="T312" style:family="text">
      <style:text-properties officeooo:rsid="092599f5"/>
    </style:style>
    <style:style style:name="T313" style:family="text">
      <style:text-properties officeooo:rsid="09277548"/>
    </style:style>
    <style:style style:name="T314" style:family="text">
      <style:text-properties officeooo:rsid="09281c81"/>
    </style:style>
    <style:style style:name="T315" style:family="text">
      <style:text-properties officeooo:rsid="0929ed22"/>
    </style:style>
    <style:style style:name="T316" style:family="text">
      <style:text-properties officeooo:rsid="092a240e"/>
    </style:style>
    <style:style style:name="T317" style:family="text">
      <style:text-properties officeooo:rsid="092b0f45"/>
    </style:style>
    <style:style style:name="T318" style:family="text">
      <style:text-properties officeooo:rsid="064e5036"/>
    </style:style>
    <style:style style:name="T319" style:family="text">
      <style:text-properties officeooo:rsid="093a82f3"/>
    </style:style>
    <style:style style:name="T320" style:family="text">
      <style:text-properties officeooo:rsid="093b3b88"/>
    </style:style>
    <style:style style:name="T321" style:family="text">
      <style:text-properties officeooo:rsid="09409f4e"/>
    </style:style>
    <style:style style:name="T322" style:family="text">
      <style:text-properties officeooo:rsid="0943b9e6"/>
    </style:style>
    <style:style style:name="T323" style:family="text">
      <style:text-properties officeooo:rsid="094cb6b7"/>
    </style:style>
    <style:style style:name="T324" style:family="text">
      <style:text-properties officeooo:rsid="095573e0"/>
    </style:style>
    <style:style style:name="T325" style:family="text">
      <style:text-properties officeooo:rsid="09574542"/>
    </style:style>
    <style:style style:name="T326" style:family="text">
      <style:text-properties officeooo:rsid="095beb56"/>
    </style:style>
    <style:style style:name="T327" style:family="text">
      <style:text-properties officeooo:rsid="0965ce5b"/>
    </style:style>
    <style:style style:name="T328" style:family="text">
      <style:text-properties officeooo:rsid="09665788"/>
    </style:style>
    <style:style style:name="T329" style:family="text">
      <style:text-properties officeooo:rsid="0966c933"/>
    </style:style>
    <style:style style:name="T330" style:family="text">
      <style:text-properties officeooo:rsid="0967d0f7"/>
    </style:style>
    <style:style style:name="T331" style:family="text">
      <style:text-properties officeooo:rsid="0968a982"/>
    </style:style>
    <style:style style:name="T332" style:family="text">
      <style:text-properties officeooo:rsid="096a72ec"/>
    </style:style>
    <style:style style:name="T333" style:family="text">
      <style:text-properties officeooo:rsid="096af4bb"/>
    </style:style>
    <style:style style:name="T334" style:family="text">
      <style:text-properties officeooo:rsid="096f5044"/>
    </style:style>
    <style:style style:name="T335" style:family="text">
      <style:text-properties officeooo:rsid="097040a7"/>
    </style:style>
    <style:style style:name="T336" style:family="text">
      <style:text-properties officeooo:rsid="09746873"/>
    </style:style>
    <style:style style:name="T337" style:family="text">
      <style:text-properties officeooo:rsid="097645d1"/>
    </style:style>
    <style:style style:name="T338" style:family="text">
      <style:text-properties officeooo:rsid="0978197d"/>
    </style:style>
    <style:style style:name="T339" style:family="text">
      <style:text-properties officeooo:rsid="097f4658"/>
    </style:style>
    <style:style style:name="T340" style:family="text">
      <style:text-properties officeooo:rsid="097fb1f7"/>
    </style:style>
    <style:style style:name="T341" style:family="text">
      <style:text-properties officeooo:rsid="0989dff0"/>
    </style:style>
    <style:style style:name="T342" style:family="text">
      <style:text-properties officeooo:rsid="098cd5b7"/>
    </style:style>
    <style:style style:name="T343" style:family="text">
      <style:text-properties officeooo:rsid="09976fe0"/>
    </style:style>
    <style:style style:name="T344" style:family="text">
      <style:text-properties officeooo:rsid="09989491"/>
    </style:style>
    <style:style style:name="T345" style:family="text">
      <style:text-properties officeooo:rsid="09991080"/>
    </style:style>
    <style:style style:name="T346" style:family="text">
      <style:text-properties officeooo:rsid="0999b9f8"/>
    </style:style>
    <style:style style:name="T347" style:family="text">
      <style:text-properties officeooo:rsid="0999ea78"/>
    </style:style>
    <style:style style:name="T348" style:family="text">
      <style:text-properties officeooo:rsid="099a2fcb"/>
    </style:style>
    <style:style style:name="T349" style:family="text">
      <style:text-properties officeooo:rsid="099b7fc1"/>
    </style:style>
    <style:style style:name="T350" style:family="text">
      <style:text-properties officeooo:rsid="099d28b5"/>
    </style:style>
    <style:style style:name="T351" style:family="text">
      <style:text-properties officeooo:rsid="099d5d82"/>
    </style:style>
    <style:style style:name="T352" style:family="text">
      <style:text-properties officeooo:rsid="09a05a12"/>
    </style:style>
    <style:style style:name="T353" style:family="text">
      <style:text-properties officeooo:rsid="09a1427d"/>
    </style:style>
    <style:style style:name="T354" style:family="text">
      <style:text-properties officeooo:rsid="09a85a1e"/>
    </style:style>
    <style:style style:name="T355" style:family="text">
      <style:text-properties officeooo:rsid="09b9742a"/>
    </style:style>
    <style:style style:name="T356" style:family="text">
      <style:text-properties officeooo:rsid="09ba8405"/>
    </style:style>
    <style:style style:name="T357" style:family="text">
      <style:text-properties officeooo:rsid="09c1182f"/>
    </style:style>
    <style:style style:name="T358" style:family="text">
      <style:text-properties officeooo:rsid="09c28942"/>
    </style:style>
    <style:style style:name="T359" style:family="text">
      <style:text-properties officeooo:rsid="09c5f286"/>
    </style:style>
    <style:style style:name="T360" style:family="text">
      <style:text-properties officeooo:rsid="09c972b2"/>
    </style:style>
    <style:style style:name="T361" style:family="text">
      <style:text-properties officeooo:rsid="09cb0408"/>
    </style:style>
    <style:style style:name="T362" style:family="text">
      <style:text-properties officeooo:rsid="09cea2bb"/>
    </style:style>
    <style:style style:name="T363" style:family="text">
      <style:text-properties officeooo:rsid="09d08a7d"/>
    </style:style>
    <style:style style:name="T364" style:family="text">
      <style:text-properties officeooo:rsid="09d23320"/>
    </style:style>
    <style:style style:name="T365" style:family="text">
      <style:text-properties officeooo:rsid="09d5501c"/>
    </style:style>
    <style:style style:name="T366" style:family="text">
      <style:text-properties officeooo:rsid="09e50872"/>
    </style:style>
    <style:style style:name="T367" style:family="text">
      <style:text-properties officeooo:rsid="09e6b469"/>
    </style:style>
    <style:style style:name="T368" style:family="text">
      <style:text-properties officeooo:rsid="09e9d750"/>
    </style:style>
    <style:style style:name="T369" style:family="text">
      <style:text-properties officeooo:rsid="09ebf146"/>
    </style:style>
    <style:style style:name="T370" style:family="text">
      <style:text-properties officeooo:rsid="09ee8894"/>
    </style:style>
    <style:style style:name="T371" style:family="text">
      <style:text-properties officeooo:rsid="09f785c6"/>
    </style:style>
    <style:style style:name="T372" style:family="text">
      <style:text-properties officeooo:rsid="09fb1749"/>
    </style:style>
    <style:style style:name="T373" style:family="text">
      <style:text-properties officeooo:rsid="09fc696a"/>
    </style:style>
    <style:style style:name="T374" style:family="text">
      <style:text-properties officeooo:rsid="09fd73d3"/>
    </style:style>
    <style:style style:name="T375" style:family="text">
      <style:text-properties officeooo:rsid="09ff2a35"/>
    </style:style>
    <style:style style:name="T376" style:family="text">
      <style:text-properties officeooo:rsid="0a02753a"/>
    </style:style>
    <style:style style:name="T377" style:family="text">
      <style:text-properties officeooo:rsid="0a033671"/>
    </style:style>
    <style:style style:name="T378" style:family="text">
      <style:text-properties officeooo:rsid="0a061a5c"/>
    </style:style>
    <style:style style:name="T379" style:family="text">
      <style:text-properties officeooo:rsid="0a07690c"/>
    </style:style>
    <style:style style:name="T380" style:family="text">
      <style:text-properties officeooo:rsid="0a0b6818"/>
    </style:style>
    <style:style style:name="T381" style:family="text">
      <style:text-properties officeooo:rsid="0a0f36fc"/>
    </style:style>
    <style:style style:name="T382" style:family="text">
      <style:text-properties officeooo:rsid="0a10cdb9"/>
    </style:style>
    <style:style style:name="T383" style:family="text">
      <style:text-properties officeooo:rsid="0a11f5e0"/>
    </style:style>
    <style:style style:name="T384" style:family="text">
      <style:text-properties officeooo:rsid="0a163600"/>
    </style:style>
    <style:style style:name="T385" style:family="text">
      <style:text-properties officeooo:rsid="0a186411"/>
    </style:style>
    <style:style style:name="T386" style:family="text">
      <style:text-properties officeooo:rsid="0a1c927e"/>
    </style:style>
    <style:style style:name="T387" style:family="text">
      <style:text-properties officeooo:rsid="0a1da37b"/>
    </style:style>
    <style:style style:name="T388" style:family="text">
      <style:text-properties officeooo:rsid="0a1f89e8"/>
    </style:style>
    <style:style style:name="T389" style:family="text">
      <style:text-properties officeooo:rsid="0a21c308"/>
    </style:style>
    <style:style style:name="T390" style:family="text">
      <style:text-properties officeooo:rsid="0a26b5f5"/>
    </style:style>
    <style:style style:name="T391" style:family="text">
      <style:text-properties fo:language="la" fo:country="VA"/>
    </style:style>
    <style:style style:name="T392" style:family="text">
      <style:text-properties fo:language="la" fo:country="VA" officeooo:rsid="0a285f7b"/>
    </style:style>
    <style:style style:name="T393" style:family="text">
      <style:text-properties fo:language="la" fo:country="VA" officeooo:rsid="0a2a2db9"/>
    </style:style>
    <style:style style:name="T394" style:family="text">
      <style:text-properties fo:language="la" fo:country="VA" officeooo:rsid="0a2b697f"/>
    </style:style>
    <style:style style:name="T395" style:family="text">
      <style:text-properties fo:language="la" fo:country="VA" officeooo:rsid="0a3144bb"/>
    </style:style>
    <style:style style:name="T396" style:family="text">
      <style:text-properties fo:language="la" fo:country="VA" officeooo:rsid="0a33fffa"/>
    </style:style>
    <style:style style:name="T397" style:family="text">
      <style:text-properties fo:language="la" fo:country="VA" officeooo:rsid="0ae9e627"/>
    </style:style>
    <style:style style:name="T398" style:family="text">
      <style:text-properties fo:language="la" fo:country="VA" officeooo:rsid="0aed52e7"/>
    </style:style>
    <style:style style:name="T399" style:family="text">
      <style:text-properties fo:language="la" fo:country="VA" officeooo:rsid="0afdd573"/>
    </style:style>
    <style:style style:name="T400" style:family="text">
      <style:text-properties fo:language="la" fo:country="VA" officeooo:rsid="0650da7c"/>
    </style:style>
    <style:style style:name="T401" style:family="text">
      <style:text-properties officeooo:rsid="0a35f350"/>
    </style:style>
    <style:style style:name="T402" style:family="text">
      <style:text-properties officeooo:rsid="0a3767f0"/>
    </style:style>
    <style:style style:name="T403" style:family="text">
      <style:text-properties officeooo:rsid="0a38a337"/>
    </style:style>
    <style:style style:name="T404" style:family="text">
      <style:text-properties officeooo:rsid="0a39c153"/>
    </style:style>
    <style:style style:name="T405" style:family="text">
      <style:text-properties officeooo:rsid="0a39f11f"/>
    </style:style>
    <style:style style:name="T406" style:family="text">
      <style:text-properties officeooo:rsid="0a3ab717"/>
    </style:style>
    <style:style style:name="T407" style:family="text">
      <style:text-properties officeooo:rsid="0a429bed"/>
    </style:style>
    <style:style style:name="T408" style:family="text">
      <style:text-properties officeooo:rsid="0a448222"/>
    </style:style>
    <style:style style:name="T409" style:family="text">
      <style:text-properties officeooo:rsid="0a454af3"/>
    </style:style>
    <style:style style:name="T410" style:family="text">
      <style:text-properties officeooo:rsid="0a51438a"/>
    </style:style>
    <style:style style:name="T411" style:family="text">
      <style:text-properties officeooo:rsid="0a518b02"/>
    </style:style>
    <style:style style:name="T412" style:family="text">
      <style:text-properties officeooo:rsid="0a56ea4d"/>
    </style:style>
    <style:style style:name="T413" style:family="text">
      <style:text-properties officeooo:rsid="0a68b566"/>
    </style:style>
    <style:style style:name="T414" style:family="text">
      <style:text-properties officeooo:rsid="0a696876"/>
    </style:style>
    <style:style style:name="T415" style:family="text">
      <style:text-properties officeooo:rsid="0a69dfa0"/>
    </style:style>
    <style:style style:name="T416" style:family="text">
      <style:text-properties officeooo:rsid="0a6bd555"/>
    </style:style>
    <style:style style:name="T417" style:family="text">
      <style:text-properties officeooo:rsid="0a6d6ff5"/>
    </style:style>
    <style:style style:name="T418" style:family="text">
      <style:text-properties officeooo:rsid="0a744120"/>
    </style:style>
    <style:style style:name="T419" style:family="text">
      <style:text-properties officeooo:rsid="0a74b1d1"/>
    </style:style>
    <style:style style:name="T420" style:family="text">
      <style:text-properties officeooo:rsid="0a7583c6"/>
    </style:style>
    <style:style style:name="T421" style:family="text">
      <style:text-properties officeooo:rsid="0a7d7bda"/>
    </style:style>
    <style:style style:name="T422" style:family="text">
      <style:text-properties officeooo:rsid="0a83d664"/>
    </style:style>
    <style:style style:name="T423" style:family="text">
      <style:text-properties officeooo:rsid="0a8972ea"/>
    </style:style>
    <style:style style:name="T424" style:family="text">
      <style:text-properties officeooo:rsid="0a8b3899"/>
    </style:style>
    <style:style style:name="T425" style:family="text">
      <style:text-properties officeooo:rsid="0a8c2c21"/>
    </style:style>
    <style:style style:name="T426" style:family="text">
      <style:text-properties officeooo:rsid="0a8c7311"/>
    </style:style>
    <style:style style:name="T427" style:family="text">
      <style:text-properties officeooo:rsid="0a9cb435"/>
    </style:style>
    <style:style style:name="T428" style:family="text">
      <style:text-properties officeooo:rsid="0aa03717"/>
    </style:style>
    <style:style style:name="T429" style:family="text">
      <style:text-properties officeooo:rsid="0aa08a71"/>
    </style:style>
    <style:style style:name="T430" style:family="text">
      <style:text-properties officeooo:rsid="0aa6adb9"/>
    </style:style>
    <style:style style:name="T431" style:family="text">
      <style:text-properties officeooo:rsid="0aa7eef9"/>
    </style:style>
    <style:style style:name="T432" style:family="text">
      <style:text-properties officeooo:rsid="0aac9680"/>
    </style:style>
    <style:style style:name="T433" style:family="text">
      <style:text-properties officeooo:rsid="0aace5e0"/>
    </style:style>
    <style:style style:name="T434" style:family="text">
      <style:text-properties officeooo:rsid="0ab32749"/>
    </style:style>
    <style:style style:name="T435" style:family="text">
      <style:text-properties officeooo:rsid="0ab432e7"/>
    </style:style>
    <style:style style:name="T436" style:family="text">
      <style:text-properties officeooo:rsid="0ab48318"/>
    </style:style>
    <style:style style:name="T437" style:family="text">
      <style:text-properties officeooo:rsid="0ab8d8f1"/>
    </style:style>
    <style:style style:name="T438" style:family="text">
      <style:text-properties officeooo:rsid="0abc00de"/>
    </style:style>
    <style:style style:name="T439" style:family="text">
      <style:text-properties officeooo:rsid="0abd5726"/>
    </style:style>
    <style:style style:name="T440" style:family="text">
      <style:text-properties officeooo:rsid="0abe96f9"/>
    </style:style>
    <style:style style:name="T441" style:family="text">
      <style:text-properties officeooo:rsid="0ad307f9"/>
    </style:style>
    <style:style style:name="T442" style:family="text">
      <style:text-properties officeooo:rsid="0ad4ef11"/>
    </style:style>
    <style:style style:name="T443" style:family="text">
      <style:text-properties officeooo:rsid="0ad622a6"/>
    </style:style>
    <style:style style:name="T444" style:family="text">
      <style:text-properties officeooo:rsid="0ad77ef8"/>
    </style:style>
    <style:style style:name="T445" style:family="text">
      <style:text-properties officeooo:rsid="0adb2958"/>
    </style:style>
    <style:style style:name="T446" style:family="text">
      <style:text-properties officeooo:rsid="0add12fa"/>
    </style:style>
    <style:style style:name="T447" style:family="text">
      <style:text-properties officeooo:rsid="0addbc9a"/>
    </style:style>
    <style:style style:name="T448" style:family="text">
      <style:text-properties officeooo:rsid="0ade7dc3"/>
    </style:style>
    <style:style style:name="T449" style:family="text">
      <style:text-properties officeooo:rsid="0adf144b"/>
    </style:style>
    <style:style style:name="T450" style:family="text">
      <style:text-properties officeooo:rsid="0ae02621"/>
    </style:style>
    <style:style style:name="T451" style:family="text">
      <style:text-properties officeooo:rsid="0ae0e219"/>
    </style:style>
    <style:style style:name="T452" style:family="text">
      <style:text-properties officeooo:rsid="0ae16bdc"/>
    </style:style>
    <style:style style:name="T453" style:family="text">
      <style:text-properties officeooo:rsid="0ae1dd85"/>
    </style:style>
    <style:style style:name="T454" style:family="text">
      <style:text-properties officeooo:rsid="0ae303a9"/>
    </style:style>
    <style:style style:name="T455" style:family="text">
      <style:text-properties officeooo:rsid="0ae4ab83"/>
    </style:style>
    <style:style style:name="T456" style:family="text">
      <style:text-properties officeooo:rsid="0ae8a648"/>
    </style:style>
    <style:style style:name="T457" style:family="text">
      <style:text-properties officeooo:rsid="0af74edf"/>
    </style:style>
    <style:style style:name="T458" style:family="text">
      <style:text-properties officeooo:rsid="0afb3019"/>
    </style:style>
    <style:style style:name="T459" style:family="text">
      <style:text-properties officeooo:rsid="0afdd573"/>
    </style:style>
    <style:style style:name="T460" style:family="text">
      <style:text-properties officeooo:rsid="0b01ba9c"/>
    </style:style>
    <style:style style:name="T461" style:family="text">
      <style:text-properties officeooo:rsid="0b06a1a3"/>
    </style:style>
    <style:style style:name="T462" style:family="text">
      <style:text-properties officeooo:rsid="0b078c67"/>
    </style:style>
    <style:style style:name="T463" style:family="text">
      <style:text-properties officeooo:rsid="0b0a8d97"/>
    </style:style>
    <style:style style:name="T464" style:family="text">
      <style:text-properties officeooo:rsid="0b0a8f96"/>
    </style:style>
    <style:style style:name="T465" style:family="text">
      <style:text-properties officeooo:rsid="0b0ef55c"/>
    </style:style>
    <style:style style:name="T466" style:family="text">
      <style:text-properties officeooo:rsid="0b11a203"/>
    </style:style>
    <style:style style:name="T467" style:family="text">
      <style:text-properties officeooo:rsid="0b1396e7"/>
    </style:style>
    <style:style style:name="T468" style:family="text">
      <style:text-properties officeooo:rsid="0b14aaad"/>
    </style:style>
    <style:style style:name="T469" style:family="text">
      <style:text-properties officeooo:rsid="0b15b705"/>
    </style:style>
    <style:style style:name="T470" style:family="text">
      <style:text-properties officeooo:rsid="0b16fcc2"/>
    </style:style>
    <style:style style:name="T471" style:family="text">
      <style:text-properties officeooo:rsid="0b1aeaae"/>
    </style:style>
    <style:style style:name="T472" style:family="text">
      <style:text-properties officeooo:rsid="0b1e0f19"/>
    </style:style>
    <style:style style:name="T473" style:family="text">
      <style:text-properties officeooo:rsid="0b25e037"/>
    </style:style>
    <style:style style:name="T474" style:family="text">
      <style:text-properties officeooo:rsid="0b2966bd"/>
    </style:style>
    <style:style style:name="T475" style:family="text">
      <style:text-properties officeooo:rsid="0b2e367d"/>
    </style:style>
    <style:style style:name="T476" style:family="text">
      <style:text-properties officeooo:rsid="0b34e410"/>
    </style:style>
    <style:style style:name="T477" style:family="text">
      <style:text-properties officeooo:rsid="0b369bdd"/>
    </style:style>
    <style:style style:name="T478" style:family="text">
      <style:text-properties officeooo:rsid="0b3713be"/>
    </style:style>
    <style:style style:name="T479" style:family="text">
      <style:text-properties officeooo:rsid="0b3bb06b"/>
    </style:style>
    <style:style style:name="T480" style:family="text">
      <style:text-properties officeooo:rsid="0b3cfc71"/>
    </style:style>
    <style:style style:name="T481" style:family="text">
      <style:text-properties officeooo:rsid="0b3e7312"/>
    </style:style>
    <style:style style:name="T482" style:family="text">
      <style:text-properties officeooo:rsid="0b468fa1"/>
    </style:style>
    <style:style style:name="T483" style:family="text">
      <style:text-properties officeooo:rsid="0b4b7ce4"/>
    </style:style>
    <style:style style:name="T484" style:family="text">
      <style:text-properties officeooo:rsid="0b4d088e"/>
    </style:style>
    <style:style style:name="T485" style:family="text">
      <style:text-properties officeooo:rsid="0b4d610a"/>
    </style:style>
    <style:style style:name="T486" style:family="text">
      <style:text-properties officeooo:rsid="0b512290"/>
    </style:style>
    <style:style style:name="T487" style:family="text">
      <style:text-properties officeooo:rsid="0b53c56d"/>
    </style:style>
    <style:style style:name="T488" style:family="text">
      <style:text-properties officeooo:rsid="0b554060"/>
    </style:style>
    <style:style style:name="T489" style:family="text">
      <style:text-properties officeooo:rsid="0b563c97"/>
    </style:style>
    <style:style style:name="T490" style:family="text">
      <style:text-properties officeooo:rsid="0b56f260"/>
    </style:style>
    <style:style style:name="T491" style:family="text">
      <style:text-properties officeooo:rsid="0b5ac7ca"/>
    </style:style>
    <style:style style:name="T492" style:family="text">
      <style:text-properties officeooo:rsid="0b5b0ab3"/>
    </style:style>
    <style:style style:name="T493" style:family="text">
      <style:text-properties officeooo:rsid="0b674ce0"/>
    </style:style>
    <style:style style:name="T494" style:family="text">
      <style:text-properties officeooo:rsid="0b69de05"/>
    </style:style>
    <style:style style:name="T495" style:family="text">
      <style:text-properties officeooo:rsid="0b6a9f2a"/>
    </style:style>
    <style:style style:name="T496" style:family="text">
      <style:text-properties officeooo:rsid="0b6baef1"/>
    </style:style>
    <style:style style:name="T497" style:family="text">
      <style:text-properties officeooo:rsid="0b6e96c5"/>
    </style:style>
    <style:style style:name="T498" style:family="text">
      <style:text-properties officeooo:rsid="0b7411d1"/>
    </style:style>
    <style:style style:name="T499" style:family="text">
      <style:text-properties officeooo:rsid="0b76af89"/>
    </style:style>
    <style:style style:name="T500" style:family="text">
      <style:text-properties officeooo:rsid="068f67ba"/>
    </style:style>
    <style:style style:name="T501" style:family="text">
      <style:text-properties officeooo:rsid="0b7b5035"/>
    </style:style>
    <style:style style:name="T502" style:family="text">
      <style:text-properties officeooo:rsid="0b7b5bda"/>
    </style:style>
    <style:style style:name="T503" style:family="text">
      <style:text-properties officeooo:rsid="0b7c8cb8"/>
    </style:style>
    <style:style style:name="T504" style:family="text">
      <style:text-properties officeooo:rsid="0b7d4ac2"/>
    </style:style>
    <style:style style:name="T505" style:family="text">
      <style:text-properties officeooo:rsid="0b86cb89"/>
    </style:style>
    <style:style style:name="T506" style:family="text">
      <style:text-properties officeooo:rsid="0b8e69c3"/>
    </style:style>
    <style:style style:name="T507" style:family="text">
      <style:text-properties officeooo:rsid="0b8e800c"/>
    </style:style>
    <style:style style:name="T508" style:family="text">
      <style:text-properties officeooo:rsid="0b908664"/>
    </style:style>
    <style:style style:name="T509" style:family="text">
      <style:text-properties officeooo:rsid="0b91a90b"/>
    </style:style>
    <style:style style:name="T510" style:family="text">
      <style:text-properties officeooo:rsid="0b9418e2"/>
    </style:style>
    <style:style style:name="T511" style:family="text">
      <style:text-properties officeooo:rsid="0b946596"/>
    </style:style>
    <style:style style:name="T512" style:family="text">
      <style:text-properties officeooo:rsid="0b9730f6"/>
    </style:style>
    <style:style style:name="T513" style:family="text">
      <style:text-properties officeooo:rsid="0b991f29"/>
    </style:style>
    <style:style style:name="T514" style:family="text">
      <style:text-properties officeooo:rsid="0b9b748a"/>
    </style:style>
    <style:style style:name="T515" style:family="text">
      <style:text-properties officeooo:rsid="0b9d5406"/>
    </style:style>
    <style:style style:name="T516" style:family="text">
      <style:text-properties officeooo:rsid="0b9fd656"/>
    </style:style>
    <style:style style:name="T517" style:family="text">
      <style:text-properties officeooo:rsid="0ba0fc4c"/>
    </style:style>
    <style:style style:name="T518" style:family="text">
      <style:text-properties officeooo:rsid="0ba6cf9d"/>
    </style:style>
    <style:style style:name="T519" style:family="text">
      <style:text-properties officeooo:rsid="06996788"/>
    </style:style>
    <style:style style:name="T520" style:family="text">
      <style:text-properties officeooo:rsid="0ba9e48d"/>
    </style:style>
    <style:style style:name="T521" style:family="text">
      <style:text-properties officeooo:rsid="0badebb6"/>
    </style:style>
    <style:style style:name="T522" style:family="text">
      <style:text-properties officeooo:rsid="0bb24fc0"/>
    </style:style>
    <style:style style:name="T523" style:family="text">
      <style:text-properties officeooo:rsid="0bb2966d"/>
    </style:style>
    <style:style style:name="T524" style:family="text">
      <style:text-properties officeooo:rsid="0bb31164"/>
    </style:style>
    <style:style style:name="T525" style:family="text">
      <style:text-properties officeooo:rsid="0bb58737"/>
    </style:style>
    <style:style style:name="T526" style:family="text">
      <style:text-properties officeooo:rsid="0bb633a4"/>
    </style:style>
    <style:style style:name="T527" style:family="text">
      <style:text-properties officeooo:rsid="0bb7970c"/>
    </style:style>
    <style:style style:name="T528" style:family="text">
      <style:text-properties officeooo:rsid="0bbe0b8a"/>
    </style:style>
    <style:style style:name="T529" style:family="text">
      <style:text-properties officeooo:rsid="0bc2b5df"/>
    </style:style>
    <style:style style:name="T530" style:family="text">
      <style:text-properties officeooo:rsid="0bc4c39f"/>
    </style:style>
    <style:style style:name="T531" style:family="text">
      <style:text-properties officeooo:rsid="0bc68f67"/>
    </style:style>
    <style:style style:name="T532" style:family="text">
      <style:text-properties officeooo:rsid="0bca204c"/>
    </style:style>
    <style:style style:name="T533" style:family="text">
      <style:text-properties officeooo:rsid="0bcb23e4"/>
    </style:style>
    <style:style style:name="T534" style:family="text">
      <style:text-properties officeooo:rsid="0bcb7a54"/>
    </style:style>
    <style:style style:name="T535" style:family="text">
      <style:text-properties officeooo:rsid="0bd15f36"/>
    </style:style>
    <style:style style:name="T536" style:family="text">
      <style:text-properties officeooo:rsid="0bd3d74d"/>
    </style:style>
    <style:style style:name="T537" style:family="text">
      <style:text-properties officeooo:rsid="0bd67777"/>
    </style:style>
    <style:style style:name="T538" style:family="text">
      <style:text-properties officeooo:rsid="0bd7d940"/>
    </style:style>
    <style:style style:name="T539" style:family="text">
      <style:text-properties officeooo:rsid="0bd94bb0"/>
    </style:style>
    <style:style style:name="T540" style:family="text">
      <style:text-properties officeooo:rsid="0bda6624"/>
    </style:style>
    <style:style style:name="T541" style:family="text">
      <style:text-properties officeooo:rsid="0bdee9ab"/>
    </style:style>
    <style:style style:name="T542" style:family="text">
      <style:text-properties officeooo:rsid="0be0c877"/>
    </style:style>
    <style:style style:name="T543" style:family="text">
      <style:text-properties officeooo:rsid="0be28cbd"/>
    </style:style>
    <style:style style:name="T544" style:family="text">
      <style:text-properties officeooo:rsid="0be489bc"/>
    </style:style>
    <style:style style:name="T545" style:family="text">
      <style:text-properties officeooo:rsid="0be8c441"/>
    </style:style>
    <style:style style:name="T546" style:family="text">
      <style:text-properties officeooo:rsid="0be9e6e1"/>
    </style:style>
    <style:style style:name="T547" style:family="text">
      <style:text-properties officeooo:rsid="0bec8cef"/>
    </style:style>
    <style:style style:name="T548" style:family="text">
      <style:text-properties officeooo:rsid="0bee66a1"/>
    </style:style>
    <style:style style:name="T549" style:family="text">
      <style:text-properties officeooo:rsid="0bfa14ff"/>
    </style:style>
    <style:style style:name="T550" style:family="text">
      <style:text-properties officeooo:rsid="0bfa1789"/>
    </style:style>
    <style:style style:name="T551" style:family="text">
      <style:text-properties officeooo:rsid="0bfcfa58"/>
    </style:style>
    <style:style style:name="T552" style:family="text">
      <style:text-properties officeooo:rsid="0bff2106"/>
    </style:style>
    <style:style style:name="T553" style:family="text">
      <style:text-properties officeooo:rsid="0bff83cc"/>
    </style:style>
    <style:style style:name="T554" style:family="text">
      <style:text-properties officeooo:rsid="0c0151e3"/>
    </style:style>
    <style:style style:name="T555" style:family="text">
      <style:text-properties officeooo:rsid="0c0538fc"/>
    </style:style>
    <style:style style:name="T556" style:family="text">
      <style:text-properties officeooo:rsid="0c09be0a"/>
    </style:style>
    <style:style style:name="T557" style:family="text">
      <style:text-properties officeooo:rsid="0c0c72ee"/>
    </style:style>
    <style:style style:name="T558" style:family="text">
      <style:text-properties officeooo:rsid="0c0eb371"/>
    </style:style>
    <style:style style:name="T559" style:family="text">
      <style:text-properties officeooo:rsid="0c0ff0c8"/>
    </style:style>
    <style:style style:name="T560" style:family="text">
      <style:text-properties officeooo:rsid="06c50802"/>
    </style:style>
    <style:style style:name="T56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la" fo:country="VA"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62" style:family="text">
      <style:text-properties fo:font-size="10pt" style:font-size-asian="10pt" style:font-size-complex="10pt"/>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text:span text:style-name="T3">3</text:span>/</text:p>
      <text:p text:style-name="P11">Primus Libellus erit de Terminis et Enuntiatione</text:p>
      <text:p text:style-name="P11">Secundus de Suppositionibus et de Parvis Logicalibus</text:p>
      <text:p text:style-name="P11">Tertius de Consequentiis in Communi</text:p>
      <text:p text:style-name="P11">Quartus de Consequentia Syllogistica in Communi</text:p>
      <text:p text:style-name="P11">Quintus de Syllogismo Dialectico</text:p>
      <text:p text:style-name="P11">Sextus de Syllogismo Sophistico</text:p>
      <text:p text:style-name="P11">Septimus de Syllogismo Demonstrativo</text:p>
      <text:p text:style-name="P11">Octavus de Exponibilibus</text:p>
      <text:p text:style-name="P11">Nonus Praedicabilium seu de Praedicabilibus</text:p>
      <text:p text:style-name="P11">Decimus Praedicamentorum, seu de Praedicamentis</text:p>
      <text:p text:style-name="P11">Undecimus de Complexis Significabilibus</text:p>
      <text:p text:style-name="P11">Duodecimus et ultimus de Obligationibus</text:p>
      <text:h text:style-name="P696" text:outline-level="1">Primus Libellus erit de Terminis et Enuntiatione</text:h>
      <text:h text:style-name="P698" text:outline-level="2">De <text:span text:style-name="T2">T</text:span>erminis</text:h>
      <text:p text:style-name="P576">Sequitur <text:span text:style-name="T28">l</text:span>ibelli <text:span text:style-name="T28">p</text:span>rimi <text:span text:style-name="T28">t</text:span>ractatus prior, qui est de terminis in eundemque praefatio.</text:p>
      <text:p text:style-name="P15">/<text:span text:style-name="T4">4</text:span>/</text:p>
      <text:p text:style-name="P11">Apud sapientem proverbiorum vigesimosecundo legimus: “Ne transgrediaris terminos antiquos, quos posuerunt patres tui”. Quod impraesentiarum dupliciter exponere libet.</text:p>
      <text:p text:style-name="P11">Uno modo sic: Ne tu Summulista future logicam ab limine salutaveris donec terminos (quos patres tui dialectici tradidere) praelibaveris.</text:p>
      <text:p text:style-name="P11">Secundo modo sic: Novas terminorum sectiones cum sententiosis argutiolis, tanquam novercam logices, fugito. <text:span text:style-name="T5">Q</text:span>uia illae temporis curriculo in summulis et logica examussim colligentur. Sed terminorum definitiones et partitiones antiquas, quas patres tui posuerunt, non transgrediaris.</text:p>
      <text:p text:style-name="P11">Propterea non demirabere si succincte et lucide sine rationum nexibus procedam. Rem igitur aggredientes dicamus.</text:p>
      <text:p text:style-name="P41">Sicut <text:span text:style-name="T6">Primo Elenchorum</text:span> Aristoteles dicit qui terminorum significantias non capiunt, facile paralogizantur. Eam ob rem, aliqua communia et introductoria in terminos, sive nodosos vortice<text:span text:style-name="T10">s,</text:span> tradenda veniunt.</text:p>
      <text:h text:style-name="P703" text:outline-level="4"><text:soft-page-break/>Consequentia</text:h>
      <text:p text:style-name="P11">Consequentia est oratio ex antecedente, consequente et nota illationis conflata.</text:p>
      <text:h text:style-name="P703" text:outline-level="4">Antecedens</text:h>
      <text:p text:style-name="P11">Antecedens est propositio vel complexum propositionale ex quo aliud sequi denotatur.</text:p>
      <text:p text:style-name="P43">Ut tota haec oratio “Homo currit; ergo Animal currit”, est consequentia cuius antecedens praecedit ‘ergo’. Et in hac “Animal curreret, si Homo curreret”, “Homo curreret” est antecedens quia immediate sequitur coniunctionem ‘si’.</text:p>
      <text:h text:style-name="P703" text:outline-level="4">Consequens</text:h>
      <text:p text:style-name="P43">Et <text:span text:style-name="T11">sic in causali per quia, ex antecedentis definitione, consequentis descriptionem intelliges.</text:span></text:p>
      <text:h text:style-name="P703" text:outline-level="4">Maior</text:h>
      <text:h text:style-name="P703" text:outline-level="4">Minor</text:h>
      <text:p text:style-name="P11">Quando sunt duae propositiones, ut in syllogismo, prior maior, posterior vero minor, appellari solet.</text:p>
      <text:p text:style-name="P42"><text:span text:style-name="T12">Etiam si prior propositio particularis </text:span><text:span text:style-name="T13">posterior vero universalis fuerit, ipsa erit maior. At si plures propositiones quae duae, ut ascendendo fuerint, singulas respondeto.</text:span></text:p>
      <text:h text:style-name="P703" text:outline-level="4">Consequentia bona et mala</text:h>
      <text:p text:style-name="P11">Consequentia bona est illa, cuius antecedens non potest esse verum, consequente existente falso. Opposito modo consequentia mala describitur.</text:p>
      <text:p text:style-name="P44">/5/</text:p>
      <text:p text:style-name="P45">Haec definitio est solum doctrinalis et introductoria. In consequentiis autem quomodo hoc capiendum venit deprehendes.</text:p>
      <text:h text:style-name="P703" text:outline-level="4">Opponens praebet assumpta</text:h>
      <text:p text:style-name="P11">Ante omnia doceatur opponens probare negatum.</text:p>
      <text:p text:style-name="P46">Exemplariter declaratur:</text:p>
      <text:p text:style-name="P46">Ponatur quod respondens huius propositionis “Non homo non est animal”, veritatem neget.</text:p>
      <text:p text:style-name="P46">Dicat opponens “Illa aequivalet uni verae; ergo ipsa est vera”.</text:p>
      <text:p text:style-name="P46"><text:soft-page-break/>Respondente antecedens negante, probet sic: Aequivalet huic “Omnis homo est animal”, haec autem est vera; ergo aequivalet uni verae, quo erat probandum.</text:p>
      <text:p text:style-name="P46">Et rursus maiore negata sic probet: Nam istae duae propositiones ex extremis synonymis sunt compositae, sunt eiusdem qualitatis, manet eadem suppositio et caeterae proprietates logicales;ergo aequivalent, quod erat probandum, et sic in abyssum quo ad leporem invenerit, hoc est, propositum habuerit. Doceatur inferre quod erat probandum et cum exercitatus fuerit temporum curriculo, non opus est passim ita inferre.</text:p>
      <text:h text:style-name="P703" text:outline-level="4">Respondens aiat, neget, aut distinguat</text:h>
      <text:p text:style-name="P11">Respondens vero agnitis veris, annuat. <text:span text:style-name="T14">F</text:span>alsa interimat. <text:span text:style-name="T14">D</text:span>uplicia distinctione in antecedente vel consequente explicet.</text:p>
      <text:p text:style-name="P47">Signanter agnitis veris. Si de propositionis veritate etiam post considerationem titubet, ab arguente quaerat quid per illam propositionem praetendit. <text:span text:style-name="T15">Si totum antecedens verum et consequens falsum offendat, audacter illam illationem neget, quia illam probare bonam arguens nequibit.</text:span></text:p>
      <text:p text:style-name="P48">“Asini sunt sacerdotes” et sic ratiocinetur arguens:</text:p>
      <text:p text:style-name="P7">Omnes episcopi sunt sacerdotes,</text:p>
      <text:p text:style-name="P7">Asini sunt <text:span text:style-name="T16">episcopi; ergo</text:span></text:p>
      <text:p text:style-name="P7">Asini sunt sacerdotes”.</text:p>
      <text:p text:style-name="P49"/>
      <text:p text:style-name="P50">Dicat respondens: Transeat maior, distinguat minorem, penes hoc quod ‘episcopi’ potest esse obliquus, aut rectus. Si primum, mox videt consequentiam negandam esto, quod nec Darii nec fallaciae ullum vigorem cognoverit.</text:p>
      <text:h text:style-name="P703" text:outline-level="4">Transeat</text:h>
      <text:p text:style-name="P50">Et <text:span text:style-name="T17">quando talem portum invenerit, non opponat se maiori, </text:span><text:span text:style-name="T18">sed dicat ‘transeat’. Hoc est, quidquid sit de eius veritate consequenter respondendo, </text:span><text:span text:style-name="T19">n</text:span><text:span text:style-name="T18">ec per maioris aut alterius partis liberum transitum, illam concedere </text:span><text:span text:style-name="T19">posthac cogetur.</text:span></text:p>
      <text:h text:style-name="P703" text:outline-level="4">Repetendum argumentum</text:h>
      <text:p text:style-name="P51">Caeterum, argumentum, antequam ad partes respondens loquatur, integre illibateque repetat, quia argumentatio digestae repetita est partim soluta. <text:span text:style-name="T20">E</text:span>t inter repetendum, quorsum argumentationis virtus tendat, pensiculatae trutinet, quia ex praecipiti et impraemeditata responsione saepius respondens hallucinatur.</text:p>
      <text:h text:style-name="P703" text:outline-level="4"><text:soft-page-break/>Definitio</text:h>
      <text:p text:style-name="P11">Definitio est oratio superfluitatis expers, definiti explicativa, et cum eo convertibilis.</text:p>
      <text:p text:style-name="P52">Et hoc est quod Aristoteles Primo Topicorum innuit, inquiens: “Definitio est oratio indicativa rei”. Et Quintilianus: “Finitio est rei propositae propria, dilucida et breviter, comprehensa verbis enuntiatio. Et Porphyrius definitionem generis per hoc quod nihil superfui aut penuriae contineat probat esse bonam.</text:p>
      <text:p text:style-name="P52">Contra: Non sequitur “Animal rationale” est definitio hominis; ergo ‘homo’ est definitio hominis.</text:p>
      <text:p text:style-name="P16"><text:span text:style-name="T22">Responsio est clara: Nam sicut dicit Philosophus Secundo Metaphysicae, indigne ferunt in convivis, si ad minium solutio fiat. Si tamen iuvenes respondere nequeant, regentis est suppetias ferre. </text:span>/<text:span text:style-name="T1">6</text:span>/</text:p>
      <text:h text:style-name="P704" text:outline-level="4">Definitum propinquum</text:h>
      <text:p text:style-name="P11">Definitum propinquum est terminus cuius naturam definitio convertibiliter aperit.</text:p>
      <text:p text:style-name="P3">Exemplariter patet “Animal rationale” est definitio hominis, cuius definitu propinquum est terminus <text:s/>‘homo’.</text:p>
      <text:h text:style-name="P703" text:outline-level="4">Definitum remotum</text:h>
      <text:p text:style-name="P3">Et quaelibet res proprie per definitum propinquum significata est definitum remotum.</text:p>
      <text:h text:style-name="P703" text:outline-level="4">A definitione incipiendum</text:h>
      <text:p text:style-name="P11">Materiam aliquam aggressurus definitionem praefaberis.</text:p>
      <text:p text:style-name="P53">Panaetium primo officiorum hanc praetermittentem Cicero carpit.</text:p>
      <text:h text:style-name="P703" text:outline-level="4">Divisio</text:h>
      <text:p text:style-name="P11">Divisio logicalis et termini superioris in suos ramos partitio, inter quos et divisum convertibilitas exigitur.</text:p>
      <text:p text:style-name="P54">Et quia paulo post de divisione futurus est sermo, sufficit illud strictum dixisse.</text:p>
      <text:h text:style-name="P705" text:outline-level="4">Terminus</text:h>
      <text:p text:style-name="P11">Terminus est signum ponibile in potentia propinqua in propositione consueta tanquam pars eius.</text:p>
      <text:p text:style-name="P55">Hic est sermo de termino logicali et non de rei extremitate. Imago enim est signum et non terminus. Et de parte totali est sermo, quia ‘mo’ quae est pars huius termini ‘homo’, non est terminus.</text:p>
      <text:h text:style-name="P703" text:outline-level="4"><text:soft-page-break/>Significare</text:h>
      <text:p text:style-name="P11">Significare est potentia cognitivae aliquid repraesentare.</text:p>
      <text:p text:style-name="P56">Licet repraesentare est notius in definitione ponitur. Et capitur aliquid transcendenter, ut aliqua et aliqualiter includat. Et dicitur potentiae cognitivae, quia non solum hominibus aut angelis aliquid repraesentatur, verum etiam et ipsis brutis. Sua enim voce gallinam pro cibo ad se gallus evocat, et balatu matrem agnus deprehendit.</text:p>
      <text:h text:style-name="P703" text:outline-level="4">Significare duplex</text:h>
      <text:p text:style-name="P11">Rursus significare bifariam seiungitur. Nam quoddam est significare naturaliter, quod est seclusa impositione repraesentare. Aliud vero est significare ad placitum, hoc est, per impositionem factam.</text:p>
      <text:p text:style-name="P57">Significare, sive terminus significans seclusa impositione, est quando dato quod non esset impositio, non minus significaret. Significare ad placitum est ex hominum institutione aut ex consuetudine repraesentare.</text:p>
      <text:h text:style-name="P703" text:outline-level="4">Significatio naturalis est triplex</text:h>
      <text:p text:style-name="P11">Trifariam significatio naturalis extenditur. Nam quidam terminus significat naturaliter proprie suum significatum, hoc est, mediante se significat. Dolorem enim gemitus infirmi ex instinctu naturae significat. <text:span text:style-name="T21">Q</text:span>uaelibet res mundi obiective sese repraesentat.</text:p>
      <text:p text:style-name="P4">Ergo conceptus albedinis mediante se, albedinem repraesentat, et haec vox ‘Sortes’ mediante suo conceptu Sorte repraesentat.</text:p>
      <text:p text:style-name="P4">Regula est: Quilibet terminus nonnihil significans mediante eius naturali similitudine illud repraesentat.</text:p>
      <text:h text:style-name="P706" text:outline-level="4">Triplex terminus: mentalis, scriptus, vocalis</text:h>
      <text:p text:style-name="P4">Terminorum, quidam mentalis, quidam scriptus, quidam vero vocalis. /7/</text:p>
      <text:p text:style-name="P4">Terminus mentalis est conceptus in animo. Terminus scriptus oculo corporali percipitur. Intellectus nonnumquam dicitur oculus mentis propterea additur corporali. Terminus vocalis ab aure percipitur. Aptitudinem in definitionibus verba important.</text:p>
      <text:h text:style-name="P703" text:outline-level="4"><text:soft-page-break/>Categorematicus significatione <text:span text:style-name="T23">et officio et syncategorema</text:span></text:h>
      <text:p text:style-name="P11">Terminorum, quidam categorematicus significatione tantum quia aliquid significat nec in propositione officium habere potest.</text:p>
      <text:p text:style-name="P11">Quidam categorematicus officio tantum, quod nihil significat, sed officium in propositione habet.</text:p>
      <text:p text:style-name="P11">Ex his categorema significatione et officio, et syncategorema omnibus suis in ramis lucent.</text:p>
      <text:h text:style-name="P703" text:outline-level="4">Officium habere</text:h>
      <text:p text:style-name="P58">Habere officium in propositione, est esse suppositum vel appositum grammatice loquendo. Categorema sine addito pro categoremate significatione accipitur.</text:p>
      <text:h text:style-name="P703" text:outline-level="4">Significativus et non significativus</text:h>
      <text:p text:style-name="P11">Rursus terminorum quidam significativus quod aliud a se significat.</text:p>
      <text:p text:style-name="P11">Opposito modo terminus non significativus definitur.</text:p>
      <text:p text:style-name="P59">Aliud a se suis partibus et prolatore significat, vel impositus ad aliquod istorum significandum. Exemplum termini non significativi, ut ‘hem’, ‘buf’.</text:p>
      <text:h text:style-name="P703" text:outline-level="4">Communis singularis</text:h>
      <text:p text:style-name="P11">Praeterea terminorum quidam communis cui ex parte significationis pro pluribus accipi non repugnat.</text:p>
      <text:p text:style-name="P11">Terminus singularis opposito modo definitur.</text:p>
      <text:p text:style-name="P60">Non est defectus ex parte impositionis quin isti termini ‘Deus’, ‘Sol’ plura significent, sed ex parte rei penuria oritur.</text:p>
      <text:h text:style-name="P703" text:outline-level="4"><text:soft-page-break/>Secundae et primae intentionis</text:h>
      <text:p text:style-name="P11">Insuper terminorum quidam est secundae intentionis, qui accipitur pro re qua est signum, ea ratione qua significativum.</text:p>
      <text:p text:style-name="P11">Terminus primae intentionis ex adverso describendus venit.</text:p>
      <text:h text:style-name="P707" text:outline-level="4">Participium</text:h>
      <text:p text:style-name="P61">Participium est terminus secundae intentionis, nam omnia participia significat, et si ‘amans’ vel ullum participium sua significantia exuatur, participium non amplius pro illo accipitur.</text:p>
      <text:h text:style-name="P703" text:outline-level="4">Ens</text:h>
      <text:p text:style-name="P62">Secus est de termino ‘ens’, <text:span text:style-name="T24">licet terminum ‘homo’ significet et pro eo accipiatur, nihilo tamen minus si ‘homo’ a sua significatione cadat, adhuc est ens. </text:span><office:annotation office:name="__Annotation__64500_1009310712" loext:resolved="false"><dc:creator>Unknown Author</dc:creator><dc:date>2025-04-16T00:04:40.617683168</dc:date><text:p><text:span text:style-name="T561">Ergo ens est terminus primae intentionis.</text:span></text:p></office:annotation><text:span text:style-name="T24">Ergo ens est terminus primae intentionis.</text:span><office:annotation-end office:name="__Annotation__64500_1009310712"/></text:p>
      <text:h text:style-name="P703" text:outline-level="4">Conceptus non-ultimatus et ultimatus</text:h>
      <text:p text:style-name="P11"><text:span text:style-name="T25">Demum conceptuum, quidam non-ultimatus, et est distincta similitudo termini propositionem ingredientis, </text:span><text:span text:style-name="T26">v</text:span><text:span text:style-name="T25">el est conceptus termini ad impositionem vocis aut scripturae, ad placitum significantis.</text:span></text:p>
      <text:p text:style-name="P11"><text:span text:style-name="T25">Conceptus ultimatus est naturalis similitudo rei indistincta per terminum significatae, nisi terminus distincte significet, </text:span><text:span text:style-name="T26">v</text:span><text:span text:style-name="T25">el est conceptus rem immediate significans qui non significat ad placitum ob vocis suae aut scripturae impositionem.</text:span></text:p>
      <text:p text:style-name="P63">Similitudo huius vocis ‘buf’ est conceptus non-ultimatus. Patet per totam definitionem. Item si hace vox ‘buf’ imponeretur ad significandum conceptus quod est eius distincta naturalis similitudo, etiam ad placitum significaret.</text:p>
      <text:p text:style-name="P64">Notitia omnium /8/ hominum ad extra est conceptus ultimatus. Similiter notitia entis, vocis et similium, licet sit conceptus termini proprie dicti non tamen est distincta vocis notitia et omnino similium.</text:p>
      <text:p text:style-name="P65">Si ‘buf’ imponatur ad significandum se, tunc idem conceptus erit ultimatus et non-ultimatus.</text:p>
      <text:p text:style-name="P65">Non coincidunt hi duo conceptus nisi in simili casu et hoc secundum primum quod nominis. Penes secundum ille conceptus est praecise non-ultimatus.</text:p>
      <text:p text:style-name="P65"><text:soft-page-break/>Ulterius, scito quod conceptus non-ultimatus vocem, scripturam, aut conceptum (cuius est similitudo) ultimate significat, hoc est, naturaliter proprie, cum est eius naturalis similitudo; ergo non est idem <text:span text:style-name="T27">significatum ultimatum et conceptus ultimatus.</text:span></text:p>
      <text:p text:style-name="P66">Si quidem significatum ultimatum est significatum proprie dictum, termini ‘hoc’ est significatum quod naturaliter, proprie, aut ad placitum, proprie terminus significat.</text:p>
      <text:p text:style-name="P66"><office:annotation office:name="__Annotation__316_1601635186" loext:resolved="false"><dc:creator>Unknown Author</dc:creator><dc:date>2025-04-16T22:35:15.602451293</dc:date><text:p><text:span text:style-name="T561">Significatum vero non ultimatum <text:s/>est id quod terminus improprie significat, hoc est, naturaliter communiter vel ad placitum improprie.</text:span></text:p></office:annotation>Significatum vero non-ultimatum est id quod terminus improprie significat, hoc est, naturaliter communiter vel ad placitum improprie.<office:annotation-end office:name="__Annotation__316_1601635186"/></text:p>
      <text:p text:style-name="P66">Verum, conceptus non-ultimatus vocis aut scripturae significat ad placitum quidquid per vocem aut scripturam cuius est conceptus significatur. Nam qui unum terminum imponit, quaelibet eius synonymum ad placitum significantem cum eo imponit.</text:p>
      <text:p text:style-name="P66">In logices exordio et aliis locis caeterorum terminorum, faciles partitiones, secundum materias obiter occurrentes spargentur. Et haec paucula in epitome introductorie dixisse sufficiat.</text:p>
      <text:p text:style-name="P32">Finitur tractatus prior <text:span text:style-name="T410">D</text:span>e <text:span text:style-name="T410">T</text:span>erminis.</text:p>
      <text:p text:style-name="P40"/>
      <text:h text:style-name="P699" text:outline-level="2">De Enuntiatione</text:h>
      <text:p text:style-name="P577">Sequitur <text:span text:style-name="T304">S</text:span>ecundus, qui est <text:span text:style-name="T305">d</text:span>e <text:span text:style-name="T304">E</text:span>nuntiatione</text:p>
      <text:h text:style-name="P703" text:outline-level="4">Dialectica et eius utilitas</text:h>
      <text:p text:style-name="P40"/>
      <text:p text:style-name="P2"/>
      <text:h text:style-name="P702" text:outline-level="3">De Hypotheticis</text:h>
      <text:h text:style-name="P703" text:outline-level="4">Hypothetica</text:h>
      <text:p text:style-name="P11">Propositio hypothetica est propositio habens plures categoricas, aut plura complexa propositionalia per aliquam coniunctionem coniunctas.</text:p>
      <text:h text:style-name="P703" text:outline-level="4">Complexum propositionale</text:h>
      <text:p text:style-name="P67">Complexum propositionale est quod solitarie sumptum non est propositio, cuius tamen verbum si in verbum indicativi modi mutaretur, esse propositio. Et solum in conditionali et expletiva continetur, nec unquam in alia hypothetica, nisi conditionalis aut expletiva esset eius pars.</text:p>
      <text:h text:style-name="P703" text:outline-level="4">Hypothecae species</text:h>
      <text:p text:style-name="P11">Eius species sunt septem, scilicet: conditionalis illativa, promissiva, <office:annotation office:name="__Annotation__5414_2954685899" loext:resolved="false"><dc:creator>Unknown Author</dc:creator><dc:date>2026-03-10T15:41:49.907363080</dc:date><text:p text:style-name="Comment">Claude Opus 4.6:<text:line-break/>expletiva / adversitiva: licet, etsi, quamvis … tamen.</text:p><text:p text:style-name="Comment">Modern analogue: concessive (logically: ∧).<text:line-break/><text:line-break/>The adversitiva concedes the antecedent while affirming the consequent ("Although Socrates runs, Plato disputes"), so logically it asserts both conjuncts — hence the medieval view that it is "expletive" (the concessive particle adds no logical content beyond conjunction). The name adversitiva comes from the grammatical tradition (coniunctiones adversativae: sed, tamen, licet, etc.).</text:p></office:annotation>expletiva sive adversitiva<office:annotation-end office:name="__Annotation__5414_2954685899"/>, rationalis, causalis, copulativa et disiunctiva.</text:p>
      <text:p text:style-name="P68">Per conditionalem promissivam conditionalis votiva intelligitur, e non differunt nisi sicut promissio simples et votum, nam omne votum est promissio et non econtra. Quod temporalis et localis non sunt species hypotheticae in hypotheticarum calce patebit.</text:p>
      <text:h text:style-name="P703" text:outline-level="4"><text:soft-page-break/>Conditionalis</text:h>
      <text:p text:style-name="P11">Conditionalis est hypothetica per notam ‘si’ notificata. Et propositio sive complexum propositionale immediate sequens ly ‘si’ est antecedes, reliquum vero consequens. <office:annotation office:name="__Annotation__5524_2954685899" loext:resolved="false"><dc:creator>Unknown Author</dc:creator><dc:date>2026-03-10T15:51:04.709582061</dc:date><text:p text:style-name="Comment">Ad veritatem propositionis conditionalis illativae captae requiritur consequentiae bonitatis, et ad eius falsitatem consequentiae malitiae.</text:p></office:annotation>Ad veritatem propositionis conditionalis illativae captae requiritur consequentiae bonitatis, et ad eius falsitatem consequentiae malitiae.<office:annotation-end office:name="__Annotation__5524_2954685899"/> Quo fit quod nulla conditionalis in qua si illative capitur est contingens propositio, sed omnis impossibilis aut necessaria. Eius contradictoriam per negationis praepositionem /45/ dabit quae illationem non valere denotat, vel per unam expletivam ex antecedente et consequentis contradictorio conflatam.</text:p>
      <text:p text:style-name="P69">Et licet haec in uno sensu sit conditionalis “Nullus homo legit Parisii nisi Ipse sit asinus”, adhuc in valore ponitur ‘si’, quia ‘nisi’ sic sumptum valet ‘si non’. Propositio quam immediate sequitur ‘si’ est antecedens secundae intentionaliter et nominaliter, licet interdum realiter sit consequens et participialiter, ut in hac “Animal <text:span text:style-name="T307">currit si Homo Currit”. Cum idem ad veritatem propositionis conditionalis et bonitatem consequentiae sufficiat, patet </text:span><text:span text:style-name="T308">corollarium literae “nullam conditionalem esse contingentem”, quod contradictorium conditionalis sicut et consequentiae cuiuslibet datur praeponendo negationem toti, quae consequentiam denotabit non esse bonam, vel dabitur per adversativam, quam est etiam hypothetica, denotans compossibilitatem ex contradictorio consequentis et antecedente. In hypotheticis signis, una propositio affirmativae et negativae contradicit, et ex consequenti affirmativa et negativa aequ</text:span><text:span text:style-name="T313">iv</text:span><text:span text:style-name="T308">alent formaliter.</text:span></text:p>
      <text:h text:style-name="P703" text:outline-level="4">Arguitur primum</text:h>
      <text:p text:style-name="P71">Contra veritatem conditionalis sic arguitur: Ex ea sequitur quod haec conditionalis esset vera “Si Sortes movetur, Sortes curreret”. Consequens est falsum, quod sequatur patet, quia antecedens non potest esse verum cum non est propositio; ergo non potest esse verum consequente existente falso.</text:p>
      <text:h text:style-name="P703" text:outline-level="4">Arguitur secundo</text:h>
      <text:p text:style-name="P72">Secundo sic: Haec conditionalis esset falsa “Si animal currat, Homo currit”.</text:p>
      <text:p text:style-name="P72">Sed contra, animal stat determinate, ascendendo habet multas singulares veras; ergo conditionalis ex vero sequitur.</text:p>
      <text:h text:style-name="P703" text:outline-level="4">Arguitur tertio</text:h>
      <text:p text:style-name="P72">Tertio: Ex dictis sequitur quod haec est falsa “Non <text:span text:style-name="T309">S</text:span>i homo currat, Risibile currit”, cum conditionali verae contradicat.</text:p>
      <text:p text:style-name="P72">Sed contra, aequivalet huic verae “Si nullus homo currat, Nullum risibile currit”, quae sunt eiusdem qualitatis, et termini supponunt eodem modo et termini sunt synonymi.</text:p>
      <text:h text:style-name="P703" text:outline-level="4"><text:soft-page-break/>Arguitur quarto</text:h>
      <text:p text:style-name="P73">Quarto: Haec conditionalis est vera “Nullus homo currit <text:span text:style-name="T310">N</text:span>isi <text:span text:style-name="T310">m</text:span>oveatur risibile”, et posito quod quodlibet homo currit, antecedens est verum et consequens falsum, igitur.</text:p>
      <text:h text:style-name="P703" text:outline-level="4">Arguitur quinto</text:h>
      <text:p text:style-name="P74">Quinto: Posito quod haec “Si Sortes currat, Sortes movetur” significet hominem esse asinum, iam consequentia est bona et conditionalis falsa, igitur.</text:p>
      <text:h text:style-name="P703" text:outline-level="4">Ad primum</text:h>
      <text:p text:style-name="P75">Ad primum nego sequelam, et ad probationem concedo quod illud antecedens numquam potest esse verum, cum nu<text:span text:style-name="T311">m</text:span>quam <text:span text:style-name="T311">potest esse verum, cum numquam erit propositio, aut secum synonyma. Sat est quod si verbum eius in verbum indicativi modi mutaretur, quod tunc antecedens erit verum consequente existente falso. Sic hic “Si homo curreret et Sortes esse homo; Sortes curreret” consequentia nihil valet, quae est conditionalis cuius complexa propositionalia coniunctio copulativa unit.</text:span></text:p>
      <text:h text:style-name="P703" text:outline-level="4">Ad secundum</text:h>
      <text:p text:style-name="P79">Ad secundum concedo quod illa conditionalis est falsa, et concedo quod nota ‘si’ nihil facit ad suppositionem. ‘Animal’ illic stat determinate et sic terminus ‘homo’.</text:p>
      <text:p text:style-name="P79">Termini in conditionali stant immobiliter, ita quod nec ascendere aut descendere potest in ordine ad totam conditionalem, sicut in aliis consequentiis. Aliae sunt viae eas cognoscendi quae per ascensum et descensum.</text:p>
      <text:h text:style-name="P703" text:outline-level="4">Ad tertium</text:h>
      <text:p text:style-name="P76"><text:span text:style-name="T312">Ad tertium concedo quod illa </text:span><text:span text:style-name="T313">conditionalis est falsa, et nego quod alteri aequivaleat, quia illa est conditionalis affirmativa, cum nota non negetur.</text:span></text:p>
      <text:p text:style-name="P77"><text:span text:style-name="T313">Ista autem negativa aequivalet huic “Non sequitur Si homo currit, Risibile currat”, </text:span><text:span text:style-name="T314">vel huic “Quamvis Homo currit, Nullum risibile currit”, vel non est ita “Si homo currit, Risibile currit”.</text:span></text:p>
      <text:h text:style-name="P703" text:outline-level="4">Ad quartum</text:h>
      <text:p text:style-name="P78"><text:span text:style-name="T314">Ad quartum nego quod antecedens erit verum consequente existente falso, </text:span><text:span text:style-name="T315">nisi sicut in textu dictum est valet ‘si non’, et valet hanc “Si Nullum risibile movetur, Nullus homo currit”. Et si non metaliter /46/ valet hoc, sed solum in consequendo stat est. Vel dicitur, loquimur de conditionali a ly ‘si’ denominata.</text:span></text:p>
      <text:h text:style-name="P703" text:outline-level="4">Ad quintum</text:h>
      <text:p text:style-name="P78"><text:span text:style-name="T315">Ad quintum concedo illud, </text:span><text:span text:style-name="T316">in omnibus intelligimus, in conditionali aut copulativa vel disiunctiva, significati iuxta significationem suarum partium.</text:span></text:p>
      <text:h text:style-name="P703" text:outline-level="4"><text:soft-page-break/>Argumentandi in conditionali regulae</text:h>
      <text:p text:style-name="P11">Trifariam in conditionali bene argumentaberis:</text:p>
      <text:list text:style-name="L1">
        <text:list-item>
          <text:p text:style-name="P727">Primo: A tota conditionali, in sensu quo est conditionalis, cum positione antecedentis ad positionem consequentis.</text:p>
        </text:list-item>
        <text:list-item>
          <text:p text:style-name="P727">Secundo: A tota conditionali, cum contradictorio consequentis ad contradictorium antecedentis.</text:p>
        </text:list-item>
        <text:list-item>
          <text:p text:style-name="P727">Tertio: <office:annotation office:name="__Annotation__5434_3596293697" loext:resolved="false"><dc:creator>Unknown Author</dc:creator><dc:date>2026-03-12T11:54:12.203257671</dc:date><text:p text:style-name="Comment">(A -&gt; B) -&gt; (~A v B)</text:p><text:p text:style-name="Comment"><text:span text:style-name="T562">(~A v B) -/&gt; </text:span>(A -&gt; B) </text:p><text:p text:style-name="Comment"/><text:p text:style-name="Comment">A conditionali ad disiunctivam ex contradictorio antecedentis et consequente conflatam. Sed ab antecedentis contradictorio vel consequentis positione, consequentia est nulla.</text:p></office:annotation>A conditionali ad disiunctivam ex contradictorio antecedentis et consequente conflatam. Sed ab antecedentis contradictorio vel consequentis positione, consequentia est nulla.<office:annotation-end office:name="__Annotation__5434_3596293697"/> Ad expletivae veritatem sat est partium compossibilitas.</text:p>
        </text:list-item>
      </text:list>
      <text:p text:style-name="P80">Prima consequentia erit una rationalis, cuius antecedens erit una copulativa, cuius prior pars erit conditionalis et posterior pars una categorica ponens antecedens, licet antecedens sit complexum propositionale, et consequens conditionalis erit consequens rationalis. Ut </text:p>
      <text:p text:style-name="P8">Si Sortes curreret Sortes Moveretur, <text:span text:style-name="T435">et</text:span></text:p>
      <text:p text:style-name="P8">Sortes currit</text:p>
      <text:p text:style-name="P8">ergo</text:p>
      <text:p text:style-name="P8">Sortes moveretur.</text:p>
      <text:p text:style-name="P80"/>
      <text:p text:style-name="P81">Proportionabiliter de aliis regulis loqui potes.</text:p>
      <text:p text:style-name="P81">Et dicitur in sensu quo est conditionalis, propter tales:</text:p>
      <text:p text:style-name="P8">Impossibile est <text:span text:style-name="T319">T</text:span>e currere <text:span text:style-name="T437">S</text:span>i <text:span text:style-name="T436">t</text:span>u potes currere,</text:p>
      <text:p text:style-name="P8">Sed Tu potes currere</text:p>
      <text:p text:style-name="P8">ergo</text:p>
      <text:p text:style-name="P8">Impossibile est Te currere.</text:p>
      <text:p text:style-name="P81"/>
      <text:p text:style-name="P82">Si ‘impossibile’ determinat totam conditionalem, tunc illa est categorica vera, nec arguitur per regulam. <text:span text:style-name="T320">Si autem determinat praecise partem sequentem, consequentia est bona, et sicut consequens est falsum, ita antecedens pro maiore.</text:span></text:p>
      <text:h text:style-name="P703" text:outline-level="4">Arguitur primo</text:h>
      <text:p text:style-name="P83">Contra tertiam regulam arguitur primo. Non sequitur:</text:p>
      <text:p text:style-name="P8">Si Homo currit <text:span text:style-name="T321">A</text:span>nimal currit</text:p>
      <text:p text:style-name="P8">ergo</text:p>
      <text:p text:style-name="P8">Nullus <text:span text:style-name="T321">H</text:span>omo currit vel <text:span text:style-name="T321">A</text:span>nimal currit.</text:p>
      <text:p text:style-name="P83"><text:soft-page-break/></text:p>
      <text:p text:style-name="P83">Cum antecedens sit necessarium et consequens continges, quod patet, quia utraque pars est contingens, et partes nec contradicunt nec subcontrariantur.</text:p>
      <text:h text:style-name="P703" text:outline-level="4">Secundum</text:h>
      <text:p text:style-name="P84">Secundo probatur quod arguendo a contradictorio antecedentis est bona consequentiam, nam bene sequitur:</text:p>
      <text:p text:style-name="P8">Si Homo est asinus, Homo est rudibilis, <text:span text:style-name="T438">sed</text:span></text:p>
      <text:p text:style-name="P8">Nullus Homo est asinus</text:p>
      <text:p text:style-name="P8">ergo</text:p>
      <text:p text:style-name="P8">Homo est rudibilis</text:p>
      <text:p text:style-name="P85"/>
      <text:p text:style-name="P85">Antecedens non potest esse verum consequente existente falso.</text:p>
      <text:h text:style-name="P703" text:outline-level="4">Tertium</text:h>
      <text:p text:style-name="P86">Tertio. Bene sequitur:</text:p>
      <text:p text:style-name="P8">Si Homo currat, Risibile currit, <text:span text:style-name="T439">sed</text:span></text:p>
      <text:p text:style-name="P8">Nullus <text:span text:style-name="T322">H</text:span>omo currit</text:p>
      <text:p text:style-name="P8">ergo</text:p>
      <text:p text:style-name="P8">Nullum Risibile currit.</text:p>
      <text:p text:style-name="P86"/>
      <text:p text:style-name="P86">Forte dicis, sequitur solum gratia materiae.</text:p>
      <text:p text:style-name="P87">Contra, sequitur de forma:</text:p>
      <text:p text:style-name="P8">Si Homo est Homo est, <text:span text:style-name="T440">sed</text:span></text:p>
      <text:p text:style-name="P8">Nullus Homo est</text:p>
      <text:p text:style-name="P8">ergo</text:p>
      <text:p text:style-name="P8">Nullus Homo est.</text:p>
      <text:p text:style-name="P87"/>
      <text:h text:style-name="P703" text:outline-level="4">Ad primum</text:h>
      <text:p text:style-name="P88">Ad primum nego quod non sequatur, consequens est necessarium, ut patet per sui contradictorii impossibilitatem legem subcontrariarum participantis.</text:p>
      <text:h text:style-name="P703" text:outline-level="4">Ad secundum</text:h>
      <text:p text:style-name="P89">Ad secundum nego quod sequatur, quoniam antecedens est necessarium, cum est una copulativa cuius utraque pars est necessaria, et consequens impossibile.</text:p>
      <text:h text:style-name="P703" text:outline-level="4">Ad tertium</text:h>
      <text:p text:style-name="P90">Ad tertium sufficienter inter arguendum ad finem usque responsum est. Concedo enim quod terminis synonymis consequentia vale de forma, non autem in aliis.</text:p>
      <text:h text:style-name="P703" text:outline-level="4"><text:soft-page-break/>In conditionali promissiva</text:h>
      <text:p text:style-name="P11"><office:annotation office:name="__Annotation__13605_3596293697" loext:resolved="false"><dc:creator>Unknown Author</dc:creator><dc:date>2026-03-12T13:41:39.819492023</dc:date><text:p text:style-name="Comment">Conditionalis illativa (bona): </text:p><text:p text:style-name="Comment">□(𝐴 → 𝐵)</text:p><text:p text:style-name="Comment">Necessary — all models, all times.</text:p><text:p text:style-name="Comment"/><text:p text:style-name="Comment">Conditionalis promissiva:</text:p><text:p text:style-name="Comment">"If A were posited, B would follow"</text:p><text:p text:style-name="Comment">Subjunctive/commissive — speech act, like a promise.</text:p><text:p text:style-name="Comment"/><text:p text:style-name="Comment">Material conditional<text:tab/></text:p><text:p text:style-name="Comment">𝐴 →𝐵</text:p><text:p text:style-name="Comment">Truth-functional — just the connective in one model.</text:p></office:annotation>Ad conditionalis promissivae veritatem sat est, si ponatur ita esse sicut significatur per complexum post ly ‘si’ quod ponetur aliud. Et in hoc /47/ est conditionalis illativae simia, sed non exigitur quod non sit possibile date ita esse sicut significatur per antecedens, quando ita erit sicut significatur per consequens.<office:annotation-end office:name="__Annotation__13605_3596293697"/></text:p>
      <text:p text:style-name="P91">Haec conditionalis promissiva sive votiva est simia conditionalis illativae propterea, quia non requiritur quod ita sit sicut significatur per propositionem sequentem ‘si’, sed sat est et requiritur quod si ponatur, tunc ponetur ita esse sicut per aliud complexum significatur, ut “Si veneris ad me, dabo tibi equum”. Si illa sit vera requiritur quod si ad me venias equum habebis, non requiritur quod venias. Et sic illud vulgare in omni conditionali verum habet. Conditionalis nihil ponit.</text:p>
      <text:h text:style-name="P703" text:outline-level="4">Veritas conditionalis promissivae</text:h>
      <text:p text:style-name="P92">Ex isto conditionalis promissivae affirmativae veritatem et falsitatem deprehendere potes, et per consequens in negativis, ut “Non Si veneris ad me, dabo tibi equum”, dato quod ad me venies non habebis equum. Ex hoc patet quod omnis conditionalis promissiva, cuius antecedens est impossibile aut consequens necessarium, est vera. Immo si non potest esse sicut significatur per antecedens, quin ita erit sicut significatur per consequens, ipsa erit vera. Si enim Michael Gabrieli promittat si quolibet die futuro eum diligat, faciat eum aequalem Deo, nullo tempore determinato finito potest ita esse sicut significatur per antecedens, et per consequens illa conditionalis erit vera.</text:p>
      <text:p text:style-name="P92">Ulterius patet conditionalem illativam inferre conditionalem promissivam ex eiusdem terminis, et non econverso.</text:p>
      <text:h text:style-name="P703" text:outline-level="4">Arguitur</text:h>
      <text:p text:style-name="P93">Contra istud arguitur: Haec consequentia est mala “Si veneris ad me, dabo tibi equum”; ergo impossibilis propositio.</text:p>
      <text:h text:style-name="P703" text:outline-level="4">Responsio</text:h>
      <text:p text:style-name="P94">Respondetur negando praesuppositum, quia nullo modo est consequentia. Nulla enim consequentia est contingens, sed conditionalis promissiva est contingens, ut patet intelligenti.</text:p>
      <text:h text:style-name="P703" text:outline-level="4">Replicatio</text:h>
      <text:p text:style-name="P95">Contra: Si ly ‘si’ <text:span text:style-name="T324">capiatur illative cum eiusdem complexis esset consequentia, et capiendo ‘si’ promissive, ipsa est synonyma cum conditionali illativa, quia omnes partes dempta ‘si’ sunt synonymae hoc supponitur, et si eodem modo capitur, cum non videatur ex parte cuius distinctio oriatur inter ly ‘si’ illative et promissive captum.</text:span></text:p>
      <text:h text:style-name="P703" text:outline-level="4"><text:soft-page-break/>Responsio</text:h>
      <text:p text:style-name="P96">Respondetur: ‘Si’ capitur <text:span text:style-name="T325">aequivoce quando enim capitur illative denotat consequentiae bonitatem, non autem quando capitur promissive; ergo aliqualiter aliter significat propter aliam et aliam denotationem consequentialem et non consequentialem.</text:span></text:p>
      <text:h text:style-name="P703" text:outline-level="4">Conditionati extremi veritas</text:h>
      <text:p text:style-name="P97">Quaeritur quomodo cognoscuntur propositionum veritates de conditionato extremo.</text:p>
      <text:p text:style-name="P97">Respondetur per terminorum suppositionem, iuxta regulam in suppositionum principio positam. Pro quod intelligendo ponuntur nonnullae regulae, quarum prima est:</text:p>
      <text:p text:style-name="P11">Quodlibet conditionatum, cuius terminus inferens terminatum illatum infert, est transcendens in supponendo.</text:p>
      <text:p text:style-name="P98">Terminus sequens si est inferens, praecedens illatus, alius terminus est concomitans sive concurrens. Ex hac sequitur: </text:p>
      <text:list text:style-name="L2">
        <text:list-item>
          <text:p text:style-name="P728">Primo: Si terminus inferens sit inferior aut convertibilis cum illato conditionatum, est transcendes, ut “Animal Si est homo”, “Homo Si est risibile”.</text:p>
        </text:list-item>
        <text:list-item>
          <text:p text:style-name="P728">Secundo sequitur: Si terminus inferens de nullo verificai potest, conditionatum est transcendens, ut “Ens Si est Chimaera”.</text:p>
        </text:list-item>
      </text:list>
      <text:p text:style-name="P98">Regula secunda:</text:p>
      <text:p text:style-name="P11">Si terminum illatum terminus inferens non inferat, conditionatum /48/ pro nullo supponit.</text:p>
      <text:p text:style-name="P99">Patet exemplariter “Album Si est ens”, pro nullo supponit.</text:p>
      <text:p text:style-name="P99">Regula tertia:</text:p>
      <text:p text:style-name="P11"><text:span text:style-name="T326">Conditionatum ex terminis disparatis pro aliquo supponit, pro aliquo vero non supponit. </text:span><text:s/></text:p>
      <text:p text:style-name="P100">Patet in hoc conditionato “Homo Si est asinus” pro omni alio ab asino supponit, et pro nullo asino supponit. “Homo Si est animal” pro nullo bruto supponit, sed pro quolibet homine et non animali.</text:p>
      <text:p text:style-name="P100">Regula quarta:</text:p>
      <text:p text:style-name="P11"><text:soft-page-break/>Quando vis scire pro quo conditionatum supponit, ad propriam conditionalem reducatur cuius antecedens terminum inferente pro praedicato, consequens vero terminum illatum pro praedicato habebit pronomine demonstrativo pro utriusque subiecto assumpto, demonstrando rem praesentem si copula de praesenti fuerit.</text:p>
      <text:p text:style-name="P101">Patet exemplariter: “Animal Si est homo” pro quolibet ente supponit. Quocumque enim ente demonstrato haec est vera “Si hoc est homo, hoc est animal”, et quis ista non est vera “Brunellus est homo Si est animal”.</text:p>
      <text:p text:style-name="P101">“Homo Si est animal” non est transcendens, quia si subiectum fuerit terminus communis stans determinate aut confuse, sufficit dare hanc singularem vel illam veram, et reducere conditionalem per terminos discretos, ut “Animal est homo Si est animal”.</text:p>
      <text:p text:style-name="P102">Haec enim est vera, quod patet:</text:p>
      <text:p text:style-name="P8">Sortes est homo Si est animal</text:p>
      <text:p text:style-name="P8">Et Sortes est animal</text:p>
      <text:p text:style-name="P8">ergo</text:p>
      <text:p text:style-name="P8">Animal est homo Si est animal.</text:p>
      <text:p text:style-name="P102"/>
      <text:p text:style-name="P103">Et tamen haec conditionalis est falsa “Si animal est animal, Animal est homo”. Item sensus illius est verus: De aliquo de quo verum est dicere quod est animal, de illo verum est dicere quod est homo si est animal, et hoc est verum.</text:p>
      <text:p text:style-name="P103">Si enim a parte subiecti, terminus connotativus ponatur, tollatur ille in conditionalis reductione, ut “Sortes albus est albus Si est coloratus” est falsa, nam bene sequitur:</text:p>
      <text:p text:style-name="P8">Sortes albus est albus Si est coloratus</text:p>
      <text:p text:style-name="P8">Et Sortes albus est Sortes</text:p>
      <text:p text:style-name="P8">ergo</text:p>
      <text:p text:style-name="P8">Sortes est albus si est coloratus.</text:p>
      <text:p text:style-name="P70"/>
      <text:p text:style-name="P104">Expositorie conclusio est falsa, et minor vera; ergo maior falsa, et tamen si illa in propriis terminis reduceretur conditionalis esset vera.</text:p>
      <text:p text:style-name="P104">Et idem est in terminis absolutis pro rebus pertibilibus supponentibus.</text:p>
      <text:p text:style-name="P104">“Sortes est Sortes Si est entia” est falsa, quod patet. Adiungatur illi propositioni </text:p>
      <text:p text:style-name="P8"><text:span text:style-name="T330">E</text:span>t Sortes est iste binarius</text:p>
      <text:p text:style-name="P8"><text:span text:style-name="T330">er</text:span>go</text:p>
      <text:p text:style-name="P8">Iste binarius est Sortes <text:span text:style-name="T331">S</text:span>i est entia.</text:p>
      <text:p text:style-name="P104"/>
      <text:p text:style-name="P104">Conclusio est falsa, et minor vera; ergo maior falsa.</text:p>
      <text:p text:style-name="P105"><text:soft-page-break/>Oportet capere pronomen demonstrativum, demonstrans to<text:span text:style-name="T327">tum disiunctum partium Sortis, vel ‘a’ pro toto illo stans.</text:span></text:p>
      <text:p text:style-name="P106"><text:span text:style-name="T327">Dictum est demonstrando rem praesentem, quia est est falsa “Chimaera est animal Si est homo”, cum sit affirmativa de subiecto non supponente. Quare reductio ad conditionalem vera non sufficit ad veritatem propositionis de conditionato etiam seclusa distributione, sed </text:span><text:span text:style-name="T328">requiritur constantia termini concurrente. Alioquin dabitur affirmativa vera de subiecto non supponente ultra instantias assignandas in suppositionibus.</text:span></text:p>
      <text:p text:style-name="P107">Sed hic facile dicis quod haec instantis est cum primis numeranda, eo quod sicut conditionatis nihil ponit, nec aliqua est contingens, sic nec aliqua de conditionato.</text:p>
      <text:p text:style-name="P40">Secundo arguitur, bene sequitur:</text:p>
      <text:p text:style-name="P8">Chimaera est Sortes Si est Sortes</text:p>
      <text:p text:style-name="P8"><text:span text:style-name="T329">e</text:span>rgo</text:p>
      <text:p text:style-name="P8">Sortes Si est Sortes est Chimaera.</text:p>
      <text:p text:style-name="P8"/>
      <text:p text:style-name="P108">Per conversionem <text:span text:style-name="T329">simplicem, sed consequens est falsum. Patet quia qualibet singularis consequentis est falsa.</text:span></text:p>
      <text:p text:style-name="P109">Si dicas hanc veram “Iste Sortes Si est Sortes, est Chimaera” demonstrando Chimaeram, addo aliam:</text:p>
      <text:p text:style-name="P8">Et iste Sortes Si est Sortes est Chimaera</text:p>
      <text:p text:style-name="P8">ergo</text:p>
      <text:p text:style-name="P8">Chimaera /49/ est Chimaera.</text:p>
      <text:p text:style-name="P8"/>
      <text:p text:style-name="P110">Expositorie conclusio est falsa; ergo aliqua praemissarum. Et aequalis est ratio utriusque; ergo utraque est falsa.</text:p>
      <text:p text:style-name="P111">Sed dicis: Consequentia est nulla. <text:span text:style-name="T332">E</text:span>o quod virtualiter arguitur ab amplo modo significandi affirmative, et sine distributione et constantia non amplius inferas “<text:span text:style-name="T332">Chimaera imaginarie est Chimaera”, aut “Chimaera est Chimaerae Si est Chimaerae” licet conditionatum non ampliet ad quinque, </text:span><text:span text:style-name="T333">quia tunc ampliaret quemlibet terminum ei incertum, amplum modum significandi habet respectu termini concurrentis, cui competit secundum reductionem ad conditionalem veram. Licet hoc argumentum solvi possit, et quodlibet aliud adducibile ut reor, tamen quia hic modus est iuvenibus facilis eum hic solum sustinemus, oppositum Deo duce, in logica cum artistae in artibus magis educati fuerint ponemus:</text:span></text:p>
      <text:p text:style-name="P112">Regula quinta.</text:p>
      <text:p text:style-name="P12">In rationali, ultra consequentiae bonitatem antecedentis et consequentis, veritas exigitur.</text:p>
      <text:p text:style-name="P113">Ergo aliqua est rationalis impossibilis propositio et necessaria consequentia. Licet omnis consequentia sit propositio, non sequitur, “est necessaria consequentia; ergo est necessaria propositio”.</text:p>
      <text:p text:style-name="P113">Regula sexta.</text:p>
      <text:p text:style-name="P11"><text:soft-page-break/>Ad veritatem propositionis causalis, ultra rationalem requiritur quod antecedens indicet causam quare ita est sicut per consequens significatur, in qua notam causalem antecedens immediate sequitur.</text:p>
      <text:p text:style-name="P17"><text:span text:style-name="T334">In rationali, notam antecedens praecedit. Ergo tria ad causalis veritatem requiruntur, et duo ad rationalis veritatem. Quo fit quod rationalis copulativae ex conditionali et positione antecedentis aequivalet ut “</text:span>Homo currit; ergo Animal currit” <text:span text:style-name="T335">a</text:span><text:span text:style-name="T334">equivalet </text:span><text:span text:style-name="T335">huic in consequendo</text:span><text:span text:style-name="T334">:</text:span></text:p>
      <text:p text:style-name="P8">Si Homo currit, Animal currit</text:p>
      <text:p text:style-name="P8">Et Homo currit.</text:p>
      <text:p text:style-name="P8"/>
      <text:p text:style-name="P114">Causalis haec “Quia Sol lucet, dies” aequivalet huic:</text:p>
      <text:p text:style-name="P8">Si Sol lucet dies</text:p>
      <text:p text:style-name="P8">Et Sol lucet</text:p>
      <text:p text:style-name="P8">Et Lucentia Solis in tali horizonte est causa diei.</text:p>
      <text:p text:style-name="P8"/>
      <text:p text:style-name="P114">Ulterius sequitur quod causalis est subalternans secundum legem respectu rationalis conditionalis copulativae et disiunctivae, patet omnes tales infert, et ex opposito consequentis ad oppositum antecedentis negative proportionabiliter argumentari potest.</text:p>
      <text:p text:style-name="P114">De rationato extremo et causato proportionabiliter ad conditionatum dicatur, oculum habendo ad causalem et rationalem, sed temperatum, ut “Animal dum dormit” solum supponit pro animali dormiente.</text:p>
      <text:p text:style-name="P32">De copulativa</text:p>
      <text:p text:style-name="P11">Copulativa est hypothetica cum nota copulativa signata. Ad copulativae affirmativae veritatem, iuxta significationem partium significantis satis est et exigitur utramque partem principalem esse veram, et ad eius falsitatem alteram partium esse falsam satis est.</text:p>
      <text:p text:style-name="P115">Notae copulativae sunt ‘et’, ‘nec’, ‘<text:span text:style-name="T336">que</text:span>’, ‘ac’, ‘atque’ et similes. Quando vero sunt plures copulae coniunctiones, potes tuam propositionem distinguere secundum /50/ copulae assignationem, ut in ascensu, ubi saepiuscule coniunctionem copulativam repetis. <text:span text:style-name="T336">Potes ubilibet principalem copula stabilire, et totum quod copulam </text:span><text:span text:style-name="T337">assignatam praecesserit est copulativae altera pars principalis, quod vero sequitur posterior. Et si variae copulae ponantur ut</text:span><text:span text:style-name="T336"> “</text:span><text:span text:style-name="T337">Omnes homines sunt asini, vel hominis et asini sunt asini” hanc distingues in sensu copulativo, ipsa est vera cum utriu</text:span><text:span text:style-name="T338">s</text:span><text:span text:style-name="T337">que pars sit ver</text:span><text:span text:style-name="T338">a. I</text:span><text:span text:style-name="T337">n senso </text:span><text:span text:style-name="T338">vero disiunctivo est falsa, quia in illo sensu utraque pars principalis est falsa.</text:span></text:p>
      <text:h text:style-name="P703" text:outline-level="4">Arguitur primo</text:h>
      <text:p text:style-name="P116">Contra hoc arguitur:</text:p>
      <text:p text:style-name="P116"><text:soft-page-break/>Primo sic: “Haec propositio in sensu copulativo est vera, et haec propositio in sensu copulativo est haec propositio in sensu disiunctivo; ergo haec propositio in sensu disiunctivo est vera”.</text:p>
      <text:h text:style-name="P703" text:outline-level="4">Arguitur secundo</text:h>
      <text:p text:style-name="P117">Secundo arguitur sic: “Mentalis ultimata, cui subordinatur, habet coniunctionem copulativam et disiunctivam in mente; ergo est falsa”, et sic copula principalis subordinatur illi mentali.</text:p>
      <text:h text:style-name="P703" text:outline-level="4">Arguitur tertio</text:h>
      <text:p text:style-name="P117">Tertio arguitur: Haec copula<text:span text:style-name="T339">tiva est vera “Si homo est asinus, Homo est rudibilis Et Deus est”, quia utraque pars principalis est vera et una pars est falsa ut notum est.</text:span></text:p>
      <text:p text:style-name="P118">Forte dicis “Homo est asinus” non est una pars principalis illius copulativae.</text:p>
      <text:p text:style-name="P118">Contra: Est pars principalis illius conditionalis, et categorica est illius conditionalis pars principalis; ergo est pars principalis illius copulativae.</text:p>
      <text:h text:style-name="P703" text:outline-level="4">Ad primum</text:h>
      <text:p text:style-name="P119">Primum argumentum concludit hanc propositionem in sensu disiunctivo esse veram, sed ipsa non est vera in sensu disiunctivo. Sub rudi Minerva loquendo, veritas eius as sensu disiunctivo non provenit.</text:p>
      <text:h text:style-name="P703" text:outline-level="4">Ad secundum</text:h>
      <text:p text:style-name="P120">Ad secundum argumentum respondetur quod illa vocalis in sensu copulativo subordinatur uni mentali in qua ly ‘et’ est copula principalis, et alterius est rationis a nota ‘et’ quando est copula minus principalis. <text:span text:style-name="T340">Parva intellectus et obiecti varietas varietatem syncategorematicis facit, non autem sic in rebus naturalibus ad extra.</text:span></text:p>
      <text:h text:style-name="P703" text:outline-level="4">Ad tertium</text:h>
      <text:p text:style-name="P121">Ad tertium conceditur quod illa copulativa est vera, assumis unam partem minus principalem copulativae quae est principalis conditionalis, sed hoc non arguit quod erit pars principalis copulativae, immo oppositum consequentis sequitur.</text:p>
      <text:p text:style-name="P33">Copulativae negativae veritas aut falsitas per qualitatem affirmativae ei oppositae deprehenditur.</text:p>
      <text:p text:style-name="P122">Nullum oculum ad partes copulativae negativae flectas cum de eius veritate aut falsitate inquiritur, sed mox in copulativam affirmativam obtuitum convertas. Si ipsa sit vera, negativae qualitatem in promptu habes. Per qualitatem impraesentiarum veritatem et falsitatem intelligo.</text:p>
      <text:p text:style-name="P11">Si una pars copulativae sit impossibilis, tota est impossibilis, quia debiliorem partem copulativa insequitur.</text:p>
      <text:p text:style-name="P123"><office:annotation office:name="__Annotation__6199_2014347121" loext:resolved="false"><dc:creator>Unknown Author</dc:creator><dc:date>2026-03-18T20:21:35.337659782</dc:date><text:p text:style-name="Comment">In proposito impossibilis est pars debilissima, et necessitas fortissima, falsitas debilior quam verum continges, et verum contingens quae necessitas. Unde fit quod copulativa cuius una pars est contingens et altera necessaria, est contingens.</text:p></office:annotation>In proposito impossibilis est pars debilissima, et necessitas fortissima, falsitas debilior quam verum continges, et verum contingens quae necessitas. Unde fit quod copulativa cuius una pars est contingens et altera necessaria, est contingens.<office:annotation-end office:name="__Annotation__6199_2014347121"/></text:p>
      <text:p text:style-name="P11"><text:soft-page-break/>Ad copulativae possibilitatem utriusque partis principalis possibilitas requiritur, et quod partes ipsae inter se non repugnent. /51/</text:p>
      <text:p text:style-name="P124">Quare ista copulativa “Sortes currit et Sortes non currit” non est possibilis, cum partes inter se repugnant, sicut hic “Sortes est asinus et Sortes currit” impossibile cuilibet propositionis repugnat et per consequens sibi ipsi.</text:p>
      <text:h text:style-name="P703" text:outline-level="4">Arguitur primo</text:h>
      <text:p text:style-name="P125">Contra illud arguitur: Hae partes sunt possibiles et haec partes sunt haec copulativa; ergo haec copulativa est possibilis.</text:p>
      <text:h text:style-name="P703" text:outline-level="4">Arguitur secundo</text:h>
      <text:p text:style-name="P126">Secundo: “Sortes currit” est compossibilis huic “Plato disputat”, et “Sortes non currit” est compossibilis eidem; ergo illae sunt compossibiles inter se. <text:span text:style-name="T341">Tenet consequentia, si ‘a’ est aequale ‘b’ et aequale ‘c’, ‘b’ et ‘c’ sunt aequalia. Primo elementorum Euclidis.</text:span></text:p>
      <text:h text:style-name="P703" text:outline-level="4">Arguitur Tertio</text:h>
      <text:p text:style-name="P127">Tertio: “Omnis homo currit, <text:span text:style-name="T347">e</text:span>t Sortes est homo, <text:span text:style-name="T346">e</text:span>t Sortes non currit” est impossibilis cum ex antecedente et contradictorio consequentis confletur, sed non ex omnibus dictis cum nulla pars alteri repugnet.</text:p>
      <text:h text:style-name="P703" text:outline-level="4">Ad primum</text:h>
      <text:p text:style-name="P128">Ad primum respondetur: Minore falsa admissa, male concluditur. Inferendum est haec copulativa est partes possibiles.</text:p>
      <text:h text:style-name="P703" text:outline-level="4">Ad secundum</text:h>
      <text:p text:style-name="P129">Ad secundum respondetur: <text:span text:style-name="T342">C</text:span>onsequentia est nulla, mutatur relatio extrinseca, intrinsecam affirmative. Licet de aequalitate argumentum assumptum valeat.</text:p>
      <text:h text:style-name="P703" text:outline-level="4">Ad tertium</text:h>
      <text:p text:style-name="P130">Ad tertium: Concedo illa copulativam impossibilem, quaelibet categorica adversatur toti copulativae, licet nulla categorica illic alicui categoricae adversetur.</text:p>
      <text:p text:style-name="P11">Si una pars copulativae sit scita et altera dubia, tota est dubia.</text:p>
      <text:p text:style-name="P131">Hoc patet, partem debiliorem copulativa insequitur, pars scita est nobis notior et fortior, si tamen utraque pars sit scita tota est scita.</text:p>
      <text:p text:style-name="P11"><text:soft-page-break/>A tota copulativa a alteram eius partem principalem est bona consequentia et formalis. Econtrario autem argumentum minime valere censeas.</text:p>
      <text:h text:style-name="P703" text:outline-level="4">Arguitur primo</text:h>
      <text:p text:style-name="P132">Contra priorem partem regulae arguitur. Non sequitur:</text:p>
      <text:p text:style-name="P8">Pedale est album</text:p>
      <text:p text:style-name="P8"><text:span text:style-name="T345">e</text:span>t Tantum est nigrum</text:p>
      <text:p text:style-name="P8">ergo</text:p>
      <text:p text:style-name="P8">Tantum est nigrum.</text:p>
      <text:p text:style-name="P8"/>
      <text:p text:style-name="P132">Et tamen arguitur per regulam, igitur.</text:p>
      <text:h text:style-name="P703" text:outline-level="4">Arguitur secundo</text:h>
      <text:p text:style-name="P133">Secundo arguitur, bene sequitur:</text:p>
      <text:p text:style-name="P8">Sortes currit</text:p>
      <text:p text:style-name="P8">ergo</text:p>
      <text:p text:style-name="P8">Sortes currit</text:p>
      <text:p text:style-name="P8"><text:span text:style-name="T344">e</text:span>t homo currit</text:p>
      <text:p text:style-name="P8"/>
      <text:p text:style-name="P133">Et <text:s/>tamen arguitur a parte copulativae ad totam.</text:p>
      <text:h text:style-name="P703" text:outline-level="4">Ad primum</text:h>
      <text:p text:style-name="P134">Ad primum dicitur: Si ‘tantum’ capiatur exclusive in consequente et relative in antecedente, non est pars copulativae in illo sensu.</text:p>
      <text:h text:style-name="P703" text:outline-level="4">Ad secundum</text:h>
      <text:p text:style-name="P135">Ad secundum dicitur: Consequentia est bona gratia materiae, quando una pars est illativa utriusque. Sequitur etiam formaliter in terminis synonymis:</text:p>
      <text:p text:style-name="P8">Homo est homo</text:p>
      <text:p text:style-name="P8">ergo</text:p>
      <text:p text:style-name="P8">Homo est homo</text:p>
      <text:p text:style-name="P8"><text:span text:style-name="T343">e</text:span>t Homo est homo</text:p>
      <text:p text:style-name="P8"/>
      <text:p text:style-name="P135"><office:annotation office:name="__Annotation__6322_78113354" loext:resolved="false"><dc:creator>Unknown Author</dc:creator><dc:date>2026-03-19T20:13:21.868406972</dc:date><text:p text:style-name="Comment">Et sic utrobique quando consequens est formaliter necessarium aut antecedens formaliter impossibile.</text:p></office:annotation>Et sic utrobique quando consequens est formaliter necessarium aut antecedens formaliter impossibile.<office:annotation-end office:name="__Annotation__6322_78113354"/></text:p>
      <text:p text:style-name="P11">Ex regula priore sequitur quod a parte copulativae negativae ad totam copulativam negativam est formalis consequentia.</text:p>
      <text:p text:style-name="P136">Patet: Arguitur ex opposito consequentis ad oppositum antecedentis consequentiae praecedentis.</text:p>
      <text:p text:style-name="P32"><text:soft-page-break/>De disiunctiva</text:p>
      <text:p text:style-name="P11">Disiunctiva est hypothetica cuius nota principalis est ‘vel’ aut aequivalens. Ad cuius veritatem si affirmativa /52/ fuerit alteram partem esse veram sufficit.</text:p>
      <text:p text:style-name="P137">Quare si utraque eius pars sit falsa, ipsa est falsa. Et semper intelligitur dummodo disiunctiva habeat significationem dependentem praecise ex suis partibus et in sensu disiunctivo.</text:p>
      <text:p text:style-name="P11">Ad disiunctivae necessitatem sat est unam partem esse necessariam, aut ex partibus contradictoriis esse conflatam.</text:p>
      <text:p text:style-name="P138">Quare istae sunt necessariae “Deus est vel Homo est asinus”, “<text:span text:style-name="T348">Sortes currit vel Sortes non currit”. Semper sermo est de disiunctiva affirmativa, quare aliqua disiunctiva est necessaria cuius nulla pars eius est necessaria, et sic vigorem cuiuslibet partis disiunctiva transcendit.</text:span></text:p>
      <text:p text:style-name="P138"><text:span text:style-name="T349">Optime </text:span><text:span text:style-name="T350">sua necessitas per copulativam impossibilem adversam cognoscitur. Sic haec necessaria deprehenditur “Sortes non currit vel Homo movetur” hoc pacto: Haec disiunctiva ex tribus categoricis necessaria invenitur “Homo non currit” vel “Sortes non est Homo”, vel “Sortes currit”.</text:span></text:p>
      <text:h text:style-name="P703" text:outline-level="4">Arguitur primo</text:h>
      <text:p text:style-name="P139">Contra: Haec non est necessaria “Sortes currit vel Sortes non currit”. <text:span text:style-name="T351">Ponatur “Sortem currere”, arguitur sic: Veritas huius disiunctivae est contingens, et veritas huius disiunctivae est eius necessitas; ergo necessitas eius est contingens. Maior patet, veritas huius est veritas huius propositionis “Sortes currit”, quae est contingens, igitur.</text:span></text:p>
      <text:h text:style-name="P703" text:outline-level="4">Arguitur secundo</text:h>
      <text:p text:style-name="P140">Secundo arguitur sic: Quaelibet pars illius disiunctiva est falsificabilis; ergo tota disiunctiva est falsificabilis.</text:p>
      <text:h text:style-name="P703" text:outline-level="4">Arguitur tertio</text:h>
      <text:p text:style-name="P142">Tertio: Haec disiunctiva non est verior sua parte, scilicet “Sortes currit”, sed “Sortes currit” est contingens; ergo illa disiunctiva est contingens.</text:p>
      <text:h text:style-name="P703" text:outline-level="4">Ad primum</text:h>
      <text:p text:style-name="P141"><office:annotation office:name="__Annotation__6266_7164716" loext:resolved="false"><dc:creator>Unknown Author</dc:creator><dc:date>2026-03-22T23:18:06.737437523</dc:date><text:p text:style-name="Comment">Claude Opus 4.6<text:line-break/><text:line-break/>First intention (intentio prima): a concept that refers directly to things in the world — e.g., "man", "horse", "Socrates runs".</text:p><text:p text:style-name="Comment"/><text:p text:style-name="Comment"><text:line-break/>Second intention (intentio secundae): a concept that refers to other concepts or to logical/semantic properties — e.g., "genus", "species", "truth", "necessity", "contingency". It is a concept about concepts.</text:p><text:p text:style-name="Comment"/><text:p text:style-name="Comment">So secundae intentionaliter means "at the level of second intention" — i.e., when we are talking about the logical properties of a proposition (its truth, its necessity), not about the things in the world that the proposition is about.<text:line-break/><text:line-break/>In short: the author rejects the idea that the truth of a logically necessary proposition is contingent just because the proposition-token might not exist. At the second-intentional level — the level of logical analysis — the truth of φ∨¬φ is necessary and inseparable from the proposition itself.</text:p><text:p text:style-name="Comment"/><text:p text:style-name="Comment"/></office:annotation><text:span text:style-name="T352">Respondetur ad primum: Admisso casu, negetur maior, quod veritas huius disiunctivae sit contingens secundae intentionaliter. Veritas illius est eius necessitas et identificatur cum illa disiunctiva.</text:span><office:annotation-end office:name="__Annotation__6266_7164716"/></text:p>
      <text:h text:style-name="P703" text:outline-level="4"><text:span text:style-name="T352">Ad secund</text:span><text:span text:style-name="T353">um</text:span></text:h>
      <text:p text:style-name="P143">Ad secundum nego consequentiam, capiendo tota categorematice. Disiunctiva ex contradictoriis costae tesserae assimilatur semper super unam costam cadenti.</text:p>
      <text:h text:style-name="P703" text:outline-level="4"><text:soft-page-break/>Ad tertium</text:h>
      <text:p text:style-name="P144">Ad tertium concedo maiorem: Nulla propositio est verior alia, quia vera propositio non est verior falsa, nec verior alia vera, sed consequentia est nulla.</text:p>
      <text:p text:style-name="P32">Regulae disiunctivae</text:p>
      <text:p text:style-name="P11">Circa disiunctivam ponuntur aliquae regulae quarum prima est.</text:p>
      <text:p text:style-name="P11">A parte disiunctivae ad totam disiunctivam affirmativam est bona consequentia et formalis, et non contra.</text:p>
      <text:p text:style-name="P145"><office:annotation office:name="__Annotation__6540_7164716" loext:resolved="false"><dc:creator>Unknown Author</dc:creator><dc:date>2026-03-22T23:34:51.015021978</dc:date><text:p text:style-name="Comment">From this rule it follows that from a negative disjunctive [i.e., from the negation of a disjunction] to either of its parts [i.e., to the negation of one of the disjuncts] there is a valid consequence.</text:p><text:p text:style-name="Comment"/><text:p text:style-name="Comment">Proof: One argues from the opposite of the consequent to the opposite of the antecedent of a valid consequence.<text:line-break/><text:line-break/><text:line-break/>The corollary: From ¬(φ∨ψ) you may validly infer ¬φ (and likewise ¬ψ). This is one direction of De Morgan's law.</text:p><text:p text:style-name="Comment"/><text:p text:style-name="Comment">The proof method: Contraposition. Mair appeals to the rule just established — that from a part to the whole disjunction is a bona consequentia:(bona, from the previous rule)</text:p><text:p text:style-name="Comment">φ ⟶ φ ∨ ψ</text:p><text:p text:style-name="Comment"/><text:p text:style-name="Comment">Then he applies the principle that in a valid consequence, you may argue from the opposite of the consequent to the opposite of the antecedent (ex opposito consequentis ad oppositum antecedentis) — i.e., contraposition: ¬(φ ∨ψ)⟶ ¬φ</text:p><text:p text:style-name="Comment"/><text:p text:style-name="Comment">So the proof is: disjunction introduction is valid; contrapose it; you get that negating the disjunction entails negating the disjunct.</text:p></office:annotation>Ex hac regula sequitur quod a disiunctiva negativa ad alteram eius partem est bona consequentia. Probatio: Arguitur ex opposito consequentis ad oppositum antecedentis bonae consequentiae.<office:annotation-end office:name="__Annotation__6540_7164716"/></text:p>
      <text:h text:style-name="P703" text:outline-level="4">Arguitur</text:h>
      <text:p text:style-name="P146">Contra secundam partem regulae arguitur: Bene sequitur “Sortes currit; ergo Sortes currit vel Homo currit”, et tamen arguitur a parte disiunctivae affirmativae ad totam, igitur.</text:p>
      <text:h text:style-name="P703" text:outline-level="4">Respondetur</text:h>
      <text:p text:style-name="P147">Respondetur: Consequentia est bona <text:span text:style-name="T354">quando una pars utramque infert ut in exemplo dato, vel quando una pars est impossibilis inferendo aliam, vel una pars necessaria est illata. /53/</text:span></text:p>
      <text:p text:style-name="P32">Secunda regula</text:p>
      <text:p text:style-name="P11">A tota disiunctiva cum unius partis destructione ad alterius positionem est formalis consequentia.</text:p>
      <text:h text:style-name="P703" text:outline-level="4">Arguitur primo</text:h>
      <text:p text:style-name="P148">Contra. Non sequitur:</text:p>
      <text:p text:style-name="P8">Omnis propositio est categorica vel hypothetica</text:p>
      <text:p text:style-name="P8">sed Non Omnis propositio est categorica</text:p>
      <text:p text:style-name="P8">ergo</text:p>
      <text:p text:style-name="P8">Omnis propositio est hypothetica.</text:p>
      <text:p text:style-name="P8"/>
      <text:p text:style-name="P148">Et tamen arguitur per regulam, igitur.</text:p>
      <text:h text:style-name="P703" text:outline-level="4">Arguitur secundo</text:h>
      <text:p text:style-name="P148">Secundo arguitur. Non sequitur:</text:p>
      <text:p text:style-name="P8">Homo est asinus vel Manus mea est clausa</text:p>
      <text:p text:style-name="P8">sed Nulla manus mea est clausa</text:p>
      <text:p text:style-name="P8">ergo</text:p>
      <text:p text:style-name="P8">Homo est asinus.</text:p>
      <text:p text:style-name="P8"><text:soft-page-break/></text:p>
      <text:p text:style-name="P148">Et tamen arguitur per regulam, igitur.</text:p>
      <text:p text:style-name="P148">Maior patet: Tempore maioris claudendo manum, et tempore minoris eam aperiendo, antecedens est verum et consequens falsum.</text:p>
      <text:h text:style-name="P703" text:outline-level="4">Tertio arguitur</text:h>
      <text:p text:style-name="P149">Non sequitur:</text:p>
      <text:p text:style-name="P8">Sortes est asinus vel Sortes non est asinus</text:p>
      <text:p text:style-name="P8">sed Sortes non est asinus</text:p>
      <text:p text:style-name="P8">ergo</text:p>
      <text:p text:style-name="P8">Sortes est asinus.</text:p>
      <text:p text:style-name="P8"/>
      <text:p text:style-name="P149">Et tamen arguitur per regulam, igitur.</text:p>
      <text:h text:style-name="P703" text:outline-level="4">Arguitur quarto</text:h>
      <text:p text:style-name="P150">Quarto arguitur. Non sequitur:</text:p>
      <text:p text:style-name="P8">Sortes scit quod Plato disputat vel Plato non disputat</text:p>
      <text:p text:style-name="P8">et Plato disputat</text:p>
      <text:p text:style-name="P8">ergo</text:p>
      <text:p text:style-name="P8">Sortes scit quod Plato disputat.</text:p>
      <text:p text:style-name="P8"/>
      <text:p text:style-name="P151">Ponatur Sortes nescire unam partem disiunctivae et quod Plato disputet, iam antecedens est verum er consequens falsum, et tamen arguitur per regulam, igitur.</text:p>
      <text:h text:style-name="P703" text:outline-level="4">Ad primum</text:h>
      <text:p text:style-name="P152">Ad primum respondetur: Si ipsa sit categorica, consequentia nihil valet nec per regulam arguitur. Si sit disiunctiva consequentia est bona et sicut consequens est falsum, sic est antecedens.</text:p>
      <text:h text:style-name="P703" text:outline-level="4">Ad secundum </text:h>
      <text:p text:style-name="P153">Ad secundum negetur minor cum non importetur idem tempus, per utriusque copulam nullo modo contradicunt. Si idem tempus importat consequentia est bona, sed sicut consequens est falsum, sic est antecedens.</text:p>
      <text:p text:style-name="P154">At dicis tunc post prolationem vocalis meae non potes mihi contradicere.</text:p>
      <text:p text:style-name="P154">Respondetur non sequitur, referes enim tuae propositionis copulam ad tempus prolationis copulae meae propositionis.</text:p>
      <text:h text:style-name="P703" text:outline-level="4">Ad tertium</text:h>
      <text:p text:style-name="P154">Ad tertium dicitur male concluditur. Oportet infere “Sortes non est asinus” cum alia pars destruatur.</text:p>
      <text:h text:style-name="P703" text:outline-level="4"><text:soft-page-break/>Ad quartum</text:h>
      <text:p text:style-name="P155">Distinguo maiorem, vel quod illud verbum ‘scio’ cadat in totam disiunctionem, tunc maiorem concedo, sed minor tunc est falsa, est solum categorica de disiuncto extremo. Si in unam partem cadat et disiunctivam faciat, consequentia est bona, et sicut consequens est falsum ita et antecedens. Unde tales distinguendae veniunt “Sortes ignorat quod Deus est et Papa dormit”. Vel quod actus ignorandi cadat in illud totum et non in partes, et sic illa est vera, est una categorica cuius praedicatum est hoc totum, ignorans quod Papa dormit et Deus est, vel quod actus ignorandi cadat in utramque partem, vel in unam partem tamtum. Secundum hoc facile procedere potest.</text:p>
      <text:p text:style-name="P32">Tertia regula</text:p>
      <text:p text:style-name="P11">Copulativa affirmativa et disiunctiva affirmativa ex partibus contradicentibus conflatae contradicunt, licet utrique per negationis antelationem contradicunt.</text:p>
      <text:p text:style-name="P156">Ex isto consequens est quod copulativa negativa et disiunctiva affirmativa composita ex partibus contradicentibus illi copulativae aequivalent, numquam duae propositiones contradicunt uni quin inter se aequivaleant. /<text:span text:style-name="T355">54</text:span>/</text:p>
      <text:h text:style-name="P703" text:outline-level="4">Arguitur</text:h>
      <text:p text:style-name="P157">Arguitur probando quod non sit contradictio hic per negationis praepositionem, et hoc sic: Istae non contradicunt “⟨a⟩ Homo omnis homo est” et “Sortes est”, “Non ⟨a⟩ homo omnis homo est” et “Sortes est” patet. Sunt ambae verae de priore lucet. De alia patet, prior categorica aequipollet huic “Nullus homo omnis homo est” quae est vera.</text:p>
      <text:h text:style-name="P703" text:outline-level="4">Respondetur</text:h>
      <text:p text:style-name="P158">Respondetur concedendo quod contradicant, et nego eas esse ambas veras, et nego quod illa aequipolleat propositioni assignatae, sed huic: “Quaelibet homo ⟨b⟩ Homo non est”, quae est falsa. Quare illa aequipolleat in suppositione confusa tantum mox dicatur.</text:p>
      <text:p text:style-name="P158">Quaeritur an in copulativa et disiunctiva negativa, negatio neget solam copulam coniunctionalem.</text:p>
      <text:p text:style-name="P158">Respondetur:</text:p>
      <text:list text:style-name="L3">
        <text:list-item>
          <text:p text:style-name="P729">Primo dicitur. <text:span text:style-name="T357">Q</text:span>uod negatio in fronte hypotheticae facit hypotheticam negativam, si non ponatur obex ab alia negatione. Idem facit immediate ante copulam hypotheticalem.</text:p>
        </text:list-item>
        <text:list-item>
          <text:p text:style-name="P730">Secunda propositio. Negatio nominalis non cadit ultra categoricam cui applicatur. <text:span text:style-name="T358">H</text:span>aec autem est copulativa affirmativa: “Nullus homo est animal et Deus”.</text:p>
        </text:list-item>
        <text:list-item>
          <text:p text:style-name="P731">Tertia propositio. Negatio adverbialis inter partes categoricae positae non agit ultra illam. Haec autem est copulativa affirmativa: “Sortes non currit et Plato non disputat”. Sed an negatio adverbialis in hypotheticae fronte posita aget in cupulas categoricales est duplex positio et utraque probabilis, quarum alteram hic tenebimus, reliquam vero in logica. Positio est haec: Negatio adverbialis in fronte hypotheticae posita negat solam copulam coniunctionalem, cuius motiva in aliam positionem in logica applicabuntur.</text:p>
        </text:list-item>
      </text:list>
      <text:p text:style-name="P160"><text:soft-page-break/>Ex hac positione propositiones infero, quarum prima est:</text:p>
      <text:list text:style-name="L4">
        <text:list-item>
          <text:p text:style-name="P732">Unus terminus distribuibilis non existens determinatio acceptio unica acceptione in neutra contradictoriarum est distributus, patet hic “Non homo est animal et Deus est”, nullus terminus hic distribuitur.</text:p>
        </text:list-item>
        <text:list-item>
          <text:p text:style-name="P732">Secundo <text:span text:style-name="T362">s</text:span>equitur: <text:span text:style-name="T362">N</text:span>egatio non negat quidquid post se invenit, etiam in propositione quam negat.</text:p>
        </text:list-item>
        <text:list-item>
          <text:p text:style-name="P732">Tertio <text:span text:style-name="T362">s</text:span>equitur: <text:span text:style-name="T362">N</text:span>egatio in remotum et non in propinquum agit.</text:p>
        </text:list-item>
        <text:list-item>
          <text:p text:style-name="P732">Quarto <text:span text:style-name="T362">i</text:span>stae aequivalent “Non homo est animal et Deus est”, “Homo est animal non et Deus est”.</text:p>
        </text:list-item>
        <text:list-item>
          <text:p text:style-name="P733">Quinto <text:span text:style-name="T363">s</text:span>equitur: <text:span text:style-name="T363">N</text:span><text:span text:style-name="T360">on quidquid cadit in solam copulam efficitur pars copulae. Hoc aliunde non inconvenit, pate</text:span><text:span text:style-name="T361">t</text:span><text:span text:style-name="T360"> hic “Sortes animal non est”. Si quis haec corollaria rationi dissona reputet, aliam positionem imitetur.</text:span></text:p>
        </text:list-item>
        <text:list-item>
          <text:p text:style-name="P733"><text:span text:style-name="T360">Sexto </text:span><text:span text:style-name="T363">s</text:span><text:span text:style-name="T360">equitur </text:span><text:span text:style-name="T364">c</text:span><text:span text:style-name="T360">um dictis de negationibus: Non est verius contradicere quam negationem toti propositioni praeponere. Non habet verum de omni negatione, patet de negatione nominali.</text:span></text:p>
        </text:list-item>
      </text:list>
      <text:h text:style-name="P703" text:outline-level="4">De extremo copulato</text:h>
      <text:p text:style-name="P11">Veritas affirmativae de extremo copulato, dummodo coniunctio complexivae capiatur penes extremorum suppositionem (sicut in aliis categoricis) mensuranda venit.</text:p>
      <text:p text:style-name="P161">Quare haec est vera “Sortes est materia et forma”, “Sortes est Sortes et caput eius”. Patet, in utraque extrema pro eodem supponunt, sic in hac “Duo et tres angeli sunt quinque”.</text:p>
      <text:p text:style-name="P161">Capiatur haec regula: Ad hoc quod copulatum supponat pro aliquo, requiritur et sufficit quod eius quemlibet pars principalis pro illo supponit, vel quod una pars pro toto accipiatur, reliqua vero pro parte, vel una pro parte, reliqua vero pro toto residuo.</text:p>
      <text:p text:style-name="P161">Exempla: “Sortes est homo et risibile”, “Sortes est homo et sua anima”, /55/ “Exercitus est exercitus et princeps militiae”, “Hoc scutum est album et nigrum”, “Hoc pictum est album, nigrum, viride et rubeum”. Quare haec est concedenda “<text:span text:style-name="T365">Sortes est non homo et non homo”, ut non cadat praecise in unum terminum, qua materia et forma “Sortes est homo et non homo”.</text:span></text:p>
      <text:p text:style-name="P578">Quo fit <text:span text:style-name="T366">quod a propositione categorica de copulato extremo ad copulativam et econverso non oportet argumentum valere “Sortes caecus et Plato videns non sunt videntes”, “Sortes et Plato pugnant in duello contra se et pro se, et contra illos pro quibus pugnant”, sed non sequitur quod Sortes pugnat contra se.</text:span></text:p>
      <text:p text:style-name="P579">Scutus cuius una medietas est alba, reliqua vero nigra, est album et nigrum et per consequens hoc scutum est hoc carens albedine, demonstrando partem nigram, et hoc carens nigredine, demonstrando partem albam.</text:p>
      <text:p text:style-name="P586"><text:soft-page-break/>Si autem et divisive capiatur, requiritur quod alterum extremum utrique parti copulati conveniat.</text:p>
      <text:p text:style-name="P587">Si ‘et’ capiatur divisive, oportet alterum extremum utrique parti copulative convenire si sit vera, ideo sua veritas aut falsitas per copulativam ad quam reducitur mensuranda venit, et per consequens sui contradictorii veritas aut falsitas per disiunctivam illi copulativae oppositam.</text:p>
      <text:p text:style-name="P587">Ideo <text:span text:style-name="T367">haec est vera “Sortes et Brunellus est animal”, cum Sortes est animal et Brunellus est animal aequivaleat in consequendo copulativae. Ideo haec habet duos sensus non synonymos, sed aequivalentes. Non autem potest et capi complexive cum copula est singularis numeri.</text:span></text:p>
      <text:p text:style-name="P588">“Non Sortes vel Brunellus est animal” aequivalet huic “Sortes non est animal vel Brunellus non est animal”. Haec autem est vera “Non Sortes et Chimaera est animal”, patet per sui contradictorii falsitatem. “Omnis homo et asinus, Non est asinus” sic reducitur “Omnis homo non est asinus et <text:span text:style-name="T6">a</text:span> <text:s/>asinus non est asinus”. “Sortes bis cantavit missam”, “Sortes semel cantavit missam” et illo tempore interrupto aliam cecinit.</text:p>
      <text:h text:style-name="Heading_20_4" text:outline-level="4">Arguitur</text:h>
      <text:p text:style-name="P589">Contra istud arguitur: Bene sequitur “Sortes et Brunellus est animal; ergo Animal est Sortes et Brunellus”. Consequens est falsum et consequentia patet per conversionem.</text:p>
      <text:h text:style-name="Heading_20_4" text:outline-level="4">Respondetur</text:h>
      <text:p text:style-name="P590">Respondetur: Non est conversio cum a confusa determinatam respectu multitudinis arguatur. Oportet convertere “ergo Animal est Sortes vel Brunellus”, et licet subiectum adaequatum conversae non sit praedicatum convertentis, nihil impedimenti est ob specialem causam ne a confusa ad determinatam arguatur, sicut haec “Sortes est omnis homo” convertitur in hanc “Ens quod est omnis homo est Sortes” ob specialem causam, ne ‘omnis’ maneat pars subiecti convertentis. Nec haec “Animal est Sortes et Brunellus” est immediate ad copulativam reducibilis, quia illa esset vera, sed oportet primo probabilis “Hoc animal vel illud animal Sortes et Brunellus est” et unam illarum reducere. <text:span text:style-name="T368">Eodem modo dicatur de hac “Sortes et Brunellus est ⟨b⟩ animal” quae est falsa.</text:span></text:p>
      <text:h text:style-name="Heading_20_4" text:outline-level="4">Categoricae de disiuncto</text:h>
      <text:p text:style-name="Subtitle">Superest de propositionibus categoricis disiunctis loqui <text:s/></text:p>
      <text:p text:style-name="P586">Propositio de disiuncto vel complexive sumpto per extremorum /56/ suppositionem more propositionem de extremis i<text:span text:style-name="T369">n</text:span>complexis cognoscitur.</text:p>
      <text:p text:style-name="P591">Liber vult dicere: Propositio in qua ponitur ‘vel’ primo est distinguenda penes sensum hypotheticum disiunctivum, secundo in sensu categorico. Dicit <text:span text:style-name="T370">est distinguenda penes hoc quod ‘vel’ capitur complexive vel divisive, sicut in copulativa et in propositione de copulato extremo superius locuti sumus.</text:span></text:p>
      <text:p text:style-name="P586"><text:soft-page-break/>Tunc ‘vel’ tenetur complexive quando totum disiunctum unica acceptione accipitur, vel quando non cuilibet parti, sed toti aliquid dicitur convenire vel non convenire.</text:p>
      <text:p text:style-name="P600">Ex isto patet quod quando totum unica confusione singularizatione aut particularizatione sumitur complexive ‘vel’ capitur, ut subiecta istarum “Omnis homo vel asinus est asinus”, “<text:span text:style-name="T9">a</text:span><text:span text:style-name="T557"> </text:span>homo vel asinus non est asinus”, “Iste homo vel asinus est asinus”, “Homo vel asinus est asinus”.</text:p>
      <text:p text:style-name="P600">Vel cum signo particulari eodem modo a parte praedicati ut “Omnis propositio est categorica vel hypothetica”, “Tantum propositio est categorica vel hypothetica” tunc ascendens et descendens sub disiunctis. Primo ac si essent termini simplices et non sub partibus nec ‘vel’ est terminus primo probabilis.</text:p>
      <text:p text:style-name="P600">Caeterum suppositionem disiuncti, penes parte disiuncti signis seclusis, cognosces.</text:p>
      <text:p text:style-name="P601">Ex his patet hanc esse falsam “Omnis homo vel asinus est asinus”, nam subiectum complete distribuitur et pro pluribus supponit qua praedicatu; ergo ipsa est falsa. Sicut haec “Omne animal est homo”.</text:p>
      <text:p text:style-name="P601">Similiter haec negativa est falsa “Omnis homo vel asinus non est asinus”, sicut “Omne animal non est homo”.</text:p>
      <text:p text:style-name="P592"><text:span text:style-name="T374">Istae “Homo vel asinus est asinus”, Sortes demonstrato, est falsa.</text:span><text:span text:style-name="T373"> </text:span><text:span text:style-name="T374">Subiectum enim pro solo Sorte demonstrato accipitur, cui praedicatum minime convenit.</text:span></text:p>
      <text:p text:style-name="P593"><text:span text:style-name="T374">Nec ad partem oculum habeas ullum, cum totum unica singularizatione singularizatur, sicut subiectum huius “Homo animal est homo”, Brunello demonstrato; ergo prorsus </text:span><text:span text:style-name="T375">nulla est difficultas quando singularizatur.</text:span></text:p>
      <text:p text:style-name="P596">Patet hanc esse veram “Omnis homo vel Chimaera est homo”, cuilibet supposito, subiecti distributi, convenit praedicatum stans confuse tantum, igitur.</text:p>
      <text:p text:style-name="P596">Etiam quando totum stat determinate prorsus nulla est difficultas ut “Homo vel asinus est asinus”, etiam dato quod praedicatum distribuatur.</text:p>
      <text:p text:style-name="P596">Etiam quando totum unica distributione distribuitur non est difficultas ex parte illius proveniens.</text:p>
      <text:p text:style-name="P586"><text:span text:style-name="T376">Propositio de disiuncto affirmativa, seclusa distributione, singularizatione, ampliatione et rationis appellatione, in suppositione personali disiunctivae aequivalet.</text:span> </text:p>
      <text:p text:style-name="P602">Sermo est de ‘vel’ complexe capto. “Sortes vel Chimaera non est Sortes” in sensu disiuncto est falsa. “Omne animal est homo vel brutum” in sensu disiuncto est vera. An cum signo collectiva instari posset alias videbitur.</text:p>
      <text:p text:style-name="P594"><text:span text:style-name="T373">“</text:span><text:span text:style-name="T377">Iste homo vel asinus est homo” singularizando subiectum pro Brunello est falsa.</text:span></text:p>
      <text:p text:style-name="P595"><text:soft-page-break/><text:span text:style-name="T377">Etiam haec est vera “Sortes iuvenis disputat, disputabit vel disputavit in Sorbona” in sensu disiuncto, posito quod nunc sit senex nec disputet nunc in Sorbona, nec unquam in ea disputavit, sed posthac in ea disputabit. Eius veritas patet per eius resolventes, et falsitas disiunctivae est liquida, et caetera.</text:span></text:p>
      <text:p text:style-name="P603">/57/</text:p>
      <text:p text:style-name="P597">Stat etiam cognoscere Sortem absque hoc quod cognoscatur Sortes vel Plato, quo facto, disiunctiva erit vera.</text:p>
      <text:p text:style-name="P597">Ultimum patet de hac “Sortes vel Plato est unum disiunctum” est vera in sensu disiuncto extra has instantias. Patet regula, si haec concedatur “‘a’ est ‘b’ vel ‘c’” in sensu disiuncto, et non in sensu disiunctivo, aut contra, impune tenebo quod “Sortes est Plato vel Cicero” in sensu disiuncto, non autem in sensu disiunctivo.</text:p>
      <text:p text:style-name="P586">Propositio negativa de disiuncto opposita proportionabiliter ad regulam copulativae affirmativae aequivalet.</text:p>
      <text:p text:style-name="P604">Patet haec regula: <office:annotation office:name="__Annotation__6520_661965629" loext:resolved="false"><dc:creator>Unknown Author</dc:creator><dc:date>2026-03-29T01:36:13.104189649</dc:date><text:p text:style-name="Comment">De Morgan: Si una contradictoriarum disiunctivae aequivaleat altera copulativae aequalebit; ergo haec “Non Sortes vel Plato currit” aequivalet huic “Sortes non currit et Plato non currit”.</text:p></office:annotation>Si una contradictoriarum disiunctivae aequivaleat altera copulativae aequalebit; ergo haec “Non Sortes vel Plato currit” aequivalet huic “Sortes non currit et Plato non currit”<office:annotation-end office:name="__Annotation__6520_661965629"/>, “Non homo vel asinus est asinus” “Nullus homo est asinus et Nullus asinus est asinus”.</text:p>
      <text:p text:style-name="P604">Dicitur <text:span text:style-name="T378">proportionabiliter ad regulam, hoc est, quando contradicit propositioni de disiunctivo, quae disiunctivae aequivalet. Si habes quod propositio negativa de disiunctivo distributo unica distributione copulativam negativam infert. Sic copulativa affirmativa propositionem de disiuncto infert, sed non contra, nisi posita constantia.</text:span></text:p>
      <text:p text:style-name="P605">Prima pars patet, bene enim sequitur:</text:p>
      <text:p text:style-name="P598">Quilibet asinus currit et Quilibet homo currit</text:p>
      <text:p text:style-name="P598">ergo</text:p>
      <text:p text:style-name="P598">Quilibet homo vel asinus currit”.</text:p>
      <text:p text:style-name="P598"/>
      <text:p text:style-name="P606">Secunda pars patet, quoniam non sequitur:</text:p>
      <text:p text:style-name="P598">Quilibet homo vel Chimaera currit</text:p>
      <text:p text:style-name="P598">ergo</text:p>
      <text:p text:style-name="P598">Quaelibet Chimaera currit.</text:p>
      <text:p text:style-name="P598"/>
      <text:p text:style-name="P606">Constantia tamen posita, consequentia est bona.</text:p>
      <text:p text:style-name="P586">Quando disiunctum diversis acceptionibus accipitur, totum ad partem est superius.</text:p>
      <text:p text:style-name="P606">In talibus probationem a partibus et non a toto capies. Ratio totum non accipitur unica acceptione, ut in his “Omnis homo vel omnis asinus currit” sequitur bene:</text:p>
      <text:p text:style-name="P598">Omnis homo currit</text:p>
      <text:p text:style-name="P598">ergo</text:p>
      <text:p text:style-name="P598">Omnis homo vel Omnis asinus currit.</text:p>
      <text:p text:style-name="P598"><text:soft-page-break/></text:p>
      <text:p text:style-name="P606">A parte disiuncti affirmativae ad totum non distributum nec singularizatum.</text:p>
      <text:p text:style-name="P606">Negat<text:span text:style-name="T379">ive arguendo opus est constantia. Non sequitur:</text:span></text:p>
      <text:p text:style-name="P598">Antichristus non currit</text:p>
      <text:p text:style-name="P598">ergo</text:p>
      <text:p text:style-name="P598">Antichristus vel Sortes non currit.</text:p>
      <text:p text:style-name="P598"/>
      <text:p text:style-name="P607">Sed posita constantia bene sequitur.</text:p>
      <text:p text:style-name="P608">Pars disiuncti est inferior ad totum, modo ab inferior ad superius negative, opus est constantia. Unde haec est distinguenda “Omnis homo vel asinus est asinus”. In sensu hypothetico sic est vera, in sensu categorico si totum disiunctum distribuitur ipsa est falsa, si prior pars solum, ipsa est vera sicut haec ex qua sequitur:</text:p>
      <text:p text:style-name="P598">Asinus est asinus</text:p>
      <text:p text:style-name="P598">ergo</text:p>
      <text:p text:style-name="P598">Omnis homo vel asinus est asinus.</text:p>
      <text:p text:style-name="P598"/>
      <text:p text:style-name="P608">Eodem modo haec est vera “Omnis homo vel omnis asinus est asinus”. Si omnis solum distribuat primam partem et per consequens istae non aequivalent “O<text:span text:style-name="T380">mnis homo vel asinus est asinus” et “Omnis homo vel Omnis asinus est asinus”, ut omnis in priore distribuat totum disiunctum.</text:span></text:p>
      <text:p text:style-name="P609">In primis, subiectum prioris accipitur unica acceptione, posterioris vero diversis acceptionibus. Subiectum prioris etiam distribuitur, posterioris vero subiectum non distribuitur, sed diversis acceptionibus accipitur.</text:p>
      <text:p text:style-name="P586">Cum, tam in affirmativis quam in negativis, disiunctum diversis acceptionibus habes, disiunctive aequivalens copulativam, suum contradictorium imitabitur.</text:p>
      <text:p text:style-name="P610">/<text:span text:style-name="T381">58</text:span>/</text:p>
      <text:p text:style-name="P611">Quia si una categorica disiunctivae simpliciter, vel ex casu et secundum quid aequivaleat vel in suo contradictorio negabitur, et contradictorium copulativae aequivalebit. <text:span text:style-name="T382">Quando totale disiunctum non habet unicam </text:span><text:span text:style-name="T383">acceptionem, vel reputatur particularitas, et si in neutra contradictoriarum negaretur in utraque esse quaedam particularitas. Quare istae non contradicunt “Omnis homo vel Omnis asinus non est asinus” et “Homo vel asinus est asinus”.</text:span></text:p>
      <text:p text:style-name="P612">Si enim totum disiunctum distribueretur unica distributione ‘vel’ potest poni in suo contradictorio, “Homo vel asinus non est asinus” contradicit huic “Omnis homo vel asinus est asinus” ut totum disiunctum distribuitur.</text:p>
      <text:p text:style-name="P612">Similiter “Homo vel asinus est asinus” contradicit huic “Omnis homo vel asinus non est asinus”, distribuendo totum disiunctum.</text:p>
      <text:p text:style-name="P612"><text:soft-page-break/>Potes etiam dicere, quando disiunctum diversis acceptionibus capitur, ‘vel’ non capitur complexive sed disiunctive solum, et per disiunctivam mensuranda venit, et ex consequente, sua contradictoria per copulativam. Et si utraque pars disiuncti distribuatur, ut “Omnis homo vel omnis asinus currit”, adhuc subiectum diversis acceptionibus accipitur, quia duabus distributionibus diversis, nec est danda una totius plusquam hic “Cuilibet hominis quilibet asinus currit”.</text:p>
      <text:p text:style-name="P586">Sed propositionis de disiuncto, veritas in qua vel divisive accipitur per disiunctivam ad quam reducitur, mensuranda venit.</text:p>
      <text:p text:style-name="P613">Sed <text:s/>propositio de disiuncto in qua vel divisive capitur, non semper immediate ad disiunctivam reduci habet, ut patet de hac “Omnis propositio est categorica vel hypothetica”. Prius tamen oportet descendere sub subiecto, quia ratione distributionis prima probatio ab ipso staret. Sic hic “Sortes et Plato est Sortes vel Plato” cum copulatum in fronte ponatur, ab eius partibus reductio inchoanda est dicendo “Sortes est Sortes vel Plato”, “Plato est Sortes vel Plato”, quod est verum capiendo et divisive.</text:p>
      <text:p text:style-name="P586"><office:annotation office:name="__Annotation__6971_269029230" loext:resolved="false"><dc:creator>Unknown Author</dc:creator><dc:date>2026-03-29T14:19:32.157024741</dc:date><text:p text:style-name="Comment">Claude Opus 4.6</text:p><text:p text:style-name="Comment">“Proportionabiliter” — "by the same proportion, mutatis mutandis": swap copulativa ↔ disiunctiva when you move from copula copulata to copula disiuncta.</text:p><text:p text:style-name="Comment"/><text:p text:style-name="Comment">In modern terms this is distribution of quantifier-like operators over compound copulas, plus De Morgan duality for negation:</text:p><text:p text:style-name="Comment"/><text:p text:style-name="Comment">¬(P ∧ Q) ≡ ¬P ∨ ¬Q (negated copulata → disiunctiva)</text:p><text:p text:style-name="Comment">¬(P ∨ Q) ≡ ¬P ∧ ¬Q (negated disiuncta → copulativa)</text:p></office:annotation>Verum propositionum de copula copulata si et affirmetur per copulativam (et si coniunctio negetur per disiunctivam) ad quam reducitur metieris, proportionabiliter propositionem de copula disiuncta reducas.<office:annotation-end office:name="__Annotation__6971_269029230"/></text:p>
      <text:p text:style-name="P614">Veritas istius “Sortes est et fuit currens” cognoscitur per eius copulativae, ad quam reducitur veritatem, “Sortes est currens et Sortes fuit currens”. Et haec “Non Sortes est et fuit currens” aequivalet huic “Sortes non est currens vel Sortes non fuit currens”.</text:p>
      <text:p text:style-name="P614"><office:annotation office:name="__Annotation__6843_269029230" loext:resolved="false"><dc:creator>Unknown Author</dc:creator><dc:date>2026-03-29T14:13:42.086244636</dc:date><text:p text:style-name="Comment">Claude Opus 4.6:</text:p><text:p text:style-name="Comment">This is De Morgan duality: ¬(P ∨ Q) ≡ (¬P ∧ ¬Q). The utrobique tells you both sides of the duality are covered; the econverso swaps copulativa ↔ disiunctiva. The two quoted propositions after "econverso" are the illustrative pair for the converse direction (the comma between them standing for aequivalet).</text:p></office:annotation>Identidem “Sortes est vel fuit albus” huic aequivalet “Sortes est albus vel Sortes fuit albus”. Utrobique, si una contradictoriarum copulativae aequivalet, reliqua disiunctivae aequivalebit, et econverso, “Non Sortes est vel fuit albus”, “Sortes non est albus et Sortes non fuit albus”.<office:annotation-end office:name="__Annotation__6843_269029230"/></text:p>
      <text:p text:style-name="P615">At si <text:span text:style-name="T384">subiectum talis de disiuncto distribuatur, prius distributio tollatur, postea ad disiunctivam reducatur. Ista enim est falsa in sensu disiuncto “Omnis homo est vel fuit vel erit currens”, posito casu quod quilibet homo iam existens currat, et illi qui non /59/ cucurrerunt unquam sunt mortui. </text:span><text:span text:style-name="T385">Subiectum enim verificatur de homine qui numquam currebat cui praedicatum minime competit.</text:span></text:p>
      <text:p text:style-name="P616">Etiam cum minore vera et illa universali <text:s/>sequitur falsum in Darii; ergo ista maior est falsa, et tamen haec disiunctiva est vera “Omnis homo est currens vel Omnis homo fuit currens vel erit currens”. Oportet dare primo singulares sub termino distributo, et disiunctiva ad quam reducitur non est vera. Patet demonstrando mortuos qui non cucurrerunt. Vel si subiectum fuerit connotativum, oportet ultimate in resolvendo capere terminum absolutum.</text:p>
      <text:p text:style-name="P616">Haec propositio “Hoc album fuit vel erit nigrum” in sensu disiunctivo est vera, dato quod Sortes fuisset albus et numquam niger, sed nunc primum niger et in posterum niger, quia hoc fuit vel erit nigrum, et hoc est vel fuit vel erit album, igitur.</text:p>
      <text:p text:style-name="P616"><text:soft-page-break/>Sed si terminus connotativus in disiunctiva ad quam reducitur caperetur, illa disiunctiva esset falsa. Haec enim est falsa “Hoc album fuit nigrum”, “Hoc album erit nigrum”, quia affirmativa de subiecto non supponente, ex casu, et hace est falsa “Hoc album est nigrum”.</text:p>
      <text:h text:style-name="Heading_20_4" text:outline-level="4">Locales et temporales</text:h>
      <text:p text:style-name="P586">Demum quoniam locales et temporales categoricas reor circa hypotheticarum species, vela complico.</text:p>
      <text:p text:style-name="P617">“Adamus non fuit <text:span text:style-name="T386">ubi Abrahamus fuit in vita” si esset hypothetica haberet pro prima categorica hanc “Adam non fuit in aliquo loco” quae est falsa; ergo et tota illa copulativa, quae tamen vera reputatur. Similiter haec “David non fuit quando Moyses fuit”, </text:span><text:span text:style-name="T387">habebit pro priore categorica hanc “David non fuit”, quae est falsa, </text:span><text:span text:style-name="T388">a</text:span><text:span text:style-name="T387">ltera tamen concedi solet. Ponendo autem eas categoricas </text:span><text:span text:style-name="T388">optime earum veritates salvantur, quia sunt duae negativae quarum extrema non supponunt pro eodem; ergo sunt verae.</text:span></text:p>
      <text:p text:style-name="P618"><text:span text:style-name="T388">Similiter istae sunt categoricae “Sortes non est talis qualis est Plato”, “</text:span><text:span text:style-name="T389">Golia</text:span><text:span text:style-name="T390">s</text:span><text:span text:style-name="T389"> non est tantus quantus Og rex Basan” et caetera.</text:span></text:p>
      <text:p text:style-name="Subtitle">Finitur Tractatus Secundus Libelli Primi.</text:p>
      <text:p text:style-name="P605"/>
      <text:p text:style-name="P604"><text:s/></text:p>
      <text:p text:style-name="P159"><text:s/></text:p>
      <text:p text:style-name="P158"/>
      <text:p text:style-name="P156"/>
      <text:h text:style-name="P697" text:outline-level="1">Secundus: De Suppositionibus et Parvis Logicalibus</text:h>
      <text:p text:style-name="Title"><text:span text:style-name="T400">Sequitur </text:span><text:span text:style-name="T185">L</text:span><text:span text:style-name="T400">ibri </text:span><text:span text:style-name="T185">S</text:span><text:span text:style-name="T400">ecundi </text:span><text:span text:style-name="T185">T</text:span><text:span text:style-name="T400">ractatus </text:span><text:span text:style-name="T185">P</text:span><text:span text:style-name="T400">rimus. </text:span><text:span text:style-name="T185">Q</text:span><text:span text:style-name="T30">ui est </text:span><text:span text:style-name="T446">d</text:span><text:span text:style-name="T30">e </text:span><text:span text:style-name="T446">s</text:span><text:span text:style-name="T30">uppositionibus</text:span></text:p>
      <text:h text:style-name="P700" text:outline-level="2"><text:span text:style-name="T552">Sequitur </text:span><text:span text:style-name="T318">De </text:span><text:span text:style-name="T446">S</text:span><text:span text:style-name="T318">uppositionibus</text:span></text:h>
      <text:h text:style-name="P702" text:outline-level="3">Quid sit suppositio</text:h>
      <text:p text:style-name="P11"><office:annotation office:name="__Annotation__372_443505723" loext:resolved="false"><dc:creator>Unknown Author</dc:creator><dc:date>2025-04-16T22:55:04.821355218</dc:date><text:p text:style-name="P754"><text:span text:style-name="T561">Suppositio logicaliter sumpta, est terminus in propositione existens, in potentia propinqua, verificabilis de pronomine, suum significatum demonstrante, mediante copula illius propositionis aut una alia, in qua terminus similiter accipitur. Si obicem reflexio non praestiterit.</text:span></text:p></office:annotation>Suppositio, logicaliter sumpta, est terminus in propositione existens, in potentia propinqua verificabilis, de pronomine suum significatum demonstrante, mediante copula illius propositionis, aut una alia, in qua terminus similiter accipitur. Si obicem reflexio non praestiterit.<office:annotation-end office:name="__Annotation__372_443505723"/></text:p>
      <text:p text:style-name="P162">Sequitur ex textu quod haec <office:annotation office:name="__Annotation__7652_2558119581" loext:resolved="false"><dc:creator>Unknown Author</dc:creator><dc:date>2026-04-09T20:23:57.506142210</dc:date><text:p text:style-name="Comment">Non conceditur: "Terminus Suppositione supponit", cum suppositio sit terminus supponens.</text:p></office:annotation>non conceditur: "Terminus suppositione supponit", sicut “Sortes est albus albedine”, cum suppositio sit terminus supponens.<office:annotation-end office:name="__Annotation__7652_2558119581"/></text:p>
      <text:p text:style-name="P163"><office:annotation office:name="__Annotation__7492_2558119581" loext:resolved="false"><dc:creator>Unknown Author</dc:creator><dc:date>2026-04-09T20:15:39.949081863</dc:date><text:p text:style-name="Comment">Pro propositionum veritatibus indagandis, suppositiones ponuntur, modo solae propositiones sunt verae aut falsae.</text:p></office:annotation>Dicitur “in propositione existens”, quia pro propositionum veritatibus indagandis, /60/ suppositiones ponuntur, modo solae propositiones sunt verae aut falsae.<office:annotation-end office:name="__Annotation__7492_2558119581"/></text:p>
      <text:p text:style-name="P163">Item a copula quae solum est in propositione, suppositio ortum habet, quare <office:annotation office:name="__Annotation__7572_2558119581" loext:resolved="false"><dc:creator>Unknown Author</dc:creator><dc:date>2026-04-09T20:23:21.105895482</dc:date><text:p text:style-name="Comment">Termini solum in propositione supponunt.</text:p></office:annotation>termini solum in propositione supponunt.<office:annotation-end office:name="__Annotation__7572_2558119581"/></text:p>
      <text:p text:style-name="P164"><office:annotation office:name="__Annotation__26913_1527901336" loext:resolved="false"><dc:creator>Unknown Author</dc:creator><dc:date>2026-04-11T00:18:29.887784180</dc:date><text:p text:style-name="Comment">If the Antichrist were generated again, it would be in potentia remota.</text:p></office:annotation>Dicitur “in potentia propinqua”, hoc est, nulla mutatione in re facta, quare subiectum huius “Antichristus est homo” non supponit. Si tamen Antichristus produceretur, supponeret, sed tunc aliquod produceretur de novo, et non esset in potentia propinqua.<office:annotation-end office:name="__Annotation__26913_1527901336"/></text:p>
      <text:p text:style-name="P165">“De pronomine et caetera”: Quando dubitas an aliquis terminus supponat, accipe significatum eius et demonstra per pronomen sic quod terminus de quo dubitatur an supponit, praedicetur. Et si propositio affirmativa sit vera, extra exponibilia, terminus supponit. Si non, non supponit.</text:p>
      <text:p text:style-name="P166">Exemplis <text:span text:style-name="T442">d</text:span>eclaro: <text:span text:style-name="T442">D</text:span>emonstrato Sorte, haec est vera “Hoc est homo”; ergo subiectum huius “Homo est asinus”, supponit. <text:span text:style-name="T444">E</text:span>t quia demonstrato Brunello, hae<text:span text:style-name="T443">c</text:span> est vera “Hoc est asinus”, etiam praedicatum supponit. Et licet haec sit vera, non tantum “Chimaera non est Chimaera”, neutrum extremum supponit; nec ‘Chimaera’ in hac affirmativa “Chimaera est vel Non est”, quia in verificatione oportet negationem tollere.</text:p>
      <text:p text:style-name="P166">Et fac verificationem conformiter ad propositionem aliam de cuius termino suppositio quaeritur. Patet exemplariter: “Homo est pictus”, “Lupus est in fabula”, “‘<text:span text:style-name="T447">h</text:span>omo’ est dictio disyllaba”. “Philosophus dicit hoc” in suppositione antonomatica, “Quaevis animal currit, Homo non currit”, “Quilibet homo currit”, “Asinus hominis currit”, “Exercitur est homines”, “Michael et his angelus (Michaelem demonstrando) sunt”.</text:p>
      <text:p text:style-name="P167"><text:soft-page-break/>Seriatim sic verifica<text:span text:style-name="T31">beris: “Hoc est homo pictus”, “Hoc est reserator secreti”, “Hoc est ly ‘homo’”, “Hoc est philosophus philosophorum”, “Hoc est animal”.</text:span></text:p>
      <text:p text:style-name="P169">Quando est complexum propositionale, videlicet in expletiva aut in conditionali, muta verbum in verbum indicativi modi “Hoc est aliquis homo”, “Hoc est asinus ab homine possessus”. Similiter “Hoc est homo habens asinum”.</text:p>
      <text:p text:style-name="P170">Quo ad subiectum penultimae “Hic exercitus est exercitus”, vel “Haec entia sunt exercitus”, “Haec sunt homines”.</text:p>
      <text:p text:style-name="P170">Quo ad ultimam, quae est propositio falsa, idem pluraliter demonstrabis.</text:p>
      <text:p text:style-name="P168"><text:span text:style-name="T31">Dicebatur “mediante copula propositionis”: </text:span><text:span text:style-name="T448">L</text:span><text:span text:style-name="T31">i</text:span><text:span text:style-name="T32">cet enim haec sit vera “Hoc fuit Adam”, hoc non probat subiectum huius supponere “Adam est”. Et dicitur, vel simili, subiectum huius “Adam est mortuus” pro Adam supponit ratione ampli termini, et sic verificabis “</text:span><text:span text:style-name="T448">H</text:span><text:span text:style-name="T32">oc fuit Adam”, quia quo ad suppositionem est copularum similitudo in utraque.</text:span></text:p>
      <text:p text:style-name="P171">Et si fuerit copula copulata vel disiuncta, illam sine negatione capies, quaere ‘album’ in ista “Sortes est et fuit album” supponit solum pro illo quod est et fuit album.</text:p>
      <text:p text:style-name="P171">Similiter ly ‘non-album’ in ista “Sortes et et fuit non album”, supponit solum pro illo quod est et fuit <text:s/>non-album.</text:p>
      <text:p text:style-name="P171">Similiter subiectum huius “Creans necessario est Deus” supponit, et sic erit verificatio: “<text:span text:style-name="T449">H</text:span>oc possibiliter est creans”; et etiam a parte praedicati, et sic cum contingenter. Sed de hoc in Secundo Perihermeneias, in modalibus, profusior sermo habendus est. In aliis autem appellationem servabis.</text:p>
      <text:p text:style-name="P171">Obliquorum rectos in verificatione capias; et si rectis careant, eorum synonyma accipe vel rectos finge. De praedicato huius “Homo est albus” dices “Hoc est album” vel “Ens album”.</text:p>
      <text:h text:style-name="P703" text:outline-level="4">Arguitur <text:span text:style-name="T35">Primo</text:span></text:h>
      <text:p text:style-name="P173">Contra definitionem sic expositam arguitur: Terminus supponit extra hanc propositionem “Sortes currit”, et terminus supponit extra hanc propositionem /61/ “Plato disputat”, et s<text:span text:style-name="T306">i</text:span>c de singulis; ergo terminus supponit extra propositionem.</text:p>
      <text:h text:style-name="P703" text:outline-level="4">Secundo</text:h>
      <text:p text:style-name="P172"><text:span text:style-name="T33">Secundo: Terminus supponit extra hanc propositionem; ergo terminus </text:span><text:span text:style-name="T34">supponit extra propositionem ab inferiori ad superius.</text:span></text:p>
      <text:h text:style-name="P703" text:outline-level="4">Tertio</text:h>
      <text:p text:style-name="P174">Tertio: Subiectum illius prioris partis expletivae supponit “Quaevis animal currit, Nullus homo moventur”, et tamen non ponitur in propositione; igitur terminus supponit extra propositionem.</text:p>
      <text:h text:style-name="P703" text:outline-level="4">Quarto</text:h>
      <text:p text:style-name="P172"><text:s/><text:span text:style-name="T35">Quarto: Iste terminus potest supponere, et iste terminus est vel potest esse extra propositionem, igitur.</text:span></text:p>
      <text:h text:style-name="P703" text:outline-level="4"><text:soft-page-break/>Ad <text:span text:style-name="T36">p</text:span>rimum</text:h>
      <text:p text:style-name="P175">Ad primum: Nego consequentiam. Oportet primo ascendere sub termino stante determinate, modo tales singulares omnes erunt falsae.</text:p>
      <text:p text:style-name="P175">Sed contra hoc arguitur: Iste terminus possibiliter supponit extra hanc propositionem “Sortes currit”, et iste terminus possibiliter supponit extra hanc propositionem “Deus est”, et sic de singulis, igitur.</text:p>
      <text:p text:style-name="P175">Idem terminus numero in multis propositionibus scriptis poni potest.</text:p>
      <text:p text:style-name="P175">Finaliter dicitur: <text:span text:style-name="T457">I</text:span>lle terminus ‘propositionem’, cum est determinatio accepta unica, distribuitur immobiliter.</text:p>
      <text:h text:style-name="P703" text:outline-level="4">Ad secundum</text:h>
      <text:p text:style-name="P176">Ad secundum: Nego consequentia. Arguitur enim <text:span text:style-name="T36">a non distributo ad distributum.</text:span></text:p>
      <text:h text:style-name="P703" text:outline-level="4">Ad tertium</text:h>
      <text:p text:style-name="P176"><text:span text:style-name="T36">Ad tertium dicitur: </text:span><text:span text:style-name="T37">Difficile est vincere volentem dicere quod ille terminus ‘animal’ inibi non supponit, vel istic “</text:span><text:span text:style-name="T460">S</text:span><text:span text:style-name="T37">i </text:span><text:span text:style-name="T460">a</text:span><text:span text:style-name="T37">nimal currit, </text:span><text:span text:style-name="T460">a</text:span><text:span text:style-name="T37">nimal movetur”.</text:span> <text:s/><text:span text:style-name="T37">Concedo tamen quod supponit, cum est in propositione conditionali, licet prior pars illius expletivae, aut conditionalis, propositio non fuerit.</text:span></text:p>
      <text:h text:style-name="P703" text:outline-level="4">Ad quartum</text:h>
      <text:p text:style-name="P177">Ad quartum: Dicitur quod <text:span text:style-name="T39">n</text:span>on probatur quod “<text:span text:style-name="T461">I</text:span>ste terminus potest supponere extra propositionem”, licet terminus ‘extra propositionem’ potest supponere. Et sic hic ‘<text:span text:style-name="T40">i</text:span>ste terminus’ extra propositionem erit supponens, et ‘<text:span text:style-name="T40">i</text:span>ste terminus’ non erit supponens extra propositionem.</text:p>
      <text:h text:style-name="P703" text:outline-level="4">Arguitur quinto</text:h>
      <text:p text:style-name="P178">Quinto: <text:span text:style-name="T38">Subiectum huius supponit “Non-demonstratum est lapis”, posito quod nullus lapis demonstr</text:span><text:span text:style-name="T41">e</text:span><text:span text:style-name="T38">tur, </text:span><text:span text:style-name="T41">cum est affirmativa vera, et tamen subiectum non est verificabile de pronomine suum significatum demonstrante. Ista enim est falsa “Hoc est non-demonstratum” (lapidem demonstrando) immo est demonstratus.</text:span></text:p>
      <text:h text:style-name="P703" text:outline-level="4">Sexto</text:h>
      <text:p text:style-name="P180">Sexto arguitur: Ponendo quod ‘homo’ semper a parte subieci significet hominem, et a parte praedicati asinum, tunc non potest fieri talis verificatio, igitur.</text:p>
      <text:h text:style-name="P703" text:outline-level="4">Septimo</text:h>
      <text:p text:style-name="P179"><text:span text:style-name="T42">Septimo arguitur: Praedicatum huius propositionis “Hoc est hoc praedicatum quod non supponit”, </text:span><text:span text:style-name="T43">demonstrando praedic</text:span><text:span text:style-name="T469">a</text:span><text:span text:style-name="T43">tum illius propositionis, est verificabile de pronomine suum significatum significante, et tamen non est de illo verificabile, cum ad talis verificationem sequitur illud praedicatum non supponit, igitur.</text:span></text:p>
      <text:h text:style-name="P703" text:outline-level="4"><text:soft-page-break/>Ad quintum</text:h>
      <text:p text:style-name="P181">Ad quintum: Concedo maiorem. Sufficit haec verificatio in tali nexu “Lapis est non-demonstratus”. Quaerimus enim verificationem pronominis ad facilius intelligendam termini suppositionem. Sed quando medium quaestionis terminandae est intricatius quaest<text:span text:style-name="T463">i</text:span>o, pronomen non admittamus.</text:p>
      <text:p text:style-name="P181">Secundo dicitur: Illic est obex reflexionis.</text:p>
      <text:p text:style-name="P181">Tertio dicitur: Licet illa singularis in qua aliquod demonstratur non sit vera, ita tamen fuit in re antequa<text:span text:style-name="T464">m</text:span> pronomen aliquod demonstrabat, dato quod illa singularis sit falsa.</text:p>
      <text:h text:style-name="P703" text:outline-level="4">Ad sextum</text:h>
      <text:p text:style-name="P182">Ad sextum dicitur: <text:span text:style-name="T44">Regula intelligitur quod non est defectus ex parte termini, dummodo manet talis significatio a parte praedicati in illa cum pronomine demonstrativo qualis erat in illa.</text:span></text:p>
      <text:p text:style-name="P183">Secundo: Erit verificatio per suum synonymum mentale invariabile.</text:p>
      <text:h text:style-name="P703" text:outline-level="4">Ad septimum</text:h>
      <text:p text:style-name="P183">Pro ultimo argumento pono tres propositiones, quarum prima est:</text:p>
      <text:list text:style-name="L5">
        <text:list-item>
          <text:p text:style-name="P734">Dabilis est aliquis terminus verificabilis de pronomine suum significatum significante, qui non supponit pro illo. Hoc argumentum probat.</text:p>
        </text:list-item>
        <text:list-item>
          <text:p text:style-name="P734">Secunda propositio <text:span text:style-name="T470">ec</text:span>onverso: <text:span text:style-name="T470">D</text:span>abilis est aliquis terminus qui supponit pro <text:span text:style-name="T471">a</text:span>liquo et tamen non est verificabilis de illo. Patet de praedicato huius “Hoc est hoc praedicatum”, quod non est <text:s/>verificabile, /62/ <text:span text:style-name="T45">demonstrando per pronomen ipsummet praedicatum. Illud praedicatum habet non verificare annexum.</text:span></text:p>
        </text:list-item>
        <text:list-item>
          <text:p text:style-name="P735">Tertia <text:span text:style-name="T46">propositio: Extra hos nexus, quilibet terminus supponens pro aliquo verificatur de pronomine suum significatum significantem, et contra. Patet, non contigit instantia, igitur.</text:span></text:p>
        </text:list-item>
      </text:list>
      <text:h text:style-name="P703" text:outline-level="4">Dubium primum</text:h>
      <text:p text:style-name="P184">Circa hanc definitionem dubitatur <text:span text:style-name="T474">q</text:span>uomodo fiet verificatio hic “<text:span text:style-name="T47">Nos praecipimus ita fieri, Francisco Rege, hoc praecipiente”.</text:span></text:p>
      <text:h text:style-name="P703" text:outline-level="4">Secundum</text:h>
      <text:p text:style-name="P185">Secundo: <text:span text:style-name="T475">D</text:span>ubitatur <text:span text:style-name="T475">q</text:span>uotuplex est demonstratio.</text:p>
      <text:h text:style-name="P703" text:outline-level="4">Tertium</text:h>
      <text:p text:style-name="P186">Tertio: <text:span text:style-name="T48">D</text:span>ubitatur quomodo se habent isti termini ‘supponere’, ‘accipi’ et ‘significare’.</text:p>
      <text:h text:style-name="P703" text:outline-level="4">Quart<text:span text:style-name="T48">um</text:span></text:h>
      <text:p text:style-name="P187">Quarto: Dubitatur utrum terminus supponere potest pro quolibet suo significato.</text:p>
      <text:h text:style-name="P703" text:outline-level="4">Quintum</text:h>
      <text:p text:style-name="P187">Quinto: Dubitatur <text:span text:style-name="T49">de veritate huius “Terminus non supponens est supponens”.</text:span></text:p>
      <text:h text:style-name="P703" text:outline-level="4"><text:soft-page-break/>Sextum</text:h>
      <text:p text:style-name="P188">Sexto: Dubitatur pro quo significato terminus connotativus supponit.</text:p>
      <text:h text:style-name="P703" text:outline-level="4">Ad primum</text:h>
      <text:p text:style-name="P189">Ad primum respondetur: In <text:span text:style-name="T50">prima persona, licet ex usu grammaticorum et oratorum uti plurali, non autem in alia persona. </text:span><text:span text:style-name="T472">S</text:span><text:span text:style-name="T50">ic fiet verificatio “Hi sunt isti”, Franciscum et consules demonstrando. Modestiae gratia talia dicuntur ad insinuandum quod Franciscus et sui hoc statuunt. Quando inepte dico “Uni dedi vobis librum”, fiet verificatio “</text:span><text:span text:style-name="T473">H</text:span><text:span text:style-name="T50">oc es”, vel est “tu plurale abusive” pro singulari, illic est in usu.</text:span></text:p>
      <text:h text:style-name="P703" text:outline-level="4">Ad secundum</text:h>
      <text:p text:style-name="P190">Ad secundum respondetur: <office:annotation office:name="__Annotation__611_2263120211" loext:resolved="false"><dc:creator>Unknown Author</dc:creator><dc:date>2025-04-19T00:01:01.722128042</dc:date><text:p><text:span text:style-name="T561">Clause Opus 4.6:</text:span><text:span text:style-name="T561"><text:line-break/></text:span><text:span text:style-name="T561">The distinction matters because without *demonstratio ad intellectum*, the pronoun test</text:span></text:p><text:p><text:span text:style-name="T561">would be limited to currently perceivable objects, and supposition under past or future</text:span></text:p><text:p><text:span text:style-name="T561">ampliation would lack a verification mechanism.</text:span></text:p></office:annotation><text:span text:style-name="T51">Duplex est demonstratio. Nam quaedam est ad sensum qua demonstratur res sensibilis sensui praesens. Alia vero est demonstratio qua demonstratur res quae non est sensui praesens, et ista vocatur demonstratio ad intellectum.</text:span><office:annotation-end office:name="__Annotation__611_2263120211"/></text:p>
      <text:h text:style-name="P703" text:outline-level="4">Ad tertium</text:h>
      <text:p text:style-name="P192">Ad tertium dicitur: Omnis suppositio est termini acceptio, et omnis acceptio est significatio et non contra. Subiectum istius “Antichristus est homo” accipitur pro Antichristo pro quo non supponit. <text:span text:style-name="T479">E</text:span>t terminus extra propositionem significat sed non accipitur pro suo significato, cum non uniatur mediante copula verbali pro suo significato.</text:p>
      <text:h text:style-name="P703" text:outline-level="4">Ad quartum</text:h>
      <text:p text:style-name="P191"><text:span text:style-name="T52">Ad quartum dicitur: Quod sic. </text:span><text:span text:style-name="T480">P</text:span><text:span text:style-name="T52">atet de subiecto </text:span><text:span text:style-name="T53">istius “Sortes currit”, habet praecise unum significatum pro quo accipitur. Similiter patet de extremis huius “Homo imaginarie est asinus”.</text:span></text:p>
      <text:p text:style-name="P193">Aliqui vero termini pro paucis suis significatis supponunt. Patet de subiecto huius “Homo est animal”, pro multo pluribus suis significatis non supponit qua<text:span text:style-name="T481">m</text:span> supponit.</text:p>
      <text:p text:style-name="P193">Amplius patet hic “Homo Sortes currit”, cuius subiectum pro solo Sorte supponit, cum subiectum quo ad suppositionem restringatur, non autem quo ad significationem.</text:p>
      <text:h text:style-name="P703" text:outline-level="4">Argumentatur</text:h>
      <text:p text:style-name="P18"><text:span text:style-name="T53">Contra hoc arguitur: Bene sequitur “</text:span><text:span text:style-name="T482">H</text:span><text:span text:style-name="T53">ic terminus restringitur a suppositione, vel quo ad suppositionem; ergo quo ad significationem”. </text:span><text:span text:style-name="T54">Consequens est falsum; ergo et antecedens. Consequentia tamen patet ab inferiori ad superius.</text:span></text:p>
      <text:h text:style-name="P703" text:outline-level="4">Responsio</text:h>
      <text:p text:style-name="P194">Respondetur: Non arguitur ab inferiori ad superius respectu totalis extremi.</text:p>
      <text:h text:style-name="P703" text:outline-level="4">Ad quintum</text:h>
      <text:p text:style-name="P583">Ad quintum dicitur: Si supponat materialiter ipsa est vera. Item haec est vera “Terminus non supponens est copula huius propositionis (demonstrando hanc) ‘Homo est animal’”. Haec tamen est falsa “Extremum supponens est extremum non supponens”, significative captis terminis.</text:p>
      <text:h text:style-name="P703" text:outline-level="4"><text:soft-page-break/>Ad sextum</text:h>
      <text:p text:style-name="P195">Ad sextum dicitur: Quando significatio termini connotativi quo ad formale realiter a materiali distinguitur, tunc terminus pro solo materiali supponit, ut ‘album’ in hac “Album currit”. Quando illae duae significationes coincidunt etiam suppositio pro utraque coincidit.</text:p>
      <text:h text:style-name="P702" text:outline-level="3"><text:span text:style-name="T56">Regulae de propositionum veritatibus penes suppositionem</text:span><text:span text:style-name="T55"> </text:span><text:span text:style-name="T53"><text:s/></text:span><text:span text:style-name="T50"><text:s/></text:span></text:h>
      <text:p text:style-name="P34">Regulae de propositionum veritatibus penes suppositionem.</text:p>
      <text:p text:style-name="P196"><text:s/>/<text:span text:style-name="T57">63</text:span>/</text:p>
      <text:p text:style-name="P11">Pro suppositionum veritatibus penes suppositionem cognoscendis, ponuntur tres regulae, quas semper mente tenebis.</text:p>
      <text:h text:style-name="P703" text:outline-level="4">Prima regula</text:h>
      <text:p text:style-name="P11">Quarum prima est: Omnis affirmativa cuius extrema non supponunt pro eodem est falsa.</text:p>
      <text:h text:style-name="P703" text:outline-level="4">Secunda regula</text:h>
      <text:p text:style-name="P11">Secunda regula: Omnis pura negativa cuius extrema non supponunt pro eodem est vera.</text:p>
      <text:p text:style-name="P197">“Non tantum homo non est asinus” est vera. Ista et similes exponibiles sunt affirmativae praegnantes.</text:p>
      <text:p text:style-name="P197">Negativam in secunda exponente formaliter inferunt, quare haec est falsa “Homo est asinus”.</text:p>
      <text:p text:style-name="P197">Ex ista regula sequitur quod omnis pura affirmativa cuius unum extremum non supponit est falsa, quare haec “Antichristus est homo” est falsa.</text:p>
      <text:p text:style-name="P197">Ex secunda autem regula sequuntur haec omnes verae:</text:p>
      <text:list text:style-name="L6">
        <text:list-item>
          <text:p text:style-name="P719">“Sortes non cessat comedere ferrum”.</text:p>
        </text:list-item>
        <text:list-item>
          <text:p text:style-name="P719">“Chimaera, quae necessario est, non necessario est”.</text:p>
        </text:list-item>
        <text:list-item>
          <text:p text:style-name="P719">“Nihil et Chimaera sunt fratres”.</text:p>
        </text:list-item>
        <text:list-item>
          <text:p text:style-name="P719">“Nihil et Chimaera sunt fratres ex parte patris, et ex parte matris, et ex parte utriusque”, neganter capiendo.</text:p>
        </text:list-item>
        <text:list-item>
          <text:p text:style-name="P719">“<text:span text:style-name="T58">Aristoteles, qui disputavit Parisii, numquam disputavit Athenis”.</text:span></text:p>
        </text:list-item>
        <text:list-item>
          <text:p text:style-name="P719">“<text:span text:style-name="T58">Antichristus, qui currit, non movetur”.</text:span></text:p>
        </text:list-item>
        <text:list-item>
          <text:p text:style-name="P719">“<text:span text:style-name="T58">Antichristus, qui non currit, non movetur”.</text:span></text:p>
        </text:list-item>
      </text:list>
      <text:p text:style-name="P40"/>
      <text:h text:style-name="P703" text:outline-level="4"><text:soft-page-break/>Tertia regula</text:h>
      <text:p text:style-name="P11">Tertia regula: Omnis purae affirmativa non insolubilis, non modalis, sine distributione, cuius extrema supponunt pro eodem supposito immediato, est vera.</text:p>
      <text:p text:style-name="P198">“Omnis affirmativa” Istae limitationis propter has et similes ponuntur:</text:p>
      <text:list text:style-name="L7">
        <text:list-item>
          <text:p text:style-name="P720">“Omnis homo omnis homo est”.</text:p>
        </text:list-item>
        <text:list-item>
          <text:p text:style-name="P720">“Homo omnis homo est”.</text:p>
        </text:list-item>
        <text:list-item>
          <text:p text:style-name="P720">“Deus necessario est creans”.</text:p>
        </text:list-item>
        <text:list-item>
          <text:p text:style-name="P720">“Pater in divinis est filius”, et tamen extrema pro eadem essentia divina supponunt.</text:p>
        </text:list-item>
      </text:list>
      <text:p text:style-name="P40"/>
      <text:p text:style-name="P199">De insolubilibus in suo loco videbitur. </text:p>
      <text:p text:style-name="P199">Quare istae sunt omnes concedendae:</text:p>
      <text:list text:style-name="L8">
        <text:list-item>
          <text:p text:style-name="P721">“Aliquid et nemo mordent se in sacco, <text:span text:style-name="T484">S</text:span><text:span text:style-name="T483">i </text:span><text:span text:style-name="T485">d</text:span>uo porcelli in sacco sese mordeant”.</text:p>
        </text:list-item>
        <text:list-item>
          <text:p text:style-name="P721">“Ego dico quod ego sum rex”, praedicatum scilicet “<text:span text:style-name="T487">E</text:span>go sum dicens quod ego sum rex” supponit pro me et etiam subiectum.</text:p>
        </text:list-item>
        <text:list-item>
          <text:p text:style-name="P722">“Ego dico quod promitto tibi mille scuta”, <text:span text:style-name="T483">et </text:span><text:span text:style-name="T488">n</text:span>ullum scutum tibi promitto.</text:p>
        </text:list-item>
      </text:list>
      <text:p text:style-name="P40"/>
      <text:h text:style-name="P702" text:outline-level="3">Suppositionem impropriae</text:h>
      <text:p text:style-name="P11">Item suppositionum, quaedam impropri<text:span text:style-name="T105">a</text:span>e et illa trifariam scinditur. Nam quaedam est antonomatica quando terminus accipitur pro suo significato excellentiori, ut “Philosophus dicit hoc” cum pro solo Aristotele accipitur.</text:p>
      <text:p text:style-name="P11">Quaedam <text:span text:style-name="T59">est synecdochica, quando continens pro contento, aut totum pro parte, aut contra, accipitur.</text:span></text:p>
      <text:p text:style-name="P11">Suppositio metaphorica est quando terminus pro suo significato similitudinario accipitur, ut “Iohannes fuit Helias”.</text:p>
      <text:p text:style-name="P200">Unde fit quod non in omni suppositione impropria terminos supponit pro illo quod improprie significat, ut patet in suppositione antonomatica. /64/</text:p>
      <text:p text:style-name="P200">In suppositione tamen synecdochica et metaphorica terminus supponit pro illo quod improprie significat, ut “Sanctus Petrus est in caelo”. Illic ‘Petrus’ pro anima quae olim fuit Petri accipitur.</text:p>
      <text:p text:style-name="P200">Etiam in suppositione antonomatica, cum terminus non supponit pro quolibet suo significato quod significat, dicitur impropria.</text:p>
      <text:h text:style-name="P702" text:outline-level="3"><text:soft-page-break/>De suppositionis divisione</text:h>
      <text:p text:style-name="P35">De suppositionis divisione.</text:p>
      <text:p text:style-name="P36">In duo genera suppositio dividitur. Quae sunt suppositio materialis et personalis.</text:p>
      <text:p text:style-name="P201">Ponere suppositionem simplicem in nominalium schola est solum verba multiplicare, <text:span text:style-name="T493">i</text:span>psa enim est materialis. <text:span text:style-name="T493">P</text:span>ropterea duo membra quo ad genera suppositionum sufficiunt. Et signanter de simplicibus loquendo, aggregatum huius “Iste terminus ‘homo’ est dictio disyllaba” partim personaliter, partim vero materialiter, supponit.</text:p>
      <text:h text:style-name="P703" text:outline-level="4">Suppositio materialis</text:h>
      <text:p text:style-name="P30">Suppositio materialis est terminus praecise pro se et sibi similibus supponens.</text:p>
      <text:h text:style-name="P708" text:outline-level="4">Personalis</text:h>
      <text:p text:style-name="P30"><text:span text:style-name="T60">Omnis alia suppositio est personalis, et </text:span><text:span text:style-name="T494">o</text:span><text:span text:style-name="T60">pposito modo definiatur: </text:span><text:span text:style-name="T494">V</text:span><text:span text:style-name="T60">el est suppositio termini non significativi vel super quem signum materialitatis cadit.</text:span></text:p>
      <text:p text:style-name="P202">Duae definitiones in litera ponuntur et ambae faciles, ut lector faciliorem pro arbitrio sibi deligat. <text:span text:style-name="T497">A</text:span>lii autem difficilius per significatum ultimatum et non-ultimatum, in reductione ad eorum conceptus, definiunt.</text:p>
      <text:p text:style-name="P202">Subiectum huius “‘<text:span text:style-name="T495">M</text:span>agistrorum’ est genitivi casus”, materialiter supponit, quia pro illo termino ‘magistrorum’ et similibus accipitur. Subiectum ver huius “<text:span text:style-name="T495">E</text:span>ns est aliquid”, supponit personaliter, quia non accipitur praecise pro se et sibi similibus.</text:p>
      <text:p text:style-name="P202">Secundam definitionem declaro, quae fortasse est facilior cognitu. Quis vero terminus est significativus alias nosti; ergo omnis talis supponens vel syncategorema accipitur materialiter.</text:p>
      <text:p text:style-name="P202">Signa materialitatis sunt haec vocabula: ‘ly’, verbum vocationem significans, aut terminus secundae intentionis. Exemplis istud manifestum fuerit “<text:span text:style-name="T496">L</text:span>y ‘<text:span text:style-name="T496">h</text:span>omo’ currit”, “Ego vocor Iohannes”, “Est mihi nomen Iohanni”, “Terminus ‘homo’ currit”, “‘Homo’ est nomen”.</text:p>
      <text:p text:style-name="P203">Unum pro primo exemplo ponitur, quattuor pro duobus aliis. In duobus secundis exemplis ‘Iohannes’ et ‘Iohanni’ stant materialiter pro talibus vocabulis, licet secundum apud oratores venustius reputetur.</text:p>
      <text:p text:style-name="P203">Quando ponitur signum ‘ly’, vel terminus secundae intentionis, termino primae immediate haeret, nulla est difficultas. Sed quando terminus secundae intentionis a termino primae elongatur, potest esse difficultas.</text:p>
      <text:h text:style-name="P716" text:outline-level="5"><text:soft-page-break/>Regula declarativa</text:h>
      <text:p text:style-name="P204">Pro qua abigenda haec regula ponitur: Subiectum primae intentionis respectu praedicati secundae intentionis, extra relativa (nisi ab illa suppositione trahatur) stat materialiter, ut subiectum huius “‘Homo’ est nomen”. In relativis non tenent. <text:span text:style-name="T500">Patet de relativo in secunda categorica huius copulativae “Animal currit, et Illud est trisyllabum”, sed illic ‘illud’ refert terminum /65/ grati</text:span><text:span text:style-name="T498">a</text:span><text:span text:style-name="T500"> sui. Etiam subiectum hic stat significative “Aliud a vero est verum”, licet principalior pars subiecti, scilicet rectus, sit primae intentionis.</text:span></text:p>
      <text:p text:style-name="P205">Dicitur “nisi aliunde restringatur”, quare subiecta istarum stant personaliter “Ego sum pronomen”, “Omnis homo est dictio disyllaba” (capiendo ‘omnis’ significative). Terminus stans materialiter est neutri generis, vel loco talis generis positus; ergo ‘omnis’ et ‘sum’ non possunt ei, quod est tertiae personae, competere. <text:span text:style-name="T61">At si hoc totum ‘Omnis homo’ caperetur materialiter, nihil impedimenti est.</text:span></text:p>
      <text:p text:style-name="P207">Si terminus fuerit secundae intentionis respectu solius connotati, regula non habet verum. Patet de subiecto huius “Homo est significatus per terminum ‘homo’”. Et terminum secundae intentionis ad illud quod soli termino competit laxabis, ut patet de subiectis harum “‘<text:span text:style-name="T499">Homo’</text:span> est vox”, “‘<text:span text:style-name="T499">H</text:span>omo’ est scriptura”; nec curamus fodere an ‘homo’ potest esse scriptura.</text:p>
      <text:p text:style-name="P206">Capimus enim illa quae communiter contingunt; <text:span text:style-name="T501">q</text:span>uare haec est distinguenda, <text:span text:style-name="T502">s</text:span>i volueris “<text:span text:style-name="T502">O</text:span>mne animal est terminus complexus”. Si ‘omne’ capiatur significative, ‘animal’ supponit personaliter et propositio est falsa. Si ‘animal’ materialiter, adhuc propositio est falsa, sed pro alio stat. Si totum capiatur materialiter pro illo complexo, propositio illa est vera.</text:p>
      <text:p text:style-name="P206">Si hanc distinguere potes “Omnis homo est totum in quantitate”, <text:span text:style-name="T504">f</text:span>acilius, et ex consequenti forte melius, est respicere ad totali<text:span text:style-name="T503">a</text:span> subiecta, et dicere quod partes non supponunt plusquam partes huius “Magister currit”.</text:p>
      <text:h text:style-name="P718" text:outline-level="6">Arguitur</text:h>
      <text:p text:style-name="P208">Contra ista arguitur: Ex dictis sequitur quod haec erit falsa “‘Magistrorum’ est genitivi casus”, cum reddat suppositum verbo personali modi finiti, est nominativi casus; et tunc extrema non supponunt pro eodem.</text:p>
      <text:h text:style-name="P718" text:outline-level="6">Respondetur</text:h>
      <text:p text:style-name="P209">Respondetur negando sequelam: Si supponat materialiter pro se alibi sumpto personaliter, ut in hac “Libri magistrorum sunt in bibliothecis”, concedam etiam hanc “‘Magistrorum’ est nominativi casus” si pro se capiatur.</text:p>
      <text:p text:style-name="P209">Etiam, propositio dicti suum simile ex usu reputatur, et sic concedimus “Deum-esse est verum”. Si enim capiatur pro se sic, illa est falsa et hoc sophisma verum “‘Omne verum’ et Deum-esse differunt”, et sic haec habet sensum verum “Deum-esse est “Deus est””, cum extrema pro eodem accipiantur.</text:p>
      <text:p text:style-name="P211">“‘Sequana’ est terminus singularis”, subiectum supponit communiter pro omnibus talibus terminis ‘Sequana’. Sed est terminus singularis in hac “Parisii praeter fluit Sequana”. Sed <text:span text:style-name="T505">o</text:span>mnem-hominem-esse-animal non supponit pro hac “Omne animal est homo”; nec ‘Marcus’ materialiter pro illo termino ‘Tullius’; nec ‘amor’ ex usu pro termino ‘Roma’, quae ex eisdem litteris praepostere conflatur.</text:p>
      <text:p text:style-name="P212"><text:soft-page-break/>Ex his patet quod subiectum huius “Ens est aliquid” supponit personaliter; et sic terminus pro significato non-ultimato supponens supponit personaliter.</text:p>
      <text:p text:style-name="P212">Idem patet de subiecto huius “Vox est aliquid”. Quare supponere pro significato ultimato et non-ultimato est impertinens ad hanc suppositionem vel illam.</text:p>
      <text:h text:style-name="P718" text:outline-level="6">Arguitur</text:h>
      <text:p text:style-name="P210"><text:span text:style-name="T62">Se</text:span><text:span text:style-name="T511">d</text:span><text:span text:style-name="T62"> contra hanc regulam finaliter arguitur: </text:span><text:span text:style-name="T508">s</text:span><text:span text:style-name="T63">equitur quod subiectum in mente huius “‘Homo’ est dictio disyllaba” aut “‘Homo’ est nomen” supponit materialiter, cum est subiectum primae respectu praedicati secundae.</text:span></text:p>
      <text:h text:style-name="P718" text:outline-level="6">Responsio</text:h>
      <text:p text:style-name="P19"><text:span text:style-name="T63">Respondeo: </text:span><text:span text:style-name="T509">p</text:span><text:span text:style-name="T64">ossum hoc negare et regulam positam restringere ultra terminum mentalem, qui proprie suam vocem significat, quam vox naturaliter communiter et improprie significat; et uno illorum terminorum /66/ supponit materialiter, alter vero personaliter, semper pro eodem; et hoc communius dicere consuevimus, non tamen est opus ita dicere.</text:span></text:p>
      <text:p text:style-name="P213">Nego ergo sequelam: <text:span text:style-name="T510">d</text:span>ico quod supponit materialiter in mente pro illo termino ‘homo’. Hoc patet per utramque definitionem suppositionis materialis. <text:span text:style-name="T506">E</text:span>tiam conceptus ultimatus, ut conceptus ‘Sortis’ ad extra, materialiter accipi potes<text:span text:style-name="T507">t,</text:span> si pro se accipiatur; et quid opus est regulam verborum multitudine restringere, quam in propria forma tenere potest.</text:p>
      <text:h text:style-name="P703" text:outline-level="4">Modi quinque suppo<text:span text:style-name="T512">sitionis</text:span> materialis</text:h>
      <text:p text:style-name="P214">Summatim ergo. Quinque modis terminus materialiter supponit:</text:p>
      <text:list text:style-name="L9">
        <text:list-item>
          <text:p text:style-name="P723"><text:span text:style-name="T65">Primo modo: </text:span><text:span text:style-name="T66">Terminus nihil significans.</text:span></text:p>
        </text:list-item>
        <text:list-item>
          <text:p text:style-name="P723">Secundo modo: Quando ei immediate terminus secundae intentionis additur.</text:p>
        </text:list-item>
        <text:list-item>
          <text:p text:style-name="P723">Tertio modo: Subiectum primae intentionis, respectu praedicati secundae.</text:p>
        </text:list-item>
        <text:list-item>
          <text:p text:style-name="P723">Quarto: Quando additur nota materialitatis, scilicet ‘ly’.</text:p>
        </text:list-item>
        <text:list-item>
          <text:p text:style-name="P723">Quinto modo: Per nomen appellandi, ut “Vos vocatis me magister et domine”; <text:span text:style-name="T513">l</text:span>icet dici potest hic effectualiter ponitur terminus secundae hoc termino vel hoc nomine ‘magister’.</text:p>
        </text:list-item>
      </text:list>
      <text:p text:style-name="P20"/>
      <text:p text:style-name="P20"><text:span text:style-name="T66">Quoniam suppositionem materialem ex his cognoscere potes, et quilibet terminus supponens, et non hoc </text:span><text:span text:style-name="T67">genere, personaliter supponit. De ea pigeret ulterius loqui; verborum enim prodigalitate id prosequi, quod paucis consequi potes, est inane.</text:span><text:span text:style-name="T66"> </text:span><text:span text:style-name="T64"><text:s text:c="3"/></text:span><text:span text:style-name="T63"><text:s/></text:span></text:p>
      <text:h text:style-name="P716" text:outline-level="5">Dubium</text:h>
      <text:p text:style-name="P215">Sed obiter dubitatur: <text:span text:style-name="T514">Q</text:span>uando utrumque extremum propositionis est secundae intentionis, quomodo extrema inibi supponunt?</text:p>
      <text:h text:style-name="P716" text:outline-level="5">Responsio</text:h>
      <text:p text:style-name="P216">Respondetur: Tales distingues “<text:span text:style-name="T514">N</text:span>omen est nomen”. <text:span text:style-name="T517">S</text:span>i utrumque extremum capiatur materialiter, ipsa est vera; <text:span text:style-name="T515">s</text:span>i utrumque significative, etiam ipsa est vera; aut si subiectum materialiter et praedicatum significative, aut contra, ipsa est etiam vera.</text:p>
      <text:p text:style-name="P217">Si hanc distingues “<text:span text:style-name="T515">A</text:span>rgumentatio est subiectum logices”, penes hoc quod subiectum capitur materialiter aut significative. Et si hanc “<text:span text:style-name="T516">G</text:span>eneralissimum est individuum aut specialissimum”.</text:p>
      <text:h text:style-name="P703" text:outline-level="4"><text:soft-page-break/>Suppositionis personalis discreta</text:h>
      <text:p text:style-name="P11">Insuper suppositionis personalis quaedam discreta, et est terminus discrete acceptus.</text:p>
      <text:p text:style-name="P218">Suppositio materialis pari passu est dividenda; sed quia rarior est quam personalis, et utrisque est eadem doctrina, litera de una materiam persequitur.</text:p>
      <text:p text:style-name="P218">Exempla huius suppositionis “Iste homo currit”, “Ens quod est sortes currit”, “Iste homo vel asinus currit”, singularizando illud totum pro demonstrato, pro quo solum stabit ac si non esset disiunctum sed alter terminus communis. <text:span text:style-name="T519">Si autem solum una pars singularizetur, iam subiectum non supponit discrete. Si demonstres asinum <text:s/>per pronomen in hac “Iste homo currit”, subiectum non supponit; idem est ac si diceres “Iste homo existens, asinus currit”.</text:span></text:p>
      <text:p text:style-name="P219">Dicitur significative, quia subiecta istarum stant communiter “‘Sequana’ est terminus singularis”, “Iste homo est quid complexum”, “Haec herba crescit in horto meo”; demonstrando herbam horti tui, est falsa de virtute sermonis, et solum pro demonstrato accipitur. Sed in sensu quo fit communiter, est vera; accipitur enim pro herba simili. In talibus intentio loquentis (rigore relicto) servanda est.</text:p>
      <text:h text:style-name="P716" text:outline-level="5">Arguitur</text:h>
      <text:p text:style-name="P220">Contra istud arguitur: Ex dictis sequitur hanc esse falsam “Sortes est individuum”, cum subiectum communiter stet.</text:p>
      <text:h text:style-name="P716" text:outline-level="5">Responsio</text:h>
      <text:p text:style-name="P220">Respondetur: Non sequitur. /67/ <text:span text:style-name="T518">P</text:span>raedicatum pro omni tali individuo accipitur, et subiectum stat materialiter pro tali termino significative accepto.</text:p>
      <text:h text:style-name="P703" text:outline-level="4">Suppositio communis</text:h>
      <text:p text:style-name="P11">Suppositio communis est terminus communis supponens.</text:p>
      <text:p text:style-name="P221">Ut extrema huius “Sortes vel Plato est Sortes et homo”.</text:p>
      <text:h text:style-name="P703" text:outline-level="4">Communis determinata</text:h>
      <text:p text:style-name="P11"><text:span text:style-name="T68">Et haec suppositio partitur. </text:span><text:span text:style-name="T69">Nam quaedam est determinata. Pro qua haec regula esto: </text:span>Quilibet terminus communis supponens, super quem nullum cadit signum, aut signum particulare non impeditum, supponit determinate.</text:p>
      <text:p text:style-name="P584">Subiectum huius “Chimaera currit” non supponit determinate, quia non supponit.</text:p>
      <text:p text:style-name="P584">Nam duplex est suppositio determinata:</text:p>
      <text:list text:style-name="L10">
        <text:list-item>
          <text:p text:style-name="P736"><text:span text:style-name="T520">Q</text:span>uaedam propria, ab omnibus pro determinata suppositione accepta, si non ponatur signum maioris vigoris illud vetans, ut “Aliquis Britannus est formosus”. <text:span text:style-name="T522">O</text:span>mnes enim illi assentiunt.</text:p>
        </text:list-item>
        <text:list-item>
          <text:p text:style-name="P736"><text:soft-page-break/>Alia es<text:span text:style-name="T521">t</text:span> etiam determinata, saepius pro universali accepta, ut est de subiecto huius “Britanni sunt formosi”. Universalibus, ex usu, indefinite aequivalere videntur.</text:p>
        </text:list-item>
      </text:list>
      <text:h text:style-name="P703" text:outline-level="4">Confusa</text:h>
      <text:p text:style-name="P11">Suppositio confusa e<text:span text:style-name="T526">s</text:span>t suppositio, super quam signum confusivum cadit.</text:p>
      <text:h text:style-name="P716" text:outline-level="5">Confusa duplex</text:h>
      <text:p text:style-name="P222">Exemplum habes in extremis huius “Omnis homo est animal”, quorum subiectum distributive, praedicatum vero confuse tantum, supponit. Et ex illo patet quod duplex est suppositio confusa. Nam quaedam est confusa et distributiva, <text:span text:style-name="T523">q</text:span>uaedam vero confusa tantum.</text:p>
      <text:p text:style-name="P222">Quomodo sub his suppositionibus ascendere et descendere contingat, suo in loco videbitur. <text:span text:style-name="T524">P</text:span>ropterea per descensum has suppositiones non demonstro.</text:p>
      <text:p text:style-name="P11">Qui termini distribuuntur his carminibus addisces.</text:p>
      <text:p text:style-name="P11">‘Omnis’, ‘non’, ‘tantum’, ‘maior’, ‘praeter’ quoque ‘differt’. ‘<text:span text:style-name="T527">I</text:span>nquant<text:span text:style-name="T525">um’</text:span>, ‘privatus’, ita ‘doctus’, ‘sicut’ et ‘extra’.</text:p>
      <text:p text:style-name="P223">Sed quia hae regulae sunt novitiis artificis necessariae, et mente semper habendae, in particulari eas explicabo.</text:p>
      <text:h text:style-name="P717" text:outline-level="5">Regulae super confusa: <text:span text:style-name="T553">P</text:span>rima <text:span text:style-name="T554">regula</text:span></text:h>
      <text:p text:style-name="P11">Prima regula: Terminus communis sequens immediate in forma vel in valore signum universale affirmativum, supponit confuse et distributive.</text:p>
      <text:p text:style-name="P224">Ex<text:span text:style-name="T70">emplum in forma, ut “Quilibet asinus hominis currit”, ubi ‘asinus’ distribuitur. Exemplum aequivalenter, ut “Quilibet hominis asinus currit”; illic ‘hominis’, alterius casus a signo, non distribuitur. Alteri enim aequivalet. In utraque, determinatio accipitur eodem modo; in neutra ‘hominis’ distribuitur, sed stat confuse tantum. Unde fit quod signum affirmativum confundit confuse tantum terminum propinquum.</text:span></text:p>
      <text:p text:style-name="P225">In omnibus regulis, conditiones communes intelligito, utpote si supponat et non impediatur. Satius est semel hoc dixisse quam in qualibet regula hoc scripto tradere.</text:p>
      <text:h text:style-name="P718" text:outline-level="6">Arguitur primo</text:h>
      <text:p text:style-name="P226">Contra istud arguitur: <text:span text:style-name="T71">Hoc totum distribuitur “Quilibet asinus hominis currit”, et </text:span><text:span text:style-name="T72">h</text:span><text:span text:style-name="T71">oc totum est istae partes; ergo hae partes distribuuntur /68/ expositorie. Maior patet; illa est absolute universalis.</text:span></text:p>
      <text:h text:style-name="P718" text:outline-level="6">Secundum</text:h>
      <text:p text:style-name="P227">Secundo: ‘Omnis’ distribuit praedicatum, et tamen ipsum mediate sequitur. Antecedens patet: est ita vicinum praedicato, sicut subiecto.</text:p>
      <text:h text:style-name="P718" text:outline-level="6"><text:soft-page-break/>Ad primum</text:h>
      <text:p text:style-name="P227">Ad primum respondetur: <text:span text:style-name="T73">Consequentia est <text:s/>nulla; male concluditur, ut ex syllogismis patet.</text:span></text:p>
      <text:h text:style-name="P718" text:outline-level="6">Ad secundum</text:h>
      <text:p text:style-name="P228">Ad secundum: <text:span text:style-name="T528">N</text:span>ego antecedens. Ad probationem dicitur: non est ita vicinum praedicato in ordine conceptionis, licet ita fuerit quo ad situm subiecti. Et si praedicatum ita cito sicut subiectum concipiatur, natura signi est illud de quo aliud enuntiatur solum distribuere, et non id quod enunciatur de alio.</text:p>
      <text:p text:style-name="P228">De relativo reciproco futurus est sermo.</text:p>
      <text:h text:style-name="P716" text:outline-level="5">Secunda regula </text:h>
      <text:p text:style-name="P11">Secunda regula: Negatio negans distribuit omnes termino<text:span text:style-name="T533">s</text:span> sequentes, et infinitans terminum immediate sequentem. </text:p>
      <text:p text:style-name="P229">Haec regula intelligitur sive sit negatio negans nominalis sive adverbialis, et de negatione exercita quae explicite vel in mentali habet negationem.</text:p>
      <text:h text:style-name="P718" text:outline-level="6">Arguitur</text:h>
      <text:p text:style-name="P230">Contra regulam hanc arguitur: ‘Lectionem’ non distribuitur in hac “Ego non scio lectionem”. <text:span text:style-name="T529">P</text:span>atet: stat determinate in affirmativa ei contradicente, et est determinatio accepta unica; ergo hic non distribuitur.</text:p>
      <text:h text:style-name="P718" text:outline-level="6">Solutio</text:h>
      <text:p text:style-name="P230">Concedo quod non distribuitur. Illam conditionem in omnibus intelligo.</text:p>
      <text:h text:style-name="P716" text:outline-level="5">Tertia regula</text:h>
      <text:p text:style-name="P11">Tertia regula ob vicinitatem et memoriam est haec: Negatio implicita distribuit terminum in quem cadit.</text:p>
      <text:p text:style-name="P231">Ut ‘consequentiam’ in hac “Nego consequentiam”, “Car<text:span text:style-name="T534">e</text:span>o tunica”, “Ignoro motum”, “Sum spoliatus vestibus”. Idem patet de talibus ‘repugnare’, ‘deficere’, sive ‘nolo’ et huiusmodi.</text:p>
      <text:h text:style-name="P718" text:outline-level="6">Arguitur primo</text:h>
      <text:p text:style-name="P232">Contra: Ergo haec erit falsa “Nego consequentiam”, cum aequivalet huic “Omnem consequentiam nego”.</text:p>
      <text:h text:style-name="P718" text:outline-level="6">Secundum</text:h>
      <text:p text:style-name="P233">Secundo concedimus (si superiore veste spoliatus fuero) “Sum spoliatus vestibus”. Similiter, si uno dente caream, dicor carere dente.</text:p>
      <text:h text:style-name="P718" text:outline-level="6">Tertium</text:h>
      <text:p text:style-name="P233">Tertio: “Nescio lectionem” includit negationem in mente, cum huic aequivaleat “Non scio lectionem”.</text:p>
      <text:h text:style-name="P718" text:outline-level="6"><text:soft-page-break/>Ad primum <text:span text:style-name="T532">et secundum</text:span></text:h>
      <text:p text:style-name="P234">Ad duo prima dico <text:span text:style-name="T535">q</text:span>uod oportet respondere secundum materiam subiectam. <text:span text:style-name="T530">C</text:span>um dico “Nego consequentiam”, intelligo de hac consequentia proposita; et Petrus dixit instante passione “<text:span text:style-name="T536">N</text:span>on novi hominem”, de Christo intelligens, quia de illo erat sermo.</text:p>
      <text:h text:style-name="P718" text:outline-level="6">Ad tertium</text:h>
      <text:p text:style-name="P235">Ad tertium nego antecedens: Una est negativa, altera vero affirmativa, licet negativam inferat. Propterea nullo modo aequivalent in significando nec in consequendo. Una est ver<text:span text:style-name="T531">a</text:span> post meam mortem; non autem alia.</text:p>
      <text:h text:style-name="P716" text:outline-level="5">Quarta regula</text:h>
      <text:p text:style-name="P11">Quarta regula: Dictio exclusiva, faciens propositionem exponibilem, gratia alietatis, distribuit terminum remotum, hoc est praedicatum. Si gratia pluralitatis propositio expone<text:span text:style-name="T537">re</text:span>tur, non causaret talem suppositionem.</text:p>
      <text:h text:style-name="P718" text:outline-level="6">Arguitur</text:h>
      <text:p text:style-name="P236">Contra hanc regulam arguitur sic: Omne agens fortius agit in propinquum quam in distans; sed distribuere est fortius agere quam non distribuere; ergo si signum exclusivum distribuat praedicatum, subiectum distribuitur. /69/</text:p>
      <text:h text:style-name="P718" text:outline-level="6">Confirmatio</text:h>
      <text:p text:style-name="P237">Et confirmatur: <text:span text:style-name="T539">q</text:span>uia dictio exclusiva non distribuit nisi ratione negationis inclusae; et tunc sic arguo: <text:span text:style-name="T540">v</text:span>el illa negatio est infinitans, et tunc distribuitur terminus immediatus et non mediatus. Si negas, uterque terminus distribuitur.</text:p>
      <text:h text:style-name="P718" text:outline-level="6">Respondetur <text:span text:style-name="T106">ad argumentum</text:span></text:h>
      <text:p text:style-name="P237">Respondetur distinguendo quod omen agens fortius agat in propinquum quam in distans: <text:span text:style-name="T539">v</text:span>el si fuerit agens naturale et univocum, sic conceditur; <text:span text:style-name="T538">v</text:span>el si fuerit agens instrumentale, et sic non oportet.</text:p>
      <text:p text:style-name="P237">Et si arguas de actu mentali signi exclusivi, quod a natura agit, verum est, sed non actione univoca in subiectum et praedicatum.</text:p>
      <text:h text:style-name="P718" text:outline-level="6">Ad confirmationem</text:h>
      <text:p text:style-name="P238">Ad confirmationem: Nego quod ‘tantum’ distribuit ratione negationis inclusae formaliter, quia subordinatur uni actui syncategorematico qui nec est negatio negans nec infinitans nec aliquam earum includens, ex sua natura confundens confuse tantum terminum propinquum <text:span text:style-name="T541">e</text:span>t distribuens terminum remotum. <text:span text:style-name="T542">E</text:span>t signum, ad placitum significans, eodem modo facit terminos supponere propter subordinationem ad actum ipsum. Sed bene verum est quod aliquo modo includit negationem, hoc est, in suis exponentibus ponitur negatio.</text:p>
      <text:p text:style-name="P238"><text:soft-page-break/>Potest fieri argumentum ad probandum quod non distribuat terminum remotum, capta hac propositione “Tantum rudibile est hominis asinus”. <text:span text:style-name="T542">I</text:span>lla est vera, et tamen copulative non sequitur “Tantum rudibile est istius hominis asinus; <text:span text:style-name="T538">et</text:span> Tantum rudibile est istius hominis asinus”, quia consequens est falsum. Dico quod regula intelligitur de praedicato totali.</text:p>
      <text:h text:style-name="P716" text:outline-level="5">Quinta regula</text:h>
      <text:p text:style-name="P11">Quinta regula: Terminus sequens comparativum gradum, rectus ab eo ex vi comparationis, aut superlativum ex vi partitionis rectus, distribuitur. </text:p>
      <text:p text:style-name="P239">Ut ‘homine’ et ‘hominum’ in his “Sortes est doctior homine”, “Plato est doctissimus hominum”. Facile est cognitu quis terminus regitur ex vi naturae comparativi gradus, quia est terminus significans rem excessam. <text:span text:style-name="T544">U</text:span>t “Aiax Telamonius est maior Ulysse viribus”; illic ‘Ulysse’ regitur ex vi naturae comparativi gradus, et hoc aliter cognoscitur per resolventem. Sic enim resolvitur “Aiax est magis fortis quam Ulysses viribus”, ubi terminus sequens hoc totum ‘magis quam’, vel aliquod simile, regitur ex vi naturae comparativi gradus.</text:p>
      <text:p text:style-name="P239">Eodem modo hic “Iob orientalis est ditior Britanno auro”, ‘Britanno’ distribuitur virtute istius regulae. ‘<text:span text:style-name="T543">A</text:span>uro’ stat determinate, quia est terminus communis supponens, super quem nullum cadit signum. Sic enim resolvitur “Iob orientalis est magis dives quam Britannus auro”; ‘auro’ regitur ex vi naturae positivi gradus, quia quemcumque casum regit positivus, eundem regit comparativus. Sic quando comparativus capitur partitive, distribuit more superlativi gradus, ut “Maior horum est charitas”; non stes pro termino discreto, vel dicas “Maior trium charitas”.</text:p>
      <text:h text:style-name="P716" text:outline-level="5">Sexta regula</text:h>
      <text:p text:style-name="P11">Sexta regula: Terminus rectus ab illo verbo ‘differt’ distinguitur, quia, si mediate ‘a’ vel ‘ab’, distribuitur.</text:p>
      <text:p text:style-name="P240">Dicitur “mediante ‘a’ vel ‘ab’”, quia si sic non regeretur, regula non habet verum. Patet exemplariter “Achilles pugnavit ad Troiam, Diomedes /70/ pugnavit apud Troiam, et sic de aliis Graecis fuit”; illic “aliis Graecis” stat determinate.</text:p>
      <text:p text:style-name="P240">Eodem modo ‘anima’ in hac “Sortes differt anima rationali ab asino”; <text:span text:style-name="T545">s</text:span>imiliter ‘asinus’ stat hic determinate “ab homine differt asinus”, et logice loquendo ‘homine’ stat determinate, cum terminum ‘differt’ praecedat. <text:span text:style-name="T546">E</text:span>x quo sequitur quod ‘Hebraeo’ hic distribuitur “Herodes Ascalonita differebat ab Hebraeo”.</text:p>
      <text:h text:style-name="P716" text:outline-level="5"><text:soft-page-break/>Septima regula</text:h>
      <text:p text:style-name="P11">Septima regula: Terminus sequens dictionem exceptivam vel reduplicativam, vel hoc complexum ‘ita’ et ‘sicut’ mediante positivo gradu vel comparativo et dictione ‘quam’, distribuitur.</text:p>
      <text:p text:style-name="P241">Exempla: ut ‘hominem’ in hac “Omne animal praeter hominem habet caput demissum in terram”; ‘<text:span text:style-name="T548">r</text:span>ationalis’ in ista “Omnis homo inquantum <text:span text:style-name="T547">rationalis</text:span> est risibilis”.</text:p>
      <text:p text:style-name="P241">Exemplum tertii ut “Hector est ita fortis sicut unus Graecus”.</text:p>
      <text:p text:style-name="P241">Exemplum quarti ut “Salomon est prudentior quam Aegyptius” vel “Magis <text:span text:style-name="T547">prudens</text:span> quam Syrus”. “Plura quam duo sunt praedicabilia”; illic duo distribuitur, et significantur quod, quibuscumque duobus datis, plura sunt praedicabilia, quod est falsum.</text:p>
      <text:h text:style-name="P703" text:outline-level="4">Regulae suppositionis confusae tantum <text:span text:style-name="T555">disiunctim</text:span></text:h>
      <text:p text:style-name="P11">Sequuntur regulae suppositionis confusae tantum, et primo disiunctim.</text:p>
      <text:h text:style-name="Heading_20_5" text:outline-level="5">Prima regula</text:h>
      <text:p text:style-name="P31">Prima regula: Terminus mediate sequens signum universale affirmativum supponit confuse tantum.</text:p>
      <text:p text:style-name="P242">Nisi praedicatum fuerit relativum reciprocum, de cuius suppositione post hac in relativis videbitur. Et etiam nisi virtus signi in uno extremo sit exhausta, ut hic “Asinus cuiuslibet hominis est animal”; illic ‘animal’ stat determinate.</text:p>
      <text:p text:style-name="P242">Cum signum ponitur inter determinationem acceptam unica acceptione, efficitur pars subiecti, et in praedicatum non cadit. Signa universalia, cum categoremata in se includant in significando vel consequendo, id idem faciunt, ut “Semper erat homo”, “Ab aeterno fuit bos”, “Perpetuo infinitum” et huiusmodi idem faciunt.</text:p>
      <text:h text:style-name="Heading_20_5" text:outline-level="5">Secunda regula</text:h>
      <text:p text:style-name="P31">Secunda regula: Signum exclusivum confundit confuse tantum terminum immediate sequentem.</text:p>
      <text:p text:style-name="P243">Cum ab exclusiva primo ordinis, ad universale in terminis transpositis, est bona consequentia et econverso, ut posthac dicetur; proportionabiliter, opposito modo supposito, capienda est.</text:p>
      <text:h text:style-name="Heading_20_5" text:outline-level="5"><text:soft-page-break/>Tertia regula</text:h>
      <text:p text:style-name="P31">Tertia regula: C<text:span text:style-name="T74">opulat</text:span><text:span text:style-name="T556">u</text:span><text:span text:style-name="T74">m praedicamenti ‘ubi’ et ‘quando’ confundit confuse tantum.</text:span></text:p>
      <text:p text:style-name="P244">Ut ‘piper’ in hac “Parisii et Romae venditur piper”; in mentali huius non ponitur signum universale affirmativum, ut in utroque istorum locorum “Parisii et Romae venditur piper”, et ita in aliis copulatis praedicamentorum ‘quando’, ‘et’ divisive capitur, ut “Sortes et Brunellus est animal”.</text:p>
      <text:p text:style-name="P244">Dicere eam hypotheticam est omnia invertere. Sub hac regula dictiones /71/ <text:span text:style-name="T75">numerales complecti potes, ut “Ter cantavi missam”, “Ter bibi vinum”, quae communius concedi solent, quae aliter salvari nequeunt.</text:span></text:p>
      <text:h text:style-name="Heading_20_5" text:outline-level="5">Quarta regula</text:h>
      <text:p text:style-name="P31">Quarta regula <text:span text:style-name="T556">s</text:span>olet communius poni quod: <text:span text:style-name="T556">D</text:span>ictiones importantes actum intellectus aut voluntatis confundunt terminos in quod cadunt.</text:p>
      <text:p text:style-name="P747">Ut ‘cognosco’, ‘apprehendo’, ‘intelligo’, ‘volo’, ‘nolo’, ‘aveo’, ‘cupio’ et huiusmodi in communi usu. Apud neotericos ⟨a⟩ confundit confuse tantum, et terminum determinate stare facit. An sit alia suppositio ultra hanc de ⟨<text:span text:style-name="T558">c</text:span>⟩ et ⟨<text:span text:style-name="T558">d</text:span>⟩ in libro Perihermeneias dicemus, ut “⟨a⟩ Homo non est animal”, “Omnis homo est ⟨<text:span text:style-name="T559">b</text:span>⟩ animal”.</text:p>
      <text:h text:style-name="Heading_20_4" text:outline-level="4"><text:span text:style-name="T549">R</text:span>egula pro suppositione confusa tantum <text:span text:style-name="T550">copulatim</text:span></text:h>
      <text:p text:style-name="P11">Ponitur una regula pro suppositione confusa tantum copulatim.</text:p>
      <text:p text:style-name="P11">Terminus sequens signum collectivum stat confuse tantum copulatim.</text:p>
      <text:p text:style-name="P585">Ut “Omnes apostoli Dei sunt duodecim”.</text:p>
      <text:h text:style-name="Heading_20_4" text:outline-level="4">Quidquid mobilitat immobilitat</text:h>
      <text:p text:style-name="P11">Quidquid mobilitat immobilitat.</text:p>
      <text:p text:style-name="P245">Hoc est: <text:span text:style-name="T551">Q</text:span>uidquid mobilitat immobilitatum, immobilitat mobilitatum. Hoc clare dicas quando super unum terminum cadunt duo signa, quorum quodlibet est natum terminum illum distribuere, tunc illa duo signa se a distributione praepediunt, ita quod terminus ab illis duobus manet indistributus.</text:p>
      <text:p text:style-name="P245">Si distribuitur a parte non est vis, determinatio accepta unica ad partem suam legem habet. Sed an talis terminus determinate an confuse stet, varia est artistarum positio, quas omnes alias fusius refellere nisus sum.</text:p>
      <text:p text:style-name="P246"><text:soft-page-break/>Hanc tamen regulam in hac parte non spernendam servabis, pedamen in contradictoriis fundando super hoc dictum commune “Non est verius contradicere quam toti propositioni negationem anteferre”.</text:p>
      <text:p text:style-name="P246">Et si in fronte propositionis sit eam e medio tollere et videre qualiter termini supponunt ubi est paucitas signorum, ut in hac “Homo non est animal” subiectum stat determinate, et praedicatum distribuitur. Propterea in ista “Non-homo non est animal”, praedicatum stat confuse tantum, a nulla negatione sed ab aggregato earum.</text:p>
      <text:p text:style-name="P247">Et in ista “Non ⟨a⟩ homo non est animal” praedicatum stat determinate ab illa trinitate “non ⟨a⟩ non”, quia in eius contradictoria distribuebatur praedicatum in ordine ad subiectum stans confuse tantum.</text:p>
      <text:p text:style-name="P247">“<text:span text:style-name="T76">Non-hominis ⟨a⟩ asinus quodlibet rudibile est”, rudibile non supponit pure determinate nec pure confuse tantum, ut patet per modum contradictionis, sed de hoc alibi.</text:span></text:p>
      <text:p text:style-name="P248">Sed quando dubitas <text:s/>de suppositione alicuius termini, an supponit determinate vel confuse, ut praedicato huius “Omnis homo non omnis homo est”, cape clarissimam contradictoriam quam habet secundum regulam quae data est in aequipollentiis. Sua contradictoria est haec “Homo omnis homo est”, ut patet de hac “Nullus homo omnis homo est”, quae aequivalet huic “Omnis homo non omnis homo est” (absolvendo ‘nullus’ a genere”), non vadas ad hanc contradictoriam “Non <text:span text:style-name="T77">omnis homo non omnis homo /72/ est, quia tunc gratis te ipsum involvis.</text:span></text:p>
      <text:h text:style-name="P716" text:outline-level="5">Arguitur</text:h>
      <text:p text:style-name="P249">Sed contra istud arguitur: Praedicatum istius “Non ⟨a⟩ homo non est animal”, stat determinate per te et per theoricam. Sed probo quod non, sublato hoc signo ⟨a⟩ praedicatum stat confuse tantum; ergo addito signo ⟨a⟩ praedicatum non stat determinate contra eius impositionem, cum eo utamur ad confundendum terminum immediate sequentem nisi impediatur.</text:p>
      <text:p text:style-name="P249">Eodem homo si dicas quod ‘homo’ stat confuse in ista “Non omnis homo est ⟨b⟩ animal”, tunc sequitur quod haec signa causant suppositionem ante se, contra communem logicam.</text:p>
      <text:h text:style-name="P716" text:outline-level="5">Respondetur</text:h>
      <text:p text:style-name="P748">Respondetur: Ly ⟨a⟩ non causa suppositionem determinatam, sed hoc totum ‘non <text:span text:style-name="T560">⟨a⟩</text:span>’, et ⟨a⟩ partialiter, quia oportet videre suppositionem sufficientem ad contradicendum, quia utrobique tenemus regulam communem “Non est verius contradicere tam in hypotheticis quam in categoricis”, quia ea negata in procella fluctuabimus, sicut naves in aequore sine clavo.</text:p>
      <text:p text:style-name="P250">Necessarium ergo est in ista “Non ⟨a⟩ homo non est animal”, dicere quod ‘animal’ stat determinate et non sequitur propterea quod aliquis terminus faciat suppositionem de per se ante se, sed quia ipse est signum ostendens nobis quomodo debemus capere terminos in contradictorio. Et si imponamus ⟨a⟩ ad confundendum confuse tantum, oportet quod ex consequenti imponatur esse nota saltem partialis suppositionis determinate in suo contradictorio, vel negare regulam necessariam.</text:p>
      <text:p text:style-name="P250">Non est verius contradicere et in conditionalibus consequentiis et multis aliis sine hac regula contradicere nequimus. Fateor tamen quod possumus dicere quod regula patiatur instantias in categoricis, et duas in proposito, sed tunc tenebrosa aqua in nubibus aeris erit nobis in exponibilibus et alias, propterea regulam utrobique teneo.</text:p>
      <text:h text:style-name="P701" text:outline-level="2">Sequitur <text:span text:style-name="T450">D</text:span>e <text:span text:style-name="T450">D</text:span>escensu et <text:span text:style-name="T450">A</text:span>scensu</text:h>
      <text:p text:style-name="P32">Sequitur <text:span text:style-name="T450">D</text:span>e <text:span text:style-name="T450">D</text:span>escensu et <text:span text:style-name="T450">A</text:span>scensu.</text:p>
      <text:h text:style-name="P703" text:outline-level="4">De <text:span text:style-name="T450">De</text:span>scensu et <text:span text:style-name="T450">A</text:span>scensu</text:h>
      <text:p text:style-name="P11">Descensus est consequentia formalis in qua a termino superiori cum constantia ad inferiora eius discurritur, ut: “Omnis homo currit” et isti homines sunt omnes homines; ergo iste homo currit, et sic de singulis.</text:p>
      <text:p text:style-name="P11">In ascensu vero a singularibus cum constantia ad eorum superiora proceditur.</text:p>
      <text:p text:style-name="P11">Insuper quadruplex est descensus, scilicet, copulativus et copulatus, disiunctivus et disiunctus.</text:p>
      <text:p text:style-name="P11">Sub termino stante distributive descenditur primo modo.</text:p>
      <text:p text:style-name="P11">Sub termino stante confuse tantum copulatim, secundo modo.</text:p>
      <text:p text:style-name="P11">Sub termino stante determinate, tertio modo.</text:p>
      <text:p text:style-name="P11">Et sub termino confuse tantum disiunctim, quarto modo.</text:p>
      <text:h text:style-name="P703" text:outline-level="4">Descensa</text:h>
      <text:p text:style-name="P251">Descensa est propositio sub cuius termino descenditur, metaphorice ad descendendum realem dicta.</text:p>
      <text:h text:style-name="P703" text:outline-level="4">Descendentes</text:h>
      <text:p text:style-name="P252">Singulares ad quas descenditur descendentes /73/ dicuntur. Et proportionabiliter in ascendentibus et ascensa dicatur.</text:p>
      <text:p text:style-name="P253">Nec est vis sive terminus superior supponat sive non. Si primum, datur aliqua consequentia uno tempore descensus, et alio tempore non est consequentia existente. Nec est vis, sive econtrario valet ascensus, sive non.</text:p>
      <text:p text:style-name="P254">Sufficit per descensum propositionem falsitates cribrare, sicut per earum ascensum veritatem indagare.</text:p>
      <text:p text:style-name="P254">Constantia pro subiecto pronomen demonstrativum cum termino sub quo descenditur, et eundem terminum cum signo collectivo pro praedicato sibi vendicabit, ut “Omne animal currit” et “Ista animalia (demonstrando omnia pro quibus animal distribuitur) sunt omnia animalia; ergo et caetera”.</text:p>
      <text:p text:style-name="P254"><text:soft-page-break/>Descensa et descendentes sunt partes descensus: Ista particula ‘et sic de singulis’, in descensu copulativo tantum valet sicut copulativa ex singularibus non enumeratis conflata. Et sic in ascensu disiunctivo tantum sicut disiunctiva ex singularibus conflata.</text:p>
      <text:p text:style-name="P255">Proportionabiliter in descensu copulato et disiuncto dicatur, ergo et sic de singulis aequivoce in descensu copulativo et aliis descensibus capitur.</text:p>
      <text:p text:style-name="P256">Secundo sequitur: Innane est illam particulam addere quando omnia singularia enumerantur, ut descendendo sub termino ‘Sol’, licet plura supposita non habeat est terminus aptus plura habere.</text:p>
      <text:p text:style-name="P256">Si dicatur: Ad hoc quod descendatur suo aliquo termino requiritur quod plura supposita habeat. Difficultas est verbalis, non est vis in descensu copulativo et disiunctivo hypotheticam copulativam et disiunctivam, sicut in descensu copulato et disiuncto categoricas de talibus extremis concludimus. Plerique tamen maiorum descensum illum disiunctum respuerunt et merito, quia nec ascendendo propositionum veritates, nec descendendo earum falsitates reserat.</text:p>
      <text:p text:style-name="P256">Quintum membrum merito addi potest, ut descendendo sub subiecto huius “Omne animal fuit in arca Noe”, et sub subiecto huius “Utrumque animal currit”, de quibus post hac clarius patebit.</text:p>
      <text:h text:style-name="P702" text:outline-level="3">Prima regula</text:h>
      <text:p text:style-name="P11">In descensu et ascensu quinque regula notato. Quarum prima est: Ne a pluribus determinatis respectum partium multitudinis, ad unam determinatam respectu totius, disputetur non parum curandum est.</text:p>
      <text:p text:style-name="P21"><text:span text:style-name="T78">Defectus cuius non sequitur “Caput iste homo habet, et caput iste homo habet, et sic de singulis; ergo caput omnis homo habet”. Illae enim inferunt hanc “⟨</text:span><text:span text:style-name="T100">a</text:span><text:span text:style-name="T79">⟩ </text:span><text:span text:style-name="T100">C</text:span><text:span text:style-name="T79">aput omnis </text:span><text:span text:style-name="T80">homo habet”, non ponendo ⟨a⟩ ly ‘caput’ in </text:span><text:span text:style-name="T83">ante,</text:span><text:span text:style-name="T80"> ‘crebro’ stat determinate re</text:span><text:span text:style-name="T82">s</text:span><text:span text:style-name="T80">pectu termini distributi, et per consequens respectu multitudinis, et hoc nisi suppositioni confusae tantum suppositio determinata aequivaleat, ut istius”</text:span></text:p>
      <text:p text:style-name="P7">Hominis asinus est Brunellus, et</text:p>
      <text:p text:style-name="P7">Istius hominis asinus non est Brunellus, et sic de singulis; ergo</text:p>
      <text:p text:style-name="P7">cuiuslibet hominis ⟨b⟩ asinus non est Brunellus”.</text:p>
      <text:p text:style-name="P257"/>
      <text:p text:style-name="P258">Quia istae propositione inter se aequivalent:</text:p>
      <text:p text:style-name="P7">Cuiuslibet hominis ⟨b⟩ asinus non est Brunellus, et</text:p>
      <text:p text:style-name="P7">Cuiuslibet hominis asinus non est Brunellus.</text:p>
      <text:p text:style-name="P10"/>
      <text:p text:style-name="P259">Patet earum contradictoriae aequivalent, immo una propositio urique contradicit, scilicet “<text:span text:style-name="T81">Alicuius hominis quilibet asinus est Brunellus”, et idem est dictu “⟨</text:span><text:span text:style-name="T99">a</text:span><text:span text:style-name="T81">⟩ </text:span><text:span text:style-name="T99">H</text:span><text:span text:style-name="T81">ominis quilibet asinus est currens”, et “Hominis quilibet asinus est currens”. Utrique illarum eadem propositio contradicit. Patet ex dictis in contradictoriis. /74/</text:span></text:p>
      <text:p text:style-name="P11"><text:soft-page-break/>Caeterum quando determinatio distribuitur respectu determinabilis discreti, non refert alterum extremum supponere determinate vel confuse.</text:p>
      <text:p text:style-name="P260">Nam istae aequivalent “⟨<text:span text:style-name="T98">a</text:span>⟩ <text:span text:style-name="T98">H</text:span>ominis Brunellus non est currens”, et “Homini Brunellus non est currens”.</text:p>
      <text:p text:style-name="P260">Pro regula servato, sicut nihil interest determinationem supponere confuse vel determinate in affirmativis respectu determinabilis stantis determinate, qualitercumque alterum extremum supponit, ita non refert determinationem respectu determinabilis discreti supponere confuse vel determinate tam in affirmativis quam in negativis, qualitercumque alterum extremum supponit.</text:p>
      <text:p text:style-name="P261">At tunc dicis licitum est ergo ratiocinari a confusa ad determinatam, respectu multitudinis formaliter, extra formalem necessitatem consequentis, aut antecedentis impossibilitatem formalem, contra quinta regulam sequentem.</text:p>
      <text:p text:style-name="P262">Conceditur: Patet hic “⟨<text:span text:style-name="T97">a</text:span>⟩ <text:span text:style-name="T97">H</text:span>omo contingenter non currit; ergo Homo contingenter currit”. Sed quia idem est dicere “⟨<text:span text:style-name="T97">a</text:span>⟩ <text:span text:style-name="T97">H</text:span>omo contingenter currit et contingenter non currit”, et esset certamen de suppositione termini ‘currens’. Patet aliter: “⟨<text:span text:style-name="T96">a</text:span>⟩ <text:span text:style-name="T96">H</text:span>omo differt ab homine; ergo Homo differt ab homine”.</text:p>
      <text:p text:style-name="P263">Sed quia dicis totale praedicatum non distribuitur et in illis hoc non inconvenit, ut “⟨<text:span text:style-name="T95">a</text:span>⟩ <text:span text:style-name="T95">H</text:span>omo est omne currens” formaliter sequitur “Homo est omen currens”.</text:p>
      <text:p text:style-name="P265">Similiter in terminis collectivis, sequitur enim “⟨<text:span text:style-name="T94">a</text:span>⟩ <text:span text:style-name="T94">O</text:span>mnes apostoli omnia currentia sunt; ergo Aliqui omnes apostoli omnia currentia sunt”. Et patet in exemplo prius dato “⟨<text:span text:style-name="T93">a</text:span>⟩ <text:span text:style-name="T93">H</text:span>ominis quilibet asinus currit; ergo Hominis quilibet asinus currit”.</text:p>
      <text:p text:style-name="P266">Sed bifariam hic descendere solent. Uno modo in omnibus singularibus, ponendo relativum identitatis dempta prima, ut “Caput iste homo habet (illa verificatur pro capite Sortis) et, Idem caput iste homo habet, et sic de singulis”.</text:p>
      <text:p text:style-name="P264"><text:span text:style-name="T84">Modo tunc antecedens est falsum pro qualibet alis singulari a prima, sicut et consequens, et sic dicetur hic “</text:span><text:span text:style-name="T85">Homo non est hoc animal, et Idem homo non est hoc animal, et sic de singulis”, dabitur singularis falsa, pro qua prima propositio verificabatur, ut is sint tres homines in mundo solum: ‘a’, ‘b’ et ‘c’. Sortes, Plato et Cicero, “Homo non est hoc animal”, queritur pro quo illam verificabis.</text:span></text:p>
      <text:p text:style-name="P264"><text:span text:style-name="T86">P</text:span><text:span text:style-name="T85">ro ‘a’ tunc in una descendente </text:span><text:span text:style-name="T86">demonstrando ‘a’, illa erit falsa, contra casu tuo stante qualibet singularis ascendentis est vera. Prima enim verificatur pro quolibet homine alio a Sorte, vel ‘a’. Immo, pro quolibet homine quocumque demonstrato haec est vera “Homo non est hoc animal”. Patet per suae contradictoriae falsitatem; ergo illa verificatur pro quolibet illorum trium hominum. Et quacumque singulari data, “Idem homo non est hoc animal”, illa est vera, cum subiectum est terminus communis et supponit pro omni illo pro quo propositio antecedentis verificatur. Modo propositio antecedentis pro pluribus verificatur, ergo haec negativa est vera de praedicato discreto.</text:span></text:p>
      <text:p text:style-name="P267">Si essent praecise duo homines Sortes et Plato, haec est vera “Homo non est hoc animal”, demonstrando Sortem, sed sic est hic; /75/ igitur.</text:p>
      <text:p text:style-name="P267">Praeterea aliter arguitur: </text:p>
      <text:p text:style-name="P7"><text:soft-page-break/>Aliqua pars continui non est haec pars, et</text:p>
      <text:p text:style-name="P7">Eadem pars continui non est hace pars, et sic de singulis; ergo</text:p>
      <text:p text:style-name="P7">Aliqua pars continui non est pars.</text:p>
      <text:p text:style-name="P264"/>
      <text:p text:style-name="P268">Etiam affirmative arguitur:</text:p>
      <text:p text:style-name="P7">Aliquem asinu<text:span text:style-name="T87">m iste homo videt, et</text:span></text:p>
      <text:p text:style-name="P7">Eundem asinum iste homo videt, et sic de singulis; ergo</text:p>
      <text:p text:style-name="P7">Aliquem asinum quilibet homo videt.</text:p>
      <text:p text:style-name="P268"/>
      <text:p text:style-name="P268"><text:span text:style-name="T87">quia ponendo </text:span><office:annotation office:name="__Annotation__1266_266040701" loext:resolved="false"><dc:creator>Unknown Author</dc:creator><dc:date>2025-05-02T19:45:12.640249140</dc:date><text:p><text:span text:style-name="T561">Medieval logic reasons about infinite sets: Infinitos asinos.</text:span></text:p></office:annotation><text:span text:style-name="T87">infinitos asinos</text:span><office:annotation-end office:name="__Annotation__1266_266040701"/><text:span text:style-name="T87"> ordinate, ita quod Sortes quemlibet illorum videat, et Plato quemlibet primo asino dempto videat, et Cicero quemlibet alium demptis aliis duobus primis, et Guilhelmus quemlibet demptis tribus primis videat. Et sic consequenter dabitur antecedentes verum, consequente existente falso.</text:span></text:p>
      <text:p text:style-name="P269">Et patet aliter: Sint infiniti asini et infiniti homines, quorum quilibet habet praecise unum asinum, et quilibet homo quemlibet asinum videat dempto suo, haec est falsa “Asinum quilibet homo videt”, et <text:span text:style-name="T88">a</text:span>sce<text:span text:style-name="T88">n</text:span>dentes ver<text:span text:style-name="T88">a</text:span>e. <text:span text:style-name="T88">Nam “Asinum iste homo videt, et Eundem asinum iste homo videt” sensus est “</text:span><text:span text:style-name="T148">E</text:span><text:span text:style-name="T88">undem asinum quem primus homo videt secundus videt”, et ista redditur vera pro asino a tertio homine possesso, et tertia descendens est vera, quia sensus eius est eundem asinum quam primus et secundus vident, tertius videt, et hoc est verum pro asino a quarto homine possesso, et proportionabiliter cuiuslibet alterius ascendentis veritas ostenditur per horum argumentorum solutiones.</text:span></text:p>
      <text:p text:style-name="P271">Dicitur: Oportet verificare primam propositionem pro uno discreto supposito, et contra hoc non currunt replicae. “Homo non est hoc animal” verificabitur pro Sorte demonstrando Platonem, cum demonstras Sortem una singularis erit falsa.</text:p>
      <text:p text:style-name="P271">Similiter hic “Aliqua pars continui non est haec pars”, demonstrando unam tertiam quae verificabitur pro altera parte continui “Haec erit falsa”, et eadem pars non est haec pars (demonstrando medietatem continui) quia per illam significatur quod medietas continui non est alter pars eiusdem.</text:p>
      <text:p text:style-name="P272">Similiter “Aliquem equum quilibet homo videt”, in ultimo casu est falsa, et sic una singularium “Aliquem equum iste homo videt” demonstrando sortem, quaeritur pro quo discreto equo illam verificas, et quocumque demonstrato demonstrando dominum illius equi, dabitur singularis falsa, et sic non expugnatur ille antiquus modus ascendendi et descendendi.</text:p>
      <text:p text:style-name="P272">Poteris tamen clarius et fortasse tutius a termino stante determinate primo ascendere aut descendere.</text:p>
      <text:p text:style-name="P270"/>
      <text:h text:style-name="P702" text:outline-level="3"><text:soft-page-break/>Secunda regula</text:h>
      <text:p text:style-name="P32">Secunda regula.</text:p>
      <text:p text:style-name="P11">Quanto est determinatio accepta unica acceptione formaliter aut eam redolet, non tangatur determinatio ascendendo vel descendendo, sed sub toto procedatur.</text:p>
      <text:p text:style-name="P273">Hoc est, quando est determinatio accepta unica expresse, vel eam redolet, sub determinatione non ascendatur vel descendatur, sed sub toto si communiter supponat.</text:p>
      <text:p text:style-name="P7">Hoc declaro quoniam non sequitur:</text:p>
      <text:p text:style-name="P7">Differens ab isto ente est ens, et</text:p>
      <text:p text:style-name="P7">Differens ab isto ente est ens, et sic de singulis; ergo</text:p>
      <text:p text:style-name="P7">Differens /76/ ab ente est ens.</text:p>
      <text:p text:style-name="P274"/>
      <text:p text:style-name="P274">Hic autem suppositio totius aggregati variantur.</text:p>
      <text:p text:style-name="P275">Identidem <text:span text:style-name="T89">non sequitur</text:span></text:p>
      <text:p text:style-name="P7">Homo est non iste homo, et</text:p>
      <text:p text:style-name="P7">Homo est non iste homo, et sic de singulis; ergo</text:p>
      <text:p text:style-name="P7">Homo est non homo.</text:p>
      <text:p text:style-name="P275"/>
      <text:p text:style-name="P276"><text:span text:style-name="T89">Etiam, dato quod signum confusivum praeponatur, cavendo ne primae regulae contraveniatur, ‘</text:span><text:span text:style-name="T90">non-homo’ redolet istud, in consequendo ens quod non est homo, et sic determinationem acceptam unica sapit.</text:span></text:p>
      <text:p text:style-name="P279">Similiter non sequitur:</text:p>
      <text:p text:style-name="P7">⟨<text:span text:style-name="T92">a</text:span><text:span text:style-name="T91">⟩ </text:span><text:span text:style-name="T92">I</text:span><text:span text:style-name="T91">ste homo est iste homo, et</text:span></text:p>
      <text:p text:style-name="P7">⟨<text:span text:style-name="T92">a</text:span><text:span text:style-name="T91">⟩ </text:span><text:span text:style-name="T92">H</text:span><text:span text:style-name="T91">omo est iste homo, et sic de singulis; ergo</text:span></text:p>
      <text:p text:style-name="P7">⟨<text:span text:style-name="T92">a</text:span><text:span text:style-name="T91">⟩ </text:span><text:span text:style-name="T92">H</text:span><text:span text:style-name="T91">omo est omnis homo.</text:span></text:p>
      <text:p text:style-name="P277"/>
      <text:p text:style-name="P278"><text:span text:style-name="T91">Hoc complexum ‘omnis homo’ tantum redolet </text:span><text:span text:style-name="T101">sicut ens quod est omnis homo.</text:span></text:p>
      <text:p text:style-name="P280">Illae singulares formaliter hanc inferunt “⟨a⟩ Homo omnis homo est”. Et licet formaliter sequatur cum comparativo ‘differt’ et similibus, descensus et ascensus copulativus sub determinatione, hoc est de per accidens, cum tales formaliter aequivaleant “Sortes differt ab homine” et “Sortes ab omni homine differt”, “Sortes est fortior homine” “Sortes quolibet homine fortior est”.</text:p>
      <text:p text:style-name="P22"><text:span text:style-name="T102">Item, in negativis istis contradicentibus, ubi determinatio distribuitur non licet sic ascendere et descendere copulative, sed solum disiunctive proportionabiliter ad copulativam oppositam. Ergo satius est in regula stare quam regulas varias, vix solidas, pro tali descensu ponere, cum propositionum veritates aliter deprehendi possunt. </text:span><text:span text:style-name="T103">Et licet istae aequivalent “Asinus hominis currit” et “Hominis asinus currit”, et per consequens earum contradictoriae aequivalebunt.</text:span></text:p>
      <text:p text:style-name="P281">Adhuc, ob universalitatem, in regula dormiendum est, nec etiam descensus disiunctus opacus inibi tangetur.</text:p>
      <text:h text:style-name="P702" text:outline-level="3"><text:soft-page-break/>Tertia regula</text:h>
      <text:p text:style-name="P37">Tertia regula.</text:p>
      <text:p text:style-name="P38">Quando est determinatio accepta non unica distributione stipata, non descendatur aut ascendatur sub determinabile primo, sed sub determinatione, si confuse non stetit.</text:p>
      <text:p text:style-name="P282">Tertia regula patet, quia non sequitur:</text:p>
      <text:p text:style-name="P7">Alicuius speciei quodlibet individuum est asinus; ergo </text:p>
      <text:p text:style-name="P7">Alicuius speciei hoc individuum est asinus, et</text:p>
      <text:p text:style-name="P7">Hoc individuum est asinus, et sic de singulis.</text:p>
      <text:p text:style-name="P10"/>
      <text:p text:style-name="P283">Etiam ponendo signum ⟨a⟩ ante ly ‘hominis’.</text:p>
      <text:p text:style-name="P284">Nec sequitur:</text:p>
      <text:p text:style-name="P7">⟨<text:span text:style-name="T104">a⟩ Quodlibet ente quodlibet differens est ens; ergo</text:span></text:p>
      <text:p text:style-name="P7">⟨<text:span text:style-name="T104">a⟩ Quodlibet ente hoc differens est ens.</text:span></text:p>
      <text:p text:style-name="P7"/>
      <text:p text:style-name="P284">Nec sequitur:</text:p>
      <text:p text:style-name="P7">Cuiuslibet hominis quilibet asinus est asinus; ergo</text:p>
      <text:p text:style-name="P7">Cuiuslibet hominis iste asinus est asinus.</text:p>
      <text:p text:style-name="P7"/>
      <text:p text:style-name="P285">Ponendo constantiam, quam ob breviloquium crebrius suppono. Prius sub determinatione descendendum est, postea sub determinabili descendes. Et licet ascendendo et descendendo sub determinatione determinabile non pro tot accipitur in ascendenti et descendenti, sicut in descensa et ascensa nihil impedimenti est, pro tot accipitur in omnibus singularibus iunctis.</text:p>
      <text:p text:style-name="P286">Dictum est distributione stipata si non fuerit distributio ut “Hominis asinus currit” a termino ‘asinus’ sicut a termino ‘hominis’ exordiri potes.</text:p>
      <text:h text:style-name="P703" text:outline-level="4">Arguitur</text:h>
      <text:p text:style-name="P287">Contra regulam arguitur ponendo quod quilibet homo habeat praecise unum /77/ asinum, et nullus sit asinus non possessus, tunc haec est vera “⟨a⟩ Hominis quilibet asinus quilibet asinus est”, cum ex hac sequatur “Quilibet asinus hominis quilibet asinus est”, sic quod ‘hominis’ determinat secundum terminus ‘asinus’ et praedicatum istius ponatur a parte subiecti in altera. Tunc ideo potes tentare descensum primo a determinatione, quia descendentes erunt inutiles, et descensa nota vera.</text:p>
      <text:h text:style-name="P703" text:outline-level="4">Respondetur</text:h>
      <text:p text:style-name="P288">Respondetur: Hoc argumentum quaerit explicationem ultimae particulae textus. Pro cu<text:span text:style-name="T107">ius intelligentia ulteriori dicitur, quando est determinatio accepta, non unica acceptione cum suo determinabili, stans confuse tantum respectu alterius extremi distributi, suo determinabili distributo vel confuse tantum stante, tunc incohandus est ascensus, et probatio ab altero extremo distributo, ut:</text:span></text:p>
      <text:p text:style-name="P10">⟨a⟩ Hominis quilibet asinus quilibet asinus est; ego</text:p>
      <text:p text:style-name="P10">⟨a⟩ Hominis quilibet asinus iste asinus est, et</text:p>
      <text:p text:style-name="P10"><text:soft-page-break/>⟨a⟩ Hominis quilibet asinus iste asinus est, et sic de singulis.</text:p>
      <text:p text:style-name="P10"/>
      <text:p text:style-name="P289">Modo habitis his singularibus a parte praedicati virtualiter determinatio accipitur determinate.</text:p>
      <text:p text:style-name="P290">Idem enim est dicere “⟨a⟩ Hominis quilibet asinus iste asinus est, et Hominis quilibet asinus iste asinus est”. Nunc aggredere descensum aut ascensum sub determinatione, quia est terminus primo probabilis. Si enim post descensum a parte praedicati sub determinabili descenderes, multas singulares falsas haberes et tamen descensa est vera.</text:p>
      <text:p text:style-name="P290">Ista enim consequentia nihil valet:</text:p>
      <text:p text:style-name="P7">⟨a⟩ Hominis quilibet asinus quilibet asinus est; ergo</text:p>
      <text:p text:style-name="P7">⟨a⟩ Hominis iste asinus quilibet asinus est.</text:p>
      <text:p text:style-name="P7"/>
      <text:p text:style-name="P291">Arguitur enim a suppositione confusa tantum virtualiter ad determinatam respectu multitudinis. Obliquus enim in descensa formaliter et virtualiter respectu praedicati distributi stat confuse tantum in descendentibus vero, licet formaliter stet confuse tantum, virtualiter stat determinate, cum idem sit dicere:</text:p>
      <text:p text:style-name="P7">⟨a⟩ Hominis iste asinus quilibet asinus est; et</text:p>
      <text:p text:style-name="P7">Hominis iste asinus quilibet asinus est.</text:p>
      <text:p text:style-name="P7"/>
      <text:p text:style-name="P291">Et dato quod arguatur a confusa ad determinatam in valore <text:span text:style-name="T108">respectu praedicati distributi, non est inconveniens.</text:span></text:p>
      <text:p text:style-name="P292">Verum si determinabile supponat determinate, et determinatio confuse tantum respectu alterius extremi distributi, ascende primo a determinabili, quia est terminus primo probabilis, licet sine errore ab alio extremo distributo exordiri vale.</text:p>
      <text:p text:style-name="P292">Fac periculum tu ipse in hac “⟨a⟩ Hominis asinus non est asinus”, et sicut in ista “Alicuius hominis quilibet asinus est currens”, ascendendum est primo sub determinatione stante determinate, ita in sua contradictoria “Cuiuslibet hominis ⟨b⟩ asinus non est currens”. Primo termino ‘hominis’ ascendes et descendes.</text:p>
      <text:p text:style-name="P292">Si practicabis:</text:p>
      <text:p text:style-name="P7">Istius hominis ⟨b⟩ asinus non est currens, et</text:p>
      <text:p text:style-name="P7">Istius hominis ⟨b⟩ asinus non est currens; ergo</text:p>
      <text:p text:style-name="P7">Cuiuslibet hominis ⟨b⟩ asinus non est currens.</text:p>
      <text:p text:style-name="P7"/>
      <text:p text:style-name="P292">Sed hic non addes relativum identitatis determinabili in aliis singularibus a prima, et licet inibi a pluribus determinatis arguatur respectu multitudinis, hoc non inconvenit quando terminus respectu cuius arguatur stat determinate in antecedente, respectu termini distributi, sicut in consequenti, ut in syllogismis patet.</text:p>
      <text:p text:style-name="P292">Secundo: cum veritatem aut falsitatem affirmativae per descensum /78/ et ascensum venatus est, fatiga amplius fodere ascensum et descensum in negativa. Et, quod inutile est, fortasse etiam negative sic descendere formaliter potes “Cuiuslibet hominis iste asinus est asinus”.</text:p>
      <text:h text:style-name="P702" text:outline-level="3"><text:soft-page-break/>Quarta regula</text:h>
      <text:p text:style-name="P11">Quarta regula: Quando terminus stat determinate respectu termini distributi, primo a termino stante determinate descendatur, et illo modo propositionum falsitates cribrantur, sicut earum veritates ascendendo sub termino distributo, respectu termini stantis confuse tantum.</text:p>
      <text:p text:style-name="P293">Exemplariter regulae quartae utraque pars detegitur “Caput omnis ho<text:span text:style-name="T109">mo habet”, “Animal omnis homo est”, et tales cognoscuntur per descensum falsae, nam bene sequitur:</text:span></text:p>
      <text:p text:style-name="P7">Caput omnis homo habet; ergo</text:p>
      <text:p text:style-name="P7">Hoc caput omnis homo habet, vel</text:p>
      <text:p text:style-name="P7">Illud caput omnis homo habet, et sic de singulis.</text:p>
      <text:p text:style-name="P7"/>
      <text:p text:style-name="P294">Similiter:</text:p>
      <text:p text:style-name="P7">Animal omnis homo est; ergo</text:p>
      <text:p text:style-name="P7">Hoc animal omnis homo est, vel</text:p>
      <text:p text:style-name="P7">Illud animal omnis homo est, et sic de singulis.</text:p>
      <text:p text:style-name="P7"/>
      <text:p text:style-name="P294">Eadem via istae deprehenduntur falsae “<text:span text:style-name="T110">Aliqua pars magnitudinis est minor parte magnitudinis”, “Aliqua pars magnitudinis qualibet parte magnitudinis est minor”.</text:span></text:p>
      <text:p text:style-name="P295">Per posteriorem partem regulae patet has esse veras: “Quilibet homo est unus solus homo”, “Omnis homo habet caput”, “Omnis homo est animal”, “In quolibet regno est unus rex”, “Quilibet homo est aliquis homo”, “Omnis homo est non omnis homo”, “Qualibet parte magnitudinis dabilis est aliqua pars minor”.</text:p>
      <text:p text:style-name="P296">Et casu quo nullus est onager, et quilibet homo habe<text:span text:style-name="T111">a</text:span>t praecise unum asinum, <text:span text:style-name="T111">istae sunt concedendae “Quilibet asinus hominis quilibet asinus est”, ut ‘hominis’ determinat posteriorem terminum ‘asinus’ “⟨a⟩ Hominis quilibet asinus quilibet asinus est”, “⟨a⟩ Hominis quilibet asinus quilibet asinus non est”, “⟨a⟩ Hominis quilibet asinus a quolibet asino differt”, “⟨a⟩ Hominis quilibet asinus a nullo asino differt”.</text:span></text:p>
      <text:h text:style-name="P702" text:outline-level="3">Quinta regula</text:h>
      <text:p text:style-name="P11"><text:span text:style-name="T112">Quinta regula: Ne a suppositione confusa tantum determinatam respectu multitudinis arguatur, maximopere cavendum est.</text:span><text:span text:style-name="T111"> </text:span><text:s text:c="2"/></text:p>
      <text:p text:style-name="P5">Quare non sequitur:</text:p>
      <text:p text:style-name="P7">Cuiuslibet hominis asinus non currit; ergo</text:p>
      <text:p text:style-name="P7">Istius hominis sinus non currit.</text:p>
      <text:p text:style-name="P7"/>
      <text:p text:style-name="P5">Nec sequitur:</text:p>
      <text:p text:style-name="P7"><text:soft-page-break/>Omni tempore homo non est animal; ergo</text:p>
      <text:p text:style-name="P7">Isto tempore homo non est animal.</text:p>
      <text:p text:style-name="P7"/>
      <text:p text:style-name="P5">Nec sequitur:</text:p>
      <text:p text:style-name="P7">⟨<text:span text:style-name="T113">a⟩ Homo non est animal; ergo</text:span></text:p>
      <text:p text:style-name="P7">Iste vel Iste homo non est animal.</text:p>
      <text:p text:style-name="P9"/>
      <text:p text:style-name="P297">Contra: Descensum et ascensum paululum insistamus quatenus melius intelligatur.</text:p>
      <text:h text:style-name="P709" text:outline-level="4">Arguitur</text:h>
      <text:p text:style-name="P298">Contra. <text:span text:style-name="T114">N</text:span>on sequitur:</text:p>
      <text:p text:style-name="P7">Iste homo currit et</text:p>
      <text:p text:style-name="P7">Iste homo currit, et sic de aliis; ergo</text:p>
      <text:p text:style-name="P7">Omnis homo currit.</text:p>
      <text:p text:style-name="P7"/>
      <text:p text:style-name="P298">Quia si quattuor homines currant, antecedens est verum et consequens falsum.</text:p>
      <text:p text:style-name="P298">Dicis aliis, tantum valet quantum et sic de singulis, ita quod omnis supposita non dinumerata intelligantur, et ascendendo copulative intelligantur, et in ascensu disiunctivo proportionaliter, et per consequens aequivoce in sensu copulativo et disiunctivo capitur.</text:p>
      <text:p text:style-name="P298">Contra: Adhuc illa consequentia /79/ nihil valet, quia interdum ita esse potest sicut significatur per antecedens consequente existente falso, posito quod postea alii homines nascantur.</text:p>
      <text:h text:style-name="P703" text:outline-level="4">Secundo</text:h>
      <text:p text:style-name="P299">Secundo arguitur. Non sequitur:</text:p>
      <text:p text:style-name="P7">Omne ens est; ergo</text:p>
      <text:p text:style-name="P7">Hoc est ens, et</text:p>
      <text:p text:style-name="P7">Hoc ens est, et sic de singulis.</text:p>
      <text:p text:style-name="P9"/>
      <text:p text:style-name="P300">Et tamen est descensus, igitur. Maior patet, antecedens est necessarium et consequens contingens.</text:p>
      <text:h text:style-name="P703" text:outline-level="4">Tertio</text:h>
      <text:p text:style-name="P301">Tertio arguitur: <text:span text:style-name="T115">In ascensu arguitur a non distributo ad distributum, modo talis consequentia nihil valet de forma, igitur.</text:span></text:p>
      <text:h text:style-name="P703" text:outline-level="4">Quarto</text:h>
      <text:p text:style-name="P302">Quarto arguitur: Non sequitur “Iste homo est iste homo, et Iste homo est iste homo”, semper demonstrando idem a parte subiecti et praedicati et tamen est descensus. Demonstratur omnia supposita subiecti pro quibus terminus ‘homo’ distribuitur, igitur.</text:p>
      <text:h text:style-name="P703" text:outline-level="4"><text:soft-page-break/>Ad primum</text:h>
      <text:p text:style-name="P303">Ad primum: Ad finem usque inter arguendum <text:span text:style-name="T116">responsum est, nec illa consequentia valet ut argumentum probat, quia antecedens significans secundum significationem secundum quam nunc significat, erit verum quando consequens erit falsum, et hoc ad consequentiae malitiam sufficit. Sed bene verum est quod illo tempore quo consequens est falsum, si omnia singularia subiecti consequentia capiantur, antecedens erit falsum, opus est constantia in illa consequentia.</text:span> </text:p>
      <text:h text:style-name="P703" text:outline-level="4">Ad secundum</text:h>
      <text:p text:style-name="P304">Ad secundum: Concedo maiorem et negetur minor. Constantia est pars antecedentis et tunc antecedens erit contingens sicut consequens.</text:p>
      <text:p text:style-name="P304">Saepius universalis est necessaria et singulares plurimae contingentes, immo nulla singularis huius “Omne ens est”, in qua pura creatura demonstratur, est necessaria. Sola illa singularis Deum demonstrans est necessaria. Haec autem “Homo est animal” secundum Aristotelem est necessaria, et quaelibet singularis eius contingens. Et eodem modo hic “Omne animal in hac domo est equus” illa est continges, et quaelibet singularis eius est impossibilis, posito quod soli homines sint in hac domo, universalis et constantia ob partium incompossibilitatem sunt copulativa impossibilis.</text:p>
      <text:h text:style-name="P703" text:outline-level="4">Ad tertium</text:h>
      <text:p text:style-name="P305">Ad tertium dicitur: Talis consequentia est formalis in ascensu, hoc alibi etiam verum habet de forma, patet in his:</text:p>
      <text:p text:style-name="P7">Si homo currit animal currit, sed</text:p>
      <text:p text:style-name="P7">Nullum animal currit; ergo</text:p>
      <text:p text:style-name="P7">Nullus homo currit.</text:p>
      <text:p text:style-name="P7"/>
      <text:p text:style-name="P7">Sortes ab homine non differt; ergo</text:p>
      <text:p text:style-name="P7">Sortes non differt ab homine.</text:p>
      <text:p text:style-name="P7"/>
      <text:p text:style-name="P7">Homo est homo; ergo</text:p>
      <text:p text:style-name="P7">Omnis homo est homo.</text:p>
      <text:p text:style-name="P7"/>
      <text:p text:style-name="P7">Tantum animal omnis homo est; ergo</text:p>
      <text:p text:style-name="P7">Tantum animal est homo.</text:p>
      <text:p text:style-name="P7"/>
      <text:h text:style-name="P703" text:outline-level="4">Ad quartum</text:h>
      <text:p text:style-name="P306">Ad quartum: Concedo maiorem et negetur minor, non demonstrantur omnia supposita debite, per illam denotatur quod de quocumque verum est dicere quod est homo, de illo verum est dicere quod omnis homo est.</text:p>
      <text:p text:style-name="P306">Oportet cum Sorte a parte subiecti quemlibet hominem a parte praedicati demonstrare, et cum Platone a parte subiecti quemlibet hominem a parte praedicati demonstrare, et ita cum quolibet alio.</text:p>
      <text:p text:style-name="P307">At fortasse dicis: Aliquam universalem istae singulares inferunt et nullam nisi hanc, igitur.</text:p>
      <text:p text:style-name="P307"><text:soft-page-break/>Respondetur: Minor est falsa, hanc inferunt “Omnis homo est ipsemet vel ipsamet”, quae late ab alia differt, et sic de hac “Omnes homines sunt duo homines”, “Omnes homines sunt tres homines”, et istae propositiones non sunt verae, duobus contradictoriis demonstratis, et istae non sunt verae, duobus aliis demonstratis, et sic de singulis contradictoriis /80/; ergo nulla propositiones sunt verae.</text:p>
      <text:p text:style-name="P307">Vide semper pro quibus est distributio, et secundum illud descende et ascende, et sic hic “Omnis homo est animal” et econverso.</text:p>
      <text:h text:style-name="P703" text:outline-level="4">Arguitur quinto</text:h>
      <text:p text:style-name="P308">Quinto arguitur: <text:span text:style-name="T117">Non sequitur:</text:span></text:p>
      <text:p text:style-name="P7">Nullum caput omnis homo habet; ergo</text:p>
      <text:p text:style-name="P7">Nullum caput iste homo vel iste homo habet.</text:p>
      <text:p text:style-name="P7"/>
      <text:p text:style-name="P310">Et tamen est descensus disiunctus, igitur.</text:p>
      <text:h text:style-name="P703" text:outline-level="4">Sexto</text:h>
      <text:p text:style-name="P310">Sexto. Non sequitur per descensum:</text:p>
      <text:p text:style-name="P7">Omnis homo est animal; ergo</text:p>
      <text:p text:style-name="P7">Omnis homo est hoc animal vel hoc animal, et sic de singulis.</text:p>
      <text:p text:style-name="P7"/>
      <text:p text:style-name="P309"><text:span text:style-name="T118">Et tamen est descensus, igitur. Maior patet, quia illud disiunctim descendere in abyssum, quod est inconveniens.</text:span> </text:p>
      <text:h text:style-name="P703" text:outline-level="4">Septimo</text:h>
      <text:p text:style-name="P311">Septimo arguitur. Non sequitur:</text:p>
      <text:p text:style-name="P7">Omne animal fu<text:span text:style-name="T119">it in archa Noe; ergo</text:span></text:p>
      <text:p text:style-name="P7">Hoc animal fuit in archa Noe, et</text:p>
      <text:p text:style-name="P7">Illud animal fuit in archa Noe.</text:p>
      <text:p text:style-name="P7"/>
      <text:p text:style-name="P312">Quia posito quod animal pro generibus singulorum et non pro singulis generum in antecedente distribuatur, antecedens est verum et consequens est falsum.</text:p>
      <text:h text:style-name="P703" text:outline-level="4">Octavo</text:h>
      <text:p text:style-name="P312">Octavo. Non sequitur:</text:p>
      <text:p text:style-name="P7">Uterque homo currit; ergo</text:p>
      <text:p text:style-name="P7">Iste homo currit et Iste homo currit, et sic de singulis.</text:p>
      <text:p text:style-name="P7"/>
      <text:p text:style-name="P313">Quia posito quod duo homines currant, antecedens est verum et consequens est falsum, et tamen est descensus, igitur.</text:p>
      <text:h text:style-name="P703" text:outline-level="4"><text:soft-page-break/>Ad quintum</text:h>
      <text:p text:style-name="P313">Ad quintum. Negetur minor, error est trabeus arguendo a non distributo ad distributum. Oportet dicere “Nullum <text:span text:style-name="T120">caput omnis iste homo vel iste homo habet”, vel resolvere istam in hanc “Omne caput homo non habet”, et tunc facile est illic descendere.</text:span></text:p>
      <text:h text:style-name="P703" text:outline-level="4">Ad sextum</text:h>
      <text:p text:style-name="P314">Ad sextum respondeo: Nihil mali est, immo expediret non descendere sub termino stante confuse tantum disiunctim. Descensus et ascensus sunt pro propositionum veritatibus aut falsitatibus cribrandis, quae per disiuncta minime indagantur sed delitescunt. Sed pro inoportuno descendatur disiunctim quousque habeatur unum disiunctum expressum et illic sit quies, quod si otiosus quintum pedem in ariete venetur in abyssum descendat.</text:p>
      <text:p text:style-name="P314">Quando disiunctim tamen stat determinate vel distributive, facile per descensum et ascensum propositionum veritate deprehendere potes.</text:p>
      <text:h text:style-name="P703" text:outline-level="4">Ad septimum</text:h>
      <text:p text:style-name="P314">Ad septimum: Concedo quod non sequitur quando est distributio pro generibus singulorum descendes et ascendes mixtim, partim copulative, partim disiunctive.</text:p>
      <text:p text:style-name="P315">Demonstrabis enim omnia supposita unius speciei disiunctive et copulative. Primum individuum secundae speciei capies sub disiunctione ad omnia alia individua secundae speciei, et sic in aliis speciebus practicabis, ut “Istud animal fuit in archa Noe (demonstrando Sortem), vel Istud animal fuit in archa Noe (demonstrando Platonem)”, et sic disiunctive omnes homines pro quibus terminus supponit capies, et capiendo primum individuum asini dices “et Hoc animal fuit in archa Neo (sub disiunctione ad omnes asinos), et Hoc animal fuit in archa Noe” demonstrando unum equum, et sic consequenter et ratio per illam denotatur, quod de qualibet specie animalis aliquod animal fuit in archa Noe.</text:p>
      <text:p text:style-name="P315">Et sufficit cuiuscumque speciei hoc individuum vel illud, dummodo copulative species colligantur. De speciebus loquor, quarum individua non generantur generatione spontanea, nec poterant vivere extra aquas, vel quae /81/ generantur communiter ab individuis diversarum specierum. Et hic non capimus species logicaliter, sed sicut Horatius inquiens Mille hominum species et rerum discolor usus.</text:p>
      <text:p text:style-name="P315"><text:span text:style-name="T121">Contradictorio modo, in suo contradictorio procedas disiunctive sub copulatione de formalitate descensus aut ascensus, modo veritas aut falsitas deprehendatur minime curandum est. </text:span><text:s/></text:p>
      <text:p text:style-name="P316">Secundo potes pure copulative ascendere et descendere, dummodo proportionabiliter singularizes pro generibus singulorum ad distributionem, ut “Istud animal fuit in archa Neo”, hoc est istius speciei aliquod animal fuit in archa Neo, hic non est completa singularizatio.</text:p>
      <text:p text:style-name="P316">Subiectum enim per aequivalentiam sumptum pro pluribus accipitur. Quare ista consequentia est nulla:</text:p>
      <text:p text:style-name="P7">Hoc animal fuit in archa Neo (me demonstrando), et</text:p>
      <text:p text:style-name="P7">Hoc animal fuit Iohannes; ergo</text:p>
      <text:p text:style-name="P7">Iohannes fuit in archa Noe. </text:p>
      <text:p text:style-name="P7"><text:soft-page-break/></text:p>
      <text:p text:style-name="P316">Terminus singularizatus pro generibus singulorum non est pure discretus, et per consequens ad syllogismum expositorium est inhabilis, quare haec “Hoc animal non fuit in archa Noe”, demonstrando Sortem, et terminum ‘animal’ discrete singularizando, non contradicit huic “Hoc animal fuit in archa Noe” eodem demonstrato, incomplete singularizando, est in una virtualis particularitas, et per consequens si in utraque est singularizat<text:span text:style-name="T122">i</text:span>o incompleta non est contradictio.</text:p>
      <text:p text:style-name="P317">In contradictoria universalis, universalis erit particularizatio, di<text:span text:style-name="T122">cto modo “Non omne animal fuit in archa Noe”, quia Iohannes non fuit in archa Noe, et Iohannes est animal, nihil contra contradictoriam eius, cum in illo sensu non contradicit universali illi.</text:span></text:p>
      <text:h text:style-name="P703" text:outline-level="4">Ad octavum</text:h>
      <text:p text:style-name="P318">Ad octavum dicitur: Aliqui dicunt illam impropriam, et dicunt haec signa ‘uterque’ neuter non posse apte in propositione poni nisi cum pronomine demonstrativo, ut “Uterque istorum currit”.</text:p>
      <text:p text:style-name="P318">Sed contra, communiter dicimus “Neutrum oculum habendo, tu potes videre”. Illa ergo admissa propria dicitur, oportet demonstrare duos homines copulative sub disiunctione in ordine ad alios, quia ad illius propositionis veritatem sufficit quoscumque duos currere, et quia de quibuscumque duobus parilis est ratio, omnes duos sub disiunctione dabis, opposito modo in suo contradictorio disiunctive sub copulatione.</text:p>
      <text:h text:style-name="P703" text:outline-level="4">Arguitur nono</text:h>
      <text:p text:style-name="P318">Non arguitur, non sequitur:</text:p>
      <text:p text:style-name="P7">Iste homo currit, et Alius ab eo currit, et sic de singulis; ergo</text:p>
      <text:p text:style-name="P7">Quilibet homo currit et Alius ab eo currit.</text:p>
      <text:p text:style-name="P7"/>
      <text:p text:style-name="P318">Quia si soli homines currerent, antecedens est verum et consequens falsum.</text:p>
      <text:h text:style-name="P703" text:outline-level="4">Decimum</text:h>
      <text:p text:style-name="P318">Decimo arguitur, non sequitur:</text:p>
      <text:p text:style-name="P7">Isti duo apostoli et isti duo apostoli et sic de singulis copulatim sunt duodecim; ergo</text:p>
      <text:p text:style-name="P7">Omnes duo apostoli dei sunt duodecim.</text:p>
      <text:p text:style-name="P7"/>
      <text:p text:style-name="P318">Et tamen est ascensus.</text:p>
      <text:p text:style-name="P318">Maior patet, quia antecedens est verum et consequens falsum, cum extrema non supponant pro eodem.</text:p>
      <text:h text:style-name="P703" text:outline-level="4">Undecimum</text:h>
      <text:p text:style-name="P319">Undecimo arguitur, non sequitur:</text:p>
      <text:p text:style-name="P7">Quasi quilibet homo currit; ergo</text:p>
      <text:p text:style-name="P7">Iste homo currit, et Iste homo currit, et sic de singulis.</text:p>
      <text:p text:style-name="P7"/>
      <text:p text:style-name="P319">Cum si essent solum quinque homines quorum quattuor currant, et unus quiescat, antecedens est verum et consequens falsum.</text:p>
      <text:h text:style-name="P703" text:outline-level="4"><text:soft-page-break/>Ad nonum</text:h>
      <text:p text:style-name="P320">Ad nonum concedo maiorem: <text:span text:style-name="T123">Arguitur enim a pluribus determinatis respectu multitudinis ex parte de ly ‘alius’, et ascenditur sub determinatione /82/ accepta unica.</text:span></text:p>
      <text:h text:style-name="P703" text:outline-level="4">Ad decimum</text:h>
      <text:p text:style-name="P320"><text:span text:style-name="T123">Ad decimum: Nego maiorem, et ad probationem concedo antecedens esse verum, et nega falsitatem consequentis. Immo extrema supponunt pro eisdem, omnes duo pro duodecim supponit. Eadem via probatur haec vera: “Omnes tres apostoli Dei sunt duodecim”, “Omnes quattuor apostoli Dei sunt duodecim”, “Omnes apostoli Dei qui sunt pauciores duodecim, sunt duodecim”. Ut ‘</text:span><text:span text:style-name="T124">o</text:span><text:span text:style-name="T123">mnes’ determina hoc totum ‘apostoli Dei’ qui sunt pauciores duodecim, et ut relativum referat solum ly ‘apostoli Dei’. Tunc enim ascendere oportet sub illo toto ‘apostoli Dei’ qui sunt pauciores duodecim.</text:span></text:p>
      <text:p text:style-name="P321"><text:span text:style-name="T123">Si tamen referat hoc totum ‘Omnes apostoli Dei’, </text:span><text:span text:style-name="T125">falsa erit propositio, quia sensus erit “Omnes apostoli Dei qui omnes apostoli Dei sunt pauciores duodecim, sunt duodecim”.</text:span></text:p>
      <text:h text:style-name="P703" text:outline-level="4">Replica</text:h>
      <text:p text:style-name="P322">At dicis: Non est ascensus cum totale illud copulatum non est inferius ad terminum ad quem ascenditur.</text:p>
      <text:h text:style-name="P703" text:outline-level="4">Responsio</text:h>
      <text:p text:style-name="P322">Respondetur: Sufficit quamlibet partem copulati per unum pronomen sumpti esse inferiorem ad terminum ad quem ascenditur. Immo doctor has propositiones negans, ponit ascensum copulatum sub termino ‘homo’ in hac “Nullum caput omnis homo habet”, et notum est quod copulatum singularium non est inferius ad terminum sub quo ascenditur.</text:p>
      <text:h text:style-name="P703" text:outline-level="4">Ad undecimum</text:h>
      <text:p text:style-name="P322">Ad undecimum respondetur: Subiectum illius universalis non distribuitur absolute pro quolibet homine. Quasi tollit aliquid a se a distributione de ly ‘quilibet’, propterea ei additur.</text:p>
      <text:p text:style-name="P323">Debet in primis videre quid per huiuscemodi propositionem significetur, et secundum hoc ascendere et descendere. Si enim praecise quattuor homines in mundo, quorum tres current, illa concederetur, quasi quilibet homo currit. Descende ergo quasi “Iste homo currit, et Iste homo currit, et Iste homo currit, et sic de singulis” ut quasi cadat super totam copulativam qualiter super terminum distributum cecidit.</text:p>
      <text:p text:style-name="P324">Ex quo fit quod si essent praecise duo homines quorum alter solum curreret, utraque istarum est vera “Quasi quilibet homo currit, Quasi quilibet homo non currit”. Et si sit distributio accommoda, ut in hac “Caelum tegit omnia” demonstra descendendo alia omnia a caelo.</text:p>
      <text:p text:style-name="P324">Et in hac “Ominis homo est animal” et econverso, si econverso dicat conversionem simplicem, non sufficit solos homines demonstrare, sed omnia bruta.</text:p>
      <text:p text:style-name="P40"/>
      <text:h text:style-name="P699" text:outline-level="2">Sequitur <text:span text:style-name="T451">D</text:span>e relativis</text:h>
      <text:p text:style-name="P32">Sequitur <text:span text:style-name="T451">D</text:span>e relativis.</text:p>
      <text:h text:style-name="P703" text:outline-level="4">Relativum et eius divisio</text:h>
      <text:p text:style-name="P11">Relativum grammaticale est terminus rei antelatae recordationem faciens. Et seiungitur, nam quoddam est identitatis quoddam vero diversitatis.</text:p>
      <text:p text:style-name="P325">Superius de terminorum absolutorum suppositione utcumque locuti sumus.</text:p>
      <text:p text:style-name="P325">In secundo loco in speciali, <text:span text:style-name="T126">de relativorum suppositione dicemus supponentes quo absolutum interdum contra connotativum distinguitur, ut quando terminum in absolutum et connotativum partimur. Quandoque distinguitur contra relativum logicale, et sic vocamus terminos novem aliorum praedicamentorum comparative ad aliquid absolutos, quia absolvuntur a convertentia relativi et correlativi.</text:span></text:p>
      <text:p text:style-name="P330">Impraesentiarum, absolutum contra /83/ relativum distinguimus, et de relativo grammaticali de per se logicalem autem de per accidens loquimur.</text:p>
      <text:p text:style-name="P330">Idem et diversum sunt relativa logicalia, quae nobis non sunt curae impraesentiarum inquantum huiusmodi, sed inquantum sunt relativa grammaticalia.</text:p>
      <text:h text:style-name="P703" text:outline-level="4">Relativum grammaticale</text:h>
      <text:p text:style-name="P331">Relativum grammaticale est terminus faciens memoriam rei antelatae, et interdum certius qua si poneretur antecedens, ut quando diximus “Sanctus Iacobus est in Compostella”, et idem inter apostolos passus est, certius enuntiamus qua si diceremus, et Iacobus inter apostolos passus est primus propter ambiguitatem Iacobi fratris domini.</text:p>
      <text:h text:style-name="P703" text:outline-level="4">Relativum triplex</text:h>
      <text:p text:style-name="P326"><text:span text:style-name="T127">Triplex est relativum: referens tantum, </text:span><text:span text:style-name="T128">relatum tantum, referens et relatum simul.</text:span></text:p>
      <text:p text:style-name="P327"><text:span text:style-name="T128">Haec omnia exempla manifesta erunt “Iacobus Alphei est et ille Iacobus Alphei est Iacobus minor”. Illic ly ‘ille’ est relativum referens tantum et syncategorema significatione, quia immediate iungitur suo antecedenti. ‘Iacobus Alphei’ est relativum relatum tantum, quia esse relativum relatum non est esse relativum simpliciter et illud aggregatum est relativum referens et relatum simul, et hoc totum supponit quemadmodum ‘</text:span><text:span text:style-name="T129">i</text:span><text:span text:style-name="T128">ste homo’ </text:span><text:span text:style-name="T129">in hac “Iste homo currit”, licet pronomen ‘iste’ non supponit.</text:span></text:p>
      <text:p text:style-name="P332">Interdum capitur relativum categorematice et syncategorematice, ut Aiax Telamonius fuit apud Troiam, et ille fuit pugnacissimus”. Ly ‘ille’ includit relativum relatum, quia suppositio eius ab illo dependet, quemadmodum de sito termino econverso diximus in substantia propositionis, et sic in voce quando varia refer aequivoce accipitur, et per hoc intelligere potes quomodo in mente non cadit a sua significatione: Est propositio affirmativa ad cuius veritatem requiritur quod sit, et quod non amplius significet.</text:p>
      <text:p text:style-name="P328"><text:soft-page-break/><text:span text:style-name="T130">Ille interdum capitur gratia maioris explicationis, ut apud Maronem “Ille ego qui quodam gracili modulatus avena carmen”. Interdum indefinite, ut Plato “Ille philosophorum deus” tunc capitur cum eminentia. Interdum demonstra</text:span><text:span text:style-name="T131">tive, sed sic vocabulum non accipimus, sed solum relative.</text:span></text:p>
      <text:h text:style-name="P703" text:outline-level="4">Relativum substantiae</text:h>
      <text:p text:style-name="P333">Praeterea relativorum quoddam substantiae, quoddam vero accidentis. Et relativorum substantiae quoddam identitatis, quoddam diversitatis.</text:p>
      <text:p text:style-name="P333">Exemplum secundi, ut Ulysses dolo tendit insidia et alius ab eo pugnat. Licet alius ab eo accipiatur pro alio qua pro illo pro quo propositio antecedentis verificatur, tamen mentionem facit de re antelata, et hoc sufficit ad relativum.</text:p>
      <text:p text:style-name="P334">Propterea rationes aliquorum artistarum probantium nullum esse relativum diversitatis non sunt ponderandae, de relativis quia erit sermo posthac, non est opus exemplificare. Unde relativum non ideo dicitur relativum substantiae quia ponitur in praedicamento substantiae, vel quia termino illius praedicamenti refert, sed quia crebriter substantivum refert, vel quia refert suum antecedens, non connotando aliquam dispositionem accidentalem adiacere rei pro qua supponit suum antecedens, nec alicui rei illi aequiparatae, ut ista relativa: ‘suus’, ‘ipse’, ‘sui’.</text:p>
      <text:p text:style-name="P335">Sed dicitur relativum accidentis quia est relativum referens suum antecedens, connotando aliquam dispositionem accidentalem adiacere rei pro qua supponit suum antecedens, vel rei illi comparatae, ut isti termini: ‘talis’, ‘qualis’, ‘tantus’, ‘quantus’, et sic /84/ de aliis.</text:p>
      <text:p text:style-name="P336">Dicitur notanter vel rei illi comparatae. Nam dicendo “Sortes est albus, et Talis est Plato”, ly ‘talis’ dicitur relativum accidentis, non quia connotat aliquam dispositionem adiacere Sorti, sed illi rei comparatae Sorti, scilicet Platoni.</text:p>
      <text:h text:style-name="P703" text:outline-level="4">Relativum identitatis</text:h>
      <text:p text:style-name="P337">Caeterum relativum identitatis quoddam est reciprocum, quoddam vero non reciprocum, quod communius non ponitur in aedem categorica cum suo antecedenti.</text:p>
      <text:p text:style-name="P337">Trifariam tamen in eadem categorica cum suo antecedenti poni potest, ut quando cum copula implicationis ponitur, ut “Sortes qui currit movetur”.</text:p>
      <text:p text:style-name="P337">Secundo quando relativum infert antecedens quod est pars minus principalis extremi, ut “Homo habens equum equitat illum”.</text:p>
      <text:p text:style-name="P337">Tertio quando refert partem disiuncti aut alterius complexi, ut “Omnis propositio vel eius contradictoria est vera”.</text:p>
      <text:p text:style-name="P337">De relativo reciproco posthac erit sermo.</text:p>
      <text:p text:style-name="P338">Praeterea, scito variam inter artistas esse opinionem de suppositione relativi et de eius modo referendi, aliquibus dicentibus quod relativum refert suum antecedens sine comparatione aliorum terminorum. Sed haec opinio habet concedere hanc copulativam “Animal est asinus, et Illud est Homo”, cum sensus secundae partis esset “Animal est homo”, hoc est, contra communem conceptionem hominem.</text:p>
      <text:p text:style-name="P329"><text:soft-page-break/><text:span text:style-name="T132">Alii dicunt quod supponit pro omni illo pro quo verificatur propositio antecedentis, sive sit copulativa sive disiunctiva. Sed tunc sequitur quod haec disiunctiva est falsa (Sorte non currente) “Sortes currit vel ipse quiescit”, cum sensus secundae partis esset “</text:span><text:span text:style-name="T133">Sortes quod currit quiescit”.</text:span></text:p>
      <text:p text:style-name="P339">Communiter hanc negamus “Deus non est si ipse est omnipotens”, et tunc si ‘ipse’ referat restricte, antecedens esset impossibile, et per consequens conditionalis vera.</text:p>
      <text:p text:style-name="P23"><text:span text:style-name="T133">Propterea conformiter ad communem hominem conceptionem ponam illa quae videbuntur communiora et saniora pondera. Quare dixerim secundum communem hominem conceptionem, quia interdum varii contradictorio modo concipiunt, tunc inertis est </text:span><text:span text:style-name="T134">confidere</text:span><text:span text:style-name="T133"> in propria conceptione, sed aliis modis tunc innitendum est.</text:span></text:p>
      <text:h text:style-name="P702" text:outline-level="3">Circa relativa quinque breves regulas pono, quarum prima est</text:h>
      <text:p text:style-name="P11">Circa relativa quinque breves regulas pono, quarum prima est:</text:p>
      <text:p text:style-name="P11">Relativum substantiae identitatis in copulativa affirmativa positum, relatione personali referens suum antecedens in categorica affirmativa, quod est totale extremum vel extremi principalior pars, accipitur pro illo solo pro quo propositio antecedentis verificari denotatur, dummodo non amplietur ad standum pro pluribus, nec restringatur ad standum pro paucioribus.</text:p>
      <text:p text:style-name="P340">Haec prima regula in multis ob claritatem commentarii non eget, tenebrosiora tamen explanabo.</text:p>
      <text:p text:style-name="P341">Duplex est relatio, quaedam simplex, quaedam personalis.</text:p>
      <text:h text:style-name="P703" text:outline-level="4">Relatio simplex</text:h>
      <text:p text:style-name="P341">Relatio simplex, <text:span text:style-name="T135">quando relativum et antecedens non accipiuntur pro eodem in numero sed in specie, ut “Femina clausit porta vitae quae reseravit eam”, </text:span><text:span text:style-name="T136">a</text:span><text:span text:style-name="T135">ntecedens pro Eva verificatur, et relativum pro Maria accipitur.</text:span></text:p>
      <text:h text:style-name="P703" text:outline-level="4">Personalis</text:h>
      <text:p text:style-name="P342">Verificationem pro eodem supposito personalis relatio, requirit suum antecedens in categorica affirmativa, quia dicendo “Iacobus <text:span text:style-name="T137">Q</text:span>uartus non est animal, et illud erat pater Iacobi <text:span text:style-name="T137">Q</text:span>uarti”, propositio antecedentis /85/ <text:span text:style-name="T136">ver</text:span><text:span text:style-name="T137">ificatur pro Iacobo Quarto, et propositio relativi verificatur pro patre Iacobi Quarti, quoniam sensus est “Animal quod non est Iacobus Quartus erat pater Iacobi Quarti”. Propositio relativi pro Iacobo Tertio verificatur; ergo pro alio qua propositio antecedentis.</text:span></text:p>
      <text:p text:style-name="P343"><text:span text:style-name="T138">Dicitur dummodo sit totale extremum vel pars principalior extremi, quia dicendo “Tunica Christi erat inconsutilis, et </text:span><text:span text:style-name="T140">S</text:span><text:span text:style-name="T138">uper illam sortiti sunt”, illic propositio antecedentis pro ‘Christi tunica’ verificatur; ergo regula non efflagitat quod </text:span><text:span text:style-name="T139">sit totale extremum, et patet dicendo “Asinus Abrahae ad montem Sion ducebatur, et Iste erat rudibilis”.</text:span></text:p>
      <text:p text:style-name="P345"><text:soft-page-break/>Dicitur accipitur et non supponit ut ly ‘illa’ in hac “Chimaera currit, et Illa movetur”. Et nisi restringatur, propter tales “Homo est risibilis, et Ille existens Socrates movetur”. Si non amplietur in hac copulativa “Homo currit et Ille disputabit” relativum accipitur pro multis pro quibus propositio antecedentis non verificatur.</text:p>
      <text:p text:style-name="P346">Ex quo patet quod ly ‘illud’ in hac “Homo est animal et Illud movetur” non accipitur pro quolibet animali, sed pro homine solum, quia pro illo propositio antecedentis verificatur.</text:p>
      <text:p text:style-name="P346">Secundo: Patet quod relativum nonnumquam supponit, antecedente non supponente, patet hic “Aristoteles non est, et Ipse fuit praeceptor Alexandri”.</text:p>
      <text:p text:style-name="P344"><text:span text:style-name="T141">Tertio: Patet quod </text:span><text:span text:style-name="T142">relativum non supponit in hac “Animal est Antichristus, et Illud movetur”, ratio, propositio antecedentis non verificatur de aliquo.</text:span></text:p>
      <text:p text:style-name="P347">Quarto: Probabiliter sequitur relativum nonnumquam supponit deducta ampliatione pro re quae non est, patet hic “Antichristus erit, et Ipse non est”, nimirum quando suppositio est dependens, sicut est suppositio relativi.</text:p>
      <text:p text:style-name="P348">Circa hanc regulam dubitatur an relativum referat in copulativa affirmativa restricte cum signo universali in propositione antecedentis posito.</text:p>
      <text:h text:style-name="P703" text:outline-level="4">Propositiones tres signandae</text:h>
      <text:p text:style-name="P349">Respondetur per tres propositiones:</text:p>
      <text:list text:style-name="L11">
        <text:list-item>
          <text:p text:style-name="P737">Quarum prima est: Relativum refert cum signo negativo posito inter partes extremi, hoc patet in ista “Animal non est homo, et Ipsum movetur”. Sensus est “<text:span text:style-name="T147">I</text:span>psum animal quod non est homo movetur”. Similiter ascendendo sub praedicato huius “Homo non est hoc animal, et Idem homo non est hoc animal, et sic consequenter”.</text:p>
        </text:list-item>
        <text:list-item>
          <text:p text:style-name="P738">Secunda propositio: Relativum refert restricte cum signo universali non cadente in copulam, hoc patet hic “Iohannes Baptista omnes in austeritate exuperans, fuit Zachariae filius, et Ipse Christum Baptizavit”.</text:p>
        </text:list-item>
        <text:list-item>
          <text:p text:style-name="P739"><text:span text:style-name="T143">Tertia propositio: </text:span><text:span text:style-name="T144">Quando ponitur signum universale in propositionis fronte, tale omnes distingues, an relativum referat restricte cum signo vel sine signo. Secundum illud haec copulativa est vera “Omni parte magnitudinis dabilis est aliqua pars minor, et Illa est divisibilis”. Sensus secundae partis est: “et Illa pars quae est parte magnitudinis minor est divisibilis, et hoc est verum”, et sic hac est vera “</text:span><text:span text:style-name="T145">Omnis homo est animal, et Risibile est illud”.</text:span></text:p>
        </text:list-item>
      </text:list>
      <text:p text:style-name="P350">Ex hoc sequitur quod relativum nonnumquam supponit quando propositio antecedentis non verificatur, ut “Omne animal est homo, et Risibile est illud”.</text:p>
      <text:p text:style-name="P351">Si autem relativum cum signo universali referat, sic has copulativa concedes: “Omne animal est aliquod quod non est in mundo”, “Omnes homines sunt, et Illi nec sunt finiti nec infiniti”, “Omnes homines currunt, et Illorum <text:span text:style-name="T146">nullus movetur”, “Omnia compossibilia /86/ istorum sunt, et Illa non sunt” demonstrando has duas “Sortes currit et Plato disputat” cum earum contradictoriis.</text:span></text:p>
      <text:p text:style-name="P352"><text:soft-page-break/>Ulterius patet hanc consequentia non valere “Omnis homo currit, et Ille non movetur; ergo Aliquis homo currit et Ille non movetur”, si quilibet homo currat, antecedens est verum et consequens est falsum.</text:p>
      <text:h text:style-name="P702" text:outline-level="3">Secunda regula</text:h>
      <text:p text:style-name="P11">Secunda regula: Tale relativum in aliis a copulativa irrestricte suum antecedens refert. Ita quod loco talis relativi, suum antecedens ponere licebit.</text:p>
      <text:h text:style-name="P703" text:outline-level="4">Arguitur primo</text:h>
      <text:p text:style-name="P353">Contra hanc regulam arguitur: Ipsa praecedenti repugnat; ergo male posita.</text:p>
      <text:p text:style-name="P354">Antecedens patet, copulativa et disiunctiva ex partibus contradictoriis conflatae contradicunt, et termini contradictoriis stabunt aeque restricte; ergo relativum in disiunctiva refert restricte. Et eodem modo arguitur: Copulativa negativa affirmativae contradicit, negationem toti praeponendo, quia non est verius contradicere qua toti propositioni negationem praeponere.</text:p>
      <text:h text:style-name="P703" text:outline-level="4">Secundo</text:h>
      <text:p text:style-name="P354">Secundo arguitur: Sequitur quod haec propositio “Aliqua istarum est vera si eius contradictoria est vera” demonstrando has “Sortes currit” et “Sortes non currit”, quia sensus istius conditionalis erit iste: aliqua istarum propositionum est vera si alicuius istarum contradictoria est vera. Modo ille sensus est verus, quia in conditionali loco relativi suum antecedens licet ponere. Eodem modo haec concedenda venit “Aliqua propositio est vera si eius contradictoria est vera”.</text:p>
      <text:p text:style-name="P355">Si istud concedas contra, quaelibet singularis est falsa descendendo sub subiecto consequentis stante determinate; ergo ex conditionali sequitur falsum, et per consequens ipsa est falsa.</text:p>
      <text:h text:style-name="P703" text:outline-level="4">Ad primum</text:h>
      <text:p text:style-name="P355">Ad primum: <text:span text:style-name="T150">N</text:span>ego antecedens et ad probationem concedo copulativa et disiunctiva ex partibus contradictoriis conflatae contradicunt, et distinguo quod relativum in disiunctiva affirmativa referat, restricte vel de per accidens, ad habendam bonam contradictionem, et ubi ponitur relativum <text:span text:style-name="T149">relatum expresse et sic conceditur, vel simpliciter et absolute et sic negatur. Hoc est, si petatur a te de veritate unius disiunctivae in qua ponitur relativum, loco relatvi suum antecedens pones, et si illa est vera aut falsa. Similiter censebis de disiunctiva quaesita.</text:span></text:p>
      <text:p text:style-name="P356">Propterea hanc concedis “Animal est homo vel Ipse est asinus” quando de eius veritate indagatur. Eodem modo in copulativa negativa de per accidens, relativum irrestricte refert, hoc patet capiendo contradictoriam per copulativam affirmativam disiunctivae datae.</text:p>
      <text:h text:style-name="P703" text:outline-level="4">Replica</text:h>
      <text:p text:style-name="P357">Contra illud arguitur: <text:span text:style-name="T151">Habendo copulativam affirmativam in mente relativo, utpote “Homo currit et Ille movetur” intellectus potest resecare coniunctionem et interserendo ‘vel’ caeteris manentibus, tunc relativum referet adhuc restricte, et non ponitur expresse relativum relatum, alioquin terminus mentalis ‘ille’ aequivoce significabit.</text:span></text:p>
      <text:h text:style-name="P714" text:outline-level="4"><text:soft-page-break/>Responsio</text:h>
      <text:p text:style-name="P358">Respondetur:</text:p>
      <text:list text:style-name="L12">
        <text:list-item>
          <text:p text:style-name="P740">Forte intellectus id facere nequit, <text:span text:style-name="T152">quia tunc variatur virtualiter antecedens.</text:span> </text:p>
        </text:list-item>
        <text:list-item>
          <text:p text:style-name="P741">Secundo dicitur: Non inconvenit terminum mentalem relativum a sua significatione cadere.</text:p>
        </text:list-item>
        <text:list-item>
          <text:p text:style-name="P742">Tertio dicitur: /87/ Si in mente ille includit relativum relatum, tunc ipsum ponitur expresse.</text:p>
        </text:list-item>
        <text:list-item>
          <text:p text:style-name="P742">Quarto dicitur: Licet intellectus ex sua fecunditate potest sic terminum capere non sequitur, quod sic communiter capiatur.</text:p>
        </text:list-item>
      </text:list>
      <text:h text:style-name="P703" text:outline-level="4">Replica</text:h>
      <text:p text:style-name="P359">Contra ista arguitur: <text:span text:style-name="T153">Qualitercumque referat relativum in disiunctiva dabuntur contradictoria falsa. Haec enim est falsa: “Animal est homo et Illud est equus”, et haec ei contradicit “Nullum animal est homo vel </text:span><text:span text:style-name="T154">Non</text:span><text:span text:style-name="T153"> </text:span><text:span text:style-name="T154">i</text:span><text:span text:style-name="T153">llud animal est equus”, non ponendo relativum relatum. Quod patet prior categorica disiunctive priori categoricae copulativae contradicit, et posterior pars disiunctivae posteriori categoricae copulativae contradicit, patet non est verius contradicere et caetera.</text:span></text:p>
      <text:h text:style-name="P703" text:outline-level="4">Responsio</text:h>
      <text:p text:style-name="P360"><text:span text:style-name="T153">Respondetur: Non contradicunt. Non est ve</text:span><text:span text:style-name="T155">rius contradicere servando caetera paria intelligitur, modo non sunt eadem extrema in duabus secundis categoricis.</text:span></text:p>
      <text:h text:style-name="P703" text:outline-level="4">Ad secundum</text:h>
      <text:p text:style-name="P360"><text:span text:style-name="T155">Ad secundum concedendo quod haec conditionalis est vera, et nego quod ex ea falsum sequatur. Descensus aut ascensus in conditionali est inutilis ut in hypotheticis diximus, veritas eius aut falsitas alia via exploretur. Ex hac solutione sequitur hanc esse veram “Aliqua propositio est falsa si</text:span> <text:span text:style-name="T155">eius contradictoria est vera”, cum sensus sit: “Aliqua propositio est falsa si alicuius propositionis contradictoria sit vera”.</text:span></text:p>
      <text:h text:style-name="P703" text:outline-level="4">Arguitur tertio</text:h>
      <text:p text:style-name="P361"><text:span text:style-name="T155">Tertio arguitur contra utraque regulam, et hoc sic: </text:span><text:span text:style-name="T156">Dictum est quod propositiones copulativae sunt distinguendae in quibus signum universale in fronte ponitur penes hoc quod relativum referat restricte cum signo vel sine signo; ergo pari forma dicere debemus quod disiunctiva et hypothetica quaelibet relativi est distinguenda penes hoc quod terminus restricte referat aut non.</text:span></text:p>
      <text:h text:style-name="P703" text:outline-level="4">Ad tertium</text:h>
      <text:p text:style-name="P364">Respondetur: Concedendo antecedens et negando consequentiam, et negationis ratio est communis modus concipiendi in una et non in altera, et communis via inter artistas quae communem conceptionem stipat, cum multa istarum in communi modo concipiendi fundentur et cum plurimi et valentes in hoc conveniant, indicium est quod est communis modus concipiendi.</text:p>
      <text:p text:style-name="P364">Propter paucos aliter concipientes, viam communem et saniorem non derelinquas, tot dialecticorum veterum neotericorumque, hanc negant et similes, omni parte magnitudinis dabilis est aliqua pars minor et illa est divisibilis, quot eam concedunt, secus est de alia.</text:p>
      <text:h text:style-name="P702" text:outline-level="3"><text:soft-page-break/>Tertia regula</text:h>
      <text:p text:style-name="P11">Tertia regula: Relativum reciprocum accipitur eodem modo sicut suum antecedens, hoc est, supponit sicut suum antecedens si supponat, et hoc si propositio antecedentis pro pluribus verificetur.</text:p>
      <text:h text:style-name="P703" text:outline-level="4">Relativum reciprocum</text:h>
      <text:p text:style-name="P362"><text:span text:style-name="T157">Sequitur de relativo reciproco, </text:span><text:span text:style-name="T158">et de eo ponitur tertia relativorum regula, quae talis est quod relativum reciprocum primitivae speciei supponit illa specie suppositionis, et pro illo sicut suum antecedens, ut quilibet homo est ipsemet, ibi ipsemet stat distributive.</text:span></text:p>
      <text:p text:style-name="P363"><text:span text:style-name="T158">Interdum antecedens ampliatur et non relativum, vel relativum stat pro masculis, et antecedens /88/ </text:span><text:span text:style-name="T159">pro omnibus hominibus, ut patet unico exemplo “Omnis homo fuit ipsemet, vel Omnis homo possibiliter est, et Ipsemet currit”.</text:span></text:p>
      <text:p text:style-name="P363"><text:span text:style-name="T159">Sed illae non aequivalent “Quilibet homo est ipsemet” </text:span><text:span text:style-name="T160">et “Quilibet homo quilibet homo est”, quia in prima est distributio sigillata, hoc est dictu quod quodlibet suppositum subiecti denotatur cadere in simile suppositum praedicati, hoc est “Sortes est Sortes et Plato est Plato”, et non debemus incohare ascensum vel descensum a relativo sed a suo antecedenti, et tunc simul ascendemus sub relativo quia dicendo “Iste homo est ipsemet” antecedens stat discrete sic etiam relativum, immo necesse est illic ascendere sub antecedenti, sub relativo etiam conscendere. Sed in hac “Quilibet homo Quilibet homo est” denotatur quodlibet suppositum subiecti cadere in quodlibet suppositum praedicati.</text:span></text:p>
      <text:h text:style-name="P703" text:outline-level="4">Nota quae inferuntur</text:h>
      <text:p text:style-name="P365">Ex quod sequitur: Primo quod duae propositiones quarum quaelibet est de modo loquendi consueto subcontrariantur compositae omnino ex terminis communibus, et tamen nullus terminus in eis distribuitur, hoc patet in istis “Homo est ipsemet”, “Homo non est ipsemet”.</text:p>
      <text:p text:style-name="P365">Eodem modo patet quod praedicatum distribuitur in subalternanti et non in subalternata.</text:p>
      <text:p text:style-name="P365">Tertio: <text:span text:style-name="T161">P</text:span>atet quod determinatio accepta unica acceptione cum suo determinabili distribuitur in una contradictoriarum et non in altera. Hoc patet in istis “Quilibet homo videt se”, “Aliquis homo non videt se”, ubi ‘se’ distribuitur in affirmativa et non in negativa.</text:p>
      <text:p text:style-name="P366">Quarto: Sequitur quod aliquis terminus est communis sequens negationem qui non potest distribui ab ea, patet de praedicato “Huius homo non est ipsemet”, et hoc est quando suppositio termini est dependens, sic praedicatum distribuitur in hac “Quilibet homo non est ipsemet”.</text:p>
      <text:p text:style-name="P367">Quinto sequitur: Non est idem dictu “Ipsemet homo omnis <text:span text:style-name="T162">homo est” et “Omnis homo est ipsemet”, prior est falsa et relativum nihil facit, et illic idem est dicere “Ipsemet homo omnis homo est”, et “Homo omnis homo est” non stemus in genere.</text:span></text:p>
      <text:p text:style-name="P367">“<text:span text:style-name="T162">Omnis homo est ipsemet” convertitur in hac de per accidens “Ipsemet homo est homo”. Si vis convertere illam in universalem fac limitationem ut termini maneant eodem modo, ponendo ⟨a⟩ vel ⟨b⟩ vel aliquod huiusmodi.</text:span></text:p>
      <text:p text:style-name="P368"><text:soft-page-break/>Quo fit quod tales distinguendae veniunt “Homo vel asinus non est ipsemet”. Si subiectum capiatur unica acceptione est falsa, sic “<text:span text:style-name="T163">O</text:span>mnis homo vel asinus non est ipsemet”. <text:span text:style-name="T163">Si subiectum capiatur unica acceptione, est una reciprocatio et sensus est de quocumque veru est dicere, quod est homo vel asinus, de illo verum et dicere quod non est ipsemet. Si ‘vel’ divisive capiatur sunt duae reciprocationes formaliter vel aequivalenter.</text:span></text:p>
      <text:p text:style-name="P369">Sexto: Sequitur quod tales sunt distinguendae “Deus diligit omnes diligentes se”, quia vel illud relativum se habet pro antecedente istum terminum ‘Deus’, et tunc illa est vera et sensus est “Deus diligit omnes homines diligentes se Deum”, et tunc relativum stat determinate. Vel habet pro antecedente istum terminum ‘homines’, et tunc relativum distribuitur, et propositio est falsa et sensus est “Deus diligit homines diligentes seipsos”.</text:p>
      <text:p text:style-name="P369">Similiter haec est distinguenda “Sortes et omnis homo qui est ipsemet”, si ipsemet habeat pro antecedente /89/ terminum ‘Sortes’ illa est vera, si terminum ‘homo’ illa est falsa.</text:p>
      <text:p text:style-name="P369">Si haec est distinguenda “Sortes est omne videns se”, posito quod solus Sortes videat Sortem, aliis hominibus videntibus seipsos. Si enim ‘se’ referat Sortem vera est, si ly ‘videns’ falsa est.</text:p>
      <text:p text:style-name="P371">Eodem modo hic “Homo ipsemet homo non est”, secundum quod relativum potest habere terminum ‘homo’ sequentem, vel praecedentem ei immediate iunctum.</text:p>
      <text:p text:style-name="P24"><text:span text:style-name="T164">Similiter haec est distinguenda “Quilibet homo est quilibet homo qui est ipsemet”. Si ipsemet referat terminum ‘homo’ in principio, ipsa est vera. Patet ascendendo sub illo termino ‘homo’, “Sortes est quilibet homo qui est ipsemet”, et licet praedicatum distribuatur sub ipso immediate, non valet ascensus quousque sub subiecto ascendas. Si referat terminum ‘homo’ </text:span><text:span text:style-name="T165">a parte praedicati illa est falsa, per illam denotatur quod de quocumque verum est dicere quod est homo, de illo verum est dicere quod est </text:span><text:span text:style-name="T166">quilibet</text:span><text:span text:style-name="T165"> homo quod est ipsemet, hoc est, quod quilibet homo sit quilibet homo.</text:span></text:p>
      <text:p text:style-name="P370"><text:span text:style-name="T165">Cum his omnibus tam stat quod antecedens distribuatur et relativum stet determinate probatur, et capio hanc “</text:span><text:span text:style-name="T166">Quilibet homo est ipsemet”, iste terminus ‘homo’ in praeiacente stat determinate, et iste terminus ‘homo’ in praeiacente est antecedens relativi reciproci; ergo antecedens relativi reciproci stat determinate, et ultra ergo relativum determinate.</text:span></text:p>
      <text:p text:style-name="P372">Septimo: Sequitur quod non quilibet terminus communis vere negatur de termino stante confuse tantum, habente plura supposita, hoc patet ista est falsa “⟨a⟩ Homo non est ipsemet”, quod probo sua contradictoria est vera “Omnis homo est ipsemet”, capiendo ipsemet ut tantum valet sicut ipsemet vel ipsamet.</text:p>
      <text:h text:style-name="P703" text:outline-level="4">Arguitur</text:h>
      <text:p text:style-name="P25"><text:span text:style-name="T167">Contra hoc arguitur: “⟨a⟩ Homo non est </text:span><text:span text:style-name="T168">istemet</text:span><text:span text:style-name="T167"> homo vel ist</text:span><text:span text:style-name="T168">e</text:span><text:span text:style-name="T167">met homo vel istamet </text:span><text:span text:style-name="T168">homo vel istemet; ergo ⟨a⟩ Homo non est ipsemet”, consequentia est ascensus et antecedens est verum; ergo est consequens.</text:span></text:p>
      <text:h text:style-name="P710" text:outline-level="4">Responsio</text:h>
      <text:p text:style-name="P373">Forte dicis (sicut dicendum est): Quod oportet ascendere prius sub antecedente.</text:p>
      <text:h text:style-name="P703" text:outline-level="4"><text:soft-page-break/>Replica</text:h>
      <text:p text:style-name="P374">Contra: Hoc non evitat propositum “⟨a⟩ Iste vel iste homo vel iste homo non est istemet vel istamet homo, et sic de singulis”.</text:p>
      <text:h text:style-name="P703" text:outline-level="4">Responsio</text:h>
      <text:p text:style-name="P375">Respondetur quod oportet sigillatim ascendere sicut in hac “Homo non est ipsemet”, quia istae aequivalent formaliter quemadmodum istae “Animal est homo”, “⟨a⟩ Animal est homo”.</text:p>
      <text:p text:style-name="P377">Caeterum communiter dicitur quod relativum derivativae speciei (ut suus) supponit sicut terminus communis sui loco positus, sed satius dici potest quod suum valet ipsummet Sortes habet suum. “Sortes habet ipsiusmet rem possessam, ego habeo meum”, illic ‘meum’ supponit determinate et fit verificatio sic “Hoc est mei res”.</text:p>
      <text:p text:style-name="P377">“Sortes habet suum” sic verificatur “Hoc est ipsius Sortis res”.</text:p>
      <text:p text:style-name="P377">“Sortes habet suum genium”, hoc est, ipsius Sortis naturam.</text:p>
      <text:p text:style-name="P376">“<text:span text:style-name="T169">Sortes equitat suum equum”, “Sortes equitat ipsiusmet Sortis equum”.</text:span></text:p>
      <text:p text:style-name="P377">Sed in illis sub antecedente antequam sub relativo ascendas.</text:p>
      <text:p text:style-name="P378">Haec est vera “Omnis homo est omne videns se”, posito quod quilibet videat se et nullus alius ab illo, et tamen non sequitur “ergo Omnis homo est hoc vides se”.</text:p>
      <text:p text:style-name="P378">Inde haec propositio est vera “Quemlibet equum suum quilibet homo videt”, casu quo quilibet homo quemlibet equum ab eo possessum videat.</text:p>
      <text:p text:style-name="P379">Sic haec est vera “Equum suum quilibet homo videt”, ascendendo sub termino ‘homo’, non pones relativum identitatis in singularibus et id ca<text:span text:style-name="T171">u</text:span>sae, non /90/ <text:span text:style-name="T172">arguitur a pluribus determinatis, sicut hic “Caput omnis homo habet”, sed ab una determinata. Quo fit quod haec consequentia est nulla “Quemlibet equum suum quilibet homo videt; ergo Aliquem equum hominis quilibet homo videt”.</text:span></text:p>
      <text:p text:style-name="P26"><text:span text:style-name="T172">Idem enim est dictu “</text:span><text:span text:style-name="T173">Aliquis homo omnem equum suum videt” et “Aliquis homo omnem equum ipsiusmet videt”.</text:span></text:p>
      <text:p text:style-name="P380">“Sortes est pater suus”, per illam significatur quod Sortes est ipsiusmet Sortis pater.</text:p>
      <text:h text:style-name="P703" text:outline-level="4">Dubitatio</text:h>
      <text:p text:style-name="P381">Sed subdubitas de veritate huius “Aliquis homo est suus filius”. Probatur quod sit vera. ‘homo’ pro quolibet homine supponit, et ‘suus filius’ pro cuiuslibet hominis filio supponit. Haec erit verificatio “Hic est hominis filius”.</text:p>
      <text:h text:style-name="P703" text:outline-level="4">Declaratio</text:h>
      <text:p text:style-name="P382">Respondetur quod illa est falsa. Patet, quaelibet singularis illius particularis est falsa. Et nego quod extrema supponunt pro eodem, verificatio illius est dependens. Primo singularizabis terminum ‘homo’ dicendo “Iste homo”, et in verificatione quam quaeris dices “Hoc est sui ipsius istius hominis filius”, quae infert aliquem esse suimet filium quae est impossibilis.</text:p>
      <text:h text:style-name="P703" text:outline-level="4"><text:soft-page-break/>Arguitur</text:h>
      <text:p text:style-name="P383">At dicis “Aliquis homo est, et suus filius est homo; ergo homo est suus filius” per conversionem.</text:p>
      <text:h text:style-name="P703" text:outline-level="4">Respondetur</text:h>
      <text:p text:style-name="P383">Respondetur quod si in convertente capias relativum sicut in conversa, consequentia est bona, nec est difficultas.</text:p>
      <text:p text:style-name="P27"><text:span text:style-name="T175">“</text:span><text:span text:style-name="T176">Omnis homo habet equum suum”, ‘equum suum’ supponit confuse tantum et aequivalet huic “Omnis homo habet sui ipsius equum”, nec seriose disputandum est an valeat illud in consequendo solum.</text:span></text:p>
      <text:p text:style-name="P28"><text:span text:style-name="T176">Ex isto patet quod si Sortes equitet equum Platonis et contra, ista est falsa “Sortes equitat suum equum”. Identidem de hac “Pla</text:span><text:span text:style-name="T177">to equitat suum equum”.</text:span></text:p>
      <text:p text:style-name="P384">Haec tamen in plurali numero “Sortes et Plato equitant suos equos”, stante illo casu est vera. Sufficit in plurali quod equos possessos ab istis equitent, hoc est, quod non equitent equos alienos ab istis, sed quilibet eorum equitat equum alienum, quilibet eorum equitat non suum equum. Et falsum sit dicere “Quilibet istorum equitat suum non equum”. Stat tamen dare virum equitantem suum non equum, patet de Balaam et suo asino, nisi stes in vocabulo equitare.</text:p>
      <text:h text:style-name="P702" text:outline-level="3">Quarta regula</text:h>
      <text:p text:style-name="P11">Quarta regula: Quodlibet aliud relativum supponit sicut terminus absolutus loco suo positus, ut ille confuse tantum in hac “Aliquis homo est et quilibet homo est ille”. Loco talis relativi relativum referens et relatum simul ponas, et facile propositionis veritatem falsitatemve deprehendes.</text:p>
      <text:p text:style-name="P385">Ex isto patet quod haec est vera “Aliquis homo est et Quilibet homo est ille”, cum sensus sit “Aliquis homo est et Quilibet homo est ille homo qui est”.</text:p>
      <text:p text:style-name="P385">Eodem modo haec erit vera “Quilibet homo est animal et Ille est Sortes”, Quilibet homo est animal et ille non est Sortes”. In utraque enim ‘ille’ per regulam stat determinate.</text:p>
      <text:p text:style-name="P385">Nec sequitur “Iste homo est animal (demonstrando Platonem), et Ille est Sortes”, ut notum est. Quando descendis sub termino distributo pone relativum relatum loco relativi, et non aberrabis.</text:p>
      <text:p text:style-name="P386">Similiter, si quilibet habeat duos equos quorum solum unum equitat, haec est vera “Omnis homo habens equum equitat illum”, cum sensus sit “Quilibet homo habens equum equitat illum equum quem habet”, /91/ <text:span text:style-name="T178">ubi stat confuse tantum.</text:span></text:p>
      <text:p text:style-name="P387">Nec sequitur:</text:p>
      <text:p text:style-name="P7">Iste homo habens istum equum (demonstrando equum quiescentem) non equitat illum, et</text:p>
      <text:p text:style-name="P7">Iste homo habens istum equum est homo habens equum; ergo</text:p>
      <text:p text:style-name="P7">Homo habens equum non equitat illum.</text:p>
      <text:p text:style-name="P7"/>
      <text:p text:style-name="P387">Cum illum stat discrete in maiore, et communiter in conclusione.</text:p>
      <text:p text:style-name="P388"><text:soft-page-break/>Similiter in hac “Homo currit et alius ab eo disputat”, hic alius stat determinate, et distributive in hac “Homo currit et omnis alius b eo disputat”. Ratio omnibus est quia est relativum non reciprocum supponens sicut terminus absolutus suo loco positus.</text:p>
      <text:p text:style-name="P388">“Sortes currit et alius disputat”, sensus est “Sortes currit et alius homo a Sorte disputat”.</text:p>
      <text:p text:style-name="P389">In duobus casibus relativum diversitatis non supponit:</text:p>
      <text:list text:style-name="L13">
        <text:list-item>
          <text:p text:style-name="P743">Primo: Quando propositio antecedentis est falsa, ut “Antichristus currit et alius ab eo disputat”. Quo fit quod relativum diversitatis cum suo antecedenti est inferius ad nomen infinitum, ut “Aliud ab Antichristo est inferius ad non antichristum”, “Omne aliud ab Antichristo et Non Antichristus”, et non econverso, et per consequens non verum dicunt qui eos esse convertibiles aiunt.</text:p>
        </text:list-item>
        <text:list-item>
          <text:p text:style-name="P743">Secundus casus: Quando antecedens est transcendens, ut “Ens currit et Aliud ab ente disputat”, subiectum secundae categoricae non supponit quia nec ‘ens non enti’, aut ‘non ens enti’ est idem vel diversum.</text:p>
        </text:list-item>
      </text:list>
      <text:h text:style-name="P703" text:outline-level="4">Arguitur primo</text:h>
      <text:p text:style-name="P390">Contra ista arguitur: <text:span text:style-name="T179">Haec propositio est falsa “Aliquis homo est et Quilibet homo est ille;ergo Male dictum est”. Antecedens patet, ex ea sequitur falsum, scilicet “Iste homo est, et Quilibet homo est ille, vel Iste homo est, et Quilibet homo est ille”, in copulativa licet descendere.</text:span></text:p>
      <text:h text:style-name="P703" text:outline-level="4">Arguitur secundo</text:h>
      <text:p text:style-name="P391">Arguitur contra secundum casum: Bene sequitur “Homo currit et alius ab eo disputat; ergo Ens currit et aliud ab ente disputat”, ab inferiori ad superius.</text:p>
      <text:h text:style-name="P703" text:outline-level="4">Arguitur tertio</text:h>
      <text:p text:style-name="P392">Tertio: Ista tunc erit vera “Quilibet homo et quilibet alius homo sunt homines”. Patet ascendendo sub termino ‘homines’. Sed patet quod non ex ea sequitur falsum, nam bene sequitur:</text:p>
      <text:p text:style-name="P7">Quilibet homo et Quilibet alius homo sunt homines; ergo</text:p>
      <text:p text:style-name="P7">Quilibet homo et Iste alius homo sunt homines.</text:p>
      <text:p text:style-name="P7"/>
      <text:p text:style-name="P392">Consequens est falsum, cum subiectum non supponat pro illis pro quibus praedicatum supponit. Veritas tamen illius patet per ascensum “Iste homo et alius homo sunt homines, et Iste homo et <text:span text:style-name="T180">al</text:span>ius homo sunt homines, et sic de singulis”, igitur.</text:p>
      <text:h text:style-name="P703" text:outline-level="4">Ad primum</text:h>
      <text:p text:style-name="P393">Ad primum: Nego antecedens et nego quod ex ea sequatur falsum. Consequentia illa est sophistica. Arguitur enim a suppositione confusa tamtum ad discretam, retenta distributione. Cum sub subiecto prioris categoricae descenderis, pone relativum referens et relatum simul in secunda categorica, ut termini sub quibus non descenditur maneant uniformiter in descendentibus et descensa sic “Iste homo est, et Quilibet homo est ille homo qui est”, vel “Iste homo est, et Quilibet homo est ille homo qui est”. Modo consequens est verum sicut suum antecedens.</text:p>
      <text:h text:style-name="P703" text:outline-level="4"><text:soft-page-break/>Quaestio</text:h>
      <text:p text:style-name="P394">Et si petas: “Aliquis homo est, et Quilibet homo est ille”, quis est ille homo qui est et quilibet homo est ille.</text:p>
      <text:h text:style-name="P703" text:outline-level="4">Responsio</text:h>
      <text:p text:style-name="P395">Respondetur: Aliquis homo. <text:span text:style-name="T181">Nec dabo singulares prioris categorice cum secunda categorica. Sed dicam “Sortes est, et Quilibet homo est homo qui est”, quo fit quod haec est falsa “Aliquis homo est, et Nullus homo /92/ est ille.</text:span></text:p>
      <text:p text:style-name="P396">Similiter haec est falsa “Aliquis homo est, et Sortes est ille”, posita Sortis existentia. Sed haec est vera “Sortes ille homo non est”, quae non contradicit secundae categoricae huius “Aliquis homo est, et Sortes est ille”.</text:p>
      <text:p text:style-name="P7">Sic haec est falsa “Aliquis homo est et Sortes differt ab illo”, nec sequitur:</text:p>
      <text:p text:style-name="P7">Plato est, et Sortes differt ab illo; ergo</text:p>
      <text:p text:style-name="P7">Aliquis homo est, et Sortes differt ab illo.</text:p>
      <text:p text:style-name="P7"/>
      <text:p text:style-name="P396">Ut facile est videre.</text:p>
      <text:p text:style-name="P397">Gratia tamen maioris explicationis hanc distingues “Aliquis homo est, et Aliquis homo est suus filius”. Vel si ‘suus’ habeat antecedens in eadem categorica, et sic ipsa est falsa. Si in priori categorica, sic ipsa est vera.</text:p>
      <text:p text:style-name="P398">Si de veritate huius efflagites “Aliquis homo est, et Quilibet homo est ‘b’, ille video”, aperire intendis quid dicendum est de veritate illius, tenendo quod ille stet determinate sicut suum antecedens, sicut una positio tenet. Pro nunc non admitto, ne positionum multitudine iuvenum artistarum ingenia confundam.</text:p>
      <text:h text:style-name="P703" text:outline-level="4">Ad secundum</text:h>
      <text:p text:style-name="P398">Ad secundum argumentum nego consequentiam: Arguitur cum distributione superioris.</text:p>
      <text:h text:style-name="P703" text:outline-level="4">Ad tertium</text:h>
      <text:p text:style-name="P399">Ad tertium argumentum dicitur: <text:span text:style-name="T182">Semper es ascendendum sub antecedente antequam sub relativo ascendatur. Sed adhuc patet, si sint multi homines, quorum quilibet habet equum, et suum proprium videt, iam ista est vera “Quemlibet equum suum quilibet homo videt” patet ascendendo sub illo termino ‘homo’ primo. Sensus istius est “Quemlibet equum suum iste homo videt, Quemlibet equum ipsiusmet hominis iste homo videt” et tamen si in negativa primo ascendere sub illo termino ‘equum suum’ illa negativa redderetur vera.</text:span></text:p>
      <text:p text:style-name="P400">Haec enim est vera quocumque equo demonstrato “Istum equum suum homo non videt”. Patet ascendendo sub illo termino ‘homo’, demonstrando hominem non habentem istum equum, dabis illic singulares veras. Nec inconvenit a determinabili primo ascendere aut descendere quando est antecedens relativi.</text:p>
      <text:h text:style-name="P703" text:outline-level="4">Quaestio</text:h>
      <text:p text:style-name="P400">Caeterum quaeris an haec sit propria “Quilibet homo et alius asinus sunt homines”.</text:p>
      <text:h text:style-name="P703" text:outline-level="4"><text:soft-page-break/>Responsio</text:h>
      <text:p text:style-name="P400">Dicitur quod sic, licet sit falsa.</text:p>
      <text:h text:style-name="P702" text:outline-level="3">Quinta regula</text:h>
      <text:p text:style-name="P11">Quinta regula: Relativum accidentis accipitur pro re simili vel aequali illi <text:span text:style-name="T29">pro</text:span> qu<text:span text:style-name="T183">o</text:span> propositio antecedentis verificatur, ut “Sortes est albus, et Talis est Plato”, “Iohannes est sesquipedalis et tantus est Cicero”.</text:p>
      <text:p text:style-name="P401">Cum textus dicat quid per tales propositiones denotatur, et quod termini relativi in eis supponunt sicut terminus communis in eorum locis positi, et raro in usu veniunt, silenter de eis pertranseo.</text:p>
      <text:p text:style-name="P32">Finis tractatus primi, libri secundi.</text:p>
      <text:h text:style-name="P699" text:outline-level="2">Sequitur <text:span text:style-name="T452">D</text:span>e <text:span text:style-name="T452">A</text:span>mpliationibus</text:h>
      <text:p text:style-name="P577">Liber Secundus. Tractatus <text:span text:style-name="T317">S</text:span>ecundus</text:p>
      <text:p text:style-name="P40">/<text:span text:style-name="T184">93</text:span>/</text:p>
      <text:h text:style-name="P703" text:outline-level="4">Ampliatio</text:h>
      <text:p text:style-name="P11">Ampliatio passiva et secunde intentionaliter sumpta est suppositio termini pro suo significato in ordine, saltem ad duas differentias temporum separatim. Omnis ampliatio est ampla suppositio, sive sit ampliatio temporum sive suppositorum.</text:p>
      <text:h text:style-name="P703" text:outline-level="4">Differentiae temporum</text:h>
      <text:p text:style-name="P11">Quinque sunt differentiae temporum: est, fuit, erit, potest et imaginatur.</text:p>
      <text:p text:style-name="P402">Ampliatio prime intentionaliter active est res amplians passive res ampliata.</text:p>
      <text:p text:style-name="P402">Secunde intentionaliter est terminus quem amplia active capiendo.</text:p>
      <text:p text:style-name="P402">Passive vero est terminus ampliatus, quem textus definit, quod definito ampliatio activa cognoscitur. Quod fit quod subiecta istarum non ampliatur “Adam fuit”, “Chimaera imaginarie est”, “‘a’ Potest esse” <text:span text:style-name="T186">s</text:span>it ‘a’ proprium nomen rei possibilis quae numquam rerum natura est, fuit aut erit. In omnibus <text:span text:style-name="T186">his ratio est facilis, cum istarum propositionum subiecta non supponant</text:span> <text:span text:style-name="T186">in ordine ad plures differentias temporum separatim.</text:span></text:p>
      <text:p text:style-name="P403">Secun<text:span text:style-name="T187">do: Sequitur quod terminus superior ampliatur et inferior eius cum eadem copula ampliativa minime ampliatur. Patet de subiectis istarum “Instans fuit”, “Hoc instans fuit”.</text:span></text:p>
      <text:p text:style-name="P404">Ex ex isto sequitur tertio, quod aliquis terminus ampliatur et tamen pro nullo eius supposito ampliatur, sed pro suppositis ampliatur.</text:p>
      <text:p text:style-name="P404">Quarto: <text:span text:style-name="T192">S</text:span>equitur <text:span text:style-name="T192">q</text:span>uod subiectum huius “Homo fuit” ampliatur. Patet quia tota definitio ampliationis ei convenit. Idem patet de subiecto huius “Adam fuit vel erit”, dicebatur sive sit ampliatio temporum sive suppositorum.</text:p>
      <text:p text:style-name="P404">Subiectum huius “Sortes fuit” ampliatur ampliatione temporum et non ampliatione suppositorum, quia non habet plura supposita.</text:p>
      <text:p text:style-name="P404"><text:soft-page-break/>Subiectum vero huius “Homo fuit animal”, ampliatur ampliatione suppositorum, quia pro pluribus suppositis supponit qua in hac “Homo est animal”. Omnis enim ampliatio suppositorum est ampliatio temporum, non autem econverso.</text:p>
      <text:p text:style-name="P404">Ulterius: <text:span text:style-name="T191">S</text:span>equitur <text:span text:style-name="T191">q</text:span>uod solus terminus communis ampliatur ampliatione suppositorum, licet non quilibet, ut patet de termino ‘Deus’, qui non pro pluribus supponit in hac “Deus potest esse”, qua in hac “Deus est”, copulam imaginarie excludo.</text:p>
      <text:p text:style-name="P405">Ulterius: <text:span text:style-name="T190">P</text:span>atet <text:span text:style-name="T190">q</text:span>uod ampliatio tam a significatione qua a suppositione dependet, proximuis tamen a suppositione.</text:p>
      <text:p text:style-name="P405"><text:span text:style-name="T188">Amplius: </text:span><text:span text:style-name="T190">D</text:span><text:span text:style-name="T188">ico, </text:span><text:span text:style-name="T190">l</text:span><text:span text:style-name="T188">icet ampliatio consequentialiter inferat, non tamen est terminus quidditative inferior, cum connotationem extraneam respectu suppositionis usurpet.</text:span></text:p>
      <text:p text:style-name="P406">Caeterum: <text:span text:style-name="T190">D</text:span>icitur <text:span text:style-name="T190">n</text:span>on sequitur. Hic terminus <text:span text:style-name="T189">supponit pro illo quod est et fuit; ergo ampliatur. Patet de subiecto huius “Iohannes est”.</text:span></text:p>
      <text:p text:style-name="P406"><text:span text:style-name="T189">Ulterius: </text:span><text:span text:style-name="T190">D</text:span><text:span text:style-name="T189">icitur </text:span><text:span text:style-name="T190">q</text:span><text:span text:style-name="T189">uod etsi subiectum huius “Aliud a vero est verum” pro pluribus accipiatur quam subiectum huius, aliud a vero erit verum, non tamen est consequens, quod si amplietur in secunda, in priore ampliatur. </text:span>/<text:span text:style-name="T189">94</text:span>/</text:p>
      <text:p text:style-name="P407">Rursus patet quod termini non supponunt aeque ample in contradictoriis, cum non semper ampletur.</text:p>
      <text:h text:style-name="P703" text:outline-level="4">Regulae ampliationum</text:h>
      <text:p text:style-name="P32">Sequuntur ampliationum decem regula.</text:p>
      <text:p text:style-name="P11">Quarum prima esto: Terminus a parte subiecti positus respectu copulae principalis de praeterito, aut participii praeteriti temporis in recto, ampliatur ad standum pro his quae sunt vel fuerunt.</text:p>
      <text:h text:style-name="P703" text:outline-level="4">Exceptio prima</text:h>
      <text:p text:style-name="P11">Omnes regulas hoc sale condies, si terminus significatum in ordine ad duas temporum differentias vendicet.</text:p>
      <text:p text:style-name="P408">Dicitur in regula a parte subiecti positus: Non requiritur quod sit subiectum propositionis, praedicatum huius ampliatur “Sortes homo fuit”.</text:p>
      <text:p text:style-name="P408">Dicitur respectu copulae principalis: Quia ‘homo’ in hac “Homo qui fuit est” non ampliatur, non potest verificari in ordine ad quamlibet earum divisim.</text:p>
      <text:p text:style-name="P408">Dicitur in recto: Sortes non ampliatur in hac “Sortes habet equum mortuum”, ‘homo’ tamen ampliatur in hac “Homo est doctus vel currens”.</text:p>
      <text:p text:style-name="P409">Virtute huius regulae tales propositiones concedantur:</text:p>
      <text:list text:style-name="L14">
        <text:list-item>
          <text:p text:style-name="P724">“Puer unius mensis quattuor annos vixit”.</text:p>
        </text:list-item>
        <text:list-item>
          <text:p text:style-name="P724">“Parvus in utero matris vixit quattuor annos”.</text:p>
        </text:list-item>
        <text:list-item>
          <text:p text:style-name="P724"><text:soft-page-break/>“Candela lucens est extincta”.</text:p>
        </text:list-item>
        <text:list-item>
          <text:p text:style-name="P724">“Vivum est mortuum”.</text:p>
        </text:list-item>
        <text:list-item>
          <text:p text:style-name="P724">“Aliquis homo praecessit Adam” patet de Christo.</text:p>
        </text:list-item>
        <text:list-item>
          <text:p text:style-name="P724">“Pater vivus est sepultus”.</text:p>
        </text:list-item>
        <text:list-item>
          <text:p text:style-name="P724">“Pater meus comedens est positus in terra”.</text:p>
        </text:list-item>
        <text:list-item>
          <text:p text:style-name="P724">“<text:span text:style-name="T193">Manus actualiter clausa est aperta”.</text:span></text:p>
        </text:list-item>
        <text:list-item>
          <text:p text:style-name="P724">“Manus amplissime aperta est clausa”.</text:p>
        </text:list-item>
        <text:list-item>
          <text:p text:style-name="P724">“Sortes in curis est clausus in domo”.</text:p>
        </text:list-item>
        <text:list-item>
          <text:p text:style-name="P724">“Homo mortuus est visus a me”.</text:p>
        </text:list-item>
      </text:list>
      <text:p text:style-name="P10"/>
      <text:p text:style-name="P410">Etiam per earum <text:span text:style-name="T194">resolventes hae et omnes propositiones sequentes clarius patefiunt, ut:</text:span></text:p>
      <text:list text:style-name="L15">
        <text:list-item>
          <text:p text:style-name="P725">“<text:span text:style-name="T194">Hoc est fractum”.</text:span></text:p>
        </text:list-item>
        <text:list-item>
          <text:p text:style-name="P726">“<text:span text:style-name="T194">Hoc est vel fuit lancea integra”, vel</text:span></text:p>
        </text:list-item>
        <text:list-item>
          <text:p text:style-name="P726">“Hic binarius est lancea fracta et</text:p>
          <text:p text:style-name="P725">Hic binarius est vel fuit lancea integra; ergo</text:p>
          <text:p text:style-name="P725">Lancea integra est fracta”.</text:p>
        </text:list-item>
        <text:list-item>
          <text:p text:style-name="P725">“Carnes super dorsum bovis sunt assatae”.</text:p>
        </text:list-item>
        <text:list-item>
          <text:p text:style-name="P725">“Lebes positus super ignem est remotus ab igne”.</text:p>
          <text:p text:style-name="P725"/>
        </text:list-item>
      </text:list>
      <text:p text:style-name="P411">Et ita de talibus.</text:p>
      <text:h text:style-name="P703" text:outline-level="4">Arguitur primo</text:h>
      <text:p text:style-name="P412">Contra dicta arguitur: ‘Fuit’ non ampliat praedicatum huius “Homo fuit animal”; ergo nec subiectum. Consequentia tenet quia aequalis est ratio.</text:p>
      <text:h text:style-name="P703" text:outline-level="4">Secundo</text:h>
      <text:p text:style-name="P413">Secundo arguitur: <text:span text:style-name="T195">Aristoteles tenet terminum laborans in hac “Sanabitur laborans”, ample </text:span><text:span text:style-name="T7">Primo Elenchorum</text:span><text:span text:style-name="T195"> quia illam distinguit penes hoc quod laborans ampliatur ven ne.</text:span></text:p>
      <text:h text:style-name="P703" text:outline-level="4">Tertio</text:h>
      <text:p text:style-name="P415"><text:span text:style-name="T195">Tertio arguitur: </text:span><text:span text:style-name="T196">Praedicatum huius non ampliatur “Homo est mortuus”; ergo nec subiectum. Tenet consequentia quia nullus terminus ampliat alium nisi se ampliet, igitur.</text:span></text:p>
      <text:h text:style-name="P703" text:outline-level="4">Quarto</text:h>
      <text:p text:style-name="P414"><text:span text:style-name="T196">Quarto arguitur:</text:span><text:span text:style-name="T195"> </text:span><text:span text:style-name="T197">Subiectum istius “Homo fuit mortuus” non ampliatur. Antecedens patet. Vel a copula vel a praedicato, sed nullum illorum est dicendum, igitur.</text:span></text:p>
      <text:h text:style-name="P703" text:outline-level="4">Quinto</text:h>
      <text:p text:style-name="P416">Quinto arguitur: Istae aequivalent “Homo fuit animal” et “Homo est vel fuit animal”. Sed praedicatum ampliatur in secunda; ergo in prima.</text:p>
      <text:h text:style-name="P703" text:outline-level="4">Sexto</text:h>
      <text:p text:style-name="P416">Sexto arguitur: <text:span text:style-name="T198">Si animal in hac ampliaretur “Sortes animal fuit” sequeretur quod si Sortes in hoc instanti inciperet esse, illa esset vera. Consequens est falsum: Omnis propositio prius de praeterito vera habuit unam de praesenti veram si fuisset formata. Ita non est hic, igitur.</text:span></text:p>
      <text:h text:style-name="P703" text:outline-level="4"><text:soft-page-break/>Septimo</text:h>
      <text:p text:style-name="P417">Septimo arguitur: <text:span text:style-name="T199">Subiectum huius non ampliatur “Homo est animal mortuum”; ergo male dictum est. </text:span>/<text:span text:style-name="T199">95</text:span>/ <text:span text:style-name="T200">Probatio antecedentis.</text:span></text:p>
      <text:p text:style-name="P418">Opposito dato subiectum ampliabitur in hac “Homo est animal” sed hoc non “⟨a⟩ Nullo termino ampliatur, igitur. Quod sequatur patet.</text:p>
      <text:p text:style-name="P418">Hoc subiectum in hac “Homo est animal mortuum” ampliatur, et hoc subiectum in ista “Homo est animal mortuum” est subiectum in hac “Homo est animal”, igitur.</text:p>
      <text:h text:style-name="P703" text:outline-level="4">Octavo</text:h>
      <text:p text:style-name="P419">Octavo arguitur: Haec conceditur “Aristoteles dicit hoc” et non nisi subiectum ampliaretur; ergo copula solum de praesenti ampliat.</text:p>
      <text:h text:style-name="P703" text:outline-level="4">Nono</text:h>
      <text:p text:style-name="P419">Nono arguitur: tunc haec erit vera “Homo est mortuus”, sed probo quod non “Nullus homo est mortuus”, nec istae nec illae, igitur.</text:p>
      <text:h text:style-name="P703" text:outline-level="4">Ad primum</text:h>
      <text:p text:style-name="P420">Ad primum nego consequentiam: Ratio est natura termini in mentali et in significatione ad placitu hominum vocali et scriptura et communis modus concipiendi, sicut aliquod signum distribuit post se, et non ante se.</text:p>
      <text:h text:style-name="P703" text:outline-level="4">Ad secundum</text:h>
      <text:p text:style-name="P421">Ad secundum dico: Quod multae propositiones quae non sunt distinguendae de virtute sermonis, propter affinitatem cum aliis distinguantur. Hoc videre est de modali composita et divisa. Licet haec sit affirmativa “Praestantiorem te vidi neminem”, ab oratoribus loco negativae accipitur, et talis distingui potest.</text:p>
      <text:h text:style-name="P703" text:outline-level="4">Ad tertium</text:h>
      <text:p text:style-name="P422">Ad tertium: Concedo antecedens et nego consequentiam. Communissime terminus amplians non est ampliatus, ut patet de copulis propositionum. Sed cum terminus ‘mortuum’ sicut participia praeteriti temporis habet amplum modum significandi sicut copula fuit, et rei quae est et eri quae non est convenit, termini ampliativi mediante copula de praesenti a parte praedicati conveniunt non existenti.</text:p>
      <text:h text:style-name="P703" text:outline-level="4">Ad quartum</text:h>
      <text:p text:style-name="P422">Ad quartum quadrifariam respondetur:</text:p>
      <text:p text:style-name="P423">Primo. Nego quod amplietur. Duo signa ampliativa mutuo sese praepediunt.</text:p>
      <text:p text:style-name="P423">Secundo. Concedo quod ampliatur a termino propinquiori.</text:p>
      <text:p text:style-name="P423">Tertio. Dicitur ampliatur ab extremo tanquam ab extremo.</text:p>
      <text:p text:style-name="P424"><text:soft-page-break/>Quarto. Dico quod ampliatur et a copula et a praedicato tam copulatim quam copulative. In ultima solutione sto. Priores autem responsiones pro iuvenibus, quatenus sese exercitent, solum tradimus, quatenus si hic aut alias in solutionem minus probabilem incidant, consequenter loquantur.</text:p>
      <text:h text:style-name="P703" text:outline-level="4">Ad quintum</text:h>
      <text:p text:style-name="P425">Ad quintum: Nego quod istae aequivalent metaliter aut in consequendo, quando expresse ponitur copularum disiunctio, tunc tam a tergo qua a fronte copula ampliat, non autem in alia.</text:p>
      <text:h text:style-name="P703" text:outline-level="4">Ad sextum</text:h>
      <text:p text:style-name="P426">Ad sextum: <text:span text:style-name="T202">C</text:span>oncedo quod haec est vera in illo casu, cum sensus est in consequendo quod ‘est vel fuit homo’, ‘est vel fuit animal’, et nego quod omnis propositio de praeterito vera prius habuit unam de praesenti veram, dato quod illa fuisset formata. <text:span text:style-name="T201">Patet in proposito cum distributione. Extra hanc materiam iam non loquor.</text:span></text:p>
      <text:h text:style-name="P703" text:outline-level="4">Ad septimum</text:h>
      <text:p text:style-name="P427">Ad septimum: Nego <text:span text:style-name="T203">antecedens et ad probationem concedo subiectum huius “Homo est animal”, quae est pars alterius, ampliatur. Ex consequenti conceditur quod duae propositiones contradicunt quarum subiectum unius ampliatur, subiectum vero alterius minime ampliatur. Corollarium est lucidum.</text:span></text:p>
      <text:p text:style-name="P429">Ratio: Sequitur quod subiectum huius supponit “Antichristus est animal” quae est pars huius, “Antichristus est animal futurum”.</text:p>
      <text:h text:style-name="P703" text:outline-level="4">Ad octavum</text:h>
      <text:p text:style-name="P428"><text:span text:style-name="T203">Ad octavum: Concedo quod solemus illam concedere. </text:span><text:span text:style-name="T204">Loquimur de eo ac si esset quemadmodum hic “Omnes apostoli Dei sunt duodecim”, vel utimur suppositione synecdochica. </text:span><text:span text:style-name="T205">Non tamen debemus /96/ propter propositiones concessa in sensibus in quibus fiant, et non in sensibus quod ex communi logica faciunt, ampliationes extendere. Hoc esset concedere “Terminus manet” et “Non manet terminus”, quod communiter et bene reprobari solet.</text:span></text:p>
      <text:h text:style-name="P703" text:outline-level="4">Ad nonum</text:h>
      <text:p text:style-name="P428"><text:span text:style-name="T205">Ad nonum: Concedo hanc “Homo est mortuus” quae non infert hanc “Mortuum est homo”, praedicatum minime ampliatur.</text:span><text:span text:style-name="T203"> </text:span><text:span text:style-name="T206">Et nego hanc “Nullus homo est mortuus”, instatur de Adam et Abraham.</text:span></text:p>
      <text:h text:style-name="P703" text:outline-level="4">Dubium</text:h>
      <text:p text:style-name="P430">Dubitatur de veritate huius “Diva virgo est mortua”.</text:p>
      <text:h text:style-name="P703" text:outline-level="4">Declaratio</text:h>
      <text:p text:style-name="P430">Respondetur: Si mortua nominaliter capiatur ut tantum valet sicut carens vita, et apta nata vitam habere, sic illa est neganda. Si autem participialiter capiatur, ut tantum valet sicut illa quae moriebatur sive sit sive non sit, illa est vera. Sicut concedimus “Christus est mortuus”, motuum supponit etiam pro re qua realiter est, pro materia quae caret vita quae ante informabatur.</text:p>
      <text:h text:style-name="P703" text:outline-level="4"><text:soft-page-break/>Exceptio secunda</text:h>
      <text:p text:style-name="P11">Et nisi restringatur ad unam.</text:p>
      <text:p text:style-name="P431">Una pars exceptionis lucida, puta si habeat significatum in ordine ad diversas differentias temporum. Posterior pars de restriction<text:span text:style-name="T207">e patet multifariam “Hic homo qui non est homo fuit animal”, et “Hic homo qui est fuit animal” non solum loquendo de restrictione suppositorum. Palam enim est quod non accipitur pro tot homo, sicut in hac “Homo fuit animal”, sed loquor de restrictione temporum.</text:span></text:p>
      <text:p text:style-name="P432">Potest enim intellectus addere qui est, illi termino ‘homo’ dato, quod non sit pars extremi, ut ‘a’ et ‘b’ in contradictoriis ad limitandum quod solum terminus ‘homo’ stet pro homine praesenti qui est, et secundum copulam implicationis quae est minus principalis est verificabilis, et nullum respectum ad principalem habebit. Et sic in hac “Omnes ens quod potest esse est”, ‘ens’ supponit pro quolibet ente possibili, et tunc dicitur capi pure restrictive, hoc est, restringens terminum secum connexum secundum sui exigentiam, non habendo respectum ullum ad copulam principalem, et tunc subsumes secundum exigentiam copulae implicationis et non principalis.</text:p>
      <text:p text:style-name="P432">“Sortes qui fuit est” totum subiectum regitur a verbo est, nec relativum illic a fuit regitur, cum immediate suo antecedenti adiungitur, a nullo regitur, et a quocumque regitur terminus sortes non interest cum capiamus illic pure restrictive, sicut aliqui artistae usi sunt et rationabiliter. Hic modus in ampliationibus est peculiaris.</text:p>
      <text:p text:style-name="P432">Alio modo et communius extra hanc materiam capitur ut utramque copulam respiciat, et particulariter capi dicitur, et currit valet participium sui verbi, ut quod est, valet ‘existens’; quod erit, ‘futurum’; quod potest esse, ‘possibile’; et ‘verum’ multi illud vocabant differentialiter. Et tunc habebit respectum ad utramque copulam, ut “Homo qui est fuit animal”, illic ‘homo’ supponit pro homine qui est et fuit, utramque copulam respicit. <text:span text:style-name="T208">Et sic etiam haec est vera “Omne futurum est”, “Omne possibile esse est”, “Omne quod erit est”, subiectum namque stat pro ente quod est et erit, non autem pro instanti “Omne quod fuit est”.</text:span></text:p>
      <text:p text:style-name="P432">/<text:span text:style-name="T208">97</text:span>/</text:p>
      <text:p text:style-name="P433"><text:span text:style-name="T209">Et dicas quod adhuc ‘homo’ non ampliatur in hac “Homo qui est fuit”, quia terminus ‘homo’ non verificatur in ordine ad diversas differentias temporum divisim. Verificari copulatim in ordine ad v</text:span><text:span text:style-name="T210">arias</text:span><text:span text:style-name="T209"> differentias copularum ad ampliationem non sufficit.</text:span></text:p>
      <text:p text:style-name="P13">Secunda regula: Terminus positus a parte subiecti respectu copulae de futuro aut participii futuri temporis in recto ampliatur ad ea quae sunt vel erunt.</text:p>
      <text:p text:style-name="P434">Secunda regula ex prioris expositione est lucida, virtute cuius tales concedendae veniunt “Pastilli comesti sunt comedendi”, “Homo mortuus est decollandus”, “Meretrix erit virgo”, “Doctor theologus erit Summulista”, “Para erit in utero matris”, “Sanctus in caelo erit peccator”, “Corruptum est generandum”.</text:p>
      <text:p text:style-name="P434">Dubitatur an subiectum istius amplietur “Non nigrum erit nigrum”, dicitur quod sic ut patet ex ampliationis definitione, et quodammodo superius tetigimus.</text:p>
      <text:h text:style-name="P703" text:outline-level="4"><text:soft-page-break/>Arguitur</text:h>
      <text:p text:style-name="P435">Contra: Non ampliatur in hac “Non nigrum est nigrum” et tamen illic pro pluribus supponit; igitur quia ampliatio est ampla suppositio.</text:p>
      <text:h text:style-name="P703" text:outline-level="4">Respondetur</text:h>
      <text:p text:style-name="P436">Respondetur: Concedendo antecedens et negando consequentiam, nec vocatur ampla suppositio quia terminus utrobique ampliatus pro pluribus supponit quam non ampliatus, sed quia ei convenit ampliationis quidditas, terminus ‘homo’ in hac “Sortes erit homo” pro pluribus supponit a parte praedicati (patet post resurrectionem) quam ‘homo’ in hac “Homo fuit”, et tamen non ampliatur a parte praedicati.</text:p>
      <text:p text:style-name="P11">Ex quibus regulis corollarie sequitur tertia: Si copula aut participium sit disiunctum de praeterito et futuro, subiectum ad tria ampliatur.</text:p>
      <text:p text:style-name="P437">Virtute tertiae regulae haec est concedenda: “Sortes iuvenis fuit disputaturus in Sorbona”, posito quod sit nunc senio confectus, nec in Sorbona disputat, nec ante disputavit, sed tamen in posterum disputabit. Per sensus explicationem et per resolventes hoc patet hoc ‘disputat’, ‘disputavit’ vel ‘disputabit’ in Sorbona, hoc est, fuit aut erit Sortes iuvenis, igitur. Et hoc in sensu disiuncto, non autem in sensu disiunctivo.</text:p>
      <text:p text:style-name="P11">Quarta regula: Isti termini ‘potest’, ‘possibile’, ‘contingens’ in potentia propinqua prime intentionaliter sumpti ad quattuor a tergo et a fronte ampliant.</text:p>
      <text:p text:style-name="P438">Possibile ut est terminus secundae intentionis et categorematice captus, non ampliat. Sola propositio existens est possibilis.</text:p>
      <text:p text:style-name="P438">Virtute huius regulae tales conceduntur “Albissimum potest esse albus”, “Optimus homo potest esse melior”, “Altissimum potest esse altius”, “Pessimum potest esse peius”, “Altissimus potest ascendere”.</text:p>
      <text:p text:style-name="P39">Quinta regula: Prius et posterius quando ordinem temporis important tam ante quam retro ampliatur. Quarum ampliationem harum propositionum veritates “Adam est prior Antichristo”, “Antichristus est /98/ posterior Adam” enucleant.</text:p>
      <text:p text:style-name="P439">Sic dicatur de istis terminis ‘anteire’, ‘praecedere’ et similibus.</text:p>
      <text:h text:style-name="P703" text:outline-level="4">Obiectio</text:h>
      <text:p text:style-name="P439">Contra dicis: Bene sequitur “Adam est prior Antichristo; ergo Antichristus est prior Adam”.</text:p>
      <text:h text:style-name="P703" text:outline-level="4"><text:soft-page-break/>Responsio</text:h>
      <text:p text:style-name="P440">Respondetur: Consequentia est nulla, sic convertatur prius “Antichristo qui est vel erit, est vel fuit Adam”.</text:p>
      <text:p text:style-name="P11">Sexta regula: Dictiones primae intentionis in ‘bilis’, aut in ‘tivum’ terminantes aptitudinem ad utrumque significatum importantes, ad ea quae sunt et possunt esse ampliant.</text:p>
      <text:p text:style-name="P440">Cubile et sedile, non ampliant. Risibile ut de materiali significato ampliat, non est hominis passio sed solum de connotato.</text:p>
      <text:p text:style-name="P11">Septima regula: Terminus sequens aut procedens dictionem importantem mutationem acquisitivam, in cuius significatum acquisitio denotatur ferri, ampliatur ad ea quae sunt, vel erunt, et si corruptionem importent ad ea quae sunt vel fuerunt. De incipit et desinit in loco dicetur.</text:p>
      <text:p text:style-name="P440">Virtute huius regulae tales conceduntur “<text:span text:style-name="T211">Sortes facit domum post eius initium”, pariter et haec “Sortes facit circulum”, et licet nullus circulus sit in mundo, terminus ‘circulum’ supponit. Si Sortes facit “⟨a⟩ domum” et si “⟨a⟩ domus” non compleatur, haec est falsa “Sortes facit a domum”, licet putabatur vera tempore structurae.</text:span></text:p>
      <text:p text:style-name="P11">Octava regula: Terminus explicans connotationem alicuius termini ampliativi ampliatur ad tot temporis differentias ad quot talis terminus cuius connotatione explicat, ampliare potest.</text:p>
      <text:p text:style-name="P441">Ut “Sortes est visibilis visione”, inibi visione ad quattuor differentias temporum ampliatur.</text:p>
      <text:p text:style-name="P11">Nona regula: Terminus importans actum sensus ampliatur ad ea quae sunt vel paulo ante hoc fuerunt.</text:p>
      <text:p text:style-name="P441">Dicimus nos audire sonum quando est corruptus.</text:p>
      <text:p text:style-name="P11">Decima regula: Terminus positus cum termino importante actu animi interiorem intellectus aut voluntatis in cuius significatum vis verbi transire denotatur, ad ampliationem amplissimam ampliatur.</text:p>
      <text:p text:style-name="P442">Termini actum interiorem importantes sunt tales: ‘intelligo’, ‘concipio’, ‘significat’, ‘supponit’, ‘verificatur’, ‘aveo’, ‘cupio’, ‘desidero’, ‘volo’, ‘nolo’, ‘glisco’, et sic de talibus terminus actum intellectus aut voluntatis importantibus.</text:p>
      <text:p text:style-name="P443"><text:soft-page-break/>Virtute huius regula tales conceduntur “Chimaera significat Chimaeram”, “Chimaera intelligitur”, “Chimaera est obiectum notitiae”, “Homerus vivit ut poeta”. <text:span text:style-name="T6">Primo Perihermeneias</text:span>, hoc est in intellectu res impossibilis potest actum intellectus terminare.</text:p>
      <text:h text:style-name="P703" text:outline-level="4">Dubium</text:h>
      <text:p text:style-name="P444">Sed dubitas: An est aliqua ampliatio ultra quattuor?</text:p>
      <text:h text:style-name="P703" text:outline-level="4">Responsio</text:h>
      <text:p text:style-name="P444">Licet hic partita sit positio, pars affirmativa est communior et /99/ <text:span text:style-name="T212">vero similior.</text:span></text:p>
      <text:h text:style-name="P703" text:outline-level="4">Voluntas et intellectus sunt impossibilium</text:h>
      <text:p text:style-name="P445">Propterea affirmative respondetur: Voluntas est impossibilium, Tertio Ethicorum, propterea primus angelus velle poterat se esse Deum. Licet illud impossibile censeret, et non minus potens est intellectus intelligendo impossibile quam voluntas volendo; ergo utraque illarum potentiarum impossibile fertur obiective.</text:p>
      <text:p text:style-name="P446"><text:span text:style-name="T213">Secundo: Intellectus potest facere quandam compositionem impossibilem, uniendo multas res possibiles mutuo quae sunt incompossibiles, ut Deum esse partem compositi, animam intellectivam esse de essentia Dei, et intellectus potest suu</text:span><text:span text:style-name="T214">m</text:span><text:span text:style-name="T213"> actum super illud totum ferre, igitur.</text:span></text:p>
      <text:p text:style-name="P447">Tertio: ‘Chimaera’ significat Chimaeram. Similiter asinus habens animam intellectivam tamquam partem eius significat talem imaginatum asinum, igitur. Et haec non potest salvari nec tales, nisi ampliationes tales ponendae esset; ergo talis ampliatio minime neganda venit; ergo subiectum huius supponit “ ‘Chimaera’ significat Chimaeram”, et sic verificabis “Hoc imaginarie est Chimaera”.</text:p>
      <text:h text:style-name="P703" text:outline-level="4">Argumento Primo</text:h>
      <text:p text:style-name="P447">Contra illud arguitur: sequitur quod haec esse necessaria “Sortes intelligit Chimaeram”, similiter “Chimaera est intellecta a Sorte”, consequens est falsum. Si non sit intellectio in anima Sortis, illa est falsa.</text:p>
      <text:h text:style-name="P703" text:outline-level="4">Secundo</text:h>
      <text:p text:style-name="P447">Secundo: Haec erit necessaria “<text:span text:style-name="T215">Sortes imaginarie est Plato”, sed probo quod non, subiectum non significat Platonem; ergo non supponit pro eo.</text:span></text:p>
      <text:h text:style-name="P703" text:outline-level="4">Ad primum</text:h>
      <text:p text:style-name="P448">Ad primum nego sequelam: Sicut probatio bene ostendit, requiritur notitia actualis in Sorte ad utriusque veritatem.</text:p>
      <text:h text:style-name="P703" text:outline-level="4">Ad secundum <text:span text:style-name="T216">significatio respectiva</text:span></text:h>
      <text:p text:style-name="P449">Ad secundum: Concedo quod ipsa est vera et necessaria, et nego quod Sortes non significat Platonem de significatione respectiva.</text:p>
      <text:p text:style-name="P449"><text:soft-page-break/><text:span text:style-name="T217">Pro cuius lucidiori in</text:span><text:span text:style-name="T218">telligentia, scito quod duplex est significatio, quaedam est respectiva quae contrahitur ab amplissima copula, et hac significationem Sortes significat Platonem, et quamlibet rem mundi etiam antequam imponeretur ad significandum, quemadmodum facit hac dictio ‘buf’, quia in hac significationem Sortes et Plato significant idem adaequate.</text:span></text:p>
      <text:p text:style-name="P450">Haec consequentia est nulla: Sortes Platonem significat significatione respectiva; ergo Sortes Platonem significat in absoluto modo loquendi. Si tamen concederetur illud consequens, nihil aliud haberes cum esset solum pugna verbalis. Haec significatio non sufficit ad transcendens nec ad terminum esse communem, et dicta in terminis et in aliis locis communibus non intelliguntur de hac significatione. </text:p>
      <text:h text:style-name="P703" text:outline-level="4">Absoluta</text:h>
      <text:p text:style-name="P451">Alia est significatio absoluta quam terminus significat extra propositionem et in propositione, a qua <text:s/>significatione terminus non cadit et de ista significatione semper loquuntur artistae extra hanc materiam.</text:p>
      <text:p text:style-name="P452"><office:annotation office:name="__Annotation__3024_1410044149" loext:resolved="false"><dc:creator>Unknown Author</dc:creator><dc:date>2025-06-01T21:27:19.103281691</dc:date><text:p><text:span text:style-name="T561">Conceptus specificus cui subordinatur haec vox ‘homo’ omnes homines possibiles significat et est naturalis similitudo talium.</text:span></text:p></office:annotation>Conceptus specificus cui subordinatur haec vox ‘homo’ omnes homines possibiles significat et est naturalis similitudo talium.<office:annotation-end office:name="__Annotation__3024_1410044149"/> Sic conceptus huius vocis ‘Iohannes’ absolute non repraesentat Platonem, sed sufficit quod ille conceptus respective Platonem significet, et quod det intelligere Platonem in mente complexive et respective, nec hoc est naturaliter nec ad placitum proprie significare, sicut communiter loquimur in terminis.</text:p>
      <text:p text:style-name="P453">Ad Sortem respective repraesentare Platonem sufficit quod imaginaria sit similitudo Platonis, et quemlibet res mundi est suum significatum respectivum et ultimatum, et pro illa personaliter supponit. Et quia ad placitum intellectus aut voluntatis est sic extrema unire, potest dici utcumque ad placitum hoc quod <text:span text:style-name="T219">solum /100/ respective significat. Ab hac significatione terminus mentalis cadere potest.</text:span></text:p>
      <text:h text:style-name="P703" text:outline-level="4">Arguitur tertio</text:h>
      <text:p text:style-name="P454">Tertio arguitur: Subiectum istius mentalis “Homo existens asinus imaginarie currit”, pro nullo <text:span text:style-name="T220">impossibili supponit quod patet, quia vel ille conceptus causatur a rebus impossibilibus, et hoc non quia nulla talis est nec esse potest, vel a rebus possibilibus et hoc non, quia sicut Sortes causat notitiam sui et non Platonis. Sic qualibet res possibilis causat conceptum rei possibilis, immo praecise suimet.</text:span></text:p>
      <text:h text:style-name="P703" text:outline-level="4">Respondetur</text:h>
      <text:p text:style-name="P455">Respondetur negando quod subiectum istius non supponit pro re impossibili, istam dicimus veram, homo existens, asinus significatur per hoc complexum ‘homo-existens-asinus’, et subiectum supponit pro re impossibili, et conceptus illius rei impossibilis a rebus possibilibus causatur, quia res possibiles conceptus simplices rerum possibilium causant, ut Sortes causat conceptum sui, et Brunellus conceptum Brunelli.</text:p>
      <text:p text:style-name="P455">Iam habentur illae notitiae incomplexae in intellectu, vel in sensu interiori, tunc intellectus unit illos conceptus simplices mediante aliquo coniungibili, dicens Sortes existens, Brunellus apponens praedicatum.</text:p>
      <text:p text:style-name="P455"><text:soft-page-break/><office:annotation office:name="__Annotation__3131_1410044149" loext:resolved="false"><dc:creator>Unknown Author</dc:creator><dc:date>2025-06-01T21:41:45.642299118</dc:date><text:p text:style-name="P753"><text:span text:style-name="T561">Voluntas intellectui praevalet: Intellectus est participative liber et ad voluntatis imperium hoc facere potest.</text:span></text:p></office:annotation>Intellectus est participative liber et ad voluntatis imperium hoc facere potest<office:annotation-end office:name="__Annotation__3131_1410044149"/>, interdum <text:span text:style-name="T221">mere naturaliter ex aliquibus apprehensionibus praeviis quae ad talem complexionem aditum dant, sicut interdum potest intellectus copulam categoricam formare et alia syncategoremata interdum vero non, et causam reddere tam his quam illis est communis, propterea ob talem rationem haec via non impugnatur.</text:span></text:p>
      <text:h text:style-name="P703" text:outline-level="4">Arguitur quarto</text:h>
      <text:p text:style-name="P456">Quarto arguitur: Sequeretur quod homo significaret asinum etiam de significatione absoluta. <text:span text:style-name="T222">Consequens est falsum et quod sequatur patet. Significat omne illud quod potest esse homo et potest imaginarie esse homo.</text:span></text:p>
      <text:h text:style-name="P703" text:outline-level="4">Respondetur</text:h>
      <text:p text:style-name="P458">Respondetur: Argumentum non concludit.</text:p>
      <text:p text:style-name="P457"><text:span text:style-name="T223">Dicam ‘homo’ significat omnem hominem qui potest esse et omen hominem quem imaginari potes esse, sed non significat omne illud quod imaginari potes esse hominem. </text:span><text:span text:style-name="T224">Illae propositiones late differunt, mediantibus aliis copulis idem est.</text:span></text:p>
      <text:p text:style-name="P459">Istae aequivalent “Homo significat omnem hominem possibilem” et “Omne illud quod possibiliter est homo”. ‘Homo’ significat non sto in appellatione rationis, et sic de aliis copulis citra imaginatur.</text:p>
      <text:p text:style-name="P459">Sed istud est cum positione opposita incidere, sicut istae in aliis aequivalent “Homo omnem hominem possibilem significat” et “Significat omen illud quod potest esse homo”. Sic in proposito ‘homo’ significat omne illud quod potest imaginari esse homo, et omen hominem quem imaginari potes, licet haec sit vera demonstrato subiecto huius: “Homo est asinus” ‘homo’ significat asinum.</text:p>
      <text:p text:style-name="P459">Non sequitur quod haec sit vera “Homo est asinus”, quia illic significatione absoluta ubi non est amplissima. Ampliatio ‘homo’ non significat asinum non habendo oculum ad ampliationem, hoc est, dictu naturalis similitudo hominis non est naturalis similitudo asini.</text:p>
      <text:h text:style-name="P703" text:outline-level="4">Arguitur quinto</text:h>
      <text:p text:style-name="P460">Quinto arguitur: Sequitur quod aliqua est indefinita quae nullam potest habere singularem. Hoc est inconveniens, et patet consequentia.</text:p>
      <text:p text:style-name="P460">Capio hanc “Homo imaginarie est asinus”, da mihi aliquam singulare eius “Sortes imaginarie est asinus” nullam potes apparentiorem singularem assignare, sed nulla istarum est singularis, cum utriusque istarum subiectum pro pluribus accipi potest mediante simili copula. Sortes praedicatur vere de Platone mediante copula istius propositionis.</text:p>
      <text:p text:style-name="P461">Eodem modo istae “Homo imaginarie est Plato (demonstrando Sortem)” subiectum /101/ <text:span text:style-name="T225">illius mediante copula de imaginarie supponit pro Platone.</text:span></text:p>
      <text:h text:style-name="P703" text:outline-level="4">Responsio</text:h>
      <text:p text:style-name="P463">Respondetur concedendo illatum, nec hoc est inconveniens.</text:p>
      <text:p text:style-name="P463">Nota</text:p>
      <text:p text:style-name="P463"><text:soft-page-break/>Hic animadverte quod pro hac positionem non oportet ponere aliquod complexum significabile ab incomplexis distinctum, sicut alias dicemus, quia Sortem currere nihil aliud est quam sortes currens. Sic hominem esse asinum significatur per hanc “Hominem esse asinum” et subiectu supponit pro aliquo impossibili, quod intelligitur ex homine et asino componi.</text:p>
      <text:h text:style-name="P703" text:outline-level="4">Arguitur sexto</text:h>
      <text:p text:style-name="P462"><text:span text:style-name="T225">Sexto argui</text:span><text:span text:style-name="T226">tur: Aliquod impossibile prime intentionaliter non est significabile, et idem est iudicium de quolibet, igitur.</text:span></text:p>
      <text:p text:style-name="P462"><text:span text:style-name="T226">Maior patet, quia ista non est concedenda “Non intelligibile est intelligibile”. Patet</text:span> <text:span text:style-name="T227">conversive infert hanc “Intelligibile est non intelligibile”, et ista infert hanc “Intelligibile non est intelligibile” ab affirmativa ad negativam, praedicato variato penes finitum et infinitum, et omne intelligibile est intelligibile; ergo duo contradictoria vera ex positione sequuntur.</text:span></text:p>
      <text:h text:style-name="P703" text:outline-level="4">Arguitur septimo</text:h>
      <text:p text:style-name="P464">Septimo arguitur: Sequeretur quod istae essent synonyma “Sortes imaginarie est Plato”, “Sortes imaginarie est Sortes” de significatione respectiva, cum significent idem adaequate et eodem modo.</text:p>
      <text:h text:style-name="P703" text:outline-level="4">Ad sextum</text:h>
      <text:p text:style-name="P464">Ad sextum: <text:span text:style-name="T228">C</text:span>oncedo <text:span text:style-name="T228">quo</text:span><text:span text:style-name="T229">d</text:span><text:span text:style-name="T228"> impossibile </text:span><text:span text:style-name="T229">est significabile. Sed de ista “Non intelligibile est intelligibile” distinguo. Vel negatio infinitans prohibet omnem suppositionem oppositam suppositioni termini instanti, et tunc non sequitur. Si aliquas prohibeat, aliquas admittendo, tunc illa concedatur in quo sensu non infert illam negativam de praedicato finito, ut ex </text:span><text:span text:style-name="T8">Secundo Perihermeneias</text:span><text:span text:style-name="T229"> lucebit.</text:span></text:p>
      <text:h text:style-name="P703" text:outline-level="4">Ad septimum</text:h>
      <text:p text:style-name="P465">Ad septimum: Si illatum concederetur positionem non infringit. Secundo nego sequelam. Est enim unus terminus in una non habens similem synonymitatem. Et licet sit convertibilitas, non tamen sequitur synonymitas.</text:p>
      <text:h text:style-name="P703" text:outline-level="4">Dubitatio</text:h>
      <text:p text:style-name="P466">Dubitatur quomodo propositionum veritates cum terminis ampliativis deprehendi possunt.</text:p>
      <text:h text:style-name="P703" text:outline-level="4">Declaratio trium</text:h>
      <text:p text:style-name="P466">Respondetur trifariam, per resolventes per ampliationis explicationem, et per regulas a non amplo ad amplum et contra, arguendi.</text:p>
      <text:h text:style-name="P703" text:outline-level="4"><text:soft-page-break/>De primo regula</text:h>
      <text:p text:style-name="P11">Quo ad primum ponitur haec regula: Propositionis indefinitae, particularis aut singularis, sine subiecto demonstrativo, veritas per resolventes cognoscenda venit.</text:p>
      <text:p text:style-name="P467">In priore resolvente praedicatum et copulam resolubilis cum pronomine demonstrativo accipito pro subiecto.</text:p>
      <text:p text:style-name="P467">Secundae resolventis subiectum erit pronomen idem demonstrans, et subiectum resolubilis erit praedicatum, et capietur copula propositionis secundum ampliationis exigentiam, ut “Centenarius erit puer unius anni”, “Hoc erit puer unius anni”, demonstrando ephebum qui centum annos vivit “Hoc est vel erit puer unius anni”, igitur.</text:p>
      <text:h text:style-name="P703" text:outline-level="4">De secundo</text:h>
      <text:p text:style-name="P11">Quo ad secundum dicitur: Non omnis ampliatio est explicanda copulative, disiunctive, aut copulatim, et per consequens eam disiunctive exprimere necessum est.</text:p>
      <text:p text:style-name="P468">Prima pars patet, quia tunc hae duae essent falsae “<text:span text:style-name="T230">Omnis homo fuit /102/ </text:span><text:span text:style-name="T231">animal”, “Homo non fuit animal”, posito quod nunc primum nascatur Sortes. Et si omnis ampliatio disiunctive exprimeretur, retento eodem casu, illae duae essent verae de expressione copulatim, patet sicut praecedens.</text:span></text:p>
      <text:h text:style-name="P703" text:outline-level="4">Evasio</text:h>
      <text:p text:style-name="P469">At forte dicis: Quando terminus distribuitur explicatio erit copulative, quando vero non distribuitur <text:span text:style-name="T232">explicabitur disiunctive.</text:span></text:p>
      <text:p text:style-name="P470">Immo eodem modo non potest exprimi copulatim et per consequens disiunctim explicanda venit.</text:p>
      <text:h text:style-name="P703" text:outline-level="4">Reprehensio</text:h>
      <text:p text:style-name="P471">Contra: Tunc haec erit falsa “Omne creans necessario est Deus”, posito quod nihil creet, cum sit una copulativa cuius una pars principalis est falsa, sed consequens est falsum.</text:p>
      <text:p text:style-name="P471">Et in explicatione disiunctim ampliationis fac disiunctum pro solo illo et omni illo supponere pro quo terminus supponit, ut si non in hac, non nigrum erit nigrum prohibeat suppositionem totius, ne supponat pro aliquo illo pro quo supponit terminus finitus, sic scilicet quod nec supponit pro nigro quod est, nec pro nigro quod erit.</text:p>
      <text:p text:style-name="P471">Sic explica ampliationem: Illud quod est vel erit res quae neque est nigra neque erit nigra erit nigrum.</text:p>
      <text:p text:style-name="P471">Si solum prohibeat suppositionem termini secundum unam differentiam temporis, sic explicabis: Illud quod est non nigrum vel quod erit non nigrum, erit nigrum. Et sic dicatur illic aliud a nigro erit nigrum, licet aggregatum a relativo et ablativo sequenti communius non supponit pro illo pro quo supponit talis ablativus.</text:p>
      <text:h text:style-name="P703" text:outline-level="4"><text:soft-page-break/>De tertio</text:h>
      <text:p text:style-name="P11">Ad tertium quaesitum respondetur per hanc regulam fundamentalem: Terminum ampliativum ad ipsum non amplum vel minus amplum superiorem observabis.</text:p>
      <text:p text:style-name="P472">Ex hac regula fundamentali aliquas regulas pro materiae uberiori intelligentia deducamus. Quarum prima est:</text:p>
      <text:p text:style-name="P11">A non amplo vel a minus amplo ad suum magis amplum affirmative sine distributione ampli, consequentia est bona.</text:p>
      <text:p text:style-name="P473">Ex qua regula secunda sequitur haec:</text:p>
      <text:p text:style-name="P11">Arguendo ab amplo ad non amplum negative cum distributione ampli, consequentia est bona.</text:p>
      <text:p text:style-name="P474">Patet in ea ex opposito consequentis, ad oppositum antecedentis arguitur.</text:p>
      <text:p text:style-name="P11">Ulterius tertio patet: Consequentiam non valere a non amplo ad amplum negative sine constantia.</text:p>
      <text:p text:style-name="P11">Quarto patet: Ab amplo distributo ad non amplum affirmative sine constantia, consequentiam esse nullam .</text:p>
      <text:p text:style-name="P475">Ex basi praemissa haec duae regulae sicut et praecedentes suam evidentiam suscipiunt.</text:p>
      <text:h text:style-name="P703" text:outline-level="4">Arguitur primo</text:h>
      <text:p text:style-name="P475">Contra primam regulam arguitur sic: Non sequitur “Sortes est; ergo Sortes fuit”, et tamen arguitur a non amplo ad amplum.</text:p>
      <text:h text:style-name="P703" text:outline-level="4">Secundo</text:h>
      <text:p text:style-name="P476">Similiter /103/ <text:span text:style-name="T233">non sequitur “Sortes potest esse; ergo Sortes imaginatur esse”, et tamen arguitur a minus amplo ad magis amplum, igitur.</text:span></text:p>
      <text:h text:style-name="P703" text:outline-level="4">Tertio</text:h>
      <text:p text:style-name="P477">Tertio non <text:span text:style-name="T234">sequitur “Omne currens est asinus; ergo Omne currens potest esse asinus”.</text:span></text:p>
      <text:h text:style-name="P703" text:outline-level="4">Evasio</text:h>
      <text:p text:style-name="P478">Sed dicis arguitur cum distributione.</text:p>
      <text:h text:style-name="P703" text:outline-level="4">Reprehensio</text:h>
      <text:p text:style-name="P478">Contra. Bene sequitur “Omne currens est asinus; ergo Currens potest esse asinus”.</text:p>
      <text:h text:style-name="P703" text:outline-level="4"><text:soft-page-break/>Responsio</text:h>
      <text:p text:style-name="P479">At dicis (et bene) non sequitur cum distributione ampli.</text:p>
      <text:h text:style-name="P703" text:outline-level="4"><text:span text:style-name="T235">Replica</text:span> </text:h>
      <text:p text:style-name="P480">Contra. Bene sequitur “Omnes asinus est currens; ergo Omnis asinus potest esse currens” et tamen arguitur cum distributione ampli, igitur.</text:p>
      <text:h text:style-name="P703" text:outline-level="4">Ad primum</text:h>
      <text:p text:style-name="P480">Ad primum concedo quod non sequitur non arguitur ad amplum suum, cum alius error a parte praedicati committatur. Reliquos terminos uniformiter aut regulae radicem in eis teneto.</text:p>
      <text:h text:style-name="P703" text:outline-level="4">Ad secundum</text:h>
      <text:p text:style-name="P480">Ad secundum pariformiter respondetur. Hanc tamen bene infert “Sortes imaginarie est”.</text:p>
      <text:h text:style-name="P703" text:outline-level="4">Ad tertium</text:h>
      <text:p text:style-name="P480">Ad tertium. Inter arguendum ad calcem usque responsum est, ad quam dico argumentum tenere solum gratia materiae.</text:p>
      <text:h text:style-name="P703" text:outline-level="4">Arguitur</text:h>
      <text:p text:style-name="P481">Contra tertiam regulam arguitur. Bene sequitur “Asinus non est currens; ergo Asinus possibiliter non est currens” sine constantia.</text:p>
      <text:p text:style-name="P481">Responsio</text:p>
      <text:p text:style-name="P481">Respondetur. Hoc est gratia materiae ob consequentis necessitatem. In simili forma facile est instare. Hanc illationem novisti esse nullam “Creans non est Deus; ergo Creans possibiliter non est Deus”.</text:p>
      <text:p text:style-name="P10"/>
      <text:h text:style-name="P699" text:outline-level="2">Sequitur <text:span text:style-name="T453">D</text:span>e <text:span text:style-name="T453">A</text:span>ppellationibus</text:h>
      <text:p text:style-name="P11">Appellatio est terminus connotativus in propositione existens.</text:p>
      <text:p text:style-name="P482">Quare omnis appellatio est connotatio et non contra. Numquam est etiam appellatio rationis sine appellatione formalis significati, ut in appellatione rationis dicetur.</text:p>
      <text:p text:style-name="P11">Quot fit quod aliqua appellatio est suppositio, et nonnumquam secernuntur.</text:p>
      <text:list text:style-name="L16">
        <text:list-item>
          <text:p text:style-name="P744">Praedicatum enim huius “homo est albus” et supponit et appellat.</text:p>
        </text:list-item>
        <text:list-item>
          <text:p text:style-name="P744">Praedicatum autem huius “Homo est animal” supponit et non appellat.</text:p>
        </text:list-item>
        <text:list-item>
          <text:p text:style-name="P744">Praedicatum vero huius “Homo est coenans” appellat et non supponit.</text:p>
        </text:list-item>
      </text:list>
      <text:p text:style-name="P11">Circa appellationem realem quinque regulae notandae veniunt. Quarum prima est. Deficiente connotatione termini positivi eius suppositio deest.</text:p>
      <text:p text:style-name="P483">Huius regulae vigore haec est neganda “Aethiops est albus” quia praedicatum non supponit pro Aethiope cum non conveniat ei appellatio termini albus. Pari forma haec erat falsa “Abel fuit pater”.</text:p>
      <text:p text:style-name="P483">Dicebatur positive quare haec est vera “Sortes agricola est ignarus”, licet ignarus scientiam connotet, hoc tamen privative. Ad hoc quod talis terminus pro aliquo supponat sat est quod illius termini ‘privatio’ agricolae coveniat.</text:p>
      <text:p text:style-name="P11">Secunda regula: Quando duo termini connotativi quorum unus alium determinat, a parte eiusdem extremi ponuntur, et ad idem extremum se applicant semota ampliatione /104/ sua significata formalia denominando pro eodem tempore adaequato appellant.</text:p>
      <text:p text:style-name="P490">Multae particulae huius regulae sunt perviae, nec ad eam oportet quod determinabile praecedat et determinato sequatur. “Ego video regem” et “Ego sum regem videns” aequivalent. “Percutio regentem” et “Regentem percutio”. Semota ampliatione dicebatur multum refert dicere “Crudum comedi” et “Comedi crudum”.</text:p>
      <text:p text:style-name="P490">Quare omnes tales negandae veniunt. “Comedi carnes crudas” per illam denotatur quod comedi carnes tempore cruditatis.</text:p>
      <text:p text:style-name="P491"><text:span text:style-name="T236">Ex eadem lege omnes hae sunt falsae: “Comedi integrum pomum”, “Percussi rectorem Parisiensem”, “Percussi doctorem theologum”, “Resu</text:span><text:span text:style-name="T237">r</text:span><text:span text:style-name="T236">gent caeci in iudicio”, “Resurgen</text:span><text:span text:style-name="T237">t</text:span><text:span text:style-name="T236"> claudi ad gloriam”, “Erunt peccatores in caelo”, “Deus fecit malum angelum”, “Deus produxit Adam patrem Cain”.</text:span></text:p>
      <text:p text:style-name="P484"><text:soft-page-break/><text:span text:style-name="T236">“Sortes vidit Papam”, posito quod ante Papatum h</text:span><text:span text:style-name="T237">u</text:span><text:span text:style-name="T236">nc virum vidisset, </text:span><text:span text:style-name="T237">et numquam tempore Papatus. Praeponendo tamen terminos a parte copulae omnes tales concedendae veniunt: </text:span><text:span text:style-name="T238">caeci, claudi et peccatores resurgent ad beatitudinem, integrum et crudum comedi, Papam vidi et sic de talibus.</text:span></text:p>
      <text:h text:style-name="P703" text:outline-level="4">Arguitur primo</text:h>
      <text:p text:style-name="P485"><text:span text:style-name="T239">Contra hanc regula sequitur. </text:span><text:span text:style-name="T240">Bene sequitur per conversionem “Carnes crudas comedi; ergo Tu fuisti comedens carnes crudas”, convertens est falsa; ergo conversa quod sequatur patet sic “Carnes crudas comedens” est unum extremum et “tu” aliud.</text:span></text:p>
      <text:h text:style-name="P703" text:outline-level="4">Secundo</text:h>
      <text:p text:style-name="P486"><text:span text:style-name="T240">Secundo arguitur. Casu posito haec est falsa “</text:span><text:span text:style-name="T241">Papam Sortes vidit”, nam Papam videns non verificatur in ordine ad copulam illius propositionis, quia ista de disiuncto non est vera Sorte demonstrato “Hoc est vel fuit Papam videns”, ut patet per disiunctivae falsitatem ad quam reducitur. Nam haec pars est falsa “Hoc est Papam videns” ut liquet.</text:span></text:p>
      <text:p text:style-name="P487"><text:span text:style-name="T241">Et similiter illa de praeterito numquam habuit unam de praesenti veram. Numquam enim fuit haec vera</text:span><text:span text:style-name="T239"> “</text:span><text:span text:style-name="T242">Hoc est Papam videns” Sorte demonstrato.</text:span></text:p>
      <text:h text:style-name="P703" text:outline-level="4">Tertio</text:h>
      <text:p text:style-name="P488"><text:span text:style-name="T242">Tertio arguitur. </text:span><text:span text:style-name="T243">Sequitur ex regula quod haec est falsa “Sortes comedit poma”, “Sortes comedi pira” qui mille pira et poma comedit. Contra communem modum concipiendi hominum immo naturaliter “Sortes non potest comedere pomum integrum” ut per eius de inesse patet.</text:span></text:p>
      <text:h text:style-name="P703" text:outline-level="4">Ad primum</text:h>
      <text:p text:style-name="P489"><text:span text:style-name="T243">Ad primum. </text:span><text:span text:style-name="T244">Quidam ob argumentum illam damnat, nego quod convertens illius sit falsa, male convertitur, quia vel capis hoc totum ‘carnes crudas comedens’ pro subiecto vel praedicato.</text:span></text:p>
      <text:p text:style-name="P489"><text:span text:style-name="T244">Si secundum, </text:span><text:span text:style-name="T245">facilis est haec conversio.</text:span></text:p>
      <text:p text:style-name="P492">Si primum debes illam sic convertere “ergo Tu carnes crudas comedens fuisti” et non in hanc “Tu fuisti comedens carnes crudas” et id rationis est termini debent appellare eodem modo in convertente sicut in convers, saltem non magis stricte in convertente quam in conversa appellare.</text:p>
      <text:p text:style-name="P493">In ista autem “Crudas comedisti” illi termini connotativi non appellant sua significata formalia pro eadem mensura adaequate, sed in convertente mala assignata pro eodem tempore adaequato appellant.</text:p>
      <text:h text:style-name="P703" text:outline-level="4">Ad secundum</text:h>
      <text:p text:style-name="P494">Ad secundum dicitur. Quod oportet sic verificationem facere, Sorte demonstrato hoc “Papam videns est vel fuit”, modo hoc est verum.</text:p>
      <text:h text:style-name="P703" text:outline-level="4"><text:soft-page-break/>Ad tertium</text:h>
      <text:p text:style-name="P495">Ad tertium. Concedo has falsas “<text:span text:style-name="T246">T</text:span>empore comestionis non est comestio” et “Tempore quo Sortes est comedens pomum est factum”, <text:span text:style-name="T246">nisi diceretur quod adhuc non desinit esse pomum ob parvae partis ablationem. /</text:span><text:span text:style-name="T247">104</text:span><text:span text:style-name="T246">/ </text:span><text:span text:style-name="T248">Sed tunc ibis ad hanc “Sortes comedit pomum integrum”. Concedo ergo illas esse falsas.</text:span></text:p>
      <text:p text:style-name="P496">Istae tamen sunt verae “Pomum Sortes comedit”, quod pro vulgo sufficit, et arte sua invenis logicus utatur, ut in his regulis habituetur.</text:p>
      <text:p text:style-name="P496">Exercitatio est artis altrix. Et concedo quod illa modalis est falsa, et cum in ea eruditus fuerit communiter loquentium modo utatur.</text:p>
      <text:p text:style-name="P11">Tertia regula: Terminus appellativus solitarie positus, suum significatum appellat convenire rei per qua natus est supponere solitarie sine addito, vel cum solo termino absoluto poni dicitur.</text:p>
      <text:p text:style-name="P497">Tertia regula exemplo detegitur cum dico “Sortes est albus”, ‘albus’ albedinem connotat adiacere rei pro qua terminus ‘albus’ natus est supponere. Sic hic “Sortes est homo albus”.</text:p>
      <text:p text:style-name="P11">Quarta regula: Quando duo termini connotativi se habentes sicut substantivum et adiectivum immediate coniunguntur. Sic scilicet quod connotatum unius natum est connotato alterius competere, tunc terminus qui se habet instar adiectivi, suum significatum formale denotat competere connotato substantivi, dummodo talis terminus non fuerit numeralis, et accidens inhaerere denotat.</text:p>
      <text:p text:style-name="P498">Quarta regula exemplariter patet per hanc “Sortes est bonus artista” denotatur quod Sortes in artibus peritiam habet, et conceditur licet sordidae vitae fuerit. Similiter Barabbas fuit fortis latro licet debilis homo, et Aristoteles magnus philosophus licet parvo et gibboso corpore fuerit. <text:span text:style-name="T249">Nec refert sive substantivum praecedat sive sequatur. Idem enim est dictu, “Sortes est manus artista”, et “Sortes est artista magnus”.</text:span></text:p>
      <text:p text:style-name="P499">Ad veritatem huius “Sortes est clericus albus” requiritur quod sit corpore albus et clericus, quia connotatio termini ‘albus’ non est apta nata competere connotato termini ‘clericus’, propterea appellat sicut in regula praecedenti.</text:p>
      <text:p text:style-name="P499">“Sortes Dacus est niger monachus”, si sit professionis eorum qui nigrum habitum deferunt, illa est vera. ‘Monachus’ duplicem connotationem habet:</text:p>
      <text:list text:style-name="L17">
        <text:list-item>
          <text:p text:style-name="P745">Uno modo connotat quod homo sit talis professionis Sancti Benedicti vel alterius, et tunc exemplum de regula praecedenti latitat.</text:p>
        </text:list-item>
        <text:list-item>
          <text:p text:style-name="P745">Alio modo talem habitum aptitudinalem propinque connotat.</text:p>
        </text:list-item>
      </text:list>
      <text:p text:style-name="P499"><text:soft-page-break/>Et sic <text:span text:style-name="T250">haec est concedenda de Sorte Daco albissimo quod est niger monachus, dummodo habitum nigrum habeat, illa est vera.</text:span></text:p>
      <text:p text:style-name="P500">In terminis numeralibus non tenet, si eadem anima in tribus corporibus de potentia Dei ponatur, tunc ‘a’, ‘b’ et ‘c’ sunt tria animata, et accidens inhaerere denotat. Propter tales “Deus est creator rudibilis” in recto, quae est vera quando Deus asinum creat.</text:p>
      <text:p text:style-name="P500">“Sortes est occisus pater”, ad cuius veritatem requiritur quod Sortes in esse paternitatis occidatur, et non habet verificari haec propositio pro morte filii, nisi de per accidens, quia filio mortuo, Sortes desinit esse pater.</text:p>
      <text:p text:style-name="P501">“Pater albus currit” non requirit fili albedinem ad eius veritatem, sed Patris.</text:p>
      <text:p text:style-name="P501">Ex his duabus regulis /106/ <text:span text:style-name="T251">patet quod magnus capitur aequivoce in his duabus “Sortes est magnus” et “Sortes est magnus artista”. In prima accipitur pro magnitudine molis, in secunda vero pro peritia et excellentia in artibus.</text:span></text:p>
      <text:h text:style-name="P703" text:outline-level="4">Arguitur</text:h>
      <text:p text:style-name="P502">Contra illud arguitur: Ex hoc sequitur quod terminus cadat a sua significatione, quum Sortes in hac “Sortes est magnus in mente” stat pro magnitudine molis, in ista autem “Sortes est magnus artista” stat aliter, igitur.</text:p>
      <text:h text:style-name="P703" text:outline-level="4">Respondetur</text:h>
      <text:p text:style-name="P503">Respondetur negando quod sequatur, quia non cadit a qualibet sua significatione, licet ab aliqua actuali significatione cadat.</text:p>
      <text:p text:style-name="P11">Quinta regula: Terminus non ampliativus appellat suum significatum secundum exigentiam copulae propositionis in qua ponitur, et secundum determinationem quae secum additur.</text:p>
      <text:p text:style-name="P504">Haec regula patet: Praedicatum enim huius “Sortes fuit albus” ‘albedinem’ pro tempore praeterito, et praedicatum huius “Sortes est albus” pro tempore praesenti appellat.</text:p>
      <text:p text:style-name="P504">Praedicatum vero huius “Adam est productus” non appellat productionem passivam pro tempore praesenti, sed pro tempore praeterito, et praedicator pro tempore futuro in hac “Antichristus est futurus praedicator”.</text:p>
      <text:p text:style-name="P504">Subiectum huius “Album fuit nigrum” appellat albedinem pro tempore praesenti sub disiunctione ad praeteritum.</text:p>
      <text:p text:style-name="P506">Virtute huius regulae concedimus “Pater fuit quando non fuit pater”, “Suppositio fuit quando non fuit suppositio”.</text:p>
      <text:p text:style-name="P507">Ultima regulae pars patet quia “Sortes est mortuus Parisii” denotat quod Sortes in tali loco est mortuus.</text:p>
      <text:p text:style-name="P505"><text:soft-page-break/>“<text:span text:style-name="T252">Corpus Christi non est longum septem pedibus in Eucharistia”, licet Corpus Christi in Eucharistia sit septem pedibus longum.</text:span></text:p>
      <text:p text:style-name="P508"/>
      <text:h text:style-name="P699" text:outline-level="2">Sequitur <text:span text:style-name="T454">D</text:span>e <text:span text:style-name="T454">A</text:span>ppellatione <text:span text:style-name="T454">R</text:span>ationis</text:h>
      <text:h text:style-name="P703" text:outline-level="4">Appellationi rationis</text:h>
      <text:p text:style-name="P11">Appellatio rationis passiva est terminus secundum propriam rationem secundum quam significat acceptus.</text:p>
      <text:p text:style-name="P509">Appellatio rationis et caetera: In ista “Cognosco hoc verbum” ‘cognosco’ in generali omen cognitionem sub disiunctione mihi adiacere connotat.</text:p>
      <text:p text:style-name="P509">Addatur venientem dicendo “Cognosco venientem”, tunc restringitur ad appellationem formalis significati. Illic ‘cognosco’ cognitionem appellat de materiali, pro cognoscenti supponit. Sed appellatio in ordine ad terminum sequentem appellatio rationis dicitur, et appellatio ad ly ‘cognosco’ formalis significati appellatio dicitur.</text:p>
      <text:p text:style-name="P509">Et cum appellatio passiva est acceptio termini in propositione pro suo significato secundum conceptum secumque quem talis terminus suum significatum significat, sequitur quod terminus absolutus suam propriam appellationem appellat.</text:p>
      <text:p text:style-name="P510">Ulterius sequitur: “Numquam est appellatio rationis sine appellatione formalis significati”. Sicut venientem in hac “Cognosco venientem” appellat suam propriam rationem, sic cognosco cognitionem appellat pro aliqua differentia temporis adiacere, et hoc est suum significatum formale appellare.</text:p>
      <text:p text:style-name="P511">Sensus huius cognosco venientem est iste: cognosco venientem sub conceptu venientis. Et si sub alio conceptu eum concipiam, utpote sub conceptu hominis aut animalis, hoc ad eius veritatem minime sufficit. “Cognosco Sortem” sensus est, cognosco hominem, hoc est, conceptu specifico et absoluto omnium hominum repraesentativo, et hoc nisi ponatur aliquid aliud ab illo sensu alienans, ut cognosco Sortem sub conceptu animalis, ad cuius veritatem non exigitur quod cognoscam Sortem sub conceptu singulari eius, sed sat est ipsum sub conceptu generico deprehendere.</text:p>
      <text:p text:style-name="P11">De appellatione rationis duae regulae ponuntur. Quarum prior est: Quilibet terminus sequens dictionem importantem praecise actum interiorem cognitivum aut appetitivum, facit terminum in quem cadit, propriam appellare rationem, nisi aliunde alienetur, ut “Sortes cognoscit venientem sub conceptu substantiae”.</text:p>
      <text:p text:style-name="P512">Pro prioris regule fecundiore intelligentia, scito quod termini importantes praecise actum cognitivum interiorem sunt termini, sensus interiore et intellectus, cuius modi sunt ‘imaginor’, ‘cognosco’, ‘apprehendo’, ‘significo’.</text:p>
      <text:p text:style-name="P512">Ago non praecise tales actus importat, nec videre ut oculo corporali intueri convenit, propterea non sic appellat. Videre tamen saepiuscule pro intelligere capitur, et tunc propriam facit appellationem.</text:p>
      <text:p text:style-name="P512"><text:soft-page-break/>Potentia appetitiva est potentia volitiva aut nolitiva, hoc est, ipsa voluntas, cuius actus sunt ‘nolo’, ‘volo’, ‘<text:span text:style-name="T253">appeto’, ‘desidero’, ‘promitto’, quia a volitione interiori vera promissio exterior oritur, et ex consequenti debitum, quare ‘promitto’ et ‘debeo’ hic annumerari solent.</text:span></text:p>
      <text:p text:style-name="P11">Secunda regula: Arguendo a termino suam propriam rationem appellante ad eundem non praecise appellantem distributive vel non distributive, est bona consequenti, non autem econtrario. Quo fit quod negative a termino praecedente appellationem rationis activam ad terminum sequentem est bona consequentia, non autem econverso.</text:p>
      <text:p text:style-name="P513">Haec regula patet quia in ea arguitur a propositione habente pauciores causas veritatis ad propositionem habentem plures. Ad veritatem huius cognosco venientem, requiritur quod eum sub conceptu venientis cognoscam, et hoc sufficit verificare hanc “Venientem cognosco”, et cum hoc verificari potest si venientem sub conceptu animalis substantiae aut alio conceptu venienti convenienti cognoscam, et per consequens haec consequentia es nulla “Equum debeo; ergo debeo equum”.</text:p>
      <text:p text:style-name="P513">Corollarium patet, quia arguitur ex opposito consequentis ad oppositum antecedentis, modo talis consequentia est infallibilis.</text:p>
      <text:p text:style-name="P514">Secunda pars regulae patet, nam bene sequitur “Promitto tibi equum; ergo Omnem equum tibi promitto”.</text:p>
      <text:p text:style-name="P514">Probo: promisso cadit secundum rationem specificam cuilibet equo convenientem; ergo cuilibet equo convenit; ergo illatio bona. /<text:span text:style-name="T254">108</text:span>/</text:p>
      <text:h text:style-name="P703" text:outline-level="4">Arguitur primo</text:h>
      <text:p text:style-name="P515">Contra: Hanc appellationem rationis arguitur, ipsa veterum usu non erat; ergo ipsa pe<text:span text:style-name="T255">ss</text:span>undanda est.</text:p>
      <text:h text:style-name="P703" text:outline-level="4">Secundo</text:h>
      <text:p text:style-name="P516">Secundo: Regulis logicalibus occurrit; ergo non est ponenda. Antecedens patet: ista consequentia non erit bona secundum dicta “Sortes significat Sortem; ergo Sortes significat hominem”. Similiter “Homo significat hominem; ergo Homo significat risibile”, etenim in priore ab inferius ad superius, in posteriori vero a convertibilibus arguitur.</text:p>
      <text:h text:style-name="P703" text:outline-level="4">Tertio</text:h>
      <text:p text:style-name="P516">Tertio haec erit falsa “Homo significat omnes <text:span text:style-name="T256">homines”, contra communem modum loquendi.</text:span></text:p>
      <text:p text:style-name="P517">Quarto</text:p>
      <text:p text:style-name="P517">Quarto: Non sequitur “Promitto tibi equum; ergo Equum tibi promitto”, immo <text:s/>oppositum consequentis stat cum antecedenti “Nullum equum tibi promitto”, ut patet inductive.</text:p>
      <text:p text:style-name="P517">Item arguitur a suppositione confusa tantum ad determinatam, remanente signo confusivo, et talis consequentia non valet.</text:p>
      <text:h text:style-name="P703" text:outline-level="4"><text:soft-page-break/>Quinto</text:h>
      <text:p text:style-name="P517">Quinto arguitur: Non sequitur “Debeo tibi equum; ergo Omnem equum tibi debeo”. Ponatur quod tibi promiserim equum, si omnem equum tibi promisi et omnem equum debeo, non ero deobligatus, nisi omnem equum tibi dando quod nemo facit, et patet nemo a debito absolvitur, nisi qui omne debitum refundit.</text:p>
      <text:h text:style-name="P703" text:outline-level="4">Sexto</text:h>
      <text:p text:style-name="P518">Sexto arguitur:</text:p>
      <text:p text:style-name="P7">Omnem equum tibi debeo,</text:p>
      <text:p text:style-name="P7">Gradarius reginae est equus;</text:p>
      <text:p text:style-name="P7">ergo </text:p>
      <text:p text:style-name="P7">Gradarium reginae tibi debeo.</text:p>
      <text:p text:style-name="P7"/>
      <text:p text:style-name="P518">Identidem de regis sonipede argumentabor, quae concedere est inconveniens.</text:p>
      <text:h text:style-name="P703" text:outline-level="4">Septimo</text:h>
      <text:p text:style-name="P519">Septimo: Antecedens huius consequentiae “Equum debeo; ergo Debeo equum” <text:span text:style-name="T257">non potest esse verum consequentiae existente falso, cum si antecedens est verum debentis conceptus in mente habetur, et tunc consequens est verum; ergo consequentia est bona.</text:span></text:p>
      <text:h text:style-name="P703" text:outline-level="4">Ad primum</text:h>
      <text:p text:style-name="P520">Ad primum: Nego antecedens nam Aristoteles, <text:span text:style-name="T6">Secundo Elenchorum</text:span>, hanc consequentiam interimit:</text:p>
      <text:p text:style-name="P7">Cognosco Coriscum, et</text:p>
      <text:p text:style-name="P7">Coriscus est veniens;</text:p>
      <text:p text:style-name="P7">ergo</text:p>
      <text:p text:style-name="P7">Cognosco venientem.</text:p>
      <text:p text:style-name="P7"><text:s/></text:p>
      <text:p text:style-name="P521">Et non stando in appellatione rationis est syllogismus expositorius infallibilis.</text:p>
      <text:h text:style-name="P703" text:outline-level="4">Ad secundum</text:h>
      <text:p text:style-name="P522">Ad secundum: Nego antecedens, et concedo quod illae duae consequentiae non sunt bonae. Non enim arguitur ab inferiore ad superius, nec a convertibilibus respectu totalium extremorum.</text:p>
      <text:h text:style-name="P703" text:outline-level="4">Ad tertium</text:h>
      <text:p text:style-name="P523">Ad tertium: Concedo quod haec erit falsa “Nihil significat “omnes homines” nisi hoc complexum ‘omnis homo’”. Extra tamen hanc materiam vulgariter loquimur.</text:p>
      <text:h text:style-name="P703" text:outline-level="4">Ad quartum</text:h>
      <text:p text:style-name="P524">Ad quartum: Nego quod non sequatur, et nego quod oppositum consequentis cum antecedente stet, nec est inconveniens a suppositione confusa ad determinatam hic argumentari. Secundum hanc viam inutile est assere quod hi termini confundant.</text:p>
      <text:h text:style-name="P703" text:outline-level="4"><text:soft-page-break/>Ad quintum</text:h>
      <text:p text:style-name="P524">Ad quintum: Nego quod non sequatur. <text:span text:style-name="T258">Nego tamen hanc propositionem quo non eris deobligatus nisi omnem equum dando. Sufficit unum equum dare, quia promissio fuit facta sine distributione post verbum ‘debeo’. Quo fit quod mille scuta homo debet et tamen dando unum denarium est a debito deobligatus, ut si promitterem tibi denarium, tunc omnem denarium promitto, et per consequens in valore mille scuta, et tamen sufficit unum denarium dare, quia secundum illum promissio facta est, et sat est dare secundum vim promissionis.</text:span></text:p>
      <text:h text:style-name="P703" text:outline-level="4">Ad sextum</text:h>
      <text:p text:style-name="P525">Ad sextum: Concedo quod equum regis reginae quod debeo, sed non teneor unum illorum equorum dare, quia non est promissio secundum equum regis et reginae /109/ <text:span text:style-name="T259">facta.</text:span></text:p>
      <text:h text:style-name="P703" text:outline-level="4">Ad septimum</text:h>
      <text:p text:style-name="P527">Ad septimum: Nego consequentiam. Potest enim ita esse sicut per antecedens significatur quando non erit ita sicut per consequens significatur, quod ad consequentiae malitiam satis est.</text:p>
      <text:h text:style-name="P703" text:outline-level="4">Modus antiquorum</text:h>
      <text:p text:style-name="P526"><text:span text:style-name="T260">Hucusque secundum modum neotericorum Parisiensis Studii respondimus. </text:span><text:span text:style-name="T261">Alius modus veterum sophistarum logices suae tempestatis non expertium, est quod si tibi promittam equum, tunc promittendo tibi equum debeo tibi equum. Sed modus ille defendi potest paucis, tentemus casu posito quod Sortes Platoni fideli servitio promittat equum, tunc secundum hanc viam non sequitur:</text:span></text:p>
      <text:p text:style-name="P7">Sortes debet Platoni equum;</text:p>
      <text:p text:style-name="P7">ergo </text:p>
      <text:p text:style-name="P7">Equum Platoni debet, et</text:p>
      <text:p text:style-name="P7">Nullum equum Platoni debet, et</text:p>
      <text:p text:style-name="P7">Nihil aliud a partibus et adiacentibus equi Platoni debet;</text:p>
      <text:p text:style-name="P7">ergo</text:p>
      <text:p text:style-name="P7">Nihil ei debet</text:p>
      <text:p text:style-name="P7"/>
      <text:p text:style-name="P528">Et hoc negare in foro contradictorio est debitum inficiari quod est inconveniens. Sic enim iudex Sortem absolvit a debito.</text:p>
      <text:h text:style-name="P703" text:outline-level="4">Arguitur secundo</text:h>
      <text:p text:style-name="P528">Secundo arguitur:</text:p>
      <text:p text:style-name="P7">Sortes debet Platoni equum; ergo</text:p>
      <text:p text:style-name="P7">Equus a Sorte Platoni debetur</text:p>
      <text:p text:style-name="P7"/>
      <text:p text:style-name="P528">Consequens est falsum; ergo et antecedens.</text:p>
      <text:h text:style-name="P711" text:outline-level="4">Evasio</text:h>
      <text:p text:style-name="P6">At dicis oportet inferre “ergo; A Sorte Platoni debetur equus”.</text:p>
      <text:h text:style-name="P712" text:outline-level="4"><text:soft-page-break/>Replicam primam</text:h>
      <text:p text:style-name="P529">Contra hoc arguitur: Equus saltem erit unum extremum et aliud extremum a Sorte Platoni debitus, modo illud totum non supponit et est affirmativa; ergo est falsa.</text:p>
      <text:h text:style-name="P703" text:outline-level="4">Secunda</text:h>
      <text:p text:style-name="P529">Si dicas supponit, non supponit nisi pro equo; ergo haec erit vera “Equus debetur Platoni a Sorte” contra responsionem.</text:p>
      <text:h text:style-name="P703" text:outline-level="4">Ad priorem</text:h>
      <text:p text:style-name="P529">Ad priorem: Harum rationum concedo quod non sequitur, et etiam quod Sortes nihil Platoni debet, sed debet Platoni aliquid. Si vere dicere posset “Non debeo Platoni aliquid”, deberet a iudice perito absolvi, et non si dicant “Nihil debeo Platoni”.</text:p>
      <text:h text:style-name="P703" text:outline-level="4">Ad secundam</text:h>
      <text:p text:style-name="P530">Ad secundum argumentum: Inter arguendum sufficienter responsum est ad finem usque. Concedo enim quod unum extremum non supponit, sed non sequitur propterea quod sit falsa, ut in exponibilibus hoc non habet verum nec cum istis verbis ‘devincior’, ‘teneor’, ‘obligor’, ‘debeo’, quia secundum hanc viam istae dictiones confundunt termino in quorum significata eorum actus cadere denotantur.</text:p>
      <text:p text:style-name="P530">Utramque harum viarum aeque probabilem relinquo. Pro suo arbitrio lector praeligat viam quam magis imitari libuerit.</text:p>
      <text:p text:style-name="P496"/>
      <text:h text:style-name="P699" text:outline-level="2">De <text:span text:style-name="T455">R</text:span>estrictionibus</text:h>
      <text:p text:style-name="P11">Terminus restringitur qui non pro tot accipitur, pro quot acciperetur restrictione semota.</text:p>
      <text:h text:style-name="P703" text:outline-level="4">Restrictio</text:h>
      <text:p text:style-name="P531">Restrictio passiva est terminus restrictus, sicut activa est terminus restringuens.</text:p>
      <text:p text:style-name="P531">Est triplex restrictio:</text:p>
      <text:p text:style-name="P531">Scilicet suppositorum tantum: quando terminus non supponit pro tot suppositis sicut supponeret tali restrictione seclusa, ut ‘homo’ in hac:</text:p>
      <text:list text:style-name="L18">
        <text:list-item>
          <text:p text:style-name="P746">“Homo albus currit”.</text:p>
        </text:list-item>
        <text:list-item>
          <text:p text:style-name="P746">“Sortes est omnis homo in hac domo”.</text:p>
        </text:list-item>
        <text:list-item>
          <text:p text:style-name="P746">“Adam in ‘a’ fuit omnis homo” per ‘a’ intelligendo solum tempus in quo Adam erat.</text:p>
        </text:list-item>
        <text:list-item>
          <text:p text:style-name="P746">“Quilibet asinus hominis, Quilibet asinus est” ‘hominis’ potest a fronte vel a tergo determinare.</text:p>
        </text:list-item>
        <text:list-item>
          <text:p text:style-name="P746">“Sortes potest esse sine albedine albus”.</text:p>
        </text:list-item>
      </text:list>
      <text:p text:style-name="P531">Sed determinatio determinans copulam quae non facit modalem communius praedicatum determina<text:span text:style-name="T262">t, et est /110/ eius pars, sicut “Sortes velociter currit”, “Sortes fuit ludens”.</text:span></text:p>
      <text:p text:style-name="P532">Restrictione materiali solus terminus communis restringi potest, restrictione vero formali tantum discretus. Restrictio temporum tamtum est quando terminus non supponit in ordine ad tot differentias temporum ratione restrictionis, ut “Homo qui non fuit erit”.</text:p>
      <text:p text:style-name="P532">Restrictio temporum et suppositorum proportionabiliter definienda venit.</text:p>
      <text:p text:style-name="P40"/>
      <text:h text:style-name="P699" text:outline-level="2">Status </text:h>
      <text:p text:style-name="P11">Status suppositionis est terminus supponens nec ample nec restricte. Proportionabiliter aliorum status definiendus venit.</text:p>
      <text:p text:style-name="P532">Ut praedicatum huius “Homo fuit animal”.</text:p>
      <text:p text:style-name="P40"/>
      <text:h text:style-name="P699" text:outline-level="2">Alienatio</text:h>
      <text:p text:style-name="P11">Alienatio est terminus a sua propria suppositione, secundum exigentiam, additi acceptus.</text:p>
      <text:p text:style-name="P532">Ut ‘homo’ in hac “Homo pictus videtur a me”.</text:p>
      <text:p text:style-name="P40"/>
      <text:h text:style-name="P699" text:outline-level="2">Remotio</text:h>
      <text:p text:style-name="P11">Remotio est terminus non supponens gratia determinationis additae in propositione, qua supponeret si additum removeretur.</text:p>
      <text:p text:style-name="P533">Ut homo in hac “Homo rudibilis currit”.</text:p>
      <text:p text:style-name="P28"/>
      <text:h text:style-name="P696" text:outline-level="1">Tertius: D<text:span text:style-name="T301">e Consequentiis in Communi</text:span></text:h>
      <text:h text:style-name="P703" text:outline-level="4">Consequentiae in communi</text:h>
      <text:p text:style-name="P11">Consequentia est oratio ex antecedente, consequente et nota illationis, illative tenta, conflata.</text:p>
      <text:h text:style-name="P703" text:outline-level="4">‘Si’ illative</text:h>
      <text:p text:style-name="P534"><office:annotation office:name="__Annotation__5478_2027426408" loext:resolved="false"><dc:creator>Unknown Author</dc:creator><dc:date>2026-03-08T13:28:37.974359051</dc:date><text:p text:style-name="Comment">Claude Opus 4.6:<text:line-break/>"If" is taken illatively when the antecedent is denoted to infer the consequent, and when it is not, it is denied. The contradictory of a consequentia is, properly speaking, not a consequentia, since the mark [of inference] is negated; or it is an expletive [i.e., a merely rhetorical or non-inferential expression], which is not a consequentia.</text:p><text:p text:style-name="Comment"/><text:p text:style-name="Comment">"If" functions as a genuine conditional only when the antecedent is understood to entail the consequent. When you negate a consequentia, what you get is not itself a consequentia — because the inferential connective is what gets negated — but rather a mere assertion that the inference does not hold.</text:p></office:annotation>‘Si’ tenetur illative quando antecedens consequens inferre denotatur, et quando non, negatur. Contradictorium consequentiae, proprie, non est consequentia cum /115/ <text:span text:style-name="T302">nota negetur, aut est expletiva quae non est consequentia.</text:span><office:annotation-end office:name="__Annotation__5478_2027426408"/></text:p>
      <text:h text:style-name="P703" text:outline-level="4">Dubium</text:h>
      <text:p text:style-name="P535">Dubitatur an mala consequentia sit consequentia.</text:p>
      <text:h text:style-name="P703" text:outline-level="4">Responsio</text:h>
      <text:p text:style-name="P535">Respondetur affirmative: sicut malus homo est homo, <text:span text:style-name="T441">h</text:span>abet enim omnia ad essentiam consequentiae requisita.</text:p>
      <text:h text:style-name="P703" text:outline-level="4">Obiectio</text:h>
      <text:p text:style-name="P537">Contra: <text:span text:style-name="T323">M</text:span>alus denarius non est denarius; ergo nec mala consequentia est consequentia.</text:p>
      <text:h text:style-name="P703" text:outline-level="4">Responsio</text:h>
      <text:p text:style-name="P537">Respondetur quod consequentia est nulla, malus enim denarius non habet omnia ad bonitatem denarii requisita, nam aut in materia aut in forma deficit vel in utraque.</text:p>
      <text:h text:style-name="P703" text:outline-level="4">Consequentia bona</text:h>
      <text:p text:style-name="P11">Consequentia bona (ut nunc) est consequentia sic se habens quod non potest ita esse sicut significatur per antecedens quin ita erit sicut significatur per consequens, rebus se habentibus prout nunc sese habent.</text:p>
      <text:h text:style-name="P703" text:outline-level="4">Consequentia bona ut nunc</text:h>
      <text:p text:style-name="P536"><text:span text:style-name="T303">Ut “</text:span><text:span text:style-name="T356">E</text:span><text:span text:style-name="T303">go sum in hac domo; ergo tu es in eadem”. Sed non sequitur: “‘</text:span><text:span text:style-name="T445">a’</text:span><text:span text:style-name="T303"> consequentia est bona ut nunc; ergo est bona consequentia”. Unde fit quod consequentia bona ut nunc nullo tempore est bona et per consequens nunc non est bona.</text:span></text:p>
      <text:h text:style-name="P703" text:outline-level="4"><text:soft-page-break/>Consequentia bona</text:h>
      <text:p text:style-name="P11">Consequentiarum quaedam mala, quaedam vero bona. Consequentia bona est consequentia in qua, ita est sicut significatur vel significari potest per antecedens et non ita sicut significatur per consequens, impossibile est esse.</text:p>
      <text:p text:style-name="P538"><office:annotation office:name="__Annotation__5355_2027426408" loext:resolved="false"><dc:creator>Unknown Author</dc:creator><dc:date>2026-03-08T13:19:51.280717316</dc:date><text:p text:style-name="Comment">Claude Opus 4.6: Modal status of consequences: the operator "impossible" modifies the whole conditional, not just one part, and a valid inference is valid timelessly, regardless of whether its terms currently refer to anything in reality.</text:p><text:p text:style-name="Comment"/><text:p text:style-name="Comment">The 'esse' must be read as covering both affirmative being ("things being so") <text:s/>and negative being ("things not being so"). Without this clause, one might read "ita est sicut significatur" as restricted to affirmative propositions — i.e., 'esse' as an existential/positive operator. The gloss says no: 'esse' is a truth‑operator, not an existence‑operator. It applies equally when the signified content is negative. If the antecedent is "Sortes non currit" (negative), then "ita est sicut significatur per antecedens" means "it is the case that Socrates does not run." The 'esse' applies to the negative content: it says "it is [truly] so that [he does not run]."</text:p></office:annotation>Hic ‘impossibile’ cadit super totam consequentiam et non super antecedens aut consequens solum, sive in calce sive in orationis fronte ponatur.</text:p>
      <text:p text:style-name="P539">‘Impossibile’ modalem compositam reddit, denotans quod impossibile est ita esse sicut significatur per antecedens et non est ita sicut significatur per consequens, et capiatur ‘esse’ ut ‘fuisse’ et ‘fore’, affirmative et negative, includat. Vulgo dicitur et bene “<text:span text:style-name="T371">c</text:span>onsequentia bona semper est bona”, et “<text:span text:style-name="T371">s</text:span>emel <text:span text:style-name="T359">m</text:span>ala, semper est mala”, non quod sit semper in rerum natura<office:annotation-end office:name="__Annotation__5355_2027426408"/>.</text:p>
      <text:h text:style-name="P703" text:outline-level="4">Arguitur primo</text:h>
      <text:p text:style-name="P540">Contra hanc definitionem arguitur: Ex ea sequitur hanc consequentiam esse bonam “Omnis propositio est affirmativa; ergo nulla propositio est negativa”. Sed consequens est falsum quia antecedens posset esse verum consequente existente falso, igitur.</text:p>
      <text:h text:style-name="P703" text:outline-level="4">Respondetur</text:h>
      <text:p text:style-name="P541">Respondetur concedendo hanc consequentiam esse bonam, et nego hanc “<text:span text:style-name="T372">P</text:span>ossibile est antecedens ese verum consequente existente falso”. Non enim est possibile in sensu composito quod antecedens sit verum et consequens falsum.</text:p>
      <text:h text:style-name="P703" text:outline-level="4">Replicatio</text:h>
      <text:p text:style-name="P540">Contra: Antecedens potest esse verum et consequens non potest esse verum. Ponatur ita esse sicut per antecedens significatur, tunc antecedens erit verum et consequens erit falsum, quoniam numquam potest esse verum.</text:p>
      <text:h text:style-name="P703" text:outline-level="4">Responsio</text:h>
      <text:p text:style-name="P619"><text:span text:style-name="T391">Respondetur concedendo quod antecedens potest esse verum et consequens non potest esse verum. Dico hoc antecedens potest esse verum, patet quia hoc potest esse verum “Hoc est vel potest esse antecedens; ergo Antecedens potest esse verum”. Sua de inesse est haec “Hoc est verum”, demonstrando hanc “Omnis propositio est affirmativa”, sed tunc non est antecedens verum respectu istius consequentis “</text:span><text:span text:style-name="T392">Q</text:span><text:span text:style-name="T391">uando enim consequens est, antecedens est falsum”. Et patet aliunde “Omnis syllaba est plures litterae; ergo Nulla syllaba est una littera”, huius consequentis antecedens potest esse verum, non autem consequens quando /116/ consequens est antecedens, nec est verum nec falsum.</text:span></text:p>
      <text:h text:style-name="Heading_20_4" text:outline-level="4"><text:soft-page-break/>Secundo</text:h>
      <text:p text:style-name="P620"><text:span text:style-name="T391">Secundo arguitur: Ha</text:span><text:span text:style-name="T393">ec consequentia est bona “Hoc consequens significat aliter esse quam est; ergo Hoc consequens significat aliter esse quam est”, demonstrando consequens utrobique. Arguitur enim a synonymo ad synonymum, et tamen consequens significat aliter esse quam est et antecedens sicut est.</text:span></text:p>
      <text:p text:style-name="P580">Probatio: Vel significat taliter sicut est vel aliter esse quam est. Si secundum intentum habetur; <text:span text:style-name="T456">s</text:span>i primum, et ipsum significat consequens significare aliter esse quam est; ergo consequens significat aliter esse quam est.</text:p>
      <text:h text:style-name="Heading_20_4" text:outline-level="4">Confirmatio</text:h>
      <text:p text:style-name="P689"><text:span text:style-name="T391">Et confirmatur illud de hac consequentia “Hoc consequens non significat sicut est; ergo Hoc consequens non significat sicut est”, demonstrando utrobique consequens. Ita est sicut antecedens significat, et consequens non significat sicut est. </text:span><text:span text:style-name="T397">P</text:span><text:span text:style-name="T391">atet, vel significat sicut est vel non significat sicut est. Si </text:span><text:span text:style-name="T394">secundum, propositum; si primum et ipsum significat, hoc est “Consequens non significat sicut est”, et ita est per te; ergo “</text:span><text:span text:style-name="T398">H</text:span><text:span text:style-name="T394">oc consequens non significat sicut est”.</text:span></text:p>
      <text:h text:style-name="Heading_20_4" text:outline-level="4"><text:span text:style-name="T393">R</text:span><text:span text:style-name="T391">espondetur de reflexivis</text:span></text:h>
      <text:p text:style-name="P581">Respondetur quod in reflexivis concedendo aliquam consequentiam esse bonam, in qua antecedens significat taliter sicut est in re omnino, et consequens significat aliter esse quam est, et aliter esse quam sicut est. Nec sequitur “Ita est in re sicut consequens significat; ergo consequens non significat aliter esse quam est, vel non sicut est”, sed oportet addere in antecedente “<text:span text:style-name="T458">E</text:span>t consequens non reflectit se, significando aliter esse quam est vel significando se non significare sicut est”.</text:p>
      <text:h text:style-name="Heading_20_4" text:outline-level="4">Pro materia secundi argumenti notentur propositiones</text:h>
      <text:p text:style-name="P582">Pro materia secundi argumenti et suae confirmationis, ponuntur haec propositiones <text:span text:style-name="T459">quarum</text:span>:</text:p>
      <text:h text:style-name="Heading_20_4" text:outline-level="4">Prima</text:h>
      <text:p text:style-name="P621"><text:span text:style-name="T399">P</text:span><text:span text:style-name="T391">rima est: </text:span><text:span text:style-name="T395">A</text:span><text:span text:style-name="T391">liqua consequentia est bona, et consequens significat aliter esse quam est et antecedens non significat aliter esse quam est. </text:span><text:span text:style-name="T396">Q</text:span><text:span text:style-name="T391">uando enim consequens reflectit se in significando aliter esse quam est, non est inconveniens.</text:span></text:p>
      <text:h text:style-name="Heading_20_4" text:outline-level="4">Secunda</text:h>
      <text:p text:style-name="P622">Et ex isto se<text:span text:style-name="T401">quitur quod duae propositiones sunt synonymae, quarum una significat omnino sicut est, alia vero significat aliter esse quam est. Patet de antecedente et consequente consequentiae assignatae.</text:span></text:p>
      <text:h text:style-name="Heading_20_4" text:outline-level="4">Tertia</text:h>
      <text:p text:style-name="P627">Tertia propositio: In aliqua bona consequentia, consequens non significat sicut est, et antecedens significat sicut est. Patet in confirmatione argumenti.</text:p>
      <text:h text:style-name="Heading_20_4" text:outline-level="4"><text:soft-page-break/>Quarta</text:h>
      <text:p text:style-name="P622"><text:span text:style-name="T402">Ex quo sequitur quarta propositio: Haec consequentia est nulla “Ita est sicut haec propositio significat; ergo </text:span><text:span text:style-name="T462">I</text:span><text:span text:style-name="T402">psa non significat non sicut est”. Et patet clarius in hac affirmativa “Hac propositio est non significans sicut est”.</text:span></text:p>
      <text:h text:style-name="Heading_20_4" text:outline-level="4">Arguitur tertio</text:h>
      <text:p text:style-name="P623">Tertio arguitur: Aliqua consequentia est mala in qua non potest ita esse sicut significatur per antecedens quin ita erit sicut significatur per consequens; ergo definitio nulla. Patet de hac consequentia “Haec consequentia est bona secundum hanc significationem; ergo homo est asinus”, <text:span text:style-name="T465">d</text:span>emonstrando illam mentalem per pronomen.</text:p>
      <text:p text:style-name="P623">Si enim ipsa est mala, iam antecedens est impossibile; ergo non potest ita esse sicut antecedens significat, igitur.</text:p>
      <text:p text:style-name="P623">Si dicas ipsam esse bonam, tunc antecedens est verum, et tunc sic: <text:span text:style-name="T466">S</text:span>i haec consequentia est bona secundum hanc significationem, “<text:span text:style-name="T466">H</text:span>omo est asinus”. <text:span text:style-name="T467">S</text:span><text:span text:style-name="T403">ed nullus homo est asinus; ergo </text:span><text:span text:style-name="T468">h</text:span><text:span text:style-name="T403">aec consequentia non est bona. Totum antecedens est verum quia copulativa vera; ergo et consequens.</text:span></text:p>
      <text:h text:style-name="Heading_20_4" text:outline-level="4">Respondetur</text:h>
      <text:p text:style-name="P624">Respondetur quod consequentia proposita est mala, et concedo quod non potest ita esse sicut per antecedens significatur quin ita erit sicut per consequens significatur. /117/ <text:span text:style-name="T404">Sed hoc ad consequentiae bonitatem minime sufficit, quia cum hoc etiam requiritur quod consequentia eius bonitatem non evertat, aut in suam bonitatem non recalcitret, hoc est, ad eam ese bonam non sequatur eandem esse malam.</text:span></text:p>
      <text:p text:style-name="P628">Illa duo in hac concurrunt “Homo currit; ergo Animal currit”, et ita in qualibet bona. Et unum istorum solum extra reflexiva sufficit, in quibus requiritur non reflexio in bonitatem ad hoc quod dicatur esse bona; ergo alterum duorum ad consequentiae malitiam sufficit. <text:span text:style-name="T476">E</text:span>rgo definitio consequentiae bonae intelligitur extra reflexiva.</text:p>
      <text:h text:style-name="Heading_20_4" text:outline-level="4">Replicatio</text:h>
      <text:p text:style-name="P625"><text:span text:style-name="T405">Contra: </text:span><text:span text:style-name="T478">S</text:span><text:span text:style-name="T405">equitur bene “Haec consequentia est bona; ergo homo est asinus”, </text:span><text:span text:style-name="T477">d</text:span><text:span text:style-name="T406">emonstrando priorem consequentiam, servando idem consequens, et haec consequentia est synonyma priori, igitur.</text:span></text:p>
      <text:h text:style-name="Heading_20_4" text:outline-level="4">Responsio</text:h>
      <text:p text:style-name="P629">Respondetur quod non est inconveniens in reflexivis dare duas consequentias synonymas, quarum altera est bona altera vero mala, et dare unam mentalem malam cuius vocalis ei subordinata erit bona.</text:p>
      <text:p text:style-name="P586"><text:soft-page-break/>Caeterum in consequentiam bonam de materia et forma, consequentia bona seiugatur.</text:p>
      <text:h text:style-name="P715" text:outline-level="4">Consequentia bona gratiam formae</text:h>
      <text:p text:style-name="P586">Consequentia bona gratia formae est consequentia sic bona quod in simili forma dare malam est impossibile.</text:p>
      <text:h text:style-name="Heading_20_4" text:outline-level="4">Propositiones similis formae</text:h>
      <text:p text:style-name="P586">Ad hoc ut propositiones similis formae dicantur, similem qualitatem, similem quantitatem et similem terminorum situm inter sese efflagitant.</text:p>
      <text:p text:style-name="P626">Aliqui vero ultra haec tria copularum similitudinem ponunt, sed haec conditio sub qualitate sufficienter intelligitur. Si tamen tibi ob quadruplex membrum materia facilior inveniatur, hoc sequere:</text:p>
      <text:list text:style-name="L19">
        <text:list-item>
          <text:p text:style-name="P749">Similis qualitas quo ad copulas principales et minus principales. Quare istae non sunt eiusdem formae “Sortes forte non dormit”, “Sortes non forte dormit”. Nec istae “Sortes, qui non currit, movetur”, “Sortes, qui currit, movetur”, licet sunt ambae affirmativae.</text:p>
        </text:list-item>
        <text:list-item>
          <text:p text:style-name="P749">Per similem terminorum acceptionem, similis suppositio (si termini supponant), tam a parte subiecti quam a parte praedicati intelligitur, et sic de appellatione et aliis proprietatibus capito. Quare istae non sunt eiusdem formae “Homo est Sortes”, “Homo est animal”. Nec istae “⟨a⟩ Homo non est animal”, “Homo non est animal”. Nec istae “Utrumque animal currit”, “Omne animal currit”, “Omne animal fuit in archa Noe”, ut sit distributio pro generibus singulorum et singulis generum. “Omnis essentia divina est Pater”, ut sit completa et incompleta distributio.</text:p>
        </text:list-item>
      </text:list>
      <text:h text:style-name="Heading_20_4" text:outline-level="4">Copularum similitudo</text:h>
      <text:list text:style-name="L20">
        <text:list-item>
          <text:p text:style-name="P750">Similitudo copularum: Si una sit de praesenti, alia erit de praesenti. Et hoc intelligitur etiam quo ad <text:span text:style-name="T486">copulas </text:span>minus principales, cum earum determinationibus “Sortes contingenter currit”, “Sortes possibiliter currit” non sunt eiusdem formae si contingenter caperetur specialiter.</text:p>
        </text:list-item>
        <text:list-item>
          <text:p text:style-name="P751">Quarto: Similis terminorum et pro<text:span text:style-name="T407">positionum situs requiritur, hoc est, similis terminorum ordo, quare </text:span><text:span text:style-name="T486">istae</text:span><text:span text:style-name="T407"> non sunt eiusdem formae “Homo non currit”, “Non-homo currit”. Non solum stando in terminorum acceptione, cum in unius fronte syncategorema, in alterius vero capite categorema ponatur. </text:span><text:span text:style-name="T489">N</text:span><text:span text:style-name="T407">ec Celarent et Camestres sunt eiusdem formae, </text:span><text:span text:style-name="T489">i</text:span><text:span text:style-name="T407">n primo loco unius negativa, in alterius vero affirmativa locatur.</text:span></text:p>
          <text:p text:style-name="P751"><text:soft-page-break/><text:span text:style-name="T407">Per hanc particulam requiritur similis terminorum numerus, hoc est, /118/ </text:span><text:span text:style-name="T408">tot categoremata et syncategoremata in una sicut in alia. Etiam similis terminorum synonymitas, vel sic quod termini synonymi pro eodem supputentur. </text:span><text:span text:style-name="T409">Quare istae non sunt eiusdem formae “Homo est homo”, “Homo est animal”. In secunda enim sunt duo termini capiendo terminum pro extremis, in priore vero est praecise unus, terminos synonymos plures pro eodem accipiendo, et non solum ad synonymitatem essentialem, sed etiam accidentalem, oculus flectendus est. </text:span></text:p>
          <text:p text:style-name="P752">Ecce argumentum in Darii:</text:p>
        </text:list-item>
      </text:list>
      <text:p text:style-name="P599">Cuiuslibet hominis asinus currit,</text:p>
      <text:p text:style-name="P599">Plato est homo;</text:p>
      <text:p text:style-name="P599">ergo</text:p>
      <text:p text:style-name="P599">Platonis asinus currit.</text:p>
      <text:p text:style-name="P598"/>
      <text:p text:style-name="P692">Si instare studueris in simila forma similem obliquitatem servare necessum est.</text:p>
      <text:p text:style-name="P692"><text:span text:style-name="T490">N</text:span>ec istae sunt eiusdem formae: </text:p>
      <text:p text:style-name="P599">Omnis homo currit, et</text:p>
      <text:p text:style-name="P599">Isti homines sunt omnes homines;</text:p>
      <text:p text:style-name="P599">ergo</text:p>
      <text:p text:style-name="P599">Iste homo currit et Iste homo currit et sic de singulis.</text:p>
      <text:p text:style-name="P598"/>
      <text:p text:style-name="P691">Et</text:p>
      <text:p text:style-name="P599">Omnis homo currit, et</text:p>
      <text:p text:style-name="P599">Isti asini sunt omnes asini;</text:p>
      <text:p text:style-name="P599">ergo</text:p>
      <text:p text:style-name="P599">Iste homo currit.</text:p>
      <text:p text:style-name="P599"/>
      <text:p text:style-name="P631">Quia plures sunt termini synonymi in una quam <text:span text:style-name="T491">i</text:span>n alia. Et si inferas aliquos homines currere, <text:span text:style-name="T492">quos</text:span> in constantia non demonstras, non habes eandem formam cum propositione in qua omnes homines demonstras.</text:p>
      <text:p text:style-name="P695">Nec istae sunt eiusdem formae “Homo currit et ipse non currit”, et “Homo currit et Homo non currit”. Nam virtualiter sunt plures termini in una quam in alia.</text:p>
      <text:p text:style-name="P694">Nec addenda est conditio more aliquorum, pro hac:</text:p>
      <text:p text:style-name="P690">Tu es qui es, sed</text:p>
      <text:p text:style-name="P599">Quies est requies;</text:p>
      <text:p text:style-name="P599">ergo</text:p>
      <text:p text:style-name="P599">Tu es requies.</text:p>
      <text:p text:style-name="P598"/>
      <text:p text:style-name="P693">Nam ‘qui es’ duae dictiones et una dictio formam variat.</text:p>
      <text:h text:style-name="Heading_20_4" text:outline-level="4"><text:soft-page-break/>Propositiones similis formae</text:h>
      <text:p text:style-name="P632">Multi ponunt propositiones esse similis formae acceptionis terminorum, et si ponantur, dicas ad hoc quod propositiones dicantur eiusdem formae acceptiones terminorum, omnia requisita ad hoc quod propositiones dicantur eiusdem formae, dempta synonymitate, requiruntur. Et licet ipsae prius illo modo loquendi, usus sim, ut in meis antiquissimis scriptis in artibus patet, quia tamen posteriores illum modum in rivos diduxerunt, et quia in maiorum usu non erat, satis est modum illum pessundare, propterea illud membrum minime pono.</text:p>
      <text:h text:style-name="Heading_20_4" text:outline-level="4">Arguitur</text:h>
      <text:p text:style-name="P632">Sed <text:span text:style-name="T411">contra illud arguitur: Si non ponatur illud membrum, sequitur quod duae subcontrariae participarent legem contradictoriarum de forma. Patet de his “Homo est homo”, “Homo non est homo”. In simili enim forma nescis dare duas veras aut falsas.</text:span></text:p>
      <text:h text:style-name="Heading_20_4" text:outline-level="4">Responsio</text:h>
      <text:p text:style-name="P633">Solebam hic dicere, in simili acceptione terminorum, instatur. Sed hoc relicto non tamquam falso, se quia occasionem dat inutili verborum <text:s/>multiplicati, aliter respondendo concedo illatum in terminis synonymis, et sic dicendo non permittitur locus illi membro.</text:p>
      <text:h text:style-name="Heading_20_4" text:outline-level="4">Consequentia bona gratia materiae</text:h>
      <text:p text:style-name="P586">Consequentia bona gratia materiae est illa quae sic est bona quod ei in simili forma datur una mala.</text:p>
      <text:p text:style-name="P634"><office:annotation office:name="__Annotation__7173_1967281869" loext:resolved="false"><dc:creator>Unknown Author</dc:creator><dc:date>2026-04-02T21:30:59.074491994</dc:date><text:p text:style-name="Comment">Claude Opus 4.6:</text:p><text:p text:style-name="Comment"/><text:p text:style-name="Comment">The argument: both consequentiae share the same logical form (X is Y; therefore X does Z). The first has a necessarily false antecedent (man is a donkey), so it is trivially bona (ex impossibili quodlibet). The second has a true antecedent but the conclusion doesn't follow — yet the form is identical. Therefore the failure of the second is not a failure of form but of matter (gratia materiae).</text:p></office:annotation>Ut “Homo est asinus; ergo Homo currit”. In simili forma instatur “Homo est animal; ergo Homo currit”; ergo secunda est mala solum gratia materiae.<office:annotation-end office:name="__Annotation__7173_1967281869"/></text:p>
      <text:p text:style-name="P586">Quo fit quod dantur duae consequentiae diversae formae inter se, quarum antecedentia, consequentia et notae sunt eiusdem formae inter se.</text:p>
      <text:p text:style-name="P635">Patet corollarium exemplariter “<text:span text:style-name="T412">Homo est animal; ergo Animal est homo” et “Homo est animal; ergo Animal est asinus”. Prior consequentia est conversio, non autem posterior.</text:span></text:p>
      <text:p text:style-name="P641">/119/</text:p>
      <text:h text:style-name="Heading_20_4" text:outline-level="4"><text:soft-page-break/>Consequentia mala</text:h>
      <text:p text:style-name="P586">Consequentia mala opposito modo definitur.</text:p>
      <text:h text:style-name="Heading_20_4" text:outline-level="4">Regulae decem</text:h>
      <text:p text:style-name="P586">Reliquum est aliqua regulas generales arguendi tradere, et praecise decem ponemus, quarum prima esto:</text:p>
      <text:h text:style-name="Heading_20_4" text:outline-level="4">Prima</text:h>
      <text:p text:style-name="P586">Cuiuslibet bonae consequentiae, contradictorium consequentis, contradictorium antecedentis infert.</text:p>
      <text:p text:style-name="P636">Et si contradictorium consequentis contradictorium antecedentis non inferat, prior consequentia non erat bona. Et signanter contradictorium consequentis et non contrarium, licet enim sequatur “Nullum animal currit; ergo Nullus homo currit”, non tamen sequitur “Quilibet homo currit; ergo Quodlibet animal currit”. Sed bene sequitur “Homo currit; ergo Animal currit”.</text:p>
      <text:h text:style-name="Heading_20_4" text:outline-level="4">Arguitur primo</text:h>
      <text:p text:style-name="P637">Contra hanc regulam arguitur: Bene sequitur “Nullus homo est asinus; ergo Haec consequentia non est bona”, arguendo ex opposito consequentis ad oppositum antecedentis consequentiae in capite praecedenti tactae, cum consequens sit necessarium sicut et antecedens, et in eius bonitatem non recalcitrat.</text:p>
      <text:h text:style-name="Heading_20_4" text:outline-level="4">Secundo</text:h>
      <text:p text:style-name="P638">Secundo arguitur: Non sequitur “Unum contradictorium est verum; ergo Alterum est verum”, et tamen ex opposito consequentis sequitur oppositum antecedentis, scilicet “Neutrum istorum est verum; ergo Non alterum istorum est verum”.</text:p>
      <text:h text:style-name="Heading_20_4" text:outline-level="4">Ad primum</text:h>
      <text:p text:style-name="P639"><office:annotation office:name="__Annotation__8144_1967281869" loext:resolved="false"><dc:creator>Unknown Author</dc:creator><dc:date>2026-04-02T21:53:00.789817879</dc:date><text:p text:style-name="Comment">Claude Opus 4.6:</text:p><text:p text:style-name="Comment"/><text:p text:style-name="Comment">To the first [objection] I concede that it follows. The rule, however, is understood [to apply] beyond consequentiae that kick back against their own goodness.</text:p><text:p text:style-name="Comment"/><text:p text:style-name="Comment"/></office:annotation>Ad primum concedo quod sequitur. Regula autem intelligitur ultra consequentias quae in suas bonitates recalcitrant.<office:annotation-end office:name="__Annotation__8144_1967281869"/></text:p>
      <text:h text:style-name="Heading_20_4" text:outline-level="4">Ad secundum</text:h>
      <text:p text:style-name="P640">Ad secundum conceditur quod non sequatur, capiendo alterum relative pro reliquo, ut sit relativum diversitatis, nec fit consequentia ex opposito consequentis sic arguendo, secus est si capiatur indefinite.</text:p>
      <text:p text:style-name="P586"><text:soft-page-break/>Secunda regula: Cuiuslibet bonae consequentiae contradictorium consequentis, antecedenti eiusdem adversatur.</text:p>
      <text:h text:style-name="Heading_20_4" text:outline-level="4">Arguitur primo</text:h>
      <text:p text:style-name="P642">Contra regulam arguitur primo: Quia bene sequitur “Homo est asinus; ergo Nullus homo est asinus”, et si regula sit vera eadem propositio sibi ipsi aversatur.</text:p>
      <text:h text:style-name="Heading_20_4" text:outline-level="4">Secundo</text:h>
      <text:p text:style-name="P643"><text:span text:style-name="T413">Secundo non sequitur: Haec consequentia est bona secundum hanc significationem; ergo “Homo est asinus” per pronomen demonstrando totam illam consequentiam, et tamen oppositum consequentis repugnat antecedenti, cum ipsum sit impossibile simpliciter, </text:span><text:span text:style-name="T414">igitu</text:span><text:span text:style-name="T415">r</text:span><text:span text:style-name="T414">.</text:span></text:p>
      <text:h text:style-name="Heading_20_4" text:outline-level="4">Tertio</text:h>
      <text:p text:style-name="Text_20_body">Tertio bene sequitur:</text:p>
      <text:p text:style-name="P598">Omnis homo currit, et</text:p>
      <text:p text:style-name="P598">Sortes est homo;</text:p>
      <text:p text:style-name="P598">ergo</text:p>
      <text:p text:style-name="P598">Sortes currit.</text:p>
      <text:p text:style-name="P598"/>
      <text:p text:style-name="P644">Et tamen o<text:span text:style-name="T416">ppositum consequentis non repugnat antecedenti. </text:span><text:span text:style-name="T417">Patet, nulli propositioni antecedentis repugnat; ergo nec antecedenti.</text:span></text:p>
      <text:h text:style-name="Heading_20_4" text:outline-level="4">Ad primum</text:h>
      <text:p text:style-name="P645">Ad primum concedo quod bene sequitur, et concedo quod eadem propositio repugnat sibi ipsi. Repugnare enim non est aliud quam copulativam impossibilem posse constituere. Hoc facit sola propositio impossibilis respectu cuiuslibet. Quod illa sit impossibilis patet, omnis enim copulativa ex qua sequitur contradictio est impossibilis, illa est huiusmodi, quia infert seipsam et suum oppositum.</text:p>
      <text:h text:style-name="Heading_20_4" text:outline-level="4">Ad secundum</text:h>
      <text:p text:style-name="P646">Ad secundum concedo maiorem minore negata, quia regula est ultra haec reflexiva intelligenda.</text:p>
      <text:h text:style-name="Heading_20_4" text:outline-level="4">Ad tertium</text:h>
      <text:p text:style-name="P647">Ad tertium dico illud, Philosophi Secundo Metaphysicae: “Homines in conviviis aegre ferunt”. Si usque ad minima solvatur “Omnis homo currit” et “Sortes est homo” infert hanc “Sortes est homo”. A tota copulativa affirmativa ad alteram eius partem.</text:p>
      <text:p text:style-name="P647">Similiter sequitur “Omnis homo currit, Sortes non currit; ergo Sortes non est homo”; ergo ista copulativa infert duo contradictoria.</text:p>
      <text:p text:style-name="P586"><text:soft-page-break/>Tertia regula: Ex vero, falsum sequi, est impossibile.</text:p>
      <text:p text:style-name="P650">Quare hic modus arguendi valet: Hae consequentia est bona, et consequens /120/ est falsum; ergo et antecedens.</text:p>
      <text:h text:style-name="Heading_20_4" text:outline-level="4">Arguitur primo</text:h>
      <text:p text:style-name="P651">Contra regulam arguitur: Bene sequitur “Hoc consequens est falsum; ergo Hoc consequens est falsum”, utrobique demonstrando consequens, et consequens est falsum; ergo et antecedens.</text:p>
      <text:h text:style-name="Heading_20_4" text:outline-level="4">Secundo</text:h>
      <text:p text:style-name="P652">Secundo arguitur: Bene sequitur “Non Deus est; ergo Homo est asinus”, capiendo ‘non’ neganter, et tamen antecedens est verum. Patet: est verum in ‘a’ sensu (sit ‘a’ sensus in quo negatio capitur infinitanter); ergo est vera.</text:p>
      <text:p text:style-name="P648"><text:span text:style-name="T418">Patet: bene sequitur est falsa in ‘b’ sensu; ergo est falsa. </text:span><text:span text:style-name="T419">N</text:span><text:span text:style-name="T418">am si non sequatur tunc dabitur quod stabit utriusque consequentiae oppositum consequentis cum antecedente, et sic dabitur una propositio quae nec est vera nec falsa, quod est ‘a’ ratione longe alienum.</text:span></text:p>
      <text:h text:style-name="Heading_20_4" text:outline-level="4">Ad primum</text:h>
      <text:p text:style-name="P649"><text:span text:style-name="T420">Ad primum respondetur quod regula extra insolubilia intelligitur. Facilia insolubilia obiter occurrentia extra suum tractatulum tangere non obest.</text:span> </text:p>
      <text:h text:style-name="Heading_20_4" text:outline-level="4">Ad secundum</text:h>
      <text:p text:style-name="P653">Ad secundum concedo quod ex vero quod etiam est falsum, sequitur falsum; sed ista sequela ex vero non habet originem, quia ex hac vacca non est illa cauda, sed ex alia alietate saltem rationis.</text:p>
      <text:p text:style-name="P586">Quarta regula: Sicut ex impossibili sequitur quodlibet, ita necessarium a quolibet infertur.</text:p>
      <text:p text:style-name="P655">Hoc est dictu, propositio impossibilis quamlibet propositionem infert.</text:p>
      <text:h text:style-name="Heading_20_4" text:outline-level="4">Arguitur primo</text:h>
      <text:p text:style-name="P654">Contra hanc regulam arguitur: Non sequitur “Hanc consequentia est bona secundum hanc significationem; ergo Homo est asinus”, demonstrando hanc consequentiam per pronomen, ut saepius meminimus, et tamen antecedens est impossibile simpliciter.</text:p>
      <text:h text:style-name="Heading_20_4" text:outline-level="4">Secundo</text:h>
      <text:p text:style-name="P656">Secundo: Non sequitur “Hoc est impossibile secundum hanc significationem; ergo Homo est asinus”, demonstrando illam categoricam per pronomen, et tamen antecedens est impossibile, igitur.</text:p>
      <text:p text:style-name="P667">Minor patet, quia vel est impossibile simpliciter vel possibile. Si primum propositum. Si secundum ergo ita potest esse sicut illa significat, et qualitercumque potest significare iam nunc significat, igitur.</text:p>
      <text:h text:style-name="Heading_20_4" text:outline-level="4"><text:soft-page-break/>Ad primum</text:h>
      <text:p text:style-name="P667">Ad primum dicitur quod regula limitationis est indiga, utpote extra reflexiva quae suas bonitates evertunt, vel, magis proprie loquendo, bonitatibus obicem praestant.</text:p>
      <text:h text:style-name="Heading_20_4" text:outline-level="4">Ad secundum</text:h>
      <text:p text:style-name="P658">Ad secundum concedo maiorem, antecedens enim est solum impossibile per reflexionem et sese impossibilitans, cum ita est in re sicut ipsa significat.</text:p>
      <text:h text:style-name="Heading_20_4" text:outline-level="4">Contra secundam partem regulae</text:h>
      <text:p text:style-name="P659">Contra secundam partem regulae arguitur primo: Non sequitur “Nullus homo est asinus; ergo Haec consequentia non est bona secundum hanc significationem”, demonstrando hancmet consequentiam, et consequens est necessarium.</text:p>
      <text:p text:style-name="P660">Si dicas eam bonam, tunc sic “Si nullus homo est asinus haec consequentia non est bona; sed Nullus homo est asinus; ergo <text:span text:style-name="T422">Haec consequentia nihil valet</text:span>”, <text:span text:style-name="T422">antecedens est verum, immo, necessarium; ergo et consequens; ergo ipsum est verum </text:span>et ultra; ergo ita est sicut consequens significat. <text:span text:style-name="T422">S</text:span>ed ipsum significat hanc consequentiam non valere, igitur.</text:p>
      <text:p text:style-name="P660">Si dicas eam non valere, tunc consequens est necessarium.</text:p>
      <text:h text:style-name="Heading_20_4" text:outline-level="4">Secundo</text:h>
      <text:p text:style-name="P662">Secundo arguitur: Bene sequitur “Deus est; ergo Aliqua propositio est particularis et Consequens contingens et Antecedens necessarium, igitur”.</text:p>
      <text:p text:style-name="P662">Maior patet: Antecedens enim non potest esse verum consequente existente falso.</text:p>
      <text:h text:style-name="Heading_20_4" text:outline-level="4">Ad primum</text:h>
      <text:p text:style-name="P662">Ad primum respondetur concedendo quod non sequitur, et concedo necessitatem consequentis, sed ipsum obicem bonitati consequentiae praestat. In hoc consequentiae malitia servatur.</text:p>
      <text:h text:style-name="Heading_20_4" text:outline-level="4">Ad secundum</text:h>
      <text:p text:style-name="P663">Nego maiorem, et ad probationem qua dicitur antecedens non potest esse verum consequente existente falso, dicis, utendo transgressionem temporis, “antecedens erit verum consequente existente /121/ falso”. Volo quod utamur copulis antecedentis et consequentis pro crastino die in quo non erit aliqua particularis propositio, et nunc sint hae duae “Deus est”, “Aliqua propositio est particularis”. Nunc antecedens erit verum et consequens falsum pro illo tempore. Sicut “Iohannes bibit”, “Iohannes nihil loquitur”, tempore loquelae et potationis illae sunt falsae.</text:p>
      <text:h text:style-name="Heading_20_4" text:outline-level="4">Replica</text:h>
      <text:p text:style-name="P664">Contra: <text:span text:style-name="T424">Ergo, tunc haec consequentia erit bona “Deus est”; ergo aliqua propositio est, fuit aut erit particularis; consequens est falsum.</text:span></text:p>
      <text:h text:style-name="Heading_20_4" text:outline-level="4"><text:soft-page-break/>Responsio</text:h>
      <text:p text:style-name="P673">Respondetur: Consequentia data nihil valet, nec probatio apparentiam habet. Licet enim non potest antecedens esse verum tempore quo consequens est falsum, tamen potest ita esse sicut significatur per antecedens quando non est ita sicut per consequens significatur, secundum significationes terminorum, nam semper ita est, et necesse est ita esse sicut per antecedens significatur, non autem sicut per consequens.</text:p>
      <text:p text:style-name="P586">Quinta regula: Si aliqua consequentia est bona et antecedens concedendum, consequens est ab eodem concedendum.</text:p>
      <text:p text:style-name="P674">Quinta regula probatur. Si antecedens est concedendum, vel illud est verum vel tamquam aliquod sequens in arte Obligatoria. Utrovis horum modorum dato, etiam consequens est concedendo.</text:p>
      <text:h text:style-name="Heading_20_4" text:outline-level="4">Arguitur</text:h>
      <text:p text:style-name="P665"><text:span text:style-name="T425">Contra hanc regulam arguitur: </text:span><text:span text:style-name="T426">Bene sequitur “Hoc consequens non est concedendum; ergo Hoc consequens non est concedendum”.</text:span></text:p>
      <text:p text:style-name="P675">Illic consequens non est concedendum; et antecedens verum et concedendum.</text:p>
      <text:h text:style-name="Heading_20_4" text:outline-level="4">Responsio</text:h>
      <text:p text:style-name="P676">Respondetur quod regula ultra reflexionem intelligitur uti in hac consequentia “Hoc consequens est falsum; ergo Hoc consequens est falsum”.</text:p>
      <text:p text:style-name="P676">Consequens sicut propositio falsa est negandum, non autem antecedens.</text:p>
      <text:p text:style-name="P586">Sexta regula: Si aliqua est consequentia et consequens est negandum, ita est antecedens.</text:p>
      <text:p text:style-name="P677">Haec sexta regula probatur: Cum consequens est negandum et oppositum consequentis infert oppositum antecedentis ex prima regula, et oppositum consequentis est concedendum; ergo etiam oppositum antecedentis.</text:p>
      <text:h text:style-name="Heading_20_4" text:outline-level="4">Arguitur primo</text:h>
      <text:p text:style-name="P678">Contra hoc arguitur primo: Bene sequitur “Hoc est negantum; ergo Hoc est negandum” demonstrando consequens, sed consequente negato antecedens est concedendum.</text:p>
      <text:h text:style-name="Heading_20_4" text:outline-level="4">Responsio</text:h>
      <text:p text:style-name="P679">Respondetur: Extra reflexiva loquimur.</text:p>
      <text:h text:style-name="Heading_20_4" text:outline-level="4"><text:soft-page-break/>Arguitur secundo</text:h>
      <text:p text:style-name="P680">Secundo arguitur: Ex hac regula sequitur hanc consequentiam esse bonam “Consequens est negandum; ergo antecedens non est dubitandum”, quoniam est negandum. Quod si concedas, contra hoc arguitur: Bene sequitur “Omnis rex loquitur, Iste est rex (demonstrando tacentem ante me); ergo Iste loquitur”, consequens est negandum et tamen dubitas antecedens, cum utraque pars est tibi dubia, et partes sunt simum compossibiles.</text:p>
      <text:h text:style-name="Heading_20_4" text:outline-level="4">Respondetur</text:h>
      <text:p text:style-name="P668">Ad secundum ad ultimam replicam usque bene responsum est, concedo quod consequens est negandum, quoniam ipsum est scitum esse falsum, et quaelibet pars est mihi dubia, sed scio antecedens esse falsum ob consequentis falsitatem.</text:p>
      <text:h text:style-name="Heading_20_4" text:outline-level="4">Nota</text:h>
      <text:p text:style-name="P669">Et ex hac regula sequitur: Si antecedens est bibi dubium, consequens non est a te negandum. Patet, quia tunc oppositum consequentis concedendum infert oppositum antecedentis concedendum. /122/</text:p>
      <text:p text:style-name="P586">Septima regula: Quidquid antecedit ad antecedens, antecedit consequens.</text:p>
      <text:p text:style-name="P586">Sub aliis verbis: Quidquid sequitur ad consequens bonae consequentiae, ad eius antecedens consequitur.</text:p>
      <text:p text:style-name="P586">Et sic de primo antecedente ad ultimum consequens est bona consequentia.</text:p>
      <text:p text:style-name="P670">Haec regula exemplariter patet: “Sortes currit; ergo Homo currit”, “Homo currit; ergo Animal currit”; ergo bene sequitur de primo antecedente ad ultimum consequens “Sortes currit; ergo Animal currit”.</text:p>
      <text:p text:style-name="P670">Et ex isto patet quod quidquid stat cum antecedente bonae consequentiae, illud cum consequente eiusdem stat, et hoc patet: Si ‘a’ antecedens inferat ‘b’ consequens, et ‘c’ propositio stet cum ‘a’ et non cum ‘b’, tunc ita est sicut per ‘c’ et ‘a’ propositiones significatur. Et ‘a’ infert ‘b’; ergo ita est sicut ‘b’ significat; ergo etiam ‘b’ stat cum ‘c’ sicut ipsum ‘a’. Et cum consequens plures causas veritatis habeat, quidquid consequenti repugnat, illud antecedenti adversatur.</text:p>
      <text:h text:style-name="Heading_20_4" text:outline-level="4">Arguitur primo</text:h>
      <text:p text:style-name="P671">Contra hanc regulam arguitur primo. Non sequitur “Si quadrupedale est; ergo <text:span text:style-name="T427">B</text:span>ipedale sua medietas est”, et “Si bipedale sua medietas est, <text:span text:style-name="T429">P</text:span>edale sua medietas est”; ergo “Si quadrupedale est <text:span text:style-name="T428">p</text:span>edale; <text:span text:style-name="T429">S</text:span>ua medietas est”.</text:p>
      <text:h text:style-name="Heading_20_4" text:outline-level="4"><text:soft-page-break/>Secundo</text:h>
      <text:p text:style-name="P671">Secundo arguitur: Bene sequitur “Tu curris; ergo Tu curris vel Homo est asinus”, et ultra “Tu curris vel Homo est asinus; sed Tu non curris; ergo Homo est asinus”. A tota disiunctiva cum destructione unius partis, ad positionem alterius partis. Et tamen non sequitur “Tu curris; ergo Homo est asinus”.</text:p>
      <text:h text:style-name="Heading_20_4" text:outline-level="4">Tertio</text:h>
      <text:p text:style-name="P672">Tertio arguitur: Bene sequitur “Si tu es ubique, Tu es in hoc loco”, et “Si tu es in hoc loco, Tu non est in illo”, et “Si tu non es in illo, Tu non es ubique”, et tamen non sequitur “Si tu es ubique, Tu non es ubique”; ergo regula nulla.</text:p>
      <text:h text:style-name="Heading_20_4" text:outline-level="4">Ad primum</text:h>
      <text:p text:style-name="P681">Ad primum dicitur quod sua aequivoce refert nec bene arguitur, nisi sua improprie antecedens remotum referat.</text:p>
      <text:h text:style-name="Heading_20_4" text:outline-level="4">Ad secundum</text:h>
      <text:p text:style-name="P686">Ad secundum respondetur quod si antecedens secundae consequentiae in secundo disiuncto capiatur, ut in prima consequentia, tunc consequentia nihil valet. Nam quando arguitur a tota disiunctiva cum distributione unius partis, antecedens est una copulativa cuius altera pars est disiunctiva, reliqua vero pars alteram partem illius disiunctivae destruit.</text:p>
      <text:p text:style-name="P686">Si secundae consequentiae antecedens sit una copulativa, tunc media sunt variata, quia primum consequens primae consequentiae fuit una disiunctiva et antecedens secundae consequentiae una copulativa.</text:p>
      <text:h text:style-name="Heading_20_4" text:outline-level="4">Ad tertium</text:h>
      <text:p text:style-name="P687">Ad tertium aliqui ponunt regulam non tenere propter argumentum factum, nisi consequentiae intermediae formales fuerint. Sed hoc nihil est dictu nec prima consequentia valet, nec secunda nec tertia etiam valet.</text:p>
      <text:p text:style-name="P682"><text:span text:style-name="T430">Breviter, ad regulae bonitatem nihil aliud requiritur, et </text:span><text:span text:style-name="T431">illud sufficit quod consequens primae consequentiae sit praecise antecedens secundae, in sensu quo fuit consequens, et non magis neque minus, et quod consequentiae intermediae sint bonae. Quare nimirum de consequentia praefata et talibus “Sortes est; ergo Non Deus est”, “Non Deus est; ergo Homo est asinus”, “Sortes est; ergo Homo est asinus”.</text:span></text:p>
      <text:p text:style-name="P586">Octava regula: Si aliqua consequentia est bona, scita esse bona /123/ et antecedens est scitum, consequens est scitum.</text:p>
      <text:h text:style-name="Heading_20_4" text:outline-level="4">Argumentum</text:h>
      <text:p text:style-name="P683">Contra octavam regulam arguitur sic: Bene sequitur “Hoc est nescitum; ergo Hoc est nescitum”. Utrobique demonstrando consequens, et antecedens est scitum, et consequens nescitum, igitur.</text:p>
      <text:h text:style-name="Heading_20_4" text:outline-level="4"><text:soft-page-break/>Responsio</text:h>
      <text:p text:style-name="P684">Respondetur quod regula intelligitur quando consequens in non nescitum non recalcitrat.</text:p>
      <text:p text:style-name="P684">Ex hac regula sequitur hanc esse verum “Scio Omnem hominem Londini esse Londoniis”. Patet quia bene sequitur “Aliquis homo Londini est Londoniis; ergo Omnis homo Londini est Londoniis”. Antecedens est a me scitum; ergo et consequens.</text:p>
      <text:p text:style-name="P684">Pari iure hanc “Scio <text:span text:style-name="T432">O</text:span>mne astrum supra me esse supra me; et Nullum <text:span text:style-name="T433">astrum scio esse supra me”.</text:span></text:p>
      <text:p text:style-name="P586">Nona regula: Si aliqua consequentia est bona volita esse bona, et antecedens est volitum; consequens est volitum”.</text:p>
      <text:p text:style-name="P685">In hac regula dicitur “volita esse bona”. Licet sequatur “Iste poenitet; ergo Iste peccavit”, et antecedens sit volitum, tamen non consequens, cum consequentia non est volita esse bona.</text:p>
      <text:p text:style-name="P586">Decima regula: Ex antecedente pure negativo non impossibili, non sequitur consequens pure affirmativum non necessarium.</text:p>
      <text:p text:style-name="P688">Quare non sequitur logice loquendo “Regnum meum non est de hoc mundo; ergo Ego sum rex”, et locus a contrario sensu absolute non valet.</text:p>
      <text:p text:style-name="P688">Tamen in iure et vulgari modo loquendi multum efficaciae sibi vendicat. Dicitur pure , quia formaliter sequitur “Tantum Sortes non currit; ergo Omnis non Sortes currit”.</text:p>
      <text:p text:style-name="P666"><text:span text:style-name="T434">Etiam sequitur “Nullus Deus est; ergo Baculus stat in angulo”, et “Sortes non currit; ergo Deus est”. </text:span><text:span text:style-name="T424"><text:s/></text:span><text:s/></text:p>
      <text:p text:style-name="P661"><text:s/></text:p>
      <text:p text:style-name="P658"/>
      <text:p text:style-name="P657"><text:span text:style-name="T421"><text:s/></text:span><text:s/></text:p>
      <text:p text:style-name="P633"/>
      <text:p text:style-name="P633"/>
      <text:p text:style-name="P630"/>
      <text:p text:style-name="P630"/>
      <text:h text:style-name="P696" text:outline-level="1"><text:span text:style-name="T263">Undecimus:</text:span><text:span text:style-name="T175"> </text:span><text:span text:style-name="T280">D</text:span><text:span text:style-name="T175">e </text:span><text:span text:style-name="T263">Complexis Significabilibus</text:span><text:span text:style-name="T175"> </text:span><text:span text:style-name="T174"><text:s/></text:span><text:span text:style-name="T170"><text:s/></text:span></text:h>
      <text:p text:style-name="P29">Sequitur <text:span text:style-name="T423">D</text:span><text:span text:style-name="T30">e </text:span><text:span text:style-name="T263">Complex</text:span><text:span text:style-name="T264">e </text:span><text:span text:style-name="T263">Significabilibus. </text:span><text:span text:style-name="T265">Liber XI</text:span></text:p>
      <text:h text:style-name="P703" text:outline-level="4">Significabilia complexe</text:h>
      <text:p text:style-name="P14">Circa significatum totale propositionis, sive complexe significabilia, ut modum loquendi imiter, <text:span text:style-name="T266">sive magis proprie complexe significantia, </text:span><office:annotation office:name="__Annotation__4832_1656483213" loext:resolved="false"><dc:creator>Unknown Author</dc:creator><dc:date>2026-02-24T22:14:55.485941056</dc:date><text:p text:style-name="Comment">Variae solent esse propositiones inanes et inutiles, utputa ““Homo est animal” significat hominem-esse-animal”.</text:p></office:annotation><text:span text:style-name="T266">variae solent esse propositiones inanes et inutiles, utputa ““Homo est animal” significat hominem-esse-animal”.</text:span><office:annotation-end office:name="__Annotation__4832_1656483213"/><text:span text:style-name="T266"> Pro illo hoc documentum accipito. </text:span><text:span text:style-name="T267">Si scire velis pro quo talia supponunt significative, resolve accusativum in nominativum et verbum infinitivi modi in suum participium respondens ei, ita quod si verbum est activum, in participium praesentis temporis, si passivum in participium respondens, ut “Sortem currere” “Sortes currens”, “Deum diligi” “Deus dilectus”.</text:span></text:p>
      <text:h text:style-name="P713" text:outline-level="4">Conclusio seu thesis prima</text:h>
      <text:p text:style-name="P542">Istis notatis ponuntur conclusiones:</text:p>
      <text:h text:style-name="P703" text:outline-level="4">Prima</text:h>
      <text:p text:style-name="P542">Prima est: Aliquid est complexum significabile. Probatur propositio: Aliquid significatur per complexum; ergo aliquid est complexe significabile, consequentia tenet ab aequivalentibus.</text:p>
      <text:p text:style-name="P542">Probatur antecedens: Quia Ninive significatur per hanc “Ninus condidit Niniven”. Quia regula generalis est quidquid significatur per partem, illud per totum significatur.</text:p>
      <text:p text:style-name="P542">Ratio est quia postquam totius ingreditur compositionem, non cadit a sua significatione.</text:p>
      <text:h text:style-name="P703" text:outline-level="4">Secunda</text:h>
      <text:p text:style-name="P542">Secunda: Aliquid est /216/ incomplexe significa<text:span text:style-name="T268">bile</text:span>.</text:p>
      <text:p text:style-name="P543">Probatur <text:span text:style-name="T268">propositio: Aliquid potest significari per incomplexum, ut notum est, igitur.</text:span></text:p>
      <text:h text:style-name="P703" text:outline-level="4">Tertia</text:h>
      <text:p text:style-name="P543"><text:span text:style-name="T268">Tertia: Incomplexe significabile est complexe signi</text:span><text:span text:style-name="T269">ficabile et econverso.</text:span></text:p>
      <text:p text:style-name="P544">Prior pars patet, quia incomplexum significans aliquam rem potest esse pars propositionis, igitur.</text:p>
      <text:p text:style-name="P544"><text:soft-page-break/>Secunda pars patet quia nihil significatur per complexum nisi res, sed iste terminus ‘res’ omnem rem significa, igitur.</text:p>
      <text:h text:style-name="P703" text:outline-level="4">Quarta</text:h>
      <text:p text:style-name="P545">Quarta: <text:span text:style-name="T270">Aliquod est significatum adaequatum propositionis, probatur propositio. Una res significatur per unam propositionem et nihil aliud. </text:span><text:span text:style-name="T273">P</text:span><text:span text:style-name="T270">atet de hac “Sortes est Sortes”, loquendo de significatione proprie dicta.</text:span></text:p>
      <text:h text:style-name="P703" text:outline-level="4">Quinta</text:h>
      <text:p text:style-name="P546"><text:span text:style-name="T270">Quinta: </text:span><text:span text:style-name="T271">Alicuius propositionis nullum est significatum adaequatum. </text:span><text:span text:style-name="T272">P</text:span><text:span text:style-name="T271">atet de propositionibus compositis ex terminis communibus.</text:span></text:p>
      <text:p text:style-name="P547">Ex istis infero corollaria:</text:p>
      <text:h text:style-name="P703" text:outline-level="4">Primum colorarium</text:h>
      <text:p text:style-name="P548">Primum est: Nihil significatur per negativam contradictoriam quin idem significetur per affirmativam, licet aliter et aliter per negativam quam per affirmativam significatur. Patet quia <text:span text:style-name="T274">propositiones oppositae componuntur ex terminis synonymis, copulae et syncategoremata nihil significant, igitur corollarium verum.</text:span></text:p>
      <text:h text:style-name="P703" text:outline-level="4">Secundum</text:h>
      <text:p text:style-name="P549">Secundum corollarium: Hominem-esse-animal aliquid significat et illud non est verificabile. Patet significat elephante, et tamen nullus elephas est hominem-esse-animal. Et ratio est antequam illud complexum hominem-esse-animal verificatur de aliquo, oportet advertere ad restrictionem, modo hoc non convenit elephanti.</text:p>
      <text:h text:style-name="P703" text:outline-level="4">Tertium</text:h>
      <text:p text:style-name="P550"><text:span text:style-name="T275">Tertium: Omnem-hominem-esse-animal est non-omnem-hominem-esse-animal. Probatur: “Iste homo existens animal </text:span><text:span text:style-name="T276">est Non omnis homo existens animal, et iste et sic de singulis”, igitur.</text:span></text:p>
      <text:h text:style-name="P703" text:outline-level="4">Quartum</text:h>
      <text:p text:style-name="P551">Quartum: Ante creationem mundi, mundum fore non erat verum, sive fit sermo de mentali, saltem creata, vocali vel scripta. Patet quia nulla talis tunc erat; ergo non erat vera.</text:p>
      <text:h text:style-name="P703" text:outline-level="4">Quintum</text:h>
      <text:p text:style-name="P552">Quintum: Licet quemlibet-hominem-esse-animal sit unus homo, hominem-esse-asinum non est substantia. Prior pars est lucida et secunda patet, quia est una negativa non praegnans, cuius subiectum non supponit; ergo vera.</text:p>
      <text:h text:style-name="P703" text:outline-level="4">Sextum</text:h>
      <text:p text:style-name="P553">Sextum: Licet <text:span text:style-name="T277">Antichristum-posse-esse, nihil est, tamen aliquid est Antichristum-posse-esse</text:span> <text:span text:style-name="T277">sive Antichristus possibilis.</text:span></text:p>
      <text:p text:style-name="P554"><text:soft-page-break/>Prior pars patet, quia est una negativa cuius subiectum et praedicatum non supponunt pro eodem non exponibilis; ergo vera, praedicatum non ampliatur.</text:p>
      <text:p text:style-name="P555">Secunda probatur, quia subiectum ampliatur ratione praedicati, et praedicatum propter amplum modum eius significandi supponit, pro Antichristo sive amplietur sive non; ergo est vera.</text:p>
      <text:h text:style-name="P703" text:outline-level="4">Septimum</text:h>
      <text:p text:style-name="P556">Septimum: ““Homo est asinus” significat hominem-esse-asinum”, <text:span text:style-name="T278">sed nihil potest esse ‘homo existens asinus’.</text:span></text:p>
      <text:p text:style-name="P559">Prior pars huius corollarii patet per ampliationem huius verbi ‘significat’, quod ampliat ad imaginabilia, impossibile est significabile.</text:p>
      <text:p text:style-name="P559">Secunda pars patet per secundam partem quinti corollarii.</text:p>
      <text:h text:style-name="P703" text:outline-level="4">Octavum</text:h>
      <text:p text:style-name="P557"><text:span text:style-name="T279">Octavum: “</text:span><text:span text:style-name="T281">Sortem-ieiunare-in-quadragesima non est bonum”.</text:span></text:p>
      <text:p text:style-name="P560">Tum primo, nunc non est quadragesima, sed festum regum; ergo subiectum huius negativae non supponit; ergo est vera. Hic vides, capio ista aggregata usquequaque significative, sed haec probatio est sophistica.</text:p>
      <text:p text:style-name="P560">Probatur secundo ad rem. Pono quod Sortes sit malus homo et ieiunat quadragesimam, non propter Deum, sed propter vanam gloriam vel ut videatur bonus, ut hypocrita facit. Iam patet totum.</text:p>
      <text:h text:style-name="P703" text:outline-level="4">Nota illata</text:h>
      <text:p text:style-name="P561">Ex ista propositione cum eius casu sequitur haec affirmativa “Hominem-ieiunare-quadragesimam est malum”. <text:span text:style-name="T282">Malum per se positum stat pro malo secundum mores, quemadmodum bonum suum oppositum. Nihil est malum malitia entis. Ex quod sequitur quod dare eleemosynam est malum posito quod homo in peccato mortali det propter vanam gloriam.</text:span></text:p>
      <text:h text:style-name="P703" text:outline-level="4">No<text:span text:style-name="T283">n</text:span>um</text:h>
      <text:p text:style-name="P561"><text:span text:style-name="T283">Nonum colorarium: “</text:span><text:span text:style-name="T284">Hominem-ieiunare est hominem-prandere”. </text:span><text:span text:style-name="T285">Patet homo ieiunans prandet tempore meridiei, sed quando /217/ comedit verum est dicere quod ieiunat sicut ante meridiem.</text:span></text:p>
      <text:h text:style-name="P703" text:outline-level="4">Decimum</text:h>
      <text:p text:style-name="P562">Decimum: Malum est dare eleemosynam, istud sequitur ex fine octavi.</text:p>
      <text:h text:style-name="P703" text:outline-level="4">Undecimum</text:h>
      <text:p text:style-name="P562">Undecimum: “Licet <text:span text:style-name="T286">Iudam-diligere-Deum erat Iudam-odi</text:span><text:span text:style-name="T287">ss</text:span><text:span text:style-name="T286">e-Deum”. Impossibile est Iudam-diligere-deum esse Iudam-odi</text:span><text:span text:style-name="T287">ss</text:span><text:span text:style-name="T286">e-Deum.</text:span></text:p>
      <text:p text:style-name="P563">Prior pars patet: Verisimile est quod nonnumquam Iudas dilexit Deum, et postea odio profectus est eum.</text:p>
      <text:p text:style-name="P564"><text:soft-page-break/>Secunda pars patet, quia alias sequitur quod pro eodem instanti quis idem obiectum et diligeret et oderit <text:span text:style-name="T288">quod non potest fieri, saltem per naturam, potissimum cum eadem apprehensione, quia ad veritatem modalis compositae oportet quod una pars dicti competat alteri pro eodem instanti in affirmativis, vel saltem quod non sit repugnantia, quod sufficit.</text:span></text:p>
      <text:h text:style-name="P703" text:outline-level="4">Duodecimum</text:h>
      <text:p text:style-name="P565"><text:span text:style-name="T288">Duodecimum: </text:span><text:span text:style-name="T289">Haec consequentia nihil valet “Sortes facit Platonem-esse-doctum-Summulistam et Platonem-esse-doctum-Summulistam est Plato; ergo Sortes facit Platonem”.</text:span><text:span text:style-name="T288"> </text:span><text:span text:style-name="T289">Cum antecedens </text:span><text:span text:style-name="T290">sit verum et consequens falsum non se falsificans, nec est syllogismus expositorius, sed arguitur a factione secundum quid ad factionem simpliciter.</text:span></text:p>
      <text:p text:style-name="P568">Hanc consequentia non nego “Plato doctus Summulista fit a Sorte”. Hanc consequentia tamen nego “Plato doctus Summulista fit a Sorte; ergo Plato fit a Sorte”.</text:p>
      <text:h text:style-name="P703" text:outline-level="4">Decimumtertium</text:h>
      <text:p text:style-name="P566"><text:span text:style-name="T290">Decimumtertium: “</text:span><text:span text:style-name="T291">Abel-occidi-a-Cain fuit bonum” et “Adam-edere-de-ligno-vetito fuit bonum”. Prior pars patet, quia Abel occidi a Cain nihil aliud erat quam Abel qui erat valde bonus homo. Secunda pars patet quia Adam, post suum peccatum, egit magnam poenitentiam.</text:span></text:p>
      <text:h text:style-name="P703" text:outline-level="4">Decimumquartum</text:h>
      <text:p text:style-name="P567"><text:span text:style-name="T292">Decimumquartum: “Istum-Deum-non-esse-iustum-Solem” et “Istum-Solem-non-esse-istum-Deum” </text:span><text:span text:style-name="T293">non convertuntur. Patet, primum supponit pro Deo, secundum pro Sole, igitur.</text:span></text:p>
      <text:h text:style-name="P703" text:outline-level="4">Decimum quintum</text:h>
      <text:p text:style-name="P569">Decimum quintum: “Deum-esse-causam-tui est necessarium”, sed Deus contingenter agit ad entia.</text:p>
      <text:h text:style-name="P703" text:outline-level="4">Contra primum argumentum</text:h>
      <text:p text:style-name="P569">Contra primum corollarium sic arguitur: <text:span text:style-name="T294">Ipsum est unicus articulus Parisii damnatus contra Magister Nicolaum de Ultricuria, articulus est iste: Item quod illae propositiones “Deus est” “Deus non est” praecise significant idem, licet aliter et alio modo, revoco tamquam falsum.</text:span></text:p>
      <text:h text:style-name="P703" text:outline-level="4">Responsio</text:h>
      <text:p text:style-name="P570">Dico secundum: Communiter loquentes idem tantum valet sicut eadem et eodem modo taliter. Tunc dicitur quod idem capitur transcendenter, et tunc est error, quia alio modo de modo significandi grammaticali significant, ut ‘homo’ et ‘hominis’, ita quod intentio articuli est dicere error es quod contradictoriae propositiones solum per modum significandi grammaticalem, sicut rectus et obliquus differunt, immo essentialiter differunt, et istud patet quia articulus habet penitus idem.</text:p>
      <text:h text:style-name="P703" text:outline-level="4">Secunda</text:h>
      <text:p text:style-name="P571">Dico <text:span text:style-name="T295">secundo quod eius propositio fuit condemnata, quia erronea ad eius intentionem, quia non oportet advertere ad propositionem in se, sed ad intentionem ponentis, quae ex probationibus cognoscitur.</text:span></text:p>
      <text:h text:style-name="P703" text:outline-level="4"><text:soft-page-break/>Propositionem damnandi ratio</text:h>
      <text:p text:style-name="P573">Praeterea propositio aliqua damnatur, quia contra communem viam alicuius studii, uno tempore, quae non est penitus alias reprobanda. Patet de hac “Homo est animal”, quam idem Nicolaus revocavit pro eo quod dixit eam, secundum fidem, non esse necessariam, et tamen nunc pene ob ominibus Parisii tenetur contingens.</text:p>
      <text:p text:style-name="P573">Insuper haec prima propositio damnatur in articulis Oxoniensibus, quia vegetativa, sensitiva et intellectiva sunt una forma simplex, et tamen hoc communiter tenetur Parisii tamquam probabile, et ut puto, magis verum quam oppositum. Immo antiqui articuli a posterioribus sunt revocati.</text:p>
      <text:h text:style-name="P703" text:outline-level="4">Contra tertium corollarium <text:span text:style-name="T296">arguitur</text:span></text:h>
      <text:p text:style-name="P573">Contra tertium corollarium arguitur: Male dictum est quod non est bonum ieiunare in quadragesima et malum est dare eleemosynam.</text:p>
      <text:h text:style-name="P703" text:outline-level="4">Responsio</text:h>
      <text:p text:style-name="P572"><text:span text:style-name="T297">Respondetur distinguendo istam “Sortem-ieiunare non est bonum”. Unus sensus est Sortes nihil /218/ boni facit in hoc quod ieiunat, circumstantiis positis ad ieiunium requisitis, </text:span><text:span text:style-name="T298">et ille sensus est falsus. Et illum sensum apud vulgus facit haec propositio, quae in vulgum non est spargenda.</text:span></text:p>
      <text:p text:style-name="P572"><text:span text:style-name="T299">Alius sensus est “Sortes-ieiunans est res mala”. Et hoc interdum </text:span><text:span text:style-name="T300">contingit. De isto sensu locuti sumus.</text:span></text:p>
      <text:h text:style-name="P703" text:outline-level="4">Contra quartum corollarium arguitur</text:h>
      <text:p text:style-name="P574">Contra quartum corollarium arguitur: Ante mundi creationem, Abel non erat; ergo verum erat Abel non fuit, et non erat propositio mentalis, vocalis vel scripta; ergo erat complexum significabile distinctum ab omnibus his de quibus locuti sumus.</text:p>
      <text:h text:style-name="P703" text:outline-level="4">Respondetur</text:h>
      <text:p text:style-name="P575">Consequentia nihil valet. Ex negativa non praegnante non impossibili, non sequitur affirmativa necessaria, ut est consequens.</text:p>
      <text:p text:style-name="P575">Et haec de complexe significabilibus.</text:p>
      <text:p text:style-name="P575"/>
      <text:p text:style-name="P569"/>
      <text:p text:style-name="P569"/>
      <text:p text:style-name="P558"><text:span text:style-name="T281"><text:s/></text:span><text:span text:style-name="T289"><text:s text:c="4"/></text:span><text:span text:style-name="T279"><text:s text:c="2"/></text:span><text:s text:c="2"/></text:p>
      <text:p text:style-name="P548"><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la" fo:country="V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la" fo:country="V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lways" style:page-number="auto"/>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91237c"/>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List_20_1_20_End" style:display-name="List 1 End" style:family="paragraph" style:parent-style-name="List" style:next-style-name="List_20_1" style:class="list">
      <style:paragraph-properties fo:margin-left="0.25in" fo:margin-right="0in" fo:margin-top="0in" fo:margin-bottom="0.166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Original" style:family="paragraph" style:parent-style-name="Text_20_body" style:master-page-name="">
      <style:paragraph-properties style:page-number="auto">
        <style:tab-stops/>
      </style:paragraph-properties>
      <style:text-properties fo:font-size="16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mment" style:family="paragraph" style:parent-style-name="Standard" style:class="extra">
      <style:text-properties fo:font-size="10pt" style:font-size-asian="10pt"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la" fo:country="V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8T20:39:21.354766648</meta:creation-date>
    <meta:generator>LibreOffice/24.2.7.2$Linux_X86_64 LibreOffice_project/420$Build-2</meta:generator>
    <dc:date>2026-05-22T15:32:35.709575170</dc:date>
    <meta:editing-duration>P9DT1H2M41S</meta:editing-duration>
    <meta:editing-cycles>2948</meta:editing-cycles>
    <meta:document-statistic meta:table-count="0" meta:image-count="0" meta:object-count="0" meta:page-count="128" meta:paragraph-count="1974" meta:word-count="34709" meta:character-count="244139" meta:non-whitespace-character-count="211398"/>
  </office:meta>
</office:document-meta>
</file>