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6953bb9" officeooo:paragraph-rsid="082de3d1"/>
    </style:style>
    <style:style style:name="P2" style:family="paragraph" style:parent-style-name="Standard">
      <style:text-properties officeooo:paragraph-rsid="082de3d1"/>
    </style:style>
    <style:style style:name="P3" style:family="paragraph" style:parent-style-name="Subtitle">
      <style:text-properties officeooo:paragraph-rsid="082de3d1"/>
    </style:style>
    <style:style style:name="P4" style:family="paragraph" style:parent-style-name="Standard">
      <style:text-properties officeooo:rsid="084a1ab0" officeooo:paragraph-rsid="084a1ab0"/>
    </style:style>
    <style:style style:name="P5" style:family="paragraph" style:parent-style-name="Standard">
      <style:text-properties officeooo:rsid="084a1ab0" officeooo:paragraph-rsid="084c37c7"/>
    </style:style>
    <style:style style:name="P6" style:family="paragraph" style:parent-style-name="Text_20_body">
      <style:text-properties officeooo:paragraph-rsid="0850338f"/>
    </style:style>
    <style:style style:name="P7" style:family="paragraph" style:parent-style-name="Text_20_body">
      <style:text-properties officeooo:rsid="0851d3de" officeooo:paragraph-rsid="0851d3de"/>
    </style:style>
    <style:style style:name="P8" style:family="paragraph" style:parent-style-name="Text_20_body">
      <style:paragraph-properties fo:margin-left="0in" fo:margin-right="0in" fo:text-indent="0in" style:auto-text-indent="false"/>
      <style:text-properties officeooo:rsid="0851d3de" officeooo:paragraph-rsid="0851f081"/>
    </style:style>
    <style:style style:name="P9" style:family="paragraph" style:parent-style-name="Text_20_body">
      <style:text-properties officeooo:paragraph-rsid="085a249d"/>
    </style:style>
    <style:style style:name="P10" style:family="paragraph" style:parent-style-name="Text_20_body">
      <style:text-properties officeooo:rsid="085b5fb5" officeooo:paragraph-rsid="085b5fb5"/>
    </style:style>
    <style:style style:name="P11" style:family="paragraph" style:parent-style-name="Text_20_body">
      <style:text-properties officeooo:rsid="085b5fb5" officeooo:paragraph-rsid="0862521f"/>
    </style:style>
    <style:style style:name="P12" style:family="paragraph" style:parent-style-name="Text_20_body">
      <style:text-properties style:font-name="Liberation Sans" fo:font-size="18pt" officeooo:rsid="08484998" officeooo:paragraph-rsid="06aad557" style:font-name-asian="Noto Sans CJK SC" style:font-size-asian="18pt" style:font-name-complex="Lohit Devanagari1" style:font-size-complex="18pt"/>
    </style:style>
    <style:style style:name="P13" style:family="paragraph" style:parent-style-name="Subtitle">
      <style:text-properties style:font-name="Liberation Sans" fo:font-size="18pt" officeooo:rsid="08484998" officeooo:paragraph-rsid="06aad557" style:font-name-asian="Noto Sans CJK SC" style:font-size-asian="18pt" style:font-name-complex="Lohit Devanagari1" style:font-size-complex="18pt"/>
    </style:style>
    <style:style style:name="P14" style:family="paragraph" style:parent-style-name="Title">
      <style:text-properties style:font-name="Liberation Sans" fo:font-size="28pt" fo:font-weight="bold" officeooo:rsid="08484998" officeooo:paragraph-rsid="08484998" style:font-name-asian="Noto Sans CJK SC" style:font-size-asian="28pt" style:font-weight-asian="bold" style:font-name-complex="Lohit Devanagari1" style:font-size-complex="28pt" style:font-weight-complex="bold"/>
    </style:style>
    <style:style style:name="P15" style:family="paragraph" style:parent-style-name="Text_20_body">
      <style:text-properties officeooo:rsid="0850338f" officeooo:paragraph-rsid="0850338f"/>
    </style:style>
    <style:style style:name="P16" style:family="paragraph" style:parent-style-name="Text_20_body">
      <style:text-properties officeooo:rsid="086379cf" officeooo:paragraph-rsid="086379cf"/>
    </style:style>
    <style:style style:name="P17" style:family="paragraph" style:parent-style-name="Text_20_body">
      <style:text-properties officeooo:rsid="08651223" officeooo:paragraph-rsid="08651223"/>
    </style:style>
    <style:style style:name="P18" style:family="paragraph" style:parent-style-name="Text_20_body">
      <style:text-properties officeooo:paragraph-rsid="08680fe3"/>
    </style:style>
    <style:style style:name="P19" style:family="paragraph" style:parent-style-name="Text_20_body">
      <style:text-properties officeooo:rsid="0866c469" officeooo:paragraph-rsid="0866c469"/>
    </style:style>
    <style:style style:name="P20" style:family="paragraph" style:parent-style-name="Text_20_body">
      <style:text-properties officeooo:rsid="08690eef" officeooo:paragraph-rsid="086a075d"/>
    </style:style>
    <style:style style:name="P21" style:family="paragraph" style:parent-style-name="Text_20_body">
      <style:text-properties officeooo:rsid="0871a7c2" officeooo:paragraph-rsid="0871a7c2"/>
    </style:style>
    <style:style style:name="P22" style:family="paragraph" style:parent-style-name="Text_20_body">
      <style:text-properties officeooo:paragraph-rsid="086a85d8"/>
    </style:style>
    <style:style style:name="P23" style:family="paragraph" style:parent-style-name="Text_20_body">
      <style:text-properties officeooo:rsid="08780de3" officeooo:paragraph-rsid="08780de3"/>
    </style:style>
    <style:style style:name="P24" style:family="paragraph" style:parent-style-name="Text_20_body">
      <style:text-properties officeooo:paragraph-rsid="0879706c"/>
    </style:style>
    <style:style style:name="P25" style:family="paragraph" style:parent-style-name="Text_20_body">
      <style:text-properties officeooo:rsid="087e4958" officeooo:paragraph-rsid="087e4958"/>
    </style:style>
    <style:style style:name="P26" style:family="paragraph" style:parent-style-name="Text_20_body">
      <style:text-properties officeooo:rsid="087e4958" officeooo:paragraph-rsid="0880066c"/>
    </style:style>
    <style:style style:name="P27" style:family="paragraph" style:parent-style-name="Text_20_body">
      <style:text-properties officeooo:rsid="088157f6" officeooo:paragraph-rsid="088157f6"/>
    </style:style>
    <style:style style:name="P28" style:family="paragraph" style:parent-style-name="Text_20_body">
      <style:text-properties officeooo:paragraph-rsid="0883bc47"/>
    </style:style>
    <style:style style:name="P29" style:family="paragraph" style:parent-style-name="Text_20_body">
      <style:text-properties officeooo:paragraph-rsid="0884df00"/>
    </style:style>
    <style:style style:name="P30" style:family="paragraph" style:parent-style-name="Text_20_body">
      <style:paragraph-properties fo:margin-left="0in" fo:margin-right="0in" fo:text-indent="0in" style:auto-text-indent="false"/>
      <style:text-properties officeooo:paragraph-rsid="0884df00"/>
    </style:style>
    <style:style style:name="P31" style:family="paragraph" style:parent-style-name="Text_20_body">
      <style:text-properties officeooo:rsid="0884df00" officeooo:paragraph-rsid="0884df00"/>
    </style:style>
    <style:style style:name="P32" style:family="paragraph" style:parent-style-name="Text_20_body">
      <style:paragraph-properties fo:margin-left="0in" fo:margin-right="0in" fo:text-indent="0in" style:auto-text-indent="false"/>
      <style:text-properties officeooo:rsid="0884df00" officeooo:paragraph-rsid="0884df00"/>
    </style:style>
    <style:style style:name="P33" style:family="paragraph" style:parent-style-name="Text_20_body">
      <style:text-properties officeooo:rsid="08889a5f" officeooo:paragraph-rsid="08889a5f"/>
    </style:style>
    <style:style style:name="P34" style:family="paragraph" style:parent-style-name="Text_20_body">
      <style:text-properties officeooo:rsid="0889077f" officeooo:paragraph-rsid="0889077f"/>
    </style:style>
    <style:style style:name="P35" style:family="paragraph" style:parent-style-name="Text_20_body">
      <style:text-properties officeooo:rsid="0889077f" officeooo:paragraph-rsid="0889e681"/>
    </style:style>
    <style:style style:name="P36" style:family="paragraph" style:parent-style-name="Text_20_body">
      <style:text-properties officeooo:rsid="0889077f" officeooo:paragraph-rsid="088b9d44"/>
    </style:style>
    <style:style style:name="P37" style:family="paragraph" style:parent-style-name="Text_20_body">
      <style:paragraph-properties fo:margin-left="0in" fo:margin-right="0in" fo:text-indent="0in" style:auto-text-indent="false"/>
      <style:text-properties officeooo:rsid="0889077f" officeooo:paragraph-rsid="088f26f3"/>
    </style:style>
    <style:style style:name="P38" style:family="paragraph" style:parent-style-name="Text_20_body">
      <style:text-properties officeooo:rsid="0889e681" officeooo:paragraph-rsid="0889e681"/>
    </style:style>
    <style:style style:name="P39" style:family="paragraph" style:parent-style-name="Text_20_body">
      <style:text-properties officeooo:rsid="088be661" officeooo:paragraph-rsid="088be661"/>
    </style:style>
    <style:style style:name="P40" style:family="paragraph" style:parent-style-name="Text_20_body">
      <style:paragraph-properties fo:margin-left="0in" fo:margin-right="0in" fo:text-indent="0in" style:auto-text-indent="false"/>
      <style:text-properties officeooo:rsid="088be661" officeooo:paragraph-rsid="088d4d9f"/>
    </style:style>
    <style:style style:name="P41" style:family="paragraph" style:parent-style-name="Text_20_body">
      <style:text-properties officeooo:rsid="0895c395" officeooo:paragraph-rsid="0895c395"/>
    </style:style>
    <style:style style:name="P42" style:family="paragraph" style:parent-style-name="Text_20_body">
      <style:text-properties officeooo:rsid="089796aa" officeooo:paragraph-rsid="089796aa"/>
    </style:style>
    <style:style style:name="P43" style:family="paragraph" style:parent-style-name="Text_20_body">
      <style:text-properties officeooo:rsid="089796aa" officeooo:paragraph-rsid="0898bf2d"/>
    </style:style>
    <style:style style:name="P44" style:family="paragraph" style:parent-style-name="Text_20_body">
      <style:text-properties officeooo:rsid="089796aa" officeooo:paragraph-rsid="089d852c"/>
    </style:style>
    <style:style style:name="P45" style:family="paragraph" style:parent-style-name="Text_20_body">
      <style:text-properties officeooo:rsid="08997312" officeooo:paragraph-rsid="08997312"/>
    </style:style>
    <style:style style:name="P46" style:family="paragraph" style:parent-style-name="Text_20_body">
      <style:text-properties officeooo:rsid="089d852c" officeooo:paragraph-rsid="089d852c"/>
    </style:style>
    <style:style style:name="P47" style:family="paragraph" style:parent-style-name="Text_20_body">
      <style:text-properties officeooo:rsid="08a347c2" officeooo:paragraph-rsid="08a347c2"/>
    </style:style>
    <style:style style:name="P48" style:family="paragraph" style:parent-style-name="Text_20_body">
      <style:text-properties officeooo:rsid="08a71d1a" officeooo:paragraph-rsid="08a71d1a"/>
    </style:style>
    <style:style style:name="P49" style:family="paragraph" style:parent-style-name="Text_20_body">
      <style:text-properties officeooo:rsid="08a762f1" officeooo:paragraph-rsid="08a8a36b"/>
    </style:style>
    <style:style style:name="P50" style:family="paragraph" style:parent-style-name="Text_20_body">
      <style:text-properties officeooo:rsid="08a762f1" officeooo:paragraph-rsid="08aa450c"/>
    </style:style>
    <style:style style:name="P51" style:family="paragraph" style:parent-style-name="Text_20_body">
      <style:text-properties officeooo:rsid="08a762f1" officeooo:paragraph-rsid="08abcdc0"/>
    </style:style>
    <style:style style:name="P52" style:family="paragraph" style:parent-style-name="Text_20_body">
      <style:text-properties officeooo:rsid="08a762f1" officeooo:paragraph-rsid="08ac3987"/>
    </style:style>
    <style:style style:name="P53" style:family="paragraph" style:parent-style-name="Text_20_body">
      <style:text-properties officeooo:rsid="08a4b830" officeooo:paragraph-rsid="08a4b830"/>
    </style:style>
    <style:style style:name="P54" style:family="paragraph" style:parent-style-name="Text_20_body">
      <style:text-properties officeooo:rsid="08a69efe" officeooo:paragraph-rsid="08a69efe"/>
    </style:style>
    <style:style style:name="P55" style:family="paragraph" style:parent-style-name="Text_20_body">
      <style:text-properties officeooo:rsid="08a8a36b" officeooo:paragraph-rsid="08a8a36b"/>
    </style:style>
    <style:style style:name="P56" style:family="paragraph" style:parent-style-name="Text_20_body">
      <style:text-properties officeooo:rsid="08aa450c" officeooo:paragraph-rsid="08aa450c"/>
    </style:style>
    <style:style style:name="P57" style:family="paragraph" style:parent-style-name="Text_20_body">
      <style:text-properties officeooo:paragraph-rsid="08af6227"/>
    </style:style>
    <style:style style:name="P58" style:family="paragraph" style:parent-style-name="Text_20_body">
      <style:text-properties officeooo:rsid="08ac3987" officeooo:paragraph-rsid="08ac3987"/>
    </style:style>
    <style:style style:name="P59" style:family="paragraph" style:parent-style-name="Text_20_body">
      <style:text-properties officeooo:rsid="08add5ea" officeooo:paragraph-rsid="08add5ea"/>
    </style:style>
    <style:style style:name="P60" style:family="paragraph" style:parent-style-name="Text_20_body">
      <style:text-properties officeooo:rsid="08b0416d" officeooo:paragraph-rsid="08b0416d"/>
    </style:style>
    <style:style style:name="P61" style:family="paragraph" style:parent-style-name="Text_20_body">
      <style:text-properties officeooo:paragraph-rsid="08b3570e"/>
    </style:style>
    <style:style style:name="P62" style:family="paragraph" style:parent-style-name="Text_20_body">
      <style:text-properties officeooo:paragraph-rsid="08b3c55a"/>
    </style:style>
    <style:style style:name="P63" style:family="paragraph" style:parent-style-name="Text_20_body">
      <style:text-properties officeooo:paragraph-rsid="08b3d8a2"/>
    </style:style>
    <style:style style:name="P64" style:family="paragraph" style:parent-style-name="Text_20_body">
      <style:text-properties officeooo:rsid="08b603c2" officeooo:paragraph-rsid="08b603c2"/>
    </style:style>
    <style:style style:name="P65" style:family="paragraph" style:parent-style-name="Text_20_body">
      <style:text-properties officeooo:rsid="08b603c2" officeooo:paragraph-rsid="08b7fc55"/>
    </style:style>
    <style:style style:name="P66" style:family="paragraph" style:parent-style-name="Text_20_body">
      <style:text-properties officeooo:rsid="08b603c2" officeooo:paragraph-rsid="08b91c09"/>
    </style:style>
    <style:style style:name="P67" style:family="paragraph" style:parent-style-name="Text_20_body">
      <style:text-properties officeooo:rsid="08b603c2" officeooo:paragraph-rsid="08bc7608"/>
    </style:style>
    <style:style style:name="P68" style:family="paragraph" style:parent-style-name="Text_20_body">
      <style:text-properties officeooo:rsid="08b3570e" officeooo:paragraph-rsid="08b3570e"/>
    </style:style>
    <style:style style:name="P69" style:family="paragraph" style:parent-style-name="Text_20_body">
      <style:text-properties officeooo:rsid="08b7fc55" officeooo:paragraph-rsid="08b7fc55"/>
    </style:style>
    <style:style style:name="P70" style:family="paragraph" style:parent-style-name="Text_20_body">
      <style:text-properties officeooo:rsid="08be4d18" officeooo:paragraph-rsid="08be4d18"/>
    </style:style>
    <style:style style:name="P71" style:family="paragraph" style:parent-style-name="Text_20_body">
      <style:text-properties officeooo:rsid="08bfe102" officeooo:paragraph-rsid="08bfe102"/>
    </style:style>
    <style:style style:name="P72" style:family="paragraph" style:parent-style-name="Text_20_body">
      <style:text-properties officeooo:rsid="08bfe102" officeooo:paragraph-rsid="08c143ea"/>
    </style:style>
    <style:style style:name="P73" style:family="paragraph" style:parent-style-name="Text_20_body">
      <style:text-properties officeooo:rsid="08bc7608" officeooo:paragraph-rsid="08bc7608"/>
    </style:style>
    <style:style style:name="P74" style:family="paragraph" style:parent-style-name="Text_20_body">
      <style:text-properties officeooo:rsid="08c143ea" officeooo:paragraph-rsid="08c143ea"/>
    </style:style>
    <style:style style:name="P75" style:family="paragraph" style:parent-style-name="Text_20_body">
      <style:text-properties officeooo:rsid="08c143ea" officeooo:paragraph-rsid="08c17a93"/>
    </style:style>
    <style:style style:name="P76" style:family="paragraph" style:parent-style-name="Text_20_body">
      <style:text-properties officeooo:paragraph-rsid="08c3031f"/>
    </style:style>
    <style:style style:name="P77" style:family="paragraph" style:parent-style-name="Text_20_body">
      <style:text-properties officeooo:rsid="08c17a93" officeooo:paragraph-rsid="08c17a93"/>
    </style:style>
    <style:style style:name="P78" style:family="paragraph" style:parent-style-name="Text_20_body">
      <style:text-properties officeooo:rsid="08c444ab" officeooo:paragraph-rsid="08c71cd5"/>
    </style:style>
    <style:style style:name="P79" style:family="paragraph" style:parent-style-name="Text_20_body">
      <style:text-properties officeooo:paragraph-rsid="08c444ab"/>
    </style:style>
    <style:style style:name="P80" style:family="paragraph" style:parent-style-name="Text_20_body">
      <style:text-properties officeooo:rsid="08cc1fbe" officeooo:paragraph-rsid="08cc1fbe"/>
    </style:style>
    <style:style style:name="P81" style:family="paragraph" style:parent-style-name="Text_20_body">
      <style:text-properties officeooo:rsid="08ccbd7c" officeooo:paragraph-rsid="08ccbd7c"/>
    </style:style>
    <style:style style:name="P82" style:family="paragraph" style:parent-style-name="Text_20_body">
      <style:text-properties officeooo:rsid="08d04664" officeooo:paragraph-rsid="08d04664"/>
    </style:style>
    <style:style style:name="P83" style:family="paragraph" style:parent-style-name="Text_20_body">
      <style:text-properties officeooo:rsid="08d09eb3" officeooo:paragraph-rsid="08d09eb3"/>
    </style:style>
    <style:style style:name="P84" style:family="paragraph" style:parent-style-name="Text_20_body">
      <style:text-properties officeooo:rsid="08c61000" officeooo:paragraph-rsid="08c61000"/>
    </style:style>
    <style:style style:name="P85" style:family="paragraph" style:parent-style-name="Text_20_body">
      <style:text-properties officeooo:rsid="08c71cd5" officeooo:paragraph-rsid="08c71cd5"/>
    </style:style>
    <style:style style:name="P86" style:family="paragraph" style:parent-style-name="Text_20_body">
      <style:text-properties officeooo:paragraph-rsid="08d34dd2"/>
    </style:style>
    <style:style style:name="P87" style:family="paragraph" style:parent-style-name="Text_20_body">
      <style:text-properties officeooo:paragraph-rsid="08d4ffeb"/>
    </style:style>
    <style:style style:name="P88" style:family="paragraph" style:parent-style-name="Text_20_body">
      <style:text-properties officeooo:rsid="08d752f9" officeooo:paragraph-rsid="08d752f9"/>
    </style:style>
    <style:style style:name="P89" style:family="paragraph" style:parent-style-name="Text_20_body">
      <style:text-properties officeooo:rsid="08dcb944" officeooo:paragraph-rsid="08dcb944"/>
    </style:style>
    <style:style style:name="P90" style:family="paragraph" style:parent-style-name="Text_20_body">
      <style:text-properties officeooo:rsid="08dcb944" officeooo:paragraph-rsid="08de7197"/>
    </style:style>
    <style:style style:name="P91" style:family="paragraph" style:parent-style-name="Text_20_body">
      <style:text-properties officeooo:rsid="08d34dd2" officeooo:paragraph-rsid="08d34dd2"/>
    </style:style>
    <style:style style:name="P92" style:family="paragraph" style:parent-style-name="Text_20_body">
      <style:text-properties officeooo:rsid="08d4ffeb" officeooo:paragraph-rsid="08d4ffeb"/>
    </style:style>
    <style:style style:name="P93" style:family="paragraph" style:parent-style-name="Text_20_body">
      <style:text-properties officeooo:rsid="08df016a" officeooo:paragraph-rsid="08df016a"/>
    </style:style>
    <style:style style:name="P94" style:family="paragraph" style:parent-style-name="Text_20_body">
      <style:text-properties officeooo:rsid="08df016a" officeooo:paragraph-rsid="08df2d80"/>
    </style:style>
    <style:style style:name="P95" style:family="paragraph" style:parent-style-name="Text_20_body">
      <style:text-properties officeooo:rsid="08df016a" officeooo:paragraph-rsid="08e10f8b"/>
    </style:style>
    <style:style style:name="P96" style:family="paragraph" style:parent-style-name="Text_20_body">
      <style:text-properties officeooo:rsid="08e10f8b" officeooo:paragraph-rsid="08e10f8b"/>
    </style:style>
    <style:style style:name="P97" style:family="paragraph" style:parent-style-name="Text_20_body">
      <style:text-properties officeooo:rsid="08e10f8b" officeooo:paragraph-rsid="08e1d70a"/>
    </style:style>
    <style:style style:name="P98" style:family="paragraph" style:parent-style-name="Text_20_body">
      <style:text-properties officeooo:rsid="08df2d80" officeooo:paragraph-rsid="08df2d80"/>
    </style:style>
    <style:style style:name="P99" style:family="paragraph" style:parent-style-name="Text_20_body">
      <style:text-properties officeooo:rsid="08df85c6" officeooo:paragraph-rsid="08df85c6"/>
    </style:style>
    <style:style style:name="P100" style:family="paragraph" style:parent-style-name="Text_20_body">
      <style:text-properties officeooo:rsid="08e1d70a" officeooo:paragraph-rsid="08e489b1"/>
    </style:style>
    <style:style style:name="P101" style:family="paragraph" style:parent-style-name="Text_20_body">
      <style:text-properties officeooo:rsid="08e1d70a" officeooo:paragraph-rsid="08e56839"/>
    </style:style>
    <style:style style:name="P102" style:family="paragraph" style:parent-style-name="Text_20_body">
      <style:text-properties officeooo:paragraph-rsid="08e70567"/>
    </style:style>
    <style:style style:name="P103" style:family="paragraph" style:parent-style-name="Text_20_body">
      <style:text-properties officeooo:rsid="08e7beff" officeooo:paragraph-rsid="08e7beff"/>
    </style:style>
    <style:style style:name="P104" style:family="paragraph" style:parent-style-name="Text_20_body">
      <style:text-properties officeooo:rsid="08e677b1" officeooo:paragraph-rsid="08e677b1"/>
    </style:style>
    <style:style style:name="P105" style:family="paragraph" style:parent-style-name="Text_20_body">
      <style:text-properties officeooo:rsid="08e70567" officeooo:paragraph-rsid="08e70567"/>
    </style:style>
    <style:style style:name="P106" style:family="paragraph" style:parent-style-name="Text_20_body">
      <style:text-properties officeooo:rsid="08ea8c7e" officeooo:paragraph-rsid="08ea8c7e"/>
    </style:style>
    <style:style style:name="P107" style:family="paragraph" style:parent-style-name="Text_20_body">
      <style:text-properties officeooo:rsid="08ebc943" officeooo:paragraph-rsid="08ebc943"/>
    </style:style>
    <style:style style:name="P108" style:family="paragraph" style:parent-style-name="Text_20_body">
      <style:text-properties officeooo:paragraph-rsid="08ed2a02"/>
    </style:style>
    <style:style style:name="P109" style:family="paragraph" style:parent-style-name="Text_20_body">
      <style:text-properties officeooo:rsid="08ed2a02" officeooo:paragraph-rsid="08ed2a02"/>
    </style:style>
    <style:style style:name="P110" style:family="paragraph" style:parent-style-name="Text_20_body">
      <style:text-properties officeooo:rsid="08f5df0d" officeooo:paragraph-rsid="08f5df0d"/>
    </style:style>
    <style:style style:name="P111" style:family="paragraph" style:parent-style-name="Text_20_body">
      <style:text-properties officeooo:rsid="08f6cbce" officeooo:paragraph-rsid="08f6cbce"/>
    </style:style>
    <style:style style:name="P112" style:family="paragraph" style:parent-style-name="Text_20_body">
      <style:text-properties officeooo:rsid="08f6cbce" officeooo:paragraph-rsid="08fb3693"/>
    </style:style>
    <style:style style:name="P113" style:family="paragraph" style:parent-style-name="Text_20_body">
      <style:text-properties officeooo:rsid="08f845a6" officeooo:paragraph-rsid="08f845a6"/>
    </style:style>
    <style:style style:name="P114" style:family="paragraph" style:parent-style-name="Text_20_body">
      <style:text-properties officeooo:rsid="08fa3aad" officeooo:paragraph-rsid="08fa3aad"/>
    </style:style>
    <style:style style:name="P115" style:family="paragraph" style:parent-style-name="Text_20_body">
      <style:text-properties officeooo:rsid="08fe5663" officeooo:paragraph-rsid="08fe5663"/>
    </style:style>
    <style:style style:name="P116" style:family="paragraph" style:parent-style-name="Text_20_body">
      <style:text-properties officeooo:rsid="08fe5663" officeooo:paragraph-rsid="08ff97cf"/>
    </style:style>
    <style:style style:name="P117" style:family="paragraph" style:parent-style-name="Text_20_body">
      <style:text-properties officeooo:rsid="090190f9" officeooo:paragraph-rsid="090190f9"/>
    </style:style>
    <style:style style:name="P118" style:family="paragraph" style:parent-style-name="Text_20_body">
      <style:text-properties officeooo:rsid="0901ad87" officeooo:paragraph-rsid="0901ad87"/>
    </style:style>
    <style:style style:name="P119" style:family="paragraph" style:parent-style-name="Text_20_body">
      <style:text-properties officeooo:rsid="0901f5c4" officeooo:paragraph-rsid="0901f5c4"/>
    </style:style>
    <style:style style:name="P120" style:family="paragraph" style:parent-style-name="Text_20_body">
      <style:text-properties officeooo:rsid="0901f5c4" officeooo:paragraph-rsid="090458c7"/>
    </style:style>
    <style:style style:name="P121" style:family="paragraph" style:parent-style-name="Text_20_body">
      <style:text-properties officeooo:paragraph-rsid="0907aed1"/>
    </style:style>
    <style:style style:name="P122" style:family="paragraph" style:parent-style-name="Text_20_body">
      <style:text-properties officeooo:rsid="090c97a8" officeooo:paragraph-rsid="090c97a8"/>
    </style:style>
    <style:style style:name="P123" style:family="paragraph" style:parent-style-name="Text_20_body">
      <style:text-properties officeooo:rsid="090d65dc" officeooo:paragraph-rsid="090d65dc"/>
    </style:style>
    <style:style style:name="P124" style:family="paragraph" style:parent-style-name="Text_20_body">
      <style:text-properties officeooo:rsid="090d65dc" officeooo:paragraph-rsid="090e808c"/>
    </style:style>
    <style:style style:name="P125" style:family="paragraph" style:parent-style-name="Text_20_body">
      <style:text-properties officeooo:rsid="090dd543" officeooo:paragraph-rsid="090dd543"/>
    </style:style>
    <style:style style:name="P126" style:family="paragraph" style:parent-style-name="Text_20_body">
      <style:text-properties officeooo:rsid="090e872f" officeooo:paragraph-rsid="090e872f"/>
    </style:style>
    <style:style style:name="P127" style:family="paragraph" style:parent-style-name="Text_20_body">
      <style:text-properties officeooo:rsid="09108141" officeooo:paragraph-rsid="0911d7b7"/>
    </style:style>
    <style:style style:name="P128" style:family="paragraph" style:parent-style-name="Text_20_body">
      <style:text-properties officeooo:rsid="09150a53" officeooo:paragraph-rsid="0915f267"/>
    </style:style>
    <style:style style:name="P129" style:family="paragraph" style:parent-style-name="Text_20_body">
      <style:text-properties officeooo:paragraph-rsid="091500ae"/>
    </style:style>
    <style:style style:name="P130" style:family="paragraph" style:parent-style-name="Text_20_body">
      <style:text-properties officeooo:rsid="0912b6a2" officeooo:paragraph-rsid="0912b6a2"/>
    </style:style>
    <style:style style:name="P131" style:family="paragraph" style:parent-style-name="Text_20_body">
      <style:text-properties officeooo:rsid="091303b8" officeooo:paragraph-rsid="091303b8"/>
    </style:style>
    <style:style style:name="P132" style:family="paragraph" style:parent-style-name="Text_20_body">
      <style:text-properties officeooo:rsid="091670a2" officeooo:paragraph-rsid="091670a2"/>
    </style:style>
    <style:style style:name="P133" style:family="paragraph" style:parent-style-name="Text_20_body">
      <style:text-properties officeooo:paragraph-rsid="091ae8c0"/>
    </style:style>
    <style:style style:name="P134" style:family="paragraph" style:parent-style-name="Text_20_body">
      <style:text-properties officeooo:paragraph-rsid="091b9fc4"/>
    </style:style>
    <style:style style:name="P135" style:family="paragraph" style:parent-style-name="Text_20_body">
      <style:text-properties officeooo:rsid="091bcbf3" officeooo:paragraph-rsid="091bcbf3"/>
    </style:style>
    <style:style style:name="P136" style:family="paragraph" style:parent-style-name="Text_20_body">
      <style:text-properties officeooo:rsid="091cc45b" officeooo:paragraph-rsid="091cc45b"/>
    </style:style>
    <style:style style:name="P137" style:family="paragraph" style:parent-style-name="Text_20_body">
      <style:text-properties officeooo:rsid="091ae8c0" officeooo:paragraph-rsid="091ae8c0"/>
    </style:style>
    <style:style style:name="P138" style:family="paragraph" style:parent-style-name="Text_20_body">
      <style:text-properties officeooo:rsid="091ccd5d" officeooo:paragraph-rsid="091ccd5d"/>
    </style:style>
    <style:style style:name="P139" style:family="paragraph" style:parent-style-name="Text_20_body">
      <style:text-properties officeooo:rsid="091fa37e" officeooo:paragraph-rsid="091fa37e"/>
    </style:style>
    <style:style style:name="P140" style:family="paragraph" style:parent-style-name="Text_20_body">
      <style:text-properties officeooo:rsid="09222e3d" officeooo:paragraph-rsid="09222e3d"/>
    </style:style>
    <style:style style:name="P141" style:family="paragraph" style:parent-style-name="Text_20_body">
      <style:text-properties officeooo:rsid="0927726f" officeooo:paragraph-rsid="0927726f"/>
    </style:style>
    <style:style style:name="P142" style:family="paragraph" style:parent-style-name="Text_20_body">
      <style:text-properties officeooo:rsid="0927726f" officeooo:paragraph-rsid="0928fbf4"/>
    </style:style>
    <style:style style:name="P143" style:family="paragraph" style:parent-style-name="Text_20_body">
      <style:text-properties officeooo:rsid="0927726f" officeooo:paragraph-rsid="09293a71"/>
    </style:style>
    <style:style style:name="P144" style:family="paragraph" style:parent-style-name="Text_20_body">
      <style:text-properties officeooo:rsid="0928fbf4" officeooo:paragraph-rsid="0928fbf4"/>
    </style:style>
    <style:style style:name="P145" style:family="paragraph" style:parent-style-name="Text_20_body">
      <style:text-properties officeooo:rsid="09292dd3" officeooo:paragraph-rsid="09292dd3"/>
    </style:style>
    <style:style style:name="P146" style:family="paragraph" style:parent-style-name="Text_20_body">
      <style:text-properties officeooo:rsid="092a66a1" officeooo:paragraph-rsid="092a66a1"/>
    </style:style>
    <style:style style:name="P147" style:family="paragraph" style:parent-style-name="Text_20_body">
      <style:text-properties officeooo:rsid="092bfb5f" officeooo:paragraph-rsid="092bfb5f"/>
    </style:style>
    <style:style style:name="P148" style:family="paragraph" style:parent-style-name="Text_20_body">
      <style:text-properties officeooo:rsid="092c5fa9" officeooo:paragraph-rsid="092c5fa9"/>
    </style:style>
    <style:style style:name="P149" style:family="paragraph" style:parent-style-name="Text_20_body">
      <style:text-properties officeooo:rsid="092ff35f" officeooo:paragraph-rsid="09335bb3"/>
    </style:style>
    <style:style style:name="P150" style:family="paragraph" style:parent-style-name="Text_20_body">
      <style:text-properties officeooo:rsid="09318bd2" officeooo:paragraph-rsid="09318bd2"/>
    </style:style>
    <style:style style:name="P151" style:family="paragraph" style:parent-style-name="Text_20_body">
      <style:text-properties officeooo:rsid="09318bd2" officeooo:paragraph-rsid="093457b7"/>
    </style:style>
    <style:style style:name="P152" style:family="paragraph" style:parent-style-name="Text_20_body">
      <style:text-properties officeooo:rsid="09293a71" officeooo:paragraph-rsid="09293a71"/>
    </style:style>
    <style:style style:name="P153" style:family="paragraph" style:parent-style-name="Text_20_body">
      <style:text-properties officeooo:rsid="0929ac88" officeooo:paragraph-rsid="0929ac88"/>
    </style:style>
    <style:style style:name="P154" style:family="paragraph" style:parent-style-name="Text_20_body">
      <style:text-properties officeooo:rsid="092e3b01" officeooo:paragraph-rsid="092e3b01"/>
    </style:style>
    <style:style style:name="P155" style:family="paragraph" style:parent-style-name="Text_20_body">
      <style:text-properties officeooo:rsid="0936eea8" officeooo:paragraph-rsid="0936eea8"/>
    </style:style>
    <style:style style:name="P156" style:family="paragraph" style:parent-style-name="Text_20_body">
      <style:text-properties officeooo:rsid="09381d65" officeooo:paragraph-rsid="09381d65"/>
    </style:style>
    <style:style style:name="P157" style:family="paragraph" style:parent-style-name="Text_20_body">
      <style:text-properties officeooo:rsid="09381d65" officeooo:paragraph-rsid="093bb5c2"/>
    </style:style>
    <style:style style:name="P158" style:family="paragraph" style:parent-style-name="Text_20_body">
      <style:text-properties officeooo:rsid="094364c7" officeooo:paragraph-rsid="094364c7"/>
    </style:style>
    <style:style style:name="P159" style:family="paragraph" style:parent-style-name="Text_20_body">
      <style:text-properties officeooo:rsid="0943c60b" officeooo:paragraph-rsid="0943c60b"/>
    </style:style>
    <style:style style:name="P160" style:family="paragraph" style:parent-style-name="Text_20_body">
      <style:text-properties officeooo:rsid="09454f5a" officeooo:paragraph-rsid="09454f5a"/>
    </style:style>
    <style:style style:name="P161" style:family="paragraph" style:parent-style-name="Text_20_body">
      <style:text-properties officeooo:rsid="093a0a1f" officeooo:paragraph-rsid="093a0a1f"/>
    </style:style>
    <style:style style:name="P162" style:family="paragraph" style:parent-style-name="Text_20_body">
      <style:text-properties officeooo:rsid="093bb5c2" officeooo:paragraph-rsid="093bb5c2"/>
    </style:style>
    <style:style style:name="P163" style:family="paragraph" style:parent-style-name="Text_20_body">
      <style:text-properties officeooo:rsid="093c7dce" officeooo:paragraph-rsid="093c7dce"/>
    </style:style>
    <style:style style:name="P164" style:family="paragraph" style:parent-style-name="Text_20_body">
      <style:text-properties officeooo:rsid="093d2583" officeooo:paragraph-rsid="093d2583"/>
    </style:style>
    <style:style style:name="P165" style:family="paragraph" style:parent-style-name="Text_20_body">
      <style:text-properties officeooo:rsid="093f2551" officeooo:paragraph-rsid="093f2551"/>
    </style:style>
    <style:style style:name="P166" style:family="paragraph" style:parent-style-name="Text_20_body">
      <style:text-properties officeooo:rsid="093ff2b9" officeooo:paragraph-rsid="0942cb8e"/>
    </style:style>
    <style:style style:name="P167" style:family="paragraph" style:parent-style-name="Text_20_body">
      <style:text-properties officeooo:rsid="0942cb8e" officeooo:paragraph-rsid="0942cb8e"/>
    </style:style>
    <style:style style:name="P168" style:family="paragraph" style:parent-style-name="Text_20_body">
      <style:text-properties officeooo:rsid="09470d17" officeooo:paragraph-rsid="09470d17"/>
    </style:style>
    <style:style style:name="P169" style:family="paragraph" style:parent-style-name="Text_20_body">
      <style:text-properties officeooo:rsid="094d0e26" officeooo:paragraph-rsid="094d0e26"/>
    </style:style>
    <style:style style:name="P170" style:family="paragraph" style:parent-style-name="Text_20_body">
      <style:text-properties officeooo:rsid="094d0e26" officeooo:paragraph-rsid="094efe8b"/>
    </style:style>
    <style:style style:name="P171" style:family="paragraph" style:parent-style-name="Text_20_body">
      <style:text-properties officeooo:rsid="094d0e26" officeooo:paragraph-rsid="094fca6f"/>
    </style:style>
    <style:style style:name="P172" style:family="paragraph" style:parent-style-name="Text_20_body">
      <style:text-properties officeooo:rsid="0951db08" officeooo:paragraph-rsid="0951db08"/>
    </style:style>
    <style:style style:name="P173" style:family="paragraph" style:parent-style-name="Text_20_body">
      <style:text-properties officeooo:rsid="0951db08" officeooo:paragraph-rsid="0952c024"/>
    </style:style>
    <style:style style:name="P174" style:family="paragraph" style:parent-style-name="Text_20_body">
      <style:text-properties officeooo:rsid="0954a4ca" officeooo:paragraph-rsid="0954a4ca"/>
    </style:style>
    <style:style style:name="P175" style:family="paragraph" style:parent-style-name="Text_20_body">
      <style:text-properties officeooo:rsid="094efe8b" officeooo:paragraph-rsid="094efe8b"/>
    </style:style>
    <style:style style:name="P176" style:family="paragraph" style:parent-style-name="Text_20_body">
      <style:text-properties officeooo:rsid="08afe0c3" officeooo:paragraph-rsid="08b0416d"/>
    </style:style>
    <style:style style:name="P177" style:family="paragraph" style:parent-style-name="Text_20_body">
      <style:text-properties officeooo:rsid="0911d7b7" officeooo:paragraph-rsid="0911d7b7"/>
    </style:style>
    <style:style style:name="P178" style:family="paragraph" style:parent-style-name="Text_20_body">
      <style:text-properties officeooo:rsid="0959e904" officeooo:paragraph-rsid="0959e904"/>
    </style:style>
    <style:style style:name="P179" style:family="paragraph" style:parent-style-name="Text_20_body">
      <style:text-properties officeooo:rsid="095a848a" officeooo:paragraph-rsid="095a848a"/>
    </style:style>
    <style:style style:name="P180" style:family="paragraph" style:parent-style-name="Text_20_body">
      <style:text-properties officeooo:rsid="095b7949" officeooo:paragraph-rsid="095b7949"/>
    </style:style>
    <style:style style:name="P181" style:family="paragraph" style:parent-style-name="Text_20_body">
      <style:text-properties officeooo:rsid="095b7949" officeooo:paragraph-rsid="095c77dd"/>
    </style:style>
    <style:style style:name="P182" style:family="paragraph" style:parent-style-name="Text_20_body">
      <style:text-properties officeooo:rsid="095ce500" officeooo:paragraph-rsid="095ce500"/>
    </style:style>
    <style:style style:name="P183" style:family="paragraph" style:parent-style-name="Text_20_body">
      <style:text-properties officeooo:rsid="095d7389" officeooo:paragraph-rsid="095d7389"/>
    </style:style>
    <style:style style:name="P184" style:family="paragraph" style:parent-style-name="Text_20_body">
      <style:text-properties officeooo:rsid="095f05e1" officeooo:paragraph-rsid="095f05e1"/>
    </style:style>
    <style:style style:name="P185" style:family="paragraph" style:parent-style-name="Text_20_body">
      <style:text-properties officeooo:rsid="095f3f2d" officeooo:paragraph-rsid="095fdf35"/>
    </style:style>
    <style:style style:name="P186" style:family="paragraph" style:parent-style-name="Text_20_body">
      <style:text-properties officeooo:rsid="091a7ab4" officeooo:paragraph-rsid="0961f6b5"/>
    </style:style>
    <style:style style:name="P187" style:family="paragraph" style:parent-style-name="Text_20_body">
      <style:text-properties officeooo:rsid="09628466" officeooo:paragraph-rsid="09628466"/>
    </style:style>
    <style:style style:name="P188" style:family="paragraph" style:parent-style-name="Text_20_body">
      <style:text-properties officeooo:rsid="09666928" officeooo:paragraph-rsid="09666928"/>
    </style:style>
    <style:style style:name="P189" style:family="paragraph" style:parent-style-name="Text_20_body">
      <style:text-properties officeooo:rsid="095fdf35" officeooo:paragraph-rsid="095fdf35"/>
    </style:style>
    <style:style style:name="P190" style:family="paragraph" style:parent-style-name="Text_20_body">
      <style:text-properties officeooo:rsid="0960f418" officeooo:paragraph-rsid="0960f418"/>
    </style:style>
    <style:style style:name="P191" style:family="paragraph" style:parent-style-name="Text_20_body">
      <style:text-properties officeooo:paragraph-rsid="09684a4d"/>
    </style:style>
    <style:style style:name="P192" style:family="paragraph" style:parent-style-name="Text_20_body">
      <style:text-properties officeooo:paragraph-rsid="0968fe86"/>
    </style:style>
    <style:style style:name="P193" style:family="paragraph" style:parent-style-name="Text_20_body">
      <style:text-properties officeooo:paragraph-rsid="096b7d79"/>
    </style:style>
    <style:style style:name="P194" style:family="paragraph" style:parent-style-name="Text_20_body">
      <style:text-properties officeooo:rsid="09684a4d" officeooo:paragraph-rsid="09684a4d"/>
    </style:style>
    <style:style style:name="P195" style:family="paragraph" style:parent-style-name="Text_20_body">
      <style:text-properties officeooo:rsid="096b7d79" officeooo:paragraph-rsid="096bd8cf"/>
    </style:style>
    <style:style style:name="P196" style:family="paragraph" style:parent-style-name="Text_20_body">
      <style:text-properties officeooo:rsid="096b7d79" officeooo:paragraph-rsid="096c6803"/>
    </style:style>
    <style:style style:name="P197" style:family="paragraph" style:parent-style-name="Text_20_body">
      <style:text-properties officeooo:paragraph-rsid="096c6803"/>
    </style:style>
    <style:style style:name="P198" style:family="paragraph" style:parent-style-name="Text_20_body">
      <style:text-properties officeooo:rsid="096dcaee" officeooo:paragraph-rsid="09750156"/>
    </style:style>
    <style:style style:name="P199" style:family="paragraph" style:parent-style-name="Text_20_body">
      <style:text-properties officeooo:rsid="096dcaee" officeooo:paragraph-rsid="097a0a1a"/>
    </style:style>
    <style:style style:name="P200" style:family="paragraph" style:parent-style-name="Text_20_body">
      <style:text-properties officeooo:paragraph-rsid="09717a62"/>
    </style:style>
    <style:style style:name="P201" style:family="paragraph" style:parent-style-name="Text_20_body">
      <style:text-properties officeooo:rsid="0975dd25" officeooo:paragraph-rsid="0975dd25"/>
    </style:style>
    <style:style style:name="P202" style:family="paragraph" style:parent-style-name="Text_20_body">
      <style:text-properties officeooo:rsid="097a374c" officeooo:paragraph-rsid="097a374c"/>
    </style:style>
    <style:style style:name="P203" style:family="paragraph" style:parent-style-name="Text_20_body">
      <style:text-properties officeooo:paragraph-rsid="097e0379"/>
    </style:style>
    <style:style style:name="P204" style:family="paragraph" style:parent-style-name="Text_20_body">
      <style:text-properties officeooo:rsid="0980102d" officeooo:paragraph-rsid="0980102d"/>
    </style:style>
    <style:style style:name="P205" style:family="paragraph" style:parent-style-name="Text_20_body">
      <style:text-properties officeooo:rsid="097a0a1a" officeooo:paragraph-rsid="097a0a1a"/>
    </style:style>
    <style:style style:name="P206" style:family="paragraph" style:parent-style-name="Text_20_body">
      <style:text-properties officeooo:paragraph-rsid="0988f2ec"/>
    </style:style>
    <style:style style:name="P207" style:family="paragraph" style:parent-style-name="Text_20_body">
      <style:text-properties officeooo:rsid="098536ba" officeooo:paragraph-rsid="098536ba"/>
    </style:style>
    <style:style style:name="P208" style:family="paragraph" style:parent-style-name="Text_20_body">
      <style:text-properties officeooo:rsid="0985c3da" officeooo:paragraph-rsid="0985c3da"/>
    </style:style>
    <style:style style:name="P209" style:family="paragraph" style:parent-style-name="Text_20_body">
      <style:text-properties officeooo:rsid="0986fce9" officeooo:paragraph-rsid="0986fce9"/>
    </style:style>
    <style:style style:name="P210" style:family="paragraph" style:parent-style-name="Text_20_body">
      <style:text-properties officeooo:paragraph-rsid="099361e4"/>
    </style:style>
    <style:style style:name="P211" style:family="paragraph" style:parent-style-name="Text_20_body">
      <style:text-properties officeooo:rsid="0993fb1b" officeooo:paragraph-rsid="09958ef5"/>
    </style:style>
    <style:style style:name="P212" style:family="paragraph" style:parent-style-name="Text_20_body">
      <style:text-properties officeooo:paragraph-rsid="0995e16b"/>
    </style:style>
    <style:style style:name="P213" style:family="paragraph" style:parent-style-name="Text_20_body">
      <style:text-properties officeooo:rsid="0996bf33" officeooo:paragraph-rsid="0998a84a"/>
    </style:style>
    <style:style style:name="P214" style:family="paragraph" style:parent-style-name="Text_20_body">
      <style:text-properties officeooo:rsid="0999f146" officeooo:paragraph-rsid="0999f146"/>
    </style:style>
    <style:style style:name="P215" style:family="paragraph" style:parent-style-name="Text_20_body">
      <style:text-properties officeooo:rsid="099361e4" officeooo:paragraph-rsid="099361e4"/>
    </style:style>
    <style:style style:name="P216" style:family="paragraph" style:parent-style-name="Text_20_body">
      <style:text-properties officeooo:rsid="099ba5f5" officeooo:paragraph-rsid="099d8f94"/>
    </style:style>
    <style:style style:name="P217" style:family="paragraph" style:parent-style-name="Text_20_body">
      <style:text-properties officeooo:rsid="099ba5f5" officeooo:paragraph-rsid="09afc6b9"/>
    </style:style>
    <style:style style:name="P218" style:family="paragraph" style:parent-style-name="Text_20_body">
      <style:text-properties officeooo:paragraph-rsid="099e568b"/>
    </style:style>
    <style:style style:name="P219" style:family="paragraph" style:parent-style-name="Text_20_body">
      <style:text-properties officeooo:rsid="09a080ef" officeooo:paragraph-rsid="09a080ef"/>
    </style:style>
    <style:style style:name="P220" style:family="paragraph" style:parent-style-name="Text_20_body">
      <style:text-properties officeooo:rsid="09a080ef" officeooo:paragraph-rsid="09a0b99a"/>
    </style:style>
    <style:style style:name="P221" style:family="paragraph" style:parent-style-name="Text_20_body">
      <style:text-properties officeooo:rsid="09a080ef" officeooo:paragraph-rsid="09a3b519"/>
    </style:style>
    <style:style style:name="P222" style:family="paragraph" style:parent-style-name="Text_20_body">
      <style:text-properties officeooo:rsid="09a080ef" officeooo:paragraph-rsid="09a670af"/>
    </style:style>
    <style:style style:name="P223" style:family="paragraph" style:parent-style-name="Text_20_body">
      <style:text-properties officeooo:rsid="09a080ef" officeooo:paragraph-rsid="09a844b7"/>
    </style:style>
    <style:style style:name="P224" style:family="paragraph" style:parent-style-name="Text_20_body">
      <style:text-properties officeooo:paragraph-rsid="09ab9d07"/>
    </style:style>
    <style:style style:name="P225" style:family="paragraph" style:parent-style-name="Text_20_body">
      <style:text-properties officeooo:paragraph-rsid="09ac540c"/>
    </style:style>
    <style:style style:name="P226" style:family="paragraph" style:parent-style-name="Text_20_body">
      <style:text-properties officeooo:rsid="099d8f94" officeooo:paragraph-rsid="099d8f94"/>
    </style:style>
    <style:style style:name="P227" style:family="paragraph" style:parent-style-name="Text_20_body">
      <style:text-properties officeooo:rsid="099deba1" officeooo:paragraph-rsid="099deba1"/>
    </style:style>
    <style:style style:name="P228" style:family="paragraph" style:parent-style-name="Text_20_body">
      <style:text-properties officeooo:rsid="099e1370" officeooo:paragraph-rsid="099e1370"/>
    </style:style>
    <style:style style:name="P229" style:family="paragraph" style:parent-style-name="Text_20_body">
      <style:text-properties officeooo:rsid="09a670af" officeooo:paragraph-rsid="09a670af"/>
    </style:style>
    <style:style style:name="P230" style:family="paragraph" style:parent-style-name="Text_20_body">
      <style:text-properties officeooo:rsid="09aa2ade" officeooo:paragraph-rsid="09aa2ade"/>
    </style:style>
    <style:style style:name="P231" style:family="paragraph" style:parent-style-name="Text_20_body">
      <style:text-properties officeooo:rsid="09b1b18e" officeooo:paragraph-rsid="09b1b18e"/>
    </style:style>
    <style:style style:name="P232" style:family="paragraph" style:parent-style-name="Text_20_body">
      <style:text-properties officeooo:rsid="09b1b18e" officeooo:paragraph-rsid="09b39cbd"/>
    </style:style>
    <style:style style:name="P233" style:family="paragraph" style:parent-style-name="Text_20_body">
      <style:text-properties officeooo:rsid="09b1b18e" officeooo:paragraph-rsid="09b4b384"/>
    </style:style>
    <style:style style:name="P234" style:family="paragraph" style:parent-style-name="Text_20_body">
      <style:text-properties officeooo:rsid="09b1b18e" officeooo:paragraph-rsid="09afc6b9"/>
    </style:style>
    <style:style style:name="P235" style:family="paragraph" style:parent-style-name="Text_20_body">
      <style:text-properties officeooo:rsid="09b8fc5c" officeooo:paragraph-rsid="09b8fc5c"/>
    </style:style>
    <style:style style:name="P236" style:family="paragraph" style:parent-style-name="Text_20_body">
      <style:text-properties officeooo:rsid="09be6207" officeooo:paragraph-rsid="09be6207"/>
    </style:style>
    <style:style style:name="P237" style:family="paragraph" style:parent-style-name="Text_20_body">
      <style:text-properties officeooo:rsid="09afc6b9" officeooo:paragraph-rsid="09afc6b9"/>
    </style:style>
    <style:style style:name="P238" style:family="paragraph" style:parent-style-name="Text_20_body">
      <style:text-properties officeooo:rsid="09b39cbd" officeooo:paragraph-rsid="09b39cbd"/>
    </style:style>
    <style:style style:name="P239" style:family="paragraph" style:parent-style-name="Text_20_body">
      <style:text-properties officeooo:rsid="09b4b384" officeooo:paragraph-rsid="09b4b384"/>
    </style:style>
    <style:style style:name="P240" style:family="paragraph" style:parent-style-name="Text_20_body">
      <style:text-properties officeooo:rsid="09bf38e4" officeooo:paragraph-rsid="09c07a8b"/>
    </style:style>
    <style:style style:name="P241" style:family="paragraph" style:parent-style-name="Text_20_body">
      <style:text-properties officeooo:rsid="09c07a8b" officeooo:paragraph-rsid="09c07a8b"/>
    </style:style>
    <style:style style:name="P242" style:family="paragraph" style:parent-style-name="Text_20_body">
      <style:text-properties officeooo:rsid="09c1ac32" officeooo:paragraph-rsid="09c1ac32"/>
    </style:style>
    <style:style style:name="P243" style:family="paragraph" style:parent-style-name="Text_20_body">
      <style:text-properties officeooo:rsid="09c4ef0e" officeooo:paragraph-rsid="09c4ef0e"/>
    </style:style>
    <style:style style:name="P244" style:family="paragraph" style:parent-style-name="Text_20_body">
      <style:text-properties officeooo:rsid="09c4ef0e" officeooo:paragraph-rsid="09c56f68"/>
    </style:style>
    <style:style style:name="P245" style:family="paragraph" style:parent-style-name="Text_20_body">
      <style:text-properties officeooo:rsid="09c49d5a" officeooo:paragraph-rsid="09c56f68"/>
    </style:style>
    <style:style style:name="P246" style:family="paragraph" style:parent-style-name="Text_20_body">
      <style:text-properties officeooo:rsid="09c49d5a" officeooo:paragraph-rsid="09c49d5a"/>
    </style:style>
    <style:style style:name="P247" style:family="paragraph" style:parent-style-name="Text_20_body">
      <style:text-properties officeooo:rsid="09c56f68" officeooo:paragraph-rsid="09c56f68"/>
    </style:style>
    <style:style style:name="P248" style:family="paragraph" style:parent-style-name="Text_20_body">
      <style:text-properties officeooo:rsid="09c57bea" officeooo:paragraph-rsid="09c57bea"/>
    </style:style>
    <style:style style:name="P249" style:family="paragraph" style:parent-style-name="Text_20_body">
      <style:text-properties officeooo:rsid="09c84680" officeooo:paragraph-rsid="09c84680"/>
    </style:style>
    <style:style style:name="P250" style:family="paragraph" style:parent-style-name="Text_20_body">
      <style:text-properties officeooo:rsid="09c84680" officeooo:paragraph-rsid="09ce7e7f"/>
    </style:style>
    <style:style style:name="P251" style:family="paragraph" style:parent-style-name="Text_20_body">
      <style:text-properties officeooo:rsid="09c84680" officeooo:paragraph-rsid="09cfce26"/>
    </style:style>
    <style:style style:name="P252" style:family="paragraph" style:parent-style-name="Text_20_body">
      <style:text-properties officeooo:rsid="09d4ddde" officeooo:paragraph-rsid="09d5d40c"/>
    </style:style>
    <style:style style:name="P253" style:family="paragraph" style:parent-style-name="Text_20_body">
      <style:text-properties officeooo:rsid="09d59bba" officeooo:paragraph-rsid="09d5d40c"/>
    </style:style>
    <style:style style:name="P254" style:family="paragraph" style:parent-style-name="Text_20_body">
      <style:text-properties officeooo:rsid="09d59bba" officeooo:paragraph-rsid="09de0869"/>
    </style:style>
    <style:style style:name="P255" style:family="paragraph" style:parent-style-name="Text_20_body">
      <style:text-properties officeooo:rsid="09ca4298" officeooo:paragraph-rsid="09ca4298"/>
    </style:style>
    <style:style style:name="P256" style:family="paragraph" style:parent-style-name="Text_20_body">
      <style:text-properties officeooo:rsid="09cc1363" officeooo:paragraph-rsid="09cc1363"/>
    </style:style>
    <style:style style:name="P257" style:family="paragraph" style:parent-style-name="Text_20_body">
      <style:text-properties officeooo:rsid="09ce7e7f" officeooo:paragraph-rsid="09ce7e7f"/>
    </style:style>
    <style:style style:name="P258" style:family="paragraph" style:parent-style-name="Text_20_body">
      <style:text-properties officeooo:rsid="09cfce26" officeooo:paragraph-rsid="09cfce26"/>
    </style:style>
    <style:style style:name="P259" style:family="paragraph" style:parent-style-name="Text_20_body">
      <style:text-properties officeooo:rsid="09d1a430" officeooo:paragraph-rsid="09d1a430"/>
    </style:style>
    <style:style style:name="P260" style:family="paragraph" style:parent-style-name="Text_20_body">
      <style:text-properties officeooo:rsid="09db8052" officeooo:paragraph-rsid="09db8052"/>
    </style:style>
    <style:style style:name="P261" style:family="paragraph" style:parent-style-name="Text_20_body">
      <style:text-properties officeooo:rsid="09e07f30" officeooo:paragraph-rsid="09e07f30"/>
    </style:style>
    <style:style style:name="P262" style:family="paragraph" style:parent-style-name="Text_20_body">
      <style:text-properties officeooo:rsid="09e1913b" officeooo:paragraph-rsid="09e1913b"/>
    </style:style>
    <style:style style:name="P263" style:family="paragraph" style:parent-style-name="Text_20_body">
      <style:text-properties officeooo:rsid="09e1913b" officeooo:paragraph-rsid="09e34516"/>
    </style:style>
    <style:style style:name="P264" style:family="paragraph" style:parent-style-name="Text_20_body">
      <style:text-properties officeooo:rsid="09e1913b" officeooo:paragraph-rsid="09e50a16"/>
    </style:style>
    <style:style style:name="P265" style:family="paragraph" style:parent-style-name="Text_20_body">
      <style:text-properties officeooo:rsid="09e1913b" officeooo:paragraph-rsid="09f3d877"/>
    </style:style>
    <style:style style:name="P266" style:family="paragraph" style:parent-style-name="Text_20_body">
      <style:text-properties officeooo:rsid="09e1913b" officeooo:paragraph-rsid="09fafbaa"/>
    </style:style>
    <style:style style:name="P267" style:family="paragraph" style:parent-style-name="Text_20_body">
      <style:text-properties officeooo:rsid="09e62e44" officeooo:paragraph-rsid="09e62e44"/>
    </style:style>
    <style:style style:name="P268" style:family="paragraph" style:parent-style-name="Text_20_body">
      <style:text-properties officeooo:paragraph-rsid="09ed7e5e"/>
    </style:style>
    <style:style style:name="P269" style:family="paragraph" style:parent-style-name="Text_20_body">
      <style:text-properties officeooo:rsid="09ef3813" officeooo:paragraph-rsid="09ef3813"/>
    </style:style>
    <style:style style:name="P270" style:family="paragraph" style:parent-style-name="Text_20_body">
      <style:text-properties officeooo:rsid="09f09810" officeooo:paragraph-rsid="09f09810"/>
    </style:style>
    <style:style style:name="P271" style:family="paragraph" style:parent-style-name="Text_20_body">
      <style:text-properties officeooo:paragraph-rsid="06b23c94"/>
    </style:style>
    <style:style style:name="P272" style:family="paragraph" style:parent-style-name="Text_20_body">
      <style:text-properties officeooo:rsid="0879706c" officeooo:paragraph-rsid="0879706c"/>
    </style:style>
    <style:style style:name="P273" style:family="paragraph" style:parent-style-name="Text_20_body">
      <style:text-properties officeooo:rsid="09fd6a17" officeooo:paragraph-rsid="09fd6a17"/>
    </style:style>
    <style:style style:name="P274" style:family="paragraph" style:parent-style-name="Text_20_body">
      <style:text-properties officeooo:rsid="09fee993" officeooo:paragraph-rsid="09fee993"/>
    </style:style>
    <style:style style:name="P275" style:family="paragraph" style:parent-style-name="Text_20_body">
      <style:text-properties officeooo:rsid="09fc356b" officeooo:paragraph-rsid="09fc356b"/>
    </style:style>
    <style:style style:name="P276" style:family="paragraph" style:parent-style-name="Text_20_body">
      <style:text-properties officeooo:rsid="0a131565" officeooo:paragraph-rsid="0a131565"/>
    </style:style>
    <style:style style:name="P277" style:family="paragraph" style:parent-style-name="Text_20_body">
      <style:text-properties officeooo:rsid="0a149396" officeooo:paragraph-rsid="0a149396"/>
    </style:style>
    <style:style style:name="P278" style:family="paragraph" style:parent-style-name="Text_20_body">
      <style:text-properties officeooo:rsid="0a10fcb7" officeooo:paragraph-rsid="0a128f3f"/>
    </style:style>
    <style:style style:name="P279" style:family="paragraph" style:parent-style-name="Text_20_body">
      <style:text-properties officeooo:rsid="0a128f3f" officeooo:paragraph-rsid="0a128f3f"/>
    </style:style>
    <style:style style:name="P280" style:family="paragraph" style:parent-style-name="Quotations">
      <style:text-properties officeooo:rsid="0a128f3f" officeooo:paragraph-rsid="0a128f3f"/>
    </style:style>
    <style:style style:name="P281" style:family="paragraph" style:parent-style-name="Text_20_body">
      <style:text-properties officeooo:rsid="0a168c96" officeooo:paragraph-rsid="0a168c96"/>
    </style:style>
    <style:style style:name="P282" style:family="paragraph" style:parent-style-name="Text_20_body">
      <style:text-properties officeooo:rsid="0a187c75" officeooo:paragraph-rsid="0a187c75"/>
    </style:style>
    <style:style style:name="P283" style:family="paragraph" style:parent-style-name="Text_20_body">
      <style:text-properties officeooo:rsid="0a189ed3" officeooo:paragraph-rsid="0a19d987"/>
    </style:style>
    <style:style style:name="P284" style:family="paragraph" style:parent-style-name="Text_20_body">
      <style:text-properties officeooo:rsid="0a189ed3" officeooo:paragraph-rsid="0a1d45b0"/>
    </style:style>
    <style:style style:name="P285" style:family="paragraph" style:parent-style-name="Text_20_body">
      <style:text-properties officeooo:rsid="0a1eade6" officeooo:paragraph-rsid="0a1eade6"/>
    </style:style>
    <style:style style:name="P286" style:family="paragraph" style:parent-style-name="Text_20_body">
      <style:text-properties officeooo:rsid="0a1eade6" officeooo:paragraph-rsid="0a234742"/>
    </style:style>
    <style:style style:name="P287" style:family="paragraph" style:parent-style-name="Text_20_body">
      <style:text-properties officeooo:rsid="0a1eade6" officeooo:paragraph-rsid="0a250cbe"/>
    </style:style>
    <style:style style:name="P288" style:family="paragraph" style:parent-style-name="Text_20_body">
      <style:text-properties officeooo:rsid="0a1eade6" officeooo:paragraph-rsid="0a25a156"/>
    </style:style>
    <style:style style:name="P289" style:family="paragraph" style:parent-style-name="Text_20_body">
      <style:text-properties officeooo:rsid="0a19d987" officeooo:paragraph-rsid="0a19d987"/>
    </style:style>
    <style:style style:name="P290" style:family="paragraph" style:parent-style-name="Text_20_body">
      <style:text-properties officeooo:rsid="0a1b4cd7" officeooo:paragraph-rsid="0a1b4cd7"/>
    </style:style>
    <style:style style:name="P291" style:family="paragraph" style:parent-style-name="Text_20_body">
      <style:text-properties officeooo:rsid="0a234742" officeooo:paragraph-rsid="0a234742"/>
    </style:style>
    <style:style style:name="P292" style:family="paragraph" style:parent-style-name="Text_20_body">
      <style:text-properties officeooo:rsid="0a246231" officeooo:paragraph-rsid="0a246231"/>
    </style:style>
    <style:style style:name="P293" style:family="paragraph" style:parent-style-name="Text_20_body">
      <style:text-properties officeooo:rsid="0a26c593" officeooo:paragraph-rsid="0a26c593"/>
    </style:style>
    <style:style style:name="P294" style:family="paragraph" style:parent-style-name="Text_20_body">
      <style:text-properties officeooo:rsid="0a289075" officeooo:paragraph-rsid="0a289075"/>
    </style:style>
    <style:style style:name="P295" style:family="paragraph" style:parent-style-name="Text_20_body">
      <style:text-properties officeooo:rsid="0a29b713" officeooo:paragraph-rsid="0a29b713"/>
    </style:style>
    <style:style style:name="P296" style:family="paragraph" style:parent-style-name="Text_20_body">
      <style:text-properties officeooo:rsid="0a29d1bc" officeooo:paragraph-rsid="0a29d1bc"/>
    </style:style>
    <style:style style:name="P297" style:family="paragraph" style:parent-style-name="Text_20_body">
      <style:text-properties officeooo:rsid="0a29d1bc" officeooo:paragraph-rsid="0a2a926a"/>
    </style:style>
    <style:style style:name="P298" style:family="paragraph" style:parent-style-name="Text_20_body">
      <style:text-properties officeooo:rsid="0a29d1bc" officeooo:paragraph-rsid="0a2c72f6"/>
    </style:style>
    <style:style style:name="P299" style:family="paragraph" style:parent-style-name="Text_20_body">
      <style:text-properties officeooo:rsid="0a29d1bc" officeooo:paragraph-rsid="0a3135f4"/>
    </style:style>
    <style:style style:name="P300" style:family="paragraph" style:parent-style-name="Text_20_body">
      <style:text-properties officeooo:rsid="0a2a926a" officeooo:paragraph-rsid="0a2a926a"/>
    </style:style>
    <style:style style:name="P301" style:family="paragraph" style:parent-style-name="Text_20_body">
      <style:text-properties officeooo:paragraph-rsid="0a3135f4"/>
    </style:style>
    <style:style style:name="P302" style:family="paragraph" style:parent-style-name="Text_20_body">
      <style:text-properties officeooo:rsid="0a3135f4" officeooo:paragraph-rsid="0a3135f4"/>
    </style:style>
    <style:style style:name="P303" style:family="paragraph" style:parent-style-name="Text_20_body">
      <style:text-properties officeooo:rsid="0a32590d" officeooo:paragraph-rsid="0a32590d"/>
    </style:style>
    <style:style style:name="P304" style:family="paragraph" style:parent-style-name="Text_20_body">
      <style:text-properties officeooo:rsid="0a34c45c" officeooo:paragraph-rsid="0a34c45c"/>
    </style:style>
    <style:style style:name="P305" style:family="paragraph" style:parent-style-name="Text_20_body">
      <style:text-properties officeooo:rsid="0a34c45c" officeooo:paragraph-rsid="0a36acda"/>
    </style:style>
    <style:style style:name="P306" style:family="paragraph" style:parent-style-name="Text_20_body">
      <style:text-properties officeooo:rsid="0a2c72f6" officeooo:paragraph-rsid="0a2c72f6"/>
    </style:style>
    <style:style style:name="P307" style:family="paragraph" style:parent-style-name="Text_20_body">
      <style:text-properties officeooo:rsid="0a3087b5" officeooo:paragraph-rsid="0a3135f4"/>
    </style:style>
    <style:style style:name="P308" style:family="paragraph" style:parent-style-name="Text_20_body">
      <style:text-properties officeooo:rsid="0a33771e" officeooo:paragraph-rsid="0a33771e"/>
    </style:style>
    <style:style style:name="P309" style:family="paragraph" style:parent-style-name="Text_20_body">
      <style:text-properties officeooo:rsid="0a36c38d" officeooo:paragraph-rsid="0a36c38d"/>
    </style:style>
    <style:style style:name="P310" style:family="paragraph" style:parent-style-name="Text_20_body">
      <style:text-properties officeooo:rsid="0a384ee2" officeooo:paragraph-rsid="0a39e66c"/>
    </style:style>
    <style:style style:name="P311" style:family="paragraph" style:parent-style-name="Text_20_body">
      <style:text-properties officeooo:rsid="0a384ee2" officeooo:paragraph-rsid="0a3d3563"/>
    </style:style>
    <style:style style:name="P312" style:family="paragraph" style:parent-style-name="Text_20_body">
      <style:text-properties officeooo:rsid="0a384ee2" officeooo:paragraph-rsid="0a3e7048"/>
    </style:style>
    <style:style style:name="P313" style:family="paragraph" style:parent-style-name="Text_20_body">
      <style:text-properties officeooo:rsid="0a384ee2" officeooo:paragraph-rsid="0a4171ff"/>
    </style:style>
    <style:style style:name="P314" style:family="paragraph" style:parent-style-name="Text_20_body">
      <style:text-properties officeooo:rsid="0a36acda" officeooo:paragraph-rsid="0a36acda"/>
    </style:style>
    <style:style style:name="P315" style:family="paragraph" style:parent-style-name="Text_20_body">
      <style:text-properties officeooo:rsid="0a3b3d7b" officeooo:paragraph-rsid="0a3b3d7b"/>
    </style:style>
    <style:style style:name="P316" style:family="paragraph" style:parent-style-name="Text_20_body">
      <style:text-properties officeooo:rsid="0a3f49de" officeooo:paragraph-rsid="0a3f49de"/>
    </style:style>
    <style:style style:name="P317" style:family="paragraph" style:parent-style-name="Text_20_body">
      <style:text-properties officeooo:rsid="0a3f49de" officeooo:paragraph-rsid="0a3fadb8"/>
    </style:style>
    <style:style style:name="P318" style:family="paragraph" style:parent-style-name="Text_20_body">
      <style:text-properties officeooo:rsid="0a4171ff" officeooo:paragraph-rsid="0a4171ff"/>
    </style:style>
    <style:style style:name="P319" style:family="paragraph" style:parent-style-name="Text_20_body">
      <style:text-properties officeooo:rsid="0a42e193" officeooo:paragraph-rsid="0a42e193"/>
    </style:style>
    <style:style style:name="P320" style:family="paragraph" style:parent-style-name="Text_20_body">
      <style:text-properties officeooo:paragraph-rsid="0a4540d1"/>
    </style:style>
    <style:style style:name="P321" style:family="paragraph" style:parent-style-name="Text_20_body">
      <style:text-properties officeooo:paragraph-rsid="0a47191d"/>
    </style:style>
    <style:style style:name="P322" style:family="paragraph" style:parent-style-name="Text_20_body">
      <style:text-properties officeooo:rsid="0a47c600" officeooo:paragraph-rsid="0a47c600"/>
    </style:style>
    <style:style style:name="P323" style:family="paragraph" style:parent-style-name="Text_20_body">
      <style:text-properties officeooo:rsid="0a47c600" officeooo:paragraph-rsid="0a492697"/>
    </style:style>
    <style:style style:name="P324" style:family="paragraph" style:parent-style-name="Text_20_body">
      <style:text-properties officeooo:rsid="0a47191d" officeooo:paragraph-rsid="0a47191d"/>
    </style:style>
    <style:style style:name="P325" style:family="paragraph" style:parent-style-name="Text_20_body">
      <style:text-properties officeooo:rsid="0a4a0b7e" officeooo:paragraph-rsid="0a4bbaba"/>
    </style:style>
    <style:style style:name="P326" style:family="paragraph" style:parent-style-name="Text_20_body">
      <style:text-properties officeooo:rsid="0a4cf7f9" officeooo:paragraph-rsid="0a4cf7f9"/>
    </style:style>
    <style:style style:name="P327" style:family="paragraph" style:parent-style-name="Text_20_body">
      <style:text-properties officeooo:rsid="0a4e022e" officeooo:paragraph-rsid="0a4e022e"/>
    </style:style>
    <style:style style:name="P328" style:family="paragraph" style:parent-style-name="Text_20_body">
      <style:text-properties officeooo:rsid="0a504569" officeooo:paragraph-rsid="0a54d09d"/>
    </style:style>
    <style:style style:name="P329" style:family="paragraph" style:parent-style-name="Text_20_body">
      <style:text-properties officeooo:rsid="0a504569" officeooo:paragraph-rsid="0a5623e3"/>
    </style:style>
    <style:style style:name="P330" style:family="paragraph" style:parent-style-name="Text_20_body">
      <style:text-properties officeooo:rsid="0a4bbaba" officeooo:paragraph-rsid="0a4bbaba"/>
    </style:style>
    <style:style style:name="P331" style:family="paragraph" style:parent-style-name="Text_20_body">
      <style:text-properties officeooo:paragraph-rsid="0a595cd6"/>
    </style:style>
    <style:style style:name="P332" style:family="paragraph" style:parent-style-name="Text_20_body">
      <style:text-properties officeooo:paragraph-rsid="0a60c4c9"/>
    </style:style>
    <style:style style:name="P333" style:family="paragraph" style:parent-style-name="Text_20_body">
      <style:text-properties officeooo:rsid="0a65d165" officeooo:paragraph-rsid="0a65d165"/>
    </style:style>
    <style:style style:name="P334" style:family="paragraph" style:parent-style-name="Text_20_body">
      <style:text-properties officeooo:rsid="0a60c4c9" officeooo:paragraph-rsid="0a60c4c9"/>
    </style:style>
    <style:style style:name="P335" style:family="paragraph" style:parent-style-name="Text_20_body">
      <style:text-properties officeooo:paragraph-rsid="0a6796a7"/>
    </style:style>
    <style:style style:name="P336" style:family="paragraph" style:parent-style-name="Text_20_body">
      <style:text-properties officeooo:rsid="0a6c28c3" officeooo:paragraph-rsid="0a6c28c3"/>
    </style:style>
    <style:style style:name="P337" style:family="paragraph" style:parent-style-name="Text_20_body">
      <style:text-properties officeooo:rsid="0a6c28c3" officeooo:paragraph-rsid="0a6da30f"/>
    </style:style>
    <style:style style:name="P338" style:family="paragraph" style:parent-style-name="Text_20_body">
      <style:text-properties officeooo:paragraph-rsid="0a6f8d9c"/>
    </style:style>
    <style:style style:name="P339" style:family="paragraph" style:parent-style-name="Text_20_body">
      <style:text-properties officeooo:paragraph-rsid="0a6f9c96"/>
    </style:style>
    <style:style style:name="P340" style:family="paragraph" style:parent-style-name="Text_20_body">
      <style:text-properties officeooo:rsid="0a724293" officeooo:paragraph-rsid="0a724293"/>
    </style:style>
    <style:style style:name="P341" style:family="paragraph" style:parent-style-name="Text_20_body">
      <style:text-properties officeooo:rsid="0a6da30f" officeooo:paragraph-rsid="0a6da30f"/>
    </style:style>
    <style:style style:name="P342" style:family="paragraph" style:parent-style-name="Text_20_body">
      <style:text-properties officeooo:rsid="0a6f9c96" officeooo:paragraph-rsid="0a6f9c96"/>
    </style:style>
    <style:style style:name="P343" style:family="paragraph" style:parent-style-name="Text_20_body">
      <style:text-properties officeooo:rsid="0a739767" officeooo:paragraph-rsid="0a739767"/>
    </style:style>
    <style:style style:name="P344" style:family="paragraph" style:parent-style-name="Text_20_body">
      <style:text-properties officeooo:rsid="0a76a316" officeooo:paragraph-rsid="0a76a316"/>
    </style:style>
    <style:style style:name="P345" style:family="paragraph" style:parent-style-name="Text_20_body">
      <style:text-properties officeooo:rsid="0a7941c9" officeooo:paragraph-rsid="0a7941c9"/>
    </style:style>
    <style:style style:name="P346" style:family="paragraph" style:parent-style-name="Text_20_body">
      <style:text-properties officeooo:rsid="0a7941c9" officeooo:paragraph-rsid="0a7c2082"/>
    </style:style>
    <style:style style:name="P347" style:family="paragraph" style:parent-style-name="Text_20_body">
      <style:text-properties officeooo:rsid="0a7941c9" officeooo:paragraph-rsid="0a7d1231"/>
    </style:style>
    <style:style style:name="P348" style:family="paragraph" style:parent-style-name="Text_20_body">
      <style:text-properties officeooo:rsid="0a7941c9" officeooo:paragraph-rsid="0a7e2f35"/>
    </style:style>
    <style:style style:name="P349" style:family="paragraph" style:parent-style-name="Text_20_body">
      <style:text-properties officeooo:rsid="0a7941c9" officeooo:paragraph-rsid="0a81c68f"/>
    </style:style>
    <style:style style:name="P350" style:family="paragraph" style:parent-style-name="Text_20_body">
      <style:text-properties officeooo:paragraph-rsid="0a81c68f"/>
    </style:style>
    <style:style style:name="P351" style:family="paragraph" style:parent-style-name="Text_20_body">
      <style:text-properties officeooo:rsid="0a783be2" officeooo:paragraph-rsid="0a783be2"/>
    </style:style>
    <style:style style:name="P352" style:family="paragraph" style:parent-style-name="Text_20_body">
      <style:text-properties officeooo:rsid="0a7d1231" officeooo:paragraph-rsid="0a7e2f35"/>
    </style:style>
    <style:style style:name="P353" style:family="paragraph" style:parent-style-name="Text_20_body">
      <style:text-properties officeooo:rsid="0a83ac92" officeooo:paragraph-rsid="0a83e628"/>
    </style:style>
    <style:style style:name="P354" style:family="paragraph" style:parent-style-name="Text_20_body">
      <style:text-properties officeooo:rsid="0a83ac92" officeooo:paragraph-rsid="0a8e5bbc"/>
    </style:style>
    <style:style style:name="P355" style:family="paragraph" style:parent-style-name="Text_20_body">
      <style:text-properties officeooo:rsid="0a83ac92" officeooo:paragraph-rsid="0a8f587c"/>
    </style:style>
    <style:style style:name="P356" style:family="paragraph" style:parent-style-name="Text_20_body">
      <style:text-properties officeooo:rsid="0a83ac92" officeooo:paragraph-rsid="0a9294e5"/>
    </style:style>
    <style:style style:name="P357" style:family="paragraph" style:parent-style-name="Text_20_body">
      <style:text-properties officeooo:rsid="0a85d82c" officeooo:paragraph-rsid="0a85d82c"/>
    </style:style>
    <style:style style:name="P358" style:family="paragraph" style:parent-style-name="Text_20_body">
      <style:text-properties officeooo:rsid="0a868835" officeooo:paragraph-rsid="0a868835"/>
    </style:style>
    <style:style style:name="P359" style:family="paragraph" style:parent-style-name="Text_20_body">
      <style:text-properties officeooo:rsid="0a88d5d2" officeooo:paragraph-rsid="0a88d5d2"/>
    </style:style>
    <style:style style:name="P360" style:family="paragraph" style:parent-style-name="Text_20_body">
      <style:text-properties officeooo:rsid="0a8e5bbc" officeooo:paragraph-rsid="0a8e5bbc"/>
    </style:style>
    <style:style style:name="P361" style:family="paragraph" style:parent-style-name="Text_20_body">
      <style:text-properties officeooo:rsid="0a779868" officeooo:paragraph-rsid="0a9723f9"/>
    </style:style>
    <style:style style:name="P362" style:family="paragraph" style:parent-style-name="Text_20_body">
      <style:text-properties officeooo:rsid="0a9723f9" officeooo:paragraph-rsid="0a9723f9"/>
    </style:style>
    <style:style style:name="P363" style:family="paragraph" style:parent-style-name="Text_20_body">
      <style:text-properties officeooo:rsid="0a5c1d62" officeooo:paragraph-rsid="0a6f9c96"/>
    </style:style>
    <style:style style:name="P364" style:family="paragraph" style:parent-style-name="Text_20_body">
      <style:text-properties officeooo:rsid="0a9c059f" officeooo:paragraph-rsid="0a9c059f"/>
    </style:style>
    <style:style style:name="P365" style:family="paragraph" style:parent-style-name="Text_20_body">
      <style:text-properties officeooo:rsid="0a9c059f" officeooo:paragraph-rsid="0a9dd050"/>
    </style:style>
    <style:style style:name="P366" style:family="paragraph" style:parent-style-name="Text_20_body">
      <style:text-properties officeooo:rsid="0a9c059f" officeooo:paragraph-rsid="0a9f6fc9"/>
    </style:style>
    <style:style style:name="P367" style:family="paragraph" style:parent-style-name="Text_20_body">
      <style:text-properties officeooo:rsid="0a9c059f" officeooo:paragraph-rsid="0aa50e76"/>
    </style:style>
    <style:style style:name="P368" style:family="paragraph" style:parent-style-name="Text_20_body">
      <style:text-properties officeooo:rsid="0a9c059f" officeooo:paragraph-rsid="0aa8a3ac"/>
    </style:style>
    <style:style style:name="P369" style:family="paragraph" style:parent-style-name="Text_20_body">
      <style:text-properties officeooo:rsid="0a9c059f" officeooo:paragraph-rsid="0aabc3ec"/>
    </style:style>
    <style:style style:name="P370" style:family="paragraph" style:parent-style-name="Text_20_body">
      <style:text-properties officeooo:rsid="0a9c059f" officeooo:paragraph-rsid="0aaee9fd"/>
    </style:style>
    <style:style style:name="P371" style:family="paragraph" style:parent-style-name="Text_20_body">
      <style:text-properties officeooo:rsid="0a9c059f" officeooo:paragraph-rsid="0ab0324a"/>
    </style:style>
    <style:style style:name="P372" style:family="paragraph" style:parent-style-name="Text_20_body">
      <style:text-properties officeooo:rsid="0aa14987" officeooo:paragraph-rsid="0aa14987"/>
    </style:style>
    <style:style style:name="P373" style:family="paragraph" style:parent-style-name="Text_20_body">
      <style:text-properties officeooo:rsid="0aa338ca" officeooo:paragraph-rsid="0aa338ca"/>
    </style:style>
    <style:style style:name="P374" style:family="paragraph" style:parent-style-name="Text_20_body">
      <style:text-properties officeooo:rsid="0aa6e8c8" officeooo:paragraph-rsid="0aa6e8c8"/>
    </style:style>
    <style:style style:name="P375" style:family="paragraph" style:parent-style-name="Text_20_body">
      <style:text-properties officeooo:rsid="0ab73d93" officeooo:paragraph-rsid="0ab73d93"/>
    </style:style>
    <style:style style:name="P376" style:family="paragraph" style:parent-style-name="Text_20_body">
      <style:text-properties officeooo:rsid="0ab73d93" officeooo:paragraph-rsid="0ab9c1d6"/>
    </style:style>
    <style:style style:name="P377" style:family="paragraph" style:parent-style-name="Text_20_body">
      <style:text-properties officeooo:rsid="0ab73d93" officeooo:paragraph-rsid="0abd4f6b"/>
    </style:style>
    <style:style style:name="P378" style:family="paragraph" style:parent-style-name="Text_20_body">
      <style:text-properties officeooo:rsid="0aa9f39c" officeooo:paragraph-rsid="0aa9f39c"/>
    </style:style>
    <style:style style:name="P379" style:family="paragraph" style:parent-style-name="Text_20_body">
      <style:text-properties officeooo:rsid="0aabc3ec" officeooo:paragraph-rsid="0aabc3ec"/>
    </style:style>
    <style:style style:name="P380" style:family="paragraph" style:parent-style-name="Text_20_body">
      <style:text-properties officeooo:rsid="0ab169a4" officeooo:paragraph-rsid="0ab169a4"/>
    </style:style>
    <style:style style:name="P381" style:family="paragraph" style:parent-style-name="Text_20_body">
      <style:text-properties officeooo:rsid="0abdfa22" officeooo:paragraph-rsid="0abe98cf"/>
    </style:style>
    <style:style style:name="P382" style:family="paragraph" style:parent-style-name="Text_20_body">
      <style:text-properties officeooo:rsid="0abe98cf" officeooo:paragraph-rsid="0abe98cf"/>
    </style:style>
    <style:style style:name="P383" style:family="paragraph" style:parent-style-name="Text_20_body">
      <style:text-properties officeooo:rsid="0abfdfcf" officeooo:paragraph-rsid="0ac131c4"/>
    </style:style>
    <style:style style:name="P384" style:family="paragraph" style:parent-style-name="Text_20_body">
      <style:text-properties officeooo:rsid="0abfdfcf" officeooo:paragraph-rsid="0acbc5ae"/>
    </style:style>
    <style:style style:name="P385" style:family="paragraph" style:parent-style-name="Text_20_body">
      <style:text-properties officeooo:paragraph-rsid="0ac1ea3a"/>
    </style:style>
    <style:style style:name="P386" style:family="paragraph" style:parent-style-name="Text_20_body">
      <style:text-properties officeooo:rsid="0ab9c1d6" officeooo:paragraph-rsid="0ab9c1d6"/>
    </style:style>
    <style:style style:name="P387" style:family="paragraph" style:parent-style-name="Text_20_body">
      <style:text-properties officeooo:rsid="0abb9ba7" officeooo:paragraph-rsid="0abb9ba7"/>
    </style:style>
    <style:style style:name="P388" style:family="paragraph" style:parent-style-name="Text_20_body">
      <style:text-properties officeooo:rsid="0ac787eb" officeooo:paragraph-rsid="0ac787eb"/>
    </style:style>
    <style:style style:name="P389" style:family="paragraph" style:parent-style-name="Text_20_body">
      <style:text-properties officeooo:rsid="0acbc5ae" officeooo:paragraph-rsid="0acbc5ae"/>
    </style:style>
    <style:style style:name="P390" style:family="paragraph" style:parent-style-name="Text_20_body">
      <style:text-properties officeooo:rsid="0ad86be7" officeooo:paragraph-rsid="0ad86be7"/>
    </style:style>
    <style:style style:name="P391" style:family="paragraph" style:parent-style-name="Text_20_body">
      <style:text-properties officeooo:rsid="0ad8ef50" officeooo:paragraph-rsid="0ad8ef50"/>
    </style:style>
    <style:style style:name="P392" style:family="paragraph" style:parent-style-name="Text_20_body">
      <style:text-properties officeooo:rsid="0adae246" officeooo:paragraph-rsid="0adae246"/>
    </style:style>
    <style:style style:name="P393" style:family="paragraph" style:parent-style-name="Text_20_body">
      <style:text-properties officeooo:paragraph-rsid="0ae1ed79"/>
    </style:style>
    <style:style style:name="P394" style:family="paragraph" style:parent-style-name="Text_20_body">
      <style:text-properties officeooo:rsid="0ae2ee99" officeooo:paragraph-rsid="0ae2ee99"/>
    </style:style>
    <style:style style:name="P395" style:family="paragraph" style:parent-style-name="Text_20_body">
      <style:text-properties officeooo:rsid="0ae4a96b" officeooo:paragraph-rsid="0ae4a96b"/>
    </style:style>
    <style:style style:name="P396" style:family="paragraph" style:parent-style-name="Text_20_body">
      <style:text-properties officeooo:rsid="0ae732a3" officeooo:paragraph-rsid="0ae732a3"/>
    </style:style>
    <style:style style:name="P397" style:family="paragraph" style:parent-style-name="Text_20_body">
      <style:text-properties officeooo:rsid="0ae798e5" officeooo:paragraph-rsid="0ae798e5"/>
    </style:style>
    <style:style style:name="P398" style:family="paragraph" style:parent-style-name="Text_20_body">
      <style:text-properties officeooo:rsid="0ae89a1a" officeooo:paragraph-rsid="0ae89a1a"/>
    </style:style>
    <style:style style:name="P399" style:family="paragraph" style:parent-style-name="Text_20_body">
      <style:text-properties officeooo:rsid="0ae89a1a" officeooo:paragraph-rsid="0aee567e"/>
    </style:style>
    <style:style style:name="P400" style:family="paragraph" style:parent-style-name="Text_20_body">
      <style:text-properties officeooo:rsid="0ae89a1a" officeooo:paragraph-rsid="0aef7efd"/>
    </style:style>
    <style:style style:name="P401" style:family="paragraph" style:parent-style-name="Text_20_body">
      <style:text-properties officeooo:rsid="0ae89a1a" officeooo:paragraph-rsid="0af04c4f"/>
    </style:style>
    <style:style style:name="P402" style:family="paragraph" style:parent-style-name="Text_20_body">
      <style:text-properties officeooo:rsid="0ae89a1a" officeooo:paragraph-rsid="0af16189"/>
    </style:style>
    <style:style style:name="P403" style:family="paragraph" style:parent-style-name="Text_20_body">
      <style:text-properties officeooo:rsid="0ae89a1a" officeooo:paragraph-rsid="0af237df"/>
    </style:style>
    <style:style style:name="P404" style:family="paragraph" style:parent-style-name="Text_20_body">
      <style:text-properties officeooo:rsid="0ae89a1a" officeooo:paragraph-rsid="0af6d02f"/>
    </style:style>
    <style:style style:name="P405" style:family="paragraph" style:parent-style-name="Text_20_body">
      <style:text-properties officeooo:rsid="0ae89a1a" officeooo:paragraph-rsid="0afa5be0"/>
    </style:style>
    <style:style style:name="P406" style:family="paragraph" style:parent-style-name="Text_20_body">
      <style:text-properties officeooo:rsid="0ae89a1a" officeooo:paragraph-rsid="0afe0f35"/>
    </style:style>
    <style:style style:name="P407" style:family="paragraph" style:parent-style-name="Text_20_body">
      <style:text-properties officeooo:rsid="0ae1ed79" officeooo:paragraph-rsid="0ae1ed79"/>
    </style:style>
    <style:style style:name="P408" style:family="paragraph" style:parent-style-name="Text_20_body">
      <style:text-properties officeooo:rsid="0af16189" officeooo:paragraph-rsid="0af16189"/>
    </style:style>
    <style:style style:name="P409" style:family="paragraph" style:parent-style-name="Text_20_body">
      <style:text-properties officeooo:rsid="0af1ce8a" officeooo:paragraph-rsid="0af1ce8a"/>
    </style:style>
    <style:style style:name="P410" style:family="paragraph" style:parent-style-name="Text_20_body">
      <style:text-properties officeooo:rsid="0af237df" officeooo:paragraph-rsid="0af237df"/>
    </style:style>
    <style:style style:name="P411" style:family="paragraph" style:parent-style-name="Text_20_body">
      <style:text-properties officeooo:rsid="0b003e6f" officeooo:paragraph-rsid="0b003e6f"/>
    </style:style>
    <style:style style:name="P412" style:family="paragraph" style:parent-style-name="Text_20_body">
      <style:text-properties officeooo:rsid="0b014320" officeooo:paragraph-rsid="0b02951b"/>
    </style:style>
    <style:style style:name="P413" style:family="paragraph" style:parent-style-name="Text_20_body">
      <style:text-properties officeooo:rsid="0b064a77" officeooo:paragraph-rsid="0b064a77"/>
    </style:style>
    <style:style style:name="P414" style:family="paragraph" style:parent-style-name="Text_20_body">
      <style:text-properties officeooo:rsid="0b071ff1" officeooo:paragraph-rsid="0b0956d5"/>
    </style:style>
    <style:style style:name="P415" style:family="paragraph" style:parent-style-name="Text_20_body">
      <style:text-properties officeooo:rsid="0b0956d5" officeooo:paragraph-rsid="0b0956d5"/>
    </style:style>
    <style:style style:name="P416" style:family="paragraph" style:parent-style-name="Text_20_body">
      <style:text-properties officeooo:rsid="0afa5be0" officeooo:paragraph-rsid="0afa5be0"/>
    </style:style>
    <style:style style:name="P417" style:family="paragraph" style:parent-style-name="Text_20_body">
      <style:text-properties officeooo:rsid="0afc5287" officeooo:paragraph-rsid="0afe0f35"/>
    </style:style>
    <style:style style:name="P418" style:family="paragraph" style:parent-style-name="Text_20_body">
      <style:text-properties officeooo:rsid="0aff2aff" officeooo:paragraph-rsid="0aff2aff"/>
    </style:style>
    <style:style style:name="P419" style:family="paragraph" style:parent-style-name="Text_20_body">
      <style:text-properties officeooo:rsid="0b0479a4" officeooo:paragraph-rsid="0b0479a4"/>
    </style:style>
    <style:style style:name="P420" style:family="paragraph" style:parent-style-name="Text_20_body">
      <style:text-properties officeooo:rsid="0b0ad367" officeooo:paragraph-rsid="0b0ad367"/>
    </style:style>
    <style:style style:name="P421" style:family="paragraph" style:parent-style-name="Text_20_body">
      <style:text-properties officeooo:rsid="0b0d66e0" officeooo:paragraph-rsid="0b0d66e0"/>
    </style:style>
    <style:style style:name="P422" style:family="paragraph" style:parent-style-name="Text_20_body">
      <style:text-properties officeooo:rsid="0b0e7186" officeooo:paragraph-rsid="0b0e7186"/>
    </style:style>
    <style:style style:name="P423" style:family="paragraph" style:parent-style-name="Text_20_body">
      <style:text-properties officeooo:rsid="0b0e7186" officeooo:paragraph-rsid="0b118d7e"/>
    </style:style>
    <style:style style:name="P424" style:family="paragraph" style:parent-style-name="Text_20_body">
      <style:text-properties officeooo:rsid="0b0e7186" officeooo:paragraph-rsid="0b1461eb"/>
    </style:style>
    <style:style style:name="P425" style:family="paragraph" style:parent-style-name="Text_20_body">
      <style:text-properties officeooo:rsid="0b1461eb" officeooo:paragraph-rsid="0b1461eb"/>
    </style:style>
    <style:style style:name="P426" style:family="paragraph" style:parent-style-name="Text_20_body">
      <style:text-properties officeooo:rsid="0b16ebb7" officeooo:paragraph-rsid="0b16ebb7"/>
    </style:style>
    <style:style style:name="P427" style:family="paragraph" style:parent-style-name="Text_20_body">
      <style:text-properties officeooo:rsid="0b16ebb7" officeooo:paragraph-rsid="0b1bdacc"/>
    </style:style>
    <style:style style:name="P428" style:family="paragraph" style:parent-style-name="Text_20_body">
      <style:text-properties officeooo:rsid="0b0f95e9" officeooo:paragraph-rsid="0b0f95e9"/>
    </style:style>
    <style:style style:name="P429" style:family="paragraph" style:parent-style-name="Text_20_body">
      <style:text-properties officeooo:rsid="0b0f95e9" officeooo:paragraph-rsid="0b4274cb"/>
    </style:style>
    <style:style style:name="P430" style:family="paragraph" style:parent-style-name="Text_20_body">
      <style:text-properties officeooo:rsid="0b0f95e9" officeooo:paragraph-rsid="0b42cba2"/>
    </style:style>
    <style:style style:name="P431" style:family="paragraph" style:parent-style-name="Text_20_body">
      <style:text-properties officeooo:rsid="0b0f95e9" officeooo:paragraph-rsid="0b49fee4"/>
    </style:style>
    <style:style style:name="P432" style:family="paragraph" style:parent-style-name="Text_20_body">
      <style:text-properties officeooo:rsid="0b0f95e9" officeooo:paragraph-rsid="0b4ba731"/>
    </style:style>
    <style:style style:name="P433" style:family="paragraph" style:parent-style-name="Text_20_body">
      <style:text-properties officeooo:rsid="0b0f95e9" officeooo:paragraph-rsid="0b508af0"/>
    </style:style>
    <style:style style:name="P434" style:family="paragraph" style:parent-style-name="Text_20_body">
      <style:text-properties officeooo:rsid="0b0f95e9" officeooo:paragraph-rsid="0b50a0b9"/>
    </style:style>
    <style:style style:name="P435" style:family="paragraph" style:parent-style-name="Text_20_body">
      <style:text-properties officeooo:rsid="0b0f95e9" officeooo:paragraph-rsid="0b50aefe"/>
    </style:style>
    <style:style style:name="P436" style:family="paragraph" style:parent-style-name="Text_20_body">
      <style:text-properties officeooo:paragraph-rsid="0b209b06"/>
    </style:style>
    <style:style style:name="P437" style:family="paragraph" style:parent-style-name="Text_20_body">
      <style:text-properties officeooo:paragraph-rsid="0b222242"/>
    </style:style>
    <style:style style:name="P438" style:family="paragraph" style:parent-style-name="Text_20_body">
      <style:text-properties officeooo:paragraph-rsid="0b25aad6"/>
    </style:style>
    <style:style style:name="P439" style:family="paragraph" style:parent-style-name="Text_20_body">
      <style:text-properties officeooo:paragraph-rsid="0b268545"/>
    </style:style>
    <style:style style:name="P440" style:family="paragraph" style:parent-style-name="Text_20_body">
      <style:text-properties officeooo:rsid="0b222242" officeooo:paragraph-rsid="0b22a43a"/>
    </style:style>
    <style:style style:name="P441" style:family="paragraph" style:parent-style-name="Text_20_body">
      <style:text-properties officeooo:rsid="0b26b102" officeooo:paragraph-rsid="0b26b102"/>
    </style:style>
    <style:style style:name="P442" style:family="paragraph" style:parent-style-name="Text_20_body">
      <style:text-properties officeooo:rsid="0b26b102" officeooo:paragraph-rsid="0b289744"/>
    </style:style>
    <style:style style:name="P443" style:family="paragraph" style:parent-style-name="Text_20_body">
      <style:text-properties officeooo:rsid="0b292c4d" officeooo:paragraph-rsid="0b2b24a6"/>
    </style:style>
    <style:style style:name="P444" style:family="paragraph" style:parent-style-name="Text_20_body">
      <style:text-properties officeooo:paragraph-rsid="0b2f20da"/>
    </style:style>
    <style:style style:name="P445" style:family="paragraph" style:parent-style-name="Text_20_body">
      <style:text-properties officeooo:paragraph-rsid="0b342ab7"/>
    </style:style>
    <style:style style:name="P446" style:family="paragraph" style:parent-style-name="Text_20_body">
      <style:text-properties officeooo:paragraph-rsid="0b3621f3"/>
    </style:style>
    <style:style style:name="P447" style:family="paragraph" style:parent-style-name="Text_20_body">
      <style:text-properties officeooo:paragraph-rsid="0b36eb43"/>
    </style:style>
    <style:style style:name="P448" style:family="paragraph" style:parent-style-name="Text_20_body">
      <style:text-properties officeooo:rsid="0b2c210e" officeooo:paragraph-rsid="0b2c210e"/>
    </style:style>
    <style:style style:name="P449" style:family="paragraph" style:parent-style-name="Text_20_body">
      <style:text-properties officeooo:rsid="0b2f3cd2" officeooo:paragraph-rsid="0b30bf39"/>
    </style:style>
    <style:style style:name="P450" style:family="paragraph" style:parent-style-name="Text_20_body">
      <style:text-properties officeooo:rsid="0b328571" officeooo:paragraph-rsid="0b328571"/>
    </style:style>
    <style:style style:name="P451" style:family="paragraph" style:parent-style-name="Text_20_body">
      <style:text-properties officeooo:rsid="0b3621f3" officeooo:paragraph-rsid="0b3621f3"/>
    </style:style>
    <style:style style:name="P452" style:family="paragraph" style:parent-style-name="Text_20_body">
      <style:text-properties fo:font-style="normal" officeooo:rsid="0b37fe57" officeooo:paragraph-rsid="0b37fe57" style:font-style-asian="normal" style:font-style-complex="normal"/>
    </style:style>
    <style:style style:name="P453" style:family="paragraph" style:parent-style-name="Text_20_body">
      <style:text-properties fo:font-style="normal" officeooo:rsid="0b39e23c" officeooo:paragraph-rsid="0b3b810b" style:font-style-asian="normal" style:font-style-complex="normal"/>
    </style:style>
    <style:style style:name="P454" style:family="paragraph" style:parent-style-name="Text_20_body">
      <style:text-properties fo:font-style="normal" officeooo:rsid="0b3c5df5" officeooo:paragraph-rsid="0b3c5df5" style:font-style-asian="normal" style:font-style-complex="normal"/>
    </style:style>
    <style:style style:name="P455" style:family="paragraph" style:parent-style-name="Text_20_body">
      <style:text-properties fo:font-style="normal" officeooo:rsid="0b3c5df5" officeooo:paragraph-rsid="0b3dcf6e" style:font-style-asian="normal" style:font-style-complex="normal"/>
    </style:style>
    <style:style style:name="P456" style:family="paragraph" style:parent-style-name="Text_20_body">
      <style:text-properties fo:font-style="normal" officeooo:rsid="0b3c5df5" officeooo:paragraph-rsid="0b3ead00" style:font-style-asian="normal" style:font-style-complex="normal"/>
    </style:style>
    <style:style style:name="P457" style:family="paragraph" style:parent-style-name="Text_20_body">
      <style:text-properties fo:font-style="normal" officeooo:rsid="0b3b810b" officeooo:paragraph-rsid="0b3b810b" style:font-style-asian="normal" style:font-style-complex="normal"/>
    </style:style>
    <style:style style:name="P458" style:family="paragraph" style:parent-style-name="Text_20_body">
      <style:text-properties fo:font-style="normal" officeooo:rsid="0b3c2392" officeooo:paragraph-rsid="0b3c2392" style:font-style-asian="normal" style:font-style-complex="normal"/>
    </style:style>
    <style:style style:name="P459" style:family="paragraph" style:parent-style-name="Text_20_body">
      <style:text-properties fo:font-style="normal" officeooo:rsid="0b3f6089" officeooo:paragraph-rsid="0b3f6089" style:font-style-asian="normal" style:font-style-complex="normal"/>
    </style:style>
    <style:style style:name="P460" style:family="paragraph" style:parent-style-name="Text_20_body">
      <style:text-properties fo:font-style="normal" officeooo:rsid="0b40cb9a" officeooo:paragraph-rsid="0b40cb9a" style:font-style-asian="normal" style:font-style-complex="normal"/>
    </style:style>
    <style:style style:name="P461" style:family="paragraph" style:parent-style-name="Text_20_body">
      <style:text-properties fo:font-style="normal" officeooo:rsid="0b41c504" officeooo:paragraph-rsid="0b41c504" style:font-style-asian="normal" style:font-style-complex="normal"/>
    </style:style>
    <style:style style:name="P462" style:family="paragraph" style:parent-style-name="Text_20_body">
      <style:text-properties officeooo:rsid="0b4e0580" officeooo:paragraph-rsid="0b4e0580"/>
    </style:style>
    <style:style style:name="P463" style:family="paragraph" style:parent-style-name="Text_20_body">
      <style:text-properties officeooo:rsid="0b50aefe" officeooo:paragraph-rsid="0b50aefe"/>
    </style:style>
    <style:style style:name="P464" style:family="paragraph" style:parent-style-name="Text_20_body">
      <style:text-properties officeooo:rsid="0b584f41" officeooo:paragraph-rsid="0b584f41"/>
    </style:style>
    <style:style style:name="P465" style:family="paragraph" style:parent-style-name="Text_20_body">
      <style:text-properties officeooo:rsid="0b58818f" officeooo:paragraph-rsid="0b58818f"/>
    </style:style>
    <style:style style:name="P466" style:family="paragraph" style:parent-style-name="Text_20_body">
      <style:text-properties officeooo:rsid="0b5b01d4" officeooo:paragraph-rsid="0b5c5429"/>
    </style:style>
    <style:style style:name="P467" style:family="paragraph" style:parent-style-name="Text_20_body">
      <style:text-properties officeooo:rsid="0b5da5ba" officeooo:paragraph-rsid="0b5eed71"/>
    </style:style>
    <style:style style:name="P468" style:family="paragraph" style:parent-style-name="Text_20_body">
      <style:text-properties officeooo:rsid="0b5da5ba" officeooo:paragraph-rsid="0b6601f7"/>
    </style:style>
    <style:style style:name="P469" style:family="paragraph" style:parent-style-name="Text_20_body">
      <style:text-properties officeooo:rsid="0b5da5ba" officeooo:paragraph-rsid="0b679ff6"/>
    </style:style>
    <style:style style:name="P470" style:family="paragraph" style:parent-style-name="Text_20_body">
      <style:text-properties officeooo:rsid="0b5da5ba" officeooo:paragraph-rsid="0b699687"/>
    </style:style>
    <style:style style:name="P471" style:family="paragraph" style:parent-style-name="Text_20_body">
      <style:text-properties officeooo:rsid="0b5da5ba" officeooo:paragraph-rsid="0b6ab248"/>
    </style:style>
    <style:style style:name="P472" style:family="paragraph" style:parent-style-name="Text_20_body">
      <style:text-properties officeooo:rsid="0b5da5ba" officeooo:paragraph-rsid="0b6b5540"/>
    </style:style>
    <style:style style:name="P473" style:family="paragraph" style:parent-style-name="Text_20_body">
      <style:text-properties officeooo:rsid="0b5da5ba" officeooo:paragraph-rsid="0b6d923f"/>
    </style:style>
    <style:style style:name="P474" style:family="paragraph" style:parent-style-name="Text_20_body">
      <style:text-properties officeooo:rsid="0b679ff6" officeooo:paragraph-rsid="0b679ff6"/>
    </style:style>
    <style:style style:name="P475" style:family="paragraph" style:parent-style-name="Text_20_body">
      <style:text-properties officeooo:rsid="0b6b5540" officeooo:paragraph-rsid="0b6b5540"/>
    </style:style>
    <style:style style:name="P476" style:family="paragraph" style:parent-style-name="Text_20_body">
      <style:text-properties officeooo:rsid="0b6e33cf" officeooo:paragraph-rsid="0b6e33cf"/>
    </style:style>
    <style:style style:name="P477" style:family="paragraph" style:parent-style-name="Text_20_body">
      <style:text-properties officeooo:rsid="0b6e4975" officeooo:paragraph-rsid="0b6e4975"/>
    </style:style>
    <style:style style:name="P478" style:family="paragraph" style:parent-style-name="Text_20_body">
      <style:text-properties officeooo:rsid="0b73b669" officeooo:paragraph-rsid="0b73b669"/>
    </style:style>
    <style:style style:name="P479" style:family="paragraph" style:parent-style-name="Text_20_body">
      <style:text-properties officeooo:rsid="0b73b669" officeooo:paragraph-rsid="0b74979c"/>
    </style:style>
    <style:style style:name="P480" style:family="paragraph" style:parent-style-name="Text_20_body">
      <style:text-properties officeooo:rsid="0b77da5f" officeooo:paragraph-rsid="0b77da5f"/>
    </style:style>
    <style:style style:name="P481" style:family="paragraph" style:parent-style-name="Text_20_body">
      <style:text-properties officeooo:rsid="0b77da5f" officeooo:paragraph-rsid="0b78c039"/>
    </style:style>
    <style:style style:name="P482" style:family="paragraph" style:parent-style-name="Text_20_body">
      <style:text-properties officeooo:rsid="0b77da5f" officeooo:paragraph-rsid="0b7c2e50"/>
    </style:style>
    <style:style style:name="P483" style:family="paragraph" style:parent-style-name="Text_20_body">
      <style:text-properties officeooo:rsid="0b6d923f" officeooo:paragraph-rsid="0b6d923f"/>
    </style:style>
    <style:style style:name="P484" style:family="paragraph" style:parent-style-name="Text_20_body">
      <style:text-properties officeooo:rsid="0b714eac" officeooo:paragraph-rsid="0b714eac"/>
    </style:style>
    <style:style style:name="P485" style:family="paragraph" style:parent-style-name="Text_20_body">
      <style:text-properties officeooo:rsid="0b7e89b5" officeooo:paragraph-rsid="0b7e89b5"/>
    </style:style>
    <style:style style:name="P486" style:family="paragraph" style:parent-style-name="Text_20_body">
      <style:text-properties officeooo:rsid="0b7ffbbd" officeooo:paragraph-rsid="0b7ffbbd"/>
    </style:style>
    <style:style style:name="P487" style:family="paragraph" style:parent-style-name="Text_20_body">
      <style:text-properties officeooo:rsid="0b83a08f" officeooo:paragraph-rsid="0b83a08f"/>
    </style:style>
    <style:style style:name="P488" style:family="paragraph" style:parent-style-name="Text_20_body">
      <style:text-properties officeooo:rsid="0b8553b6" officeooo:paragraph-rsid="0b8553b6"/>
    </style:style>
    <style:style style:name="P489" style:family="paragraph" style:parent-style-name="Text_20_body">
      <style:text-properties officeooo:rsid="0b85c149" officeooo:paragraph-rsid="0b85c149"/>
    </style:style>
    <style:style style:name="P490" style:family="paragraph" style:parent-style-name="Text_20_body">
      <style:text-properties officeooo:rsid="0b80f717" officeooo:paragraph-rsid="0b80f717"/>
    </style:style>
    <style:style style:name="P491" style:family="paragraph" style:parent-style-name="Text_20_body">
      <style:text-properties officeooo:rsid="0b82b4cc" officeooo:paragraph-rsid="0b82b4cc"/>
    </style:style>
    <style:style style:name="P492" style:family="paragraph" style:parent-style-name="Text_20_body">
      <style:text-properties officeooo:rsid="0b871a7e" officeooo:paragraph-rsid="0b871a7e"/>
    </style:style>
    <style:style style:name="P493" style:family="paragraph" style:parent-style-name="Text_20_body">
      <style:text-properties officeooo:rsid="0b88b912" officeooo:paragraph-rsid="0b88b912"/>
    </style:style>
    <style:style style:name="P494" style:family="paragraph" style:parent-style-name="Text_20_body">
      <style:text-properties officeooo:rsid="0b88b912" officeooo:paragraph-rsid="0b88bac1"/>
    </style:style>
    <style:style style:name="P495" style:family="paragraph" style:parent-style-name="Text_20_body">
      <style:text-properties officeooo:rsid="0b8c69ad" officeooo:paragraph-rsid="0b8c69ad"/>
    </style:style>
    <style:style style:name="P496" style:family="paragraph" style:parent-style-name="Text_20_body">
      <style:text-properties officeooo:rsid="0b8c69ad" officeooo:paragraph-rsid="0b8f3939"/>
    </style:style>
    <style:style style:name="P497" style:family="paragraph" style:parent-style-name="Text_20_body">
      <style:text-properties officeooo:rsid="0b8f3939" officeooo:paragraph-rsid="0b8f3939"/>
    </style:style>
    <style:style style:name="P498" style:family="paragraph" style:parent-style-name="Text_20_body">
      <style:text-properties officeooo:rsid="0b8f3939" officeooo:paragraph-rsid="0ba98d16"/>
    </style:style>
    <style:style style:name="P499" style:family="paragraph" style:parent-style-name="Text_20_body">
      <style:text-properties officeooo:rsid="0b955826" officeooo:paragraph-rsid="0b955826"/>
    </style:style>
    <style:style style:name="P500" style:family="paragraph" style:parent-style-name="Text_20_body">
      <style:text-properties officeooo:rsid="0b916914" officeooo:paragraph-rsid="0b991b7a"/>
    </style:style>
    <style:style style:name="P501" style:family="paragraph" style:parent-style-name="Text_20_body">
      <style:text-properties officeooo:rsid="0b916914" officeooo:paragraph-rsid="0ba2179c"/>
    </style:style>
    <style:style style:name="P502" style:family="paragraph" style:parent-style-name="Text_20_body">
      <style:text-properties officeooo:rsid="0b991b7a" officeooo:paragraph-rsid="0b991b7a"/>
    </style:style>
    <style:style style:name="P503" style:family="paragraph" style:parent-style-name="Text_20_body">
      <style:text-properties officeooo:rsid="0b9976fd" officeooo:paragraph-rsid="0b9976fd"/>
    </style:style>
    <style:style style:name="P504" style:family="paragraph" style:parent-style-name="Text_20_body">
      <style:text-properties officeooo:rsid="0b9ca28e" officeooo:paragraph-rsid="0b9ca28e"/>
    </style:style>
    <style:style style:name="P505" style:family="paragraph" style:parent-style-name="Text_20_body">
      <style:text-properties officeooo:rsid="0b9ca28e" officeooo:paragraph-rsid="0b9dad3c"/>
    </style:style>
    <style:style style:name="P506" style:family="paragraph" style:parent-style-name="Text_20_body">
      <style:text-properties officeooo:rsid="0ba3a11d" officeooo:paragraph-rsid="0ba3a11d"/>
    </style:style>
    <style:style style:name="P507" style:family="paragraph" style:parent-style-name="Text_20_body">
      <style:text-properties officeooo:rsid="0ba2179c" officeooo:paragraph-rsid="0ba2179c"/>
    </style:style>
    <style:style style:name="P508" style:family="paragraph" style:parent-style-name="Text_20_body">
      <style:text-properties officeooo:rsid="0ba6d9f5" officeooo:paragraph-rsid="0ba6d9f5"/>
    </style:style>
    <style:style style:name="P509" style:family="paragraph" style:parent-style-name="Text_20_body">
      <style:text-properties officeooo:rsid="0ba98e30" officeooo:paragraph-rsid="0ba98e30"/>
    </style:style>
    <style:style style:name="P510" style:family="paragraph" style:parent-style-name="Text_20_body">
      <style:text-properties officeooo:rsid="0baa758e" officeooo:paragraph-rsid="0baa758e"/>
    </style:style>
    <style:style style:name="P511" style:family="paragraph" style:parent-style-name="Text_20_body">
      <style:text-properties officeooo:rsid="0baa758e" officeooo:paragraph-rsid="0bae3264"/>
    </style:style>
    <style:style style:name="P512" style:family="paragraph" style:parent-style-name="Text_20_body">
      <style:text-properties officeooo:rsid="0baa758e" officeooo:paragraph-rsid="0bafbbe7"/>
    </style:style>
    <style:style style:name="P513" style:family="paragraph" style:parent-style-name="Text_20_body">
      <style:text-properties officeooo:rsid="0ba7b31f" officeooo:paragraph-rsid="0ba7b31f"/>
    </style:style>
    <style:style style:name="P514" style:family="paragraph" style:parent-style-name="Text_20_body">
      <style:text-properties officeooo:rsid="0ba83efe" officeooo:paragraph-rsid="0ba83efe"/>
    </style:style>
    <style:style style:name="P515" style:family="paragraph" style:parent-style-name="Text_20_body">
      <style:text-properties officeooo:rsid="0ba98d16" officeooo:paragraph-rsid="0ba98d16"/>
    </style:style>
    <style:style style:name="P516" style:family="paragraph" style:parent-style-name="Text_20_body">
      <style:text-properties officeooo:rsid="0bade859" officeooo:paragraph-rsid="0bade859"/>
    </style:style>
    <style:style style:name="P517" style:family="paragraph" style:parent-style-name="Text_20_body">
      <style:text-properties officeooo:paragraph-rsid="0bafbbe7"/>
    </style:style>
    <style:style style:name="P518" style:family="paragraph" style:parent-style-name="Text_20_body">
      <style:text-properties officeooo:rsid="0bb4723a" officeooo:paragraph-rsid="0bb4723a"/>
    </style:style>
    <style:style style:name="P519" style:family="paragraph" style:parent-style-name="Text_20_body">
      <style:text-properties officeooo:rsid="0bb5d0a5" officeooo:paragraph-rsid="0bb66867"/>
    </style:style>
    <style:style style:name="P520" style:family="paragraph" style:parent-style-name="Text_20_body">
      <style:text-properties officeooo:paragraph-rsid="0bb66867"/>
    </style:style>
    <style:style style:name="P521" style:family="paragraph" style:parent-style-name="Text_20_body">
      <style:text-properties officeooo:rsid="0bb8bc00" officeooo:paragraph-rsid="0bca9a44"/>
    </style:style>
    <style:style style:name="P522" style:family="paragraph" style:parent-style-name="Text_20_body">
      <style:text-properties officeooo:rsid="0bb8bc00" officeooo:paragraph-rsid="0bcb49e6"/>
    </style:style>
    <style:style style:name="P523" style:family="paragraph" style:parent-style-name="Text_20_body">
      <style:text-properties officeooo:rsid="0bae961e" officeooo:paragraph-rsid="0bae961e"/>
    </style:style>
    <style:style style:name="P524" style:family="paragraph" style:parent-style-name="Text_20_body">
      <style:text-properties officeooo:rsid="0bd71542" officeooo:paragraph-rsid="0bd71542"/>
    </style:style>
    <style:style style:name="P525" style:family="paragraph" style:parent-style-name="Text_20_body">
      <style:text-properties officeooo:rsid="0bd79bc4" officeooo:paragraph-rsid="0bd79bc4"/>
    </style:style>
    <style:style style:name="P526" style:family="paragraph" style:parent-style-name="Text_20_body">
      <style:text-properties officeooo:rsid="0bd8cd12" officeooo:paragraph-rsid="0bd8cd12"/>
    </style:style>
    <style:style style:name="P527" style:family="paragraph" style:parent-style-name="Text_20_body">
      <style:text-properties officeooo:rsid="0bd9095c" officeooo:paragraph-rsid="0bd9095c"/>
    </style:style>
    <style:style style:name="P528" style:family="paragraph" style:parent-style-name="Text_20_body">
      <style:text-properties officeooo:rsid="0bd9095c" officeooo:paragraph-rsid="0bdaa443"/>
    </style:style>
    <style:style style:name="P529" style:family="paragraph" style:parent-style-name="Text_20_body">
      <style:text-properties officeooo:rsid="0bd9095c" officeooo:paragraph-rsid="0bdee685"/>
    </style:style>
    <style:style style:name="P530" style:family="paragraph" style:parent-style-name="Text_20_body">
      <style:text-properties officeooo:rsid="0bd9095c" officeooo:paragraph-rsid="0be5244e"/>
    </style:style>
    <style:style style:name="P531" style:family="paragraph" style:parent-style-name="Text_20_body">
      <style:text-properties officeooo:rsid="0bdc7a31" officeooo:paragraph-rsid="0bdc7a31"/>
    </style:style>
    <style:style style:name="P532" style:family="paragraph" style:parent-style-name="Text_20_body">
      <style:text-properties officeooo:rsid="0bdf22b5" officeooo:paragraph-rsid="0bdf22b5"/>
    </style:style>
    <style:style style:name="P533" style:family="paragraph" style:parent-style-name="Text_20_body">
      <style:text-properties officeooo:rsid="0be5b213" officeooo:paragraph-rsid="0be5b213"/>
    </style:style>
    <style:style style:name="P534" style:family="paragraph" style:parent-style-name="Text_20_body">
      <style:text-properties officeooo:rsid="0bde28fc" officeooo:paragraph-rsid="0bde28fc"/>
    </style:style>
    <style:style style:name="P535" style:family="paragraph" style:parent-style-name="Text_20_body">
      <style:text-properties officeooo:rsid="0bdee685" officeooo:paragraph-rsid="0bdee685"/>
    </style:style>
    <style:style style:name="P536" style:family="paragraph" style:parent-style-name="Text_20_body">
      <style:text-properties officeooo:rsid="0be5244e" officeooo:paragraph-rsid="0be5244e"/>
    </style:style>
    <style:style style:name="P537" style:family="paragraph" style:parent-style-name="Text_20_body">
      <style:text-properties officeooo:paragraph-rsid="0be9fca1"/>
    </style:style>
    <style:style style:name="P538" style:family="paragraph" style:parent-style-name="Text_20_body">
      <style:text-properties officeooo:paragraph-rsid="0bed0758"/>
    </style:style>
    <style:style style:name="P539" style:family="paragraph" style:parent-style-name="Text_20_body">
      <style:text-properties officeooo:rsid="0bedfea1" officeooo:paragraph-rsid="0bedfea1"/>
    </style:style>
    <style:style style:name="P540" style:family="paragraph" style:parent-style-name="Text_20_body">
      <style:text-properties officeooo:rsid="0bedfea1" officeooo:paragraph-rsid="0bee7f23"/>
    </style:style>
    <style:style style:name="P541" style:family="paragraph" style:parent-style-name="Text_20_body">
      <style:text-properties officeooo:rsid="0bf0fe31" officeooo:paragraph-rsid="0bf1092c"/>
    </style:style>
    <style:style style:name="P542" style:family="paragraph" style:parent-style-name="Text_20_body">
      <style:text-properties officeooo:rsid="0beb751c" officeooo:paragraph-rsid="0beb751c"/>
    </style:style>
    <style:style style:name="P543" style:family="paragraph" style:parent-style-name="Text_20_body">
      <style:text-properties officeooo:rsid="0bf1092c" officeooo:paragraph-rsid="0bf1092c"/>
    </style:style>
    <style:style style:name="P544" style:family="paragraph" style:parent-style-name="Text_20_body">
      <style:text-properties officeooo:rsid="0bf116bb" officeooo:paragraph-rsid="0bf116bb"/>
    </style:style>
    <style:style style:name="P545" style:family="paragraph" style:parent-style-name="Text_20_body">
      <style:text-properties officeooo:rsid="0bf43be7" officeooo:paragraph-rsid="0bf43be7"/>
    </style:style>
    <style:style style:name="P546" style:family="paragraph" style:parent-style-name="Text_20_body">
      <style:text-properties officeooo:paragraph-rsid="0bfbed9a"/>
    </style:style>
    <style:style style:name="P547" style:family="paragraph" style:parent-style-name="Text_20_body">
      <style:text-properties officeooo:rsid="0bfe9067" officeooo:paragraph-rsid="0bfe9067"/>
    </style:style>
    <style:style style:name="P548" style:family="paragraph" style:parent-style-name="Text_20_body">
      <style:text-properties officeooo:paragraph-rsid="0bff5c0f"/>
    </style:style>
    <style:style style:name="P549" style:family="paragraph" style:parent-style-name="Text_20_body">
      <style:text-properties officeooo:paragraph-rsid="0c080865"/>
    </style:style>
    <style:style style:name="P550" style:family="paragraph" style:parent-style-name="Text_20_body">
      <style:text-properties officeooo:rsid="0c0d0e4b" officeooo:paragraph-rsid="0c0d0e4b"/>
    </style:style>
    <style:style style:name="P551" style:family="paragraph" style:parent-style-name="Text_20_body">
      <style:text-properties officeooo:rsid="0c080865" officeooo:paragraph-rsid="0c080865"/>
    </style:style>
    <style:style style:name="P552" style:family="paragraph" style:parent-style-name="Text_20_body">
      <style:text-properties officeooo:rsid="0c08f42f" officeooo:paragraph-rsid="0c08f42f"/>
    </style:style>
    <style:style style:name="P553" style:family="paragraph" style:parent-style-name="Text_20_body">
      <style:text-properties officeooo:rsid="0c0e8f5b" officeooo:paragraph-rsid="0c1000ab"/>
    </style:style>
    <style:style style:name="P554" style:family="paragraph" style:parent-style-name="Text_20_body">
      <style:text-properties officeooo:rsid="0c11cfb7" officeooo:paragraph-rsid="0c1304b5"/>
    </style:style>
    <style:style style:name="P555" style:family="paragraph" style:parent-style-name="Text_20_body">
      <style:text-properties officeooo:paragraph-rsid="0c147809"/>
    </style:style>
    <style:style style:name="P556" style:family="paragraph" style:parent-style-name="Text_20_body">
      <style:text-properties officeooo:paragraph-rsid="0c16a5a2"/>
    </style:style>
    <style:style style:name="P557" style:family="paragraph" style:parent-style-name="Text_20_body">
      <style:text-properties officeooo:paragraph-rsid="0c1a9de1"/>
    </style:style>
    <style:style style:name="P558" style:family="paragraph" style:parent-style-name="Text_20_body">
      <style:text-properties officeooo:rsid="0c1000ab" officeooo:paragraph-rsid="0c1000ab"/>
    </style:style>
    <style:style style:name="P559" style:family="paragraph" style:parent-style-name="Text_20_body">
      <style:text-properties officeooo:rsid="0c1304b5" officeooo:paragraph-rsid="0c147809"/>
    </style:style>
    <style:style style:name="P560" style:family="paragraph" style:parent-style-name="Text_20_body">
      <style:text-properties officeooo:rsid="0c1867cf" officeooo:paragraph-rsid="0c1867cf"/>
    </style:style>
    <style:style style:name="P561" style:family="paragraph" style:parent-style-name="Text_20_body">
      <style:text-properties officeooo:paragraph-rsid="0c1b026d"/>
    </style:style>
    <style:style style:name="P562" style:family="paragraph" style:parent-style-name="Text_20_body">
      <style:text-properties officeooo:rsid="0c1dfae5" officeooo:paragraph-rsid="0c1dfae5"/>
    </style:style>
    <style:style style:name="P563" style:family="paragraph" style:parent-style-name="Text_20_body">
      <style:text-properties officeooo:rsid="0c1dfae5" officeooo:paragraph-rsid="0c21be48"/>
    </style:style>
    <style:style style:name="P564" style:family="paragraph" style:parent-style-name="Text_20_body">
      <style:text-properties officeooo:rsid="0c1dfae5" officeooo:paragraph-rsid="0c294e7e"/>
    </style:style>
    <style:style style:name="P565" style:family="paragraph" style:parent-style-name="Text_20_body">
      <style:text-properties officeooo:rsid="0c1dfae5" officeooo:paragraph-rsid="0c2f9969"/>
    </style:style>
    <style:style style:name="P566" style:family="paragraph" style:parent-style-name="Text_20_body">
      <style:text-properties officeooo:rsid="0c1dfae5" officeooo:paragraph-rsid="0c30e581"/>
    </style:style>
    <style:style style:name="P567" style:family="paragraph" style:parent-style-name="Text_20_body">
      <style:text-properties officeooo:rsid="0c2580fd" officeooo:paragraph-rsid="0c2580fd"/>
    </style:style>
    <style:style style:name="P568" style:family="paragraph" style:parent-style-name="Text_20_body">
      <style:text-properties officeooo:rsid="0c1ca390" officeooo:paragraph-rsid="0c1b026d"/>
    </style:style>
    <style:style style:name="P569" style:family="paragraph" style:parent-style-name="Text_20_body">
      <style:text-properties officeooo:rsid="0c1f54b7" officeooo:paragraph-rsid="0c1f54b7"/>
    </style:style>
    <style:style style:name="P570" style:family="paragraph" style:parent-style-name="Text_20_body">
      <style:text-properties officeooo:rsid="0c20b81f" officeooo:paragraph-rsid="0c20b81f"/>
    </style:style>
    <style:style style:name="P571" style:family="paragraph" style:parent-style-name="Text_20_body">
      <style:text-properties officeooo:rsid="0c2dbc48" officeooo:paragraph-rsid="0c2dbc48"/>
    </style:style>
    <style:style style:name="P572" style:family="paragraph" style:parent-style-name="Text_20_body">
      <style:text-properties officeooo:paragraph-rsid="0c34afab"/>
    </style:style>
    <style:style style:name="P573" style:family="paragraph" style:parent-style-name="Text_20_body">
      <style:text-properties officeooo:rsid="0c35b2b2" officeooo:paragraph-rsid="0c35b2b2"/>
    </style:style>
    <style:style style:name="P574" style:family="paragraph" style:parent-style-name="Text_20_body">
      <style:text-properties officeooo:rsid="0c36dfc3" officeooo:paragraph-rsid="0c36dfc3"/>
    </style:style>
    <style:style style:name="P575" style:family="paragraph" style:parent-style-name="Text_20_body">
      <style:text-properties officeooo:rsid="0c36dfc3" officeooo:paragraph-rsid="0c3e1118"/>
    </style:style>
    <style:style style:name="P576" style:family="paragraph" style:parent-style-name="Text_20_body">
      <style:text-properties officeooo:paragraph-rsid="0c3b477b"/>
    </style:style>
    <style:style style:name="P577" style:family="paragraph" style:parent-style-name="Text_20_body">
      <style:text-properties officeooo:paragraph-rsid="0c3e1118"/>
    </style:style>
    <style:style style:name="P578" style:family="paragraph" style:parent-style-name="Text_20_body">
      <style:text-properties officeooo:rsid="0c2f9969" officeooo:paragraph-rsid="0c2f9969"/>
    </style:style>
    <style:style style:name="P579" style:family="paragraph" style:parent-style-name="Text_20_body">
      <style:text-properties officeooo:rsid="0c3e1118" officeooo:paragraph-rsid="0c3e1118"/>
    </style:style>
    <style:style style:name="P580" style:family="paragraph" style:parent-style-name="Text_20_body">
      <style:text-properties officeooo:paragraph-rsid="0c3f2ef6"/>
    </style:style>
    <style:style style:name="P581" style:family="paragraph" style:parent-style-name="Text_20_body">
      <style:text-properties officeooo:paragraph-rsid="0c41842a"/>
    </style:style>
    <style:style style:name="P582" style:family="paragraph" style:parent-style-name="Text_20_body">
      <style:text-properties officeooo:paragraph-rsid="0c436ee0"/>
    </style:style>
    <style:style style:name="P583" style:family="paragraph" style:parent-style-name="Text_20_body">
      <style:text-properties officeooo:paragraph-rsid="0c490264"/>
    </style:style>
    <style:style style:name="P584" style:family="paragraph" style:parent-style-name="Text_20_body">
      <style:text-properties officeooo:rsid="0c41fb2a" officeooo:paragraph-rsid="0c4583e6"/>
    </style:style>
    <style:style style:name="P585" style:family="paragraph" style:parent-style-name="Text_20_body">
      <style:text-properties officeooo:rsid="0c42c9a4" officeooo:paragraph-rsid="0c470acb"/>
    </style:style>
    <style:style style:name="P586" style:family="paragraph" style:parent-style-name="Text_20_body">
      <style:text-properties officeooo:rsid="0c42c9a4" officeooo:paragraph-rsid="0c42c9a4"/>
    </style:style>
    <style:style style:name="P587" style:family="paragraph" style:parent-style-name="Text_20_body">
      <style:text-properties officeooo:rsid="0c4b953d" officeooo:paragraph-rsid="0c4b953d"/>
    </style:style>
    <style:style style:name="P588" style:family="paragraph" style:parent-style-name="Text_20_body">
      <style:text-properties officeooo:rsid="0c4e213b" officeooo:paragraph-rsid="0c4e213b"/>
    </style:style>
    <style:style style:name="P589" style:family="paragraph" style:parent-style-name="Text_20_body">
      <style:text-properties officeooo:rsid="0c4e213b" officeooo:paragraph-rsid="0c4eb91e"/>
    </style:style>
    <style:style style:name="P590" style:family="paragraph" style:parent-style-name="Text_20_body">
      <style:text-properties officeooo:rsid="0c4e213b" officeooo:paragraph-rsid="0c4fd647"/>
    </style:style>
    <style:style style:name="P591" style:family="paragraph" style:parent-style-name="Text_20_body">
      <style:text-properties officeooo:rsid="0c4e213b" officeooo:paragraph-rsid="0c505cfc"/>
    </style:style>
    <style:style style:name="P592" style:family="paragraph" style:parent-style-name="Text_20_body">
      <style:text-properties officeooo:rsid="0c4e213b" officeooo:paragraph-rsid="0c521aef"/>
    </style:style>
    <style:style style:name="P593" style:family="paragraph" style:parent-style-name="Text_20_body">
      <style:text-properties officeooo:rsid="0c4e213b" officeooo:paragraph-rsid="0c558885"/>
    </style:style>
    <style:style style:name="P594" style:family="paragraph" style:parent-style-name="Text_20_body">
      <style:text-properties officeooo:rsid="0c4d1bff" officeooo:paragraph-rsid="0c4d1bff"/>
    </style:style>
    <style:style style:name="P595" style:family="paragraph" style:parent-style-name="Text_20_body">
      <style:text-properties officeooo:rsid="0c4eb91e" officeooo:paragraph-rsid="0c4eb91e"/>
    </style:style>
    <style:style style:name="P596" style:family="paragraph" style:parent-style-name="Text_20_body">
      <style:text-properties officeooo:rsid="0c4fd647" officeooo:paragraph-rsid="0c4fd647"/>
    </style:style>
    <style:style style:name="P597" style:family="paragraph" style:parent-style-name="Text_20_body">
      <style:text-properties officeooo:rsid="0c505cfc" officeooo:paragraph-rsid="0c505cfc"/>
    </style:style>
    <style:style style:name="P598" style:family="paragraph" style:parent-style-name="Text_20_body">
      <style:text-properties officeooo:paragraph-rsid="0c57ccba"/>
    </style:style>
    <style:style style:name="P599" style:family="paragraph" style:parent-style-name="Text_20_body">
      <style:text-properties officeooo:paragraph-rsid="0c558885"/>
    </style:style>
    <style:style style:name="P600" style:family="paragraph" style:parent-style-name="Text_20_body">
      <style:text-properties officeooo:rsid="0c5ad0a2" officeooo:paragraph-rsid="0c5ad0a2"/>
    </style:style>
    <style:style style:name="P601" style:family="paragraph" style:parent-style-name="Text_20_body">
      <style:text-properties officeooo:rsid="0c5ad0a2" officeooo:paragraph-rsid="0c5ec9dd"/>
    </style:style>
    <style:style style:name="P602" style:family="paragraph" style:parent-style-name="Text_20_body">
      <style:text-properties officeooo:rsid="0c5ad0a2" officeooo:paragraph-rsid="0c6087c7"/>
    </style:style>
    <style:style style:name="P603" style:family="paragraph" style:parent-style-name="Text_20_body">
      <style:text-properties officeooo:rsid="0c5ad0a2" officeooo:paragraph-rsid="0c647eb6"/>
    </style:style>
    <style:style style:name="P604" style:family="paragraph" style:parent-style-name="Text_20_body">
      <style:text-properties officeooo:rsid="0c6087c7" officeooo:paragraph-rsid="0c6087c7"/>
    </style:style>
    <style:style style:name="P605" style:family="paragraph" style:parent-style-name="Text_20_body">
      <style:text-properties officeooo:rsid="0c62354b" officeooo:paragraph-rsid="0c62354b"/>
    </style:style>
    <style:style style:name="P606" style:family="paragraph" style:parent-style-name="Text_20_body">
      <style:text-properties officeooo:rsid="0c636708" officeooo:paragraph-rsid="0c636708"/>
    </style:style>
    <style:style style:name="P607" style:family="paragraph" style:parent-style-name="Text_20_body">
      <style:text-properties officeooo:paragraph-rsid="0c663960"/>
    </style:style>
    <style:style style:name="P608" style:family="paragraph" style:parent-style-name="Text_20_body">
      <style:text-properties officeooo:paragraph-rsid="0c679de5"/>
    </style:style>
    <style:style style:name="P609" style:family="paragraph" style:parent-style-name="Text_20_body">
      <style:text-properties officeooo:rsid="0c6bb329" officeooo:paragraph-rsid="0c6bb329"/>
    </style:style>
    <style:style style:name="P610" style:family="paragraph" style:parent-style-name="Text_20_body">
      <style:text-properties officeooo:rsid="0c6e8a2a" officeooo:paragraph-rsid="0c6fb564"/>
    </style:style>
    <style:style style:name="P611" style:family="paragraph" style:parent-style-name="Text_20_body">
      <style:text-properties officeooo:rsid="0c6e8a2a" officeooo:paragraph-rsid="0c71d97a"/>
    </style:style>
    <style:style style:name="P612" style:family="paragraph" style:parent-style-name="Text_20_body">
      <style:text-properties officeooo:rsid="0c72b88e" officeooo:paragraph-rsid="0c72b88e"/>
    </style:style>
    <style:style style:name="P613" style:family="paragraph" style:parent-style-name="Text_20_body">
      <style:text-properties officeooo:rsid="0c741ab4" officeooo:paragraph-rsid="0c741ab4"/>
    </style:style>
    <style:style style:name="P614" style:family="paragraph" style:parent-style-name="Text_20_body">
      <style:text-properties officeooo:rsid="0c741ab4" officeooo:paragraph-rsid="0c763d61"/>
    </style:style>
    <style:style style:name="P615" style:family="paragraph" style:parent-style-name="Text_20_body">
      <style:text-properties officeooo:rsid="0c72aad6" officeooo:paragraph-rsid="0c72aad6"/>
    </style:style>
    <style:style style:name="P616" style:family="paragraph" style:parent-style-name="Text_20_body">
      <style:text-properties officeooo:rsid="0c72abd6" officeooo:paragraph-rsid="0c72abd6"/>
    </style:style>
    <style:style style:name="P617" style:family="paragraph" style:parent-style-name="Text_20_body">
      <style:text-properties officeooo:rsid="0c7b8f62" officeooo:paragraph-rsid="0c7b8f62"/>
    </style:style>
    <style:style style:name="P618" style:family="paragraph" style:parent-style-name="Text_20_body">
      <style:text-properties officeooo:rsid="0c7de288" officeooo:paragraph-rsid="0c7de288"/>
    </style:style>
    <style:style style:name="P619" style:family="paragraph" style:parent-style-name="Text_20_body">
      <style:text-properties officeooo:rsid="0c7fc70f" officeooo:paragraph-rsid="0c7fc70f"/>
    </style:style>
    <style:style style:name="P620" style:family="paragraph" style:parent-style-name="Text_20_body">
      <style:text-properties officeooo:rsid="0c8161dc" officeooo:paragraph-rsid="0c8161dc"/>
    </style:style>
    <style:style style:name="P621" style:family="paragraph" style:parent-style-name="Text_20_body">
      <style:text-properties officeooo:paragraph-rsid="0c866d0d"/>
    </style:style>
    <style:style style:name="P622" style:family="paragraph" style:parent-style-name="Text_20_body">
      <style:text-properties officeooo:rsid="0c866d0d" officeooo:paragraph-rsid="0c866d0d"/>
    </style:style>
    <style:style style:name="P623" style:family="paragraph" style:parent-style-name="Text_20_body">
      <style:text-properties officeooo:rsid="0c884fd7" officeooo:paragraph-rsid="0c884fd7"/>
    </style:style>
    <style:style style:name="P624" style:family="paragraph" style:parent-style-name="Text_20_body">
      <style:text-properties officeooo:rsid="0c897046" officeooo:paragraph-rsid="0c897495"/>
    </style:style>
    <style:style style:name="P625" style:family="paragraph" style:parent-style-name="Text_20_body">
      <style:text-properties officeooo:rsid="0c897046" officeooo:paragraph-rsid="0c8a8749"/>
    </style:style>
    <style:style style:name="P626" style:family="paragraph" style:parent-style-name="Text_20_body">
      <style:text-properties officeooo:rsid="0c8e3500" officeooo:paragraph-rsid="0c8e3500"/>
    </style:style>
    <style:style style:name="P627" style:family="paragraph" style:parent-style-name="Text_20_body">
      <style:text-properties officeooo:rsid="0c8fc4d5" officeooo:paragraph-rsid="0c8fc4d5"/>
    </style:style>
    <style:style style:name="P628" style:family="paragraph" style:parent-style-name="Text_20_body">
      <style:text-properties officeooo:rsid="0c8fc4d5" officeooo:paragraph-rsid="0c8e3500"/>
    </style:style>
    <style:style style:name="P629" style:family="paragraph" style:parent-style-name="Text_20_body">
      <style:text-properties officeooo:paragraph-rsid="0c914a8e"/>
    </style:style>
    <style:style style:name="P630" style:family="paragraph" style:parent-style-name="Text_20_body">
      <style:text-properties officeooo:paragraph-rsid="0c95f242"/>
    </style:style>
    <style:style style:name="P631" style:family="paragraph" style:parent-style-name="Text_20_body">
      <style:text-properties officeooo:rsid="0c8a8749" officeooo:paragraph-rsid="0c8a8749"/>
    </style:style>
    <style:style style:name="P632" style:family="paragraph" style:parent-style-name="Text_20_body">
      <style:text-properties officeooo:paragraph-rsid="0c984091"/>
    </style:style>
    <style:style style:name="P633" style:family="paragraph" style:parent-style-name="Text_20_body">
      <style:text-properties officeooo:rsid="0c9a618f" officeooo:paragraph-rsid="0c9a618f"/>
    </style:style>
    <style:style style:name="P634" style:family="paragraph" style:parent-style-name="Text_20_body">
      <style:text-properties officeooo:rsid="0c9a618f" officeooo:paragraph-rsid="0c9d2138"/>
    </style:style>
    <style:style style:name="P635" style:family="paragraph" style:parent-style-name="Text_20_body">
      <style:text-properties officeooo:rsid="0c9c05ec" officeooo:paragraph-rsid="0c9c05ec"/>
    </style:style>
    <style:style style:name="P636" style:family="paragraph" style:parent-style-name="Text_20_body">
      <style:text-properties officeooo:rsid="0c9e0bd8" officeooo:paragraph-rsid="0c9e0bd8"/>
    </style:style>
    <style:style style:name="P637" style:family="paragraph" style:parent-style-name="Text_20_body">
      <style:text-properties officeooo:rsid="0c9f1c44" officeooo:paragraph-rsid="0c9fb04e"/>
    </style:style>
    <style:style style:name="P638" style:family="paragraph" style:parent-style-name="Text_20_body">
      <style:text-properties officeooo:paragraph-rsid="0ca38a77"/>
    </style:style>
    <style:style style:name="P639" style:family="paragraph" style:parent-style-name="Text_20_body">
      <style:text-properties officeooo:paragraph-rsid="0ca422a5"/>
    </style:style>
    <style:style style:name="P640" style:family="paragraph" style:parent-style-name="Text_20_body">
      <style:text-properties officeooo:rsid="0ca1213b" officeooo:paragraph-rsid="0ca1213b"/>
    </style:style>
    <style:style style:name="P641" style:family="paragraph" style:parent-style-name="Text_20_body">
      <style:text-properties officeooo:rsid="0ca21e8e" officeooo:paragraph-rsid="0ca21e8e"/>
    </style:style>
    <style:style style:name="P642" style:family="paragraph" style:parent-style-name="Text_20_body">
      <style:text-properties officeooo:rsid="0ca422a5" officeooo:paragraph-rsid="0ca422a5"/>
    </style:style>
    <style:style style:name="P643" style:family="paragraph" style:parent-style-name="Text_20_body">
      <style:text-properties officeooo:paragraph-rsid="0ca5778a"/>
    </style:style>
    <style:style style:name="P644" style:family="paragraph" style:parent-style-name="Text_20_body">
      <style:text-properties officeooo:rsid="0ca76207" officeooo:paragraph-rsid="0ca76207"/>
    </style:style>
    <style:style style:name="P645" style:family="paragraph" style:parent-style-name="Text_20_body">
      <style:text-properties officeooo:rsid="0ca7d2de" officeooo:paragraph-rsid="0ca7d2de"/>
    </style:style>
    <style:style style:name="P646" style:family="paragraph" style:parent-style-name="Text_20_body">
      <style:text-properties officeooo:rsid="0cab2097" officeooo:paragraph-rsid="0cab2097"/>
    </style:style>
    <style:style style:name="P647" style:family="paragraph" style:parent-style-name="Text_20_body">
      <style:text-properties officeooo:rsid="0cab2097" officeooo:paragraph-rsid="0cde1a9a"/>
    </style:style>
    <style:style style:name="P648" style:family="paragraph" style:parent-style-name="Text_20_body">
      <style:text-properties officeooo:rsid="0cab2097" officeooo:paragraph-rsid="0cdf7694"/>
    </style:style>
    <style:style style:name="P649" style:family="paragraph" style:parent-style-name="Text_20_body">
      <style:text-properties officeooo:rsid="0cac78d1" officeooo:paragraph-rsid="0cac78d1"/>
    </style:style>
    <style:style style:name="P650" style:family="paragraph" style:parent-style-name="Text_20_body">
      <style:text-properties officeooo:rsid="0ca9cc09" officeooo:paragraph-rsid="0ca9cc09"/>
    </style:style>
    <style:style style:name="P651" style:family="paragraph" style:parent-style-name="Text_20_body">
      <style:text-properties officeooo:rsid="0caef55e" officeooo:paragraph-rsid="0caef55e"/>
    </style:style>
    <style:style style:name="P652" style:family="paragraph" style:parent-style-name="Text_20_body">
      <style:text-properties officeooo:rsid="0caf0680" officeooo:paragraph-rsid="0caf0680"/>
    </style:style>
    <style:style style:name="P653" style:family="paragraph" style:parent-style-name="Text_20_body">
      <style:text-properties officeooo:rsid="0cb19997" officeooo:paragraph-rsid="0cb19997"/>
    </style:style>
    <style:style style:name="P654" style:family="paragraph" style:parent-style-name="Text_20_body">
      <style:text-properties officeooo:rsid="0cb4ee59" officeooo:paragraph-rsid="0cb4ee59"/>
    </style:style>
    <style:style style:name="P655" style:family="paragraph" style:parent-style-name="Text_20_body">
      <style:text-properties officeooo:rsid="0cb81866" officeooo:paragraph-rsid="0cb83200"/>
    </style:style>
    <style:style style:name="P656" style:family="paragraph" style:parent-style-name="Text_20_body">
      <style:text-properties officeooo:rsid="0cb81866" officeooo:paragraph-rsid="0cb90fe8"/>
    </style:style>
    <style:style style:name="P657" style:family="paragraph" style:parent-style-name="Text_20_body">
      <style:text-properties officeooo:rsid="0cb056ec" officeooo:paragraph-rsid="0cb056ec"/>
    </style:style>
    <style:style style:name="P658" style:family="paragraph" style:parent-style-name="Text_20_body">
      <style:text-properties officeooo:rsid="0cb83200" officeooo:paragraph-rsid="0cb83200"/>
    </style:style>
    <style:style style:name="P659" style:family="paragraph" style:parent-style-name="Text_20_body">
      <style:text-properties officeooo:rsid="0cbc1668" officeooo:paragraph-rsid="0cbc1668"/>
    </style:style>
    <style:style style:name="P660" style:family="paragraph" style:parent-style-name="Text_20_body">
      <style:text-properties officeooo:rsid="0cbc6abb" officeooo:paragraph-rsid="0cbc6abb"/>
    </style:style>
    <style:style style:name="P661" style:family="paragraph" style:parent-style-name="Text_20_body">
      <style:text-properties officeooo:rsid="0cb90fe8" officeooo:paragraph-rsid="0cb90fe8"/>
    </style:style>
    <style:style style:name="P662" style:family="paragraph" style:parent-style-name="Text_20_body">
      <style:text-properties officeooo:rsid="0cbabcbb" officeooo:paragraph-rsid="0cbabcbb"/>
    </style:style>
    <style:style style:name="P663" style:family="paragraph" style:parent-style-name="Text_20_body">
      <style:text-properties officeooo:rsid="0cc27835" officeooo:paragraph-rsid="0cc27835"/>
    </style:style>
    <style:style style:name="P664" style:family="paragraph" style:parent-style-name="Text_20_body">
      <style:text-properties officeooo:rsid="0cc2c714" officeooo:paragraph-rsid="0cc2c714"/>
    </style:style>
    <style:style style:name="P665" style:family="paragraph" style:parent-style-name="Text_20_body">
      <style:text-properties officeooo:rsid="0cc34098" officeooo:paragraph-rsid="0cc4a748"/>
    </style:style>
    <style:style style:name="P666" style:family="paragraph" style:parent-style-name="Text_20_body">
      <style:text-properties officeooo:paragraph-rsid="0cc9b203"/>
    </style:style>
    <style:style style:name="P667" style:family="paragraph" style:parent-style-name="Text_20_body">
      <style:text-properties officeooo:rsid="0cc6383d" officeooo:paragraph-rsid="0cc67eb1"/>
    </style:style>
    <style:style style:name="P668" style:family="paragraph" style:parent-style-name="Text_20_body">
      <style:text-properties officeooo:rsid="0cc85890" officeooo:paragraph-rsid="0cc9b203"/>
    </style:style>
    <style:style style:name="P669" style:family="paragraph" style:parent-style-name="Text_20_body">
      <style:text-properties officeooo:rsid="0cc9b203" officeooo:paragraph-rsid="0cc9b203"/>
    </style:style>
    <style:style style:name="P670" style:family="paragraph" style:parent-style-name="Text_20_body">
      <style:text-properties officeooo:paragraph-rsid="0ccb106a"/>
    </style:style>
    <style:style style:name="P671" style:family="paragraph" style:parent-style-name="Text_20_body">
      <style:text-properties officeooo:paragraph-rsid="0ccd0917"/>
    </style:style>
    <style:style style:name="P672" style:family="paragraph" style:parent-style-name="Text_20_body">
      <style:text-properties officeooo:rsid="0ccf9f5c" officeooo:paragraph-rsid="0ccf9f5c"/>
    </style:style>
    <style:style style:name="P673" style:family="paragraph" style:parent-style-name="Text_20_body">
      <style:text-properties officeooo:rsid="0ccf9f5c" officeooo:paragraph-rsid="0cd02269"/>
    </style:style>
    <style:style style:name="P674" style:family="paragraph" style:parent-style-name="Text_20_body">
      <style:text-properties officeooo:rsid="0ccb106a" officeooo:paragraph-rsid="0ccb106a"/>
    </style:style>
    <style:style style:name="P675" style:family="paragraph" style:parent-style-name="Text_20_body">
      <style:text-properties officeooo:rsid="0cd02269" officeooo:paragraph-rsid="0cd02269"/>
    </style:style>
    <style:style style:name="P676" style:family="paragraph" style:parent-style-name="Text_20_body">
      <style:text-properties officeooo:rsid="0cd244d9" officeooo:paragraph-rsid="0cd244d9"/>
    </style:style>
    <style:style style:name="P677" style:family="paragraph" style:parent-style-name="Text_20_body">
      <style:text-properties officeooo:rsid="0cd42c2c" officeooo:paragraph-rsid="0cd42c2c"/>
    </style:style>
    <style:style style:name="P678" style:family="paragraph" style:parent-style-name="Text_20_body">
      <style:text-properties officeooo:rsid="0cd448b2" officeooo:paragraph-rsid="0cd448b2"/>
    </style:style>
    <style:style style:name="P679" style:family="paragraph" style:parent-style-name="Text_20_body">
      <style:text-properties officeooo:rsid="0cd87585" officeooo:paragraph-rsid="0cd87585"/>
    </style:style>
    <style:style style:name="P680" style:family="paragraph" style:parent-style-name="Text_20_body">
      <style:text-properties officeooo:rsid="0cd05238" officeooo:paragraph-rsid="0cd1d5f9"/>
    </style:style>
    <style:style style:name="P681" style:family="paragraph" style:parent-style-name="Text_20_body">
      <style:text-properties officeooo:rsid="0cda0806" officeooo:paragraph-rsid="0cda0806"/>
    </style:style>
    <style:style style:name="P682" style:family="paragraph" style:parent-style-name="Text_20_body">
      <style:text-properties officeooo:rsid="0cdb35bb" officeooo:paragraph-rsid="0cdb35bb"/>
    </style:style>
    <style:style style:name="P683" style:family="paragraph" style:parent-style-name="Text_20_body">
      <style:text-properties officeooo:rsid="0cde1a9a" officeooo:paragraph-rsid="0cde1a9a"/>
    </style:style>
    <style:style style:name="P684" style:family="paragraph" style:parent-style-name="Text_20_body">
      <style:text-properties officeooo:rsid="0ce160c5" officeooo:paragraph-rsid="0ce160c5"/>
    </style:style>
    <style:style style:name="P685" style:family="paragraph" style:parent-style-name="Text_20_body">
      <style:text-properties officeooo:rsid="0ce160c5" officeooo:paragraph-rsid="0ce17bed"/>
    </style:style>
    <style:style style:name="P686" style:family="paragraph" style:parent-style-name="Text_20_body">
      <style:text-properties officeooo:rsid="0ce18bda" officeooo:paragraph-rsid="0ce4e533"/>
    </style:style>
    <style:style style:name="P687" style:family="paragraph" style:parent-style-name="Text_20_body">
      <style:text-properties officeooo:rsid="0ce18bda" officeooo:paragraph-rsid="0ce5ba39"/>
    </style:style>
    <style:style style:name="P688" style:family="paragraph" style:parent-style-name="Text_20_body">
      <style:text-properties officeooo:rsid="0ce18bda" officeooo:paragraph-rsid="0ce74aae"/>
    </style:style>
    <style:style style:name="P689" style:family="paragraph" style:parent-style-name="Text_20_body">
      <style:text-properties officeooo:rsid="0ce92da8" officeooo:paragraph-rsid="0ce92da8"/>
    </style:style>
    <style:style style:name="P690" style:family="paragraph" style:parent-style-name="Text_20_body">
      <style:text-properties officeooo:rsid="0ce92da8" officeooo:paragraph-rsid="0cef5208"/>
    </style:style>
    <style:style style:name="P691" style:family="paragraph" style:parent-style-name="Text_20_body">
      <style:text-properties officeooo:rsid="0ce92da8" officeooo:paragraph-rsid="0ceff8ac"/>
    </style:style>
    <style:style style:name="P692" style:family="paragraph" style:parent-style-name="Text_20_body">
      <style:text-properties officeooo:rsid="0cee7a30" officeooo:paragraph-rsid="0cee7a30"/>
    </style:style>
    <style:style style:name="P693" style:family="paragraph" style:parent-style-name="Text_20_body">
      <style:text-properties officeooo:rsid="0cef4e8f" officeooo:paragraph-rsid="0cef4e8f"/>
    </style:style>
    <style:style style:name="P694" style:family="paragraph" style:parent-style-name="Text_20_body">
      <style:text-properties officeooo:rsid="0ce5ba39" officeooo:paragraph-rsid="0ce71432"/>
    </style:style>
    <style:style style:name="P695" style:family="paragraph" style:parent-style-name="Text_20_body">
      <style:text-properties officeooo:rsid="0cef5208" officeooo:paragraph-rsid="0cef5208"/>
    </style:style>
    <style:style style:name="P696" style:family="paragraph" style:parent-style-name="Text_20_body">
      <style:text-properties officeooo:rsid="0ceff8ac" officeooo:paragraph-rsid="0ceff8ac"/>
    </style:style>
    <style:style style:name="P697" style:family="paragraph" style:parent-style-name="Text_20_body">
      <style:text-properties officeooo:rsid="0cf16a12" officeooo:paragraph-rsid="0cf16a12"/>
    </style:style>
    <style:style style:name="P698" style:family="paragraph" style:parent-style-name="Text_20_body">
      <style:text-properties officeooo:rsid="0cf1d3bd" officeooo:paragraph-rsid="0cf1d3bd"/>
    </style:style>
    <style:style style:name="P699" style:family="paragraph" style:parent-style-name="Text_20_body">
      <style:text-properties officeooo:rsid="0cf28068" officeooo:paragraph-rsid="0cf28068"/>
    </style:style>
    <style:style style:name="P700" style:family="paragraph" style:parent-style-name="Text_20_body">
      <style:text-properties officeooo:rsid="0cf28068" officeooo:paragraph-rsid="0cfa0ca8"/>
    </style:style>
    <style:style style:name="P701" style:family="paragraph" style:parent-style-name="Text_20_body">
      <style:text-properties officeooo:rsid="0cf37766" officeooo:paragraph-rsid="0cf37766"/>
    </style:style>
    <style:style style:name="P702" style:family="paragraph" style:parent-style-name="Text_20_body">
      <style:text-properties officeooo:rsid="0cf61170" officeooo:paragraph-rsid="0cf61170"/>
    </style:style>
    <style:style style:name="P703" style:family="paragraph" style:parent-style-name="Text_20_body">
      <style:text-properties officeooo:rsid="0cf715fe" officeooo:paragraph-rsid="0cf910ac"/>
    </style:style>
    <style:style style:name="P704" style:family="paragraph" style:parent-style-name="Text_20_body">
      <style:text-properties officeooo:rsid="0cf910ac" officeooo:paragraph-rsid="0cf910ac"/>
    </style:style>
    <style:style style:name="P705" style:family="paragraph" style:parent-style-name="Text_20_body">
      <style:text-properties officeooo:rsid="0cfaf57f" officeooo:paragraph-rsid="0d008ed5"/>
    </style:style>
    <style:style style:name="P706" style:family="paragraph" style:parent-style-name="Text_20_body">
      <style:text-properties officeooo:rsid="0d0220cf" officeooo:paragraph-rsid="0d036f53"/>
    </style:style>
    <style:style style:name="P707" style:family="paragraph" style:parent-style-name="Text_20_body">
      <style:text-properties officeooo:rsid="0d08e90a" officeooo:paragraph-rsid="0d08e90a"/>
    </style:style>
    <style:style style:name="P708" style:family="paragraph" style:parent-style-name="Text_20_body">
      <style:text-properties officeooo:rsid="0d0a4782" officeooo:paragraph-rsid="0d0a4782"/>
    </style:style>
    <style:style style:name="P709" style:family="paragraph" style:parent-style-name="Text_20_body">
      <style:text-properties officeooo:rsid="0d0be4f2" officeooo:paragraph-rsid="0d0de2bb"/>
    </style:style>
    <style:style style:name="P710" style:family="paragraph" style:parent-style-name="Text_20_body">
      <style:text-properties officeooo:rsid="0d0be4f2" officeooo:paragraph-rsid="0d0f63f8"/>
    </style:style>
    <style:style style:name="P711" style:family="paragraph" style:parent-style-name="Text_20_body">
      <style:text-properties officeooo:rsid="0d0be4f2" officeooo:paragraph-rsid="0d107f16"/>
    </style:style>
    <style:style style:name="P712" style:family="paragraph" style:parent-style-name="Text_20_body">
      <style:text-properties officeooo:rsid="0d0f63f8" officeooo:paragraph-rsid="0d0f63f8"/>
    </style:style>
    <style:style style:name="P713" style:family="paragraph" style:parent-style-name="Text_20_body">
      <style:text-properties officeooo:rsid="0d12ac15" officeooo:paragraph-rsid="0d12ac15"/>
    </style:style>
    <style:style style:name="P714" style:family="paragraph" style:parent-style-name="Text_20_body">
      <style:text-properties officeooo:rsid="0d142c51" officeooo:paragraph-rsid="0d142c51"/>
    </style:style>
    <style:style style:name="P715" style:family="paragraph" style:parent-style-name="Text_20_body">
      <style:text-properties officeooo:rsid="0d157501" officeooo:paragraph-rsid="0d157501"/>
    </style:style>
    <style:style style:name="P716" style:family="paragraph" style:parent-style-name="Text_20_body">
      <style:text-properties officeooo:rsid="0d157501" officeooo:paragraph-rsid="0d15d88d"/>
    </style:style>
    <style:style style:name="P717" style:family="paragraph" style:parent-style-name="Text_20_body">
      <style:text-properties officeooo:paragraph-rsid="0d15d88d"/>
    </style:style>
    <style:style style:name="P718" style:family="paragraph" style:parent-style-name="Text_20_body">
      <style:text-properties officeooo:rsid="0d11c5ad" officeooo:paragraph-rsid="0d11c5ad"/>
    </style:style>
    <style:style style:name="P719" style:family="paragraph" style:parent-style-name="Text_20_body">
      <style:text-properties officeooo:rsid="0d1c3a20" officeooo:paragraph-rsid="0d1caa40"/>
    </style:style>
    <style:style style:name="P720" style:family="paragraph" style:parent-style-name="Text_20_body">
      <style:text-properties officeooo:rsid="0d1e6cb9" officeooo:paragraph-rsid="0d1e6cb9"/>
    </style:style>
    <style:style style:name="P721" style:family="paragraph" style:parent-style-name="Text_20_body">
      <style:text-properties officeooo:rsid="0d20439a" officeooo:paragraph-rsid="0d20439a"/>
    </style:style>
    <style:style style:name="P722" style:family="paragraph" style:parent-style-name="Text_20_body">
      <style:text-properties officeooo:rsid="0d21ccc8" officeooo:paragraph-rsid="0d21ccc8"/>
    </style:style>
    <style:style style:name="P723" style:family="paragraph" style:parent-style-name="Text_20_body">
      <style:text-properties officeooo:paragraph-rsid="0d285c79"/>
    </style:style>
    <style:style style:name="P724" style:family="paragraph" style:parent-style-name="Text_20_body">
      <style:text-properties officeooo:paragraph-rsid="0d2aaaa4"/>
    </style:style>
    <style:style style:name="P725" style:family="paragraph" style:parent-style-name="Text_20_body">
      <style:text-properties officeooo:rsid="0d270afc" officeooo:paragraph-rsid="0d270afc"/>
    </style:style>
    <style:style style:name="P726" style:family="paragraph" style:parent-style-name="Text_20_body">
      <style:text-properties officeooo:rsid="0d28d1b5" officeooo:paragraph-rsid="0d28d1b5"/>
    </style:style>
    <style:style style:name="P727" style:family="paragraph" style:parent-style-name="Text_20_body">
      <style:text-properties officeooo:rsid="0d2aaaa4" officeooo:paragraph-rsid="0d2aaaa4"/>
    </style:style>
    <style:style style:name="P728" style:family="paragraph" style:parent-style-name="Text_20_body">
      <style:text-properties officeooo:paragraph-rsid="0d2bc5ea"/>
    </style:style>
    <style:style style:name="P729" style:family="paragraph" style:parent-style-name="Text_20_body">
      <style:text-properties officeooo:rsid="0d2d4d4b" officeooo:paragraph-rsid="0d2d4d4b"/>
    </style:style>
    <style:style style:name="P730" style:family="paragraph" style:parent-style-name="Text_20_body">
      <style:text-properties officeooo:rsid="0d303d97" officeooo:paragraph-rsid="0d303d97"/>
    </style:style>
    <style:style style:name="P731" style:family="paragraph" style:parent-style-name="Text_20_body">
      <style:paragraph-properties fo:text-align="start" style:justify-single-word="false"/>
      <style:text-properties officeooo:rsid="0d30c7b5" officeooo:paragraph-rsid="0d30c7b5"/>
    </style:style>
    <style:style style:name="P732" style:family="paragraph" style:parent-style-name="Text_20_body">
      <style:paragraph-properties fo:text-align="start" style:justify-single-word="false"/>
      <style:text-properties officeooo:paragraph-rsid="0d36e60a"/>
    </style:style>
    <style:style style:name="P733" style:family="paragraph" style:parent-style-name="Text_20_body">
      <style:paragraph-properties fo:text-align="start" style:justify-single-word="false"/>
      <style:text-properties officeooo:rsid="0d384d5a" officeooo:paragraph-rsid="0d384d5a"/>
    </style:style>
    <style:style style:name="P734" style:family="paragraph" style:parent-style-name="Text_20_body">
      <style:paragraph-properties fo:text-align="start" style:justify-single-word="false"/>
      <style:text-properties officeooo:rsid="0d384d5a" officeooo:paragraph-rsid="0d3da0a7"/>
    </style:style>
    <style:style style:name="P735" style:family="paragraph" style:parent-style-name="Text_20_body">
      <style:paragraph-properties fo:text-align="start" style:justify-single-word="false"/>
      <style:text-properties officeooo:rsid="0d384d5a" officeooo:paragraph-rsid="0d538a1d"/>
    </style:style>
    <style:style style:name="P736" style:family="paragraph" style:parent-style-name="Text_20_body">
      <style:paragraph-properties fo:text-align="start" style:justify-single-word="false"/>
      <style:text-properties officeooo:rsid="0d3180bc" officeooo:paragraph-rsid="0d3180bc"/>
    </style:style>
    <style:style style:name="P737" style:family="paragraph" style:parent-style-name="Text_20_body">
      <style:paragraph-properties fo:text-align="start" style:justify-single-word="false"/>
      <style:text-properties officeooo:rsid="0d345242" officeooo:paragraph-rsid="0d345242"/>
    </style:style>
    <style:style style:name="P738" style:family="paragraph" style:parent-style-name="Text_20_body">
      <style:paragraph-properties fo:text-align="start" style:justify-single-word="false"/>
      <style:text-properties officeooo:rsid="0d35e5ac" officeooo:paragraph-rsid="0d35e5ac"/>
    </style:style>
    <style:style style:name="P739" style:family="paragraph" style:parent-style-name="Text_20_body">
      <style:paragraph-properties fo:text-align="start" style:justify-single-word="false"/>
      <style:text-properties officeooo:rsid="0d36e60a" officeooo:paragraph-rsid="0d36e60a"/>
    </style:style>
    <style:style style:name="P740" style:family="paragraph" style:parent-style-name="Text_20_body">
      <style:paragraph-properties fo:text-align="start" style:justify-single-word="false"/>
      <style:text-properties officeooo:rsid="0d39a053" officeooo:paragraph-rsid="0d3aeceb"/>
    </style:style>
    <style:style style:name="P741" style:family="paragraph" style:parent-style-name="Text_20_body">
      <style:paragraph-properties fo:text-align="start" style:justify-single-word="false"/>
      <style:text-properties officeooo:rsid="0d3aeceb" officeooo:paragraph-rsid="0d42b55c"/>
    </style:style>
    <style:style style:name="P742" style:family="paragraph" style:parent-style-name="Text_20_body">
      <style:paragraph-properties fo:text-align="start" style:justify-single-word="false"/>
      <style:text-properties officeooo:rsid="0d3f7164" officeooo:paragraph-rsid="0d3fc984"/>
    </style:style>
    <style:style style:name="P743" style:family="paragraph" style:parent-style-name="Text_20_body">
      <style:paragraph-properties fo:text-align="start" style:justify-single-word="false"/>
      <style:text-properties officeooo:rsid="0d3f7164" officeooo:paragraph-rsid="0d46535d"/>
    </style:style>
    <style:style style:name="P744" style:family="paragraph" style:parent-style-name="Text_20_body">
      <style:paragraph-properties fo:text-align="start" style:justify-single-word="false"/>
      <style:text-properties officeooo:rsid="0d42b55c" officeooo:paragraph-rsid="0d42b55c"/>
    </style:style>
    <style:style style:name="P745" style:family="paragraph" style:parent-style-name="Text_20_body">
      <style:paragraph-properties fo:text-align="start" style:justify-single-word="false"/>
      <style:text-properties officeooo:rsid="0d44d7a1" officeooo:paragraph-rsid="0d44d7a1"/>
    </style:style>
    <style:style style:name="P746" style:family="paragraph" style:parent-style-name="Text_20_body">
      <style:paragraph-properties fo:text-align="start" style:justify-single-word="false"/>
      <style:text-properties officeooo:rsid="0d3da0a7" officeooo:paragraph-rsid="0d3da0a7"/>
    </style:style>
    <style:style style:name="P747" style:family="paragraph" style:parent-style-name="Text_20_body">
      <style:paragraph-properties fo:text-align="start" style:justify-single-word="false"/>
      <style:text-properties officeooo:rsid="0d46535d" officeooo:paragraph-rsid="0d46535d"/>
    </style:style>
    <style:style style:name="P748" style:family="paragraph" style:parent-style-name="Text_20_body">
      <style:text-properties officeooo:rsid="0a4540d1" officeooo:paragraph-rsid="0a47191d"/>
    </style:style>
    <style:style style:name="P749" style:family="paragraph" style:parent-style-name="Text_20_body">
      <style:text-properties officeooo:rsid="0a81c68f" officeooo:paragraph-rsid="0a81c68f"/>
    </style:style>
    <style:style style:name="P750" style:family="paragraph" style:parent-style-name="Text_20_body">
      <style:paragraph-properties fo:text-align="start" style:justify-single-word="false"/>
      <style:text-properties officeooo:rsid="0d538a1d" officeooo:paragraph-rsid="0d56f1c5"/>
    </style:style>
    <style:style style:name="P751" style:family="paragraph" style:parent-style-name="Text_20_body">
      <style:paragraph-properties fo:text-align="start" style:justify-single-word="false"/>
      <style:text-properties officeooo:rsid="0d538a1d" officeooo:paragraph-rsid="0d538a1d"/>
    </style:style>
    <style:style style:name="P752" style:family="paragraph" style:parent-style-name="Text_20_body">
      <style:paragraph-properties fo:text-align="start" style:justify-single-word="false"/>
      <style:text-properties officeooo:rsid="0d538a1d" officeooo:paragraph-rsid="0d5dba11"/>
    </style:style>
    <style:style style:name="P753" style:family="paragraph" style:parent-style-name="Text_20_body">
      <style:paragraph-properties fo:text-align="start" style:justify-single-word="false"/>
      <style:text-properties officeooo:rsid="0d538a1d" officeooo:paragraph-rsid="0d604a0c"/>
    </style:style>
    <style:style style:name="P754" style:family="paragraph" style:parent-style-name="Text_20_body">
      <style:paragraph-properties fo:text-align="start" style:justify-single-word="false"/>
      <style:text-properties officeooo:rsid="0d538a1d" officeooo:paragraph-rsid="0d61a588"/>
    </style:style>
    <style:style style:name="P755" style:family="paragraph" style:parent-style-name="Text_20_body">
      <style:paragraph-properties fo:text-align="start" style:justify-single-word="false"/>
      <style:text-properties officeooo:rsid="0d61f408" officeooo:paragraph-rsid="0d61f408"/>
    </style:style>
    <style:style style:name="P756" style:family="paragraph" style:parent-style-name="Text_20_body">
      <style:paragraph-properties fo:text-align="start" style:justify-single-word="false"/>
      <style:text-properties officeooo:rsid="0d622a58" officeooo:paragraph-rsid="0d627d04"/>
    </style:style>
    <style:style style:name="P757" style:family="paragraph" style:parent-style-name="Text_20_body">
      <style:text-properties officeooo:rsid="0d642270" officeooo:paragraph-rsid="0d642270"/>
    </style:style>
    <style:style style:name="P758" style:family="paragraph" style:parent-style-name="Text_20_body">
      <style:text-properties officeooo:rsid="0d642270" officeooo:paragraph-rsid="0d64e4ba"/>
    </style:style>
    <style:style style:name="P759" style:family="paragraph" style:parent-style-name="Text_20_body">
      <style:text-properties officeooo:rsid="0d642270" officeooo:paragraph-rsid="0d6803f5"/>
    </style:style>
    <style:style style:name="P760" style:family="paragraph" style:parent-style-name="Text_20_body">
      <style:text-properties officeooo:rsid="0d642270" officeooo:paragraph-rsid="0d6ba7cd"/>
    </style:style>
    <style:style style:name="P761" style:family="paragraph" style:parent-style-name="Text_20_body">
      <style:text-properties officeooo:rsid="0d66cac5" officeooo:paragraph-rsid="0d66cac5"/>
    </style:style>
    <style:style style:name="P762" style:family="paragraph" style:parent-style-name="Text_20_body">
      <style:text-properties officeooo:rsid="0d6803f5" officeooo:paragraph-rsid="0d6803f5"/>
    </style:style>
    <style:style style:name="P763" style:family="paragraph" style:parent-style-name="Text_20_body">
      <style:text-properties officeooo:rsid="0d6ba7cd" officeooo:paragraph-rsid="0d6ba7cd"/>
    </style:style>
    <style:style style:name="P764" style:family="paragraph" style:parent-style-name="Text_20_body">
      <style:text-properties officeooo:rsid="0d6bc79f" officeooo:paragraph-rsid="0d6bc79f"/>
    </style:style>
    <style:style style:name="P765" style:family="paragraph" style:parent-style-name="Text_20_body">
      <style:text-properties officeooo:rsid="0d6d951d" officeooo:paragraph-rsid="0d6d951d"/>
    </style:style>
    <style:style style:name="P766" style:family="paragraph" style:parent-style-name="Text_20_body">
      <style:text-properties officeooo:rsid="0d6f014e" officeooo:paragraph-rsid="0d6f014e"/>
    </style:style>
    <style:style style:name="P767" style:family="paragraph" style:parent-style-name="Text_20_body">
      <style:text-properties officeooo:rsid="0d700864" officeooo:paragraph-rsid="0d700864"/>
    </style:style>
    <style:style style:name="P768" style:family="paragraph" style:parent-style-name="Text_20_body">
      <style:text-properties officeooo:rsid="0d708eed" officeooo:paragraph-rsid="0d708eed"/>
    </style:style>
    <style:style style:name="P769" style:family="paragraph" style:parent-style-name="Text_20_body">
      <style:text-properties officeooo:rsid="0d730bb2" officeooo:paragraph-rsid="0d730bb2"/>
    </style:style>
    <style:style style:name="P770" style:family="paragraph" style:parent-style-name="Text_20_body">
      <style:text-properties officeooo:paragraph-rsid="0d75a326"/>
    </style:style>
    <style:style style:name="P771" style:family="paragraph" style:parent-style-name="Text_20_body">
      <style:text-properties officeooo:paragraph-rsid="0d768324"/>
    </style:style>
    <style:style style:name="P772" style:family="paragraph" style:parent-style-name="Text_20_body">
      <style:text-properties officeooo:rsid="0d790a2b" officeooo:paragraph-rsid="0d790a2b"/>
    </style:style>
    <style:style style:name="P773" style:family="paragraph" style:parent-style-name="Text_20_body">
      <style:text-properties officeooo:rsid="0d7b35c5" officeooo:paragraph-rsid="0d7b35c5"/>
    </style:style>
    <style:style style:name="P774" style:family="paragraph" style:parent-style-name="Text_20_body">
      <style:text-properties officeooo:rsid="0d7b35c5" officeooo:paragraph-rsid="0d7dc965"/>
    </style:style>
    <style:style style:name="P775" style:family="paragraph" style:parent-style-name="Text_20_body">
      <style:text-properties officeooo:rsid="0d7b35c5" officeooo:paragraph-rsid="0d7defb9"/>
    </style:style>
    <style:style style:name="P776" style:family="paragraph" style:parent-style-name="Text_20_body">
      <style:text-properties officeooo:rsid="0d76cdd7" officeooo:paragraph-rsid="0d76cdd7"/>
    </style:style>
    <style:style style:name="P777" style:family="paragraph" style:parent-style-name="Text_20_body">
      <style:text-properties officeooo:rsid="0d77d78e" officeooo:paragraph-rsid="0d77d78e"/>
    </style:style>
    <style:style style:name="P778" style:family="paragraph" style:parent-style-name="Text_20_body">
      <style:text-properties officeooo:rsid="0d785ba8" officeooo:paragraph-rsid="0d785ba8"/>
    </style:style>
    <style:style style:name="P779" style:family="paragraph" style:parent-style-name="Text_20_body">
      <style:text-properties officeooo:paragraph-rsid="0d803abd"/>
    </style:style>
    <style:style style:name="P780" style:family="paragraph" style:parent-style-name="Text_20_body">
      <style:text-properties officeooo:paragraph-rsid="0d864ba9"/>
    </style:style>
    <style:style style:name="P781" style:family="paragraph" style:parent-style-name="Text_20_body">
      <style:text-properties officeooo:rsid="0d7dc965" officeooo:paragraph-rsid="0d7dc965"/>
    </style:style>
    <style:style style:name="P782" style:family="paragraph" style:parent-style-name="Text_20_body">
      <style:text-properties officeooo:rsid="0d7defb9" officeooo:paragraph-rsid="0d7defb9"/>
    </style:style>
    <style:style style:name="P783" style:family="paragraph" style:parent-style-name="Text_20_body">
      <style:text-properties officeooo:rsid="0d7e974e" officeooo:paragraph-rsid="0d7e974e"/>
    </style:style>
    <style:style style:name="P784" style:family="paragraph" style:parent-style-name="Text_20_body">
      <style:text-properties officeooo:rsid="0d81a524" officeooo:paragraph-rsid="0d81a524"/>
    </style:style>
    <style:style style:name="P785" style:family="paragraph" style:parent-style-name="Text_20_body">
      <style:text-properties officeooo:rsid="0d864ba9" officeooo:paragraph-rsid="0d864ba9"/>
    </style:style>
    <style:style style:name="P786" style:family="paragraph" style:parent-style-name="Text_20_body">
      <style:text-properties officeooo:paragraph-rsid="0d86d5a5"/>
    </style:style>
    <style:style style:name="P787" style:family="paragraph" style:parent-style-name="Text_20_body">
      <style:text-properties officeooo:paragraph-rsid="0d8d08a9"/>
    </style:style>
    <style:style style:name="P788" style:family="paragraph" style:parent-style-name="Text_20_body">
      <style:text-properties officeooo:paragraph-rsid="0d8dd3d1"/>
    </style:style>
    <style:style style:name="P789" style:family="paragraph" style:parent-style-name="Text_20_body">
      <style:text-properties officeooo:rsid="0d8a44e2" officeooo:paragraph-rsid="0d8a44e2"/>
    </style:style>
    <style:style style:name="P790" style:family="paragraph" style:parent-style-name="Text_20_body">
      <style:text-properties officeooo:rsid="0d8e2c90" officeooo:paragraph-rsid="0d8e2c90"/>
    </style:style>
    <style:style style:name="P791" style:family="paragraph" style:parent-style-name="Text_20_body">
      <style:text-properties officeooo:rsid="0d8fa4d8" officeooo:paragraph-rsid="0d8fa4d8"/>
    </style:style>
    <style:style style:name="P792" style:family="paragraph" style:parent-style-name="Text_20_body">
      <style:text-properties officeooo:paragraph-rsid="0d90f78e"/>
    </style:style>
    <style:style style:name="P793" style:family="paragraph" style:parent-style-name="Text_20_body">
      <style:text-properties officeooo:rsid="0d9328b1" officeooo:paragraph-rsid="0d94f9d3"/>
    </style:style>
    <style:style style:name="P794" style:family="paragraph" style:parent-style-name="Text_20_body">
      <style:text-properties officeooo:rsid="0d9328b1" officeooo:paragraph-rsid="0d96104d"/>
    </style:style>
    <style:style style:name="P795" style:family="paragraph" style:parent-style-name="Text_20_body">
      <style:text-properties officeooo:rsid="0d9328b1" officeooo:paragraph-rsid="0d978e5c"/>
    </style:style>
    <style:style style:name="P796" style:family="paragraph" style:parent-style-name="Text_20_body">
      <style:text-properties officeooo:rsid="0d90f78e" officeooo:paragraph-rsid="0d90f78e"/>
    </style:style>
    <style:style style:name="P797" style:family="paragraph" style:parent-style-name="Text_20_body">
      <style:text-properties officeooo:rsid="0d912db3" officeooo:paragraph-rsid="0d912db3"/>
    </style:style>
    <style:style style:name="P798" style:family="paragraph" style:parent-style-name="Text_20_body">
      <style:text-properties officeooo:rsid="0d95e817" officeooo:paragraph-rsid="0d95e817"/>
    </style:style>
    <style:style style:name="P799" style:family="paragraph" style:parent-style-name="Text_20_body">
      <style:text-properties officeooo:rsid="0d9a6ea9" officeooo:paragraph-rsid="0d9a6ea9"/>
    </style:style>
    <style:style style:name="P800" style:family="paragraph" style:parent-style-name="Text_20_body">
      <style:text-properties officeooo:rsid="0d9a6ea9" officeooo:paragraph-rsid="0d9b391c"/>
    </style:style>
    <style:style style:name="P801" style:family="paragraph" style:parent-style-name="Text_20_body">
      <style:text-properties officeooo:paragraph-rsid="0d9df172"/>
    </style:style>
    <style:style style:name="P802" style:family="paragraph" style:parent-style-name="Text_20_body">
      <style:text-properties officeooo:paragraph-rsid="0d9ee173"/>
    </style:style>
    <style:style style:name="P803" style:family="paragraph" style:parent-style-name="Text_20_body">
      <style:text-properties officeooo:rsid="0da448ce" officeooo:paragraph-rsid="0da448ce"/>
    </style:style>
    <style:style style:name="P804" style:family="paragraph" style:parent-style-name="Text_20_body">
      <style:text-properties officeooo:rsid="0d9c942a" officeooo:paragraph-rsid="0d9c942a"/>
    </style:style>
    <style:style style:name="P805" style:family="paragraph" style:parent-style-name="Text_20_body">
      <style:text-properties officeooo:rsid="0d9cba7f" officeooo:paragraph-rsid="0d9cba7f"/>
    </style:style>
    <style:style style:name="P806" style:family="paragraph" style:parent-style-name="Text_20_body">
      <style:text-properties officeooo:rsid="0d9df172" officeooo:paragraph-rsid="0d9df172"/>
    </style:style>
    <style:style style:name="P807" style:family="paragraph" style:parent-style-name="Text_20_body">
      <style:text-properties officeooo:rsid="0da009bf" officeooo:paragraph-rsid="0da009bf"/>
    </style:style>
    <style:style style:name="P808" style:family="paragraph" style:parent-style-name="Text_20_body">
      <style:text-properties officeooo:rsid="0da1e9d3" officeooo:paragraph-rsid="0da1e9d3"/>
    </style:style>
    <style:style style:name="P809" style:family="paragraph" style:parent-style-name="Text_20_body">
      <style:text-properties officeooo:rsid="0da383fe" officeooo:paragraph-rsid="0da383fe"/>
    </style:style>
    <style:style style:name="P810" style:family="paragraph" style:parent-style-name="Text_20_body">
      <style:text-properties officeooo:rsid="0da5b8c0" officeooo:paragraph-rsid="0da5b8c0"/>
    </style:style>
    <style:style style:name="P811" style:family="paragraph" style:parent-style-name="Text_20_body">
      <style:text-properties officeooo:paragraph-rsid="0da77c31"/>
    </style:style>
    <style:style style:name="P812" style:family="paragraph" style:parent-style-name="Text_20_body">
      <style:text-properties officeooo:paragraph-rsid="0da91e0b"/>
    </style:style>
    <style:style style:name="P813" style:family="paragraph" style:parent-style-name="Text_20_body">
      <style:text-properties officeooo:rsid="0da943a2" officeooo:paragraph-rsid="0da943a2"/>
    </style:style>
    <style:style style:name="P814" style:family="paragraph" style:parent-style-name="Text_20_body">
      <style:text-properties officeooo:rsid="0da943a2" officeooo:paragraph-rsid="0da91e0b"/>
    </style:style>
    <style:style style:name="P815" style:family="paragraph" style:parent-style-name="Text_20_body">
      <style:text-properties officeooo:rsid="0dacd1a9" officeooo:paragraph-rsid="0dacd1a9"/>
    </style:style>
    <style:style style:name="P816" style:family="paragraph" style:parent-style-name="Text_20_body">
      <style:text-properties officeooo:rsid="0da77c31" officeooo:paragraph-rsid="0da77c31"/>
    </style:style>
    <style:style style:name="P817" style:family="paragraph" style:parent-style-name="Text_20_body">
      <style:text-properties officeooo:rsid="0dae2c8e" officeooo:paragraph-rsid="0dae2c8e"/>
    </style:style>
    <style:style style:name="P818" style:family="paragraph" style:parent-style-name="Text_20_body">
      <style:text-properties officeooo:rsid="0dae6cc5" officeooo:paragraph-rsid="0daebb84"/>
    </style:style>
    <style:style style:name="P819" style:family="paragraph" style:parent-style-name="Text_20_body">
      <style:text-properties officeooo:rsid="0db20dd9" officeooo:paragraph-rsid="0db20dd9"/>
    </style:style>
    <style:style style:name="P820" style:family="paragraph" style:parent-style-name="Text_20_body">
      <style:text-properties officeooo:rsid="0db25de7" officeooo:paragraph-rsid="0db50a48"/>
    </style:style>
    <style:style style:name="P821" style:family="paragraph" style:parent-style-name="Text_20_body">
      <style:paragraph-properties fo:margin-left="0in" fo:margin-right="0in" fo:text-indent="0in" style:auto-text-indent="false"/>
      <style:text-properties officeooo:rsid="0851f081" officeooo:paragraph-rsid="0851f081"/>
    </style:style>
    <style:style style:name="P822" style:family="paragraph" style:parent-style-name="Text_20_body">
      <style:paragraph-properties fo:margin-left="0in" fo:margin-right="0in" fo:text-indent="0in" style:auto-text-indent="false"/>
      <style:text-properties officeooo:rsid="0887fcff" officeooo:paragraph-rsid="0887fcff"/>
    </style:style>
    <style:style style:name="P823" style:family="paragraph" style:parent-style-name="Text_20_body">
      <style:paragraph-properties fo:margin-left="0in" fo:margin-right="0in" fo:text-indent="0in" style:auto-text-indent="false"/>
      <style:text-properties officeooo:rsid="0885e277" officeooo:paragraph-rsid="0885e277"/>
    </style:style>
    <style:style style:name="P824" style:family="paragraph" style:parent-style-name="Text_20_body">
      <style:paragraph-properties fo:margin-left="0in" fo:margin-right="0in" fo:text-indent="0in" style:auto-text-indent="false"/>
      <style:text-properties officeooo:rsid="08912346" officeooo:paragraph-rsid="08912346"/>
    </style:style>
    <style:style style:name="P825" style:family="paragraph" style:parent-style-name="Text_20_body">
      <style:paragraph-properties fo:margin-left="0in" fo:margin-right="0in" fo:text-indent="0in" style:auto-text-indent="false"/>
      <style:text-properties officeooo:rsid="08934caa" officeooo:paragraph-rsid="08934caa"/>
    </style:style>
    <style:style style:name="P826" style:family="paragraph" style:parent-style-name="Text_20_body">
      <style:paragraph-properties fo:margin-left="0in" fo:margin-right="0in" fo:text-indent="0in" style:auto-text-indent="false"/>
      <style:text-properties officeooo:rsid="0894e3b2" officeooo:paragraph-rsid="0894e3b2"/>
    </style:style>
    <style:style style:name="P827" style:family="paragraph" style:parent-style-name="Text_20_body">
      <style:paragraph-properties fo:margin-left="0in" fo:margin-right="0in" fo:text-indent="0in" style:auto-text-indent="false"/>
      <style:text-properties officeooo:rsid="088f26f3" officeooo:paragraph-rsid="088f26f3"/>
    </style:style>
    <style:style style:name="P828" style:family="paragraph" style:parent-style-name="Standard">
      <style:paragraph-properties fo:margin-left="0.8in" fo:margin-right="0in" fo:text-indent="0in" style:auto-text-indent="false"/>
    </style:style>
    <style:style style:name="P829" style:family="paragraph" style:parent-style-name="Quotations">
      <style:text-properties officeooo:paragraph-rsid="0929ac88"/>
    </style:style>
    <style:style style:name="P830" style:family="paragraph" style:parent-style-name="Quotations">
      <style:text-properties officeooo:paragraph-rsid="0942cb8e"/>
    </style:style>
    <style:style style:name="P831" style:family="paragraph" style:parent-style-name="Quotations">
      <style:text-properties officeooo:paragraph-rsid="095fdf35"/>
    </style:style>
    <style:style style:name="P832" style:family="paragraph" style:parent-style-name="Quotations">
      <style:text-properties officeooo:paragraph-rsid="09fee993"/>
    </style:style>
    <style:style style:name="P833" style:family="paragraph" style:parent-style-name="Quotations">
      <style:text-properties officeooo:paragraph-rsid="0a10fcb7"/>
    </style:style>
    <style:style style:name="P834" style:family="paragraph" style:parent-style-name="Quotations">
      <style:text-properties officeooo:paragraph-rsid="0c2bc721"/>
    </style:style>
    <style:style style:name="P835" style:family="paragraph" style:parent-style-name="Quotations">
      <style:text-properties officeooo:paragraph-rsid="0d730bb2"/>
    </style:style>
    <style:style style:name="P836" style:family="paragraph" style:parent-style-name="Quotations">
      <style:paragraph-properties fo:margin-left="0in" fo:margin-right="0.3937in" fo:text-indent="0in" style:auto-text-indent="false"/>
      <style:text-properties officeooo:paragraph-rsid="0a02659d"/>
    </style:style>
    <style:style style:name="P837" style:family="paragraph" style:parent-style-name="Quotations">
      <style:paragraph-properties fo:margin-left="0in" fo:margin-right="0.3937in" fo:text-indent="0in" style:auto-text-indent="false"/>
      <style:text-properties officeooo:paragraph-rsid="0a040ccb"/>
    </style:style>
    <style:style style:name="P838" style:family="paragraph" style:parent-style-name="Quotations">
      <style:paragraph-properties fo:margin-left="0in" fo:margin-right="0.3937in" fo:text-indent="0in" style:auto-text-indent="false"/>
      <style:text-properties officeooo:rsid="0a0639dc" officeooo:paragraph-rsid="0a0639dc"/>
    </style:style>
    <style:style style:name="P839" style:family="paragraph" style:parent-style-name="Quotations">
      <style:paragraph-properties fo:margin-left="0in" fo:margin-right="0.3937in" fo:text-indent="0in" style:auto-text-indent="false"/>
      <style:text-properties officeooo:rsid="0a091c68" officeooo:paragraph-rsid="0a0ac56b"/>
    </style:style>
    <style:style style:name="P840" style:family="paragraph" style:parent-style-name="Quotations">
      <style:paragraph-properties fo:margin-left="0in" fo:margin-right="0.3937in" fo:text-indent="0in" style:auto-text-indent="false"/>
      <style:text-properties officeooo:rsid="0a091c68" officeooo:paragraph-rsid="0a0ea58d"/>
    </style:style>
    <style:style style:name="P841" style:family="paragraph" style:parent-style-name="Quotations">
      <style:paragraph-properties fo:margin-left="0in" fo:margin-right="0.3937in" fo:text-indent="0in" style:auto-text-indent="false"/>
      <style:text-properties officeooo:rsid="0a091c68" officeooo:paragraph-rsid="0a0f6a73"/>
    </style:style>
    <style:style style:name="P842" style:family="paragraph" style:parent-style-name="Quotations">
      <style:paragraph-properties fo:margin-left="0in" fo:margin-right="0.3937in" fo:text-indent="0in" style:auto-text-indent="false"/>
      <style:text-properties officeooo:rsid="0a091c68" officeooo:paragraph-rsid="0d4fdb56"/>
    </style:style>
    <style:style style:name="P843" style:family="paragraph" style:parent-style-name="Quotations">
      <style:paragraph-properties fo:margin-left="0in" fo:margin-right="0.3937in" fo:text-indent="0in" style:auto-text-indent="false"/>
      <style:text-properties officeooo:rsid="0a008e84" officeooo:paragraph-rsid="0a008e84"/>
    </style:style>
    <style:style style:name="P844" style:family="paragraph" style:parent-style-name="Quotations">
      <style:paragraph-properties fo:margin-left="0in" fo:margin-right="0.3937in" fo:text-indent="0in" style:auto-text-indent="false"/>
      <style:text-properties officeooo:rsid="0a040ccb" officeooo:paragraph-rsid="0a040ccb"/>
    </style:style>
    <style:style style:name="P845" style:family="paragraph" style:parent-style-name="Quotations">
      <style:paragraph-properties fo:margin-left="0in" fo:margin-right="0.3937in" fo:text-indent="0in" style:auto-text-indent="false"/>
      <style:text-properties officeooo:rsid="0a04f144" officeooo:paragraph-rsid="0a040ccb"/>
    </style:style>
    <style:style style:name="P846" style:family="paragraph" style:parent-style-name="Quotations">
      <style:paragraph-properties fo:margin-left="0in" fo:margin-right="0.3937in" fo:text-indent="0in" style:auto-text-indent="false"/>
      <style:text-properties officeooo:rsid="0a0ac56b" officeooo:paragraph-rsid="0a0ac56b"/>
    </style:style>
    <style:style style:name="P847" style:family="paragraph" style:parent-style-name="Quotations">
      <style:paragraph-properties fo:margin-left="0in" fo:margin-right="0.3937in" fo:text-indent="0in" style:auto-text-indent="false"/>
      <style:text-properties officeooo:rsid="0a0ac56b" officeooo:paragraph-rsid="0d51b47c"/>
    </style:style>
    <style:style style:name="P848" style:family="paragraph" style:parent-style-name="Quotations">
      <style:paragraph-properties fo:margin-left="0in" fo:margin-right="0.3937in" fo:text-indent="0in" style:auto-text-indent="false"/>
      <style:text-properties officeooo:rsid="0a0bd785" officeooo:paragraph-rsid="0a0bd785"/>
    </style:style>
    <style:style style:name="P849" style:family="paragraph" style:parent-style-name="Text_20_body">
      <style:text-properties officeooo:rsid="0db251a6" officeooo:paragraph-rsid="0db251a6"/>
    </style:style>
    <style:style style:name="P850" style:family="paragraph" style:parent-style-name="Text_20_body">
      <style:text-properties officeooo:rsid="0db32cb3" officeooo:paragraph-rsid="0db32cb3"/>
    </style:style>
    <style:style style:name="P851" style:family="paragraph" style:parent-style-name="Text_20_body">
      <style:text-properties officeooo:rsid="0db4b05e" officeooo:paragraph-rsid="0db4b05e"/>
    </style:style>
    <style:style style:name="P852" style:family="paragraph" style:parent-style-name="Text_20_body">
      <style:text-properties officeooo:rsid="0db4b1dc" officeooo:paragraph-rsid="0db4b1dc"/>
    </style:style>
    <style:style style:name="P853" style:family="paragraph" style:parent-style-name="Text_20_body">
      <style:text-properties officeooo:rsid="0db69a1a" officeooo:paragraph-rsid="0db69a1a"/>
    </style:style>
    <style:style style:name="P854" style:family="paragraph" style:parent-style-name="Text_20_body">
      <style:text-properties officeooo:rsid="0db8d2e8" officeooo:paragraph-rsid="0db8d2e8"/>
    </style:style>
    <style:style style:name="P855" style:family="paragraph" style:parent-style-name="Text_20_body">
      <style:text-properties officeooo:rsid="0dba811d" officeooo:paragraph-rsid="0dba811d"/>
    </style:style>
    <style:style style:name="P856" style:family="paragraph" style:parent-style-name="Text_20_body">
      <style:text-properties officeooo:rsid="0dbb6305" officeooo:paragraph-rsid="0dbb6305"/>
    </style:style>
    <style:style style:name="P857" style:family="paragraph" style:parent-style-name="Text_20_body">
      <style:text-properties officeooo:rsid="0dbbfb6a" officeooo:paragraph-rsid="0dbbfb6a"/>
    </style:style>
    <style:style style:name="P858" style:family="paragraph" style:parent-style-name="Text_20_body">
      <style:text-properties officeooo:rsid="0dbbfb6a" officeooo:paragraph-rsid="0dbd3b9d"/>
    </style:style>
    <style:style style:name="P859" style:family="paragraph" style:parent-style-name="Text_20_body">
      <style:text-properties officeooo:paragraph-rsid="0dbd3b9d"/>
    </style:style>
    <style:style style:name="P860" style:family="paragraph" style:parent-style-name="Text_20_body">
      <style:text-properties officeooo:paragraph-rsid="0dbe59c0"/>
    </style:style>
    <style:style style:name="P861" style:family="paragraph" style:parent-style-name="Text_20_body">
      <style:text-properties officeooo:rsid="0dc3bd1c" officeooo:paragraph-rsid="0dc3bd1c"/>
    </style:style>
    <style:style style:name="P862" style:family="paragraph" style:parent-style-name="Text_20_body">
      <style:text-properties officeooo:rsid="0dc428f1" officeooo:paragraph-rsid="0dc428f1"/>
    </style:style>
    <style:style style:name="P863" style:family="paragraph" style:parent-style-name="Text_20_body">
      <style:text-properties officeooo:rsid="0db86a6e" officeooo:paragraph-rsid="0db86a6e"/>
    </style:style>
    <style:style style:name="P864" style:family="paragraph" style:parent-style-name="Text_20_body">
      <style:text-properties officeooo:rsid="0dbd3b9d" officeooo:paragraph-rsid="0dbd3b9d"/>
    </style:style>
    <style:style style:name="P865" style:family="paragraph" style:parent-style-name="Text_20_body">
      <style:text-properties officeooo:rsid="0dbe59c0" officeooo:paragraph-rsid="0dbe59c0"/>
    </style:style>
    <style:style style:name="P866" style:family="paragraph" style:parent-style-name="Heading_20_1">
      <style:paragraph-properties fo:break-before="page"/>
    </style:style>
    <style:style style:name="P867" style:family="paragraph" style:parent-style-name="Heading_20_1">
      <style:paragraph-properties fo:break-before="page"/>
      <style:text-properties officeooo:paragraph-rsid="0a187c75"/>
    </style:style>
    <style:style style:name="P868" style:family="paragraph" style:parent-style-name="Heading_20_2">
      <style:text-properties officeooo:rsid="0850338f" officeooo:paragraph-rsid="0850338f"/>
    </style:style>
    <style:style style:name="P869" style:family="paragraph" style:parent-style-name="Heading_20_2">
      <style:paragraph-properties fo:break-before="page"/>
    </style:style>
    <style:style style:name="P870" style:family="paragraph" style:parent-style-name="Heading_20_2">
      <style:paragraph-properties fo:break-before="page"/>
      <style:text-properties officeooo:rsid="0a990146" officeooo:paragraph-rsid="0a990146"/>
    </style:style>
    <style:style style:name="P871" style:family="paragraph" style:parent-style-name="Heading_20_2">
      <style:paragraph-properties fo:break-before="page"/>
      <style:text-properties officeooo:rsid="0d995fac"/>
    </style:style>
    <style:style style:name="P872" style:family="paragraph" style:parent-style-name="Heading_20_3">
      <style:text-properties officeooo:rsid="0851f081" officeooo:paragraph-rsid="085876d7"/>
    </style:style>
    <style:style style:name="P873" style:family="paragraph" style:parent-style-name="Heading_20_3">
      <style:text-properties officeooo:paragraph-rsid="08575e26"/>
    </style:style>
    <style:style style:name="P874" style:family="paragraph" style:parent-style-name="Heading_20_3">
      <style:text-properties officeooo:paragraph-rsid="0858f4bd"/>
    </style:style>
    <style:style style:name="P875" style:family="paragraph" style:parent-style-name="Heading_20_3">
      <style:text-properties officeooo:paragraph-rsid="09ac540c"/>
    </style:style>
    <style:style style:name="P876" style:family="paragraph" style:parent-style-name="Heading_20_3">
      <style:text-properties officeooo:paragraph-rsid="08d0d4f6"/>
    </style:style>
    <style:style style:name="P877" style:family="paragraph" style:parent-style-name="Heading_20_3">
      <style:text-properties officeooo:rsid="08e70567" officeooo:paragraph-rsid="08e70567"/>
    </style:style>
    <style:style style:name="P878" style:family="paragraph" style:parent-style-name="Heading_20_3">
      <style:text-properties officeooo:paragraph-rsid="0a187c75"/>
    </style:style>
    <style:style style:name="P879" style:family="paragraph" style:parent-style-name="Heading_20_3">
      <style:text-properties officeooo:paragraph-rsid="0a952680"/>
    </style:style>
    <style:style style:name="P880" style:family="paragraph" style:parent-style-name="Heading_20_3">
      <style:text-properties officeooo:paragraph-rsid="0ab2aaef"/>
    </style:style>
    <style:style style:name="P881" style:family="paragraph" style:parent-style-name="Heading_20_3">
      <style:text-properties officeooo:rsid="0ab4c103"/>
    </style:style>
    <style:style style:name="P882" style:family="paragraph" style:parent-style-name="Heading_20_3">
      <style:text-properties officeooo:paragraph-rsid="0ade406a"/>
    </style:style>
    <style:style style:name="P883" style:family="paragraph" style:parent-style-name="Heading_20_3">
      <style:text-properties officeooo:rsid="0ae54a4e"/>
    </style:style>
    <style:style style:name="P884" style:family="paragraph" style:parent-style-name="Heading_20_3">
      <style:text-properties officeooo:paragraph-rsid="0afa5be0"/>
    </style:style>
    <style:style style:name="P885" style:family="paragraph" style:parent-style-name="Heading_20_3">
      <style:text-properties officeooo:paragraph-rsid="0b209b06"/>
    </style:style>
    <style:style style:name="P886" style:family="paragraph" style:parent-style-name="Heading_20_3">
      <style:text-properties officeooo:paragraph-rsid="0b572efa"/>
    </style:style>
    <style:style style:name="P887" style:family="paragraph" style:parent-style-name="Heading_20_3">
      <style:text-properties officeooo:paragraph-rsid="0ba084c9"/>
    </style:style>
    <style:style style:name="P888" style:family="paragraph" style:parent-style-name="Heading_20_3">
      <style:text-properties officeooo:paragraph-rsid="0bd888e5"/>
    </style:style>
    <style:style style:name="P889" style:family="paragraph" style:parent-style-name="Heading_20_3">
      <style:text-properties officeooo:paragraph-rsid="0bdf6af3"/>
    </style:style>
    <style:style style:name="P890" style:family="paragraph" style:parent-style-name="Heading_20_3">
      <style:text-properties officeooo:rsid="0bf1092c"/>
    </style:style>
    <style:style style:name="P891" style:family="paragraph" style:parent-style-name="Heading_20_3">
      <style:text-properties officeooo:paragraph-rsid="0c0c6ca4"/>
    </style:style>
    <style:style style:name="P892" style:family="paragraph" style:parent-style-name="Heading_20_3">
      <style:text-properties officeooo:paragraph-rsid="0c4583e6"/>
    </style:style>
    <style:style style:name="P893" style:family="paragraph" style:parent-style-name="Heading_20_3">
      <style:text-properties officeooo:rsid="0c6af14f" officeooo:paragraph-rsid="0c6b7dac"/>
    </style:style>
    <style:style style:name="P894" style:family="paragraph" style:parent-style-name="Heading_20_3">
      <style:text-properties officeooo:paragraph-rsid="0c7a37f0"/>
    </style:style>
    <style:style style:name="P895" style:family="paragraph" style:parent-style-name="Heading_20_3">
      <style:text-properties officeooo:paragraph-rsid="0c83b7bd"/>
    </style:style>
    <style:style style:name="P896" style:family="paragraph" style:parent-style-name="Heading_20_3">
      <style:text-properties officeooo:paragraph-rsid="0cd244d9"/>
    </style:style>
    <style:style style:name="P897" style:family="paragraph" style:parent-style-name="Heading_20_3">
      <style:text-properties officeooo:paragraph-rsid="0d642270"/>
    </style:style>
    <style:style style:name="P898" style:family="paragraph" style:parent-style-name="Heading_20_3">
      <style:text-properties officeooo:paragraph-rsid="0d843c4d"/>
    </style:style>
    <style:style style:name="P899" style:family="paragraph" style:parent-style-name="Quotations" style:list-style-name="L12">
      <style:text-properties officeooo:rsid="0a0756f6" officeooo:paragraph-rsid="0a081b62"/>
    </style:style>
    <style:style style:name="P900" style:family="paragraph" style:parent-style-name="Text_20_body" style:list-style-name="L1">
      <style:text-properties officeooo:rsid="0851d3de" officeooo:paragraph-rsid="0851d3de"/>
    </style:style>
    <style:style style:name="P901" style:family="paragraph" style:parent-style-name="Text_20_body" style:list-style-name="L2">
      <style:text-properties officeooo:rsid="0889077f" officeooo:paragraph-rsid="088d4d9f"/>
    </style:style>
    <style:style style:name="P902" style:family="paragraph" style:parent-style-name="Text_20_body" style:list-style-name="L2">
      <style:text-properties officeooo:rsid="088be661" officeooo:paragraph-rsid="088d4d9f"/>
    </style:style>
    <style:style style:name="P903" style:family="paragraph" style:parent-style-name="Text_20_body" style:list-style-name="L2">
      <style:text-properties officeooo:rsid="088d4d9f" officeooo:paragraph-rsid="088d4d9f"/>
    </style:style>
    <style:style style:name="P904" style:family="paragraph" style:parent-style-name="Text_20_body" style:list-style-name="L3">
      <style:text-properties officeooo:rsid="089d852c" officeooo:paragraph-rsid="089d852c"/>
    </style:style>
    <style:style style:name="P905" style:family="paragraph" style:parent-style-name="Text_20_body" style:list-style-name="L4">
      <style:text-properties officeooo:rsid="089f59bd" officeooo:paragraph-rsid="08a328f5"/>
    </style:style>
    <style:style style:name="P906" style:family="paragraph" style:parent-style-name="Text_20_body" style:list-style-name="L4">
      <style:text-properties officeooo:rsid="089f59bd" officeooo:paragraph-rsid="089f59bd"/>
    </style:style>
    <style:style style:name="P907" style:family="paragraph" style:parent-style-name="Text_20_body" style:list-style-name="L5">
      <style:text-properties officeooo:rsid="08f6cbce" officeooo:paragraph-rsid="08f6cbce"/>
    </style:style>
    <style:style style:name="P908" style:family="paragraph" style:parent-style-name="Text_20_body" style:list-style-name="L5">
      <style:text-properties officeooo:rsid="08f6cbce" officeooo:paragraph-rsid="08f845a6"/>
    </style:style>
    <style:style style:name="P909" style:family="paragraph" style:parent-style-name="Text_20_body" style:list-style-name="L6">
      <style:text-properties officeooo:rsid="094c8232" officeooo:paragraph-rsid="094c8232"/>
    </style:style>
    <style:style style:name="P910" style:family="paragraph" style:parent-style-name="Text_20_body" style:list-style-name="L7">
      <style:text-properties officeooo:rsid="0961f6b5" officeooo:paragraph-rsid="0961f6b5"/>
    </style:style>
    <style:style style:name="P911" style:family="paragraph" style:parent-style-name="Text_20_body" style:list-style-name="L8">
      <style:text-properties officeooo:rsid="097a374c" officeooo:paragraph-rsid="097c1ccd"/>
    </style:style>
    <style:style style:name="P912" style:family="paragraph" style:parent-style-name="Text_20_body" style:list-style-name="L8">
      <style:text-properties officeooo:rsid="097c1ccd" officeooo:paragraph-rsid="097c1ccd"/>
    </style:style>
    <style:style style:name="P913" style:family="paragraph" style:parent-style-name="Text_20_body" style:list-style-name="L9">
      <style:text-properties officeooo:rsid="0980102d" officeooo:paragraph-rsid="0980102d"/>
    </style:style>
    <style:style style:name="P914" style:family="paragraph" style:parent-style-name="Text_20_body" style:list-style-name="L10">
      <style:text-properties officeooo:paragraph-rsid="09c30f6c"/>
    </style:style>
    <style:style style:name="P915" style:family="paragraph" style:parent-style-name="Text_20_body" style:list-style-name="L10">
      <style:text-properties officeooo:rsid="09c30f6c" officeooo:paragraph-rsid="09c30f6c"/>
    </style:style>
    <style:style style:name="P916" style:family="paragraph" style:parent-style-name="Text_20_body" style:list-style-name="L10">
      <style:text-properties officeooo:rsid="09c30f6c" officeooo:paragraph-rsid="09c439ad"/>
    </style:style>
    <style:style style:name="P917" style:family="paragraph" style:parent-style-name="Text_20_body" style:list-style-name="L10">
      <style:text-properties officeooo:rsid="09c30f6c" officeooo:paragraph-rsid="09c56f68"/>
    </style:style>
    <style:style style:name="P918" style:family="paragraph" style:parent-style-name="Text_20_body" style:list-style-name="L10">
      <style:text-properties officeooo:rsid="09c56f68" officeooo:paragraph-rsid="09c56f68"/>
    </style:style>
    <style:style style:name="P919" style:family="paragraph" style:parent-style-name="Text_20_body" style:list-style-name="L10">
      <style:text-properties officeooo:rsid="09c57bea" officeooo:paragraph-rsid="09c57bea"/>
    </style:style>
    <style:style style:name="P920" style:family="paragraph" style:parent-style-name="Text_20_body" style:list-style-name="L11">
      <style:text-properties officeooo:paragraph-rsid="09e9a359"/>
    </style:style>
    <style:style style:name="P921" style:family="paragraph" style:parent-style-name="Text_20_body" style:list-style-name="L11">
      <style:text-properties officeooo:paragraph-rsid="09eb8d7b"/>
    </style:style>
    <style:style style:name="P922" style:family="paragraph" style:parent-style-name="Text_20_body" style:list-style-name="L13">
      <style:text-properties officeooo:rsid="0a25a156" officeooo:paragraph-rsid="0a25a156"/>
    </style:style>
    <style:style style:name="P923" style:family="paragraph" style:parent-style-name="Text_20_body" style:list-style-name="L14">
      <style:text-properties officeooo:rsid="0a289075" officeooo:paragraph-rsid="0a289075"/>
    </style:style>
    <style:style style:name="P924" style:family="paragraph" style:parent-style-name="Text_20_body" style:list-style-name="L14">
      <style:text-properties officeooo:rsid="0a289075" officeooo:paragraph-rsid="0a29b713"/>
    </style:style>
    <style:style style:name="P925" style:family="paragraph" style:parent-style-name="Text_20_body" style:list-style-name="L14">
      <style:text-properties officeooo:rsid="0a29b713" officeooo:paragraph-rsid="0a29b713"/>
    </style:style>
    <style:style style:name="P926" style:family="paragraph" style:parent-style-name="Text_20_body" style:list-style-name="L15">
      <style:text-properties officeooo:rsid="0abfdfcf" officeooo:paragraph-rsid="0abfdfcf"/>
    </style:style>
    <style:style style:name="P927" style:family="paragraph" style:parent-style-name="Text_20_body" style:list-style-name="L68">
      <style:text-properties officeooo:rsid="0abfdfcf" officeooo:paragraph-rsid="0acf3102"/>
    </style:style>
    <style:style style:name="P928" style:family="paragraph" style:parent-style-name="Text_20_body" style:list-style-name="L67">
      <style:text-properties officeooo:rsid="0acf3102" officeooo:paragraph-rsid="0ad57a5f"/>
    </style:style>
    <style:style style:name="P929" style:family="paragraph" style:parent-style-name="Text_20_body" style:list-style-name="L68">
      <style:text-properties officeooo:rsid="0acf3102" officeooo:paragraph-rsid="0ad57a5f"/>
    </style:style>
    <style:style style:name="P930" style:family="paragraph" style:parent-style-name="Text_20_body" style:list-style-name="L68">
      <style:text-properties officeooo:rsid="0acf3102" officeooo:paragraph-rsid="0acf3102"/>
    </style:style>
    <style:style style:name="P931" style:family="paragraph" style:parent-style-name="Text_20_body" style:list-style-name="L68">
      <style:text-properties officeooo:rsid="0acf3102" officeooo:paragraph-rsid="0ad0060d"/>
    </style:style>
    <style:style style:name="P932" style:family="paragraph" style:parent-style-name="Text_20_body" style:list-style-name="L67">
      <style:text-properties officeooo:rsid="0ad6a869" officeooo:paragraph-rsid="0ad6a869"/>
    </style:style>
    <style:style style:name="P933" style:family="paragraph" style:parent-style-name="Text_20_body" style:list-style-name="L66">
      <style:text-properties officeooo:rsid="0ad83eee" officeooo:paragraph-rsid="0adae246"/>
    </style:style>
    <style:style style:name="P934" style:family="paragraph" style:parent-style-name="Text_20_body" style:list-style-name="L67">
      <style:text-properties officeooo:rsid="0ad83eee" officeooo:paragraph-rsid="0ad86be7"/>
    </style:style>
    <style:style style:name="P935" style:family="paragraph" style:parent-style-name="Text_20_body" style:list-style-name="L67">
      <style:text-properties officeooo:rsid="0ad83eee" officeooo:paragraph-rsid="0ad83eee"/>
    </style:style>
    <style:style style:name="P936" style:family="paragraph" style:parent-style-name="Text_20_body" style:list-style-name="L66">
      <style:text-properties officeooo:rsid="0ad8ef50" officeooo:paragraph-rsid="0ad8ef50"/>
    </style:style>
    <style:style style:name="P937" style:family="paragraph" style:parent-style-name="Text_20_body" style:list-style-name="L65">
      <style:text-properties officeooo:rsid="0adff3e8" officeooo:paragraph-rsid="0adff3e8"/>
    </style:style>
    <style:style style:name="P938" style:family="paragraph" style:parent-style-name="Text_20_body" style:list-style-name="L20">
      <style:text-properties officeooo:rsid="0af8cfee" officeooo:paragraph-rsid="0af8cfee"/>
    </style:style>
    <style:style style:name="P939" style:family="paragraph" style:parent-style-name="Text_20_body" style:list-style-name="L21">
      <style:text-properties officeooo:rsid="0b014320" officeooo:paragraph-rsid="0b0479a4"/>
    </style:style>
    <style:style style:name="P940" style:family="paragraph" style:parent-style-name="Text_20_body" style:list-style-name="L21">
      <style:text-properties officeooo:rsid="0b064a77" officeooo:paragraph-rsid="0b064a77"/>
    </style:style>
    <style:style style:name="P941" style:family="paragraph" style:parent-style-name="Text_20_body" style:list-style-name="L22">
      <style:text-properties officeooo:rsid="0b0956d5" officeooo:paragraph-rsid="0b0956d5"/>
    </style:style>
    <style:style style:name="P942" style:family="paragraph" style:parent-style-name="Text_20_body" style:list-style-name="L23">
      <style:text-properties officeooo:rsid="0b14b6e7" officeooo:paragraph-rsid="0b14b6e7"/>
    </style:style>
    <style:style style:name="P943" style:family="paragraph" style:parent-style-name="Text_20_body" style:list-style-name="L23">
      <style:text-properties officeooo:rsid="0b157833" officeooo:paragraph-rsid="0b157833"/>
    </style:style>
    <style:style style:name="P944" style:family="paragraph" style:parent-style-name="Text_20_body" style:list-style-name="L23">
      <style:text-properties officeooo:rsid="0b1661ee" officeooo:paragraph-rsid="0b1661ee"/>
    </style:style>
    <style:style style:name="P945" style:family="paragraph" style:parent-style-name="Text_20_body" style:list-style-name="L24">
      <style:text-properties officeooo:rsid="0b5a72bf" officeooo:paragraph-rsid="0b5a72bf"/>
    </style:style>
    <style:style style:name="P946" style:family="paragraph" style:parent-style-name="Text_20_body" style:list-style-name="L24">
      <style:text-properties officeooo:rsid="0b5a72bf" officeooo:paragraph-rsid="0b5ac354"/>
    </style:style>
    <style:style style:name="P947" style:family="paragraph" style:parent-style-name="Text_20_body" style:list-style-name="L24">
      <style:text-properties officeooo:rsid="0b5ac354" officeooo:paragraph-rsid="0b5ac354"/>
    </style:style>
    <style:style style:name="P948" style:family="paragraph" style:parent-style-name="Text_20_body" style:list-style-name="L24">
      <style:text-properties officeooo:rsid="0b5b01d4" officeooo:paragraph-rsid="0b5b01d4"/>
    </style:style>
    <style:style style:name="P949" style:family="paragraph" style:parent-style-name="Text_20_body" style:list-style-name="L25">
      <style:text-properties officeooo:rsid="0b5b01d4" officeooo:paragraph-rsid="0b5b01d4"/>
    </style:style>
    <style:style style:name="P950" style:family="paragraph" style:parent-style-name="Text_20_body" style:list-style-name="L26">
      <style:text-properties officeooo:rsid="0b5b01d4" officeooo:paragraph-rsid="0b5b01d4"/>
    </style:style>
    <style:style style:name="P951" style:family="paragraph" style:parent-style-name="Text_20_body" style:list-style-name="L26">
      <style:text-properties officeooo:rsid="0b5b01d4" officeooo:paragraph-rsid="0b5b9f53"/>
    </style:style>
    <style:style style:name="P952" style:family="paragraph" style:parent-style-name="Text_20_body" style:list-style-name="L26">
      <style:text-properties officeooo:rsid="0b5b9f53" officeooo:paragraph-rsid="0b5b9f53"/>
    </style:style>
    <style:style style:name="P953" style:family="paragraph" style:parent-style-name="Text_20_body" style:list-style-name="L27">
      <style:text-properties officeooo:rsid="0b88b912" officeooo:paragraph-rsid="0b88b912"/>
    </style:style>
    <style:style style:name="P954" style:family="paragraph" style:parent-style-name="Text_20_body" style:list-style-name="L28">
      <style:text-properties officeooo:rsid="0b88bac1" officeooo:paragraph-rsid="0b88bac1"/>
    </style:style>
    <style:style style:name="P955" style:family="paragraph" style:parent-style-name="Text_20_body" style:list-style-name="L29">
      <style:text-properties officeooo:rsid="0b8abbea" officeooo:paragraph-rsid="0b8abbea"/>
    </style:style>
    <style:style style:name="P956" style:family="paragraph" style:parent-style-name="Text_20_body" style:list-style-name="L29">
      <style:text-properties officeooo:rsid="0b8c42c8" officeooo:paragraph-rsid="0b8c42c8"/>
    </style:style>
    <style:style style:name="P957" style:family="paragraph" style:parent-style-name="Text_20_body" style:list-style-name="L30">
      <style:text-properties officeooo:rsid="0b8f3939" officeooo:paragraph-rsid="0b9017d3"/>
    </style:style>
    <style:style style:name="P958" style:family="paragraph" style:parent-style-name="Text_20_body" style:list-style-name="L31">
      <style:text-properties officeooo:rsid="0b916914" officeooo:paragraph-rsid="0b94d790"/>
    </style:style>
    <style:style style:name="P959" style:family="paragraph" style:parent-style-name="Text_20_body" style:list-style-name="L31">
      <style:text-properties officeooo:rsid="0b916914" officeooo:paragraph-rsid="0b95280d"/>
    </style:style>
    <style:style style:name="P960" style:family="paragraph" style:parent-style-name="Text_20_body" style:list-style-name="L32">
      <style:text-properties officeooo:rsid="0b916914" officeooo:paragraph-rsid="0b9c92dd"/>
    </style:style>
    <style:style style:name="P961" style:family="paragraph" style:parent-style-name="Text_20_body" style:list-style-name="L33">
      <style:text-properties officeooo:rsid="0b916914" officeooo:paragraph-rsid="0b9dad3c"/>
    </style:style>
    <style:style style:name="P962" style:family="paragraph" style:parent-style-name="Text_20_body" style:list-style-name="L33">
      <style:text-properties officeooo:rsid="0b916914" officeooo:paragraph-rsid="0b9e5abe"/>
    </style:style>
    <style:style style:name="P963" style:family="paragraph" style:parent-style-name="Text_20_body" style:list-style-name="L34">
      <style:text-properties officeooo:rsid="0b916914" officeooo:paragraph-rsid="0ba194db"/>
    </style:style>
    <style:style style:name="P964" style:family="paragraph" style:parent-style-name="Text_20_body" style:list-style-name="L34">
      <style:text-properties officeooo:rsid="0b916914" officeooo:paragraph-rsid="0ba2179c"/>
    </style:style>
    <style:style style:name="P965" style:family="paragraph" style:parent-style-name="Text_20_body" style:list-style-name="L31">
      <style:text-properties officeooo:rsid="0b955826" officeooo:paragraph-rsid="0b955826"/>
    </style:style>
    <style:style style:name="P966" style:family="paragraph" style:parent-style-name="Text_20_body" style:list-style-name="L32">
      <style:text-properties officeooo:rsid="0b9976fd" officeooo:paragraph-rsid="0b9976fd"/>
    </style:style>
    <style:style style:name="P967" style:family="paragraph" style:parent-style-name="Text_20_body" style:list-style-name="L33">
      <style:text-properties officeooo:rsid="0b9dad3c" officeooo:paragraph-rsid="0b9dad3c"/>
    </style:style>
    <style:style style:name="P968" style:family="paragraph" style:parent-style-name="Text_20_body" style:list-style-name="L35">
      <style:text-properties officeooo:paragraph-rsid="0ba3a11d"/>
    </style:style>
    <style:style style:name="P969" style:family="paragraph" style:parent-style-name="Text_20_body" style:list-style-name="L35">
      <style:text-properties officeooo:rsid="0ba56a11" officeooo:paragraph-rsid="0ba56a11"/>
    </style:style>
    <style:style style:name="P970" style:family="paragraph" style:parent-style-name="Text_20_body" style:list-style-name="L35">
      <style:text-properties officeooo:rsid="0ba6d9f5" officeooo:paragraph-rsid="0ba6d9f5"/>
    </style:style>
    <style:style style:name="P971" style:family="paragraph" style:parent-style-name="Text_20_body" style:list-style-name="L36">
      <style:text-properties officeooo:paragraph-rsid="0bf811b8"/>
    </style:style>
    <style:style style:name="P972" style:family="paragraph" style:parent-style-name="Text_20_body" style:list-style-name="L36">
      <style:text-properties officeooo:paragraph-rsid="0bfbed9a"/>
    </style:style>
    <style:style style:name="P973" style:family="paragraph" style:parent-style-name="Text_20_body" style:list-style-name="L36">
      <style:text-properties officeooo:rsid="0bf613fd" officeooo:paragraph-rsid="0bf613fd"/>
    </style:style>
    <style:style style:name="P974" style:family="paragraph" style:parent-style-name="Text_20_body" style:list-style-name="L36">
      <style:text-properties officeooo:rsid="0bf811b8" officeooo:paragraph-rsid="0bf811b8"/>
    </style:style>
    <style:style style:name="P975" style:family="paragraph" style:parent-style-name="Text_20_body" style:list-style-name="L36">
      <style:text-properties officeooo:rsid="0bf983f8" officeooo:paragraph-rsid="0bf983f8"/>
    </style:style>
    <style:style style:name="P976" style:family="paragraph" style:parent-style-name="Text_20_body" style:list-style-name="L36">
      <style:text-properties officeooo:rsid="0bfbed9a" officeooo:paragraph-rsid="0bfbed9a"/>
    </style:style>
    <style:style style:name="P977" style:family="paragraph" style:parent-style-name="Text_20_body" style:list-style-name="L37">
      <style:text-properties officeooo:rsid="0c01c041" officeooo:paragraph-rsid="0c01c041"/>
    </style:style>
    <style:style style:name="P978" style:family="paragraph" style:parent-style-name="Text_20_body" style:list-style-name="L37">
      <style:text-properties officeooo:rsid="0c032520" officeooo:paragraph-rsid="0c032520"/>
    </style:style>
    <style:style style:name="P979" style:family="paragraph" style:parent-style-name="Text_20_body" style:list-style-name="L38">
      <style:text-properties officeooo:paragraph-rsid="0c763d61"/>
    </style:style>
    <style:style style:name="P980" style:family="paragraph" style:parent-style-name="Text_20_body" style:list-style-name="L39">
      <style:text-properties officeooo:rsid="0c7a2719" officeooo:paragraph-rsid="0c7a2719"/>
    </style:style>
    <style:style style:name="P981" style:family="paragraph" style:parent-style-name="Text_20_body" style:list-style-name="L40">
      <style:text-properties officeooo:rsid="0cb668c9" officeooo:paragraph-rsid="0cb6daa2"/>
    </style:style>
    <style:style style:name="P982" style:family="paragraph" style:parent-style-name="Text_20_body" style:list-style-name="L40">
      <style:text-properties officeooo:rsid="0cb7dd22" officeooo:paragraph-rsid="0cb7dd22"/>
    </style:style>
    <style:style style:name="P983" style:family="paragraph" style:parent-style-name="Text_20_body" style:list-style-name="L41">
      <style:text-properties officeooo:rsid="0cc12f2f" officeooo:paragraph-rsid="0cc12f2f"/>
    </style:style>
    <style:style style:name="P984" style:family="paragraph" style:parent-style-name="Text_20_body" style:list-style-name="L41">
      <style:text-properties officeooo:rsid="0cc2623b" officeooo:paragraph-rsid="0cc2623b"/>
    </style:style>
    <style:style style:name="P985" style:family="paragraph" style:parent-style-name="Text_20_body" style:list-style-name="L42">
      <style:text-properties officeooo:rsid="0cda0806" officeooo:paragraph-rsid="0cda0806"/>
    </style:style>
    <style:style style:name="P986" style:family="paragraph" style:parent-style-name="Text_20_body" style:list-style-name="L42">
      <style:text-properties officeooo:rsid="0cda0806" officeooo:paragraph-rsid="0cdb35bb"/>
    </style:style>
    <style:style style:name="P987" style:family="paragraph" style:parent-style-name="Text_20_body" style:list-style-name="L64">
      <style:text-properties officeooo:rsid="0d1c3a20" officeooo:paragraph-rsid="0d21ccc8"/>
    </style:style>
    <style:style style:name="P988" style:family="paragraph" style:parent-style-name="Text_20_body" style:list-style-name="L64">
      <style:text-properties officeooo:rsid="0d224fe2" officeooo:paragraph-rsid="0d231d9d"/>
    </style:style>
    <style:style style:name="P989" style:family="paragraph" style:parent-style-name="Text_20_body" style:list-style-name="L44">
      <style:text-properties officeooo:paragraph-rsid="0d303d97"/>
    </style:style>
    <style:style style:name="P990" style:family="paragraph" style:parent-style-name="Text_20_body" style:list-style-name="L44">
      <style:text-properties officeooo:rsid="0d2d4d4b" officeooo:paragraph-rsid="0d2d4d4b"/>
    </style:style>
    <style:style style:name="P991" style:family="paragraph" style:parent-style-name="Text_20_body" style:list-style-name="L44">
      <style:text-properties officeooo:rsid="0d2d4d4b" officeooo:paragraph-rsid="0d303d97"/>
    </style:style>
    <style:style style:name="P992" style:family="paragraph" style:parent-style-name="Text_20_body" style:list-style-name="L63">
      <style:text-properties officeooo:rsid="0d304051" officeooo:paragraph-rsid="0d304051"/>
    </style:style>
    <style:style style:name="P993" style:family="paragraph" style:parent-style-name="Text_20_body" style:list-style-name="L62">
      <style:paragraph-properties fo:text-align="start" style:justify-single-word="false"/>
      <style:text-properties officeooo:rsid="0d30c7b5" officeooo:paragraph-rsid="0d30c7b5"/>
    </style:style>
    <style:style style:name="P994" style:family="paragraph" style:parent-style-name="Text_20_body" style:list-style-name="L61">
      <style:paragraph-properties fo:text-align="start" style:justify-single-word="false"/>
      <style:text-properties officeooo:paragraph-rsid="0d35e2fd"/>
    </style:style>
    <style:style style:name="P995" style:family="paragraph" style:parent-style-name="Text_20_body" style:list-style-name="L62">
      <style:paragraph-properties fo:text-align="start" style:justify-single-word="false"/>
      <style:text-properties officeooo:paragraph-rsid="0d3180bc"/>
    </style:style>
    <style:style style:name="P996" style:family="paragraph" style:parent-style-name="Text_20_body" style:list-style-name="L61">
      <style:paragraph-properties fo:text-align="start" style:justify-single-word="false"/>
      <style:text-properties officeooo:rsid="0d345242" officeooo:paragraph-rsid="0d345242"/>
    </style:style>
    <style:style style:name="P997" style:family="paragraph" style:parent-style-name="Text_20_body" style:list-style-name="L61">
      <style:paragraph-properties fo:text-align="start" style:justify-single-word="false"/>
      <style:text-properties officeooo:rsid="0d35e2fd" officeooo:paragraph-rsid="0d35e2fd"/>
    </style:style>
    <style:style style:name="P998" style:family="paragraph" style:parent-style-name="Text_20_body" style:list-style-name="L60">
      <style:paragraph-properties fo:text-align="start" style:justify-single-word="false"/>
      <style:text-properties officeooo:rsid="0d538a1d" officeooo:paragraph-rsid="0d538a1d"/>
    </style:style>
    <style:style style:name="P999" style:family="paragraph" style:parent-style-name="Text_20_body" style:list-style-name="L59">
      <style:text-properties officeooo:rsid="0d71a52f" officeooo:paragraph-rsid="0d71a52f"/>
    </style:style>
    <style:style style:name="P1000" style:family="paragraph" style:parent-style-name="Text_20_body" style:list-style-name="L59">
      <style:text-properties officeooo:rsid="0d71a52f" officeooo:paragraph-rsid="0d7234a1"/>
    </style:style>
    <style:style style:name="P1001" style:family="paragraph" style:parent-style-name="Text_20_body" style:list-style-name="L59">
      <style:text-properties officeooo:rsid="0d7234a1" officeooo:paragraph-rsid="0d7234a1"/>
    </style:style>
    <style:style style:name="P1002" style:family="paragraph" style:parent-style-name="Text_20_body" style:list-style-name="L59">
      <style:text-properties officeooo:rsid="0d642270" officeooo:paragraph-rsid="0d730bb2"/>
    </style:style>
    <style:style style:name="P1003" style:family="paragraph" style:parent-style-name="Text_20_body" style:list-style-name="L51">
      <style:text-properties officeooo:rsid="0d9b391c" officeooo:paragraph-rsid="0d9b391c"/>
    </style:style>
    <style:style style:name="P1004" style:family="paragraph" style:parent-style-name="Text_20_body" style:list-style-name="L51">
      <style:text-properties officeooo:rsid="0d9b391c" officeooo:paragraph-rsid="0d9c942a"/>
    </style:style>
    <style:style style:name="P1005" style:family="paragraph" style:parent-style-name="Text_20_body" style:list-style-name="L51">
      <style:text-properties officeooo:rsid="0d9c942a" officeooo:paragraph-rsid="0d9c942a"/>
    </style:style>
    <style:style style:name="P1006" style:family="paragraph" style:parent-style-name="Text_20_body" style:list-style-name="L52">
      <style:text-properties officeooo:rsid="0da009bf" officeooo:paragraph-rsid="0da009bf"/>
    </style:style>
    <style:style style:name="P1007" style:family="paragraph" style:parent-style-name="Text_20_body" style:list-style-name="L53">
      <style:text-properties officeooo:paragraph-rsid="0da383fe"/>
    </style:style>
    <style:style style:name="P1008" style:family="paragraph" style:parent-style-name="Text_20_body" style:list-style-name="L53">
      <style:text-properties officeooo:rsid="0da383fe" officeooo:paragraph-rsid="0da383fe"/>
    </style:style>
    <style:style style:name="P1009" style:family="paragraph" style:parent-style-name="Text_20_body" style:list-style-name="L54">
      <style:text-properties officeooo:rsid="0da448ce" officeooo:paragraph-rsid="0da448ce"/>
    </style:style>
    <style:style style:name="P1010" style:family="paragraph" style:parent-style-name="Text_20_body" style:list-style-name="L55">
      <style:text-properties officeooo:rsid="0da5b8c0" officeooo:paragraph-rsid="0da5b8c0"/>
    </style:style>
    <style:style style:name="P1011" style:family="paragraph" style:parent-style-name="Text_20_body" style:list-style-name="L56"/>
    <style:style style:name="P1012" style:family="paragraph" style:parent-style-name="Text_20_body" style:list-style-name="L56">
      <style:text-properties officeooo:rsid="0dab08a6" officeooo:paragraph-rsid="0dab08a6"/>
    </style:style>
    <style:style style:name="P1013" style:family="paragraph" style:parent-style-name="Text_20_body" style:list-style-name="L56">
      <style:text-properties officeooo:rsid="0da943a2" officeooo:paragraph-rsid="0dab08a6"/>
    </style:style>
    <style:style style:name="P1014" style:family="paragraph" style:parent-style-name="Text_20_body" style:list-style-name="L57">
      <style:text-properties officeooo:rsid="0dacd1a9" officeooo:paragraph-rsid="0dae2c8e"/>
    </style:style>
    <style:style style:name="P1015" style:family="paragraph" style:parent-style-name="Text_20_body" style:list-style-name="L57">
      <style:text-properties officeooo:rsid="0dae6cc5" officeooo:paragraph-rsid="0dae6cc5"/>
    </style:style>
    <style:style style:name="P1016" style:family="paragraph" style:parent-style-name="Text_20_body" style:list-style-name="L58">
      <style:text-properties officeooo:rsid="0db25de7" officeooo:paragraph-rsid="0db25de7"/>
    </style:style>
    <style:style style:name="P1017" style:family="paragraph" style:parent-style-name="Text_20_body" style:list-style-name="L58">
      <style:text-properties officeooo:rsid="0db32cb3" officeooo:paragraph-rsid="0db32cb3"/>
    </style:style>
    <style:style style:name="P1018" style:family="paragraph" style:parent-style-name="Text_20_body" style:list-style-name="L63">
      <style:text-properties officeooo:paragraph-rsid="0d30c7b5"/>
    </style:style>
    <style:style style:name="P1019" style:family="paragraph" style:parent-style-name="Text_20_body" style:list-style-name="L63">
      <style:text-properties officeooo:paragraph-rsid="0d304051"/>
    </style:style>
    <style:style style:name="P1020" style:family="paragraph" style:parent-style-name="Text_20_body" style:list-style-name="L64">
      <style:text-properties officeooo:paragraph-rsid="0d270afc"/>
    </style:style>
    <style:style style:name="P1021" style:family="paragraph" style:parent-style-name="Text_20_body" style:list-style-name="L64">
      <style:text-properties officeooo:paragraph-rsid="0d262baf"/>
    </style:style>
    <style:style style:name="P1022" style:family="paragraph" style:parent-style-name="Text_20_body" style:list-style-name="L68">
      <style:text-properties officeooo:paragraph-rsid="0acbc5ae"/>
    </style:style>
    <style:style style:name="P1023"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024" style:family="paragraph">
      <style:paragraph-properties fo:margin-left="0in" fo:margin-right="0.3937in" fo:text-indent="0in"/>
    </style:style>
    <style:style style:name="T1" style:family="text">
      <style:text-properties officeooo:rsid="001f5abe"/>
    </style:style>
    <style:style style:name="T2" style:family="text">
      <style:text-properties style:font-name="Liberation Sans" fo:font-size="18pt" officeooo:rsid="084a1ab0" style:font-name-asian="Noto Sans CJK SC" style:font-size-asian="18pt" style:font-name-complex="Lohit Devanagari1" style:font-size-complex="18pt"/>
    </style:style>
    <style:style style:name="T3" style:family="text">
      <style:text-properties style:font-name="Liberation Sans" fo:font-size="14.1000003814697pt" fo:font-weight="bold" officeooo:rsid="0a60678c" style:font-name-asian="Noto Sans CJK SC" style:font-size-asian="14.1000003814697pt" style:font-weight-asian="bold" style:font-name-complex="Lohit Devanagari1" style:font-size-complex="14.1000003814697pt" style:font-weight-complex="bold"/>
    </style:style>
    <style:style style:name="T4" style:family="text">
      <style:text-properties officeooo:rsid="084a1ab0"/>
    </style:style>
    <style:style style:name="T5" style:family="text">
      <style:text-properties officeooo:rsid="084e244d"/>
    </style:style>
    <style:style style:name="T6" style:family="text">
      <style:text-properties officeooo:rsid="0850338f"/>
    </style:style>
    <style:style style:name="T7" style:family="text">
      <style:text-properties officeooo:rsid="085048b5"/>
    </style:style>
    <style:style style:name="T8" style:family="text">
      <style:text-properties officeooo:rsid="0851f081"/>
    </style:style>
    <style:style style:name="T9" style:family="text">
      <style:text-properties officeooo:rsid="0852e0ca"/>
    </style:style>
    <style:style style:name="T10" style:family="text">
      <style:text-properties officeooo:rsid="08549a88"/>
    </style:style>
    <style:style style:name="T11" style:family="text">
      <style:text-properties officeooo:rsid="0855ad27"/>
    </style:style>
    <style:style style:name="T12" style:family="text">
      <style:text-properties officeooo:rsid="08575e26"/>
    </style:style>
    <style:style style:name="T13" style:family="text">
      <style:text-properties officeooo:rsid="085876d7"/>
    </style:style>
    <style:style style:name="T14" style:family="text">
      <style:text-properties officeooo:rsid="0858f4bd"/>
    </style:style>
    <style:style style:name="T15" style:family="text">
      <style:text-properties officeooo:rsid="085a249d"/>
    </style:style>
    <style:style style:name="T16" style:family="text">
      <style:text-properties officeooo:rsid="085b904a"/>
    </style:style>
    <style:style style:name="T17" style:family="text">
      <style:text-properties officeooo:rsid="085f6ac8"/>
    </style:style>
    <style:style style:name="T18" style:family="text">
      <style:text-properties officeooo:rsid="0862521f"/>
    </style:style>
    <style:style style:name="T19" style:family="text">
      <style:text-properties officeooo:rsid="086379cf"/>
    </style:style>
    <style:style style:name="T20" style:family="text">
      <style:text-properties officeooo:rsid="08651223"/>
    </style:style>
    <style:style style:name="T21" style:family="text">
      <style:text-properties officeooo:rsid="08674d4b"/>
    </style:style>
    <style:style style:name="T22" style:family="text">
      <style:text-properties officeooo:rsid="08680fe3"/>
    </style:style>
    <style:style style:name="T23" style:family="text">
      <style:text-properties officeooo:rsid="086a075d"/>
    </style:style>
    <style:style style:name="T24" style:family="text">
      <style:text-properties officeooo:rsid="086a85d8"/>
    </style:style>
    <style:style style:name="T25" style:family="text">
      <style:text-properties officeooo:rsid="086bd057"/>
    </style:style>
    <style:style style:name="T26" style:family="text">
      <style:text-properties officeooo:rsid="0871a7c2"/>
    </style:style>
    <style:style style:name="T27" style:family="text">
      <style:text-properties officeooo:rsid="0875603d"/>
    </style:style>
    <style:style style:name="T28" style:family="text">
      <style:text-properties officeooo:rsid="087670ba"/>
    </style:style>
    <style:style style:name="T29" style:family="text">
      <style:text-properties officeooo:rsid="087a5041"/>
    </style:style>
    <style:style style:name="T30" style:family="text">
      <style:text-properties officeooo:rsid="087c49e9"/>
    </style:style>
    <style:style style:name="T31" style:family="text">
      <style:text-properties officeooo:rsid="087dd3b4"/>
    </style:style>
    <style:style style:name="T32" style:family="text">
      <style:text-properties officeooo:rsid="0880066c"/>
    </style:style>
    <style:style style:name="T33" style:family="text">
      <style:text-properties officeooo:rsid="0883bc47"/>
    </style:style>
    <style:style style:name="T34" style:family="text">
      <style:text-properties officeooo:rsid="0884df00"/>
    </style:style>
    <style:style style:name="T35" style:family="text">
      <style:text-properties officeooo:rsid="088528f9"/>
    </style:style>
    <style:style style:name="T36" style:family="text">
      <style:text-properties officeooo:rsid="0886783c"/>
    </style:style>
    <style:style style:name="T37" style:family="text">
      <style:text-properties officeooo:rsid="0887fcff"/>
    </style:style>
    <style:style style:name="T38" style:family="text">
      <style:text-properties officeooo:rsid="088873f1"/>
    </style:style>
    <style:style style:name="T39" style:family="text">
      <style:text-properties officeooo:rsid="0889e681"/>
    </style:style>
    <style:style style:name="T40" style:family="text">
      <style:text-properties officeooo:rsid="088b9d44"/>
    </style:style>
    <style:style style:name="T41" style:family="text">
      <style:text-properties officeooo:rsid="088be661"/>
    </style:style>
    <style:style style:name="T42" style:family="text">
      <style:text-properties officeooo:rsid="088d4d9f"/>
    </style:style>
    <style:style style:name="T43" style:family="text">
      <style:text-properties officeooo:rsid="088f26f3"/>
    </style:style>
    <style:style style:name="T44" style:family="text">
      <style:text-properties officeooo:rsid="08914740"/>
    </style:style>
    <style:style style:name="T45" style:family="text">
      <style:text-properties officeooo:rsid="089796aa"/>
    </style:style>
    <style:style style:name="T46" style:family="text">
      <style:text-properties officeooo:rsid="0898bf2d"/>
    </style:style>
    <style:style style:name="T47" style:family="text">
      <style:text-properties officeooo:rsid="08997312"/>
    </style:style>
    <style:style style:name="T48" style:family="text">
      <style:text-properties officeooo:rsid="089afd50"/>
    </style:style>
    <style:style style:name="T49" style:family="text">
      <style:text-properties officeooo:rsid="089c0d84"/>
    </style:style>
    <style:style style:name="T50" style:family="text">
      <style:text-properties officeooo:rsid="089d852c"/>
    </style:style>
    <style:style style:name="T51" style:family="text">
      <style:text-properties officeooo:rsid="08a328f5"/>
    </style:style>
    <style:style style:name="T52" style:family="text">
      <style:text-properties officeooo:rsid="08a762f1"/>
    </style:style>
    <style:style style:name="T53" style:family="text">
      <style:text-properties officeooo:rsid="08a8a36b"/>
    </style:style>
    <style:style style:name="T54" style:family="text">
      <style:text-properties officeooo:rsid="08aa450c"/>
    </style:style>
    <style:style style:name="T55" style:family="text">
      <style:text-properties officeooo:rsid="08aad81a"/>
    </style:style>
    <style:style style:name="T56" style:family="text">
      <style:text-properties officeooo:rsid="08abcdc0"/>
    </style:style>
    <style:style style:name="T57" style:family="text">
      <style:text-properties officeooo:rsid="08ac3987"/>
    </style:style>
    <style:style style:name="T58" style:family="text">
      <style:text-properties officeooo:rsid="08add5ea"/>
    </style:style>
    <style:style style:name="T59" style:family="text">
      <style:text-properties officeooo:rsid="08af6227"/>
    </style:style>
    <style:style style:name="T60" style:family="text">
      <style:text-properties officeooo:rsid="08b1ab05"/>
    </style:style>
    <style:style style:name="T61" style:family="text">
      <style:text-properties officeooo:rsid="08b3570e"/>
    </style:style>
    <style:style style:name="T62" style:family="text">
      <style:text-properties officeooo:rsid="08b3c55a"/>
    </style:style>
    <style:style style:name="T63" style:family="text">
      <style:text-properties officeooo:rsid="08b3d8a2"/>
    </style:style>
    <style:style style:name="T64" style:family="text">
      <style:text-properties officeooo:rsid="08b52507"/>
    </style:style>
    <style:style style:name="T65" style:family="text">
      <style:text-properties officeooo:rsid="08b603c2"/>
    </style:style>
    <style:style style:name="T66" style:family="text">
      <style:text-properties officeooo:rsid="08b7fc55"/>
    </style:style>
    <style:style style:name="T67" style:family="text">
      <style:text-properties officeooo:rsid="08b8bc55"/>
    </style:style>
    <style:style style:name="T68" style:family="text">
      <style:text-properties officeooo:rsid="08b91c09"/>
    </style:style>
    <style:style style:name="T69" style:family="text">
      <style:text-properties officeooo:rsid="08b9bd70"/>
    </style:style>
    <style:style style:name="T70" style:family="text">
      <style:text-properties officeooo:rsid="08bac233"/>
    </style:style>
    <style:style style:name="T71" style:family="text">
      <style:text-properties officeooo:rsid="08bc7608"/>
    </style:style>
    <style:style style:name="T72" style:family="text">
      <style:text-properties officeooo:rsid="08c01281"/>
    </style:style>
    <style:style style:name="T73" style:family="text">
      <style:text-properties officeooo:rsid="08c143ea"/>
    </style:style>
    <style:style style:name="T74" style:family="text">
      <style:text-properties officeooo:rsid="08c17a93"/>
    </style:style>
    <style:style style:name="T75" style:family="text">
      <style:text-properties officeooo:rsid="08c3031f"/>
    </style:style>
    <style:style style:name="T76" style:family="text">
      <style:text-properties officeooo:rsid="08c3b492"/>
    </style:style>
    <style:style style:name="T77" style:family="text">
      <style:text-properties officeooo:rsid="08c444ab"/>
    </style:style>
    <style:style style:name="T78" style:family="text">
      <style:text-properties officeooo:rsid="08c61000"/>
    </style:style>
    <style:style style:name="T79" style:family="text">
      <style:text-properties officeooo:rsid="08c6fd74"/>
    </style:style>
    <style:style style:name="T80" style:family="text">
      <style:text-properties officeooo:rsid="08c71cd5"/>
    </style:style>
    <style:style style:name="T81" style:family="text">
      <style:text-properties officeooo:rsid="08c8a885"/>
    </style:style>
    <style:style style:name="T82" style:family="text">
      <style:text-properties officeooo:rsid="08ca6442"/>
    </style:style>
    <style:style style:name="T83" style:family="text">
      <style:text-properties officeooo:rsid="08cea287"/>
    </style:style>
    <style:style style:name="T84" style:family="text">
      <style:text-properties officeooo:rsid="08d09eb3"/>
    </style:style>
    <style:style style:name="T85" style:family="text">
      <style:text-properties officeooo:rsid="08d0d4f6"/>
    </style:style>
    <style:style style:name="T86" style:family="text">
      <style:text-properties officeooo:rsid="08d25f73"/>
    </style:style>
    <style:style style:name="T87" style:family="text">
      <style:text-properties officeooo:rsid="08d34dd2"/>
    </style:style>
    <style:style style:name="T88" style:family="text">
      <style:text-properties officeooo:rsid="08d4ffeb"/>
    </style:style>
    <style:style style:name="T89" style:family="text">
      <style:text-properties officeooo:rsid="08d5fb5a"/>
    </style:style>
    <style:style style:name="T90" style:family="text">
      <style:text-properties officeooo:rsid="08d752f9"/>
    </style:style>
    <style:style style:name="T91" style:family="text">
      <style:text-properties officeooo:rsid="08d879ca"/>
    </style:style>
    <style:style style:name="T92" style:family="text">
      <style:text-properties officeooo:rsid="08da0d69"/>
    </style:style>
    <style:style style:name="T93" style:family="text">
      <style:text-properties officeooo:rsid="08dacf85"/>
    </style:style>
    <style:style style:name="T94" style:family="text">
      <style:text-properties officeooo:rsid="08de7197"/>
    </style:style>
    <style:style style:name="T95" style:family="text">
      <style:text-properties officeooo:rsid="08df2d80"/>
    </style:style>
    <style:style style:name="T96" style:family="text">
      <style:text-properties officeooo:rsid="08e0f680"/>
    </style:style>
    <style:style style:name="T97" style:family="text">
      <style:text-properties officeooo:rsid="08e10f8b"/>
    </style:style>
    <style:style style:name="T98" style:family="text">
      <style:text-properties officeooo:rsid="08e1d70a"/>
    </style:style>
    <style:style style:name="T99" style:family="text">
      <style:text-properties officeooo:rsid="08e23436"/>
    </style:style>
    <style:style style:name="T100" style:family="text">
      <style:text-properties officeooo:rsid="08e3e1a6"/>
    </style:style>
    <style:style style:name="T101" style:family="text">
      <style:text-properties officeooo:rsid="08e489b1"/>
    </style:style>
    <style:style style:name="T102" style:family="text">
      <style:text-properties officeooo:rsid="08e4ede7"/>
    </style:style>
    <style:style style:name="T103" style:family="text">
      <style:text-properties officeooo:rsid="08e56839"/>
    </style:style>
    <style:style style:name="T104" style:family="text">
      <style:text-properties officeooo:rsid="08e70567"/>
    </style:style>
    <style:style style:name="T105" style:family="text">
      <style:text-properties officeooo:rsid="08e9220b"/>
    </style:style>
    <style:style style:name="T106" style:family="text">
      <style:text-properties officeooo:rsid="08ed2a02"/>
    </style:style>
    <style:style style:name="T107" style:family="text">
      <style:text-properties officeooo:rsid="08edfefd"/>
    </style:style>
    <style:style style:name="T108" style:family="text">
      <style:text-properties officeooo:rsid="08f00e68"/>
    </style:style>
    <style:style style:name="T109" style:family="text">
      <style:text-properties officeooo:rsid="08f23f91"/>
    </style:style>
    <style:style style:name="T110" style:family="text">
      <style:text-properties officeooo:rsid="08f43ba9"/>
    </style:style>
    <style:style style:name="T111" style:family="text">
      <style:text-properties officeooo:rsid="08f4f10c"/>
    </style:style>
    <style:style style:name="T112" style:family="text">
      <style:text-properties officeooo:rsid="08f5df0d"/>
    </style:style>
    <style:style style:name="T113" style:family="text">
      <style:text-properties officeooo:rsid="08f78e9e"/>
    </style:style>
    <style:style style:name="T114" style:family="text">
      <style:text-properties officeooo:rsid="08f845a6"/>
    </style:style>
    <style:style style:name="T115" style:family="text">
      <style:text-properties officeooo:rsid="08fa3aad"/>
    </style:style>
    <style:style style:name="T116" style:family="text">
      <style:text-properties officeooo:rsid="08fb3693"/>
    </style:style>
    <style:style style:name="T117" style:family="text">
      <style:text-properties officeooo:rsid="08fd2a49"/>
    </style:style>
    <style:style style:name="T118" style:family="text">
      <style:text-properties officeooo:rsid="08ff97cf"/>
    </style:style>
    <style:style style:name="T119" style:family="text">
      <style:text-properties officeooo:rsid="09017550"/>
    </style:style>
    <style:style style:name="T120" style:family="text">
      <style:text-properties officeooo:rsid="0901f5c4"/>
    </style:style>
    <style:style style:name="T121" style:family="text">
      <style:text-properties officeooo:rsid="0902a3b9"/>
    </style:style>
    <style:style style:name="T122" style:family="text">
      <style:text-properties officeooo:rsid="090458c7"/>
    </style:style>
    <style:style style:name="T123" style:family="text">
      <style:text-properties officeooo:rsid="0905cbc4"/>
    </style:style>
    <style:style style:name="T124" style:family="text">
      <style:text-properties officeooo:rsid="0907aed1"/>
    </style:style>
    <style:style style:name="T125" style:family="text">
      <style:text-properties officeooo:rsid="0909900d"/>
    </style:style>
    <style:style style:name="T126" style:family="text">
      <style:text-properties officeooo:rsid="090dd543"/>
    </style:style>
    <style:style style:name="T127" style:family="text">
      <style:text-properties officeooo:rsid="090e808c"/>
    </style:style>
    <style:style style:name="T128" style:family="text">
      <style:text-properties officeooo:rsid="0911d7b7"/>
    </style:style>
    <style:style style:name="T129" style:family="text">
      <style:text-properties officeooo:rsid="091500ae"/>
    </style:style>
    <style:style style:name="T130" style:family="text">
      <style:text-properties officeooo:rsid="09150a53"/>
    </style:style>
    <style:style style:name="T131" style:family="text">
      <style:text-properties officeooo:rsid="0915f267"/>
    </style:style>
    <style:style style:name="T132" style:family="text">
      <style:text-properties officeooo:rsid="091670a2"/>
    </style:style>
    <style:style style:name="T133" style:family="text">
      <style:text-properties officeooo:rsid="091a7ab4"/>
    </style:style>
    <style:style style:name="T134" style:family="text">
      <style:text-properties officeooo:rsid="091ae8c0"/>
    </style:style>
    <style:style style:name="T135" style:family="text">
      <style:text-properties officeooo:rsid="091b9fc4"/>
    </style:style>
    <style:style style:name="T136" style:family="text">
      <style:text-properties officeooo:rsid="091dd155"/>
    </style:style>
    <style:style style:name="T137" style:family="text">
      <style:text-properties officeooo:rsid="091fa37e"/>
    </style:style>
    <style:style style:name="T138" style:family="text">
      <style:text-properties officeooo:rsid="0920082b"/>
    </style:style>
    <style:style style:name="T139" style:family="text">
      <style:text-properties officeooo:rsid="092145b2"/>
    </style:style>
    <style:style style:name="T140" style:family="text">
      <style:text-properties officeooo:rsid="092387fb"/>
    </style:style>
    <style:style style:name="T141" style:family="text">
      <style:text-properties officeooo:rsid="0928fbf4"/>
    </style:style>
    <style:style style:name="T142" style:family="text">
      <style:text-properties officeooo:rsid="09292dd3"/>
    </style:style>
    <style:style style:name="T143" style:family="text">
      <style:text-properties officeooo:rsid="09293a71"/>
    </style:style>
    <style:style style:name="T144" style:family="text">
      <style:text-properties officeooo:rsid="0929ac88"/>
    </style:style>
    <style:style style:name="T145" style:family="text">
      <style:text-properties officeooo:rsid="092bfb5f"/>
    </style:style>
    <style:style style:name="T146" style:family="text">
      <style:text-properties officeooo:rsid="092e3b01"/>
    </style:style>
    <style:style style:name="T147" style:family="text">
      <style:text-properties officeooo:rsid="09335bb3"/>
    </style:style>
    <style:style style:name="T148" style:family="text">
      <style:text-properties officeooo:rsid="093457b7"/>
    </style:style>
    <style:style style:name="T149" style:family="text">
      <style:text-properties officeooo:rsid="09356ea7"/>
    </style:style>
    <style:style style:name="T150" style:family="text">
      <style:text-properties officeooo:rsid="093a0a1f"/>
    </style:style>
    <style:style style:name="T151" style:family="text">
      <style:text-properties officeooo:rsid="093bb5c2"/>
    </style:style>
    <style:style style:name="T152" style:family="text">
      <style:text-properties officeooo:rsid="0942cb8e"/>
    </style:style>
    <style:style style:name="T153" style:family="text">
      <style:text-properties officeooo:rsid="0943ad32"/>
    </style:style>
    <style:style style:name="T154" style:family="text">
      <style:text-properties officeooo:rsid="09470d17"/>
    </style:style>
    <style:style style:name="T155" style:family="text">
      <style:text-properties officeooo:rsid="094ba591"/>
    </style:style>
    <style:style style:name="T156" style:family="text">
      <style:text-properties officeooo:rsid="094c8232"/>
    </style:style>
    <style:style style:name="T157" style:family="text">
      <style:text-properties officeooo:rsid="094efe8b"/>
    </style:style>
    <style:style style:name="T158" style:family="text">
      <style:text-properties officeooo:rsid="094fca6f"/>
    </style:style>
    <style:style style:name="T159" style:family="text">
      <style:text-properties officeooo:rsid="0951a8a2"/>
    </style:style>
    <style:style style:name="T160" style:family="text">
      <style:text-properties officeooo:rsid="0951c7dd"/>
    </style:style>
    <style:style style:name="T161" style:family="text">
      <style:text-properties officeooo:rsid="0952c024"/>
    </style:style>
    <style:style style:name="T162" style:family="text">
      <style:text-properties officeooo:rsid="09562b0a"/>
    </style:style>
    <style:style style:name="T163" style:family="text">
      <style:text-properties officeooo:rsid="09578963"/>
    </style:style>
    <style:style style:name="T164" style:family="text">
      <style:text-properties officeooo:rsid="0957e410"/>
    </style:style>
    <style:style style:name="T165" style:family="text">
      <style:text-properties officeooo:rsid="0959e904"/>
    </style:style>
    <style:style style:name="T166" style:family="text">
      <style:text-properties officeooo:rsid="095b7949"/>
    </style:style>
    <style:style style:name="T167" style:family="text">
      <style:text-properties officeooo:rsid="095c77dd"/>
    </style:style>
    <style:style style:name="T168" style:family="text">
      <style:text-properties officeooo:rsid="095d7389"/>
    </style:style>
    <style:style style:name="T169" style:family="text">
      <style:text-properties officeooo:rsid="095f05e1"/>
    </style:style>
    <style:style style:name="T170" style:family="text">
      <style:text-properties officeooo:rsid="095fdf35"/>
    </style:style>
    <style:style style:name="T171" style:family="text">
      <style:text-properties officeooo:rsid="0960f418"/>
    </style:style>
    <style:style style:name="T172" style:family="text">
      <style:text-properties officeooo:rsid="09619c7d"/>
    </style:style>
    <style:style style:name="T173" style:family="text">
      <style:text-properties officeooo:rsid="09628466"/>
    </style:style>
    <style:style style:name="T174" style:family="text">
      <style:text-properties officeooo:rsid="09646b76"/>
    </style:style>
    <style:style style:name="T175" style:family="text">
      <style:text-properties officeooo:rsid="0966e411"/>
    </style:style>
    <style:style style:name="T176" style:family="text">
      <style:text-properties officeooo:rsid="09684a4d"/>
    </style:style>
    <style:style style:name="T177" style:family="text">
      <style:text-properties officeooo:rsid="0968fe86"/>
    </style:style>
    <style:style style:name="T178" style:family="text">
      <style:text-properties officeooo:rsid="096a0dc5"/>
    </style:style>
    <style:style style:name="T179" style:family="text">
      <style:text-properties officeooo:rsid="096b2fb5"/>
    </style:style>
    <style:style style:name="T180" style:family="text">
      <style:text-properties officeooo:rsid="096b7d79"/>
    </style:style>
    <style:style style:name="T181" style:family="text">
      <style:text-properties officeooo:rsid="096bd8cf"/>
    </style:style>
    <style:style style:name="T182" style:family="text">
      <style:text-properties officeooo:rsid="096c6803"/>
    </style:style>
    <style:style style:name="T183" style:family="text">
      <style:text-properties officeooo:rsid="096dcaee"/>
    </style:style>
    <style:style style:name="T184" style:family="text">
      <style:text-properties officeooo:rsid="096f7ff8"/>
    </style:style>
    <style:style style:name="T185" style:family="text">
      <style:text-properties officeooo:rsid="09717a62"/>
    </style:style>
    <style:style style:name="T186" style:family="text">
      <style:text-properties officeooo:rsid="0973215e"/>
    </style:style>
    <style:style style:name="T187" style:family="text">
      <style:text-properties officeooo:rsid="09743f31"/>
    </style:style>
    <style:style style:name="T188" style:family="text">
      <style:text-properties officeooo:rsid="09750156"/>
    </style:style>
    <style:style style:name="T189" style:family="text">
      <style:text-properties officeooo:rsid="0975dd25"/>
    </style:style>
    <style:style style:name="T190" style:family="text">
      <style:text-properties officeooo:rsid="097a0a1a"/>
    </style:style>
    <style:style style:name="T191" style:family="text">
      <style:text-properties officeooo:rsid="097c1ccd"/>
    </style:style>
    <style:style style:name="T192" style:family="text">
      <style:text-properties officeooo:rsid="097dce37"/>
    </style:style>
    <style:style style:name="T193" style:family="text">
      <style:text-properties officeooo:rsid="097e0379"/>
    </style:style>
    <style:style style:name="T194" style:family="text">
      <style:text-properties officeooo:rsid="097eb48f"/>
    </style:style>
    <style:style style:name="T195" style:family="text">
      <style:text-properties officeooo:rsid="097f707b"/>
    </style:style>
    <style:style style:name="T196" style:family="text">
      <style:text-properties officeooo:rsid="0980da32"/>
    </style:style>
    <style:style style:name="T197" style:family="text">
      <style:text-properties officeooo:rsid="0982450c"/>
    </style:style>
    <style:style style:name="T198" style:family="text">
      <style:text-properties officeooo:rsid="0980102d"/>
    </style:style>
    <style:style style:name="T199" style:family="text">
      <style:text-properties officeooo:rsid="098536ba"/>
    </style:style>
    <style:style style:name="T200" style:family="text">
      <style:text-properties officeooo:rsid="0986fce9"/>
    </style:style>
    <style:style style:name="T201" style:family="text">
      <style:text-properties officeooo:rsid="0988f2ec"/>
    </style:style>
    <style:style style:name="T202" style:family="text">
      <style:text-properties officeooo:rsid="0989b342"/>
    </style:style>
    <style:style style:name="T203" style:family="text">
      <style:text-properties officeooo:rsid="098ad1da"/>
    </style:style>
    <style:style style:name="T204" style:family="text">
      <style:text-properties officeooo:rsid="09900816"/>
    </style:style>
    <style:style style:name="T205" style:family="text">
      <style:text-properties officeooo:rsid="0990f09b"/>
    </style:style>
    <style:style style:name="T206" style:family="text">
      <style:text-properties officeooo:rsid="0991a65f"/>
    </style:style>
    <style:style style:name="T207" style:family="text">
      <style:text-properties officeooo:rsid="098e28a7"/>
    </style:style>
    <style:style style:name="T208" style:family="text">
      <style:text-properties officeooo:rsid="099361e4"/>
    </style:style>
    <style:style style:name="T209" style:family="text">
      <style:text-properties officeooo:rsid="09958ef5"/>
    </style:style>
    <style:style style:name="T210" style:family="text">
      <style:text-properties officeooo:rsid="0995e16b"/>
    </style:style>
    <style:style style:name="T211" style:family="text">
      <style:text-properties officeooo:rsid="0996bf33"/>
    </style:style>
    <style:style style:name="T212" style:family="text">
      <style:text-properties officeooo:rsid="0998a84a"/>
    </style:style>
    <style:style style:name="T213" style:family="text">
      <style:text-properties officeooo:rsid="09999877"/>
    </style:style>
    <style:style style:name="T214" style:family="text">
      <style:text-properties officeooo:rsid="0999f146"/>
    </style:style>
    <style:style style:name="T215" style:family="text">
      <style:text-properties officeooo:rsid="099ba5f5"/>
    </style:style>
    <style:style style:name="T216" style:family="text">
      <style:text-properties officeooo:rsid="099e568b"/>
    </style:style>
    <style:style style:name="T217" style:family="text">
      <style:text-properties officeooo:rsid="099ea626"/>
    </style:style>
    <style:style style:name="T218" style:family="text">
      <style:text-properties officeooo:rsid="09a0b99a"/>
    </style:style>
    <style:style style:name="T219" style:family="text">
      <style:text-properties officeooo:rsid="09a2acf2"/>
    </style:style>
    <style:style style:name="T220" style:family="text">
      <style:text-properties officeooo:rsid="09a3b519"/>
    </style:style>
    <style:style style:name="T221" style:family="text">
      <style:text-properties officeooo:rsid="09a55bff"/>
    </style:style>
    <style:style style:name="T222" style:family="text">
      <style:text-properties officeooo:rsid="09a670af"/>
    </style:style>
    <style:style style:name="T223" style:family="text">
      <style:text-properties officeooo:rsid="09a844b7"/>
    </style:style>
    <style:style style:name="T224" style:family="text">
      <style:text-properties officeooo:rsid="09a89a3e"/>
    </style:style>
    <style:style style:name="T225" style:family="text">
      <style:text-properties officeooo:rsid="09aa2ade"/>
    </style:style>
    <style:style style:name="T226" style:family="text">
      <style:text-properties officeooo:rsid="09ac540c"/>
    </style:style>
    <style:style style:name="T227" style:family="text">
      <style:text-properties officeooo:rsid="0863dd95"/>
    </style:style>
    <style:style style:name="T228" style:family="text">
      <style:text-properties officeooo:rsid="09afc6b9"/>
    </style:style>
    <style:style style:name="T229" style:family="text">
      <style:text-properties officeooo:rsid="09b2367c"/>
    </style:style>
    <style:style style:name="T230" style:family="text">
      <style:text-properties officeooo:rsid="09b39cbd"/>
    </style:style>
    <style:style style:name="T231" style:family="text">
      <style:text-properties officeooo:rsid="09b4b384"/>
    </style:style>
    <style:style style:name="T232" style:family="text">
      <style:text-properties officeooo:rsid="09c07a8b"/>
    </style:style>
    <style:style style:name="T233" style:family="text">
      <style:text-properties officeooo:rsid="09c1ac32"/>
    </style:style>
    <style:style style:name="T234" style:family="text">
      <style:text-properties officeooo:rsid="09c30f6c"/>
    </style:style>
    <style:style style:name="T235" style:family="text">
      <style:text-properties officeooo:rsid="09c439ad"/>
    </style:style>
    <style:style style:name="T236" style:family="text">
      <style:text-properties officeooo:rsid="09c49d5a"/>
    </style:style>
    <style:style style:name="T237" style:family="text">
      <style:text-properties officeooo:rsid="09c56f68"/>
    </style:style>
    <style:style style:name="T238" style:family="text">
      <style:text-properties officeooo:rsid="09c57bea"/>
    </style:style>
    <style:style style:name="T239" style:family="text">
      <style:text-properties officeooo:rsid="09c84680"/>
    </style:style>
    <style:style style:name="T240" style:family="text">
      <style:text-properties officeooo:rsid="09ccafd3"/>
    </style:style>
    <style:style style:name="T241" style:family="text">
      <style:text-properties officeooo:rsid="09ce7e7f"/>
    </style:style>
    <style:style style:name="T242" style:family="text">
      <style:text-properties officeooo:rsid="09ce813e"/>
    </style:style>
    <style:style style:name="T243" style:family="text">
      <style:text-properties officeooo:rsid="09cfce26"/>
    </style:style>
    <style:style style:name="T244" style:family="text">
      <style:text-properties officeooo:rsid="09d59bba"/>
    </style:style>
    <style:style style:name="T245" style:family="text">
      <style:text-properties officeooo:rsid="09d5d40c"/>
    </style:style>
    <style:style style:name="T246" style:family="text">
      <style:text-properties officeooo:rsid="09de0869"/>
    </style:style>
    <style:style style:name="T247" style:family="text">
      <style:text-properties officeooo:rsid="09dee93d"/>
    </style:style>
    <style:style style:name="T248" style:family="text">
      <style:text-properties officeooo:rsid="09e074b1"/>
    </style:style>
    <style:style style:name="T249" style:family="text">
      <style:text-properties officeooo:rsid="09e34516"/>
    </style:style>
    <style:style style:name="T250" style:family="text">
      <style:text-properties officeooo:rsid="09e43fba"/>
    </style:style>
    <style:style style:name="T251" style:family="text">
      <style:text-properties officeooo:rsid="09e50a16"/>
    </style:style>
    <style:style style:name="T252" style:family="text">
      <style:text-properties officeooo:rsid="09e62e44"/>
    </style:style>
    <style:style style:name="T253" style:family="text">
      <style:text-properties officeooo:rsid="09e7f7a0"/>
    </style:style>
    <style:style style:name="T254" style:family="text">
      <style:text-properties officeooo:rsid="09e83e15"/>
    </style:style>
    <style:style style:name="T255" style:family="text">
      <style:text-properties officeooo:rsid="09e9a359"/>
    </style:style>
    <style:style style:name="T256" style:family="text">
      <style:text-properties officeooo:rsid="09ea5f6f"/>
    </style:style>
    <style:style style:name="T257" style:family="text">
      <style:text-properties officeooo:rsid="09eb8d7b"/>
    </style:style>
    <style:style style:name="T258" style:family="text">
      <style:text-properties officeooo:rsid="09ed7e5e"/>
    </style:style>
    <style:style style:name="T259" style:family="text">
      <style:text-properties officeooo:rsid="09ef3813"/>
    </style:style>
    <style:style style:name="T260" style:family="text">
      <style:text-properties officeooo:rsid="09f19026"/>
    </style:style>
    <style:style style:name="T261" style:family="text">
      <style:text-properties officeooo:rsid="09f259f4"/>
    </style:style>
    <style:style style:name="T262" style:family="text">
      <style:text-properties officeooo:rsid="09f3d877"/>
    </style:style>
    <style:style style:name="T263" style:family="text">
      <style:text-properties officeooo:rsid="09f76c20"/>
    </style:style>
    <style:style style:name="T264" style:family="text">
      <style:text-properties officeooo:rsid="09f82f70"/>
    </style:style>
    <style:style style:name="T265" style:family="text">
      <style:text-properties officeooo:rsid="09fafbaa"/>
    </style:style>
    <style:style style:name="T266" style:family="text">
      <style:text-properties officeooo:rsid="09fee993"/>
    </style:style>
    <style:style style:name="T267" style:family="text">
      <style:text-properties officeooo:rsid="0a008e84"/>
    </style:style>
    <style:style style:name="T268" style:family="text">
      <style:text-properties officeooo:rsid="0a02659d"/>
    </style:style>
    <style:style style:name="T269" style:family="text">
      <style:text-properties officeooo:rsid="0a040ccb"/>
    </style:style>
    <style:style style:name="T270" style:family="text">
      <style:text-properties officeooo:rsid="0a0756f6"/>
    </style:style>
    <style:style style:name="T271" style:family="text">
      <style:text-properties officeooo:rsid="0a081b62"/>
    </style:style>
    <style:style style:name="T272" style:family="text">
      <style:text-properties officeooo:rsid="0a09193c"/>
    </style:style>
    <style:style style:name="T273" style:family="text">
      <style:text-properties officeooo:rsid="0a0ac56b"/>
    </style:style>
    <style:style style:name="T274" style:family="text">
      <style:text-properties officeooo:rsid="0a0bd785"/>
    </style:style>
    <style:style style:name="T275" style:family="text">
      <style:text-properties officeooo:rsid="0a0da89d"/>
    </style:style>
    <style:style style:name="T276" style:family="text">
      <style:text-properties officeooo:rsid="0a0e562c"/>
    </style:style>
    <style:style style:name="T277" style:family="text">
      <style:text-properties officeooo:rsid="0a0ea58d"/>
    </style:style>
    <style:style style:name="T278" style:family="text">
      <style:text-properties officeooo:rsid="0a0f6a73"/>
    </style:style>
    <style:style style:name="T279" style:family="text">
      <style:text-properties officeooo:rsid="0a107794"/>
    </style:style>
    <style:style style:name="T280" style:family="text">
      <style:text-properties officeooo:rsid="0a10fcb7"/>
    </style:style>
    <style:style style:name="T281" style:family="text">
      <style:text-properties officeooo:rsid="0a149396"/>
    </style:style>
    <style:style style:name="T282" style:family="text">
      <style:text-properties officeooo:rsid="0a178fb5"/>
    </style:style>
    <style:style style:name="T283" style:family="text">
      <style:text-properties officeooo:rsid="0a187c75"/>
    </style:style>
    <style:style style:name="T284" style:family="text">
      <style:text-properties officeooo:rsid="0a19d987"/>
    </style:style>
    <style:style style:name="T285" style:family="text">
      <style:text-properties officeooo:rsid="0a1b4cd7"/>
    </style:style>
    <style:style style:name="T286" style:family="text">
      <style:text-properties officeooo:rsid="0a1d45b0"/>
    </style:style>
    <style:style style:name="T287" style:family="text">
      <style:text-properties officeooo:rsid="0a1ff69c"/>
    </style:style>
    <style:style style:name="T288" style:family="text">
      <style:text-properties officeooo:rsid="0a203202"/>
    </style:style>
    <style:style style:name="T289" style:family="text">
      <style:text-properties officeooo:rsid="0a22b793"/>
    </style:style>
    <style:style style:name="T290" style:family="text">
      <style:text-properties officeooo:rsid="0a234742"/>
    </style:style>
    <style:style style:name="T291" style:family="text">
      <style:text-properties officeooo:rsid="0a246231"/>
    </style:style>
    <style:style style:name="T292" style:family="text">
      <style:text-properties officeooo:rsid="0a250cbe"/>
    </style:style>
    <style:style style:name="T293" style:family="text">
      <style:text-properties officeooo:rsid="0a25a156"/>
    </style:style>
    <style:style style:name="T294" style:family="text">
      <style:text-properties officeooo:rsid="0a260a27"/>
    </style:style>
    <style:style style:name="T295" style:family="text">
      <style:text-properties officeooo:rsid="0a29b713"/>
    </style:style>
    <style:style style:name="T296" style:family="text">
      <style:text-properties officeooo:rsid="0a2a926a"/>
    </style:style>
    <style:style style:name="T297" style:family="text">
      <style:text-properties officeooo:rsid="0a2c72f6"/>
    </style:style>
    <style:style style:name="T298" style:family="text">
      <style:text-properties officeooo:rsid="0a2d2727"/>
    </style:style>
    <style:style style:name="T299" style:family="text">
      <style:text-properties officeooo:rsid="0a3087b5"/>
    </style:style>
    <style:style style:name="T300" style:family="text">
      <style:text-properties officeooo:rsid="0a3135f4"/>
    </style:style>
    <style:style style:name="T301" style:family="text">
      <style:text-properties officeooo:rsid="0a29d1bc"/>
    </style:style>
    <style:style style:name="T302" style:family="text">
      <style:text-properties officeooo:rsid="0a32590d"/>
    </style:style>
    <style:style style:name="T303" style:family="text">
      <style:text-properties officeooo:rsid="0a36acda"/>
    </style:style>
    <style:style style:name="T304" style:family="text">
      <style:text-properties officeooo:rsid="0a39e66c"/>
    </style:style>
    <style:style style:name="T305" style:family="text">
      <style:text-properties officeooo:rsid="0a3d1cfc"/>
    </style:style>
    <style:style style:name="T306" style:family="text">
      <style:text-properties officeooo:rsid="0a3d3563"/>
    </style:style>
    <style:style style:name="T307" style:family="text">
      <style:text-properties officeooo:rsid="0a3d7cbe"/>
    </style:style>
    <style:style style:name="T308" style:family="text">
      <style:text-properties officeooo:rsid="0a3e7048"/>
    </style:style>
    <style:style style:name="T309" style:family="text">
      <style:text-properties officeooo:rsid="0a3f49de"/>
    </style:style>
    <style:style style:name="T310" style:family="text">
      <style:text-properties officeooo:rsid="0a3fadb8"/>
    </style:style>
    <style:style style:name="T311" style:family="text">
      <style:text-properties officeooo:rsid="0a4171ff"/>
    </style:style>
    <style:style style:name="T312" style:family="text">
      <style:text-properties officeooo:rsid="0a42e193"/>
    </style:style>
    <style:style style:name="T313" style:family="text">
      <style:text-properties officeooo:rsid="0a4406b4"/>
    </style:style>
    <style:style style:name="T314" style:family="text">
      <style:text-properties officeooo:rsid="0a4540d1"/>
    </style:style>
    <style:style style:name="T315" style:family="text">
      <style:text-properties officeooo:rsid="0a47191d"/>
    </style:style>
    <style:style style:name="T316" style:family="text">
      <style:text-properties officeooo:rsid="0a47b5a7"/>
    </style:style>
    <style:style style:name="T317" style:family="text">
      <style:text-properties officeooo:rsid="0a485571"/>
    </style:style>
    <style:style style:name="T318" style:family="text">
      <style:text-properties officeooo:rsid="0a488f14"/>
    </style:style>
    <style:style style:name="T319" style:family="text">
      <style:text-properties officeooo:rsid="0a492697"/>
    </style:style>
    <style:style style:name="T320" style:family="text">
      <style:text-properties officeooo:rsid="0a49e205"/>
    </style:style>
    <style:style style:name="T321" style:family="text">
      <style:text-properties officeooo:rsid="0a4aa485"/>
    </style:style>
    <style:style style:name="T322" style:family="text">
      <style:text-properties officeooo:rsid="0a4bbaba"/>
    </style:style>
    <style:style style:name="T323" style:family="text">
      <style:text-properties officeooo:rsid="0a51b162"/>
    </style:style>
    <style:style style:name="T324" style:family="text">
      <style:text-properties officeooo:rsid="0a52ec6a"/>
    </style:style>
    <style:style style:name="T325" style:family="text">
      <style:text-properties officeooo:rsid="0a54d09d"/>
    </style:style>
    <style:style style:name="T326" style:family="text">
      <style:text-properties officeooo:rsid="0a5623e3"/>
    </style:style>
    <style:style style:name="T327" style:family="text">
      <style:text-properties officeooo:rsid="0a576c82"/>
    </style:style>
    <style:style style:name="T328" style:family="text">
      <style:text-properties officeooo:rsid="0a5942bb"/>
    </style:style>
    <style:style style:name="T329" style:family="text">
      <style:text-properties officeooo:rsid="0a595cd6"/>
    </style:style>
    <style:style style:name="T330" style:family="text">
      <style:text-properties officeooo:rsid="0a5aad03"/>
    </style:style>
    <style:style style:name="T331" style:family="text">
      <style:text-properties officeooo:rsid="0a5c1d62"/>
    </style:style>
    <style:style style:name="T332" style:family="text">
      <style:text-properties officeooo:rsid="0a5db504"/>
    </style:style>
    <style:style style:name="T333" style:family="text">
      <style:text-properties officeooo:rsid="0a60c4c9"/>
    </style:style>
    <style:style style:name="T334" style:family="text">
      <style:text-properties officeooo:rsid="0a696038"/>
    </style:style>
    <style:style style:name="T335" style:family="text">
      <style:text-properties officeooo:rsid="0a6796a7"/>
    </style:style>
    <style:style style:name="T336" style:family="text">
      <style:text-properties officeooo:rsid="0a6b2f29"/>
    </style:style>
    <style:style style:name="T337" style:family="text">
      <style:text-properties officeooo:rsid="0a6c48c4"/>
    </style:style>
    <style:style style:name="T338" style:family="text">
      <style:text-properties officeooo:rsid="0a6da30f"/>
    </style:style>
    <style:style style:name="T339" style:family="text">
      <style:text-properties officeooo:rsid="0a6f8d9c"/>
    </style:style>
    <style:style style:name="T340" style:family="text">
      <style:text-properties officeooo:rsid="0a6f9c96"/>
    </style:style>
    <style:style style:name="T341" style:family="text">
      <style:text-properties officeooo:rsid="0a74fdc6"/>
    </style:style>
    <style:style style:name="T342" style:family="text">
      <style:text-properties officeooo:rsid="0a783be2"/>
    </style:style>
    <style:style style:name="T343" style:family="text">
      <style:text-properties officeooo:rsid="0a7a404f"/>
    </style:style>
    <style:style style:name="T344" style:family="text">
      <style:text-properties officeooo:rsid="0a7c2082"/>
    </style:style>
    <style:style style:name="T345" style:family="text">
      <style:text-properties officeooo:rsid="0a7c60a7"/>
    </style:style>
    <style:style style:name="T346" style:family="text">
      <style:text-properties officeooo:rsid="0a7d1231"/>
    </style:style>
    <style:style style:name="T347" style:family="text">
      <style:text-properties officeooo:rsid="0a7e2f35"/>
    </style:style>
    <style:style style:name="T348" style:family="text">
      <style:text-properties officeooo:rsid="0a801ae2"/>
    </style:style>
    <style:style style:name="T349" style:family="text">
      <style:text-properties officeooo:rsid="0a80f346"/>
    </style:style>
    <style:style style:name="T350" style:family="text">
      <style:text-properties officeooo:rsid="0a81c68f"/>
    </style:style>
    <style:style style:name="T351" style:family="text">
      <style:text-properties officeooo:rsid="0a81cbc3"/>
    </style:style>
    <style:style style:name="T352" style:family="text">
      <style:text-properties officeooo:rsid="0a825a63"/>
    </style:style>
    <style:style style:name="T353" style:family="text">
      <style:text-properties officeooo:rsid="0a83e628"/>
    </style:style>
    <style:style style:name="T354" style:family="text">
      <style:text-properties officeooo:rsid="0a87c8ab"/>
    </style:style>
    <style:style style:name="T355" style:family="text">
      <style:text-properties officeooo:rsid="0a87cdec"/>
    </style:style>
    <style:style style:name="T356" style:family="text">
      <style:text-properties officeooo:rsid="0a88d5d2"/>
    </style:style>
    <style:style style:name="T357" style:family="text">
      <style:text-properties officeooo:rsid="0a893dc9"/>
    </style:style>
    <style:style style:name="T358" style:family="text">
      <style:text-properties officeooo:rsid="0a89e7ba"/>
    </style:style>
    <style:style style:name="T359" style:family="text">
      <style:text-properties officeooo:rsid="0a8b457f"/>
    </style:style>
    <style:style style:name="T360" style:family="text">
      <style:text-properties officeooo:rsid="0a8b645e"/>
    </style:style>
    <style:style style:name="T361" style:family="text">
      <style:text-properties officeooo:rsid="0a8e5bbc"/>
    </style:style>
    <style:style style:name="T362" style:family="text">
      <style:text-properties officeooo:rsid="0a8e98d5"/>
    </style:style>
    <style:style style:name="T363" style:family="text">
      <style:text-properties officeooo:rsid="0a8f587c"/>
    </style:style>
    <style:style style:name="T364" style:family="text">
      <style:text-properties officeooo:rsid="0a90f18b"/>
    </style:style>
    <style:style style:name="T365" style:family="text">
      <style:text-properties officeooo:rsid="0a9294e5"/>
    </style:style>
    <style:style style:name="T366" style:family="text">
      <style:text-properties officeooo:rsid="0a83ac92"/>
    </style:style>
    <style:style style:name="T367" style:family="text">
      <style:text-properties officeooo:rsid="0a952680"/>
    </style:style>
    <style:style style:name="T368" style:family="text">
      <style:text-properties officeooo:rsid="0a9dd050"/>
    </style:style>
    <style:style style:name="T369" style:family="text">
      <style:text-properties officeooo:rsid="0a9f6fc9"/>
    </style:style>
    <style:style style:name="T370" style:family="text">
      <style:text-properties officeooo:rsid="0aa338ca"/>
    </style:style>
    <style:style style:name="T371" style:family="text">
      <style:text-properties officeooo:rsid="0aa39665"/>
    </style:style>
    <style:style style:name="T372" style:family="text">
      <style:text-properties officeooo:rsid="0aa50e76"/>
    </style:style>
    <style:style style:name="T373" style:family="text">
      <style:text-properties officeooo:rsid="0aa877d9"/>
    </style:style>
    <style:style style:name="T374" style:family="text">
      <style:text-properties officeooo:rsid="0aa8a3ac"/>
    </style:style>
    <style:style style:name="T375" style:family="text">
      <style:text-properties officeooo:rsid="0aa9f39c"/>
    </style:style>
    <style:style style:name="T376" style:family="text">
      <style:text-properties officeooo:rsid="0aabc3ec"/>
    </style:style>
    <style:style style:name="T377" style:family="text">
      <style:text-properties officeooo:rsid="0aad5499"/>
    </style:style>
    <style:style style:name="T378" style:family="text">
      <style:text-properties officeooo:rsid="0aae557a"/>
    </style:style>
    <style:style style:name="T379" style:family="text">
      <style:text-properties officeooo:rsid="0aaee9fd"/>
    </style:style>
    <style:style style:name="T380" style:family="text">
      <style:text-properties officeooo:rsid="0ab0324a"/>
    </style:style>
    <style:style style:name="T381" style:family="text">
      <style:text-properties officeooo:rsid="0ab2aaef"/>
    </style:style>
    <style:style style:name="T382" style:family="text">
      <style:text-properties officeooo:rsid="0ab39bc5"/>
    </style:style>
    <style:style style:name="T383" style:family="text">
      <style:text-properties officeooo:rsid="0ab4342b"/>
    </style:style>
    <style:style style:name="T384" style:family="text">
      <style:text-properties officeooo:rsid="0ab8b688"/>
    </style:style>
    <style:style style:name="T385" style:family="text">
      <style:text-properties officeooo:rsid="0ab9c1d6"/>
    </style:style>
    <style:style style:name="T386" style:family="text">
      <style:text-properties officeooo:rsid="0abb9ba7"/>
    </style:style>
    <style:style style:name="T387" style:family="text">
      <style:text-properties officeooo:rsid="0abc42fc"/>
    </style:style>
    <style:style style:name="T388" style:family="text">
      <style:text-properties officeooo:rsid="0abd4f6b"/>
    </style:style>
    <style:style style:name="T389" style:family="text">
      <style:text-properties officeooo:rsid="0abd78ce"/>
    </style:style>
    <style:style style:name="T390" style:family="text">
      <style:text-properties officeooo:rsid="0abfdfcf"/>
    </style:style>
    <style:style style:name="T391" style:family="text">
      <style:text-properties officeooo:rsid="0ac131c4"/>
    </style:style>
    <style:style style:name="T392" style:family="text">
      <style:text-properties officeooo:rsid="0ac1ea3a"/>
    </style:style>
    <style:style style:name="T393" style:family="text">
      <style:text-properties officeooo:rsid="0ac31ba2"/>
    </style:style>
    <style:style style:name="T394" style:family="text">
      <style:text-properties officeooo:rsid="0ac5a938"/>
    </style:style>
    <style:style style:name="T395" style:family="text">
      <style:text-properties officeooo:rsid="0ac90946"/>
    </style:style>
    <style:style style:name="T396" style:family="text">
      <style:text-properties officeooo:rsid="0aca6d2d"/>
    </style:style>
    <style:style style:name="T397" style:family="text">
      <style:text-properties officeooo:rsid="0acbc5ae"/>
    </style:style>
    <style:style style:name="T398" style:family="text">
      <style:text-properties officeooo:rsid="0ace53bf"/>
    </style:style>
    <style:style style:name="T399" style:family="text">
      <style:text-properties officeooo:rsid="0acf3102"/>
    </style:style>
    <style:style style:name="T400" style:family="text">
      <style:text-properties officeooo:rsid="0ad0060d"/>
    </style:style>
    <style:style style:name="T401" style:family="text">
      <style:text-properties officeooo:rsid="0ad03dd7"/>
    </style:style>
    <style:style style:name="T402" style:family="text">
      <style:text-properties officeooo:rsid="0ad1f307"/>
    </style:style>
    <style:style style:name="T403" style:family="text">
      <style:text-properties officeooo:rsid="0ad39cd2"/>
    </style:style>
    <style:style style:name="T404" style:family="text">
      <style:text-properties officeooo:rsid="0ad57a5f"/>
    </style:style>
    <style:style style:name="T405" style:family="text">
      <style:text-properties officeooo:rsid="0ad6a869"/>
    </style:style>
    <style:style style:name="T406" style:family="text">
      <style:text-properties officeooo:rsid="0ad7c194"/>
    </style:style>
    <style:style style:name="T407" style:family="text">
      <style:text-properties officeooo:rsid="0ad83eee"/>
    </style:style>
    <style:style style:name="T408" style:family="text">
      <style:text-properties officeooo:rsid="0ad86be7"/>
    </style:style>
    <style:style style:name="T409" style:family="text">
      <style:text-properties officeooo:rsid="0ad8ef50"/>
    </style:style>
    <style:style style:name="T410" style:family="text">
      <style:text-properties officeooo:rsid="0adae246"/>
    </style:style>
    <style:style style:name="T411" style:family="text">
      <style:text-properties officeooo:rsid="0adcc2ac"/>
    </style:style>
    <style:style style:name="T412" style:family="text">
      <style:text-properties officeooo:rsid="0ade406a"/>
    </style:style>
    <style:style style:name="T413" style:family="text">
      <style:text-properties officeooo:rsid="0ae1ed79"/>
    </style:style>
    <style:style style:name="T414" style:family="text">
      <style:text-properties officeooo:rsid="0adff3e8"/>
    </style:style>
    <style:style style:name="T415" style:family="text">
      <style:text-properties officeooo:rsid="0ae2ee99"/>
    </style:style>
    <style:style style:name="T416" style:family="text">
      <style:text-properties officeooo:rsid="0ae798e5"/>
    </style:style>
    <style:style style:name="T417" style:family="text">
      <style:text-properties officeooo:rsid="0ae9389c"/>
    </style:style>
    <style:style style:name="T418" style:family="text">
      <style:text-properties officeooo:rsid="0aeb04fb"/>
    </style:style>
    <style:style style:name="T419" style:family="text">
      <style:text-properties officeooo:rsid="0aeccdb1"/>
    </style:style>
    <style:style style:name="T420" style:family="text">
      <style:text-properties officeooo:rsid="0aee567e"/>
    </style:style>
    <style:style style:name="T421" style:family="text">
      <style:text-properties officeooo:rsid="0aef7efd"/>
    </style:style>
    <style:style style:name="T422" style:family="text">
      <style:text-properties officeooo:rsid="0af04c4f"/>
    </style:style>
    <style:style style:name="T423" style:family="text">
      <style:text-properties officeooo:rsid="0af16189"/>
    </style:style>
    <style:style style:name="T424" style:family="text">
      <style:text-properties officeooo:rsid="0af1ce8a"/>
    </style:style>
    <style:style style:name="T425" style:family="text">
      <style:text-properties officeooo:rsid="0af237df"/>
    </style:style>
    <style:style style:name="T426" style:family="text">
      <style:text-properties officeooo:rsid="0af443d3"/>
    </style:style>
    <style:style style:name="T427" style:family="text">
      <style:text-properties officeooo:rsid="0af57c55"/>
    </style:style>
    <style:style style:name="T428" style:family="text">
      <style:text-properties officeooo:rsid="0af6d02f"/>
    </style:style>
    <style:style style:name="T429" style:family="text">
      <style:text-properties officeooo:rsid="0af8cfee"/>
    </style:style>
    <style:style style:name="T430" style:family="text">
      <style:text-properties officeooo:rsid="0afa5be0"/>
    </style:style>
    <style:style style:name="T431" style:family="text">
      <style:text-properties officeooo:rsid="0afe0f35"/>
    </style:style>
    <style:style style:name="T432" style:family="text">
      <style:text-properties officeooo:rsid="0b02951b"/>
    </style:style>
    <style:style style:name="T433" style:family="text">
      <style:text-properties officeooo:rsid="0b0479a4"/>
    </style:style>
    <style:style style:name="T434" style:family="text">
      <style:text-properties officeooo:rsid="0b064a77"/>
    </style:style>
    <style:style style:name="T435" style:family="text">
      <style:text-properties officeooo:rsid="0b071ff1"/>
    </style:style>
    <style:style style:name="T436" style:family="text">
      <style:text-properties officeooo:rsid="0b0753cf"/>
    </style:style>
    <style:style style:name="T437" style:family="text">
      <style:text-properties officeooo:rsid="0b086faf"/>
    </style:style>
    <style:style style:name="T438" style:family="text">
      <style:text-properties officeooo:rsid="0b0ad367"/>
    </style:style>
    <style:style style:name="T439" style:family="text">
      <style:text-properties officeooo:rsid="0b0d66e0"/>
    </style:style>
    <style:style style:name="T440" style:family="text">
      <style:text-properties officeooo:rsid="0b107c17"/>
    </style:style>
    <style:style style:name="T441" style:family="text">
      <style:text-properties officeooo:rsid="0b118d7e"/>
    </style:style>
    <style:style style:name="T442" style:family="text">
      <style:text-properties officeooo:rsid="0b126ebd"/>
    </style:style>
    <style:style style:name="T443" style:family="text">
      <style:text-properties officeooo:rsid="0b1461eb"/>
    </style:style>
    <style:style style:name="T444" style:family="text">
      <style:text-properties officeooo:rsid="0b14b6e7"/>
    </style:style>
    <style:style style:name="T445" style:family="text">
      <style:text-properties officeooo:rsid="0b157833"/>
    </style:style>
    <style:style style:name="T446" style:family="text">
      <style:text-properties officeooo:rsid="0b1661ee"/>
    </style:style>
    <style:style style:name="T447" style:family="text">
      <style:text-properties officeooo:rsid="0b17faa3"/>
    </style:style>
    <style:style style:name="T448" style:family="text">
      <style:text-properties officeooo:rsid="0b18dea4"/>
    </style:style>
    <style:style style:name="T449" style:family="text">
      <style:text-properties officeooo:rsid="0b1a01f0"/>
    </style:style>
    <style:style style:name="T450" style:family="text">
      <style:text-properties officeooo:rsid="0b1b6ba6"/>
    </style:style>
    <style:style style:name="T451" style:family="text">
      <style:text-properties officeooo:rsid="0b1b9353"/>
    </style:style>
    <style:style style:name="T452" style:family="text">
      <style:text-properties officeooo:rsid="0b1bdacc"/>
    </style:style>
    <style:style style:name="T453" style:family="text">
      <style:text-properties officeooo:rsid="0b1f599b"/>
    </style:style>
    <style:style style:name="T454" style:family="text">
      <style:text-properties officeooo:rsid="0b1fb54d"/>
    </style:style>
    <style:style style:name="T455" style:family="text">
      <style:text-properties officeooo:rsid="0b209b06"/>
    </style:style>
    <style:style style:name="T456" style:family="text">
      <style:text-properties officeooo:rsid="0b222242"/>
    </style:style>
    <style:style style:name="T457" style:family="text">
      <style:text-properties officeooo:rsid="0b22a43a"/>
    </style:style>
    <style:style style:name="T458" style:family="text">
      <style:text-properties officeooo:rsid="0b2452ff"/>
    </style:style>
    <style:style style:name="T459" style:family="text">
      <style:text-properties officeooo:rsid="0b25aad6"/>
    </style:style>
    <style:style style:name="T460" style:family="text">
      <style:text-properties officeooo:rsid="0b268545"/>
    </style:style>
    <style:style style:name="T461" style:family="text">
      <style:text-properties officeooo:rsid="0b26b102"/>
    </style:style>
    <style:style style:name="T462" style:family="text">
      <style:text-properties officeooo:rsid="0b281e21"/>
    </style:style>
    <style:style style:name="T463" style:family="text">
      <style:text-properties officeooo:rsid="0b289744"/>
    </style:style>
    <style:style style:name="T464" style:family="text">
      <style:text-properties officeooo:rsid="0b2b24a6"/>
    </style:style>
    <style:style style:name="T465" style:family="text">
      <style:text-properties officeooo:rsid="0b2e0f0f"/>
    </style:style>
    <style:style style:name="T466" style:family="text">
      <style:text-properties officeooo:rsid="0b2f20da"/>
    </style:style>
    <style:style style:name="T467" style:family="text">
      <style:text-properties officeooo:rsid="0b3331c4"/>
    </style:style>
    <style:style style:name="T468" style:family="text">
      <style:text-properties officeooo:rsid="0b342ab7"/>
    </style:style>
    <style:style style:name="T469" style:family="text">
      <style:text-properties officeooo:rsid="0b3621f3"/>
    </style:style>
    <style:style style:name="T470" style:family="text">
      <style:text-properties officeooo:rsid="0b37fe57"/>
    </style:style>
    <style:style style:name="T471" style:family="text">
      <style:text-properties officeooo:rsid="0b395872"/>
    </style:style>
    <style:style style:name="T472" style:family="text">
      <style:text-properties officeooo:rsid="0b3b810b"/>
    </style:style>
    <style:style style:name="T473" style:family="text">
      <style:text-properties officeooo:rsid="0b3dcf6e"/>
    </style:style>
    <style:style style:name="T474" style:family="text">
      <style:text-properties officeooo:rsid="0b3ead00"/>
    </style:style>
    <style:style style:name="T475" style:family="text">
      <style:text-properties officeooo:rsid="0b41c504"/>
    </style:style>
    <style:style style:name="T476" style:family="text">
      <style:text-properties officeooo:rsid="0b41eeed"/>
    </style:style>
    <style:style style:name="T477" style:family="text">
      <style:text-properties officeooo:rsid="0b4274cb"/>
    </style:style>
    <style:style style:name="T478" style:family="text">
      <style:text-properties officeooo:rsid="0b42cba2"/>
    </style:style>
    <style:style style:name="T479" style:family="text">
      <style:text-properties officeooo:rsid="0b45d999"/>
    </style:style>
    <style:style style:name="T480" style:family="text">
      <style:text-properties officeooo:rsid="0b49fee4"/>
    </style:style>
    <style:style style:name="T481" style:family="text">
      <style:text-properties officeooo:rsid="0b4ba731"/>
    </style:style>
    <style:style style:name="T482" style:family="text">
      <style:text-properties officeooo:rsid="0b4ca22c"/>
    </style:style>
    <style:style style:name="T483" style:family="text">
      <style:text-properties officeooo:rsid="0b4f021b"/>
    </style:style>
    <style:style style:name="T484" style:family="text">
      <style:text-properties officeooo:rsid="0b508af0"/>
    </style:style>
    <style:style style:name="T485" style:family="text">
      <style:text-properties officeooo:rsid="0b50a0b9"/>
    </style:style>
    <style:style style:name="T486" style:family="text">
      <style:text-properties officeooo:rsid="0b50aefe"/>
    </style:style>
    <style:style style:name="T487" style:family="text">
      <style:text-properties officeooo:rsid="0b510384"/>
    </style:style>
    <style:style style:name="T488" style:family="text">
      <style:text-properties officeooo:rsid="0b560368"/>
    </style:style>
    <style:style style:name="T489" style:family="text">
      <style:text-properties officeooo:rsid="0b5b9f53"/>
    </style:style>
    <style:style style:name="T490" style:family="text">
      <style:text-properties officeooo:rsid="0b5c5429"/>
    </style:style>
    <style:style style:name="T491" style:family="text">
      <style:text-properties officeooo:rsid="0b5da5ba"/>
    </style:style>
    <style:style style:name="T492" style:family="text">
      <style:text-properties officeooo:rsid="0b5ee246"/>
    </style:style>
    <style:style style:name="T493" style:family="text">
      <style:text-properties officeooo:rsid="0b5eed71"/>
    </style:style>
    <style:style style:name="T494" style:family="text">
      <style:text-properties officeooo:rsid="0b609a82"/>
    </style:style>
    <style:style style:name="T495" style:family="text">
      <style:text-properties officeooo:rsid="0b61876d"/>
    </style:style>
    <style:style style:name="T496" style:family="text">
      <style:text-properties officeooo:rsid="0b641725"/>
    </style:style>
    <style:style style:name="T497" style:family="text">
      <style:text-properties officeooo:rsid="0b6601f7"/>
    </style:style>
    <style:style style:name="T498" style:family="text">
      <style:text-properties officeooo:rsid="0b679ff6"/>
    </style:style>
    <style:style style:name="T499" style:family="text">
      <style:text-properties officeooo:rsid="0b685df8"/>
    </style:style>
    <style:style style:name="T500" style:family="text">
      <style:text-properties officeooo:rsid="0b699687"/>
    </style:style>
    <style:style style:name="T501" style:family="text">
      <style:text-properties officeooo:rsid="0b6ab248"/>
    </style:style>
    <style:style style:name="T502" style:family="text">
      <style:text-properties officeooo:rsid="0b6b5540"/>
    </style:style>
    <style:style style:name="T503" style:family="text">
      <style:text-properties officeooo:rsid="0b6cd805"/>
    </style:style>
    <style:style style:name="T504" style:family="text">
      <style:text-properties officeooo:rsid="0b6d923f"/>
    </style:style>
    <style:style style:name="T505" style:family="text">
      <style:text-properties officeooo:rsid="0b74979c"/>
    </style:style>
    <style:style style:name="T506" style:family="text">
      <style:text-properties officeooo:rsid="0b78c039"/>
    </style:style>
    <style:style style:name="T507" style:family="text">
      <style:text-properties officeooo:rsid="0b7a89c6"/>
    </style:style>
    <style:style style:name="T508" style:family="text">
      <style:text-properties officeooo:rsid="0b7c2e50"/>
    </style:style>
    <style:style style:name="T509" style:family="text">
      <style:text-properties officeooo:rsid="0b7e7ee8"/>
    </style:style>
    <style:style style:name="T510" style:family="text">
      <style:text-properties officeooo:rsid="0b80f717"/>
    </style:style>
    <style:style style:name="T511" style:family="text">
      <style:text-properties officeooo:rsid="0b871a7e"/>
    </style:style>
    <style:style style:name="T512" style:family="text">
      <style:text-properties officeooo:rsid="0b878bdd"/>
    </style:style>
    <style:style style:name="T513" style:family="text">
      <style:text-properties officeooo:rsid="0b88bac1"/>
    </style:style>
    <style:style style:name="T514" style:family="text">
      <style:text-properties officeooo:rsid="0b8a936b"/>
    </style:style>
    <style:style style:name="T515" style:family="text">
      <style:text-properties officeooo:rsid="0b8b267f"/>
    </style:style>
    <style:style style:name="T516" style:family="text">
      <style:text-properties officeooo:rsid="0b8d65d0"/>
    </style:style>
    <style:style style:name="T517" style:family="text">
      <style:text-properties officeooo:rsid="0b8f3939"/>
    </style:style>
    <style:style style:name="T518" style:family="text">
      <style:text-properties officeooo:rsid="0b9017d3"/>
    </style:style>
    <style:style style:name="T519" style:family="text">
      <style:text-properties officeooo:rsid="0b933bd4"/>
    </style:style>
    <style:style style:name="T520" style:family="text">
      <style:text-properties officeooo:rsid="0b94d790"/>
    </style:style>
    <style:style style:name="T521" style:family="text">
      <style:text-properties officeooo:rsid="0b95280d"/>
    </style:style>
    <style:style style:name="T522" style:family="text">
      <style:text-properties officeooo:rsid="0b9679c5"/>
    </style:style>
    <style:style style:name="T523" style:family="text">
      <style:text-properties officeooo:rsid="0b969f18"/>
    </style:style>
    <style:style style:name="T524" style:family="text">
      <style:text-properties officeooo:rsid="0b986125"/>
    </style:style>
    <style:style style:name="T525" style:family="text">
      <style:text-properties officeooo:rsid="0b991b7a"/>
    </style:style>
    <style:style style:name="T526" style:family="text">
      <style:text-properties officeooo:rsid="0b99f9ab"/>
    </style:style>
    <style:style style:name="T527" style:family="text">
      <style:text-properties officeooo:rsid="0b9c92dd"/>
    </style:style>
    <style:style style:name="T528" style:family="text">
      <style:text-properties officeooo:rsid="0b9ca28e"/>
    </style:style>
    <style:style style:name="T529" style:family="text">
      <style:text-properties officeooo:rsid="0b9dad3c"/>
    </style:style>
    <style:style style:name="T530" style:family="text">
      <style:text-properties officeooo:rsid="0b9e5abe"/>
    </style:style>
    <style:style style:name="T531" style:family="text">
      <style:text-properties officeooo:rsid="0b9ea258"/>
    </style:style>
    <style:style style:name="T532" style:family="text">
      <style:text-properties officeooo:rsid="0ba194db"/>
    </style:style>
    <style:style style:name="T533" style:family="text">
      <style:text-properties officeooo:rsid="0ba2179c"/>
    </style:style>
    <style:style style:name="T534" style:family="text">
      <style:text-properties officeooo:rsid="0ba3a11d"/>
    </style:style>
    <style:style style:name="T535" style:family="text">
      <style:text-properties officeooo:rsid="0ba56a11"/>
    </style:style>
    <style:style style:name="T536" style:family="text">
      <style:text-properties officeooo:rsid="0ba6d9f5"/>
    </style:style>
    <style:style style:name="T537" style:family="text">
      <style:text-properties officeooo:rsid="0ba72c0d"/>
    </style:style>
    <style:style style:name="T538" style:family="text">
      <style:text-properties officeooo:rsid="0ba83efe"/>
    </style:style>
    <style:style style:name="T539" style:family="text">
      <style:text-properties officeooo:rsid="0ba98d16"/>
    </style:style>
    <style:style style:name="T540" style:family="text">
      <style:text-properties officeooo:rsid="0ba98e30"/>
    </style:style>
    <style:style style:name="T541" style:family="text">
      <style:text-properties officeooo:rsid="0baae648"/>
    </style:style>
    <style:style style:name="T542" style:family="text">
      <style:text-properties officeooo:rsid="0bab7e12"/>
    </style:style>
    <style:style style:name="T543" style:family="text">
      <style:text-properties officeooo:rsid="0bacbcbb"/>
    </style:style>
    <style:style style:name="T544" style:family="text">
      <style:text-properties officeooo:rsid="0bade859"/>
    </style:style>
    <style:style style:name="T545" style:family="text">
      <style:text-properties officeooo:rsid="0bae3264"/>
    </style:style>
    <style:style style:name="T546" style:family="text">
      <style:text-properties officeooo:rsid="0bae961e"/>
    </style:style>
    <style:style style:name="T547" style:family="text">
      <style:text-properties officeooo:rsid="0bafbbe7"/>
    </style:style>
    <style:style style:name="T548" style:family="text">
      <style:text-properties officeooo:rsid="0bb08ccb"/>
    </style:style>
    <style:style style:name="T549" style:family="text">
      <style:text-properties officeooo:rsid="0bb14318"/>
    </style:style>
    <style:style style:name="T550" style:family="text">
      <style:text-properties officeooo:rsid="0bb1b05a"/>
    </style:style>
    <style:style style:name="T551" style:family="text">
      <style:text-properties officeooo:rsid="0bb66867"/>
    </style:style>
    <style:style style:name="T552" style:family="text">
      <style:text-properties officeooo:rsid="0bb76d08"/>
    </style:style>
    <style:style style:name="T553" style:family="text">
      <style:text-properties officeooo:rsid="0bca9a44"/>
    </style:style>
    <style:style style:name="T554" style:family="text">
      <style:text-properties officeooo:rsid="0bcb49e6"/>
    </style:style>
    <style:style style:name="T555" style:family="text">
      <style:text-properties officeooo:rsid="0bccfbc5"/>
    </style:style>
    <style:style style:name="T556" style:family="text">
      <style:text-properties officeooo:rsid="0bd6f8ab"/>
    </style:style>
    <style:style style:name="T557" style:family="text">
      <style:text-properties officeooo:rsid="0bd888e5"/>
    </style:style>
    <style:style style:name="T558" style:family="text">
      <style:text-properties officeooo:rsid="0bd9095c"/>
    </style:style>
    <style:style style:name="T559" style:family="text">
      <style:text-properties officeooo:rsid="0bda29a2"/>
    </style:style>
    <style:style style:name="T560" style:family="text">
      <style:text-properties officeooo:rsid="0bdaa443"/>
    </style:style>
    <style:style style:name="T561" style:family="text">
      <style:text-properties officeooo:rsid="0bde8aa2"/>
    </style:style>
    <style:style style:name="T562" style:family="text">
      <style:text-properties officeooo:rsid="0bdee685"/>
    </style:style>
    <style:style style:name="T563" style:family="text">
      <style:text-properties officeooo:rsid="0be22bfe"/>
    </style:style>
    <style:style style:name="T564" style:family="text">
      <style:text-properties officeooo:rsid="0be33dda"/>
    </style:style>
    <style:style style:name="T565" style:family="text">
      <style:text-properties officeooo:rsid="0be5244e"/>
    </style:style>
    <style:style style:name="T566" style:family="text">
      <style:text-properties officeooo:rsid="0be843ab"/>
    </style:style>
    <style:style style:name="T567" style:family="text">
      <style:text-properties officeooo:rsid="0be93c20"/>
    </style:style>
    <style:style style:name="T568" style:family="text">
      <style:text-properties officeooo:rsid="0be9fca1"/>
    </style:style>
    <style:style style:name="T569" style:family="text">
      <style:text-properties officeooo:rsid="0bed0758"/>
    </style:style>
    <style:style style:name="T570" style:family="text">
      <style:text-properties officeooo:rsid="0bedfea1"/>
    </style:style>
    <style:style style:name="T571" style:family="text">
      <style:text-properties officeooo:rsid="0bee7f23"/>
    </style:style>
    <style:style style:name="T572" style:family="text">
      <style:text-properties officeooo:rsid="0bf04446"/>
    </style:style>
    <style:style style:name="T573" style:family="text">
      <style:text-properties officeooo:rsid="0bf1092c"/>
    </style:style>
    <style:style style:name="T574" style:family="text">
      <style:text-properties officeooo:rsid="0bf116bb"/>
    </style:style>
    <style:style style:name="T575" style:family="text">
      <style:text-properties officeooo:rsid="0bf43be7"/>
    </style:style>
    <style:style style:name="T576" style:family="text">
      <style:text-properties officeooo:rsid="0bf49e34"/>
    </style:style>
    <style:style style:name="T577" style:family="text">
      <style:text-properties officeooo:rsid="0bf811b8"/>
    </style:style>
    <style:style style:name="T578" style:family="text">
      <style:text-properties officeooo:rsid="0bfa1db8"/>
    </style:style>
    <style:style style:name="T579" style:family="text">
      <style:text-properties officeooo:rsid="0bfbed9a"/>
    </style:style>
    <style:style style:name="T580" style:family="text">
      <style:text-properties officeooo:rsid="0bf983f8"/>
    </style:style>
    <style:style style:name="T581" style:family="text">
      <style:text-properties officeooo:rsid="0bfd7801"/>
    </style:style>
    <style:style style:name="T582" style:family="text">
      <style:text-properties officeooo:rsid="0bfe9067"/>
    </style:style>
    <style:style style:name="T583" style:family="text">
      <style:text-properties officeooo:rsid="0bff5c0f"/>
    </style:style>
    <style:style style:name="T584" style:family="text">
      <style:text-properties officeooo:rsid="0c011096"/>
    </style:style>
    <style:style style:name="T585" style:family="text">
      <style:text-properties officeooo:rsid="0c056d0e"/>
    </style:style>
    <style:style style:name="T586" style:family="text">
      <style:text-properties officeooo:rsid="0c063488"/>
    </style:style>
    <style:style style:name="T587" style:family="text">
      <style:text-properties officeooo:rsid="0c080865"/>
    </style:style>
    <style:style style:name="T588" style:family="text">
      <style:text-properties officeooo:rsid="0c0ac99e"/>
    </style:style>
    <style:style style:name="T589" style:family="text">
      <style:text-properties officeooo:rsid="0c0c6ca4"/>
    </style:style>
    <style:style style:name="T590" style:family="text">
      <style:text-properties officeooo:rsid="0c0e8f5b"/>
    </style:style>
    <style:style style:name="T591" style:family="text">
      <style:text-properties officeooo:rsid="0c0f4e46"/>
    </style:style>
    <style:style style:name="T592" style:family="text">
      <style:text-properties officeooo:rsid="0c11cfb7"/>
    </style:style>
    <style:style style:name="T593" style:family="text">
      <style:text-properties officeooo:rsid="0c1304b5"/>
    </style:style>
    <style:style style:name="T594" style:family="text">
      <style:text-properties officeooo:rsid="0c147809"/>
    </style:style>
    <style:style style:name="T595" style:family="text">
      <style:text-properties officeooo:rsid="0c1506a7"/>
    </style:style>
    <style:style style:name="T596" style:family="text">
      <style:text-properties officeooo:rsid="0c155b72"/>
    </style:style>
    <style:style style:name="T597" style:family="text">
      <style:text-properties officeooo:rsid="0c161738"/>
    </style:style>
    <style:style style:name="T598" style:family="text">
      <style:text-properties officeooo:rsid="0c16a5a2"/>
    </style:style>
    <style:style style:name="T599" style:family="text">
      <style:text-properties officeooo:rsid="0c19a10d"/>
    </style:style>
    <style:style style:name="T600" style:family="text">
      <style:text-properties officeooo:rsid="0c1a9de1"/>
    </style:style>
    <style:style style:name="T601" style:family="text">
      <style:text-properties officeooo:rsid="0c1b026d"/>
    </style:style>
    <style:style style:name="T602" style:family="text">
      <style:text-properties officeooo:rsid="0c20c07a"/>
    </style:style>
    <style:style style:name="T603" style:family="text">
      <style:text-properties officeooo:rsid="0c212664"/>
    </style:style>
    <style:style style:name="T604" style:family="text">
      <style:text-properties officeooo:rsid="0c21be48"/>
    </style:style>
    <style:style style:name="T605" style:family="text">
      <style:text-properties officeooo:rsid="0c255a87"/>
    </style:style>
    <style:style style:name="T606" style:family="text">
      <style:text-properties officeooo:rsid="0c25a45e"/>
    </style:style>
    <style:style style:name="T607" style:family="text">
      <style:text-properties officeooo:rsid="0c2878c6"/>
    </style:style>
    <style:style style:name="T608" style:family="text">
      <style:text-properties officeooo:rsid="0c294e7e"/>
    </style:style>
    <style:style style:name="T609" style:family="text">
      <style:text-properties officeooo:rsid="0c2f9969"/>
    </style:style>
    <style:style style:name="T610" style:family="text">
      <style:text-properties officeooo:rsid="0c30e581"/>
    </style:style>
    <style:style style:name="T611" style:family="text">
      <style:text-properties officeooo:rsid="0c334de6"/>
    </style:style>
    <style:style style:name="T612" style:family="text">
      <style:text-properties officeooo:rsid="0c34afab"/>
    </style:style>
    <style:style style:name="T613" style:family="text">
      <style:text-properties officeooo:rsid="0c35b2b2"/>
    </style:style>
    <style:style style:name="T614" style:family="text">
      <style:text-properties officeooo:rsid="0c36dfc3"/>
    </style:style>
    <style:style style:name="T615" style:family="text">
      <style:text-properties officeooo:rsid="0c3b477b"/>
    </style:style>
    <style:style style:name="T616" style:family="text">
      <style:text-properties officeooo:rsid="0c3c47a8"/>
    </style:style>
    <style:style style:name="T617" style:family="text">
      <style:text-properties officeooo:rsid="0c3d3e18"/>
    </style:style>
    <style:style style:name="T618" style:family="text">
      <style:text-properties officeooo:rsid="0c3e1118"/>
    </style:style>
    <style:style style:name="T619" style:family="text">
      <style:text-properties officeooo:rsid="0c3e9271"/>
    </style:style>
    <style:style style:name="T620" style:family="text">
      <style:text-properties officeooo:rsid="0c3f2ef6"/>
    </style:style>
    <style:style style:name="T621" style:family="text">
      <style:text-properties officeooo:rsid="0c4106df"/>
    </style:style>
    <style:style style:name="T622" style:family="text">
      <style:text-properties officeooo:rsid="0c41842a"/>
    </style:style>
    <style:style style:name="T623" style:family="text">
      <style:text-properties officeooo:rsid="0c41b2bd"/>
    </style:style>
    <style:style style:name="T624" style:family="text">
      <style:text-properties officeooo:rsid="0c41fb2a"/>
    </style:style>
    <style:style style:name="T625" style:family="text">
      <style:text-properties officeooo:rsid="0c42e983"/>
    </style:style>
    <style:style style:name="T626" style:family="text">
      <style:text-properties officeooo:rsid="0c436ee0"/>
    </style:style>
    <style:style style:name="T627" style:family="text">
      <style:text-properties officeooo:rsid="0c44f31f"/>
    </style:style>
    <style:style style:name="T628" style:family="text">
      <style:text-properties officeooo:rsid="0c490264"/>
    </style:style>
    <style:style style:name="T629" style:family="text">
      <style:text-properties officeooo:rsid="0c4b953d"/>
    </style:style>
    <style:style style:name="T630" style:family="text">
      <style:text-properties officeooo:rsid="0c4d1bff"/>
    </style:style>
    <style:style style:name="T631" style:family="text">
      <style:text-properties officeooo:rsid="0c4eb91e"/>
    </style:style>
    <style:style style:name="T632" style:family="text">
      <style:text-properties officeooo:rsid="0c4fd647"/>
    </style:style>
    <style:style style:name="T633" style:family="text">
      <style:text-properties officeooo:rsid="0c505cfc"/>
    </style:style>
    <style:style style:name="T634" style:family="text">
      <style:text-properties officeooo:rsid="0c51b0db"/>
    </style:style>
    <style:style style:name="T635" style:family="text">
      <style:text-properties officeooo:rsid="0c521aef"/>
    </style:style>
    <style:style style:name="T636" style:family="text">
      <style:text-properties officeooo:rsid="0c53a180"/>
    </style:style>
    <style:style style:name="T637" style:family="text">
      <style:text-properties officeooo:rsid="0c545c04"/>
    </style:style>
    <style:style style:name="T638" style:family="text">
      <style:text-properties officeooo:rsid="0c558885"/>
    </style:style>
    <style:style style:name="T639" style:family="text">
      <style:text-properties officeooo:rsid="0c5719e0"/>
    </style:style>
    <style:style style:name="T640" style:family="text">
      <style:text-properties officeooo:rsid="0c57ccba"/>
    </style:style>
    <style:style style:name="T641" style:family="text">
      <style:text-properties officeooo:rsid="0c5bc0ba"/>
    </style:style>
    <style:style style:name="T642" style:family="text">
      <style:text-properties officeooo:rsid="0c5bf3e0"/>
    </style:style>
    <style:style style:name="T643" style:family="text">
      <style:text-properties officeooo:rsid="0c5c0a33"/>
    </style:style>
    <style:style style:name="T644" style:family="text">
      <style:text-properties officeooo:rsid="0c5c8902"/>
    </style:style>
    <style:style style:name="T645" style:family="text">
      <style:text-properties officeooo:rsid="0c5f8e3c"/>
    </style:style>
    <style:style style:name="T646" style:family="text">
      <style:text-properties officeooo:rsid="0c6087c7"/>
    </style:style>
    <style:style style:name="T647" style:family="text">
      <style:text-properties officeooo:rsid="0c636708"/>
    </style:style>
    <style:style style:name="T648" style:family="text">
      <style:text-properties officeooo:rsid="0c647eb6"/>
    </style:style>
    <style:style style:name="T649" style:family="text">
      <style:text-properties officeooo:rsid="0c65d65b"/>
    </style:style>
    <style:style style:name="T650" style:family="text">
      <style:text-properties officeooo:rsid="0c663960"/>
    </style:style>
    <style:style style:name="T651" style:family="text">
      <style:text-properties officeooo:rsid="0c679de5"/>
    </style:style>
    <style:style style:name="T652" style:family="text">
      <style:text-properties officeooo:rsid="0c69131a"/>
    </style:style>
    <style:style style:name="T653" style:family="text">
      <style:text-properties officeooo:rsid="0c6cb047"/>
    </style:style>
    <style:style style:name="T654" style:family="text">
      <style:text-properties officeooo:rsid="0c6e8a2a"/>
    </style:style>
    <style:style style:name="T655" style:family="text">
      <style:text-properties officeooo:rsid="0c6fb564"/>
    </style:style>
    <style:style style:name="T656" style:family="text">
      <style:text-properties officeooo:rsid="0c70f626"/>
    </style:style>
    <style:style style:name="T657" style:family="text">
      <style:text-properties officeooo:rsid="0c71d97a"/>
    </style:style>
    <style:style style:name="T658" style:family="text">
      <style:text-properties officeooo:rsid="0c758153"/>
    </style:style>
    <style:style style:name="T659" style:family="text">
      <style:text-properties officeooo:rsid="0c763d61"/>
    </style:style>
    <style:style style:name="T660" style:family="text">
      <style:text-properties officeooo:rsid="0c79ac93"/>
    </style:style>
    <style:style style:name="T661" style:family="text">
      <style:text-properties officeooo:rsid="0c8161dc"/>
    </style:style>
    <style:style style:name="T662" style:family="text">
      <style:text-properties officeooo:rsid="0c83b7bd"/>
    </style:style>
    <style:style style:name="T663" style:family="text">
      <style:text-properties officeooo:rsid="0c8406e6"/>
    </style:style>
    <style:style style:name="T664" style:family="text">
      <style:text-properties officeooo:rsid="0c8497aa"/>
    </style:style>
    <style:style style:name="T665" style:family="text">
      <style:text-properties officeooo:rsid="0c866d0d"/>
    </style:style>
    <style:style style:name="T666" style:family="text">
      <style:text-properties officeooo:rsid="0c8866d9"/>
    </style:style>
    <style:style style:name="T667" style:family="text">
      <style:text-properties officeooo:rsid="0c897046"/>
    </style:style>
    <style:style style:name="T668" style:family="text">
      <style:text-properties officeooo:rsid="0c897495"/>
    </style:style>
    <style:style style:name="T669" style:family="text">
      <style:text-properties officeooo:rsid="0c8a8749"/>
    </style:style>
    <style:style style:name="T670" style:family="text">
      <style:text-properties officeooo:rsid="0c914a8e"/>
    </style:style>
    <style:style style:name="T671" style:family="text">
      <style:text-properties officeooo:rsid="0c9295dc"/>
    </style:style>
    <style:style style:name="T672" style:family="text">
      <style:text-properties officeooo:rsid="0c92d8d3"/>
    </style:style>
    <style:style style:name="T673" style:family="text">
      <style:text-properties officeooo:rsid="0c9422f9"/>
    </style:style>
    <style:style style:name="T674" style:family="text">
      <style:text-properties officeooo:rsid="0c95f242"/>
    </style:style>
    <style:style style:name="T675" style:family="text">
      <style:text-properties officeooo:rsid="0c967832"/>
    </style:style>
    <style:style style:name="T676" style:family="text">
      <style:text-properties officeooo:rsid="0c984091"/>
    </style:style>
    <style:style style:name="T677" style:family="text">
      <style:text-properties officeooo:rsid="0c98215b"/>
    </style:style>
    <style:style style:name="T678" style:family="text">
      <style:text-properties officeooo:rsid="0c99d96a"/>
    </style:style>
    <style:style style:name="T679" style:family="text">
      <style:text-properties officeooo:rsid="0c9a618f"/>
    </style:style>
    <style:style style:name="T680" style:family="text">
      <style:text-properties officeooo:rsid="0c9c05ec"/>
    </style:style>
    <style:style style:name="T681" style:family="text">
      <style:text-properties officeooo:rsid="0c9d2138"/>
    </style:style>
    <style:style style:name="T682" style:family="text">
      <style:text-properties officeooo:rsid="0c9f1c44"/>
    </style:style>
    <style:style style:name="T683" style:family="text">
      <style:text-properties officeooo:rsid="0c9fb04e"/>
    </style:style>
    <style:style style:name="T684" style:family="text">
      <style:text-properties officeooo:rsid="0ca21e8e"/>
    </style:style>
    <style:style style:name="T685" style:family="text">
      <style:text-properties officeooo:rsid="0ca38a77"/>
    </style:style>
    <style:style style:name="T686" style:family="text">
      <style:text-properties officeooo:rsid="0ca422a5"/>
    </style:style>
    <style:style style:name="T687" style:family="text">
      <style:text-properties officeooo:rsid="0ca561e2"/>
    </style:style>
    <style:style style:name="T688" style:family="text">
      <style:text-properties officeooo:rsid="0ca5778a"/>
    </style:style>
    <style:style style:name="T689" style:family="text">
      <style:text-properties officeooo:rsid="0ca7d2de"/>
    </style:style>
    <style:style style:name="T690" style:family="text">
      <style:text-properties officeooo:rsid="0cae1b22"/>
    </style:style>
    <style:style style:name="T691" style:family="text">
      <style:text-properties officeooo:rsid="0caf0680"/>
    </style:style>
    <style:style style:name="T692" style:family="text">
      <style:text-properties officeooo:rsid="0cb056ec"/>
    </style:style>
    <style:style style:name="T693" style:family="text">
      <style:text-properties officeooo:rsid="0cb4ee59"/>
    </style:style>
    <style:style style:name="T694" style:family="text">
      <style:text-properties officeooo:rsid="0cb668c9"/>
    </style:style>
    <style:style style:name="T695" style:family="text">
      <style:text-properties officeooo:rsid="0cb6daa2"/>
    </style:style>
    <style:style style:name="T696" style:family="text">
      <style:text-properties officeooo:rsid="0cb82410"/>
    </style:style>
    <style:style style:name="T697" style:family="text">
      <style:text-properties officeooo:rsid="0cb83200"/>
    </style:style>
    <style:style style:name="T698" style:family="text">
      <style:text-properties officeooo:rsid="0cb90fe8"/>
    </style:style>
    <style:style style:name="T699" style:family="text">
      <style:text-properties officeooo:rsid="0cbe0378"/>
    </style:style>
    <style:style style:name="T700" style:family="text">
      <style:text-properties officeooo:rsid="0cbfbda1"/>
    </style:style>
    <style:style style:name="T701" style:family="text">
      <style:text-properties officeooo:rsid="0cc2623b"/>
    </style:style>
    <style:style style:name="T702" style:family="text">
      <style:text-properties officeooo:rsid="0cc27835"/>
    </style:style>
    <style:style style:name="T703" style:family="text">
      <style:text-properties officeooo:rsid="0cc2c714"/>
    </style:style>
    <style:style style:name="T704" style:family="text">
      <style:text-properties officeooo:rsid="0cc4a748"/>
    </style:style>
    <style:style style:name="T705" style:family="text">
      <style:text-properties officeooo:rsid="0cc6383d"/>
    </style:style>
    <style:style style:name="T706" style:family="text">
      <style:text-properties officeooo:rsid="0cc67eb1"/>
    </style:style>
    <style:style style:name="T707" style:family="text">
      <style:text-properties officeooo:rsid="0cc9b203"/>
    </style:style>
    <style:style style:name="T708" style:family="text">
      <style:text-properties officeooo:rsid="0ccaa9bf"/>
    </style:style>
    <style:style style:name="T709" style:family="text">
      <style:text-properties officeooo:rsid="0ccb106a"/>
    </style:style>
    <style:style style:name="T710" style:family="text">
      <style:text-properties officeooo:rsid="0ccb758b"/>
    </style:style>
    <style:style style:name="T711" style:family="text">
      <style:text-properties officeooo:rsid="0ccd0917"/>
    </style:style>
    <style:style style:name="T712" style:family="text">
      <style:text-properties officeooo:rsid="0cd02269"/>
    </style:style>
    <style:style style:name="T713" style:family="text">
      <style:text-properties officeooo:rsid="0cd05238"/>
    </style:style>
    <style:style style:name="T714" style:family="text">
      <style:text-properties officeooo:rsid="0cd1d5f9"/>
    </style:style>
    <style:style style:name="T715" style:family="text">
      <style:text-properties officeooo:rsid="0cd8be72"/>
    </style:style>
    <style:style style:name="T716" style:family="text">
      <style:text-properties officeooo:rsid="0cde1a9a"/>
    </style:style>
    <style:style style:name="T717" style:family="text">
      <style:text-properties officeooo:rsid="0cdf7694"/>
    </style:style>
    <style:style style:name="T718" style:family="text">
      <style:text-properties officeooo:rsid="0ce17bed"/>
    </style:style>
    <style:style style:name="T719" style:family="text">
      <style:text-properties officeooo:rsid="0ce342e9"/>
    </style:style>
    <style:style style:name="T720" style:family="text">
      <style:text-properties officeooo:rsid="0ce4e533"/>
    </style:style>
    <style:style style:name="T721" style:family="text">
      <style:text-properties officeooo:rsid="0ce5ba39"/>
    </style:style>
    <style:style style:name="T722" style:family="text">
      <style:text-properties officeooo:rsid="0ce74aae"/>
    </style:style>
    <style:style style:name="T723" style:family="text">
      <style:text-properties officeooo:rsid="0cee7a30"/>
    </style:style>
    <style:style style:name="T724" style:family="text">
      <style:text-properties officeooo:rsid="0cef4e8f"/>
    </style:style>
    <style:style style:name="T725" style:family="text">
      <style:text-properties officeooo:rsid="0cef5208"/>
    </style:style>
    <style:style style:name="T726" style:family="text">
      <style:text-properties officeooo:rsid="0ceff8ac"/>
    </style:style>
    <style:style style:name="T727" style:family="text">
      <style:text-properties officeooo:rsid="0cf28068"/>
    </style:style>
    <style:style style:name="T728" style:family="text">
      <style:text-properties officeooo:rsid="0cf910ac"/>
    </style:style>
    <style:style style:name="T729" style:family="text">
      <style:text-properties officeooo:rsid="0cfa0ca8"/>
    </style:style>
    <style:style style:name="T730" style:family="text">
      <style:text-properties officeooo:rsid="0cffd344"/>
    </style:style>
    <style:style style:name="T731" style:family="text">
      <style:text-properties officeooo:rsid="0d008ed5"/>
    </style:style>
    <style:style style:name="T732" style:family="text">
      <style:text-properties officeooo:rsid="0d0220cf"/>
    </style:style>
    <style:style style:name="T733" style:family="text">
      <style:text-properties officeooo:rsid="0d036f53"/>
    </style:style>
    <style:style style:name="T734" style:family="text">
      <style:text-properties officeooo:rsid="0d056527"/>
    </style:style>
    <style:style style:name="T735" style:family="text">
      <style:text-properties officeooo:rsid="0d069afd"/>
    </style:style>
    <style:style style:name="T736" style:family="text">
      <style:text-properties officeooo:rsid="0d06f19b"/>
    </style:style>
    <style:style style:name="T737" style:family="text">
      <style:text-properties officeooo:rsid="0d08f4b5"/>
    </style:style>
    <style:style style:name="T738" style:family="text">
      <style:text-properties officeooo:rsid="0d0de2bb"/>
    </style:style>
    <style:style style:name="T739" style:family="text">
      <style:text-properties officeooo:rsid="0d0f63f8"/>
    </style:style>
    <style:style style:name="T740" style:family="text">
      <style:text-properties officeooo:rsid="0d107f16"/>
    </style:style>
    <style:style style:name="T741" style:family="text">
      <style:text-properties officeooo:rsid="0d12ac15"/>
    </style:style>
    <style:style style:name="T742" style:family="text">
      <style:text-properties officeooo:rsid="0d12ef84"/>
    </style:style>
    <style:style style:name="T743" style:family="text">
      <style:text-properties officeooo:rsid="0d142c51"/>
    </style:style>
    <style:style style:name="T744" style:family="text">
      <style:text-properties officeooo:rsid="0d157501"/>
    </style:style>
    <style:style style:name="T745" style:family="text">
      <style:text-properties officeooo:rsid="0d15d88d"/>
    </style:style>
    <style:style style:name="T746" style:family="text">
      <style:text-properties officeooo:rsid="0d174397"/>
    </style:style>
    <style:style style:name="T747" style:family="text">
      <style:text-properties officeooo:rsid="0d18cc44"/>
    </style:style>
    <style:style style:name="T748" style:family="text">
      <style:text-properties officeooo:rsid="0d1b6799"/>
    </style:style>
    <style:style style:name="T749" style:family="text">
      <style:text-properties officeooo:rsid="0d1caa40"/>
    </style:style>
    <style:style style:name="T750" style:family="text">
      <style:text-properties officeooo:rsid="0d1df5e6"/>
    </style:style>
    <style:style style:name="T751" style:family="text">
      <style:text-properties officeooo:rsid="0d21ccc8"/>
    </style:style>
    <style:style style:name="T752" style:family="text">
      <style:text-properties officeooo:rsid="0d231d9d"/>
    </style:style>
    <style:style style:name="T753" style:family="text">
      <style:text-properties officeooo:rsid="0d23fa78"/>
    </style:style>
    <style:style style:name="T754" style:family="text">
      <style:text-properties officeooo:rsid="0d2567a2"/>
    </style:style>
    <style:style style:name="T755" style:family="text">
      <style:text-properties officeooo:rsid="0d262baf"/>
    </style:style>
    <style:style style:name="T756" style:family="text">
      <style:text-properties officeooo:rsid="0d270afc"/>
    </style:style>
    <style:style style:name="T757" style:family="text">
      <style:text-properties officeooo:rsid="0d285c79"/>
    </style:style>
    <style:style style:name="T758" style:family="text">
      <style:text-properties officeooo:rsid="0d28d1b5"/>
    </style:style>
    <style:style style:name="T759" style:family="text">
      <style:text-properties officeooo:rsid="0d2aaaa4"/>
    </style:style>
    <style:style style:name="T760" style:family="text">
      <style:text-properties officeooo:rsid="0d2bc5ea"/>
    </style:style>
    <style:style style:name="T761" style:family="text">
      <style:text-properties officeooo:rsid="0d2d4d4b"/>
    </style:style>
    <style:style style:name="T762" style:family="text">
      <style:text-properties officeooo:rsid="0d303d97"/>
    </style:style>
    <style:style style:name="T763" style:family="text">
      <style:text-properties officeooo:rsid="0d304051"/>
    </style:style>
    <style:style style:name="T764" style:family="text">
      <style:text-properties officeooo:rsid="0d30c7b5"/>
    </style:style>
    <style:style style:name="T765" style:family="text">
      <style:text-properties officeooo:rsid="0d3180bc"/>
    </style:style>
    <style:style style:name="T766" style:family="text">
      <style:text-properties officeooo:rsid="0d345242"/>
    </style:style>
    <style:style style:name="T767" style:family="text">
      <style:text-properties officeooo:rsid="0d35e2fd"/>
    </style:style>
    <style:style style:name="T768" style:family="text">
      <style:text-properties officeooo:rsid="0d36e60a"/>
    </style:style>
    <style:style style:name="T769" style:family="text">
      <style:text-properties officeooo:rsid="0d3c47cb"/>
    </style:style>
    <style:style style:name="T770" style:family="text">
      <style:text-properties officeooo:rsid="0d3da0a7"/>
    </style:style>
    <style:style style:name="T771" style:family="text">
      <style:text-properties officeooo:rsid="0d3f7164"/>
    </style:style>
    <style:style style:name="T772" style:family="text">
      <style:text-properties officeooo:rsid="0d3fc984"/>
    </style:style>
    <style:style style:name="T773" style:family="text">
      <style:text-properties officeooo:rsid="0d447a93"/>
    </style:style>
    <style:style style:name="T774" style:family="text">
      <style:text-properties officeooo:rsid="0d460fe6"/>
    </style:style>
    <style:style style:name="T775" style:family="text">
      <style:text-properties officeooo:rsid="0d46535d"/>
    </style:style>
    <style:style style:name="T776" style:family="text">
      <style:text-properties officeooo:rsid="0d484085"/>
    </style:style>
    <style:style style:name="T777" style:family="text">
      <style:text-properties officeooo:rsid="0d49c53e"/>
    </style:style>
    <style:style style:name="T778" style:family="text">
      <style:text-properties officeooo:rsid="0d4fdb56"/>
    </style:style>
    <style:style style:name="T779" style:family="text">
      <style:text-properties officeooo:rsid="0d523b0b"/>
    </style:style>
    <style:style style:name="T780" style:family="text">
      <style:text-properties officeooo:rsid="0d538a1d"/>
    </style:style>
    <style:style style:name="T781" style:family="text">
      <style:text-properties officeooo:rsid="0d5540f9"/>
    </style:style>
    <style:style style:name="T782" style:family="text">
      <style:text-properties officeooo:rsid="0d56f1c5"/>
    </style:style>
    <style:style style:name="T783" style:family="text">
      <style:text-properties officeooo:rsid="0d58cd48"/>
    </style:style>
    <style:style style:name="T784" style:family="text">
      <style:text-properties officeooo:rsid="0d5dba11"/>
    </style:style>
    <style:style style:name="T785" style:family="text">
      <style:text-properties officeooo:rsid="0d5df595"/>
    </style:style>
    <style:style style:name="T786" style:family="text">
      <style:text-properties officeooo:rsid="0d604a0c"/>
    </style:style>
    <style:style style:name="T787" style:family="text">
      <style:text-properties officeooo:rsid="0d61a588"/>
    </style:style>
    <style:style style:name="T788" style:family="text">
      <style:text-properties officeooo:rsid="0d622a58"/>
    </style:style>
    <style:style style:name="T789" style:family="text">
      <style:text-properties officeooo:rsid="0d627d04"/>
    </style:style>
    <style:style style:name="T790" style:family="text">
      <style:text-properties officeooo:rsid="0d62d8a6"/>
    </style:style>
    <style:style style:name="T791" style:family="text">
      <style:text-properties officeooo:rsid="0d642270"/>
    </style:style>
    <style:style style:name="T792" style:family="text">
      <style:text-properties officeooo:rsid="0d64e4ba"/>
    </style:style>
    <style:style style:name="T793" style:family="text">
      <style:text-properties officeooo:rsid="0d66cac5"/>
    </style:style>
    <style:style style:name="T794" style:family="text">
      <style:text-properties officeooo:rsid="0d6803f5"/>
    </style:style>
    <style:style style:name="T795" style:family="text">
      <style:text-properties officeooo:rsid="0d6a8dd4"/>
    </style:style>
    <style:style style:name="T796" style:family="text">
      <style:text-properties officeooo:rsid="0d6ba7cd"/>
    </style:style>
    <style:style style:name="T797" style:family="text">
      <style:text-properties officeooo:rsid="0d7234a1"/>
    </style:style>
    <style:style style:name="T798" style:family="text">
      <style:text-properties officeooo:rsid="0d730bb2"/>
    </style:style>
    <style:style style:name="T799" style:family="text">
      <style:text-properties officeooo:rsid="0d740038"/>
    </style:style>
    <style:style style:name="T800" style:family="text">
      <style:text-properties officeooo:rsid="0d75a326"/>
    </style:style>
    <style:style style:name="T801" style:family="text">
      <style:text-properties officeooo:rsid="0d768324"/>
    </style:style>
    <style:style style:name="T802" style:family="text">
      <style:text-properties officeooo:rsid="0d7b0040"/>
    </style:style>
    <style:style style:name="T803" style:family="text">
      <style:text-properties officeooo:rsid="0d7d10cb"/>
    </style:style>
    <style:style style:name="T804" style:family="text">
      <style:text-properties officeooo:rsid="0d7dc965"/>
    </style:style>
    <style:style style:name="T805" style:family="text">
      <style:text-properties officeooo:rsid="0d7dcd99"/>
    </style:style>
    <style:style style:name="T806" style:family="text">
      <style:text-properties officeooo:rsid="0d7defb9"/>
    </style:style>
    <style:style style:name="T807" style:family="text">
      <style:text-properties officeooo:rsid="0d803abd"/>
    </style:style>
    <style:style style:name="T808" style:family="text">
      <style:text-properties officeooo:rsid="0d80b07f"/>
    </style:style>
    <style:style style:name="T809" style:family="text">
      <style:text-properties officeooo:rsid="0d81a524"/>
    </style:style>
    <style:style style:name="T810" style:family="text">
      <style:text-properties officeooo:rsid="0d843c4d"/>
    </style:style>
    <style:style style:name="T811" style:family="text">
      <style:text-properties officeooo:rsid="0d84c82f"/>
    </style:style>
    <style:style style:name="T812" style:family="text">
      <style:text-properties officeooo:rsid="0d864ba9"/>
    </style:style>
    <style:style style:name="T813" style:family="text">
      <style:text-properties officeooo:rsid="0d86d5a5"/>
    </style:style>
    <style:style style:name="T814" style:family="text">
      <style:text-properties officeooo:rsid="0d8a44e2"/>
    </style:style>
    <style:style style:name="T815" style:family="text">
      <style:text-properties officeooo:rsid="0d8d08a9"/>
    </style:style>
    <style:style style:name="T816" style:family="text">
      <style:text-properties officeooo:rsid="0d8dd3d1"/>
    </style:style>
    <style:style style:name="T817" style:family="text">
      <style:text-properties officeooo:rsid="0d8fa4d8"/>
    </style:style>
    <style:style style:name="T818" style:family="text">
      <style:text-properties officeooo:rsid="0d90f78e"/>
    </style:style>
    <style:style style:name="T819" style:family="text">
      <style:text-properties officeooo:rsid="0d94f9d3"/>
    </style:style>
    <style:style style:name="T820" style:family="text">
      <style:text-properties officeooo:rsid="0d95e817"/>
    </style:style>
    <style:style style:name="T821" style:family="text">
      <style:text-properties officeooo:rsid="0d96104d"/>
    </style:style>
    <style:style style:name="T822" style:family="text">
      <style:text-properties officeooo:rsid="0d96e633"/>
    </style:style>
    <style:style style:name="T823" style:family="text">
      <style:text-properties officeooo:rsid="0d978e5c"/>
    </style:style>
    <style:style style:name="T824" style:family="text">
      <style:text-properties officeooo:rsid="0d9b391c"/>
    </style:style>
    <style:style style:name="T825" style:family="text">
      <style:text-properties officeooo:rsid="0d9c942a"/>
    </style:style>
    <style:style style:name="T826" style:family="text">
      <style:text-properties officeooo:rsid="0d9cba7f"/>
    </style:style>
    <style:style style:name="T827" style:family="text">
      <style:text-properties officeooo:rsid="0d9df172"/>
    </style:style>
    <style:style style:name="T828" style:family="text">
      <style:text-properties officeooo:rsid="0d9edd8e"/>
    </style:style>
    <style:style style:name="T829" style:family="text">
      <style:text-properties officeooo:rsid="0d9ee173"/>
    </style:style>
    <style:style style:name="T830" style:family="text">
      <style:text-properties officeooo:rsid="0da383fe"/>
    </style:style>
    <style:style style:name="T831" style:family="text">
      <style:text-properties officeooo:rsid="0da448ce"/>
    </style:style>
    <style:style style:name="T832" style:family="text">
      <style:text-properties officeooo:rsid="0da5b8c0"/>
    </style:style>
    <style:style style:name="T833" style:family="text">
      <style:text-properties officeooo:rsid="0da77c31"/>
    </style:style>
    <style:style style:name="T834" style:family="text">
      <style:text-properties officeooo:rsid="0da91e0b"/>
    </style:style>
    <style:style style:name="T835" style:family="text">
      <style:text-properties officeooo:rsid="0dab08a6"/>
    </style:style>
    <style:style style:name="T836" style:family="text">
      <style:text-properties officeooo:rsid="0dacd1a9"/>
    </style:style>
    <style:style style:name="T837" style:family="text">
      <style:text-properties officeooo:rsid="0dae2c8e"/>
    </style:style>
    <style:style style:name="T838" style:family="text">
      <style:text-properties officeooo:rsid="0dae6cc5"/>
    </style:style>
    <style:style style:name="T839" style:family="text">
      <style:text-properties officeooo:rsid="0daebb84"/>
    </style:style>
    <style:style style:name="T840" style:family="text">
      <style:text-properties officeooo:rsid="0dafae65"/>
    </style:style>
    <style:style style:name="T841" style:family="text">
      <style:text-properties officeooo:rsid="0db12935"/>
    </style:style>
    <style:style style:name="T842" style:family="text">
      <style:text-properties officeooo:rsid="0db4b1dc"/>
    </style:style>
    <style:style style:name="T843" style:family="text">
      <style:text-properties officeooo:rsid="0db50a48"/>
    </style:style>
    <style:style style:name="T844" style:family="text">
      <style:text-properties officeooo:rsid="0db69a1a"/>
    </style:style>
    <style:style style:name="T845" style:family="text">
      <style:text-properties officeooo:rsid="0db86a6e"/>
    </style:style>
    <style:style style:name="T846" style:family="text">
      <style:text-properties officeooo:rsid="0dbb0e49"/>
    </style:style>
    <style:style style:name="T847" style:family="text">
      <style:text-properties officeooo:rsid="0dbbef11"/>
    </style:style>
    <style:style style:name="T848" style:family="text">
      <style:text-properties officeooo:rsid="0dbd3b9d"/>
    </style:style>
    <style:style style:name="T849" style:family="text">
      <style:text-properties officeooo:rsid="0dbdfc01"/>
    </style:style>
    <style:style style:name="T850" style:family="text">
      <style:text-properties officeooo:rsid="0dbe59c0"/>
    </style:style>
    <style:style style:name="T851" style:family="text">
      <style:text-properties officeooo:rsid="0dc1290a"/>
    </style:style>
    <style:style style:name="T852" style:family="text">
      <style:text-properties officeooo:rsid="0dc1ee6b"/>
    </style:style>
    <style:style style:name="T853" style:family="text">
      <style:text-properties officeooo:rsid="0dc3bd1c"/>
    </style:style>
    <style:style style:name="T854" style:family="text">
      <style:text-properties officeooo:rsid="0dc428f1"/>
    </style:style>
    <style:style style:name="T855" style:family="text">
      <style:text-properties officeooo:rsid="0dc52f30"/>
    </style:style>
    <style:style style:name="T856" style:family="text">
      <style:text-properties officeooo:rsid="0dc70bd4"/>
    </style:style>
    <style:style style:name="T857" style:family="text">
      <style:text-properties officeooo:rsid="0dc8bd06"/>
    </style:style>
    <style:style style:name="T858" style:family="text">
      <style:text-properties officeooo:rsid="0dca1f84"/>
    </style:style>
    <style:style style:name="T859" style:family="text">
      <style:text-properties officeooo:rsid="0dcad839"/>
    </style:style>
    <style:style style:name="T860" style:family="text">
      <style:text-properties officeooo:rsid="0dcca14a"/>
    </style:style>
    <style:style style:name="T86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la" fo:country="VA"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5in" fo:text-indent="-0.25in" fo:margin-left="3.5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ractatus Summularum</text:p>
      <text:p text:style-name="P13">Magistri Gasparis Lax Aragonensis: partim ultima fetura contextus partimque noviter, a quavis sententiarum nebulositate abstractus feliciter incipit.</text:p>
      <text:p text:style-name="P12"/>
      <text:p text:style-name="P3"><text:span text:style-name="T2">Gaspar</text:span> <text:span text:style-name="T4">Lax</text:span> <text:span text:style-name="T1">(</text:span>14<text:span text:style-name="T2">87</text:span>-15<text:span text:style-name="T4">60</text:span><text:span text:style-name="T1">)</text:span></text:p>
      <text:p text:style-name="P5">/<text:span text:style-name="T5">10</text:span>/</text:p>
      <text:p text:style-name="P5">R. BIBLIOTECA UNIVERSITARIA ALESSANDRINA ROMA </text:p>
      <text:p text:style-name="P4">D h 38</text:p>
      <text:p text:style-name="P2"/>
      <text:p text:style-name="P1"/>
      <text:p text:style-name="P271"/>
      <text:h text:style-name="P866" text:outline-level="1">Tractatus Summularum magistri Gasparis</text:h>
      <text:p text:style-name="Subtitle">Tractatus Summularum magistri Gasparis <text:span text:style-name="T6">L</text:span>ax feliciter incipit</text:p>
      <text:p text:style-name="P6">/<text:span text:style-name="T11">12a</text:span>/</text:p>
      <text:p text:style-name="P15">Cum in omni scientia a definitionibus terminorum ipsius necessario inchoandum sit, et frequenter de sufficientia et bonitate definitionum in multis scientiis et signanter in nostra logicali scientia fiat inquisitio, similiter et de sufficientia et bonitate divisionum expedit ante omnia de definitione, et de divisione brevem mentionem facere quum in sequentibus de bonitate et sufficientia alicuius definitionis vel divisionis fiet mentio ea quae ad bonam definitionem et ad bonam divisionem requiruntur innotescant.</text:p>
      <text:h text:style-name="P868" text:outline-level="2">De <text:span text:style-name="T164">d</text:span>efinitione</text:h>
      <text:h text:style-name="Heading_20_3" text:outline-level="3"><text:span text:style-name="T164">D</text:span>efinitio est oratio explicans significatum definiti cum quo conver<text:span text:style-name="T7">t</text:span>itur</text:h>
      <text:p text:style-name="P7"><office:annotation office:name="__Annotation__1916_531463576" loext:resolved="false"><dc:creator>Unknown Author</dc:creator><dc:date>2025-06-01T18:29:24.701504358</dc:date><text:p text:style-name="P1023"><text:span text:style-name="T861">Definitio: ‘animal rationale’.</text:span></text:p><text:p text:style-name="P1023"><text:span text:style-name="T861">Definitum propinquum: ‘homo’.</text:span></text:p><text:p text:style-name="P1023"><text:span text:style-name="T861">Definitum remotum: Quocumque homine.</text:span></text:p><text:p text:style-name="P1023"><text:span text:style-name="T861"/></text:p><text:p text:style-name="P1023"><text:span text:style-name="T861">Exemplum primum: Definitum propinquum est terminus (convertitur cum definitione).</text:span></text:p><text:p text:style-name="P1023"><text:span text:style-name="T861"/></text:p><text:p text:style-name="P1023"><text:span text:style-name="T861">Exemplum secundum: Definitione (convertitur cum definito propinquo). </text:span></text:p><text:p text:style-name="P1023"><text:span text:style-name="T861"/></text:p><text:p text:style-name="P1023"><text:span text:style-name="T861">Exemplum tertium: Quocumque homine (homo existens).</text:span></text:p></office:annotation>Definitum duplex est scilicet propinquum et remotum:</text:p>
      <text:list text:style-name="L1">
        <text:list-item>
          <text:p text:style-name="P900">Definitum propinquum est terminus cuius significatum explicatur per definitionem cum qua convertitur.</text:p>
        </text:list-item>
        <text:list-item>
          <text:p text:style-name="P900">Definitum remotum est res significata per definitum propinquum in prima definitione, ubi dicitur explicans significatum definiti, cum quo convertitur, procedit de definito propinquo.</text:p>
        </text:list-item>
      </text:list>
      <text:p text:style-name="P8">Exemplum primae definitionis patet de ly ‘animal rationale’ respectu de ly ‘homo’. Exemplum secundae patet de ly ‘homo’ respectu de ly ‘animal rationale’. Exemplum tertio patet de quocumque homine respectu de ly ‘animal rationale’<office:annotation-end office:name="__Annotation__1916_531463576"/>. Ex quibus <text:span text:style-name="T8">patet quod quodlibet definitum propinquum alicuius definitionis significat aliquid vel aliqua, </text:span><text:span text:style-name="T27">s</text:span><text:span text:style-name="T8">imiliter et qualibet definitio, nec potest aliquis terminus esse definitum vel definitio secundum aliquam significationem nisi secundam illam significet aliquid vel aliqua.</text:span></text:p>
      <text:h text:style-name="Heading_20_3" text:outline-level="3">Contra primam definitionem arguitur</text:h>
      <text:p text:style-name="P821">Ex ipsa sequitur quod ly ‘rationale’ vel ‘risibile’ est definitio de ly ‘homo’, sed hoc est falsum; igitur falsitas consequentis est manifesta et quod sequatur patet quia convertitur cum ly ‘homo’ et explicat significatum de ly ‘homo’. Adeo bene sicut ly ‘animal rationale’.</text:p>
      <text:h text:style-name="P872" text:outline-level="3">Forte dices quod</text:h>
      <text:p text:style-name="Text_20_body"><text:span text:style-name="T13">A</text:span><text:span text:style-name="T8">d bonam definitionem requiritur quod aliquid ponatur communius definito quod sub aliis verbis dici solet. Puta quod ponatur aliquis terminus loco generis et hanc conditionem oportet subintelligere in definitione modo non servatur in illa oratione illa conditio, propterea neganda est sequela.</text:span></text:p>
      <text:h text:style-name="P873" text:outline-level="3"><text:soft-page-break/>Contra istam solutionem arguitur</text:h>
      <text:p text:style-name="P9"><text:span text:style-name="T12">E</text:span>x ipsa sequitur quod nullus terminus qui non habet genus supra se seu terminum communiorem ipso potest definiri, <text:span text:style-name="T12">s</text:span><text:span text:style-name="T8">ed hoc est falsum; igitur quod sequatur notum est et falsitas consequentis probatur, quia Philosophus definit illum terminum </text:span><office:annotation office:name="__Annotation__3699_1163966212" loext:resolved="false"><dc:creator>Unknown Author</dc:creator><dc:date>2025-01-30T22:41:26.843549492</dc:date><text:p><text:span text:style-name="T861">Univoce in diffinitio: ‘qualitas’ in praedicamentis non habet genus supra se, <text:s/>saltem tenendo quod ly ‘ens’ non univoce dicatur de substantia et qualitate.</text:span></text:p></office:annotation><text:span text:style-name="T8">‘qualitas’ in praedicamentis qui non habet genus supra se, nec terminum communiorem, saltem tenendo quod ly ‘ens’ non univoce dicatur de substantia et qualitate.</text:span><office:annotation-end office:name="__Annotation__3699_1163966212"/></text:p>
      <text:p text:style-name="P9"><text:span text:style-name="T8">Item sequitur quod ly quantitas discreta non </text:span><text:span text:style-name="T9">bene definietur sic: “Est quantitas cuius partes non copulantur” et caetera. </text:span><text:span text:style-name="T10">Sed hoc est contra communem modum loquendi; igitur quod tamen sequatur patet quia in illa definitione non ponitur terminus magis communis quam illud definitum.</text:span></text:p>
      <text:h text:style-name="P874" text:outline-level="3">Forte <text:span text:style-name="T12">dices quod</text:span></text:h>
      <text:p text:style-name="P9"><text:span text:style-name="T14">A</text:span><text:span text:style-name="T12">d bonam definitionem non requiritur quod in ipsa ponatur aliquid quod sit verum genus definiti, </text:span><text:span text:style-name="T15">s</text:span><text:span text:style-name="T12">ed satis </text:span><text:span text:style-name="T15">est quod habeat locum generis ad hunc sensum quod sit terminus magis communis quam definitum, vel habeat modum significandi magis communem quam definitum et ex hoc possint solvi duae replicae.</text:span></text:p>
      <text:p text:style-name="P9"><text:span text:style-name="T15">Unde ad primam dico quod ly ‘quantitas’ bene poterit definiri quantumcumque teneatur /</text:span><text:span text:style-name="T17">12b</text:span><text:span text:style-name="T15">/ quo ly ‘ens’ non dicatur univoce de substantia et qualitate, quia adhuc potest dari aliquis terminus magis communis quam ly ‘qualitas’ ut puta unum disiunctum aut aliquis alius terminus huiusmodi, et hoc sufficeret ad hoc quod posset definiri ly ‘qualitas’. </text:span></text:p>
      <text:p text:style-name="P10">Ad secundam nego quod illa non sit bona definitio et ad probationem dico quod licet ‘quantitas’ non sit terminum magis communis quam ly ‘quantitas discreta’ habet tamen generaliores modum connotandi quam habeat ly ‘quantitas discreta’ prout ex dicendis alibi apparebit.</text:p>
      <text:h text:style-name="Heading_20_3" text:outline-level="3">Contra ista arguitur</text:h>
      <text:p text:style-name="P11"><text:span text:style-name="T16">Ex ipsis sequitur quod aliqua est definitio alicuius definiti propinqui, et illud definitum propinquum est definitio </text:span><text:span text:style-name="T18">respectu eiusdem definitionis, sed hoc est falsum; igitur falsitas consequentis videtur manifesta quod sequatur tamen patet quia ly ‘animal rationale’ erit definitio ly ‘animal risibile’ e</text:span><text:span text:style-name="T25">t</text:span><text:span text:style-name="T18"> ly ‘animal risibile’ erit etiam definitio de ly ‘animal rationale’ quia nihil deficiet alicui illorum terminorum de his quae requiruntur ad hoc u</text:span><text:span text:style-name="T19">t</text:span><text:span text:style-name="T18"> </text:span><text:span text:style-name="T19">s</text:span><text:span text:style-name="T18">it definitio alterius.</text:span></text:p>
      <text:h text:style-name="Heading_20_3" text:outline-level="3">Ad hanc replicam</text:h>
      <text:p text:style-name="P16">Si quis velet concedere illatum posset seipsum defendere, quia non esset deficultas alia quam ad nomen aliter tamen dico negando sequelam, saltem si procedas secundum easdem significationes illorum terminorum, quod addo quia procedendo secundum diversas non inconveniret illud. Et pro solutione probationis est advertendum quod in proposito per ly “explicare significatum alicuius termini” intelligimus complexe significare illud quod per talem terminum ‘incomplexe’ significatur, aut magis complexe significare illud quod per talem terminum minus complexe significatur.</text:p>
      <text:p text:style-name="P16">Hoc supposito respondeo ad replicam negando sequela et ad probationem nego quod nihil deficiat, immo nullus illorum terminorum explicat significatum alterius procedendo ad sensum tactum, quia nullus illorum est incomplexus, nec aliquid illorum magis complexe significat illud quod per alterum minus complexe significatur. <text:s/></text:p>
      <text:h text:style-name="P875" text:outline-level="3"><text:soft-page-break/>Secundo arguitur: <text:span text:style-name="T227">Aliqua est definitio quae non convertitur cum definito; ergo </text:span><text:span text:style-name="T20">prima definitio mala</text:span></text:h>
      <text:p text:style-name="P225"><text:span text:style-name="T226">A</text:span><text:span text:style-name="T20">ntecedens probo: aliqua est definitio; ergo aliqua est quae non convertitur cum definito. Consequentia videtur manifesta et antecedens probatur quia ly ‘corpus intellectuale’ est bona definitio de ly ‘homo’, et nulla pars illius convertitur cum ly ‘homo’.</text:span></text:p>
      <text:p text:style-name="P17">Forte dices negando primum antecedens et ad probationem concesso antecedente negabis consequentiam, quia de illa definitione assumpta verificatur antecedens.</text:p>
      <text:p text:style-name="P17">Contra hoc arguitur: <text:span text:style-name="T24">E</text:span>x hoc sequitur hoc sequitur quod aliqua est bona definitio respectu alicuius definiti in qua non ponitur aliquid loco differentiae, sed quaelibet pars esse magis communis quam definitum, et poneretur in illa definitione loco generis. Sed haec sunt contra communem modum loquendi; igitur quod sequantur patet in proposito.</text:p>
      <text:p text:style-name="P17">Ad hanc replicam respondetur negando sequelam, et dico quod quaelibet pars illius definitionis potest poni in ipsa loco differentiae, et dico quod hoc non inconvenit quia ad hoc quod aliquid ponatur loco differentiae in aliqua definitione non requiritur quod convertatur cum definito propinquo illius definitionis.</text:p>
      <text:h text:style-name="Heading_20_3" text:outline-level="3">Praeterea arguitur contra illam primam et secundam definitiones simul</text:h>
      <text:p text:style-name="P19">In definitione definitionis ponitur ly ‘definitum propinquum’ saltem aequivalenter, et in definitione definiti propinqui ponitur ly ‘definitio’; ergo illae definitiones non sunt sufficientes. Antecedens patet ex processu, et consequentia probatur quia definitio cuiuscumque termini debet esse notior definito; ergo quaelibet pars definitionis debet esse notior definito. Antecedens constat ex eo, quia per definitionem venimus in notitiam definiti propter hoc enim quaerimus definitiones terminorum, ut per illas cognoscamus significata illorum, et consequentia probatur quia non potes aliqua pars alicuius complexi esse minus not quam totum complexum. Oportet ergo quod quaelibet pars definitionis /13a/ sit notior definito. Si igitur aliquis terminus ponatur in definitione alicuius qui etiam ponitur in sua definitione, sequitur quod aliquis terminus erit notior altero, et ille alter erit notior ipso, quod est impossibile. Ex hoc igitur manifeste apparet bonitas consequentiae probandae.</text:p>
      <text:p text:style-name="P18"><text:span text:style-name="T21">Ad hoc respondetur negando consequentiam, et ad probationem dico quod non oportet </text:span><text:span text:style-name="T22">dico quod non oportet quod universaliter definitio sit notior definito, licet frequenter ia contingat vel potest dici quod licet universaliter oporteat quod definitio quo ad aliquas partes sit notior definito, tamen non oportet quod secundum se totam et secundum quamlibet eius partem sit notior definito. Hoc in multis potest apparere et ly “explicans significatum definiti” non debet intelligi isto modo, sed quid per illud intelligatur dictum est in fine primi argumenti.</text:span></text:p>
      <text:h text:style-name="Heading_20_3" text:outline-level="3">Praeterea arguitur contra secundam et tertiam definitiones simul</text:h>
      <text:p text:style-name="P20">Ex his sequitur quod idem est definitum propinquum et remotum respectu eiusdem definitionis, sed hoc est falsum, igitur falsitas consequentis probatur quia illi termini ‘definitum propinqui’, ‘definitum remotum’ sunt membra dividentia aliquod divisum; ergo illa debent opponi et non debent coincidere et per consequens non convenient eidem sequela tantum, <text:span text:style-name="T23">probatur quia ly ‘definitum propinquum’ est definitum propinquum secundae definitionis, et est definitum remotum eiusdem, </text:span><text:soft-page-break/><text:span text:style-name="T23">quia significatur per definitum propinquum ipsius ex quo definitum propinquum ipsius quodlibet definitum propinquum significat, et ipsum est definitum propinquum.</text:span></text:p>
      <text:p text:style-name="P20"><text:span text:style-name="T23">Forte dices concedendo sequelam et negando falsitatem consequentis, et ad probationem negabis primam consequentiam. Unde ad hoc ut </text:span><text:s/><text:span text:style-name="T23">aliqua sint membra alicuius bonae divisionis non requiritur quod sint </text:span><text:span text:style-name="T24">opposita et non coincidentia quantum ad rem significatam, sic quod non conveniunt vel possint convenire eidem supposito, sed satis est quod sint non coincidentia quantum ad suas significationes, ita quod secundum diversas rationes et significationes conveniat illis quibus conveniunt, et it contingit de illis duobus terminis quia licet conveniant eidem secundum tamen diversas rationes et significationes convenient illi.</text:span></text:p>
      <text:p text:style-name="P22"><text:span text:style-name="T24">Contra istam solutionem arguitur: Si membra </text:span><text:span text:style-name="T25">divisionis non aliter debeant opponi vel non coincidere quam secundam suas rationes vel significationes, sequitur quod quodlibet definitum propinquum alicuius definitionis esse definitum remotum respectu eiusdem, sed hoc est falsum; igitur falsitas consequentis est manifesta de definito primae definitionis. </text:span><text:span text:style-name="T26">Q</text:span><text:span text:style-name="T25">uod sequatur patet quia si contingeret oppositum materiae, contingeret de ly ‘homo’ respectu de ly ‘animal rationale’, sed hoc modo igitur consequentiam cum maiori et minor probatur quia ly ‘homo’ est definitum </text:span><text:span text:style-name="T28">propinquum</text:span><text:span text:style-name="T25"> de ly ‘animal rationale’. Hoc patet quia ly ‘homo’ significatur per definitum propinquum illius definitionis, nam significatur per seipsum ex quo qualibet res significat seipsam, et ipsamet est definitum propinquum de ly ‘animal rationale’.</text:span></text:p>
      <text:p text:style-name="P21">Forte dices quod licet significetur per definitum propinquum illius definitionis non tamen proprie, quod requiritur ad hoc ut sit definitum remotum. Et in tertia definitione de tali modo significandi proceditur.</text:p>
      <text:p text:style-name="P21"><office:annotation office:name="__Annotation__202_3979523174" loext:resolved="false"><dc:creator>Unknown Author</dc:creator><dc:date>2025-02-04T00:04:36.962159030</dc:date><text:p text:style-name="P1023"><text:span text:style-name="T861">Ly ‘homo’: diffinitum propinquum.</text:span></text:p><text:p text:style-name="P1023"><text:span text:style-name="T861">Conceptus non ultimatum: significat diffinitum propinquum.</text:span></text:p><text:p text:style-name="P1023"><text:span text:style-name="T861">Conceptus non ultimatus significat ‘omnes homines’.</text:span></text:p><text:p text:style-name="P1023"><text:span text:style-name="T861">‘</text:span><text:span text:style-name="T861">Omnes homines’ refertur ad homines reales.</text:span></text:p></office:annotation>Contra hoc arguitur: Ly ‘homo’ significatur proprie per definitum propinquum de ly ‘animal rationale’; igitur antecedens patet, quia significatur proprie per conceptum qui est naturalis similitudo distincta ipsius, qui conceptus solet vocari non-ultimatus, et ille conceptus est definitum propinquum de ly ‘animal rationale’, quia significat ‘omnes homines’ ex impositione, eodem modo sicut ly ‘homo’ prout ex dicendis apparebit, igitur.<office:annotation-end office:name="__Annotation__202_3979523174"/></text:p>
      <text:p text:style-name="P23">Item: Contra solutionem quia terminus praecise improprie significans aliqua significata, potest definiri secundum talem significationem impropriam quemadmodum contingit de isto termino vocali ‘homo’ secundum significationem secundum quam significat seipsum et omnia naturaliter similia ipsi et aliquod erit definitum remotum respectu illius definitiones, et tamen non significabitur proprie per definitum propinquum; ergo solutio nulla.</text:p>
      <text:p text:style-name="P272">Forte dices aliter propter istas duas replicas, ut puta, quod nec ad definitum remotum requiritur quod proprie significetur per definitum propinquum /13b/ nec illud sufficit, sed requiritur et sufficit quod significetur per definitum propinquum secundum significationem secundum quam est definitum propinquum et caetera.</text:p>
      <text:p text:style-name="P24"><text:span text:style-name="T29">Contra istam solutionem arguitur primo: Probando quod ad definitum remotum alicuius definitionis requiratur quod proprie significetur per definitum propinquum illius definitionis, quia si oppositum contingeret maxime contingeret definiendo ly ‘homo’ secundum significationem impropriam secundum quam significat se et omnia naturaliter sibi similia sed hoc non; igitur consequentia tenet cum maiori et minor. </text:span><office:annotation office:name="__Annotation__236_4039408974" loext:resolved="false"><dc:creator>Unknown Author</dc:creator><dc:date>2025-02-05T00:06:06.231574736</dc:date><text:p text:style-name="P1023"><text:span text:style-name="T861">Diffinitum remotum significatur per diffinitum propinquum.</text:span></text:p></office:annotation><text:span text:style-name="T29">Probatur quia tunc quodlibet defi</text:span><text:span text:style-name="T30">nitum remotum illius definitiones proprie significabitur per definitum propinquum ipsius</text:span><office:annotation-end office:name="__Annotation__236_4039408974"/><text:span text:style-name="T30">; igitur antecedens patet quia tunc proprie </text:span><text:soft-page-break/><text:span text:style-name="T30">significabitur per conceptum cui subordinatur ly ‘homo’ </text:span><text:span text:style-name="T31">secundum illam significationem secundum quam definitur, et ille conceptus est definitum propinquum illius definitionis secundum talem significationem ex quod est synonymus, secundum illam cum ly ‘homo’ igitur.</text:span></text:p>
      <text:p text:style-name="P25">Forte dices quod non continget illud quando quando conceptus cui subordinatur ly ‘homo’ actualiter est, sed quando non est talis conceptus.</text:p>
      <text:p text:style-name="P26">Contra istam solutionem <text:span text:style-name="T32">arguitur: Quia quando nullus talis conceptus est, nullum est definitum remotum illius definitionis; ergo solutio nulla. Antecedens patet quia nihil significabitur tunc per definitum propinquum illius, ex quo non potest definitum propinquum illius definitionis significare aliquo modo nisi conceptus cui subordinatur in sic significando actualiter sit.</text:span></text:p>
      <text:p text:style-name="P27">Forte dices concedendo quod nihil significabitur actu per definitum propinquum illius definitionis, sed aliquid significabitur in potentia propinqua per definitum propinquum illius quod sufficit ad hoc, ut sit definitum remotum. Unde licet tunc non esset aliquis conceptus cui ly ‘homo’ subordinetur in significando, tamen adhuc esset concedendum quod in potenti propinqua significa illo modo.</text:p>
      <text:p text:style-name="P27">Contra solutionem arguitur: Ex ipsa sequitur quod in illo casu conceptus qui non est significat in potentia propinqua, et per consequens aliquid significabitur in potentia propinqua proprie per definitum propinquum illius definitionis, quod repugnat dictis. Quod sequatur illud patet quia tunc ly ‘homo’ in potentia propinqua significat illo modo et caetera; ergo in potentia propinqua significat illo modo mediate aliquo conceptu. Ex consequenti sequitur quod ly ‘homo’ in potentia propinqua est synonymum alicui conceptui secundum illam significationem, et ex hoc sequitur quod aliquis conceptus in potentia propinqua, secundum talem significationem, est synonymus cum ly ‘homo’, ex quo iterum sequitur quod aliquis conceptus in potentia propinqua significat illo modo, igitur.</text:p>
      <text:p text:style-name="P28">Item: Contra eandem solutionem ex ipsa sequitur <text:span text:style-name="T33">insufficientia tertia definitionis. Hoc patet quia positio quod ly ‘animal rationale’ sit et significet et non sit aliquod definitum propinquum illius definitionis, tunc quilibet homo erit definitum de ly ‘animal rationale’ et tamen nullus homo tunc significabitur per definitum propinquum illius definitionis in potentia propinqua, quia dato opposito huius aliquid significaretur in potentia propinqua per conceptum cui potest subordinari ly ‘homo’ in casu praecedentis replicae.</text:span></text:p>
      <text:p text:style-name="P29"><text:span text:style-name="T33">Praeterea arguitur probando quod ad definitum remotum non requiratur et sufficiat quod significetur per definitum </text:span><text:span text:style-name="T34">propinquum secundum illam significationem, et caetera. Quia dato huius opposito sequitur quod albedo est definitum remotum definitionis de ly ‘album’ qui est ly ‘res habens albedinem’. Sed hoc est falsum, igitur falsitas consequentis est manifesta, quod sequatur patet quia albedo proprie significatur per ly ‘album’ secundum significationem secundum quam est definitum propinquum illius definitionis.</text:span></text:p>
      <text:p text:style-name="P31">Pro his difficultatibus pono propositiones:</text:p>
      <text:p text:style-name="P32">Prima: Non est possibile quod aliquid actualiter significetur per definitum propinquum alicuius definitionis quin illud proprie significetur per aliquod definitum propinquum eiusdem propositio. Patet ex eo quia si aliquid actualiter significet aliquo modo, significat illo modo mediante conceptu, qui etiam actualiter significabit /14a/ tunc proprie eodem modo.</text:p>
      <text:p text:style-name="P32"><text:soft-page-break/>Secunda: Possibile est quod aliquid significetur in potentia propinqua per definitum propinquum alicuius definitionis absque hoc quod significetur in potentia propinqua proprie per definitum propinquum alicuius definitionis. Proposito patet ponendo quod ly ‘homo’ definiatur secundum significationem eius impropriam et nullus sit terminus in potenti propinqua significans proprie illo modo. Ex hac sequitur quod ad hoc quod aliquod sit definitum remotum alicuius definitionis non requiritur quod proprie significetur actu vel in potentia propinqua per definitum propinquum illius definitionis.</text:p>
      <text:p text:style-name="P30"><text:span text:style-name="T34">Tertia: Licet ly ‘animal rationale’ possit esse et significare suo modo absque hoc quod sit aliquod definitum propinquum ipsius secundum suam significationem, et ly ‘homo’ possit esse et significare suo modo absque hoc quod sit aliqua definitio eius, tamen non poterit ly ‘animal rationale’ esse definitio absque hoc quod eius definitum propinquum sit, nec poterit ly ‘homo’ esse definitum propinquum aut remotum nisi actualiter sit definitio respectu cuius dicatur definitum propinquum vel remotum. Et per hoc apparet solutio ad illam replicam in qua niteris probare insufficientiam tertia</text:span><text:span text:style-name="T35">e</text:span><text:span text:style-name="T34"> definitionis, unde negandum est quod dato illo casu quod, quilibet homo sit </text:span><text:span text:style-name="T35">definitum remotum de ly ‘animal rationale’, quia tunc ly ‘animal rationale’ non es definitio ex quod nullum est tunc definitum propinquum ipsius. Verum est tamen quod bene posset esse ly ‘animal rationale’ definitio absque hoc quod esset aliquod definitum remotum illius.</text:span></text:p>
      <text:p text:style-name="P823">Quarta: <text:span text:style-name="T36">Ad hoc quod aliquod sit definitum remotum alicuius definitionis non sufficit quod significetur per definitum propinquum secundum illam significationem et caetera. Sed requiritur et sufficit quod de significato materiali significetur per definitum propinquum illius definitionis secundum significationem et caetera. Prima pars patet de albedine respectu definitionis de ly ‘album’, et secunda patet ex communi usu. Et per hoc patet solutio ad ultimam replicam. Ex his igitur patet plenaria intellectio tertiae definitionis, sic enim intelligenda est in toto rigore: </text:span><text:span text:style-name="T37">Defin</text:span><text:span text:style-name="T36">itum remotum alicuius definitionis est res significata, de significato materiali, per definitum propinquum illius definitionis, secundum </text:span><text:span text:style-name="T37">significationem secundum</text:span><text:span text:style-name="T36"> quam est definitum propinquum illius definitionis.</text:span></text:p>
      <text:p text:style-name="P822">Ex his patet solutio ad omnia quae tacta sunt inter arguendum, dempta illa replica per quam niteris probare quod ad hoc quod aliquod sit definitum remotum alicuius definitionis requiratur quod significetur proprie per definitum propinquum. Ad quam patet illic solutio usque ad replicam ultimam, ad quam nego antecedens, et ad probationem nego penultimam consequentiam in qua infers quod aliquis conceptus in potentia propinqua secundum talem significationem sit synonymus cum ly ‘homo’ et caetera.</text:p>
      <text:h text:style-name="Heading_20_3" text:outline-level="3">Praeterea <text:span text:style-name="T38">arguitur contra ultimam definitionem</text:span></text:h>
      <text:p text:style-name="P33">Ex ipsa sequitur quod alicuius definitionis aliquod est definitum remotum et illud idem non est definitum ipsius, sed hoc est impossibile; igitur sequatur patet quia ly ‘non definitum remotum’ potest definire hoc modo: Non definitum remotum est aliquid quod non significatur per definitum propinquum alicuius definitionis.</text:p>
      <text:p text:style-name="P33">Tunc sic: Huius definitionis aliquod est definitum remotum et illud idem non est definitum remotum illius; igitur prima pars antecedentis patet, quia dato eius apposito, tunc definitum propinquum illius definitionis non significaret aliquid vel aliqua, quod est falsum, quia quando nullum est definitum <text:soft-page-break/>propinquum nec est aliqua definitio de quolibet, verum est dicere quod est non definitum remotum alicuius definitionis.</text:p>
      <text:p text:style-name="P33">Secunda pars antecedentis probatur quia sit ‘a’ quodcumque definitum remotum illius, tunc sequitur quod ‘a’ significatur per definitum propinquum eius secundum significationem et caetera. Sed definitum propinquum eius est ly ‘non definitum remotum’, quod praecise significat non definitum remotum illius seu aliquid quod non est definitum remotum illius; ergo ‘a’ est non definitum remotum illius.</text:p>
      <text:h text:style-name="Heading_20_3" text:outline-level="3">Pro solutione huius argumenti pono propositiones</text:h>
      <text:p text:style-name="P34">Prima: Data definitione de ly ‘non definitum remotum’, quaelibet res est definitum remotum illius. <text:s/>Propositio /14b/ patet quia quaelibet res significatur de significato materiali per definitum propinquum illius secundum significationem et caetera, quia si non sit definitio aut definitum propinquum de qualibet rem, verum est dicere quod est non definitum remotum.</text:p>
      <text:p text:style-name="P35">Secunda: <text:span text:style-name="T39">Definitum propinquum illius definitionis non praecise significat non definitum remotum eius, aut aliquid quod non est definitum remotum eius, immo quidquid significat illud definitum propinquum, est definitum remotum illius definitionis, utraque pars ex praecedenti apparet.</text:span></text:p>
      <text:p text:style-name="P38">Tertia: Definitum propinquum illius definitionis significat id quod significat connotando quod sit non definitum remotum. Et praeterea illa definitione et suo definito illo modo significantibus nulli conveniet definitum propinquum ipsius, licet cuilibet possit convenire.</text:p>
      <text:p text:style-name="P36"><text:span text:style-name="T39">Haec omnia ex duabus praecedentibus constant. Tunc respondetur ad argumentum negando sequelam et ad probationem datis illis qui supponis. Nego quod ‘a’ non sit definitum remotum illius, et ad probationem </text:span><text:span text:style-name="T40">nego quod ly ‘non definitum remotum’ praecise significet non definitum remotum seu aliquid quod non est definitum remotum.</text:span></text:p>
      <text:p text:style-name="P39">Hic possent fieri aliquae impositiones de ly ‘definitum propinquum’ et de ly ‘definitum remotum’, sed quia difficultates inde provenientes inchoantibus summulistis essent difficiles, et de ipsis sufficienter facta est mentio in prima quaestione impositionum vicesimo octavo et vicesimo nono argumentis, illa omnia pro nunc relinquo.</text:p>
      <text:p text:style-name="P40">Ex praedictis igitur possunt inferri conditiones quae solent poni ad bonam definitionem, quarum: </text:p>
      <text:list text:style-name="L2">
        <text:list-item>
          <text:p text:style-name="P901"><text:span text:style-name="T42">P</text:span><text:span text:style-name="T41">rima est: Quod definito conveniat omni contento sub definito.</text:span></text:p>
        </text:list-item>
        <text:list-item>
          <text:p text:style-name="P902">Secunda est: Quod non conveniat aliis a definito quae conditiones possunt sub aliis verbis clarius et melius poni cum aliquibus aliis.</text:p>
        </text:list-item>
        <text:list-item>
          <text:p text:style-name="P902">Prima ergo conditio est: Quod definitio explicet naturam definiti ad sensum superius declaratum.</text:p>
        </text:list-item>
        <text:list-item>
          <text:p text:style-name="P901"><text:span text:style-name="T41">Secunda: Quod </text:span><text:span text:style-name="T42">si definitio conveniat alicui eidem, conveniat suum definitum propinquum.</text:span></text:p>
        </text:list-item>
        <text:list-item>
          <text:p text:style-name="P903">Tertia: Quod si definitum propinquum alicuius definitionis conveniat alicui eidem conveniet definitio illa.</text:p>
        </text:list-item>
      </text:list>
      <text:p text:style-name="P37"><text:soft-page-break/><text:span text:style-name="T42">Et loco istarum duarum conditionum, scilicet, secunda et tertia, sufficeret ponere istam quae tangitur in definitione definitionis, videlicet, quod definitio convertatur cum suo definito propinquo. Ea ex hac conditione potest inferri quod nullus </text:span><text:span text:style-name="T43">terminus potest definiri nisi significet aliquid vel aliqua, quia licet talis terminus sit synonymus alicui, non tamen proprie est convertibilis cum aliqui, sed obliquus bene poterit definiri cuius definitio erit similis obliquus definitionis sui recti.</text:span></text:p>
      <text:p text:style-name="P827">Posset etiam addi quarta conditio: Quod definitum propinquum, nec secundum se nec secundum eius casuale, sit pars definitionis cuius est definitum propinquum.</text:p>
      <text:p text:style-name="P827">Aliqui dicunt quod definitio non debet continere aliquod superfluum aut diminutum, quod si intelligatur ad hunc sensum quod definito non debet convenire alicui cui non convenit definitum, nec definitum alicui cui non convenit definitio, bene dictum est prout apparet ex secunda et tertia conditionibus, quae hoc idem dicunt si tamen intelligatur ad istum sensum, quod definitio non debet convenire aliquam particulam sine qua residuum sit bona definitio eiusdem definiti, nec sibi debet deficere aliqua particula.</text:p>
      <text:p text:style-name="P824">Quantum ad hoc ultimum punctum bene dictum esset esto quod non esset necessarium talem conditionem, ultra praedictas, assignare cum ex praedicis appareat, illud debere servari. Sed quantum ad primum punctum non est illud bene dictum, quia ly ‘substantia animata sensitiva’ est bona definitio de ly ‘animal’, tamen secludendo ab ea ly ‘animata’ residuum esset bona definitio ipsius, et in multis aliis propositis simile contingit. Sufficit ergo illas quattuor praedictas conditiones assignare. </text:p>
      <text:p text:style-name="P824">Ex praedictis patet <text:span text:style-name="T44">quod licet interdum definitio convertatur cum suo definito remoto, ut puta quando idem est definitum propinquum et remotum non tamen oportet quod universaliter convertatur cum definito remoto, licet oporteat quod universaliter convertatur cum definito remoto, licet oporteat quod universaliter convertatur cum propinquo.</text:span></text:p>
      <text:p text:style-name="P825">Hic dubitatur an terminus qui non potest alicui convenire secundum talem significationem, possit definiri. Et ratio dubitationis est quia videtur ex una parte quod sic natura ly ‘<text:span text:style-name="T163">C</text:span>himaera’, ly ‘vacuum’ et et ly ‘hircocervus’ solent definiri, et illi /15a/ sunt huiusmodi saltem procedendo naturaliter. Ly ‘vacuum’ est huiusmodi et alii qualitercumque procedatur.</text:p>
      <text:p text:style-name="P826">Ex altera autem parte videtur quod non, quia sic tunc indifferenter definitio de ly ‘Chimaera’ posset esse definitio de ly ‘vacuum’, et definitio de ly ‘hircocervus’ et caetera.</text:p>
      <text:p text:style-name="P826">Ad hanc dubitationem posset uno modo responderi negative. Et ad communem modum qui definit huiusmodi terminos, diceretur quod ille non sunt distinctiones, sed sunt quaedam orationes per quas notificantur significatione et connotationes talium terminorum, et communis modus non intendit per illud definire tales terminos, sed assignare tales orationes.</text:p>
      <text:p text:style-name="P826">Potest etiam responderi affirmative et ad illud quod tangis neganda est sequela, et ratio est quia definitio de ly ‘<text:span text:style-name="T162">C</text:span>himaera’ explicabit significationem et connotationem illius termini taliter qualiter oportet, et sufficit ad hoc quod sit definitio illius, quae tamen non taliter explicabit significationem et connotationem de ly ‘vacuum’, et it de similibus dicatur ly ‘definito’ potest dividi in multas species, sed non spectat ad propositum de illis videre.</text:p>
      <text:h text:style-name="Heading_20_2" text:outline-level="2"><text:soft-page-break/>De divisione</text:h>
      <text:p text:style-name="P41">Circa materiam de divisione est advertendum quod diversimode potest capi ille terminus ‘divisio’, capiendo ipsum ad huc prout a logico consideratur. <text:span text:style-name="T45">Posset enim dici quod ly ‘divisio’ synonymo accipitur pro disiuncto ex membris dividentibus aliquod divisum, et hoc modo istud disiunctum ‘animal rationale’ vel ‘animal irrationale’ esset diviso de ly ‘animal’.</text:span></text:p>
      <text:p text:style-name="P42">Alio modo potest capi ly ‘divisio’ pro quadam propositione hypothetica copulativa in qua duo vel plures termini minus communes quam divisum, comprehendentes omnia eius significata denotantur, convenire ipsi diviso taliter quod aliqua diversitas inter supposita talium terminorum vel inter modos significandi illorum terminorum reperitur. Exemplum patet de ista propositione: “Animalium quoddam est rationale et Animale quoddam est irrationale”. Et hoc modo capiendo potest sic definiri ly ‘divisio’:</text:p>
      <text:p text:style-name="Quotations">Est propositio per quam duorum vel plurium terminorum, omnia supposita divisi comprehendentium, quorum quilibet est minus communis quam divisum et aliter significans quam quicumque alius ipsorum quilibet ipsi, diviso denotatur convenire.</text:p>
      <text:p text:style-name="P43"><text:s/><text:span text:style-name="T46">Nec est curandum si aliqui aliter istum terminum definirent quia difficultas non esset nisi ad nomen et ista definitio est satis conformis communi modi loquendi, et forte magis conformis quam si alio modo daretur.</text:span></text:p>
      <text:p text:style-name="P45">Divisum sic potest definiri:</text:p>
      <text:p text:style-name="Quotations"><text:span text:style-name="T47">Est terminus cui duorum aut plurium terminorum, omnia supposita ipsius comprehendentium, quorum quilibet est minus communis quam ipse et aliter significans quam quicumque alius ipsorum quilibet, per aliquam propositionem denotatur conve</text:span><text:span text:style-name="T48">n</text:span><text:span text:style-name="T47">ire.</text:span></text:p>
      <text:p text:style-name="Quotations">Termini autem minus communes quam divisum, qui per divisionem ipsi diviso denotantur, convenire membra illius divisionis dividentia illud divisum, appellantur.</text:p>
      <text:p text:style-name="P44"><text:span text:style-name="T47"><text:s/></text:span><text:span text:style-name="T46"><text:s/></text:span><text:span text:style-name="T49">Ex quibus definitionibus patet quod non est possibile quod sit aliqua </text:span><text:span text:style-name="T50">divisio absque hoc quod sit divisum eius, nec est possibile quod sit aliquod divisum absque hoc quod sit divisio eius. Patet secundo quod ista propositio: “Aliquod animal est animal rationale et Aliquod animal est animal irrationale”, est divisio de ly ‘animal’.</text:span></text:p>
      <text:p text:style-name="P46">Aliquae conditiones solent communiter poni quae secundum communiter loquentes requiruntur ad bonam divisionem, ideo:</text:p>
      <text:list text:style-name="L3">
        <text:list-item>
          <text:p text:style-name="P904">Primo: Tangam ipsas.</text:p>
        </text:list-item>
        <text:list-item>
          <text:p text:style-name="P904">Secundo: Inquiram de earum veritatem.</text:p>
        </text:list-item>
        <text:list-item>
          <text:p text:style-name="P904">Tertio: Resolutorie tangam id quod mihi videbitur esse dicendum circa illas. </text:p>
        </text:list-item>
      </text:list>
      <text:h text:style-name="Heading_20_3" text:outline-level="3">Quo ad primum igitur</text:h>
      <text:list text:style-name="L4">
        <text:list-item>
          <text:p text:style-name="P905"><text:span text:style-name="T51">P</text:span>rima conditio qui solet poni est haec: Quod membra dividentia non excedant divisum.</text:p>
        </text:list-item>
        <text:list-item>
          <text:p text:style-name="P906">Secunda: Quo divisum non excedat membra dividentia.</text:p>
        </text:list-item>
        <text:list-item>
          <text:p text:style-name="P906"><text:soft-page-break/>Tertia: Quod membra dividentia sint opposita.</text:p>
        </text:list-item>
        <text:list-item>
          <text:p text:style-name="P906">Quarta: Quod ipsa sit bimembris vel possit reduci ad unam bonam divisionem bimembrem illius divisi.</text:p>
        </text:list-item>
        <text:list-item>
          <text:p text:style-name="P906">Quinta: Quod quodlibet membrum dividens sit terminus minus communis quam divisum.</text:p>
        </text:list-item>
      </text:list>
      <text:p text:style-name="P47">Prima istarum conditionum intelligitur sic, quod non sit possibile quod aliquod membrorum dividentium aliquod divisum, conveniat alicui quin illud divisum conveniat eidem.</text:p>
      <text:h text:style-name="Heading_20_3" text:outline-level="3">Contra istam conditionem sic intellectam arguitur</text:h>
      <text:p text:style-name="P53">Ly ‘canis’ dividitur in canem latrabilem, piscem marinum et sidus caeleste, et illa conditio /15b/ non convenit illi divisioni qua dividitur in illa membra. Igitur consequentia tenet cum maiori, et minor probatur quia ly ‘canis’ non unico conceptu significat, omnia illa quae significantur per illa membra, sed tribus diversis vel igitur ly ‘canis’ erit divisum illius divisionis secundum significationem secundum quam significat canes latrabiles, vel secundum illam secundum quam significat piscem marinum, vel secundum illam secundum quam significat sidus caeleste. Quocumque istorum dato licui conveniet aliquod illorum membrorum cui non conveniet ly ‘canis’ secundum significationem secundum quam est divisum illius divisionis igitur. Et simile argumentum potest fieri de divisione qua ly ‘animal’ dividitur in animal verum et animal pictum.</text:p>
      <text:h text:style-name="Heading_20_3" text:outline-level="3">Pro solutione argumenti est advertendum quod aliqua est divisio in qua divisum mediante eodem conceptu continuo capitur pro diviso ipsius</text:h>
      <text:p text:style-name="P54">Ita quod quodlibet membrum illius divisionis denotatur convenire diviso mediante eodem conceptu mediante quo, quodcumque alterum membrum denotatur sibi convenire. Et haec divisio solet vocari univoci in sua univocata.</text:p>
      <text:p text:style-name="P48">Alia est divisio in qua divisum non mediante uno conceptu solum capitur pro diviso illius divisionis, sed mediantibus diversis similis. Ita quod membra dividentia non denotantur sibi convenire mediante uno conceptu, sed unum mediante uno et aliud mediante alio, et ista divisio solet vocari divisio aequivoci in sua aequivocata, et divisiones captae in argumento sunt huiusmodi.</text:p>
      <text:p text:style-name="P48">Tunc respondeo ad argumentum negando minorem et ad probationem concesso quod ly ‘canis’ non unico conceptu significet illa omnia, sed mediantibus tribus diversis, nego quod mediante aliquo illorum capiatur pro diviso illius divisionis, sed mediantibus tribus diversis similis capitur.</text:p>
      <text:p text:style-name="P48">Contra ista solutionem arguitur: <text:span text:style-name="T52">E</text:span>x ipsa sequitur quod nullum illorum membrorum est terminus minus communis quam divisum, modo ex quinta conditione illud requiritur ad bonam divisionem; ergo illa non est bona consequentia. Tenet cum minori et maior patet quia secundum nullam illarum trium significationum illius divisio, aliquod illorum membrorum est terminus minus communis quam divisum, nec secundum illas tres simul, quia illud divisum non est unus terminus communis secundum illas tres simul, ex quo non est unus terminus.</text:p>
      <text:p text:style-name="P48">Forte dices <text:span text:style-name="T52">quod non oportet servare illam quintam conditionem pro talibus divisionibus quae sunt aequivocorum is sua aequivocata, sed servanda est pro divisionibus univocorum in sua univocata.</text:span></text:p>
      <text:p text:style-name="P49"><text:soft-page-break/>Contra hoc arguitur: Sequitur <text:span text:style-name="T53">ex hoc quod definitio divisionis sit insufficiens, quia praesupponit illud quod quinta conditio. Si igitur quinta conditio non in omnibus divisionibus sit servanda sequitur quod illa definitio non cuilibet divisioni convenit.</text:span></text:p>
      <text:p text:style-name="P55">Haec replica petit qualiter debeat intelligi quinta conditio, quae in definitione praesupponitur. Pro quo dico quod ad bonam divisionem non oportet universaliter quod quodlibet membrorum dividentium proprie sit terminus minus communis quam divisum, et signanter illud non oportet de divisionibus aequivocorum is sua aequivocata. Sed pro talibus satis est quod divisum significet mediantibus diversis conceptibus, et quodlibet membrorum dividentium mediante uno illorum significet, et propter hoc poterit quodlibet illorum membrorum dici terminus inferior vel minus communis quam divisum.</text:p>
      <text:p text:style-name="P55">Et si arguas contra ista quia ly ‘quantitas’ dividitur in quantitatem continuam et discretam, sufficienti divisione, tamen ly ‘quantitas discreta’ non est terminus minus communis proprie vel improprie quam ly ‘quantitas’. Non enim improprie eo modo quo membra dividentia illum terminum ‘canis’ respectu ipsius, nec proprie, quia est terminus convertibilis cum diviso igitur.</text:p>
      <text:p text:style-name="P50"><text:span text:style-name="T53">Ad hoc </text:span><text:span text:style-name="T54">dico quod ly ‘quantitas discreta’ potest dici terminus inferior proprie ad divisum et terminus minus communis quam divisum, quia non obstante quod convertatur cum diviso tamen divisum habet generaliorem modum significandi quam habeat ly ‘quantitas discreta’.</text:span></text:p>
      <text:p text:style-name="P56">Si tamen velis dicere quod hoc non sufficit ad hoc quod proprie dicatur terminus inferior ad divisum, sed per illud dicetur improprie ad divisum, hoc indifferens est dum modo definitio et quinta conditio /16a/ taliter intelligantur, quod illa inferioritas, quam habet ly ‘quantitas discreta’ in ordine ad ly ‘quantitas’, sufficiat cum aliis requisitis ad bonitatem illius divisionis.</text:p>
      <text:p text:style-name="P56">Secunda conditio sic intelligitur:</text:p>
      <text:p text:style-name="Quotations">Quod non sit possibile quod divisum conveniat alicui quin aliquod membrum dividentium ipsum conveniat eidem.</text:p>
      <text:p text:style-name="P56">Ex quo patet quod esto quod non sit aliquod animal nisi homo vel asinus, ista divisio non erit bona animalium. Aliquod animal est homo et aliquod animal est asinus, quia potest divisum convenire alicui absque hoc quod aliquod membrorum dividentium conveniat eidem.</text:p>
      <text:h text:style-name="Heading_20_3" text:outline-level="3">Contra istam conditionem arguitur: Ly ‘animal’ sufficienter dividitur per ista membra ‘animal rationale’, ‘animal irrationale’</text:h>
      <text:p text:style-name="P51"><text:span text:style-name="T55">Et tamen ly ‘animal’ convenit alicui cui nullum membrorum dividentium convenit; igitur consequentia tenet cum maiori. </text:span><text:span text:style-name="T56">M</text:span><text:span text:style-name="T55">inor patet quia de pronomine demon</text:span><text:span text:style-name="T56">strantem unum hominem et unum asinum, verum est dicere quod sunt animalia, quare illis animalibus convenit divisum et tamen nullum membrorum dividentium convenit illis, igitur.</text:span></text:p>
      <text:p text:style-name="P52"><text:span text:style-name="T56">Forte dices negando minorem, et ad probationem dices quod verum </text:span><text:span text:style-name="T57">est quod terminus pluralis numeri illius divisi convenit alicui cui nullum membrorum dividentium convenit, non tamen divisum convenit alicui et caetera, quia refert loqui de illo diviso et de plurali eius.</text:span></text:p>
      <text:p text:style-name="P58"><text:soft-page-break/>Alii aliter dicunt ad hoc et in idem redit si eorum intentio sane intelligatur, videlicet, quod non inconvenit quod divisum in plurali numero convenit alicui cui nullum membrorum dividentium convenit, sed inconvenit quod in singulari numero conveniat divisum alicui et caetera.</text:p>
      <text:p text:style-name="P59">Et si contra hoc arguas ponendo quod ad bonam divisionem requiratur quod non sit possibile quod divisum in singulari vel plurali conveniat alicui quin aliquod membrorum dividentium conveniat eidem, tunc redibit difficultas.</text:p>
      <text:p text:style-name="P59">Ad hoc dico primo quod admittendum est illud suppostum, quia non est nisi impositio aequivalenter.</text:p>
      <text:p text:style-name="P59">Dico secundo quod divisio qua ly ‘animal’ dividitur in ‘animal rationale’ et ‘animal irrationale’ non erit bona secundum hanc impositionem vel significationem.</text:p>
      <text:p text:style-name="P59">Dico tertio quam ubicumque aliquis terminus singularis aut pluralis numeri debet dividi, divisione bona secundum hanc impositionem vel significationem oportet quod detur eius divisio, eodem modo ac si deberet dari divisio disiuncti ex singulari et plurali illius divisi, et propterea ubi solet dari divisio alicuius termini singularis per tria membra vel quattuor, quemadmodum contingit de divisione termini in terminum mentalem, vocalem, scriptum et mixtum difficile esset ipsam bene assignare, stando in hac impositione vel suppositione, nisi in ipsa procederetur per abnegationem in aliquibus membris.</text:p>
      <text:p text:style-name="P59">Et pro illo hanc regulam notabis si aliquis terminus singularis aut pluralis numeri proponatur dividendus bona divisione secundum istam impositionem vel suppositionem, cape quattuor terminos quorum primis sit terminus qui in singulari numero sit inferior ad divisum in singulari, ita quod possit alicui convenire divisum absque hoc quod illi conveniat illud membrum.</text:p>
      <text:p text:style-name="P59">Et secundus sit terminus pluralis numeri simili modo inferior ad divisu in plurali numero, et tertius sit compositus ex diviso et contradictorio primi.</text:p>
      <text:p text:style-name="P57"><text:span text:style-name="T58">Et quartus </text:span><text:span text:style-name="T59">ex diviso et contradictorio secundi, et per illos quattuor terminos, tamquam per quattuor membra, poteris dividere illud divisum eo modo quo petitur. Unde si taliter velis dividere ly ‘animal’ vel ly ‘animalia’, cape ly ‘rationale’ pro primo termino, et ly ‘rationalia’ pro secundo, et ly ‘animal non rationale’ pro tertio, et ly ‘animalia non rationalia’ pro quarto, et per istos divides illum terminum.</text:span></text:p>
      <text:p text:style-name="P176">Et si velis dividere ly ‘terminus’ vel ly ‘termini’ prima divisione qua solet dividi divisione sufficienti isto modo, cape pro primo termino ly ‘terminus mentalis’, pro secundo ly ‘termini mentales’, pro tertio ly ‘terminus non mentalis’, et pro quarto ly ‘termini non mentales’, et ita proportionabiliter de aliis.</text:p>
      <text:p text:style-name="P60">Et ex his apparet etiam qualiter debeat dividi sufficienter stando in impositione communi et non procedendo secundum hanc impositionem communem disiunctum ex aliquo termino singulari et eius plurali, unde procedendum est consimiliter sicut statim.</text:p>
      <text:p text:style-name="P60">Hic tamen praesupponitur hoc quod cuiuscumque divisionis divisum respectu alicuius membri dividentis ipsum ita se habet, quod stat illud divisum convenire alicui absque hoc, quod illud membrum eidem conveniat licet, non oporteat quod respectu cuiuslibet membri ita se habeat, quemadmodum de ly /16b/ quantitas, et de ly ‘quantitas discreta’ apparere potest.</text:p>
      <text:p text:style-name="P60"><text:soft-page-break/>Et si forte occurreret aliquod divisum dividendum per plura membra, in ordine ad quorum nullum illo modo se haberet, tunc non esset recurrendum ad hoc quod dictum est ad assignandam sufficientem divisionem, sed postquam quodlibet illorum membrorum deberet converti. Tunc cum diviso, satis esset capere duo illorum membrorum in divisione, aut tria quaecumque fuerint, et ex quibuscumque illorum fieret sufficiens divisio.</text:p>
      <text:p text:style-name="P61"><text:span text:style-name="T60">Sed contra dicta arguitur probando quod ly ‘animal’ </text:span><text:span text:style-name="T61">in singulari numero conveniat alicui cui nullum illorum membrorum dividentium conveniat, quia de isto copulato ‘homo et asinus’ divisive capto verificatur ly ‘animal’ in singulari, prout ex dicendis in materia de copulatis apparebit et tamen nullum illorum membrorum verificatur de illo copulato divisive capto.</text:span></text:p>
      <text:p text:style-name="P68">Item de isto termino ‘homo vel asinus’ distributive capto verificatur illud divisum et tamen nullum membrorum dividentium verificatur de illo disiuncto capto distributive.</text:p>
      <text:p text:style-name="P68">Si forte dicas propter ista quod non est universaliter servanda ista conditio, sed loco istius et loco primae potest poni una quae istas duas comprehendet et erit haec quod disiunctum ex membris dividentibus convertatur cum diviso. Sed contra hoc potest argui de divisione aequivoci in sua aequivocata, ubi non servatur illa conditio.</text:p>
      <text:p text:style-name="P62"><text:span text:style-name="T61">Quidquid ergo sit de ista conditione contra quam haec ultima replica procedit inferius videbitur tenendo tamen secundam conditionem pro illis </text:span><text:span text:style-name="T62">duabus replicis penultimis potest dici quod quum dicitur in secunda conditione, quod non sit possibile et caetera.</text:span></text:p>
      <text:p text:style-name="P63"><text:span text:style-name="T62">Intelligendum est per conveniere supponere et tunc nihil habebitur ex his contra conditionem, quia ex ipsis non sequitur quod pro aliquo supponat divisum pro quo nullum membrorum dividentium supponit. </text:span><text:span text:style-name="T63">S</text:span><text:span text:style-name="T62">i tamen per convenire intelligatur verificari de aliquo termino, prima istarum replicarum concluderet intentum. Puta quod non oportet universaliter illam conditionem </text:span><text:span text:style-name="T63">servare et esset instantia in proposito. Sed secunda replica adhuc non concluderet, quia licet per illam probetur quod de aliquo termino aliquo modo se habente verificetur divisum, et nullum membrorum dividentium verificetur de illo taliter se habente, non tamen ex illo sequitur quod de aliquo verificetur divisum de quo nullum membrorum dividentium ver</text:span><text:span text:style-name="T64">i</text:span><text:span text:style-name="T63">ficatur.</text:span></text:p>
      <text:p text:style-name="P64">Tertia conditio non est taliter intelligenda, quod membra dividentia sic debeant opponi quod non conveniant vel non possunt convenire eidem, sed debet sic intelligi quod membra dividentia debent habere diversas significationes, sic quod nullum illorum debet coincidere in modo significandi vel esse synonymum cum altero ipsius captis secundum significationes secundum quas sunt membra dividentia illud divisum. Et ad propositionabilem sensum debet intelligi conditio illa quae ponitur ab aliquibus sub aliis verbis, videt quod membra dividentia non debent coincidere.</text:p>
      <text:h text:style-name="Heading_20_3" text:outline-level="3">Contra istam conditionem arguitur: <text:span text:style-name="T65">Supponendo unum videt quod si aliquis terminus dividatur per duo aut plura membra e duo illorum membrorum subdividantur</text:span></text:h>
      <text:p text:style-name="P64">Tunc illud divisum sufficienter poterit dividi captis membris subdividentibus illa duo membra loco illorum duorum membrorum, caeteris servatis simili modo, si fuerint ala membra.</text:p>
      <text:p text:style-name="P64">Tunc sic ly ‘terminus’ sufficienter dividitur in terminum categorematicum et syncategorematicum et in terminum mixtum. Et terminus categorematicus sufficienter dividitur in terminum <text:soft-page-break/>categorematicum officio tantum, et terminum categorematicum significatione tantum, et terminum categorematicum officio et significatione simul. Et terminus syncategorematicus sufficienter dividitur in terminum syncategorematicum significatione tantum, et syncategorematicum officio tantum, et syncategorematicum officio et significatione simul.</text:p>
      <text:p text:style-name="P64">Ergo per statim suppositum ly ‘terminus’ sufficienter dividetur in illa sex membra, et ly ‘terminus mixtus’. Sed aliquod illorum sex membrorum coincidit in modo significandi cum alio, quia ly ‘terminus categorematicus officio tamtum’ eodem modo significat sicut ly ‘terminus syncategorematicus significatione tantum’. Et ly ‘terminus categorematicus significatione tantum eodem modo sicut ly ‘terminus syncategorematicus officio tantum’, quia primo duo termini eadem definitione /17a/ definiuntur similiter, et ultimi dio prout ex dicendis in materia de termino categorematico et syncategorematico apparebit; ergo illa conditio illo modo intellecta adhuc erit insufficiens.</text:p>
      <text:h text:style-name="Heading_20_3" text:outline-level="3">Pro solutione huius argumenti est advertendum quod quamvis inconveniat duos terminos non convertibiles eadem definitione definiri, tamen non inconveniret duos terminos non synonymos eadem definitione definiri</text:h>
      <text:p text:style-name="P65">Ex quo patet <text:span text:style-name="T66">quod quanvis prima duo membra de quibus probatur quod eadem definitione definiantur, de necessitate debent esse convertibilia, non tamen necessarium est quod sint synonyma, et idem sequitur de aliis duobus de quibus probatur idem.</text:span></text:p>
      <text:p text:style-name="P69">Tunc pono duas propositiones</text:p>
      <text:p text:style-name="P69">Prima: Si teneatur quod illa prima duo membra sunt synonyma non est admittendum illud quod supponitur in principio argumenti. Quia ex illis destrueretur tertia conditio ex consequenti definitio divisionis. Ex hac sequitur quod si haec tertia conditio taliter intelligatur quod ipsa praetendat quod nullum membrum bonae divisionis debet esse convertibile cum altero membro eiusdem divisionis aut supponatur illud requiri ad bonam divisionem, tunc non erit etiam admittendum quod praesuponitur in principio argumenti.</text:p>
      <text:p text:style-name="P66"><text:span text:style-name="T66">Secunda: </text:span><text:span text:style-name="T67">Stando in expositione data huius tertiae conditionis, si teneatur quod illa prima duo membra non sint synonyma esto quod argumentum non concluderet quod praetendit de ista divisione. Tamen adhuc non est admittendum id quod supponitur in principio argumenti, quia potest ly ‘a’ significare absolute ‘omnes homines’ et similes, non significando alia bruta de his quae sunt, et potest ly ‘b’ significare ‘omnia bruta’ non significando homines, quo facto ly ‘animal’ sufficienter poterit dividi per ly ‘a’ et ly ‘b’. Tamen ly ‘a’ et ly ‘b’ poterunt dividi taliter quod unum membrum dividens, unum illorum erit synonymus cum uno membro dividente alterius, quo habito </text:span><text:span text:style-name="T68">apparet falsitas illius supposti.</text:span></text:p>
      <text:p text:style-name="P67"><text:span text:style-name="T69">Tunc patet solutio ad argumentum ad quod negandum est suppositum. Ex quod patet quod non obstante quod conditio ista sit servanda ad bonam divisionem, tamen non inconveniet quod </text:span><text:span text:style-name="T70">aliqua sit bona divisio et membra </text:span><text:span text:style-name="T71">dividentia subdividantur, et unum membrum subdividens unum illorum sit synonymum cum membro subdividente; alterum quo habito apparet falsitas illius suppositi.</text:span></text:p>
      <text:p text:style-name="P73">Quarta conditio non eget explanatione.</text:p>
      <text:h text:style-name="Heading_20_3" text:outline-level="3"><text:soft-page-break/>Contra ipsam tamen potest argui de divisione qua ly ‘terminus’ dividitur in terminum mentalem, vocalem, scriptum et mixtum</text:h>
      <text:p text:style-name="P70">Quia illa non est bimembris nec videtur posse reduci ad bimembrem, quia nulla duo illorum membrorum sufficerent ad bonam divisionem illius.</text:p>
      <text:h text:style-name="Heading_20_3" text:outline-level="3">Pro solutione argumenti est advertendum quod non est intelligendum quod omnis bona divisio debet esse bimembris</text:h>
      <text:p text:style-name="P71">Vel taliter reducibilis ad bimembrem, si habeat plura membra quod sit reducibilis ad bimembrem, cuius unum membrum sit unum membrum illius quae habet quam duo.</text:p>
      <text:p text:style-name="P71">Et pro reductione talium sit haec prima regula: Si detur divisio alicuius termini in singulari tantum, aut in plurali tantum, per plura membra quam duo, et velis ipsam reducere ad bimembrem, cape unum membrum illius divisionis quod ita se habet in ordine ad divisum quod stat divisum convenire alicui absque hoc quod illud membrum conveniat eidem, et cape postea aggregatum ex diviso et contradictorio illius membri, et ex illis duobus terminis tamquam ex duobus membris, facies bonam divisionem bimembrem illius divisi ad quam reducetur alia divisio.</text:p>
      <text:p text:style-name="P71">Secunda: Si alicuius termini debeat dari divisio sufficiens pro ipso in singulari et plurali per plura membra, et velis ipsam reducere ad bimembrem, cape disiunctum ex duobus terminis, quorum unus sit singularis numeri et alter pluralis illius singularis, in ordine ad quod disiunctum taliter se habet divisum quod disiunctum ex ipso divisio in singulari, et ipso in plurali, convenit alicui absque hoc quod aliud disiunctum conveniat eidem, et cape postea compositum ex disiunctio ex diviso in singulari et diviso in plurali, et ex contradictorio alterius disiuncti et ex illis duobus terminis, tamquam ex duobus membris, poteris facere sufficientem divisionem bimembrem illius divisi, ad quam /<text:span text:style-name="T72">17b</text:span>/ reducetur illa divisio habens plura membra.</text:p>
      <text:p text:style-name="P72">Et proportionabiliter <text:span text:style-name="T73">dicendum esset ubi daretur divisio alicuius termini in singulari aut in plurali per plura membra quam, duo tenta suppositione fiebat superius, videt quod ad bonam divisionem requiratur quod non stet quod divisum in singulari vel plurali conveniat alicui cui nullum membrorum dividentium convenit, et velis talem divisionem reducere ad bimembrem.</text:span></text:p>
      <text:p text:style-name="P74">Ibi tamen supponitur illud quod superius supponebatur, videt quod cuiuscumque bonae divisionis, aliquod membrum ita se habet in ordine ad divisum quod stet divisum, convenire alicui absque hoc quod illud membrum conveniat eidem, licet non oporteat de quolibet membro. Et si forte divideretur aliquis terminus per plura membra quam duo, et de nullo membro illius divisionis contingeret illud, tunc non esset divisio reducenda ad bimembrem. Hoc modo nec esset difficultas in eius reductione, quia ex quo tunc oporteret quod quodlibet membrum cum quolibet alio esset convertibile similiter, et cum diviso satis esset capere duo membra illorum, et ex illis facere divisionem bimembrem illius divisi, ad quam posset illa qui habet plura membra quam duo reduci.</text:p>
      <text:p text:style-name="P74">Nec tunc inconveniret quod aliqua esset bona divisio, et auferendo unum membrum vel duo vel plura ex tempora residuum esset bona divisio. Et ex consequenti si in aliqua divisione diceretur aliquod membrum superfluum, quia ipso semoto residuum esset bona divisio, aliqua esset bona divisio in qua quodlibet membrum esset superfluum, hoc contingeret de tali divisione, sed tenendo id quod praesuppositum est in regulis, an inconveniret quod in aliqua bona divisione aliquod membrum esset superfluum.</text:p>
      <text:p text:style-name="P74"><text:soft-page-break/>Ad sensum statim tactum potest dicit quod non, quia sicut ly ‘quantitas’ sufficienter dividitur in quantitate continuam et discretam, non obstante quod ly ‘quantitas continua’ sit terminus inferior consequentialiter ad ly ‘quantitas discreta’. Ita ly ‘animal’ poterit dividi per ly ‘homo’, et ly ‘asinus’, et ly ‘animal non-homo’ ubi tam ly ‘equus’ quam ly ‘asinus’ illo modo superfluerent, et etiam de pluribus membris quam duobus posset contingere.</text:p>
      <text:p text:style-name="P74">Tunc facile patet solutio ad argumentum, ad quod nego quod illa divisio non possit reduci ad bimembrem. Et ad probationem dico quod licet nulla duo membra illius divisionis sufficiant ad bonam divisionem illius termini, tamen ex hoc non sequitur quod illa non possit reduci ad bonam divisionem bimembrem, prout apparet ex processu.</text:p>
      <text:h text:style-name="Heading_20_3" text:outline-level="3">Contra quintam conditionem potest fieri argumentum de ly ‘quantitas discreta’ respectu de ly ‘quantitas’ et de membris dividentibus aequivocum in sua aequivocata</text:h>
      <text:p text:style-name="P75">Sed ex processu argumenti facti contra primam con<text:span text:style-name="T74">ditionem apparet quid sit dicendum ad illa, et ex illo etiam apparet qualiter intelligenda fit illa quinta conditio.</text:span></text:p>
      <text:h text:style-name="Heading_20_3" text:outline-level="3">Resolvendo igitur materiam istam dico primo quod si velis duas primas conditiones ponere in sensibus tactis, secundum quod argumenta non procedunt contra ipsas, bene poteris illas assignare</text:h>
      <text:p text:style-name="P77">Et ex praedictis facile poteris illas defendere.</text:p>
      <text:p text:style-name="P77">Dico tamen secundo quod loco illarum posset poni haec conditio, videt quod ubi aliqua divisio est univoci in sua univocata disiunctum, ex membris dividentibus, debet esse convertibile cum diviso, et ubi esset aequivoci, in sua aequivocata, disiunctum ex membris dividentibus debet esse convertibile cum disiuncto ex terminis captis secundum illa significationes, secundum quas simul illud divisum capitur pro diviso illius divisionis.</text:p>
      <text:p text:style-name="P77">Dico tertio quod aliae tres conditiones debent servari intelligendo eas sicut tactum est in solutionibus argumentorum contra ipsas. Et ex praedictis possunt sufficienter defendi.</text:p>
      <text:p text:style-name="P77">Petes tamen ad bonam divisionem <text:s/>requiratur ubi divisum potest alicui convenire quod quodlibet membrorum dividentium possit convenire alicui cui divisum potest convenire.</text:p>
      <text:p text:style-name="P76"><text:span text:style-name="T74">Ad hoc dico quod sic, et ratio est quia alias possent in aliqua bona definitione, ubi divisum posset alicui convenire, poni multa membra, quorum nullum potest alicui convenire. Immo indifferenter posset capi pro membro in illa quicumque terminus qui non potest alicui convenire, quod satis ab sonum videtur. Et ex hoc </text:span><text:span text:style-name="T75">potest deduci quod nullus terminus qui non potest alicui convenire poterit proprie dividi, quia alias quilibet terminus qui non posset alicui convenire indifferenter, pro membro divisionis illius divisi, posset capi, quod etiam absurdum videtur.</text:span></text:p>
      <text:p text:style-name="P76"><text:span text:style-name="T76">Si </text:span><text:span text:style-name="T74">/</text:span><text:span text:style-name="T75">18a</text:span><text:span text:style-name="T74">/ </text:span><text:span text:style-name="T76">tamen interdum oppositum alicuius istorum reperiatur, dicendum est quod non sunt proprie divisiones, nisi vellemus concedere ista illata, quae videntur inconvenientia. Et tenendo ista pro conditionibus, oportebit in definitione divisionis subintelligere aliquam particulam per quam secludantur ea quae per ista volumus secludere, et poteris addere pro omnibus his ly ‘servatis’ servandis in illa definitione.</text:span></text:p>
      <text:h text:style-name="Heading_20_2" text:outline-level="2"><text:soft-page-break/>De termino</text:h>
      <text:p text:style-name="P79"><text:span text:style-name="T77">Terminus, prout ad propositum sufficit capitur duobus modis, primo ph</text:span><text:span text:style-name="T78">ys</text:span><text:span text:style-name="T77">ice et tunc valet tantum sicut ly ‘finis alicuius rei’, et sic non capitur in proposito. Secundo modo capitur logice, et isto modo adhuc potest capi multis modis qui tangeretur inferius.</text:span></text:p>
      <text:p text:style-name="P84">Capitur tamen hic pro omni illo quod potest poni in propositione consueta, tamquam extremum vel exercens officium.</text:p>
      <text:p text:style-name="P78"><text:span text:style-name="T78">Propositionem consueta voco propositionem mentale</text:span><text:span text:style-name="T79">m, similiter et vocalem quae componitur ex litteris et syllabis vel littera vel syllaba, et </text:span><text:span text:style-name="T80">propositionem scriptam eo modo quo solet scribi ut puta litteris et syllabis vel littera vel syllaba tantum. Similiter propositionem mixtam ex his vel aliquibus istorum.</text:span></text:p>
      <text:p text:style-name="P85">Et hoc modo ly ‘buf’ est terminus similiter, quaelibet littera vel syllaba nec oportet ad terminum hoc modo quod significet proprie, et ratio quare sic capitur in proposito est quia quolibet subiectum vel praedicatum propositionis consuetae logicus reputat terminum, et isto modo capiendo definitur sic:</text:p>
      <text:p text:style-name="Quotations">Terminus es signum ponibile in propositione consueta.</text:p>
      <text:p text:style-name="P85">Quid sit signum videbitur in capitulo de significare et de eius acceptionibus, non tamen capitur stricte ly ‘signum’ in definitione sed large. Et ponitur in definitione quae non est usitata, et potest esse propositio quae non est usitata. Illud tamen non sufficit ad terminum isto modo sed requiritur quod possit poni in propositione usitata. Et inde est quod licet alicui termini non physicali conveniat haec definitio, ut puta isti termino ‘animal’ posito in hac propositione: “Homo est animal”, ille enim est finis illius propositionis, non tamen cuilibet physicali convenit sicut patet de fine agri vel mundi.</text:p>
      <text:h text:style-name="Heading_20_3" text:outline-level="3">Ly ‘terminus’ solet tripliciter capi</text:h>
      <text:p text:style-name="P85">Primo modo: Pro omni illo quod significat aliquo modo in potentia propinqua, et hoc modo quaelibet res est terminus.</text:p>
      <text:p text:style-name="P78"><text:span text:style-name="T80">Secundo modo: </text:span><text:span text:style-name="T81">C</text:span><text:span text:style-name="T80">apitur pro omni illo quod significat proprie naturaliter vel ex impositione proprie dicta formaliter vel aequivalenter, quae non provenit propter similitudinem aut correspondentiam in modo significandi, et hoc modo circulus pendens ante tabernam est terminus.</text:span></text:p>
      <text:p text:style-name="P78"><text:span text:style-name="T80">Tertio modo: </text:span><text:span text:style-name="T82">Capitur pro omni illo quod significat modo praedicto et potest in potentia propinqua secundum talem significationem poni in propositione usitata, et hoc modo ly ‘homo’ est terminus, unde apparet quod quilibet terminus tertio modo est terminus secundo et primo modis. Et quilibet terminus secundo modo est terminus primo modo et non econtra.</text:span></text:p>
      <text:p text:style-name="P80">Aliqua tanguntur in secunda acceptione quorum plenaria intellectio dependet ex his quae dicentur in capitulo de significare, sed de hoc non est curandum, quia ista distinctio non est necessaria, pro dicendis in hoc capitulo ex quo nullo illorum modorum capitur terminus in definitione data prout ex dictis apparere potest, sed capitur secundum quod dictum fuit. Si tamen velles definire ly ‘terminus’ secundum aliquam istarum acceptionum poteris proportionabiliter definire dummodo capias ly ‘signum’ sicut oportet, et loquaris etiam sicut oportet de propositione.</text:p>
      <text:p text:style-name="P81"><text:soft-page-break/>Hic adverte quod cum in definitione dicitur: “Terminus est signum ponibile in propositione”, debet intelligi tamquam extremum vel exercens officium. Ratio est quia alias quaelibet pars huius termini scripti ‘homo’ esset terminus quod falsum est de parte quae non habet formam litterae vel syllabae.</text:p>
      <text:h text:style-name="Heading_20_3" text:outline-level="3">Contra definitionem arguitur primo sic. <text:span text:style-name="T83">Nihil definitur in ipsa, igitur ipsa non valet</text:span></text:h>
      <text:p text:style-name="P82">Antecedens patet quia dato eius opposito vel definitur terminus mentalis, vocalis, scriptus vel mixtus, nullum istorum igitur maior patet a sufficienti divisione, ex quo omnis terminus est mentalis, vel vocalis, vel scriptus, aut mixtus.</text:p>
      <text:p text:style-name="P82">Minor probatur et primo quod non definiatur /18b/ terminus scriptus, quia dato huius opposito sequitur quod definitio non convertitur cum definito; igitur non valet quod sequatur. Patet alicui convenit illa cui non convenit definitum; igitur antecedens patet. <text:span text:style-name="T84">C</text:span>uilibet termino mentali convenit illa et nulli mentali convenit definitum. <text:span text:style-name="T84">I</text:span>gitur maior patet quia quilibet terminus mentalis est signum ponibile in propositione usitata. <text:span text:style-name="T84">Minor probatur, nullus terminus mentalis est terminus scriptus,</text:span> et definitum est terminus scriptus; ego nulli termino mentali convenit definitum.</text:p>
      <text:p text:style-name="P83">Consimiliter potest probari quod non definiatur terminus mentalis, vel vocalis, vel mixtus.</text:p>
      <text:h text:style-name="P876" text:outline-level="3">Ad argumentum respondetur negando antecedens</text:h>
      <text:p text:style-name="P86"><text:span text:style-name="T85">E</text:span>t ad probationem dico primo quod quilibet terminus qui est terminus, capiendo ly ‘terminus’ sicut capitur in illa definitione, definitur tamquam definitum remotum illius. <text:span text:style-name="T86">S</text:span><text:span text:style-name="T85">ed quia argumentum procedit de definito propinquo dico secundo quod definitur illic terminus mentalis, et terminus vocalis, et terminus scriptus, et terminus mixtus tamquam definitum propinquum, procedo in sensu copulativo, et non ad hunc sensum quod definiatur illic tamquam definitum propinquum aliquis terminus qui est mentalis, et vocalis, et scriptus, et mixtum copulatim, sed ad hu</text:span><text:span text:style-name="T87">n</text:span><text:span text:style-name="T85">c </text:span><text:span text:style-name="T87">sensum quod tamquam definitum propinquum.</text:span></text:p>
      <text:p text:style-name="P91">Definitur illic terminus mentalis, et tamquam definitum propinquum definitur illic terminus vocalis, et tamquam definitum propinquum definitur terminus vocalis et ita de aliis membris, et adhuc non debes capere istam copulativam in tali sensu videtur quod tamquam definitum propinquum definitur illic iste terminus ‘terminus mentalis’, et tamquam definitum propinquum definitur illic iste terminus ‘terminus vocalis’ et ita de aliis membris.</text:p>
      <text:p text:style-name="P91">Sed ad hunc sensum quod tamquam definitum propinquum definitur illic aliquis terminus qui est terminus mentalis, et tamquam definitum propinquum definitur aliquis qui est vocalis et ita de aliis membris, et illae partes verificabuntur pro quattuor terminis quorum quilibet est synonymus cum ly ‘terminus’ et primus est mentalis, secundus vocalis, tertius scriptus et quartus mixtus.</text:p>
      <text:p text:style-name="P87"><text:span text:style-name="T87"><text:s/></text:span><text:span text:style-name="T88">Utrum tamen aliquis synonymus cum ly ‘terminus’ aut aliquis alius incomplexus possit esse mixtus ex mentali, vocali et scripto, aut ex quibuscumque duobus illorum videbitur inferius, ubi tangetur prima divisio termini. Et ad illud quod tangis quod non <text:s/>definiatur ibi terminus scriptus, quia dato eius opposito et caetera.</text:span></text:p>
      <text:p text:style-name="P92">Nego illam sequelam, et ad probationem nego antecedens, et ad probationem, concessa maiore, nego minorem. Et ad probationem, concessa maiore, distinguo minorem, quia vel capis illam in illo <text:soft-page-break/>sensu videt quod definitum est talis terminus ‘terminus scriptus’, et tunc bene valebit consequentia et minor est neganda.</text:p>
      <text:p text:style-name="P92">Si tamen capias in hoc sensu quod definitum est aliquis terminus qui est terminus scriptus, concedenda est minor et neganda est consequentia, unde ad habendum intentum oporteret probare quod nullus terminus mentlis fit terminus.</text:p>
      <text:p text:style-name="P87"><text:span text:style-name="T88">Et consimiliter potest dici si fiat consimile argumentum ad probandum quod non definiatur illic terminus mentalis vel terminus mixtus. </text:span><text:span text:style-name="T89">Et si ultra arguas ad probandum intentum, </text:span><text:span text:style-name="T90">quia nulli termino mentali convenit terminus scriptus; ergo nulli termino mentali convenit definitum.</text:span><text:span text:style-name="T88"> <text:s/></text:span></text:p>
      <text:p text:style-name="P88">Ad hoc potest distingui antecedens, quia potest capi in hoc sensu quod de nullo termino mentali verificatur aliquis terminus scriptus, et in isto quod de nullo pronomine, demonstrante aliquem terminum mentalem, verificatur aliquis terminus scriptus, et in isto quod de nullo termino mentali verificatur ly ‘terminus scriptus’. Et in isto quod de nullo pronomine, demonstrante terminum mentalem, verificatur ly ‘terminus scriptus’. <text:span text:style-name="T91">In hoc ultimo sensu est verum, et ex ipso in hoc sensu nihil sequitur contra dicta, in quolibet autem trium primorum est falsum.</text:span></text:p>
      <text:h text:style-name="Heading_20_3" text:outline-level="3">Secundo arguitur supponendo quod Sortes proferat istum terminum ‘homo’, <text:span text:style-name="T93">c</text:span><text:span text:style-name="T92">uius prolatio duret per certum tempus in cuius instanti medio simus iam, et non ponat ipsum in aliqua propositione</text:span></text:h>
      <text:p text:style-name="P89">Tunc sic ille terminus ‘homo’ est terminus et non est signum ponibile in propositione; ergo definitio nulla consequentia tenet cum maiori et minor probatur: ille non potest poni in propositione; igitur antecedens patet si posset poni in propositione, posset proferri, sed non potest proferri; ergo non potest poni in propositione.</text:p>
      <text:p text:style-name="P89">Maior patet quia non est possibile quod aliquis terminus vocalis ponatur in propositione, nisi proferatur, /19a/ ex quod non est possibile quod ponatur in propositione nisi fit, et numquam est nisi quando proferatur.</text:p>
      <text:p text:style-name="P90">Iam probatur minor quia si posset proferri, tunc possibile est quod proferatur, et si sit possibile quod proferatur maxime proferretur iam, sed iam non profertur; igitur ultima consequentia tamtum cum maiori et minor probatur quia nullus terminus qui iam est prolatus profertur, sed ille terminus est prolatus; ergo non profertur.</text:p>
      <text:p text:style-name="P90">Consequentia tenet et maior patet ex illo communi dicto, quod semel dictum <text:span text:style-name="T94">est amplius resumi, non potest minor probatur quia qua ratione iam est verum quod ille terminus profertur eadem ratione aliquando antecedens hoc fuit verum, quia ille terminus profertur quum igitur iam sit verum, quod profertur, sequitur quod antecedens fuit verum quod profertur, et si sic sequitur quod antecedens proferebatur, et ex consequenti sequitur quod est prolatus, unde constat minor prima consequentia, tamen cum minori, et maior patet quia non propter aliud iam est verum quod ille terminus profertur, nisi quia iam sumus in tempore prolationis eius, sed aliquando ante fuimus in tempore prolationis eius; ergo aliquando ante fuit verum, quod profertur.</text:span></text:p>
      <text:p text:style-name="P93">Consequentia cum maiori, minor autem probatur quia quemcumque aliqua pars alicuius temporis est, illud tempus est, sed aliquando ante fut aliqua pars prolationis illius; ergo aliquando ante fuit tempus prolationis illius, et per consequens aliquando ante fuimus in tempore prolationis eius.</text:p>
      <text:p text:style-name="P94"><text:soft-page-break/>Forte dices <text:span text:style-name="T95">ad argumentum negandum minorem, et ad probationem negabis antecedens ad cuius probationem negabis quod ille terminus non possit proferri, immo iam profertur, et ad probationem negabo maiorem. Ut puta quod nullus terminus qui iam est prolatus possit proferri et ad illud commune dictum dices quod intelligitur sit, quod illud quod semel dictum est taliter quod mihi eius restat dicendum, amplius resumi non potest modo non.</text:span></text:p>
      <text:p text:style-name="P98">Sic est de illo termino ‘homo’ quia aliquid eius restat proferendum et ad proportionabilem sensum, sicut illud dictum salvatur potest, et solet concedi quod nullus terminus qui est prolatus potest proferri, et non est illud negatum in illo sensu.</text:p>
      <text:p text:style-name="P99">Contra istam solutionem arguitur: Ex ipsa sequitur quod aliquid terminus vocalis potest proferri, cuius aliqua pars non potest proferri, sed hoc est impossibile, igitur consequentia tenet, et minor patet, quia ex illo sequitur quod aliquis terminus potest esse cuius aliqua pars non potest esse, quum nullus terminus vocalis possit esse, nisi possit proferri. Iam probatur maior quia ex solutione illa pars, illius terminus ‘homo’ quae ante hoc fuit prolata, sic quod nihil eius superest proferendum, non potest proferri prout ex solutione apparet. Tunc sic ille terminus ‘homo’ potest proferri et ipsius illa pars non potest proferri, igitur.</text:p>
      <text:h text:style-name="Heading_20_3" text:outline-level="3">Pro solutione difficultatum argumenti et replicae, est advertendum quod, secundum aliquos, vox non aliud est quam aer refractus, et terminus vocalis non aliud est nisi vox</text:h>
      <text:p text:style-name="P95"><text:span text:style-name="T96">Et ex consequenti non aliud est terminus vocalis nisi aer refractus, et quum idem aer possit bis et ter refr</text:span><text:span text:style-name="T97">e</text:span><text:span text:style-name="T96">gi, </text:span><text:span text:style-name="T97">taliter quod per talem refractionem fiat sonus. Poterit idem terminus vocalis bis et ter et pluries proferri, et ita dicendo nulla est difficultas in argumento sed, quia secundum communem modum loquendi antiquorum, concedendum est quod nullus terminus qui est prolatus potest proferri, saltem naturaliter ad sensum declaratum.</text:span></text:p>
      <text:p text:style-name="P96">Oportet dicere ad argumentum sicut dictum est usque ad replicam pro cuius solutione adverte quod ly ‘potest’ duobus modis potest capi uno modo prout terminum, ut patet sicut ly ‘potest’, ‘potuit’ vel ‘poterit’ quid idem est dictu ac si diceretur id quod aliqui sub aliis verbis dicunt, ut puta quod ly ‘potest’ dicat potentiam logicam.</text:p>
      <text:p text:style-name="P96">Alio modo potest capi prout terminum, ut patet sicut ly ‘potest’ vel imposterum ‘poterit’, quod idem est dictu, ac si diceretur quod ly ‘potest’ dicat potentiam physicam, et in illis propositionibus nullus terminus qui est prolatus potest proferri, quod semel dictum est, resumi non potest, captis in sensibus, in quibus debent concedi ly ‘potest’ capitur secundo modo.</text:p>
      <text:p text:style-name="P96">Tunc dico quod si ly ‘potest’ capiatur primo modo, neganda est sequela, et ad probationem dico quod illa pars illius termini quae est sic prolata, quod nihil eius restat proferendum, bene potest proferri, ex quo potuit proferri et proferebatur, nec hoc contravenit dictis.</text:p>
      <text:p text:style-name="P97">Si autem capiatur ly ‘potest’ secundo modo, nego illam sequelam, et pro solutione probationis, dico quod illa par illius termini quae fuit prolata, taliter quod nihil eius /19b/ remanet proferendum, licet fuerit pars illius termini, tamen non est <text:span text:style-name="T98">pars illius nec potest esse pars illius. </text:span><text:span text:style-name="T99">C</text:span><text:span text:style-name="T98">apiendo ly ‘potest’ secundo modo, saltem copula uniente pro instanti, et ideo concesso quod ille terminus ‘homo’ potest proferri et quod illa pars illius non potest proferri.</text:span></text:p>
      <text:p text:style-name="P100"><text:soft-page-break/>Ne<text:span text:style-name="T100">gandum est quod ille terminus ‘homo’ possit proferri cuius aliqua pars non possit proferri, sed ad inferendum hoc oporteret addere antecedenti </text:span><text:span text:style-name="T101">constantiam, scilicet, illa pars illis potest esse par illius. Et si arguas contra dicta probando quod aliquis terminus qui est prolatus, cuius nulla pars est proferenda possit proferri, adeo bene sicut ista conceditur iste terminus ‘homo’ post proferri, demonstrando illum terminum qui profertur, capiendo ly ‘potest’ secundo modo, quia illa secunda non est concedenda nisi ly ‘proferri’ uniat in ordine at tempus, sed si in prima ly ‘proferri’ taliter uniat, ipsa erit concedenda igitur.</text:span></text:p>
      <text:p text:style-name="P101"><text:span text:style-name="T102">Item arguitur probando illam: “Iste terminus ‘homo’ potest proferri, cuius aliqua par non potest proferri”, capiendo ly ‘potest’ secundo modo, quia bene sequitur: “Iste terminus ‘homo’ potest proferri et ipsius aliqua pars non potest proferri”. </text:span><text:span text:style-name="T108">I</text:span><text:span text:style-name="T102">gitur consequentia tent cum maiori et minor probatur quia ly ‘aliqua pars’ illic supponit pro parte illius quae sic est prolata, quod nihil </text:span><text:span text:style-name="T103">eius remanet proferendum, et hoc habito manifeste apparet verita illius assumptum, probatur quod ly ‘proferri’ illic unit in ordine ad tempus. Ergo ad hoc ut ille terminus supponat pro tali parte, satis erit quod illa possit esse pars illius termini ‘homo’ copula uniente ibi pro tempore, sed copula illo modo uniente illa potest esse pars illius termini ‘homo’ igitur.</text:span></text:p>
      <text:p text:style-name="P104">Pro solutione istorum adverte quod quantumcumque in huiusmodi propositionibus verba uniant pro temporibus, tamen taliter capiuntur quod praedicata denominatur posse convenire subiectis pro aliquo tempore adaequate in affirmativis, ita quod hoc terminus qui est prolatus non potest proferri, capiatur in hoc sensu. Terminus qui prolatus, non potest proferri, capitur in hoc sensu. Terminus qui est prolatus non potest in aliquo tempore adaequate proferri.</text:p>
      <text:p text:style-name="P102"><text:span text:style-name="T104">Dicitur aliquis terminus in aliquo tempore adaequate proferri quum sic profertur in illo quod quaelibet pars illius temporis aliqua pars illius termini profertur, et illa propositio: “Aliquis terminus cuius aliqua pars non potest proferri, potest proferri” in proportionabili sensu capitur ita quod ad veritatem illius requiratur quod aliquis terminus possit proferri in aliquo tempore adaequate, et aliquid quod potest esse pars ipsius in aliquo tempore adaequate, non potest proferri in aliquo tempore adaequate, et nisi taliter caperetur concedenda esset illa propositio. Ut puta si diceretur quod in ista secunda resolvente eius: “Aliqua pars non potest adaequate proferri in aliquo tempore”. </text:span><text:span text:style-name="T111">L</text:span><text:span text:style-name="T104">y ‘aliqua pars’ supponit pro parte illius quae non potest in aliquo tempore adaequate esse pars illius, neque oportebit quod in verificatione capiatur ly ‘adaequate’.</text:span></text:p>
      <text:p text:style-name="P105">Et ita dicendo etiam, potest concedi quod aliquis terminus potest esse in aliquo tempore adaequate, cuius aliqua pars non potest in aliquo tempore adaequate esse neque hoc inconveniret, et per hoc solveretur illud quod tangis in ultima replica argumenti per quod niteris probare impossibilitatem illius, scilicet: “Aliquis terminus potest proferri cuius aliqua pars non potest proferri”. <text:span text:style-name="T110">Q</text:span>ualitercumque igitur capitur haec propositio: “Aliquis terminus potest proferri cuius aliqua pars non potest proferri”, sive in sensu quo potest concedi sive in alio, facile apparet solutio ad omnia quae tacta sunt.</text:p>
      <text:p text:style-name="P105">Unde ad primam replicam dico quod verum est quod illa esset concedenda copula uniente pro tempore, nisi in ipsa subintelligeretur ly ‘adaequate”.</text:p>
      <text:p text:style-name="P105">Ad secundam replicam dico quod si capiatur illa in sensu in quo concedi debet replica, non procedit contra dicta. Si autem capiatur alio modo probatio non procedit et nego quod in illa ipsius aliqua pars non potest proferri ly ‘aliqua pars’, supponat pro aliqua parte et caetera, quantumcunque copula <text:soft-page-break/>uniat illic pro tempore, unde ad hoc, ut supponat illic pro illa copula uniente pro tempore, requiritur quod possit esse pars illius in aliquo tempore adaequate, prout ex processu apparet.</text:p>
      <text:h text:style-name="P877" text:outline-level="3">Tertio arguitur: Iste terminus ‘homo’ scriptus in libro clauso ad quem nullus advertit, est terminus, tamen non est signum ponibile in propositione</text:h>
      <text:p text:style-name="P103">Igitur maior patet quia in Biblia clausa sunt propositiones /20a/ verae et ex consequenti termini, et non esset verum dato opposito illius maioris. Mino probatur quia ille terminus non est signum; ergo non est signum ponibile in propositione. Antecedens patet quia non significat ex quo a nulla potentia apprehenditur.</text:p>
      <text:p text:style-name="P103">Forte dices quod licet non significet actu, significat tamen in potentia propinqua, et illud sufficit ad hoc quod sit signum, nec requiritur quod actualiter apprehendatur ab aliqua potentia.</text:p>
      <text:p text:style-name="P103">Contra hoc arguitur: Sequitur ex ipso quod atramentum quod <text:span text:style-name="T105">est in atramentario tuo, ex quo cras scribes illum terminum ‘homo’ est terminus loquendo ut in proposito. Quod manifeste falsum est quod sequatur, patet quia est signum saltem large, quemadmodum capitur in definitione termini, et est ponibile in propositione consueta, quia cras poneretur in ipsa; igitur.</text:span></text:p>
      <text:p text:style-name="P106">Forte dices quod ly ‘ponibile’ non dicit in definitione aptitudinem simpliciter, sed aptitudinem in potentia propinqua modo, licet illud atramentum sit ponibile in propositione non tamen in potentia propinqua.</text:p>
      <text:p text:style-name="P107">Contra hoc arguitur: Sequeretur quod ille terminus vocalis ‘homo’ qui non ponitur in propositione non esset terminus, sed hoc est falsum; igitur falsitas consequentis est nota, et quod sequatur patet quia non potest poni in propositioni nisi producatur aliquid de novo, et productio rei de novo tollit potentiam propinquam; ergo non potest in potenti propinqua poni in propositione.</text:p>
      <text:p text:style-name="P107">Consequentia tenet et maior patet, quia non potest poni in propositione consueta nisi producatur de novo propositio consueta in qua debet poni.</text:p>
      <text:p text:style-name="P107">Minor probatur quia, dato eius opposito, concedendum esset quod ly ‘Antichristus’ in potentia propinqua supponeret pro Antichristo in ordine ad copulam de praesenti, quacumque ampliatione seclusa.</text:p>
      <text:p text:style-name="P108"><text:span text:style-name="T106">Forte posset ibi cavillari dicendo quod bene potest poni in propositione consueta absque productione alicuius de novo et ad illud quod tangis, quia non potest poni in propositione consueta nisi de novo producatur propositio consueta in qua debet poni. Concedendum est hoc, sed ex illo non sequitur quod non possit poni in tali absque hoc: “quod aliquid producatur de novo”. </text:span><text:span text:style-name="T109">U</text:span><text:span text:style-name="T106">nde non valet ista: “Consequentia de novo producitur hac propositio consuet; ergo de novo producitur aliquid”, quidquid t</text:span><text:span text:style-name="T107">a</text:span><text:span text:style-name="T106">men sit de ista solutione.</text:span></text:p>
      <text:p text:style-name="P109">Aliter arguo contra <text:span text:style-name="T112">solutionem argumenti principalis: ex ipsa sequitur quod si nullus sit terminus mentalis sed sit ly ‘homo’ in scripto, tunc ly ‘homo’ non est terminus quod, est falsum. Et quod sequatur patet quia tunc ly ‘homo’ non significat in potentia propinqua; ergo non est signum.</text:span></text:p>
      <text:p text:style-name="P110">Antecedes patet quia non potest significare nisi de novo producatur aliquid, ut puta notitia mediante, qua debet significare modo productio rei, de novo tollit potentiam propinquam ut statim probatum fuit; ergo non significat in potentia propinqua, igitur.</text:p>
      <text:p text:style-name="P110"><text:soft-page-break/>Pro solutione huius replicae, advertendum quod in diversis materiis diversimode solet exponi illa particula in potentia propinqua. Unde loquendo sicut in materia suppositionum, dicetur aliquis terminus in potentia propinqua supponere pro aliquo in ordine ad aliquam copulam ex eo, quia secundum significationem quam habet in ordine ad talem copulam, nulla mutatione facta per quam varietur ita esse vel aliter esse propositionis per quam debet fieri verificatio ad hoc ut supponat pro tali, in ordine ad talem copulam, potest pro tali supponere. Et tunc productio illius pro quo debet supponere de novo bene tolleret potentia propinquam.</text:p>
      <text:p text:style-name="P111">Sed loquendo in hac materia terminorum, ut in pluribus, illa particula ‘in potentia propinqua’ solet hoc modo exponi: “Hoc est nulla mutatione facta per quam fiat de novo impositio”. Dico ut in pluribus, quia non semper hoc modo debet exponi in hac materia terminorum, prout ex dicendis poterit apparere.</text:p>
      <text:p text:style-name="P111">Ideo ad videndum qualiter in proposito debeat exponi illa particula pono propositiones:</text:p>
      <text:list text:style-name="L5">
        <text:list-item>
          <text:p text:style-name="P907">Prima: ad hoc quod aliquid significet in potentia propinqua aliquo modo requiritur quod possit significare tali modo absque hoc, quod fiat aliqua aliqua mutatio per quam, de novo, imponatur ad significandum illo modo hoc ex communi usus apparet.</text:p>
        </text:list-item>
        <text:list-item>
          <text:p text:style-name="P908">Secunda: <text:span text:style-name="T113">Ad hoc quod aliquid possit poni in propositionem, potentia propinqua requiritur quod possit actualiter poni in illa absque hoc quod fiat aliqua mutatio, ratione cuius disponantur partes illius taliter quod stet secundum illam dispositionem, ipsum poni /20b/ </text:span><text:span text:style-name="T114">in propositione de usitata, et prius non erant taliter dispositae quod stet secundum talem dispositionem partium, ipsum poni in propositione consueta.</text:span></text:p>
        </text:list-item>
      </text:list>
      <text:p text:style-name="P113">Et ex his duabus manifeste apparet quod diversimode debebit exponi illa particula ‘in potentia propinqua’ in his duabus propositionibus: “Hoc significat in potentia propinqua”, “Hoc in potentia potentia propinqua potest poni in propositione consueta”.</text:p>
      <text:p text:style-name="P114">Patet insuper quod productio conceptus de novo, quo mediante debet significare aliquis terminus vocalis vel scriptus, non tolleret illum terminum vocalem vel scriptum significare in potentia propinqua, nec productio alicuius propositionis de novo in qua debet aliquis terminus poni, tollet illum terminum in potenti propinqua, posse poni in illa.</text:p>
      <text:p text:style-name="P112"><text:span text:style-name="T115">Non ergo universaliter debet eodem modo exponi ly ‘in potentia propinqua’ adhuc in materia terminorum, sed diversimode, secundum diversitatem materiae subiectae, et ad hoc semper debes respicere in propositionibus, </text:span><text:span text:style-name="T116">in quibus ponitur vel subintelligitur qualiter in ipsis debeat exponi si tute vis loqui.</text:span></text:p>
      <text:p text:style-name="P112"><office:annotation office:name="__Annotation__1025_150929323" loext:resolved="false"><dc:creator>Unknown Author</dc:creator><dc:date>2025-02-25T23:50:49.249252934</dc:date><text:p><text:span text:style-name="T861">Et ex his facile patet solutio ad totum processum argumenti. Unde negandum est quod producto illius conceptus de novo tollat illum terminum ‘homo’ significatur in potentia propinqua, nec ex illo sequitur quod productio Antichristi de novo, non tollat illum terminum ‘Antichristus’ posse supponere pro antichristo in ordine ad copulam de praesenti, omni ampliatione seclusa, quia non eodem modo exponitur illa particula in potentia propinqua in hoc proposito et in illo.</text:span></text:p></office:annotation><text:span text:style-name="T116">Et ex his facile patet solutio ad totum processum argumenti. Unde negandum est quod producto illius conceptus de novo tollat illum terminum ‘homo’ significatur in potentia propinqua, nec ex illo sequitur quod productio Antichristi de novo, non tollat illum terminum ‘Antichristus’ posse supponere pro antichristo in ordine ad copulam de praesenti, omni ampliatione seclusa, quia non eodem modo exponitur illa particula in potentia propinqua in hoc proposito et in illo.</text:span><office:annotation-end office:name="__Annotation__1025_150929323"/></text:p>
      <text:p text:style-name="P112"><text:span text:style-name="T116">Propter tamen parvas cavillationes quae possent ibi afferri, adverte</text:span><text:span text:style-name="T114"> </text:span><text:span text:style-name="T117">quod qualitercumque in potentia propinqua exponatur semper ad veritatem talium propositionum, scilicet, “Hoc in potentia propinqua potest taliter vel taliter se habet”, “Hoc in potentia propinqua potest taliter vel taliter se habere”, semper requiritur quod sit.</text:span></text:p>
      <text:p text:style-name="P115"><text:soft-page-break/>Sed contra ista arguitur: Sequitur ex eis quod si nullus conceptus significans Antichristum sit, et sit ly ‘Antichristus’ in scripto, tunc ly ‘Antichristus’ non significat in potentia propinqua Antichristum, sed hoc est falsum; igitur quod sequatur patet quia bene sequitur, in potentia propinqua significat illum mediante conceptu significante Antichristum. Consequens est falsum; igitur consequenti tenet cum maiori et minor probatur.</text:p>
      <text:p text:style-name="P115">Tum primo quia nullus est conceptus significans Antichristum, et illud videtur requiri ad hoc quod illa sit vera, ex quo illud requiritur ad hoc quod ly ‘conceptus’ significans Antichristum, supponat illic; ergo illud requiritur ad veritatem illius ex quo est affirmativa.</text:p>
      <text:p text:style-name="P116">Item secundo: <text:span text:style-name="T118">Quia si in potentia propinqua significat Antichristum mediante conceptu significante Antichristum, signetur ille conceptus significans Antichristum, quia sit ‘c’, et argumentorum sic ly ‘Antichristus’ in potentia propinqua significat Antichristum mediante ly ‘c’; ergo ly ‘Antichristus’ in potentia propinqua est synonymus cum ly ‘c’. Sed hoc consequens est falsum; igitur quod sequatur notum est falsitas </text:span><text:span text:style-name="T119">c</text:span><text:span text:style-name="T118">onsequentis. </text:span><text:span text:style-name="T119">P</text:span><text:span text:style-name="T118">robatur quia ex illo sequitur quod ly ‘Antichristus’ et ly ‘c’ in potentia propinqua sunt synonymi, quod est falsum, quia per dicta ad veritatem illius requiritur quod ly ‘Antichristus’ et ly ‘c’ sit quod ex hypothesi est falsum.</text:span></text:p>
      <text:p text:style-name="P117">Ad replicam respondetur negando sequelam, et ad probationem nego minorem. Et ad primam probationem dico quod non requiritur illud ad hoc, ut ille terminus supponat, quia ampliatur ratone de ly ‘in potentia propinqua’. Non obstante quod subiectum illius non taliter amplietur hoc potest apparere exponendo illam particulam.</text:p>
      <text:p text:style-name="P118">Ad secundam probationem: <text:span text:style-name="T120">S</text:span>ignato ‘c’ conceptu, et concessa prima consequentia, nego falsitatem consequentis, ad cuius probationem nego quod ex illo sequatur quod ly ‘Antichristus’ et ly ‘c’ sit synonymi, quia ad veritatem huius requiritur quod ‘c’ sit. Non autem ad veritatem illius consequentis.</text:p>
      <text:p text:style-name="P119">Sed contra hoc arguitur ad veritatem illius “Ly ‘Antichristus’ et ly ‘c’ in potentia propinqua sunt termini synonymi”, non requiritur quod ‘c’ sit; ergo solutio nulla.</text:p>
      <text:p text:style-name="P120">Antecedens patet quia ex illo sequitur falsitas illius, scilicet, ly ‘Antichristus’ in potentia propinqua significat Antichristum mediante ly ‘c’, quod patet quia ex illo sequitur quod Antichristus in potentia propinqua significatur per ly ‘Antichristus’ mediante ly ‘c’. Sed hoc est falsum; <text:span text:style-name="T121">igitur quod sequatur patet arguendo ab activo ad passivum, et falsitas consequentis probatur quia ad veritatem ipsius requiretur quod Antichristus sit quemadmodum ad veritatem illius “ly ‘Antichristus’ et ly ‘c’ sunt termini synonymi” requiritur quod ‘c’ sit /21a/ </text:span><text:span text:style-name="T122">et etiam hoc idem apparet ex dictis superius.</text:span></text:p>
      <text:p text:style-name="P120"><text:span text:style-name="T122">Ad hoc potest dici negando quod ad veritatem illius de verbo passivo requir</text:span><text:span text:style-name="T123">a</text:span><text:span text:style-name="T122">tur quod Antichristus sit </text:span><text:span text:style-name="T123">et non est, quia actus illius verbi passivi significantur significatur denotatur ferri supra significatum de ly ‘Antichristus’ et propterea ly ‘Antichristus’ ampliatur illic ad quinque differentias temporum, modo illud quod dictum est superius intelligitur ubi non aliunde esset ampliatio in tali subiecto.</text:span></text:p>
      <text:p text:style-name="P121"><text:span text:style-name="T124">Contra ista arguitur: Ex his sequitur quod in casu aliquod est signum proprie ponibile in propositione consueta, quod non est terminus proprie, quod est falsum quod sequatur patet. Volo quod Sortes habens auctoritatem </text:span><text:span text:style-name="T125">imponendi, imponat ly ‘a’ pro crastina die ad significandum </text:span><text:soft-page-break/><text:span text:style-name="T125">‘Omnes homines’, et non pro aliquo tempore ante, immo, dicat expresse quod vult quod non ante crastinam diem significet per talem impositionem.</text:span></text:p>
      <text:p text:style-name="P122">Tunc sic in isto tempore medio, ante crastinam diem, verum est quod ly ‘a’ non est terminus proprie, et tunc etiam verum est quod ly ‘a’ est signum proprie et ponibile in propositione consueta; igitur consequentia tenet cum maiori, et minor probatur et signanter, quod in tempore medio sit verum dicere quod ly ‘a’ sit signum proprie, quia residua pars minoris est manifesta, similis enim iam in illo tempore medio.</text:p>
      <text:p text:style-name="P122">Tunc sic: Ly ‘a’ potest significare proprie absque impositione de novo; ergo significat proprie in potentia propinqua, et ex consequenti est signum proprie. Prima consequentia patet per expositionem illius particulae in proposito, et antecedens patet quia cras significabit et non fiet amplius de novo impositio in ipso, ut suppono et procedo in hac replica copulis semper unientibus pro instanti.</text:p>
      <text:p text:style-name="P122">Ad hanc replicam respondetur negando sequelam et ad probationem, dato quod finis in tempore medio, nego quod sit signum proprie. Et ad probationem dico quod licet non fiet impositio amplius in ipso formaliter ante crastinam diem vel pro crastina die fiet tamen aequivalenter, et hoc fiet per solum lapsum temporis, quia per ipsum reducetur impositio sacra ad actum, sic quod virtute illius per lapsum illius temporis significabit taliter vel taliter virtute illius, qualiter non poterat ante lapsum illius virtute illius impositionis significare.</text:p>
      <text:p text:style-name="P123">Sed non obstantibus his quae dicta sunt, posset etiam dici quod, ad hoc quod aliquid in potentia propinqua ponatur in propositione consueta, requiritur quod possit poni absque hoc quod fiat aliqua muttio per quam fiat nova impositio in imposita, ita ut eodem modo debeat exponis ly ‘in potentia propinqua’ in hac propositione. Hoc in potentia propinqua ponitur in propositione consueta, sicut in ista “Hoc in potentia propinquae” significat.</text:p>
      <text:p text:style-name="P123">Et si contra hoc fiat argumentum, quia sequitur tunc quod atramentum quod est in atramentario tuo ex quo cras scribes, ly ‘a’ est terminus quia est signum large, et in potentia propinqua potest poni in propositione consueta, quia cras ponetur in propositione consueta et non fiet de novo impositio in illo.</text:p>
      <text:p text:style-name="P125">Ad hoc dicendum est quod licet non fiat impositio de novo proprie dicta in illo atramento, per hoc quod ex illo scribetur ly ‘a’, tamen fiet impositio improprie dicta per quam ly ‘a’ ad placitum significabit tales litteras vocales ‘a’ propter correspondentiam quam habent, de qua correspondentia inferius fiet mentio, et hoc sufficit.</text:p>
      <text:p text:style-name="P124"><text:span text:style-name="T126">Tamen </text:span><text:span text:style-name="T127">melius est dicere iuxta secundam propositionem tactam de expositione illius particulae in potentia propinqua in huiusmodi propositionibus.</text:span></text:p>
      <text:h text:style-name="Heading_20_3" text:outline-level="3">Quarto: Arguitur in aliquo casu aliquis es terminus secundum aliquam impositionem et significationem, et ille non est signum ponibile in propositione secundum illam impositionem et significationem; ergo definitio mala.</text:h>
      <text:p text:style-name="P126">Consequentia patet quia dato illo antecedente tunc definitum cum aliquo addito verificabitur de aliquo de quo non verificabitur definitio cum eodem addito, et per consequens erit mala.</text:p>
      <text:p text:style-name="P126"><text:soft-page-break/>Antecedens patet: volo quod ly ‘a’ imponatur ad significandum 'omnes homines', taliter quod numquam quando ponetur in propositione significabit illo modo, sed solum extra propositionem debeat significare illo modo virtute talis impositionis.</text:p>
      <text:p text:style-name="P126">Tunc ly ‘a’ est terminus secundum illam impositionem et significationem, et tunc non est signum ponibile in propositione secundum illam impositionem et significationem; igitur maior patet quia ly ‘a’ secundum illam impositionem et significationem significat proprie, eo modo sicut ly ‘homo’; ergo terminus secundum illam adeo bene, sicut ly ‘homo’ /21b/ minor patet quia non potest poni in propositione secundum illam impositionem et significationem.</text:p>
      <text:h text:style-name="Heading_20_3" text:outline-level="3">Et confirmatur ratio, dato isto termino qui non ponitur in propositione, ille est terminus extra propositionem et non est signum ponibile in propositione extra propositionem; ergo definitio mala</text:h>
      <text:p text:style-name="P127">Consequenti<text:span text:style-name="T128">a</text:span> potest probari sicut consequentia <text:span text:style-name="T128">argumenti, et maior videtur manifesta quum non requiratur adesse terminum quod actualiter ponatur in propositione, et minor patet quia non potest poni in propositione extra propositionem.</text:span></text:p>
      <text:p text:style-name="P177">Pro solutione argumenti videntum est: Data illa impositione, quem sensum faciat illa propositio, videt ly ‘a’ est terminus secundum illam impositionem et significationem. Si enim ponatur talis appellatio in illa quod ad veritatem illius requiratur quod possit poni in propositione secundum illam impositionem et significationem, negandam est.</text:p>
      <text:p text:style-name="P130">Et si forte velles cavillare dicendo quod potest poni in propositione secundum illam impositionem et significationem, ita quod in propositione significet secundum illam, quia potest unus decipi, credo quod ille qui imponebat taliter, imponebat sine illa conditione, et tunc poterit illi significare secundum illam impositionem et significationem in propositione.</text:p>
      <text:p text:style-name="P131">Ad hoc dicendum est quod tunc non significaret virtute talis impositionis, sed virtute illius cum aliqua alia causa saltem ita procedimus ibi. Vel si hoc non placeat procedatur addendo hoc, scilicet “nullo decepto” circa illam.</text:p>
      <text:p text:style-name="P129"><text:span text:style-name="T129">Si autem non requiratur illud ad veritatem illius, sed satis sit quod secundum illam impositionem et significationem significet aliquod modo, et possit poni in propositione, significando mediante eodem termino mentali mediante quo significat sive hoc sit secundum impositionem, sive </text:span><text:span text:style-name="T130">secundum</text:span><text:span text:style-name="T129"> aliam, et tunc concedenda est.</text:span></text:p>
      <text:p text:style-name="P128">Et etiam potest potest distingui ista, ly ‘a’ est signum ponibile in propositione <text:span text:style-name="T131">secundum illam impositionem et significationem, ita ut in uno sensu ponatur falsa, et in alio vera. Verum est tamen esto quod nullus sensus verus poneretur in illa, nihil haberetur prout apparebit ex processu, et ideo posset bene concedi maior et minor argumenti. Capiendo maiorem in secundo sensu et tunc consequentia non valeret, et ad probationem dicendum est quod non inconvenit quod definitum cum aliquo addito verificetur de aliquo, et definitio cum eodem addito non verificetur de eodem quando illud additum, cum tali definitione, causat aliquam appellationem, ratione cuius illud definitum non verificatur cum tali addito de illo supposito, et cum definito non causat talem appellationem et caetera. E</text:span><text:span text:style-name="T132">t</text:span><text:span text:style-name="T131"> ex hoc non sequitur quod </text:span><text:span text:style-name="T132">definitio non convertatur cum definitio. Si tamen capias maiorem in primo sensu debet negari.</text:span></text:p>
      <text:p text:style-name="P132"><text:soft-page-break/>Ex his patet quod quantumcumque nullus sensus verus ponatur in illa minori, adhuc argumentum non procederet.</text:p>
      <text:p text:style-name="P132">Sed circa istam impositionem occurrit difficultas: An data tali impositione concedendum sit quod ly ‘a’ sit terminus proprie, quia videtur quod non possit poni in propositione in potentia propinqua secundum significationem propriam, supposito quod non habeat aliam significationem propriam, quia non secundum aliam significationem ab illa ut constat; igitur nec secundum illam. Quia non potest poni secundum illam actualiter in propositione absque hoc quod fiet impositio.</text:p>
      <text:p text:style-name="P132">Ad hoc potest dici quod potest poni in potentia propinqua secundum illam significationem in propositione consueta, quia actualiter significat proprie secundum illam, et potest poni in propositione consueta secundum illam, absque hoc quod fiat aliqua mutatio, per quam disponantur partes eius, taliter quod possit poni in propositione consueta secundum illam dispositionem partium, et iam non disponuntur taliter quod possit poni actualiter in propositione consueta secundum talem dispositionem partium.</text:p>
      <text:p text:style-name="P132">Et illa particula, in potentia propinqua, taliter exponendae est in proposito, quod hoc sufficiat ad veritatem illius propositionis, licet non requiratur ad veritatem illius.</text:p>
      <text:h text:style-name="Heading_20_3" text:outline-level="3">Ad confirmationem argumenti: Consimiliter omnino dicendum est in omnibus et per omnia, sicut ad argumentum.</text:h>
      <text:h text:style-name="Heading_20_3" text:outline-level="3">Quinto arguitur: Non terminus est signum ponibile in propositione et nihil non terminus est terminus; ergo definitio mala</text:h>
      <text:p text:style-name="P133"><text:span text:style-name="T133">Consequentia patet cum minori, et maior patet “Non terminus ponitur in propositione”; igitur antecedens patet, </text:span><text:span text:style-name="T134">l</text:span><text:span text:style-name="T133">y “Non terminus ponitur in propositione”, et ly “Non terminus est non terminus”; igitur maior est nota, et minore /22a/ patet, </text:span><text:span text:style-name="T134">quia illa propositio est vera et affirmativa, in qua idem praedicatur de seipso.</text:span></text:p>
      <text:p text:style-name="P137">Simile argumentum potest fieri sic arguendo: Differens a termino est signum ponibile in propositione, et nullum differens a termino est terminus; ergo definitio mala.</text:p>
      <text:p text:style-name="P134"><text:span text:style-name="T134">Similiter et sic: Aliud a termino est signum ponibile in propositione, et nihil aliud a termino est </text:span><text:span text:style-name="T135">terminus; ergo definitio mala. Et possunt probari primae partes antecedentium sicut in argumento.</text:span></text:p>
      <text:h text:style-name="Heading_20_3" text:outline-level="3">Et confirmatur ratio: Volo quod ly ‘a’ significet tantum sicut hoc totum aliquid, quod non est signum ponibile. Tunc sic ‘a’ est terminus et non est signum ponibile in propositione; ergo definitio mala, consequentia tenet et maior patet</text:h>
      <text:p text:style-name="P135">Quia tunc ly ‘a’ est signum et ponitur etiam in propositione consueta, ut puta in illa maiori; ergo est terminus. Consequentia est nota similiter et totum antecedens.</text:p>
      <text:p text:style-name="P135">Iam probatur minor argumenti, quia dato eius opposito sic arguam: ‘a’ est signum ponibile in propositione; ergo aliquid quod non est signum ponibile in propositione est signum ponibile in propositione. Consequens est impossibile; igitur quod sequatur illud patet arguendo a convertibilibus.</text:p>
      <text:h text:style-name="Heading_20_3" text:outline-level="3"><text:soft-page-break/>Ad argumentum distinguo maiorem</text:h>
      <text:p text:style-name="P136">Quia vel capitur in hoc sensu aliquid quod non est terminus est signum ponibile in propositione, et sic est falsa. Vel in illo talis terminus non terminus est signum ponibile in propositione, et sic concedo illam, et in hoc sensu probatur in processu argumenti, et non in primo concessa; ergo illa in primo sensu potest etiam distingui minor, quia vel sensus est quod “nihil quod non est terminus est terminus”, et sic concedenda est et consequentia non est vera. Vel capis in isto “nullus talis terminus ‘non terminus’ est terminus”, et sic est neganda.</text:p>
      <text:p text:style-name="P136">Sub aliis verbis possent poni distinctiones maioris et minoris, ut puta distinguendo quamlibet illarum penes suppositionem materialem subiecti, et penes personalem. Sed in idem redit et iste non essent adeo faciles inchoantibus summulistis, sicut ille propter illa quae in his praesupponuntur de suppositione materiali et personali, proportionabiliter dicendum est ad alia duo quae tangis.</text:p>
      <text:p text:style-name="P138">Ad confirmationem argumenti distinguenda est illa <text:span text:style-name="T136">maior, quae vel capis ly ‘a’ in illa secundum significationem ad quam imponitur ita quod sensus sit quod “aliquid quod non est signum ponibile in propositione” et caetera, sic illa est falsa </text:span><text:span text:style-name="T137">n</text:span><text:span text:style-name="T136">ec in illo sensu probabitur in confirmatione. </text:span><text:span text:style-name="T137">V</text:span><text:span text:style-name="T136">el capis ly ‘a’ in illo secundum significationem secundum quam significat tales litteras ‘a’, </text:span><text:span text:style-name="T137">ita quod sensus sit quod talis littera ‘a’ est signum ponibile in propositione, et sic est concedenda et tunc consequentia non valet. Vel secundum secundam, et sic est neganda nec in illo sensu probatur.</text:span></text:p>
      <text:p text:style-name="P139">Etiam posset distingui illa maior et illa minor, et penes suppositiones materiales et personales illorum terminorum.</text:p>
      <text:h text:style-name="Heading_20_3" text:outline-level="3">Sexto arguitur: Una totalis propositio est terminus, et tamen illa non est signum ponibile in propositione. <text:span text:style-name="T138">Igitur minor patet quia si possit poni in propositione </text:span><text:span text:style-name="T139">ponatur; ergo sequitur tunc quod erit pars propositionis cum igitur sit propositio totalis erit pars sui ipsius</text:span></text:h>
      <text:p text:style-name="P140">Forte dices quod stat quod aliqua propositio sit totalis et quod sit pars alicuius propositionis, et ex illo non sequitur quod sit pars sui ipsius.</text:p>
      <text:p text:style-name="P140">Contra hoc arguitur supponendo quod per propositionem totalem intelligamus propositionem quae non est pars alicuius propositionis. Hoc supposito ponatur quod ‘b’ sit propositio totalis. Tunc sic: ‘b’ est terminus et ‘b’ non est signum ponibile in propositione; igitur maior est nota et minor patet, quia dato eius opposito “si ‘b’ possit poni in propositione ponatur ergo in ‘a’ <text:span text:style-name="T140">p</text:span>ropositione”. <text:span text:style-name="T140">Tunc sequitur quod ‘b’ est pars ‘a’ et ‘b’ non est pars ‘a’, quod est impossibile quod sequatur. </text:span><text:span text:style-name="T141">P</text:span><text:span text:style-name="T140">rimum notum est. Sed secundum patet sic ‘b’ est propositio totalis; ergo non est pars alicuius propositionis et per consequens non est pars ‘a’ prima. Consequentia tenet ex supposito et antecedens patet ex hypothesi.</text:span></text:p>
      <text:p text:style-name="P141">Et confirmatur ratio: Quaelibet propositio consueta est terminus et non quaelibet est signum ponibile in propositione; igitur minor patet quia dato eius opposito “si quaelibet possit poni in propositione ponatur quod quaelibet ponatur in propositione”, tunc sequitur quod aliqua propositio est par alicuius propositionis, et illa non est pars propositionis.</text:p>
      <text:p text:style-name="P142">Quod est impossibile quod sequatur patet, quia tunc aliqua <text:span text:style-name="T141">erit propositio totalis sic quod non erit pars alicuius, nam alias daretur tunc processus in infinitum.</text:span></text:p>
      <text:p text:style-name="P144"><text:soft-page-break/>Sit ergo ‘a’ illa propositio totalis et tunc patet quod /22b/ ‘a’ etiam sit pars propositionis, quia ex hypothesi ponitur in propositione; ergo est pars propositionis.</text:p>
      <text:p text:style-name="P145">Ad argumentum respondetur negando minorem</text:p>
      <text:p text:style-name="P143"><text:span text:style-name="T142">Saltem si loqueris de propositione consueta, quod notanter </text:span><text:span text:style-name="T143">addo quia alias possent concedi, maior et minor, negando consequentiam. Et ad probationem patet illic solutio usque ad replicam ad quam, dato illo supposito et admisso quod ‘b’ sit propositio totalis, nego quod non sit signum ponibile in propositione.</text:span></text:p>
      <text:p text:style-name="P152">Et ad probationem, dato illius opposito, cum ponis quod ‘b’ ponatur in ‘a’ propositione, ibi posset forte dici quod stat quod aliqua propositio ponatur in aliqua propositione absque hoc quod sit pars alicuius propositionis. Et ratio est quia quemadmodum stat quod aliqua propositio sit subiectum sui ipsius et tamen non est pars suis ipsius, ita etiam poterit illud stare.</text:p>
      <text:p text:style-name="P152">Immo in casu procedendum est quod quaelibet propositio ponatur in propositione adhuc naturaliter, quia si non sit nisi ista hypothetica “Sortes currit et Plato est disputans”, vel eius partes adhuc ipsa ponitur in propositione, quia ex ipsa tota materiali capta, et ex ly ‘est’ quod est pars illius, et ex ly ‘disputans’ resultat una propositio ex quo in potentia propinqua significat propositionaliter, et hoc dato illa tota ponitur in seipsa.</text:p>
      <text:p text:style-name="P153">Sed haec non toleret difficultatem, quia ex quo quilibet terminus potest poni in propositione tamquam pars illius, et definitio termini adeo, bene daretur isto modo:</text:p>
      <text:p text:style-name="P829"><text:span text:style-name="T144">Terminus est signum ponibile in propositione tamquam pars ipsius sicut modo quo data est.</text:span><text:span text:style-name="T141"> </text:span></text:p>
      <text:p text:style-name="P146">Et dando definitionem isto modo, illud non toleret difficultatem, quia procedam tamen solutione argumenti ac si sito modo daretur definitio.</text:p>
      <text:p text:style-name="P146">Tunc dico ad illud quod si intendas ponere cum omnibus suppositis quod ‘b’ ponatur in ‘a’ propositione, non est illud concedendum, <text:span text:style-name="T145">quia hoc non stabit cum illo supposito, scilicet, quod ‘b’ sit propositio totalis.</text:span></text:p>
      <text:p text:style-name="P147">Si autem non intendas ponere illud cum ominibus aliis suppositis et signanter cum illo quod ‘b’ sit propositio totalis, tunc bene poterit admitti, et non sequitur illa conditio quia non erit tunc concedendum quod ‘b’ sit propositio totalis, quia per hoc suppositum debebit destrui illud quod supponebatur, scilicet, quod ‘b’ sit propositio totalis.</text:p>
      <text:p text:style-name="P148">Et si dicas nulla propositio potest poni in propositione tamquam extremum vel exercens aliquod officium, et aliqua est terminus; ergo definitio intellecta eo modo quod debet intelligi est insufficiens. <text:span text:style-name="T146">Maior patet quia si posset poni tamquam exercens officium, quaero quod officium exercebit.</text:span></text:p>
      <text:p text:style-name="P154">Ad hoc dico quod poterit exercere officium antecedentis et consequentis, et etiam officium subiecti saltem materialiter, capiendo ipsam. Et ex his patet solutio ad argumentum quod posset fieri hoc modo, loquendo de propositione totali ut suppositum est. Una propositio totalis est terminus et tamen nulla totalis potest poni in propositione; igitur minor patet dupliciter. Primo sic: Non est possibile quod aliqua totalis ponatur in propositione; ergo nulla totalis potest poni in propositione. Item patet illa minor, quia dato illius opposito, si aliqua talis posset poni in propositione ponatur <text:soft-page-break/>inesse, ut puta quod aliqua totalis ponatur in propositione, sequitur quod aliqua est pars propositionis, et ipsa non est pars propositionis. Horum solutio facilis est ex praedictis.</text:p>
      <text:h text:style-name="Heading_20_3" text:outline-level="3">Ad confirmationem argumenti nego minorem</text:h>
      <text:p text:style-name="P149"><text:span text:style-name="T147">E</text:span>t ad probationem dato opposito illius minoris si loquimur in rigore, sicut verba sonant bene, potest dari casus quod quaelibet propositio ponatur in propositione. Hoc apparet ex dictis statim, sed ex illo non sequitur quod quaelibet propositio sit pars propositionis vel quidem sit pars sui ipsius.</text:p>
      <text:p text:style-name="P150">Si tamen ita loquaris de poni in propositione, quod quum dicitur ponatur inesse quod quaelibet ponatur in propositione, intelligas quod quaelibet ponatur in propositione tamquam pars illius, et ita procedas in locutionibus, ubi fiet mentio de poni in propositione, non admitto quod quaelibet ponatur in propositione, nec oppositum illius propositionis debet poni in esse per illam propositionem, nec ex illo sequitur quod sit possibile quod quaelibet ponatur in propositione tamquam pars illius, saltem procedendo naturaliter, quia alias bene esse illud possibile. Sed qualiter debet oppositum illius minoris poni inesse, alibi est discutiendum.</text:p>
      <text:h text:style-name="Heading_20_3" text:outline-level="3">Septimo arguitur: Signum quaesitivum ut puta ly ‘utrum’ est terminus et non est signum ponibile in propositione</text:h>
      <text:p text:style-name="P151"><text:span text:style-name="T148">Igitur maior est </text:span><text:span text:style-name="T149">nota, et minor patet quia non potest poni in propositione secundum illam significationem, ex quo non potest dari aliqua propositio in qua ly ‘utrum’ capiatur secundum illam significationem.</text:span></text:p>
      <text:p text:style-name="P155">Forte dices: Negando minorem ad probationem, dices quod licet non possit poni in propositione secundum illam significationem, potest tamen poni naturaliter, saltem et hoc sufficit ad esse terminum secundum illam acceptionem secundum quam procedimus.</text:p>
      <text:p text:style-name="P155">Tunc aliter ducam argumentum sic: Ly ‘utrum’ est terminus secundum illam significationem secundum quam est signum quaesitivum, et non est /23a/ signum ponibile in propositione secundum illam. Et etiam poterit argumentum rectius duci contra definitionem termini proprie.</text:p>
      <text:h text:style-name="Heading_20_3" text:outline-level="3">Et confirmatur ratio: <text:span text:style-name="T496">O</text:span>ratio imperativi modi ut puta ista “Veni ad me” est terminus, tamen non est signum ponibilem in propositione</text:h>
      <text:p text:style-name="P156">Ergo propositum maior est nota, minor autem probatur quia non potest poni in propositione secundum illam significationem, ex quo non potest dari aliqua propositio in quae capiatur secundum illam significationem.</text:p>
      <text:p text:style-name="P156">Forte dices quod quamvis non possit poni in propositione secundum illam significationem, tamen potest poni in propositione consueta, saltem materialiter, in potentia propinqua, et hoc sufficit ad esse terminum eo modo quo ibi procedimus de termino.</text:p>
      <text:p text:style-name="P156">Contra hanc solutionem potest arguit omnino sicut statim et rectius duceretur argumentum contra definitionem termini proprie.</text:p>
      <text:h text:style-name="Heading_20_3" text:outline-level="3"><text:soft-page-break/>Pro solutione argumenti et confirmationis est advertendum quod quantumcumque concederetur de quocumque illorum terminorum, quod non possit poni in propositione secundum significationem quam habet, nihil haberetur contra definitionem termini procedendo in ipsa, ut procedimus, ut ex dictis apparet</text:h>
      <text:p text:style-name="P161">Et ideo sicut tactum, est rectius ducerentur argumentum, et confirmatio contra definitionem termini proprie aut eo modo quo in relica argumenti deducitur ipsius. Igitur decutis illo modo aut contra definitionem termini proprii.</text:p>
      <text:p text:style-name="P161">Et tota difficultas argumenti in hoc consistit, videlicet, an ly ‘utrum’ possit poni in propositione secundum illam significationem et caetera.</text:p>
      <text:p text:style-name="P157"><text:span text:style-name="T151">Tota autem difficultas confirmationis in hoc an illa oratio imperativi modi, secundum illam significationem, possit poni in propositione. Et ad istas dubitationes respondeo affirmative, et primo de ly ‘utrum’ patet in hac propositione “Ego sum quaerens utrum Sortes currit”, </text:span><text:span text:style-name="T155">i</text:span><text:span text:style-name="T151">n quae ly ‘utrum’ est pars praedicati et capitur significative de oratione.</text:span></text:p>
      <text:p text:style-name="P162">Vero imperativi modi patet in hac propositione “Ego sum praecipiens tibi, veni ad me”. Et tunc patet solutio ad argumentum, et confirmationem qualitercumque ducantur.</text:p>
      <text:p text:style-name="P162">Si tamen negative diceretur de ista dubitatione, melius esset dare definitionem termini sic:</text:p>
      <text:p text:style-name="Quotations">Terminus est signum ponibile in oratione.</text:p>
      <text:h text:style-name="Heading_20_3" text:outline-level="3"><text:span text:style-name="T151">Octavo arguitur: Volo quod ly ‘a’ imponatur ad significandum praecise terminos qui sunt cum consimili connotatione, sicut est connotatio de ly ‘terminus’ </text:span><text:span text:style-name="T150"><text:s/></text:span><text:s/></text:h>
      <text:p text:style-name="P163">Tunc sic ly ‘a’ convertitur cum illa definitione et non convertitur cum ly ‘terminus’; ergo ly ‘terminus’ non convertitur cum illa definitione. Consequentia tenet cum minori, et maior patet. Aliqua potest esse definitio de ly ‘a’ et non nisi illa, igitur.</text:p>
      <text:p text:style-name="P164">Forte dices quod sic debet definire ly ‘a’: </text:p>
      <text:p text:style-name="Quotations">Est quod est signum ponibile in propositione.</text:p>
      <text:p text:style-name="P165">Contra illa verificabitur cras de aliquo de quo non verificabitur. Tunc ly ‘a’ illa non est definitio de ly ‘a’. Antecedens patet ponendo quod cras producetur unus terminus qui nunc non fit, tunc illa verificabitur cras de illo, et ly ‘a’ non, quia non significat illum, igitur.</text:p>
      <text:h text:style-name="Heading_20_3" text:outline-level="3">Ad argumentum data illa impositione quae possibilis est sive tunc ly ‘a’ debeat significare complexe, sive incomplexe</text:h>
      <text:p text:style-name="P166">Nego maiorem ad cuius probationem nego minorem. Et si petas quae erit tunc definitio de ly ‘a’, dico quod assignandum illam oportet imponere unum terminum ad significandum praecise omnia signa quae sunt cum consimili connotatione, sicut est connotatio de ly ‘signum’ sit; ergo ille ‘b’, tunc ly ‘a’ definietur sic:</text:p>
      <text:p text:style-name="Quotations">‘a’ est ‘b’ ponibile in propositione.</text:p>
      <text:h text:style-name="Heading_20_3" text:outline-level="3"><text:soft-page-break/>Aliis modis potest definiri ly ‘terminus’ apud logicos</text:h>
      <text:p text:style-name="P167">Uno modo sic:</text:p>
      <text:p text:style-name="P830"><text:span text:style-name="T152">Terminus est pars propinqua propositionis.</text:span><text:span text:style-name="T146"> </text:span><text:s text:c="2"/></text:p>
      <text:p text:style-name="P158">Circa quam definitionem occurrit difficultas, quid per partem propinquam, et quid per partem remotam intelligi debet. <text:span text:style-name="T153">De qua difficultate posset multis modis dici. Aliqui enim definiunt partem propinquam propositionis sic:</text:span></text:p>
      <text:p text:style-name="Quotations">Est pars principalis propositionis.</text:p>
      <text:p text:style-name="P159">Et partem remotam sic:</text:p>
      <text:p text:style-name="Quotations">Et par minus principalis propositionis.</text:p>
      <text:p text:style-name="P159">Sed iterum occurrit ibi difficultas: Quid per partem principalem propositionis et quid per partem minus principalem intelligit debeat.</text:p>
      <text:p text:style-name="P160">Sed si ita diceretur, ex dicendis in capitulo de termino complexo et termino incomplexo /23b/ poterit apparere quid per partem principalem et quid per partem nimus principalem intelligi possit.</text:p>
      <text:p text:style-name="P160">Alli definiunt partem remotam sic:</text:p>
      <text:p text:style-name="Quotations">Pars remota est littera vel syllaba.</text:p>
      <text:p text:style-name="P160">Quia i<text:span text:style-name="T154">gitur in huiusmodi difficultatibus est magna confusio sine utilitate, ex quo ista omnia ad nomen consistunt, ponam aliquas propositiones.</text:span></text:p>
      <text:p text:style-name="P168">Prima: Illi <text:span text:style-name="T156">duo termini ‘pars propinqua propositionis’, ‘pars remota propositionis’ possunt his modis definiri.</text:span></text:p>
      <text:list text:style-name="L6">
        <text:list-item>
          <text:p text:style-name="P909">Pars propinqua propositionis est pars alicuius, cuius nullius partis est pars.</text:p>
        </text:list-item>
        <text:list-item>
          <text:p text:style-name="P909">Pars remota propositionis est aliqua pars alicuius propositionis cuius partis est pars.</text:p>
        </text:list-item>
      </text:list>
      <text:p text:style-name="P169">Et stando in illis definitionibus, sequitur primo quod non potest dari <text:s/>aliqua pars alicuius propositionis quin sit pars propinqua aut pars remota illius.</text:p>
      <text:p text:style-name="P169">Sequitur secundo quod licet idem terminus sit pars propinqua propositionis et pars remota propositionis, tamen non potest illud contingere respectu eiusdem.</text:p>
      <text:p text:style-name="P170">Sequitur tertio quod stat quod aliquod sit subiectum alicuius propositionis, cuius non est par propinqua, et de praedicato simile contingit. <text:span text:style-name="T157">Patet capta ista propositione “Sortes est Sortes albus” positio quod unus concipiat ipsam, taliter quod capiat ly ‘Sortes’ pro subiecto, et alius concipiat taliter quod pro subiecto capiat compositum ex ly ‘albus’ et ly ‘Sortes’, quod primus capiebat pro subiecto, unde ly ‘Sortes’, quod capitur pro subiecto. A primo est subiectum illius scriptae et non est pars propinqua illius ex quo est pars partis eius, et de praedicato potest simile respondi.</text:span></text:p>
      <text:p text:style-name="P175">Sequitur quarto quod aliquod est subiectum alicuius propositionis, et est par remota eius in eodem sensu et non propinqua, nullo posito in diversis locis. Hoc patet capta ista scripta, posito quod tam Sortes quam Plato concipiant illam in sensu in quo significat ‘Sortem esse Sortem album’, sed Sortes capiat illum terminum ‘Sortes’ pro subiecto et aliud pro parte praedicati, Plato vero capiat <text:soft-page-break/>illum pro subiecto quem Sortes capit pro parte praedicati, et illum pro parte praedicati quem Sortes capit pro subiecto. Et de praedicato simile potest contingere.</text:p>
      <text:p text:style-name="P171"><text:span text:style-name="T157">Immo posset totum corollarium contingere, esto quod talis propositio non conciperetur diversis modis aut aliqui vel liquibus. Hoc patet </text:span><text:span text:style-name="T158">posito quod capiatur ista propositio “Sortes albus est et Sortes”, concipiat ipsam taliter quod concipiet <text:s/>ly ‘Sortes’ pro subiecto se solo, et concipiat iterum ipsum pro parte praedicati.</text:span></text:p>
      <text:p text:style-name="P171"><text:span text:style-name="T159">Sequitur quinto quod aliqua est propositio formaliter, et expresse significans formaliter. Et expresse iuxta significationem suarum partium et nulla pars eius, iuxta cuius significationem formaliter et expresse significat esset pars propinqua ipsius. </text:span><text:span text:style-name="T160">Hoc facile potest verificari.</text:span></text:p>
      <text:p text:style-name="P172">Sequitur sexto quod non est possibile quod ly ‘et’ sit pars propinqua propositionis secundum significationem secundum quam coniungit, saltem nullo in diversis locis posito. Et simile contingit de multis aliis terminis syncategorematicis. Et si ex his inferas insufficientiam definitionis, non curo, quia non teneo illam definitionem definiendo partem propinquam, sicut dictum est. Nec Guilhelmus Occam, qui hanc definitionem insequitur in principio suae logicae, hanc definitionem partis propinqua assignat.</text:p>
      <text:p text:style-name="P172">Secunda propositio ly ‘pars propinqua propositionis’ potest sic definiri:</text:p>
      <text:p text:style-name="Quotations">Est pars propositionis formaliter significans iuxta significationem propositionalem illius.</text:p>
      <text:p text:style-name="P173">Et hanc definitionem debusset assignare Occam ad facile salvandum illam definitionem <text:span text:style-name="T161">termini, quam insequitur, et tenta ista definitione ly ‘pars remota’ posset etiam mulis modis definiri.</text:span></text:p>
      <text:p text:style-name="P173"><text:s/><text:span text:style-name="T161">Primo sic:</text:span></text:p>
      <text:p text:style-name="Quotations">Pars remota alicuius propositionis est pars illius quae non formaliter significat iuxta significationem propositionalem illius propositionis.</text:p>
      <text:p text:style-name="P174">Et ista definiendo quaelibet pars cuiuscumque propositionis est pars propinqua vel remota illius. Et nulla esset simul pars propinqua et remota eiusdem copulativae.</text:p>
      <text:p text:style-name="P174">Alio modo potest definire sic:</text:p>
      <text:p text:style-name="Quotations">Pars remota alicuius propositionis est par partis propinqua eiusdem.</text:p>
      <text:p text:style-name="P174">Et sic definiendo posset contingere quod aliqua esset pars alicuius propositionis, quae non esset pars propinqua nec remota illius. Hoc contingeret ubi aliqua esset propositio quae non formaliter significaret iuxta significationem suarum partium. Et etiam posset contingere ubi illa formaliter significaret iuxta significationem partium suarum.</text:p>
      <text:p text:style-name="P174">Hoc contingeret si ex una parte subiecti et /24a/ una parte copulae efficeretur unum ens quod non formaliter significaret iuxta significationem illius. Insuper esse concedendum <text:span text:style-name="T165">quod aliquis terminus est pars propinqua alicuius propositionis cuius est pars remota in eodem sensu.</text:span></text:p>
      <text:p text:style-name="P178">Et eodem modo concipiendo et nullo posito in diversis locis, nec illa parte exercente duo officia.</text:p>
      <text:p text:style-name="P178"><text:soft-page-break/>Forte possent multis aliis modis definire isti termini, sed de his pro nunc non est amplius curandum, qui autem vellent termini definitionem ultimo datam salvare.</text:p>
      <text:p text:style-name="P178">Possent ipsam faciliter defendere definientes partem propinquam ultimo modo tacto definiendo partem remotam penultimo modo statim tacto.</text:p>
      <text:p text:style-name="P178">Et si dicas ly ‘homo’ quod ponitur extra propositionem est terminus, tamen non est pars propinqua propositionis; ergo definitio est mala.</text:p>
      <text:p text:style-name="P178">Ad hoc dicendum est quod licet actu non sit pars propinqua propositionis, tamen potentia propinqua est pars propositionis et illud sufficit, quia per illam definitionem non denotatur quod actu sit pars propinqua propositionis, sed quod in potentia propinqua sit pars propinqua propositionis.</text:p>
      <text:p text:style-name="P178">Et si ultra dicas bene sequitur est actu terminus; ergo est actu pars propinqua propositionis, distinguendum erit antecedens similiter, et consequens proportionabiliter, sicut in quibusdam argumentis tactis contra aliam definitionem.</text:p>
      <text:p text:style-name="P178">Possent contra istam definitionem applicari consimiles omnino difficultates, sicut contra aliam tam circa expositionem illius particulae in potentia propinqua, quod etiam circa alias difficultates quae tangebatur contra aliam definitionem, sed consimiliter omnino debent solvi sicut et illae.</text:p>
      <text:p text:style-name="P178"/>
      <text:h text:style-name="P869" text:outline-level="2">De significare</text:h>
      <text:p text:style-name="P179">Consequenter videndum est quid sit significare et quod modis contingit significare. Unde significare est potentiae cognitivae aliquid vel aliqua vel aliqualiter repraesentare.</text:p>
      <text:p text:style-name="P179">Dicitur potentiae cognitivae et non potentiae intellectivae propter terminos repraesentantes canibus et aliis brutis non habentibus potentias intellectivas.</text:p>
      <text:p text:style-name="P179">Dicitur aliquid propter terminos singulares numeri non collectivos cuiusmodi est ille terminus ‘homo’ et similes.</text:p>
      <text:p text:style-name="P179">Dicitur ‘aliqua’ propter terminos pluralis numeri et collectivos cuiusmodi sunt ille terminus ‘homines’ et ille terminus ‘populus’ et consimiles.</text:p>
      <text:p text:style-name="P179">Dicitur ‘aliqualiter’ propter terminos syncategorematicos cuiusmodi est ille terminus ‘omnis’ et similes, et quantumcumque ly ‘significare’ apud aliquod analogice dicatur.</text:p>
      <text:p text:style-name="P179">Primo de significare proprie et secundario de significare naturaliter communiter, non tamen sic capitur in proposito, sed generaliter prout unico conceptu de omnibus illis modis significandi dicatur.</text:p>
      <text:p text:style-name="P179">Et si petas quid sit repraesentare, videtur enim ly ‘repraesentare’ esse terminus ad eo ignotus sicut ly ‘significare’. Ad hoc solet dici quod repraesentare est facere cognoscere aliquid vel aliqua vel aliqualiter. Et si fiat argumentum quia tunc quilibet qui docet aliquem repraesentaret illi illud quod doceret, quod videtur falsum, et eodem modo posset fieri argumentum si dicatur quod <office:annotation office:name="__Annotation__2551_3536077180" loext:resolved="false"><dc:creator>Unknown Author</dc:creator><dc:date>2025-05-20T00:17:47.980426476</dc:date><text:p><text:span text:style-name="T861">Repraesentare est movere potentiam cognitivam ad cognoscendum aliquid vel aliqua vel aliqualiter.</text:span></text:p></office:annotation>repraesentare est movere potentiam cognitivam ad cognoscendum aliquid vel aliqua vel aliqualiter<office:annotation-end office:name="__Annotation__2551_3536077180"/>, quid idem videtur sequi ex illo.</text:p>
      <text:p text:style-name="P180">Pro ista difficultate est advertendum quod ad hoc quod aliquid repraesentet loquendo eo modo quo in proposito requiritur quod mediante seipso solo faciat potentiam cognitivam cognoscere aliquid vel aliqua vel aliqualiter, vel quod immediate mediante aliquo termino qui mediante se solo facit potentiam cognitivam et caetera, faciat ipsam potentiam cognitivam cognoscere aliquid vel aliqua vel aliqualiter.</text:p>
      <text:p text:style-name="P180">Primum dicitur propter terminos mentales qui naturaliter proprie mediantibus seipsis repraesentant.</text:p>
      <text:p text:style-name="P181">Secundum dicitur propter alia quae mediantibus talibus terminis repraesentant modo nullo illorum modorum se habe ille qui docet. Et propterea dico quod illa definitio de ly ‘repraesentare’ bene potest salvari intelligendo eam hoc modo, scilicet:</text:p>
      <text:p text:style-name="Quotations"><office:annotation office:name="__Annotation__2589_3536077180" loext:resolved="false"><dc:creator>Unknown Author</dc:creator><dc:date>2025-05-20T00:24:09.571941521</dc:date><text:p><text:span text:style-name="T861">Repraesentare est mediante se aut immediate, mediante aliquo qui mediante se facit cognoscere, facere cognoscere aliquid vel aliqua vel aliqualiter.</text:span></text:p></office:annotation><text:span text:style-name="T167">R</text:span><text:span text:style-name="T166">epraesentare est mediante se aut immediate, mediante aliquo qui mediante se facit cognoscere, facere cognoscere aliquid vel aliqua vel aliqualiter.</text:span><office:annotation-end office:name="__Annotation__2589_3536077180"/></text:p>
      <text:p text:style-name="P182">/24b/</text:p>
      <text:p text:style-name="P182">Et adhuc ita decendo comprehenduntur multi modi repraesentandi qui satis improprii sunt, quia hoc modo anima intellectiva dicetur repraesentare omnia quorum notitiam causat, et ex consequenti dicetur significare illa omnia.</text:p>
      <text:p text:style-name="P182">Si vellemus tamen loqui magis proprie oporteret addere aliquam restrictionem ratione cuius anima non dicatur illa omnia repraesentare quorum notitiam causat, sed secundum quod velis strictius <text:soft-page-break/>loqui, taliter vel taliter poteris facile ex dicendis addere illud quod oportebit ad loquendum illo modo.</text:p>
      <text:p text:style-name="P182">Et ex his appa<text:span text:style-name="T168">ret quod significare aliquid est potentiae cognitivae repraesentare aliquid. Et significare aliqua est potentiae cognitivae repraesentare aliqua. Et significare aliqualiter est potentiae cognitivae repraesentare aliqualiter.</text:span></text:p>
      <text:p text:style-name="P183">Patet insuper iuxta definitionem de ly ‘repraesentare quid sit’, ‘repraesentare aliquid’ et quid ‘repraesentare aliqua’. Et si petas quid sit repraesentare aliqualiter dico quod est facere cognoscere aliquo modo ratione cuius modi faciendi cognoscere potest exercere officium in propositione.</text:p>
      <text:p text:style-name="P183"><office:annotation office:name="__Annotation__1439_1538608138" loext:resolved="false"><dc:creator>Unknown Author</dc:creator><dc:date>2025-05-20T23:53:41.233315117</dc:date><text:p><text:span text:style-name="T861">In proposito it loquor de exercendo officio quod quilibet terminus, qui formaliter significat aliquo modo iuxta significationem alicuius propositionis, dicitur exercere officium in illa ratione illius modi significandi.</text:span></text:p></office:annotation>In proposito it loquor de exercendo officio quod quilibet terminus, qui formaliter significat aliquo modo iuxta significationem alicuius propositionis, dicitur exercere officium in illa ratione illius modi significandi.<office:annotation-end office:name="__Annotation__1439_1538608138"/> <text:span text:style-name="T169">Unde simili modo potest definiri sicut ly ‘repraesentare aliqualiter’. </text:span></text:p>
      <text:p text:style-name="P184">Patet insuper quod ly ‘significare aliqualiter’ potest etiam sic definiri:</text:p>
      <text:p text:style-name="P831">Est exercere officium in propositione supra aliquem terminum vel in ordine ad aliquem terminum.</text:p>
      <text:p text:style-name="P185">Et definitio intelligenda erit proportionabiliter, sicut de ly ‘repraesentare aliqualiter’, et ex ignorantia et debilitate intellectus, procederet dicere <text:span text:style-name="T170">illam definitionem esse insufficientem, propterea quia ista propositio “Homo est animal” quae non ponitur in propositione actualiter significat aliqualiter de significatione proportionali et non actualiter exercet officium.</text:span></text:p>
      <text:p text:style-name="P189">Unde ex hoc non sequitur illam definitionem esse insufficientem intelligendo eam sicut dictum est, sicut Summulistae intelligenti primam lectionem terminorum apparere potest, haec tamen missa facio.</text:p>
      <text:p text:style-name="P189">Et si petas quomodo ly ‘et’ facit cognoscere ibi “Sortes et Plato sunt homines”, dico quod facit cognoscere taliter hoc modo, puta, quod ly ‘Sortes et Plato’ tamquam ratione causae partialis significet Sortem et Platonem illo modo quo significat, et proportionabiliter potest dici de aliis terminis syncategorematicis quomodo faciant cognoscere. Unde ratione diversorum modorum significandi ipsorum, et ratione diversorum officiorum quae possunt exercere secundum suas significationes, diversimode iudicandum est, nec possumus convenientius explicare modos quibus faciunt huiusmodi syncategoremata cognoscere.</text:p>
      <text:p text:style-name="P190">Ex his potest pater quod non oportet in illa definitione de ly ‘significare’ addere ly ‘vitaliter’ immutando quemadmodum reliqui addunt.</text:p>
      <text:h text:style-name="Heading_20_3" text:outline-level="3"><text:span text:style-name="T171">Quattuor modis contingit repraesentare secundum imaginationem antiquorum, </text:span><text:span text:style-name="T172">scilicet: effective, objective, formaliter et instrumentaliter</text:span></text:h>
      <text:list text:style-name="L7">
        <text:list-item>
          <text:p text:style-name="P910">Effective repraesentare est effective causare notitiam alicuius rei. Et sic anima repraesentat omni illa quorum notitiam causat.</text:p>
        </text:list-item>
        <text:list-item>
          <text:p text:style-name="P910">Objective repraesentare est habere se per modum obiecti ad causandum notitiam alicuius rei. Et isto modo quaelibet res potest repraesentare omnia entia, ex quo qualibet potest concurrere in ratione obiecti ad causandum notitiam omnium entium.</text:p>
          <text:p text:style-name="P910"><text:soft-page-break/>Isti duo modi quia satis improprii sunt non multum sunt in usu.</text:p>
        </text:list-item>
        <text:list-item>
          <text:p text:style-name="P910">Repraesentare formaliter idem est quod repraesentare naturaliter proprie, de quo inferius fiet mentio.</text:p>
        </text:list-item>
        <text:list-item>
          <text:p text:style-name="P910">Repraesentare vero instrumentaliter est esse instrumentum per quod cognoscimus aliquid vel aliqua vel aliqualiter. Et sic definiendo ly ‘repraesentare instrumentaliter comprehenduntur sub illo omnes modi significandi de quibus inferius fiet mentio.</text:p>
        </text:list-item>
      </text:list>
      <text:p text:style-name="P186"><text:s text:c="2"/><text:span text:style-name="T173">Verum est tamen quod posset taliter definire quo non comprehenderetur sub ipso modus significandi naturaliter proprie. Sed omnes alii de quibus inferius fiet mentio comprehenderentur.</text:span></text:p>
      <text:p text:style-name="P187">Et posset taliter definiri quod solus modus significandi ad placitum de quo inferius fiet sermo comprehenderet eos. Sed de his non est curandum quid qualitercumque de his modis velles definire, facile esset addere id quod oporteret ad /25a/ bonitatem talis definitionis. <text:span text:style-name="T174">Sed de his modis repraesentandi non curabo insequentibus, sed secundum alias divisiones de ly ‘significare’ communiorem modum insequendo procedam.</text:span></text:p>
      <text:p text:style-name="P188">Ex praedictis potest apparere quod sit signum. Unde signum est quod movet potentiam cognitivam ad cognoscendum aliquid vel aliqua vel aliqualiter. Et eodem modo debet intelligi et salvari, sicut definitio quae data est de ly ‘repraesentare’.</text:p>
      <text:p text:style-name="P188">Et potest capi tribus modis ly ‘signum’ qui sunt similes tribus quibus capiebatur ly ‘terminus’, et potest addi quartus, qui erit similis acceptioni de ly ‘terminus’ secundum quam capitur ly ‘terminus’ in praecedenti capite, sed non esset necessarium ad salvandum dicta vel dicenda addere illam quartam acceptionem.</text:p>
      <text:p text:style-name="P191"><text:span text:style-name="T175">Contra definitionem dicit ly ‘significare’ arguitur primo sic: Ex ipsa sequitur quod nullus terminus significat aliquam rem quin illam rem repraesentet potentiae cognitivae, sed hoc es falsum; igitur consequentia tenet cum maiori, et minor patet. </text:span><text:span text:style-name="T177">A</text:span><text:span text:style-name="T175">liquis terminus significat aliquid quod non repraesentat potentiae cog</text:span><text:span text:style-name="T176">n</text:span><text:span text:style-name="T175">itiv</text:span><text:span text:style-name="T176">a</text:span><text:span text:style-name="T175">e, </text:span><text:span text:style-name="T176">loquendo de significare et repraesentare actualiter, de quibus continuo procedam in hoc argumento; igitur consequentia tenet et antecedens patet.</text:span></text:p>
      <text:p text:style-name="P194">Iste terminus ‘lapis’ significat <text:s/>aliquid quod non repraesentat potentiae cognitivae; igitur antecedens patet. Iste terminus ‘lapis’ significat lapidem existentem in profundo maris et nullus lapis existens in profundo maris repraesentat potentiae cognitivae, ut suppono ergo ille terminus significat aliquid quod non repraesentat potentiae cognitivae.</text:p>
      <text:p text:style-name="P192"><text:span text:style-name="T177">Forte dices sicut dicendo est concedendo primam sequelam, et negando falsitatem consequentis, et ad probationem distinguendum est antecedens. </text:span><text:span text:style-name="T178">Procedendo sicut supponis quia vel capitur ly ‘quod’ in </text:span><text:span text:style-name="T179">nominativo</text:span><text:span text:style-name="T178">, ita quod sensus sit quod aliquis terminus significat aliquam rem, quae res non repraesentat potentiae cognitivae, et sic concedendum est ille, nec ex illo sequitur intentum.</text:span></text:p>
      <text:p text:style-name="P193"><text:span text:style-name="T179">Si autem ly ‘quod’ capiatur in accusativo, taliter quod sensus sit quod aliquis terminus significat aliquam rem quam rem non repraesentat potentiae cognitivae, </text:span><text:span text:style-name="T180">negandum est illud, quia ex illo in hoc sensu bene sequitur propositum. Sed argumentum non probat illud in illo sensu, sed bene in primo. Ex eo quia, in consequente vel rimae consequentiae, ly ‘quod’ capiatur in accusativo ipsa non videt, sed bene si capiatur in nominativo.</text:span></text:p>
      <text:p text:style-name="P195"><text:soft-page-break/>Contra hoc arguitur illud antecedens est verum in secundo sensu, igitur <text:span text:style-name="T181">antecedens patet. Capio “Istum terminum ‘aliquid’ quod non repraesentatur potentiae cognitivae” per istum terminum ipso demonstrato, tunc arguitur sic: Ille terminus significat aliquam rem et illam non repraesentat potentiae cognitivae; ergo illud antecedens erat verum in secundo sensu, consequentia tenet et maior patet quia dato eius opposito sequitur quod dicit quolibet ente mundi verificatur, quia hoc erit vera, quocumque demonstrato ‘hoc est aliquid’, quod non repraesentatur potentiae cognitivae per istum terminum; ergo dato illo, quodlibet ens significabit et per consequens haberetur contradictio.</text:span></text:p>
      <text:p text:style-name="P197"><text:span text:style-name="T182">Iam probatur minor “Nihil repraesentatur potentiae cognitivae per illum terminum”; igitur antecedens patet quia dato opposito sit illud ‘a’ </text:span><text:span text:style-name="T203">vel</text:span><text:span text:style-name="T182"> ergo ‘a’ est aliquid quod repraesentatur potentiae cognitivae per illum terminum vel non. Si non habebo intentum, si sic sequitur quod ille terminus non significabit ‘a’, quia ille solum significabit illud quod non repraesentatur potentiae cognitivae per </text:span><text:span text:style-name="T183">tempus</text:span><text:span text:style-name="T182">, et ‘a’ non est huiusmodi.</text:span></text:p>
      <text:p text:style-name="P196"><text:span text:style-name="T182">Consimiliter p</text:span><text:span text:style-name="T183">otest argui de isto termino ‘aliquid’ quod non significatur per istum terminum.</text:span></text:p>
      <text:h text:style-name="Heading_20_3" text:outline-level="3">Et confirmatur ratio in casu <text:span text:style-name="T184">aliquis terminus significat aliquid qui non repraesentat illud potentiae cognitivae</text:span></text:h>
      <text:p text:style-name="P200"><text:span text:style-name="T185">I</text:span><text:span text:style-name="T184">gitur antecedens patet: Volo quod cras proferam istum terminum ‘homo’ antequ</text:span><text:span text:style-name="T186">a</text:span><text:span text:style-name="T184">m tu audies, non advertendo ad illum nec formando conceptum sui significanti, sicut frequenter contingit, et volo quod post cras recordaberis quod audivisti illum terminum ‘homo’ et tunc formes conceptum ultimatum omnium hominum. Tunc sic ille terminus ‘homo’ quem ego proferam cras nihil repraesentabit potentiae cognitiva, quia non quando erit, ut manifeste constat, nec quando non erit, ut notum est. </text:span><text:span text:style-name="T187">Tamen</text:span><text:span text:style-name="T184"> ille terminus significabit aliquid quia per illum venies in notitiam omnium hominum, quia si non audivisses illum, non formasses tunc conceptum omnium hominum ut suppono, igitur.</text:span></text:p>
      <text:p text:style-name="P198"><text:span text:style-name="T185">Similiter potest arguit de termino quem audis cuius significationem es </text:span><text:span text:style-name="T188">oblitus circa quam cogitas et recorderis de illa cum iam ille terminus non erit, quia ille terminus tunc significabit et non repraesentabit potentiae cognitivae; igitur totum antecedens potest probari ut prius.</text:span></text:p>
      <text:h text:style-name="Heading_20_3" text:outline-level="3">Ad argumentum responsum est usque ad replicam quam nego antecedens, et ad probationem, dato illo termino nego minorem, et ad probationem nego antecedens</text:h>
      <text:p text:style-name="P201">Et ad probationem dato eius opposito et signato ‘a’ supposito, dico quod ‘a’ est aliquid quod repraesentatur per illum terminum, et ad reprobationem huius nego sequelam /25b/, et ad probationem nego quod solum significet illud quod non repraesentatur et caetera.</text:p>
      <text:p text:style-name="P199"><text:span text:style-name="T189">Immo solum significat id quod repraesentatur potentiae cognitivae per ipsum, licet significet quidquid significat, connotando quod iam non </text:span><text:span text:style-name="T190">repraesentatur potentiae cognitivae per illum terminum.</text:span></text:p>
      <text:p text:style-name="P205">Simile es de isto termino ‘aliquid quod est album’, posito quod nihil sit album ille enim non significat aliquid quod est album, sed praecise significat illud quod non est album, licet significet quidquid significat connotando quod sit album.</text:p>
      <text:p text:style-name="P202">Et pro clariori intellectione istorum pono duas propositiones:</text:p>
      <text:list text:style-name="L8">
        <text:list-item>
          <text:p text:style-name="P911"><text:soft-page-break/>Prima. Ille terminus captus in replica quodlibet ens significat et repraesentat. Quia quocumque demonstrato hoc est possibilis “Hoc est aliquid quod non repraesentatur potentiae cognitivae”, per istum terminum demonstro per secundam pronomen ipsiusmet, quia posito quod cras non erit illud praedicatum, sed manebit id quod demonstratur per primum pronomen. Cras erit ita sicut illa nunc significat. Modo clarum <text:span text:style-name="T191">est quod illa non esset possibilis nisi praedicatum significaret, ad quod demonstratur per subiectum; igitur hoc etiam potest probari per significationem termini mentalis cui subordinatur.</text:span></text:p>
        </text:list-item>
        <text:list-item>
          <text:p text:style-name="P912">Secunda. Propositio illae in ordine ad nullam copulam potest supponere pro aliquo significato aut verificari de aliquo secundum illam significationem, licet bene termini synonymi eius possint supponere et verificari secundum significationes secundum quas sunt synonymi cum isto, et hoc in ordine ad quamlibet copulam.</text:p>
          <text:p text:style-name="P911"><text:span text:style-name="T191">Utraque pars est manifesta.</text:span> </text:p>
        </text:list-item>
      </text:list>
      <text:p text:style-name="P203"><text:span text:style-name="T189"><text:s/></text:span><text:span text:style-name="T192">Ad confirmatione argumenti dico quod in illis casibus non significabunt illi termini vocales </text:span><text:span text:style-name="T193">sed</text:span><text:span text:style-name="T192"> mentales non ultimati i</text:span><text:span text:style-name="T193">psorum qui producentur quando illi proferuntur et audientur, et illi mentales conservabuntur post prolationem illorum vocalium, et illi monebunt tunc intellectum ad formandum conceptus ultimatos illarum prolatorum, nec video quod aliter possit dici in huiusmodi casibus. Et propter hoc videtur esse dicendum quod conceptus non ultimati vocum significant ad placitum, sicut illae voces quantumcumque non esset alia ratio propter quam deberet hoc concedi. Sed de his inferius videbitur.</text:span></text:p>
      <text:h text:style-name="Heading_20_3" text:outline-level="3">Secundo arguitur quidquid significat aliquid significat aliqua; <text:span text:style-name="T195">e</text:span><text:span text:style-name="T194">rgo superflue ponitur </text:span><text:span text:style-name="T195">ly ‘aliquid’ in definitione</text:span></text:h>
      <text:p text:style-name="P204">Antecedens patet quia si detur eius oppositum maxime dabitur de ly ‘homo’, sed ly ‘homo’ significat aliqua; igitur minor patet trium:</text:p>
      <text:list text:style-name="L9">
        <text:list-item>
          <text:p text:style-name="P913">Primo. Quia ‘omnes homines’ significat. Si forte dicas quod ‘omnes homines’ significat in plurali non tantum in singulari.</text:p>
        </text:list-item>
        <text:list-item>
          <text:p text:style-name="P913">Contra. In singulari ‘omnes homines’ significat, igitur antecedens patet “Quemlibet hominem in singulari significat”; ergo ‘omnes’ in singulari significat.</text:p>
        </text:list-item>
        <text:list-item>
          <text:p text:style-name="P913">Item tertio. Patet illa minor, quia ly ‘homo’ materiam et formam significat; ergo aliqua significat. Forte dices propter hoc quod non contingit oppositum illius de ly ‘homo’ sed ly ‘Michael’. Contra. Ly ‘Michael’ significat Michael angelum et significat se, igitur.</text:p>
        </text:list-item>
      </text:list>
      <text:h text:style-name="Heading_20_3" text:outline-level="3"><text:span text:style-name="T198">Confirmatur ratio: </text:span><text:span text:style-name="T196">Q</text:span><text:span text:style-name="T198">uilibet </text:span><text:span text:style-name="T196">terminus significans aliqua significat aliquid; ergo superflue ponitur ly ‘aliqua’ in definitione</text:span></text:h>
      <text:p text:style-name="P224"><text:span text:style-name="T196">Antecedens patet quia si detur oppositum illius maxime debet ly ‘populus’, sed ly ‘populus’ significat aliquid. Consequentia tenet cum maiori. Minor patet quia ly ‘populus’ significat istos homines qui sunt populus, </text:span><text:span text:style-name="T202">vel</text:span><text:span text:style-name="T197"> ergo quemlibet illorum significat de si</text:span><text:span text:style-name="T199">gnificatione totali vel nullum si primum habeo intentum. Si secundum sequitur quod ly ‘homo’ adeo bene significati aliqua, sicut ly ‘populus’.</text:span></text:p>
      <text:p text:style-name="P207"><text:soft-page-break/>Si forte dicas quod ly ‘populus’ nullum hominem significat de significatione totali, sed quemlibet significat de partiali. Et secus est de ly ‘homo’ quia nec de totali nec de partiali significatione ly ‘homo’ significat materiam et formam.</text:p>
      <text:p text:style-name="P208">Contra hoc arguitur primo: Quia sequeretur tunc quod ly ‘populus’ esset terminus complexus et eodem modo conluditur quod ly ‘quantitas discreta’ sit terminus complexus similiter, et quilibet terminus pluralis numeri, quod videtur falsum, quia tunc ly ‘quantitas discreta’ non poneretur in praedicamento.</text:p>
      <text:p text:style-name="P209">Item secundo: ‘Aliquis homo’ in casu est populus; ergo aliquem de significatione totali significat. Consequentia tenet et antecedens patet:</text:p>
      <text:p text:style-name="P209">Primo. Quia viginti homines vel triginta sunt populus, et auferendo unum ab illis remanentes erunt populus, eadem ratione qua illi omnes sunt populus, et per idem ablato uno ab illis remanentibus qui remanebunt, ex illis erunt populus et ita deinceps; ergo tandem duo erunt populus, et uno ablato ex illis reliquus erit populus tunc.</text:p>
      <text:p text:style-name="P206"><text:span text:style-name="T200">Secundo: Quia ex uno homine possunt effici caeterum totales, qui poterunt magnum populum constituere illis, igitur factis ex illo </text:span><text:span text:style-name="T201">i</text:span><text:span text:style-name="T200">lle </text:span><text:span text:style-name="T201">erit populus. Antecedens patet quia ex quibuscumque duabus portionibus materiae Sortis quae sole non faciunt unum ens cum anima ipsius potest effici unus homo. Illis partibus materia positis in alio loco, ubi unam materiam constituant quae anima /</text:span><text:span text:style-name="T204">26a</text:span><text:span text:style-name="T201">/ illius homines informent, et ille homo qui resultaret ex illis partibus et illa anima esset totalis, cum igitur infinite tales partes reperiantur in quolibet homine sequitur quod ex quolibet homine poterunt effici tot homines totales quot libeat </text:span><text:span text:style-name="T205">unde</text:span><text:span text:style-name="T201"> constat propositum.</text:span></text:p>
      <text:p text:style-name="P210"><text:span text:style-name="T207">Pro solutione ar</text:span><text:span text:style-name="T206">gumenti et confirmationis, est advertendum quod secundum antiquos quilibet terminus collectivus similiter et quilibet pluralis numeri deberet poni terminus complexus, et maxime deberent ipsi hoc dicere ad salvandum modum, ponendi constantiam in descensu et ascensu et illum modum alias tetigi magis, ut explicarem intentionem antiquorum et ut ipsos defendere in his qui dixerunt de modo ponendi constantiam in materia de ascensu et descensu, quam ex eo quod esse intentione propria, </text:span><text:span text:style-name="T208">sed quia multa extranea ex illo modo dicendi videtur sequi ipso relicto nunc tangam alium modum qui de intentione propria est.</text:span><text:span text:style-name="T206"> </text:span><text:span text:style-name="T208">Pro quo supponendum est quod sustentabile est quod per significare aliqua in proposito intelligamus significare aggregatum, sive tale aggregatum possit esse unum ens sive non, et sustentabile est etiam quod per significare aliqua intelligamus significare aggregatum ex aliquibus quae non possunt esse unum ens, et inter istos duos modos dicendi, non esset discrimen nisi ad nomen quid autem intelligatur per significare aliquid satis manifestum est.</text:span></text:p>
      <text:p text:style-name="P215">Tunc pono propositiones:</text:p>
      <text:p text:style-name="P215">Prima. Qualitercumque dicatur de his modis, licet stet quod aliquis terminus significet aliqua et quodlibet illorum significet de significatione totali, non tamen oportet si aliquis terminus significet aliqua quod ille de significatione totali vel partiali quodlibet illorum significet. Prima pars patet de sito termino ‘ens’ vel ‘entia’.</text:p>
      <text:p text:style-name="P215">Secunda. Patet quia ly ‘angeli’ significat aliqua de significatione totali quorum nullum de significatione totali vel partiali significat secunda propositio. Qualitercumque dicatur de his modis, licet aliquis terminus simul significet aliquid et aliqua de significatione totali, tamen aliquis <text:soft-page-break/>significans aliquid de significatione totali, non significat aliqua de totali, et aliquis significans aliqua de totali non significat aliquid de totali.</text:p>
      <text:p text:style-name="P211">Prima pars patet ex prima parte praecedentis, secunda patet de ly ‘angelus’, et tertia patebit ex dicendis in solutione confirmationis.</text:p>
      <text:p text:style-name="P211"><text:span text:style-name="T209">T</text:span>ertia propositio. <text:span text:style-name="T210">Quilibet terminus significans aliqua dicendo secundo modo, significat aliqua dicendo primo modo, non tamen ediverso.</text:span></text:p>
      <text:p text:style-name="P212"><text:span text:style-name="T210">Prima pars est nota et secunda patet quia ly ‘homo’ significat aliqua primo modo et non secundo </text:span><text:span text:style-name="T211">modo. Ex qua patet quod aliquo modo significat aliqua. Ly ‘populus’ quo non significat aliqua, ly ‘homo’ quia ly ‘populus’ significat aliqua capiendo ly ‘significare aliqua secundo modo’ non tamen ly ‘homo’.</text:span></text:p>
      <text:p text:style-name="P213">Quarta. Q<text:span text:style-name="T212">uilibet terminus significans de significatione totali aliquod compositum ex pluribus partibus significat aliqua primo modo, non tamen quilibet talis significat aliqua secundo modo. Prima pars est manifesta et secunda patet de ly ‘homo’. Verum est tamen quod aliquis talis significat secundo modo, prout ex dictis apparet.</text:span></text:p>
      <text:h text:style-name="Heading_20_3" text:outline-level="3">His suppositis respondeo ad argumentum ad quod nego antecedens qualitercumque loquamur de significare aliqua</text:h>
      <text:p text:style-name="P213"><text:span text:style-name="T212">Et ad probationem concedo quod est instantia de ly ‘homo’ si loquamur de significare aliqua secundo modo, </text:span><text:span text:style-name="T213">et ad reprobationem huius nego illam, scilicet, ly ‘homo’ 'omnes homines' significat, sive ly ‘omnes’ capiatur collective sive distributive. Nisi forte caperes in sensu extraneo ut puta in isto ly ‘homo’ quemlibet hominem significat, in quo forte capiatur quando conceditur, et etiam si similes conceduntur in proportionabilibus sensibus conceduntur, et propterea </text:span><text:span text:style-name="T214">ex illa ‘quemlibet hominem’ significat bene infertur illa in tali sensu extraneo in quo non repugnat dictis.</text:span></text:p>
      <text:p text:style-name="P214">Ad aliud concesso quod ly ‘homo’ materiam et formam significat, nego quod propterea significet aliqua de significatione totali, procedendo secundo modo. Si autem loquaris de significatione aliqua primo modo, dico sicut tangitur inter arguendum quod non est instantia de ly ‘homo’, sed est instantia de ly ‘Michael’ et de ly ‘angelus’, et ad illud quod tangis quod ly ‘Michael’ significet Mich<text:span text:style-name="T215">a</text:span>elem angelum et seipsum, si intelligas secundum eandem significationem falsum est, si autem intelligas secundum diversas concedendum est et nihil sequitur ex illo.</text:p>
      <text:p text:style-name="P216">Ad confirmationem: Si loqueris de significare proprie nego antecedens qualitercumque loquitur de significare aliqua, et ad probationem dico quod non est instantia /26b/ de ly ‘populus’ sed est instantia de ly ‘angeli’ quia certum est quod unus homo potest esse populus cum ergo ly ‘populus’ quidquid potest esse populus significet, sequitur quod ly ‘populus’ unum hominem significat, immo, quemlibet.</text:p>
      <text:p text:style-name="P226">Sed an sit possibilem quod unus homo sit populus dico quod tenendo quod ad populum requiritur pluralitas hominum totalium, sicut communis modus diceret, si in illo casu quem tangis illi homines dicatur totales erit illud possibile supernaturaliter, non tamen naturaliter.</text:p>
      <text:p text:style-name="P227">Si autem illi non sunt totales, in illo casu dico quod non erit possibile naturaliter nec supernaturaliter, et ad illud quod tangis quod potest applicari ad probandum quod unus homo sit <text:soft-page-break/>populus naturaliter, dico pro illis solutione quod signandus est primo certus numerus hominum totalium qui sufficit ad populum, sic quod nullus minor illo ad populum sufficiat.</text:p>
      <text:p text:style-name="P227">Hoc dato sit gratia exempli, ille numerus denarius, tunc concedo quod si plures homines quam decem sit populus, auferendo unum ab illis adhuc remanet populum, sed quum devenietur ad decem qui sunt populus, auferendo unum ab illis non amplius remanebit populus. Ratio erit quia tunc non remanebit multitudo requisita ad populum, si vero sint plures homines quam decem, auferendo unum ab illis adhuc remanebit populus.</text:p>
      <text:p text:style-name="P228">Si tamen loqueris de significare large, non esset instantia de ly ‘angeli’, ex quod significat se, sed esset instantia de aggregato ex Sorte et Platone quod significat naturaliter communiter Sortem et Platonem, sicut inferius dicetur mediante quodam copulato, et tamen non significat aliquid.</text:p>
      <text:p text:style-name="P228">Sed esto quod ita esset quod quilibet terminus significans aliqua significet aliquid, non praeterea sequeretur inconveniens, postquam aliquis terminus secundum aliquam significationem significat aliqua qui secundum illam non significat aliquid, et ratio huius poterit apparere processu sequentis argumenti.</text:p>
      <text:h text:style-name="Heading_20_3" text:outline-level="3">Tertio arguitur quidquid significat aliqualiter significat aliquid vel aliqua</text:h>
      <text:p text:style-name="P218"><text:span text:style-name="T216">Ergo super</text:span><text:span text:style-name="T217">flue</text:span><text:span text:style-name="T216"> ponitur ly ‘aliqualiter’ in illa definitione. Consequentia videtur nota. Antecedens patet quia quidquid significat aliqualiter significat se, igitur.</text:span></text:p>
      <text:h text:style-name="Heading_20_3" text:outline-level="3">Confirmatur ratio: Nullus terminus significat aliqualiter; ergo definitio praesupponit falsum</text:h>
      <text:p text:style-name="P219">Consequentia tenet et antecedens patet quia si eius oppositum contingat illud continget de ly ‘omnis’ sed ly ‘omnis’ non significat aliqualiter; igitur consequentia tenet cum maiori, et minor patet quia si ly ‘omnis’ significet aliqualiter hoc erit de significatione propria.</text:p>
      <text:p text:style-name="P220">Sed hoc est falsum; igitur consequentia <text:span text:style-name="T218">tenet et minor patet, quia bene sequitur ly ‘omnis’ significat aliqualiter de significatione propria, ergo aliqualiter significatur per ly ‘omnis’ de significatione propria, et consequens est falsum igitur, et quod sequatur patet ab activo ad passivum, et falsitas consequentis patet quia quaeram quod est praedicatum in illa propositione, quocumque dato ad veritatem illius requiretur quod aliquid sit significandum per ly ‘omnis’ de significatione propria.</text:span></text:p>
      <text:h text:style-name="Heading_20_3" text:outline-level="3">Pro solutione argumenti pono propositiones:</text:h>
      <text:p text:style-name="P221"><text:span text:style-name="T219">Prima. </text:span><text:span text:style-name="T220">Licet si aliquis terminus in potentia propinqua significet aliqualiter illae potentia propinqua significet aliquid vel aliqua, non tamen si aliquis terminus actu significat aliqualiter, ille actu significat aliquid vel aliqua, utraque pars huius est clara.</text:span></text:p>
      <text:p text:style-name="P222"><text:span text:style-name="T220">Secunda. Licet si aliquis terminus in potentia propinqua significet </text:span><text:span text:style-name="T221">aliquid vel aliqua, ille in potentia propinqua significat aliqualiter, non tamen si aliquis actu significat aliquid vel aliqua </text:span><text:span text:style-name="T220">ille actu significat aliqualiter.</text:span></text:p>
      <text:p text:style-name="P229">Prima pars patet, quia quilibet terminus in potentia propinqua significat se esse, et sic significare est significare aliqualiter prout ex dicendis in capitulo de propositione apparebit.</text:p>
      <text:p text:style-name="P229">Secunda pars est nota.</text:p>
      <text:p text:style-name="P229"><text:soft-page-break/>Tertia. Stat quod aliquis terminus secundum aliquam significationem significet aliquid vel aliqua, et non significet aliqualiter secundum illam, et stat quod aliquis significet aliqualiter, secundum aliquam, et non significet aliquid vel aliqua secundum illam. Utraque pars huius est clara.</text:p>
      <text:p text:style-name="P229">Quarta. Licet ly ‘significare’ sufficienter definiatur hoc modo, si significare est potentiae cognitivae repraesentare tamen bene definitur. Etiam ut dictum est prima pars patet, quia illa definitio convertitur cum ly ‘significare’ et de aliis quae requiruntur ad bonam definitionem nihil deficit ei.</text:p>
      <text:p text:style-name="P223"><text:span text:style-name="T222">Secunda pars patet quia ly ‘aliquid’ vel ‘aliqua’ vel ‘aliqualiter’ ponitur in illa definitione ad explicandum tres modos significandi distinctos, secundum quorum unum terminus potest significare aliquid et secundum alium aliqua et secundum alium aliqualiter, </text:span><text:span text:style-name="T223">quorum quilibet potest stare absque alio. /27a/</text:span></text:p>
      <text:h text:style-name="Heading_20_3" text:outline-level="3"><text:span text:style-name="T224">His suppositis respondeo ad argumentum negando antecedens si de significatione actuali procedas, si autem de significatione in potentia propinqua procedas concesso antecedente nego consequentiam</text:span><text:span text:style-name="T222"> <text:s text:c="2"/></text:span><text:span text:style-name="T220"><text:s/></text:span><text:span text:style-name="T218"><text:s/></text:span><text:s/></text:h>
      <text:p text:style-name="P230">Quia quantumcumque sine illa particula ‘aliquid’ vel ‘aliqua’ vel ‘aliqualiter’ definitio esset bona, quia tamen ponitur ad explicandum illos modos significandi, qui non bene explicarentur secludendo ly ‘aliqualiter’. Propterea posita est illa particula et non superflue ponitur.</text:p>
      <text:p text:style-name="P217"><text:span text:style-name="T225">Ad confirma</text:span><text:span text:style-name="T228">tionem nego antecedens et dico breviter pro toto illo processu quod ly ‘omnis’ significat aliqualiter de significatione propria, et ad consequentiam quam facis ab activo ad passivum.</text:span></text:p>
      <text:p text:style-name="P237">Si in illo aggregato aliqualiter significatur per ly ‘omnis’ de significatione propria velles capere ly ‘actualiter’ materialiter, consequentia est nulla. Si autem veles capere ly ‘aliqualiter’ significative, nullum sensum propositionalem haberet illud aggregatum iuxta talem significationem de ly ‘aliqualiter’, et illas significationes aliarum partium. Et si dicas illud antecedens habet aliqua de verbo passivo sibi correspondentem et non nisi illud aggregatum ubi ly ‘omnis’ capitur significative.</text:p>
      <text:p text:style-name="P234">Ab hoc nego maiorem et ratio est quia actus de ly ‘significat’ fertur in ipsa in terminum qui non significat aliquid vel aliqua sed solum aliqualiter, et huiusmodi propositiones non poterunt breve propositiones de verbis passivis ipsis correspondentes, quia si possent tales habere oporteret quod in ipsis terminus supra quam fertur vis verbi activi deberet reddere suppositum vero passive. Et si dicas illa propositio aliqualiter significatur per ly ‘omnis’ solet concedi et similes etiam.</text:p>
      <text:p text:style-name="P231">Ad hoc dico quod si illa et similes concedantur hoc non erit in sensibus in quibus sunt de verbis passivis correspondentes illis de verbis activis, sed ista aliqualiter significatur per ly ‘omnis’ potest in hoc sensu salvari aliquod officium exercetur per ly ‘omnis’, et ita proportionabiliter dicatur de similibus.</text:p>
      <text:h text:style-name="Heading_20_3" text:outline-level="3">Quarto arguitur: <text:span text:style-name="T229">L</text:span>y ‘Chimaera’ significat et non repraesentat aliquid vel aliqua vel aliqualiter</text:h>
      <text:p text:style-name="P232">Igitur <text:span text:style-name="T229">minor patet quia dato huius opposito maxime significaret Chimaeram, sed hoc non </text:span><text:span text:style-name="T230">trium:</text:span></text:p>
      <text:p text:style-name="P238"><text:soft-page-break/>Primo. Quia nihil est vel potest esse Chimaera; ergo ly ‘Chimaera’ non repraesentat Chimaeram. Consequentiam tenet quia ad veritatem illius ly “‘Chimaera’ repraesentat Chimaeram” requiritur quod Chimaera sit vel possit esse.</text:p>
      <text:p text:style-name="P238">Item secundo. Bene sequitur ab activo ad passivum ly ‘Chimaera’ repraesentat Chimaeram; ergo Chimaera repraesentatur per ly ‘Chimaera’ et consequens est falsum, ex quo est affirmativa cuius subiectum pro nullo supponit, igitur.</text:p>
      <text:h text:style-name="Heading_20_3" text:outline-level="3">Ad hoc argumentum nego minorem, concesso quod ly ‘Chimaera’ significat Chimaeram</text:h>
      <text:p text:style-name="P239">Et ad primam probationem falsitatis illius nego consequentiam, et ad probationem nego quod illud requiratur ad veritatem illius, sed satis est quod aliquid imaginarie sit Chimaera.</text:p>
      <text:p text:style-name="P233"><text:span text:style-name="T231">Contra hoc arguitur: Ex hoc sequitur quod ly ‘Chimaera’ quodlibet ens significat, quod videtur falsum quia tunc ly ‘Chimaera’ esse transcendens et converteretur cum ly ‘ens’. Sed quod sequatur illud patet quia ly ‘Chimaera’ aliquid quod imaginarie est Chimaera significat, et non est maior ratio</text:span> <text:s/><text:span text:style-name="T231">de uno quam de alio; ergo quodlibet quod imaginarie est Chimaera significat. Sed quodlibet ens imaginarie est Chimaera; ergo quodlibet ens significat.</text:span></text:p>
      <text:p text:style-name="P235">Item. Ly ‘Chimaera’ de pronomine demonstrante quodcumque ens verificatur, saltem in ordine ad copulam de imaginario; ergo quodlibet significat.</text:p>
      <text:p text:style-name="P235">Ad hanc replicam concedo illatum et nego illud esse falsum. <office:annotation office:name="__Annotation__2097_1779077689" loext:resolved="false"><dc:creator>Unknown Author</dc:creator><dc:date>2025-05-29T19:17:40.376028471</dc:date><text:p text:style-name="P1023"><text:span text:style-name="T861">Chimaera: Nego quod propterea converteretur cum ly ‘ens’.</text:span></text:p><text:p text:style-name="P1023"><text:span text:style-name="T861"/></text:p><text:p text:style-name="P1023"><text:span text:style-name="T861">Et ad illud quod tangis quod esset transcendens bene potest concedi in significando, sed non in significando et supponendo.</text:span></text:p></office:annotation>Et ad probationem nego quod propterea converteretur cum ly ‘ens’, quia ad terminos convertibiles non sufficit quod quidquid significat unus significet alter, prout ex dicendis inferius apparebit, sed quid requiratur et sufficiat videbitur in definitione terminorum convertibilium, et ad illud quod tangis quod esset transcendens bene potest concedi in significando, sed non in significando et supponendo.<office:annotation-end office:name="__Annotation__2097_1779077689"/></text:p>
      <text:p text:style-name="P236">Et si arguas contradicta, quia ex dictis sequitur quod ideo ly ‘Chimaera’ quodlibet ens significat, quia quodlibet ens imaginarie est Chimaera, sed hoc est falsum; igitur falsitas consequentis patet, quia ex illo sequitur quod ly ‘Sortes’ quodlibet ens significat. Similiter ly ‘homo’ quia quodlibet ens imaginarie est Sortes et homo, immo sequitur quod quilibet terminus significans aliquid vel aliqua secundum aliquam significationem, quodlibet ens significat secundum illam. Sed ista sunt falsa quia tunc nullus /27b/ terminus esse singularis.</text:p>
      <text:p text:style-name="P240">Ad hoc dico quod si capiatur ly ‘signi<text:span text:style-name="T232">fica’ prout ampliat ad quinque de quocumque termino significante aliquid vel aliqua secundum aliquam significationem, concedendum est quod quolibet ens significat secundum illam. Tamen quando in hac materia terminorum conceditur de aliquod termino quod aliquam rem significat secundum aliquam significationem et aliquam non significat secundum eandem capitur ly ‘significat’ prout ampliat praecise ad quattuor differentias temporum, verum est tamen quod etiam solet interdum concedi quod aliquis terminus in ordine ad copulam de imaginario significat aliquid quod non significat in ordine ad alias copulas, et potest hoc sic intelligi secundum quod capiendo ly ‘significat’ prout ampliat ad quinque, concedendum est quod aliquis terminus secundum aliquam certam significationem significat aliquid significatum, et capiendo ly ‘significat’ prout praecise ampliat ad quatuor, concedendum est quod ille secundum illam significationem non significat illud, concedendum est quod ille secundum illam significationem non significat illud.</text:span></text:p>
      <text:p text:style-name="P241"><text:soft-page-break/>Posset etiam sic intelligi quod quando ille terminus capitur in ordine ad copulam de imaginario accipitur pro aliquod significato, et ex consequenti significat illud, sed quando capitur in ordine ad alias copulas non accipitur pro illo nec dat intelligere illud.</text:p>
      <text:p text:style-name="P242">Ad propositum ergo redeundo, unde digressi sumus, ponam pro hac materia aliquas propositiones:</text:p>
      <text:list text:style-name="L10">
        <text:list-item>
          <text:p text:style-name="P914"><text:span text:style-name="T233">Prima. Sive ly ‘significat’ capiatur prout ampliat ad quinque sive prout ampliat praecise ad quattuor, concedendum est quod ly ‘Chimaera’ quodlibet ens significat. Si enim ly ‘significat’ capiatur prout ampliat ad quinque notum est si autem alio modo patet, quia in ordine ad alias copulas quam de imaginario accipitur pro aliquo quod imaginarie est Chimaera, et qua ratione pro aliquo tali ita pro quolibet tali; ergo </text:span><text:span text:style-name="T234">pro</text:span><text:span text:style-name="T233"> quolibet </text:span><text:span text:style-name="T234">tali accipitur in ordine ad tales copulas.</text:span></text:p>
          <text:p text:style-name="P915">Ergo quantumcumque ly ‘significat’ non ampliet nisi ad quattuor differentias temporum, illud est concedendum, ex quo patet quod ly ‘Chimaera’ in ordine ad quamlibet copulam quodlibet ens significat, procedendo in sensu explanato.</text:p>
        </text:list-item>
        <text:list-item>
          <text:p text:style-name="P916">Secunda. <text:span text:style-name="T235">Licet capiendo ly ‘significat’ prout ampliat ad quinque, concedendum sit quod ly ‘Chimaera’ Chimaeram significat, tamen capiendo alio modo non est concedendum illud. Utraque pars huius est manifesta.</text:span></text:p>
        </text:list-item>
        <text:list-item>
          <text:p text:style-name="P917"><text:span text:style-name="T235">Tertio. Licet de quolibet termino significante aliquid vel aliqua secundum aliquam significationem, concedendum sit quod capiendo ly ‘significat’ prout ampliat ad quinque, ille terminus quodlibet ens significat secundum illam. Tamen capiendo ly ‘significat’ prout ampliat ad quattuor non de quolibet est illud concedendum. Proposito patet </text:span><text:span text:style-name="T236">ex communi usu.</text:span></text:p>
        </text:list-item>
      </text:list>
      <text:p text:style-name="P245">Et si petas quare magis ly ‘Chimaera’ in ordine ad quamlibet copulam pro quolibet quod imaginarie est Chimaera, accipitur et ly ‘homo’ non in ordine ad quamlibet pro quolibet quod imaginarie est homo accipitur.</text:p>
      <text:p text:style-name="P246">Si dicas quod ideo est qui ly ‘Chimaera’ in ordine ad quamlibet copulam quodlibet quod de imaginarie est Chimaera, significat ad sensum datum, et ly ‘homo’ non in ordine ad quamlibet omne quod imaginarie est homo significat, iterum petam rationem huius.</text:p>
      <text:p text:style-name="P243">Ad hoc potest dici quod ratio illius discriminis est quia significatio de ly ‘Chimaera’ sic fertur in imaginabilia, quod non potest alicui convenire nisi in ordine ad copulam de imaginario, secus est de ly ‘homo’.</text:p>
      <text:p text:style-name="P244">Ex his igitur patet solutio ad tutum <text:span text:style-name="T237">processum replicae, dempto illo videlicet quod tunc nullus esset terminus singularis unde hoc negandum es, quia licet quilibet terminus significans aliquid vel aliqua secundum aliquam significationem significet plura, capiendo ly ‘significare’ prout ampliat ad quinque. Tamen non quilibet talis significat plura capiendo ly ‘significare’ prout praecise ampliat ad quattuor.</text:span></text:p>
      <text:p text:style-name="P247">Et si dicas sequeretur saltem quod ille terminus ‘Chimaera’ non esset singularizabilis nec posset dari aliquod individuum sub ly ‘Chimaera’. Sed hoc est falsum, igitur quod sequatur patet, quia qualitercumque ly ‘Chimaera’ significat plura. Taliter ly ‘ista Chimaera’ significat plura quidquid demonstretur per ly ‘ista Chimaera’ et eadem ratione poterit concludi, et similiter posset arguit si aliquod individuum posset reperiri sub ly ‘Chimaera’.</text:p>
      <text:p text:style-name="P247"><text:soft-page-break/>Pro ista replica pono propositiones:</text:p>
      <text:list text:continue-numbering="true" text:style-name="L10">
        <text:list-item>
          <text:p text:style-name="P918">Prima. <text:span text:style-name="T238">Non potest dari aliquod singulare contentum sub ly ‘Chimaera’ quod non includat pronomen demonstrativum.</text:span></text:p>
        </text:list-item>
        <text:list-item>
          <text:p text:style-name="P919">Secunda. Ly ‘Chimaera’ bene potest singulari, et dico quod aggregatum ex ly ‘Chimaera’ et pronomine demonstrativo /28a/ cadente supra ly ‘Chimaera’, si demonstretur per illud pronomen demonstrativum aliquid quod potest esse, est terminus singularis, quia <text:s/>capiendo ly ‘significat’ prout non ampliat ad quinque, ille terminus praecise significat illud quod demonstratur, et hoc est ratione illius pronominis demonstrativi.</text:p>
        </text:list-item>
      </text:list>
      <text:p text:style-name="P248">Petes tamen s<text:span text:style-name="T239">i tale pronomen demonstraret aliquid quod non potest esse an tunc tale aggregatum esset terminus singularis vel terminus communis. Ratio dubitationes est quia capiendo ly ‘significat’ prout ampliat praecise ad quattuor aut nihil significat ille terminus aut quodlibet ens significat.</text:span></text:p>
      <text:p text:style-name="P249">Ad hoc posset dici quod praesupponitur falsum, puta quod possit dari pronomen quod demonstret aliquid quod non potest esse, et non demonstret aliquid quod potest esse, capiendo ly ‘demonstrat’ prout ampliat praecise ad quattuor. Verum est tamen quod quodlibet pronomen demonstrativum demonstrat illud quod non potest esse, capiendo ly ‘demonstrat’ prout ampliat ad quinque.</text:p>
      <text:p text:style-name="P249">Posset etiam aliter dici dato illo quod praesupponitur quod ille terminus non esset singularis, sed melius est dicere primo modo et ratio quae assumeretur pro illo esset quia alias tale pronomen non posset aliquo modo demonstrare unum quin plura demonstraret, quod videtur esse contra rationem pronominis demonstrativi.</text:p>
      <text:h text:style-name="Heading_20_3" text:outline-level="3">Si petas circa praedicat an aliquis terminus possit esse singularis in ordene ad copulam de imaginario</text:h>
      <text:p text:style-name="P255">Ad hoc dico quod si intelligas ad hunc sensum an aliquis possit capi discrete in ordine ad copulam de imaginario, sic quod praecise pro uno capiatur, tunc dico quod non, vel ad istum sensum scilicet an sit possibile quod aliquis terminus captus in ordine ad copulam de imaginario non det tunc intelligere plura, et tunc etiam dico quod non.</text:p>
      <text:p text:style-name="P255">Si autem capias in isto sensu qui magis propius est inter istos omnes, an possit aliquis terminus capi in ordine ad copulam de imaginario qui sit singularis illo modo captus, tunc dicendum est quod sic, et si Sorte oppositum huius interdum concedatur in alio sensu quam in isto ultimo debebit capit.</text:p>
      <text:h text:style-name="Heading_20_3" text:outline-level="3">Ad secundum quod tangis ad probandum istam falsam concedo consequentiam illam ab activo ad passivum, et nego falsitatem consequentis, et nego quod subiectum non supponat, quia ampliatur ad quinque differentias temporum</text:h>
      <text:p text:style-name="P256">Contra istam arguitur Chimaera non est intelligibilis; ergo Chimaera non repraesentatur per ly ‘Chimaera’ et per consequens dicta falsa. Antecedens patet, nullum impossibile est intelligibile, Chimaera est quoddam impossibile; ergo Chimaera non est intelligibilis. Consequentia tenet et minor patet ex eo quod Chimaera non potest esse. Maior probatur quia aliquod non est intelligibile et non est potior ratio de uno quam de alio, igitur consequentia tenet cum minori, et maior patet quia ly ‘non intelligibile’ non est intelligibile.</text:p>
      <text:p text:style-name="P250"><text:soft-page-break/><text:span text:style-name="T240">Ad hanc replicam nego antecedens et ad probationem relitis solutionibus impropriis quae solent ibi dari tangam veram et infallibilem solutionem. Illius distinguo igitur illa maiorem, scilicet, </text:span><text:span text:style-name="T241">nullum impossibile est intelligibile, quia sic capiatur loco huius nihil quod non potest esse intelligibile neganda est, et si in isto nullum non possibile est intelligibile concedenda est, nec videtur posse capit in aliquo alio sensu minor.</text:span></text:p>
      <text:p text:style-name="P257">Etiam distinguenda est quia posset capi in hoc sensu “Chimaera est non-possibile” et in isto “Chimaera est quod non potest esse”, et in quocumque istorum est falsa.</text:p>
      <text:p text:style-name="P257">Si tamen caperes illam in isto sensu “Chimaera non potest esse” et maiorem in sensu concesso tunc consequentia non valeret.</text:p>
      <text:p text:style-name="P257">Ex his patet quod de aliquo termino categorematico utroque, immo secundum aliquam significationem qui non potest supponere secundum illam, cum sola ampliatione ad quattuor differentias temporum verificatur ly ‘intelligibile’ et de aliquo tali non verificatur ly ‘intelligibile’, loquendo de verificatione sicut communiter solent doctores loqui in huiusmodi propositis.</text:p>
      <text:p text:style-name="P251"><text:span text:style-name="T241">Primum </text:span><text:span text:style-name="T242">patet de ly ‘Chimaera’, secundum patet de ly ‘non-intelligibile’ quia ad verificationem illius termini de ipso sequeretur contradictio, ex quo iterum patet quod si illi concedunt quod aliquod impossibile est intelligibile et aliquid non capiant in isto sensu quod de aliquo tali termino verificatur ly ‘intelligibile’ secundum talem significationem, et de aliquo non bene posset illud salvari capiendo etiam istam “Chimaera est quoddam impossibile”, in hoc sensu quod ly ‘Chimaera’ non potest /28b/ </text:span><text:span text:style-name="T243">supponere secundum talem significationem.</text:span></text:p>
      <text:p text:style-name="P258">Cum sola ampliatione ad quattuor bene est concedendum, et ad proportionabiles sensus procedendo bene posset salvari solutio quae communiter solet dari, sed quia illi sensus essent valde extranei et clarissime evacuatur tota difficultas argumenti, dicendo sicut dictum est dicatur illo modo.</text:p>
      <text:p text:style-name="P259">Et si arguas ad huc contra dicta, quia ex ipsis sequitur quod possimus habere conceptum Chimaera, sed hoc est falsum, quia non videtur quomodo et a quo possumus causare illum conceptum.</text:p>
      <text:p text:style-name="P252"><office:annotation office:name="__Annotation__2309_531463576" loext:resolved="false"><dc:creator>Unknown Author</dc:creator><dc:date>2025-06-01T19:18:08.370252056</dc:date><text:p text:style-name="P1023"><text:span text:style-name="T861">Quomodo conceptus Chimaera causari potest: Primo habemus conceptum draconis, secundo conceptum ventris mulieris, tertio conceptum caudae bovis, et caetera, quibus habitis imaginamur res significatas per illos conceptus, unum compositu facere, et sic imaginando formamus unum conceptum distinctum ab illis praehabitis qui illud compositum imaginatum, et quidquid imaginarie est illud significat, connotando quod ex rebus significatis per illos conceptus praehabitos componatur.</text:span><text:span text:style-name="T861"><text:line-break/></text:span><text:span text:style-name="T861"><text:line-break/></text:span><text:span text:style-name="T861">Patet secundo quod ille conceptus causatur a rebus possibilis imaginatis aliquo modo se habere quo impossibiliter habent.</text:span></text:p></office:annotation>Ad hoc dico quod potest causari hoc modo: Primo habemus conceptum draconis, secundo conceptum ve<text:span text:style-name="T245">n</text:span>tris mulieris, tertio conceptum caudae bo<text:span text:style-name="T245">v</text:span>is, et caetera, quibus habitis imaginamur res significatas per illos conceptus, unum compositu facere, et sic imaginando formamus unum conceptum distinctum ab illis praehabitis qui illud compositum imaginatum, et quidquid imaginarie est illud <text:span text:style-name="T244">significat, connotando quod ex rebus significatis per illos conceptus praehabitos componatur.</text:span></text:p>
      <text:p text:style-name="P253">Ex quo patet primo quod non omen conceptum Chimaera esse complexum.</text:p>
      <text:p text:style-name="P253">Patet <text:span text:style-name="T245">secundo quod ille conceptus causatur a rebus possibilis imaginatis aliquo modo se habere quo impossibiliter habent.</text:span><office:annotation-end office:name="__Annotation__2309_531463576"/></text:p>
      <text:h text:style-name="Heading_20_4" text:outline-level="4">Occurrunt tamen difficultas. An aliquis terminus possit absolute significare illud compositum imaginatum taliter quod non possit supponere nisi in ordine ad copulam de imaginario</text:h>
      <text:p text:style-name="P260">Ad hoc potest dici quod non est, quia tunc ille conceptus deberet significare omnia entia sicut ly ‘ens’ quantumcumque ly ‘significat’ non ampliet ad quinque, et si sic significaret, nihil tolleret quin significaret eodem modo, sicut ly ‘ens’ et supponeret in ordine ad copulam de praesenti.</text:p>
      <text:h text:style-name="Heading_20_2" text:outline-level="2"><text:soft-page-break/>De significare naturaliter et eius divisione</text:h>
      <text:h text:style-name="Heading_20_3" text:outline-level="3">Dupliciter contingit significare, scilicet, naturaliter et ad placitum</text:h>
      <text:p text:style-name="P254"><text:span text:style-name="T246">Significa</text:span><text:span text:style-name="T247">re naturaliter est significare seclusa impositione.</text:span></text:p>
      <text:h text:style-name="Heading_20_3" text:outline-level="3">Contra istam divisionem arguitur: <text:span text:style-name="T248">Aliquis terminus significat aliqua qui non significat naturaliter nec ad placitum; ergo divisio mala</text:span></text:h>
      <text:p text:style-name="P261">Antecedens patet quia iste terminus scriptus ‘homo’ significat se et 'omnes homines', et non significat illa naturaliter nec ad placitum ut constat, igitur.</text:p>
      <text:p text:style-name="P262">Forte dices distinguendo antecedens, quia vel intelligis quod aliquis terminus secundum unam significationem significet aliqua, et non naturaliter nec ad placitum, et tunc nego illud. Nec illa probatio quam tangis probat ipsum in hoc sensu.</text:p>
      <text:p text:style-name="P262">Si autem intelligas quod aliquis terminus secundum unam vel diversas significationes significet aliqua et caetera, concedo illud. Sed ex illo non sequitur malitia divisionis, quia divisio procedit de significare secundum unam significationem.</text:p>
      <text:p text:style-name="P263">Contra solutionem arguitur: <text:span text:style-name="T249">Aliquis terminus significat aliquid secundum unam significationem, et non significat illud naturaliter nec ad placitum, igitur.</text:span></text:p>
      <text:p text:style-name="P264"><text:span text:style-name="T249">Antecedens patet, imago Sortis significat Sortem et non naturaliter nec ad placitum; igitur prima pars antecedentis et tertia sunt notae. </text:span><text:span text:style-name="T250">Secunda probatur quia si significat naturaliter Sortem, tunc ipsa significaret Sortem, cuicumque apprehendenti illam esto quod ille numquam vidisset aut cognovisset Sortem, se hoc est falsum; igitur quod sequatur notum est et falsitas consequentis probatur: </text:span><text:span text:style-name="T254">p</text:span><text:span text:style-name="T250">er talem imaginem non </text:span><text:span text:style-name="T251">formamus conceptum Sortis nisi prius vidissemus ipsum, nam alias apprehensa illa imagine. Sorte adhuc non cognito quantumcumque postea occurreret Sortes statim iudicaremus ipsum esse Sortem cuius oppositum frequenter contingit.</text:span></text:p>
      <text:p text:style-name="P267">Haec replica petit hanc difficultatem, videlicet, an imago Sortis repraesentet naturaliter Sortem alicui, esto quod ipse numquam ante Sortem cognovisset discrete, pro quo pono propositiones:</text:p>
      <text:list text:style-name="L11">
        <text:list-item>
          <text:p text:style-name="P920"><text:span text:style-name="T253">Prima. Illa imago mediante conceptu communi potest naturaliter communiter repraesentare alicui cui numquam ante cognovit Sortem. Propositio patet: </text:span><text:span text:style-name="T254">p</text:span><text:span text:style-name="T253">er ipsam poterit </text:span><text:span text:style-name="T255">formari ab uno unus conceptus communis qui repraesentabit omnia quae sunt vel possunt esse naturaliter similia illi imagini in figuratione et lineatione, absque hoc quod quodlibet illorum fuisset ante cognitum ab illo.</text:span></text:p>
        </text:list-item>
        <text:list-item>
          <text:p text:style-name="P921"><text:span text:style-name="T255">Secunda propositio. Licet sustentabile sit quod illa imago possit repraesentare Sortem discrete alicui absque hoc quod ab illo ante fuisset </text:span><text:span text:style-name="T256">p</text:span><text:span text:style-name="T255">raecognitus </text:span><text:span text:style-name="T256">Sortes, mediante notitia singulari tantum.</text:span></text:p>
        </text:list-item>
      </text:list>
      <text:p text:style-name="P268"><text:span text:style-name="T256">Sustentabile est etiam </text:span><text:span text:style-name="T257">oppositum huius, si teneatur primum non sequitur ex illo quod si post aliquando videam Sortem, quod statim formem iudicium de illa vocali vel scripta “Hoc est Sortes”, nec oportebit etiam de /29a/ </text:span><text:span text:style-name="T258">mentali cui subordinatur, quia frequenter aliquis terminus repraesentat aliquod significatum et demonstrato ipso ad sensum, nescimus an repraesentet. Hoc patet ubi Sortes cognitus ante te esset ante indutus pelle asinina, ita quod dubites illum esse Sortem, et frequenter credimus aliquem conceptum nobis repraesentare hoc vel illud, et non repraesentat nobis illud.</text:span></text:p>
      <text:p text:style-name="P269"><text:soft-page-break/>Si dicatur secundo modo esset difficultas, ante quam praecognovissem Sortem mediante aliqua notitia discreta, illa imago repraesentabit mihi Sortem in potentia propinqua, licet haec difficultas ad nomen consistit, quia secundum quod exponatur illa particula in potentia propinqua ita dicendum erit.</text:p>
      <text:h text:style-name="Heading_20_3" text:outline-level="3"><text:span text:style-name="T259">Contra diffinitionem de ly ‘significare naturaliter’ arguitur sic: Aliquis terminus significat aliquid naturaliter qui non significat illud secunda impositione; ergo definitio mala </text:span><text:span text:style-name="T256"><text:s text:c="2"/></text:span><text:span text:style-name="T255"><text:s text:c="4"/></text:span><text:span text:style-name="T252"><text:s/></text:span></text:h>
      <text:p text:style-name="P270">Antecedens patet quia ille terminus scriptus ‘ens’ significat se naturaliter et non significat se seclusa impositione; igitur minor patet quia significat se ex impositione. Ergo non seclusa impositione consequentia patet, quia significare seclusa impositione nihil aliud est quam significare et non cum impositione.</text:p>
      <text:h text:style-name="Heading_20_3" text:outline-level="3">Ad hoc respondetur negando antecedens</text:h>
      <text:p text:style-name="P265"><text:span text:style-name="T260">Et ad probationem nego minorem ad cuius probationem nego consequentiam. </text:span><text:span text:style-name="T261">E</text:span><text:span text:style-name="T260">t ad probationem nego assumptum </text:span><text:span text:style-name="T262">et dico quod per significare seclusa impositione in proposito intelligimus significare taliter quod licet nulla esset impositio, adhuc talis terminus significaret.</text:span></text:p>
      <text:h text:style-name="Heading_20_3" text:outline-level="3">Tripliciter contingit significare naturaliter</text:h>
      <text:p text:style-name="P266"><text:span text:style-name="T263">Scilicet naturaliter proprie, naturaliter communiter et natur</text:span><text:span text:style-name="T265">aliter ex instinctu naturae.</text:span></text:p>
      <text:h text:style-name="Heading_20_3" text:outline-level="3">Significare naturaliter proprie est significare mediante se, et hoc modo significant termini mentales ultimati</text:h>
      <text:p text:style-name="P275"><office:annotation office:name="__Annotation__15568_490891808" loext:resolved="false"><dc:creator>Unknown Author</dc:creator><dc:date>2025-10-06T23:59:57.102230617</dc:date><text:p><text:span text:style-name="T861">Quia quilibet talis terminus sufficit cum potentia cognitiva, cui debet significare, ad significandum illi, nec aliquo alio extrinseco eget ad illud.</text:span></text:p></office:annotation>Quia quilibet talis terminus sufficit cum potentia cognitiva, cui debet significare, ad significandum illi, nec aliquo alio extrinseco eget ad illud.<office:annotation-end office:name="__Annotation__15568_490891808"/></text:p>
      <text:h text:style-name="Heading_20_3" text:outline-level="3">Circa definitione de ly ‘significare naturaliter communiter’</text:h>
      <text:p text:style-name="P273">Adverte quod sustentari potest quod si aliquid concurrat in ratione obiecti, tamquam obiectum totale ad causandum aliquem conceptum vel aliquam propositionem mentalem ultimatam, quod illud dicatur naturaliter communiter repraesentare eodem modo sicut ille conceptus vel illa propositio mentalis ultimata.</text:p>
      <text:p text:style-name="P273">Et hoc modo dicendo si aliquid tamquam obiectum totale concurrat in ratione obiecti ad causandum notitiam omnium entium, illud naturaliter communiter repraesentabit omnis entia, et dixi de conceptu vel de propositione mentali ultimata, quia non oportet quod obiectum totale quod concurrit in ratione obiecti ad causandum illum actum syncategorematicum ‘omnis’ in mente, aut aliquem alium huiusmodi, quod illud repraesentet eodem modo sicut tale syncategorema, et ita dicendo ly <office:annotation office:name="__Annotation__15570_490891808" loext:resolved="false"><dc:creator>Unknown Author</dc:creator><dc:date>2025-10-07T00:00:40.103391124</dc:date><text:p><text:span text:style-name="T861">‘</text:span><text:span text:style-name="T861">significare naturaliter communiter’ posset sic definire:</text:span></text:p><text:p><text:span text:style-name="T861">Est efficere cognitionem in ratione obiecti totalis.</text:span></text:p></office:annotation>‘significare naturaliter communiter’ posset sic definire:</text:p>
      <text:p text:style-name="Quotations">Est efficere cognitionem in ratione obiecti totalis.<office:annotation-end office:name="__Annotation__15570_490891808"/></text:p>
      <text:p text:style-name="P274">Hoc est, est concurrere in ratione obiecti totalis ad causandum aliquem conceptum vel aliquam propositionem mentalem ultimatam, sed quia non communiter solet concedi quod quodlibet ens quodcumque ens naturaliter communiter repraesentet, potest poni haec distinctio.</text:p>
      <text:p text:style-name="P274"><text:soft-page-break/>Dupliciter contingit significare naturaliter communiter, scilicet, stricte et large.</text:p>
      <text:p text:style-name="P274"><office:annotation office:name="__Annotation__15645_490891808" loext:resolved="false"><dc:creator>Unknown Author</dc:creator><dc:date>2025-10-07T00:01:28.824451650</dc:date><text:p><text:span text:style-name="T861">Stricte significare naturaliter communiter est: </text:span></text:p><text:p><text:span text:style-name="T861">In ratione obiecti totalis, efficere cognitionem adaequatam alicuius.</text:span></text:p><text:p><text:span text:style-name="T861">Vel</text:span></text:p><text:p><text:span text:style-name="T861">In ratione obiecti principalis, efficere aliquam propositionem mentalem ultimatam.</text:span></text:p></office:annotation>Stricte significare naturaliter communiter est: </text:p>
      <text:p text:style-name="Quotations">In ratione obiecti totalis, efficere cognitionem adaequatam alicuius.</text:p>
      <text:p text:style-name="P274">Vel</text:p>
      <text:p text:style-name="P832">In ratione obiecti principalis, efficere aliquam propositionem mentalem ultimata<text:span text:style-name="T266">m.</text:span><office:annotation-end office:name="__Annotation__15645_490891808"/></text:p>
      <text:p text:style-name="P843">Quae definitio sic poterit intelligi, hoc est:</text:p>
      <text:p text:style-name="P833">Est concurrere in ratione obiecti totalis ad causandum notitiam singularem alicuius.</text:p>
      <text:p text:style-name="P843">Vel</text:p>
      <text:p text:style-name="Quotations">Est concurrere in ratione obiecti principalis ad causandum aliquam mentalem ultimatam singularem.</text:p>
      <text:p text:style-name="P836"><text:span text:style-name="T267">Et additur </text:span><text:span text:style-name="T268">illa secunda particula quia ipse sortes naturaliter communiter significat Sortem esse.</text:span></text:p>
      <text:p text:style-name="P837"><text:span text:style-name="T268">Stricte loquendo adhuc tamen non </text:span><text:span text:style-name="T269">concurrit in ratione obiecti totalis ad causandum illam mentalem ultimatam “Sortes est”, ex quo non concurrit in ratione obiecti totalis ad causandum verbum illius, scilicet, concurrit in ratione obiecti principalis et hoc sufficit.</text:span></text:p>
      <text:p text:style-name="P844">Sed large significare naturaliter communiter in ratione obiecti est efficere cognitionem in ratione obiecti totalis, vel est in ratione obiecti principalis efficere propositionem mentalem ultimatam.</text:p>
      <text:p text:style-name="P845">Additur secunda pars propter consimilem eam, sicut in praecedenti definitione, et cum hac distinctione poterunt salvari dicta communia, sicut ex corollariis statim tangendis poterit apparere.</text:p>
      <text:p text:style-name="P838">Et si petas quare aliquid dicatur /29b/ <text:span text:style-name="T270">concurrere in ratione obiecti totalis ad causandum aliquam notitiam singularem, et quare aliquid in ratione obiecti principalis dicitur concurrere ad causandum aliquam propositionem singularem?</text:span></text:p>
      <text:list text:style-name="L12">
        <text:list-item>
          <text:p text:style-name="P899">Ad primum <text:span text:style-name="T271">d</text:span>ico quod ideo est quia aliquo modo apprehenditur ratione cuius apprehensionis, ipsa <text:span text:style-name="T271">potentia quacumque alia causa seclusa cum qua posset causare talem notitiam sufficit causare illam.</text:span></text:p>
        </text:list-item>
        <text:list-item>
          <text:p text:style-name="P899"><text:span text:style-name="T271">Sed ad secundam dico quod ideo est quia ipsum apprehenditur aliquo modo, ratione cuius apprehensionis ipsa potentia, quacumque alia causa seclusa, cum qua tamquam cum causa principali, potest causare talem propositionem, sufficit tamquam ratione causa</text:span><text:span text:style-name="T778">e</text:span><text:span text:style-name="T271"> principalis causare tale propositionem. </text:span></text:p>
        </text:list-item>
      </text:list>
      <text:p text:style-name="P842"><text:span text:style-name="T272">Et si petas quare aliquid in ratione obiecti totalis dicitur concurrere ad causandum aliquam notitiam communem. </text:span>Pro ista difficultate oportet supponere quod, sicut communiter solet dici, <office:annotation office:name="__Annotation__6133_3493696604" loext:resolved="false"><dc:creator>Unknown Author</dc:creator><dc:date>2025-10-06T01:59:26.325857686</dc:date><text:p text:style-name="P1024"><text:span text:style-name="T861">Ad causandum notitiam communem non sufficit potentia cum obiecto, sed requiritur notitia comparativa.</text:span></text:p></office:annotation>ad causandum notitiam communem non sufficit potentia cum obiecto, sed requiritur notitia comparativa.<office:annotation-end office:name="__Annotation__6133_3493696604"/> Tunc oportet dicere quod ideo est quia apprehenditur aliquo modo, et ratione <text:soft-page-break/>talis apprehensionis,<office:annotation office:name="__Annotation__6255_3493696604" loext:resolved="false"><dc:creator>Unknown Author</dc:creator><dc:date>2025-10-06T02:07:37.516849035</dc:date><text:p text:style-name="P1024"><text:span text:style-name="T861">Notitia communem: Ipsa potentia cum notitia comparativa sufficit causare talem notitiam</text:span></text:p></office:annotation> ipsa potentia cum notitia comparativa sufficit causare talem notitiam<office:annotation-end office:name="__Annotation__6255_3493696604"/>, quacumque alia apprehensione seclusa, cum qua et notitia comparativa posset, illa potentia, talem notitiam causare.</text:p>
      <text:p text:style-name="P839">Et ex his apparet quare <text:span text:style-name="T273">aliquid in ratione obiecti principalis dicitur concurrere ad causandam aliquam propositionem mentalem, sive illa propositio sit communis sive singularis.</text:span></text:p>
      <text:p text:style-name="P847">Ad hoc consimiliter dicendum est sicut ad secundum quod petebatur statim.</text:p>
      <text:p text:style-name="P847">Ex his patet quod quantumcumque apprehenso illo termino vocali vel scripto ‘homo’ interdum formae conceptum omnium hominum de novo, non tamen propterea in ratione obiecti principalis dicitur concurrere.</text:p>
      <text:p text:style-name="P839"><office:annotation office:name="__Annotation__2155_3745116747" loext:resolved="false"><dc:creator>Unknown Author</dc:creator><dc:date>2025-06-04T20:10:42.468014775</dc:date><text:p text:style-name="P1024"><text:span text:style-name="T861">Et si petas quid concurrit tunc in ratione obiecti ad causandum illum conceptum. Ad hoc dico quod tunc non oportet quod aliquid concurrat in ratione obiecti immediate, quia tunc producitur ab habitu.</text:span></text:p></office:annotation><text:span text:style-name="T273">Et si petas quid concurrit tunc in ratione obiecti ad causandum illum conceptum. Ad hoc dico quod tunc non oportet quod aliquid concurrat in ratione obiecti immediate, quia tunc producitur ab habitu.</text:span><office:annotation-end office:name="__Annotation__2155_3745116747"/><text:span text:style-name="T273"> Sed haec materia alibi diffusius pertractanda.</text:span></text:p>
      <text:p text:style-name="P846">Ex his patet primo quod si aliquid stricte significet naturaliter communiter, illud significat propositionaliter, aut discrete, sed non oportet si large significet naturaliter communiter. Potest enim illo modo significare mediante conceptu communi et interdum procedunt doctores de tali modo significandi naturaliter communiter stricte, et aliquando large.</text:p>
      <text:p text:style-name="P848">Patet secundo quod quanvis Sortes possit in ratione obiecti principalis concurrere ad causandum aliquem actum syncategorematicum incomplexum, non tamen propterea dicetur significare naturaliter communiter large vel stricte, eo modo quo significat illud syncategorema, prout ex definitionibus apparere potest non est alia ratio huius quaerenda querenda praeter communem modum loquendi.</text:p>
      <text:p text:style-name="P840"><text:span text:style-name="T274">Et si petas an vox prolata ab aliquo </text:span><text:span text:style-name="T275">naturaliter communiter repraesentet suum prolatorem, potest dici quod sic, immo adhuc stricte, quia potest in ratione obiecti totalis concurrere ad causandum notitiam singularem sui prolatoris, </text:span><text:span text:style-name="T276">sive tamen hoc possit fieri absque hoc quod sit praehabita aliqua </text:span><text:span text:style-name="T277">notitia singularis de Sorte sive non, non est curandum.</text:span></text:p>
      <text:p text:style-name="P841"><office:annotation office:name="__Annotation__2293_3745116747" loext:resolved="false"><dc:creator>Unknown Author</dc:creator><dc:date>2025-06-04T20:29:25.331073222</dc:date><text:p text:style-name="P1024"><text:span text:style-name="T861">Hic occurrit difficultas. An imago Sortis repraesentet Sortem et seipsam mediante eodem conceptu singulari?</text:span></text:p><text:p text:style-name="P1024"><text:span text:style-name="T861"/></text:p><text:p text:style-name="P1024"><text:span text:style-name="T861">Sed ad hoc negative respondendum est, et ad illud quod tangis dico quod quantumcumque ille conceptus causetur in ratione obiecti ab illa imagine, tamen ex natura sua habet quod repraesentet Sortem et non illam imaginem, saltem mediante se.</text:span></text:p></office:annotation><text:span text:style-name="T277">Hic occurrit di</text:span><text:span text:style-name="T278">fficultas. An imago Sortis repraesentet Sortem et seipsam mediante eodem conceptu singulari? Et ratio dubitationis est quia ille conceptus singularis Sortis, quam causat illa imago in ratione obiecti. Adeo bene videtur repraesentare illam imaginem sicut Sortem, ex quod ab illa causatur in ratione obiecti.</text:span></text:p>
      <text:p text:style-name="P841"><text:span text:style-name="T278">Sed ad hoc negative respondendum est, et ad illud quod tangis, dico quod quantumcumque ille conceptus causetur in ratione obiecti ab illa imagine, tamen ex natura sua habet quod repraesentet Sortem et non illam imaginem, saltem mediante se.</text:span><office:annotation-end office:name="__Annotation__2293_3745116747"/><text:span text:style-name="T278"> </text:span><text:span text:style-name="T275"><text:s/></text:span><text:span text:style-name="T274"><text:s text:c="2"/></text:span><text:s/></text:p>
      <text:h text:style-name="Heading_20_3" text:outline-level="3"><text:soft-page-break/><text:span text:style-name="T279">Circa modum definiendi dicit ly ‘significare naturaliter ex instin</text:span><text:span text:style-name="T280">ctu naturae, est advertendum quod stando in vi vocabuli, concedendum esset quod quilibet terminus significans naturaliter, qualitercumque contingat, significat naturaliter ex instinctu naturae</text:span></text:h>
      <text:p text:style-name="P278">Ita quod ly ‘significare ex instinctu naturae’ videtur esse terminus superior ad illa duo membra quae definita sunt, ex quo quilibet terminus significans naturaliter videtur significare ex instinctu, proveniere a natura.</text:p>
      <text:p text:style-name="P279">Sed quia communis modus loquendi videtur asserere quod terminus significans naturaliter communiter aut naturaliter proprie, non significat ex instinctu naturae, poterit taliter definiri quod de nullo termino significante naturaliter communiter aut naturaliter proprie, concedendum sit quod significet naturaliter ex instinctu naturae.</text:p>
      <text:p text:style-name="P279">Unde /30a/ poterit sic definire:</text:p>
      <text:p text:style-name="P280">Est significare ex instinctu proveniente a natura non naturaliter communiter vel naturaliter proprie.</text:p>
      <text:p text:style-name="P276">Et hoc modo gemitus infirmorum significat dolorem.</text:p>
      <text:p text:style-name="P276">Et si dicas gemitus infirmorum concurrit in ratione obiecti totalis ad causandum dolorem; ergo naturaliter communiter significat dolorem.</text:p>
      <text:p text:style-name="P276">Ad hoc negandum esset antecedens. Si tamen concederetur illud, non bene exemplificaretur, sed oporteret exemplificare de quolibet modo significandi naturali, qui non est naturaliter proprius vel naturaliter communis, et multi tales modi significandi possunt reperiri, prout ex processu fiendo poterit apparere.</text:p>
      <text:p text:style-name="P276">Si vis ergo, poteris ponere distinctionem de ly ‘significare ex instinctu naturae’ ita quod dupliciter contingat taliter significare, scilicet large et stricte, sed in his non est immorandum. In sequentibus tamen procedemus de ly ‘significare ex instinctu naturae’ secundum definitionem statim tactam.</text:p>
      <text:h text:style-name="Heading_20_3" text:outline-level="3">Contra divisionem de ly ‘significare naturaliter’ arguitur: <text:span text:style-name="T281">A</text:span>liquis terminus significat naturaliter aliqua et non significat illa <text:span text:style-name="T281">aliquo istorum modorum</text:span></text:h>
      <text:p text:style-name="P277">Igitur antecedens patet quia conceptus omnium hominem significat 'omnes homines' et seipsum, et non aliquo istorum modorum; igitur forte dices quod verum est quod aliquis terminus significat aliqua secundum diversas significationes naturaliter, tamen non significat illa aliquo istorum modorum naturaliter.</text:p>
      <text:p text:style-name="P277">Sed ex hoc non sequitur malitia illius divisiones, sed ad probandum illud oporteret probare aliquid vel aliqua naturaliter, qui non significat aliquo illorum modorum.</text:p>
      <text:p text:style-name="P281">Contra hoc arguitur: Illud contingit de aliquo termino. Igitur capio istam propositionem “‘a’ est ‘b’” cuius ly ‘a’ et ly ‘b’ sunt in scripto et capiantur secundum significatione eorum naturaliter communes, et ly ‘est’ sit copula mentalis ultimata capta secundum significationem naturaliter propriam. Tunc illa propositio significat naturaliter “‘a’ esse ‘b’” secundum unam significationem, et non aliquo modo illorum.</text:p>
      <text:p text:style-name="P281"><text:soft-page-break/>Si forte dicas quod praesupponitur falsum in argumento, ut puta quod illud verbum est mentale, possit unire secundum suam significationem naturaliter propriam alios terminos quam mentales ultimatos.</text:p>
      <text:p text:style-name="P281">Tunc faciam argumentum de naturali similitudine distincta istius termini mentalis ultimati ‘homo’, illa enim significat naturaliter 'omnes homines', adeo bene et propter consimilem causam, sicut naturalis similitudo distincta illius terminis ‘homo’, scripti significat 'omnes homines' ad placitum et non significat naturaliter 'omnes homines' aliquo illorum modorum.</text:p>
      <text:h text:style-name="P878" text:outline-level="3"><text:span text:style-name="T282">Ad istud argumentum patet sufficienter solutio </text:span><text:span text:style-name="T283">usque ad ultimam replicam si tenetur illud quod tactum est de ly ‘est’ in quadam solutione</text:span></text:h>
      <text:p text:style-name="P282">Et ad illam replicam potest dici quod significat naturaliter ex instinctu naturae, et breviter pro omnibus his difficultatibus potest dici quod quicumque modus significandi naturaliter, qui non comprehenditur sub ly ‘significare naturaliter proprie’ aut sub ly ‘significare naturaliter communiter’ conprehenditur, comprehenditur sub ly ‘significare naturaliter ex instinctu naturae’ et propterea quantumcumque admitteretur illud quod praesupponit secunda replicat de ly ‘est’ non tamen propterea argumentum procederet, quia diceretur tunc quod illa propositio “‘a’ est ‘b’” significat naturaliter ex instinctu naturae ‘a’ esse ‘b’.</text:p>
      <text:h text:style-name="Heading_20_3" text:outline-level="3">Secundo arguitur: Quilibet terminus significans naturaliter proprie significat naturaliter communiter; ergo membra illius divisionis coincidunt et per consequens illa divisio est insufficiens</text:h>
      <text:p text:style-name="P283">Antecedens <text:span text:style-name="T284">est manifestum. Si forte dicas quod licet illa membra coincidant sic quod conveniant eidem termino, tamen non sic quod conveniant eidem respectu eiusdem significati, et propterea non sequitur malitia illius divisionis.</text:span></text:p>
      <text:p text:style-name="P289">Contra hoc arguitur: Illa membra conveniunt eidem respectu eiusdem significati; igitur antecedens patet quia iste terminus ‘ens’ naturaliter proprie repraesentat se similiter et naturaliter communiter.</text:p>
      <text:p text:style-name="P290">Si forte dicas quod verum est quod idem terminus significat aliquid naturaliter proprie et naturaliter communiter, non tamen secundum eundem modum significandi.</text:p>
      <text:p text:style-name="P284"><text:span text:style-name="T285">Contra hoc arguitur: Aliquis </text:span><text:span text:style-name="T286">terminus significat eandem rem naturaliter proprie et naturaliter communiter secundum eundem modum significandi; igitur antecedens patet. Notia singularis quam habet unus angelus de Sorte potest facere alterum angelum causare similem notitiam de Sorte, quia per hoc quod unus angelus praesentet notitiam illam, alteri /30b/ angelo, ita quod alius intuitive cognoscat illam, alius angelus formabit notitiam de Sorte similem et synonymam, quia hoc modo vel simili debet fieri vocato locutio angelorum, et in tali casu videtur illa notitia concurrere in ratione obiecti ad causandum notitiam Sortis; ergo repraesentabit naturaliter communiter Sortem synonymo modo illi secundum quem significat naturaliter proprie ipsum.</text:span></text:p>
      <text:p text:style-name="P285">Pro solutione argumenti pono propositiones:</text:p>
      <text:p text:style-name="P285">Prima. Aliquis terminus significat naturaliter proprie et naturaliter communiter idem significatum, propositio est nota.</text:p>
      <text:p text:style-name="P285"><text:soft-page-break/>Secunda. Si teneatur quod notitia singularis quam habet unus angelus de Sorte, potest concurrere in ratione obiecti ad hoc, ut alius angelus causet similem et synonymam notitiam cum illa de Sorte. Tunc illa naturaliter communiter repraesentabit Sortem secundum synonymum modum significandi illi, secundum quam significat sortem naturaliter proprie.</text:p>
      <text:p text:style-name="P286">Si a<text:span text:style-name="T287">utem dicatur quod non concurrit in ratione obiecti ad illud, dicatur quod illa potest repra</text:span><text:span text:style-name="T288">e</text:span><text:span text:style-name="T287">sentare </text:span><text:span text:style-name="T289">alteri angelo Sortem eo modo quo ille terminus vocalis ‘homo’ repraesentat 'omnes homines', ut puta instrumentaliter, non tamen omnino eodem modo, quia illa naturaliter et hic terminus ‘homo’ ad placitum </text:span><text:span text:style-name="T290">bene poterit illud sustentari.</text:span></text:p>
      <text:p text:style-name="P291">Et ille modus significandi non erit naturaliter proprius nec naturaliter communis, sed erit modus significandi naturalis ex instinctu naturae, sed quantumcumque dicatur primo modo, non sequitur ex hoc malitia divisionis, quia pro ipsius bonitate satis est cum aliis servandis quamtum ad illud quod tangis de coincidentia quod diversis definitionibus et diversis conceptibus subordinentur.</text:p>
      <text:h text:style-name="Heading_20_3" text:outline-level="3">Tertio arguitur: Aliquis terminus significat naturaliter communiter aliquid, quod non significant naturaliter; ergo divisio mala</text:h>
      <text:p text:style-name="P292">Antecedens patet, iste terminus scriptus ‘homo’ naturaliter communiter repraesentat illum terminum scriptum ‘homo’ et non naturaliter repraesentat ipsum; igitur maior est nota.</text:p>
      <text:p text:style-name="P292">Et minor patet, ille terminus non significat naturaliter illud atramentum ex quo lineatur ille terminus ‘homo’, et illud atramentum est ille terminus ‘homo’; ergo naturaliter significat illum terminum ‘homo’.</text:p>
      <text:p text:style-name="P292">Consequentia tenet cum minori et maior patet, quia ille terminus potest cadere ab illa significatione secundum quam significat illud atramentum; ergo non naturaliter significat illud. Consequentia tenet quia nullus terminus naturaliter significans potest cadere a sua significatione naturali.</text:p>
      <text:p text:style-name="P287"><text:span text:style-name="T291">Antecedens patet quia volo quod ex illo atramento non amplius lineetur ille terminus ‘homo’, sed ex ipso lineetur ille terminus ‘asinus’ vel disponatur taliter sicut prius erat in atramentario. Illo facto ille terminus ‘homo’ </text:span><text:span text:style-name="T292">non amplius significabit illud atramentum; ergo cadet a sua significatione.</text:span></text:p>
      <text:p text:style-name="P288"><text:span text:style-name="T292">Consequentia tenet et antecedens patet, quia si illo facto significet adhuc illud atramentum, sequitur quod ille terminus quemlibet talem terminum scriptum ‘asinus’ naturaliter significat quod videtur falsum, quia </text:span><text:span text:style-name="T293">tunc haec omnia essent concedenda:</text:span></text:p>
      <text:list text:style-name="L13">
        <text:list-item>
          <text:p text:style-name="P922">ly ‘homo’ potest significare asinum absque nova impositione.</text:p>
        </text:list-item>
        <text:list-item>
          <text:p text:style-name="P922">Ly ‘homo’ potest converti cum ly ‘asinus’ absque nova impositione.</text:p>
        </text:list-item>
        <text:list-item>
          <text:p text:style-name="P922">Ly ‘homo’ potest verificari de pronomine demonstrante Brunellum absque nova impositione.</text:p>
        </text:list-item>
        <text:list-item>
          <text:p text:style-name="P922">Ly ‘homo’ in potentia propinqua verificatur de pronomine demonstrante Brunellum.</text:p>
        </text:list-item>
      </text:list>
      <text:p text:style-name="P288"><text:span text:style-name="T293">Quae omnia solent communiter negari ab omnibus. </text:span><text:span text:style-name="T292"><text:s/></text:span><text:span text:style-name="T291"><text:s/></text:span><text:span text:style-name="T290"><text:s/></text:span><text:span text:style-name="T287"><text:s/></text:span></text:p>
      <text:h text:style-name="Heading_20_3" text:outline-level="3"><text:soft-page-break/><text:span text:style-name="T293">Pro difficultate argumenti </text:span><text:span text:style-name="T294">est advertendum quod multis modis potest intelligi quod aliquis terminus ab aliqua significatione naturali cadat vel possit cadere</text:span></text:h>
      <text:p text:style-name="P293">Primo modo: Ad hunc sensum quod talis terminus desinat actualiter significare illo modo vel sit possibile quod desinat actualiter significare illo modo.</text:p>
      <text:p text:style-name="P293">Secundo modo: Ad hunc sensum quod talis terminus desinat significare in potentia propinqua illo modo, vel sit possibile quod desinat in potentia propinqua significare illo modo.</text:p>
      <text:p text:style-name="P293">Tertio modo: Ad hunc sensum quod maneat et desinat significare in potentia propinqua illo modo vel sit possibile quod maneat et desinat significare, et caetera.</text:p>
      <text:p text:style-name="P293">Quarto modo: Ad hunc sentum quod maneat et apprehendatur a tali potentia cui potest significatur illo modo, simili modo sicut apprehenditur ab illa quando significat sibi illo modo, et non significet in potentia propinqua vel sit illud possibile, et caetera.</text:p>
      <text:p text:style-name="P294">Tunc pono propositiones:</text:p>
      <text:list text:style-name="L14">
        <text:list-item>
          <text:p text:style-name="P923">Prima. Stat quod aliquis terminus ab aliqua significatione naturali cadat primo et secundo modis. Hoc patet ubi talis terminus desineret esse.</text:p>
        </text:list-item>
        <text:list-item>
          <text:p text:style-name="P924">Secunda. Stat quod aliquis <text:span text:style-name="T295">terminus ab aliqua /31a/ significatione naturali cadat tertio modo, patet si notitia quam habes de Sorte poneretur in lapide.</text:span></text:p>
        </text:list-item>
        <text:list-item>
          <text:p text:style-name="P925">Tertia. Non est possibile quod liquis terminus ab aliqua significatione naturali cadat. Quarto modo propositio <text:s/>ex se est manifesta.</text:p>
        </text:list-item>
      </text:list>
      <text:p text:style-name="P295">Sed si petas de veritate istius: “aliquis terminus potest cadere a significatione naturali”, potest dici quod ex quo in illa ly ‘significatione naturali’ quodam modo distribuitur, licet posset proportionabiliter concedi ad primos duos sensus, tamen non debet concedi in proportionabili sensu ad tertium vel quartum. De quarto non est quaestio et de tertio patet quia non est possibile quod aliquid sit quin in potentia propinqua significet se naturaliter communiter.</text:p>
      <text:p text:style-name="P296">Et si instes contra secundam propositionem quia notitia quam iste habet de Sorte, per hoc quod ponatur in lapide, non cadit a significatione naturali secundum quam significat Sortem; ergo secunda propositio est falsa. Consequentia tenet quia non posset illa verificari nisi in illo casu, et antecedens patet, quia ipsa existente in lapide et non manente in anima, adhuc potentia propinqua significat Sortem naturaliter proprie; igitur antecedens patet, qua potest significare Sortem naturaliter proprie absque mutationem per quam fiet impositio, et est ergo in potentia propinqua, et caetera.</text:p>
      <text:p text:style-name="P296">Haec replica petis hanc difficultatem, scilicet, qualiter in proposito deberet exponi illa particula in potentia propinqua. Ad quam potest dici quod non debet exponi sicut tactu est, scilicet, sic hoc est nulla mutatione facta per quam de non existens in tali subiecto, et ita debet exponi in similibus propositionibus prout ex multis quae solent in similibus propositis concedi, quae alias non deberent concedi apparere potest.</text:p>
      <text:p text:style-name="P296">Tunc respondeo ad formam argumenti negando antecedens, et ad probationem nego minorem, et ad probationem nego maiorem, et ad probationem dico quod verum est quod potest cadere ab illa significatione naturali.</text:p>
      <text:p text:style-name="P297"><text:soft-page-break/>Dico quod verum est quod potest cadere ab illa significatio<text:span text:style-name="T296">ne naturali primo et secundo modis, non tamen ultimis duobus modis, et propterea non sequitur quod non significet naturaliter illud atramentum. Et ad illud quod tangis dico quod illo facio adhuc ille terminus ‘homo’ significabit illud atramentum naturaliter communiter, saltem in potentia propinqua. Nec habeo pro inconvenienti quod ille terminus ‘quodlibet atramentum’ ex quo potest fieri similis terminus illi termino ‘homo’, significet naturaliter communiter in potentia propinqua mediante conceptu singulari, et ex consequenti quod quemlibet talem terminum ‘asinus’ scriptum significet simili modo.</text:span></text:p>
      <text:p text:style-name="P300">Sed pro illo corollariis quae infers si ille terminus ‘homo’ capiatur secundum significationem naturaliter communem discretam, viso pro quo debeat capi, facile apparet apparet an debeant concedi vel non, verum est tamen quod ille terminus ‘homo’ capitur interdum secundum aliquam significationem naturaliter communem large loquendo de significatione naturaliter communi, secundum quam significat omnia quae possunt esse naturaliter similia illi termino ‘homo’, connotando quod sint similia illi secundum talem significationem, vel lineationem quam tunc habet et si secundum talem capiatur bene potest illa concedi ultimo dempto, nisi in illo caperetur ille terminus ‘homo’ ampliative ad quattuor.</text:p>
      <text:p text:style-name="P298"><text:span text:style-name="T296">Sed si alia corollaria ab </text:span><text:span text:style-name="T297">illo ultimo negentur, hoc erit intelligendum, capiendo illum terminum ‘homo’ discrete pro se ipso aut pro aliquo alio termino simili ipsi. Et si probes quod capiendo illo modo debent concedi quia si ex illo atramento ex quo lineatur ille terminus ‘homo’, linearetur ille terminus ‘asinus’, illo facto, illud atramentum quod iam est ille terminus ‘homo’ verificaretur de pronomine demonstrante asinum, et per illud non fieret impositio de novo; ergo iam omnia illa concedenda sunt de illo atramento; ergo de illo termino ‘homo’.</text:span></text:p>
      <text:p text:style-name="P306">Ad hoc qui sit dicendum apparebit ex dicendis inferius.</text:p>
      <text:p text:style-name="P299"><text:span text:style-name="T297">Quarto arguitur: Contra definitione de ly ‘significare naturaliter communiter’, </text:span><text:span text:style-name="T298">iste terminus ‘homo’ quodlibet ens significat naturaliter communiter, adhuc loquendo stricte de ly ‘significare naturaliter communiter’ et non ponendo ampliationem in ly ‘significat’ ad quinque, et tamen non potest concurrere in ratione obiecti totalis ad causandum et caetera; </text:span><text:span text:style-name="T299">e</text:span><text:span text:style-name="T298">rgo definitio </text:span><text:span text:style-name="T299">mala. Consequentia tenet cum minori et maior patet.</text:span></text:p>
      <text:p text:style-name="P307">Iste terminus ‘homo’ naturaliter communiter significat conceptum omnium entium; ergo per istum terminum ‘homo’ venio in notitiam illius conceptus, et apprehendo illum conceptum.</text:p>
      <text:p text:style-name="P301"><text:span text:style-name="T299">Consequentia tenet /31b/ </text:span><text:span text:style-name="T300">et antecedens patet quia ille conceptus est naturalis similitudo istius termini ‘homo’; ergo naturaliter communiter ly ‘homo’ repraesentat illum conceptum. Tunc, ultra, per illum terminum ‘homo’ apprehendo et concipio illum terminum ens, et apprehenso illo termino ‘ens’ per ipsum cognosco omnia entia et concipio ipsa; ergo per illum terminum ‘homo’ apprehendo concipio omnia entia. </text:span><text:span text:style-name="T298"><text:s/></text:span><text:span text:style-name="T297"><text:s/></text:span><text:span text:style-name="T296"><text:s text:c="2"/></text:span><text:span text:style-name="T301"><text:s text:c="2"/></text:span></text:p>
      <text:p text:style-name="P302">Consequentia tenet per hoc, quia quidquid est causa causae est causa causanti, tunc ultra, per illum terminum ‘homo’ cognosco omnia entia; ergo ille terminus ‘homo’ significat omnia entia et non nisi naturaliter communiter; ergo naturaliter communiter significat omnia entia.</text:p>
      <text:p text:style-name="P302">Forte dices quod ille terminus ‘homo’ non repraesentat conceptum <text:span text:style-name="T302">omnium entium naturaliter communiter, saltem stricte, licet sit naturalis similitudo eius, quia non est naturalis similitudo illius </text:span><text:soft-page-break/><text:span text:style-name="T302">adaequata, ex quod est naturalis similitudo alicuius quod non potest esse naturaliter simile illi termino homo. Unde naturalis similitudo adaequata alicuius dicitur similitudo alicuius quae non non est naturaliter similis alicui non naturaliter simili illi, et loquendo de tali naturali similitudine quodlibet naturaliter simile alicui, potest naturaliter communiter stricte loquendo repraesentare illud, non autem oportet illud loquendo de naturali similitudine inadaequata.</text:span></text:p>
      <text:p text:style-name="P303">Et si probes quod conceptus ominum entium sit naturalis similitudo adaequata illius termini ‘homo’, quia non potest dari aliquid cuius ille conceptus sit naturalis similitudo quin illud sit naturaliter simile illi termino ‘homo’, quia quaecumque quae sunt naturaliter similia uni tertio sunt naturaliter similia inter se. Sed quocumque dato cuius ly ‘ens’ est naturalis similitudo illud et ille terminus ‘homo’ sunt naturaliter similia uni tertio; ergo illud et ille terminus ‘homo’ sunt naturaliter similia inter se.</text:p>
      <text:p text:style-name="P308">Ad hoc diceretur quod non oportet quod quaecumque quae sunt naturaliter similia uni tertio sint naturaliter similia inter se. Si sit talis naturalis similitudo inter illa et illud tertium, et inter aliquod illorum et illud tertium qualis est inter conceptum naturaliter proprie repraesentantem aliquid et illud quod repraesentat.</text:p>
      <text:p text:style-name="P308">Sed haec solutio non expelleret totam argumenti difficultatem, quia saltem sequitur quod iste terminus mentalis ultimatus, conceptus omnia entia significabit naturaliter, et non nisi naturaliter communiter. Et prima pars antecedentis poterit per consimilem processum, sicut fit in argumento, concludi, ex quo ly ‘conceptus’ naturaliter repraesentat conceptum omnium entium, et tunc redibit difficultas argumenti.</text:p>
      <text:p text:style-name="P304">Propterea facto illo argumento de illo termino ‘conceptus’, negandum est quod significet omnia entia naturaliter communiter, procedendo sicut in argumento procedis, et ad probationem, concesso quod significet conceptum omnium entium naturaliter, distinguo antecedes, quod faciat apprehendere illum vel in ratione signi et sic nego, vel in ratione signati et sic concedo. Et cum ultra argueres per illum terminum apprehendo et concipio conceptum omnium entium, et illo apprehenso per ipsum, concipio omnia entia.</text:p>
      <text:p text:style-name="P305">Dico quod verum est si apprehendatur in ratione signi, non tamen oportet si apprehendatur in ratione signati, et propterea concessis maiore et mino<text:span text:style-name="T303">re in sensibus in quibus debent concedi, neganda est consequentia, nec probatio quam tangis sufficit ad probandum illam procedendo illo modo.</text:span></text:p>
      <text:p text:style-name="P314">Dicitur aliquid apprehendi in ratione signi quando apprehenditur taliter a potentia cognitiva vel intellectiva quod facit ipsam cognoscere aliquid vel aliqua vel aliqualiter. Sed dicitur aliquid apprehendi in rationi signati quando habetur aliqua notitia quae actualiter repraesentat ipsum.</text:p>
      <text:h text:style-name="Heading_20_3" text:outline-level="3">Nunc videndum est quid sit significare ad placitum</text:h>
      <text:p text:style-name="P309">Unde significare ad placitum est significare ex impositione voluntaria formaliter vel aequivalenter. Quare dicatur formaliter vel aequivalenter statim apparebit.</text:p>
      <text:p text:style-name="P309">Tribus modis contingit significare ad placitum:</text:p>
      <text:p text:style-name="P309">Primo. Ex impositione directe ad illud facta.</text:p>
      <text:p text:style-name="P309"><text:soft-page-break/>Secundo modo. Ex impositione consecutiva quae consequitur aliam impositionem vel alias impositiones, et hoc modo ly ‘homo’ significat homines pictos, unde non directe fuit impositus ad significandum illos sed consecutive, nam ex eo quod imponebatur ad significandum homines vivos, et homines picti sunt naturales similitudines verorum. /32a/</text:p>
      <text:p text:style-name="P309">Consequitur alia significatio in ipso, scilicet quam significat homines pictos et propterea dicetur significare homines pictos ex impositione consecutiva, et hoc modo etiam significant multi termini complexi ad placitum, quia in talibus ex eo quod partes imponebantur ad significandum illis modis, consequitur una significatio totalis in composito ex illis partibus, iuxta tales significatione illarum partium. Et frequenter talis significatio consurgit ex impositione unius partis tantum, et ex significationibus naturaliter communibus, aliarum partium, sicut patet in hac scripta “ ‘a’ est ‘b’” quia ergo talis terminus significat taliter, et talis significatio provenit ex huiusmodi causis.</text:p>
      <text:p text:style-name="P309">Dicetur talis terminus significare ad placitum non ex impositione formali seu directe ad illum facta, sed ex impositione consecutiva.</text:p>
      <text:p text:style-name="P309">Tertio modo. Potest terminus significare ad placitum ex consuetudine, ut si inter nos ex nimia consecutione, audito illo termino, iam semper formaremus conceptum omnium asinorum. Dato quod nulla fuisset impositio formalis seu directe ad illud facta, ille terminus ‘homo’ significaret hoc modo omnes asinos ad placitum. Propter primum istorum modorum ponitur ly ‘formaliter’ in definitione data, et propter alios duos ly ‘aequivalenter’, et si forte alius modus significandi ad placitum praeter istos <text:s/>occurrat, ad aliquem istorum reduci poterit.</text:p>
      <text:h text:style-name="Heading_20_3" text:outline-level="3">Sed occurrit difficultas quia videtur quod aliquis terminus significat aliquid ad placitum et non aliquo illorum trium modorum proprie aut reductive</text:h>
      <text:p text:style-name="P310">Quia ille terminus <text:span text:style-name="T304">qui significat aliquid ex consuetudine, quando primo repraesentabat illam rem quam ex consuetudine iam significat, significabat ad placitum illam, et non aliquo istorum modorum proprie aut reductive.</text:span></text:p>
      <text:p text:style-name="P315">Pro solutione huius adverte quod ad hoc quod aliquid significet ad placitum aliquo modo stando in communi modo loquendi, oportet quod ipse principaliter moveat potentiam cognitivam ad formandum terminum mentalem, quo mediante debet significare sic, quod seclusis quibuscumque aliis circumstantiis quae non essent necessarie ad hoc ut ille significaret illo modo ex impositione formaliter ad illud facta, adhuc ille terminus in potentia propinqua significat illo modo.</text:p>
      <text:p text:style-name="P315">Ex quo patet quod aliquando audito illo termino ‘homo’ vel viso tali termino in scripto, interdum formaremus conceptum omnium entium, quia interdum tali audito, formaremus istam propositionem “Homo est ens”, non tamen propterea significat omnia entia, quia non se habet modo praedicto et idem contingit quando apprehenso uno termino vel apprehensa una propositione, nonnumquam per discursum formamus aliquas propositiones vel aliquem terminum. Tunc enim non oportet quod significet sicut talis terminus vel sicut huiusmodi propositiones.</text:p>
      <text:p text:style-name="P311"><text:span text:style-name="T305">Praeterea est </text:span><text:span text:style-name="T306">advertendum quod in termino significante ex consuetudine hoc modo provenit significatio. Primo enim ille terminus cum aliquibus circumstantiis quae non essent necessariae ad hoc, ut ille terminus significaret illo modo ex impositione directe ad illud facta, significat illo modo </text:span><text:soft-page-break/><text:span text:style-name="T307">et aliquotiens ita contingit, et postea ille terminus seclusis talibus circumstantiis significat illo modo </text:span><text:span text:style-name="T306">tunc quamprimum seclusis illis significat. Tali modo dicetur ex consuetudine significare.</text:span></text:p>
      <text:p text:style-name="P312"><text:span text:style-name="T306">Tunc ergo dico quod si intelligas illud quod tangis, scilicet, quando ille terminus primo significabit et caetera, sic scilicet quando primo significabit cum talibus circumstantiis, dico quod tunc non significabat ille terminus, licet possit concedi quod tunc cum illis circumstantiis significabat ad hunc sensum quod aggregatum ex illo termino, et illis circumstantiis significabat illo modo quo ille terminus in posterum sign</text:span><text:span text:style-name="T308">i</text:span><text:span text:style-name="T306">ficabit.</text:span></text:p>
      <text:p text:style-name="P316">Ad hoc dicendum est quod secundum exigentiam circumstantiarum quae occurrunt, significabat tale aggregatum unde poterant tales circumstantiae concurrere, quod naturaliter significabat, et poterant tales concurrere quod ad placitum significabat.</text:p>
      <text:p text:style-name="P317">Si autem intelligas illud sic, scilicet quod quando primo significabat seclusis talibus circumstantiis, et sic dico quod ille tunc significabat ex consuetudine, nec ad illud requiritur quod ante significasset seclusis talibus circumstantiis.</text:p>
      <text:p text:style-name="P313"><text:span text:style-name="T309">Sed satis est quod significasset cum talibus circumstantiis /32b/ </text:span><text:span text:style-name="T310">postquam propter illud provenit significatio talis in tali termino. Et si petes quot vicibus debuit ille terminus cum talibus circumstantiis significare ad hoc, ut postea se solo sine illis significabat de hoc, non potest certa regula dari. Interdum aliquot vices </text:span><text:span text:style-name="T311">sufficiunt, et interdum plures illis non sufficiunt.</text:span></text:p>
      <text:p text:style-name="P318">Et si dicas ex his sequitur quod iste terminus ‘homo’ debet significare iam ex consuetudine eodem modo sicut ista propositio “Homo est animal”, quia frequenter cum circumstantiis, scilicet cum significationibus aliarum partium illius propositionis significabat hominem esse animal, ad sensum superius tactum.</text:p>
      <text:p text:style-name="P318">Ad hoc neganda est sequela, et satis est assignare ibi pro discrimine quo in proposito, ex illo non oritur consuetudo, et secus est in aliis casibus. Et si arguas contra dicta, quia videtur sequi ex ipsis quod aliquis terminus significet ad placitum, aliquo modo actualiter et non significat naturaliter illo modo, et tamen non significat mediante eodem termino mentali illo modo, sed hoc videtur impossibile, igitur quod sequatur patet.</text:p>
      <text:p text:style-name="P318">Proferat Sortes istum terminum ‘homo’ ante ita quod audias ipsam, et scivisses impositionem eius, et non sis oblitus, sed iam non aliunde debeas formare conceptum omnium hominum, nisi per auditionem illius vocis. Tunc illa vox ‘homo’ significat tibi 'omnes homines' ad placitum et non naturaliter, et non mediante aliquo conceptu. Quod sic patet quia non formabis conceptum omnium hominum nisi post prolationem illius vocis, quia pro nullo instanti temporis per quod proferetur, erit pars illius termini ‘homo’ prolata, quae sufficiat ad faciendum causare conceptum omnium hominum. Sed illa vox non significat post eius prolationem, quia tunc non est, sed praecise significat quando profertur; ergo quando illa significat tibi non habes conceptum quo mediante significat.</text:p>
      <text:p text:style-name="P319">Forte diceres quod in aliquo instanti temporis pero quod profertur, erit prolata aliqua pars illius vocis, quae erit sufficiens ad faciendum causare conceptum ominum hominum, quia ex quo ultima littera illius termini ‘homo’ successive profertur dabitur aliqua pars eius quae proferetur adaequate, per partem temporis per quod adaequate profertur ille terminus, et illa pars illius temporis non terminabitur ad instans terminativum eius, et pars illius termini ‘homo’ quae in illa parte adaequate <text:soft-page-break/>proferetur cum tota partem iam prolata adeo bene significabit 'omnes homines', sicut ille terminus ‘homo’.</text:p>
      <text:p text:style-name="P320"><text:span text:style-name="T312">Contra hoc posset arguit supponendo quod taliter sit </text:span><text:span text:style-name="T313">impositus ille terminus vocalis ‘homo’ ad significandum 'omnes homines' quod nulla pars significet 'omnes homines', </text:span><text:span text:style-name="T314">t</text:span><text:span text:style-name="T313">unc redibit difficultas.</text:span></text:p>
      <text:p text:style-name="P748">Et si forte facias difficultatem in impositione, poterit aliter argui quia ex illo sequitur quod si aliquis sciat significationes et impositiones istorum duorum terminorum, scilicet ‘animal’ ‘animal’, quandocumque audiret situm terminum ‘animal’ et adverteret ad significationes terminorum qui proferuntur, deberet formare conceptum omnium animarum quod manifeste est falsum.</text:p>
      <text:p text:style-name="P324">Et similiter potest arguit de aliis terminis incomplexis quorum aliquae partes significant proprie et non iuxta significatione illorum terminorum quemadmodum contigit de ly ‘dominus’ et de ly ‘homogeneum’.</text:p>
      <text:p text:style-name="P321"><text:span text:style-name="T315">Si forte dicas propter hoc quod in huiusmodi casibus in nullo instanti intrinseco illius temporis per quod adaequate proferetur ille terminus vocalis, dicetur ipse significaret ex quo in nullo tali instanti habebitur ille conceptus quo mediante debet significare. </text:span><text:span text:style-name="T316">S</text:span><text:span text:style-name="T315">ed in toto illo tempore categorematice per quod adaequate proferetur ille terminus vocalis, dicetur ipse significare ex quo in nullo tali instanti habebitur ille conceptus quo mediante debet significare. Sed in toto illo tempore categorematice, per quod adaequate proferetur dicetur significare, quia in illo erit terminus mentalis quo mediante debet significare. </text:span><text:span text:style-name="T318">E</text:span><text:span text:style-name="T315">sto quod in nullo instanti illius sit, unde potest bene aliquid esse ante aliquod certum instans absque hoc, quo in aliquo certo instante ante illud instans sit, quemadmodum in materia de productione unius angeli immediate post alium dici solet.</text:span></text:p>
      <text:p text:style-name="P322">Sed contra istam solutionem occurrit eadem difficultas, sicut statim fiebat contra aliam.</text:p>
      <text:p text:style-name="P322">Insuper occurrit difficultas quia aliqua pars illius termini, quae pro aliquo instanti intrinseco temporis pero quod adaequate proferretur totus ille terminus, erit prolata secundum se, et quodlibet sui significat. Adeo bene 'omnes homines' sicut ille totus terminus, quo habito videtur quod pro tali instanti pro quo illa pars erit prolata, habeatur ille conceptus, et per consequens solutio nulla.</text:p>
      <text:p text:style-name="P323"><text:span text:style-name="T317">Pro solutione huius difficultatis, adverte quod communiter dici /33a/ </text:span><text:span text:style-name="T318">solet quod si aliquis terminus non mentalis debet actualiter significare, oportet quod significet mediante aliquo conceptu qui actualiter fit quando ille significat, </text:span><text:span text:style-name="T319">et ita dicendo. Nisi dicatur quod numquam vox quando profertur actualiter significat, nisi aliunde </text:span><text:span text:style-name="T321">s</text:span><text:span text:style-name="T319">it formatus conceptus quo mediante debet aliunde significare, quod videtur esse satis contra communem modum loquendi, oportebit incidere in alterum duorum modorum statim tactorum. Et si primum velis defendere, difficile esset admittere illum casum quem ponis. </text:span><text:span text:style-name="T320">Et ad aliquod quod tangis, videtur esse concedendum illud quod praetendis.</text:span></text:p>
      <text:p text:style-name="P325">Si autem velles tenere alium modum dicendi, facile esse solvere primum <text:span text:style-name="T322">quod tangis contra ipsum. Sed pro secundo diceretur quod ille modus dicendi procedit de termino <text:s/>vocali, cuius nulla pars significat eodem modo sicut ipse. Si autem aliqua pars significet eodem modo sicut ipse posset haberi recursus ad primum modum dicendi, et propterea etiam dicendo primo modo ubi aliquis talis terminus significaret aliquo modo, et nulla pars eius significaret taliter, habendus esset recursus ad istum secundum modum dicendi.</text:span></text:p>
      <text:p text:style-name="P330">Sed his non obstantibus, tangam alium modum dicendi, pro quo est advertendum quod ex quo repraesentare est facere cognoscere et caetera, sicut superius tangebatur, et propter ampliationem <text:soft-page-break/>quam facit ly ‘facio’ in termino supra quem actus illius verbi denotatur ferri, concedenda est illa copulativa in casu Sortes facit hanc domum, et haec domus non est, ita etiam poterimus concedere istam copulativam.</text:p>
      <text:p text:style-name="P330">Iste terminus facit cognoscere mediante ‘a’ conceptu et tamen ‘a’ conceptus non est, et ex consequenti poterit concedi in casu quod aliquis terminus actualiter repraesentat, et ex consequenti significat mediante conceptu qui non est, et hoc contingeret in similibus casibus illi qui tangitur in hac difficultate nec oportet istam consequentiam valere.</text:p>
      <text:p text:style-name="P326">Iste terminus actualiter repraesentat vel significat tibi mediante aliquo conceptu; ergo actualiter cognoscis mediante aliquo conceptu, sed solum sequitur ex illo quod actualiter movet potentiam cognitivam tuam ad cognoscendum mediante tali conceptu. Hoc supposito facile apparet solutio ad illam difficultatem, unde dicendum est quod in illo casu ille terminus ‘homo’ repraesentat actualiter esto quod non habetur conceptus mediante quo debet repraesentare prout ex processu apparet.</text:p>
      <text:p text:style-name="P327">Et si dicas sequitur, ergo quod si audiam aliquam vocem et non formem conceptum illius vocis nisi per unam horam, post formem illum conceptum. Tunc quando illam vocem repraesentaret actualiter mihi, ad hoc potest dici quod non oportet illud, quia quando audita voce per magnum tempus post, formamus conceptum eius, tunc oportet quod aliquid aliud praeter illam vocem moveat potentiam cognitivam. Unde dicitur aliquid movere potentiam cognitivam ad cognoscendum mediante aliquo conceptu, aut facere cognoscere mediante aliquo conceptu, aut repraesentare vel significare mediante aliquo conceptu, ex eo quia illud est in aliquo tempore adaequate, vel in aliquo instanti. Et in illo tempore vel instanti terminativo eius cognoscit actualiter mediante tali vel in tali instanti incipit cognoscere mediante tali.</text:p>
      <text:p text:style-name="P328">Contra definitionem de ly ‘significare ad placitum’ arguitur sic: aliquis terminus significat ad placitum et nullus significat ex impositione; igitur minor patet, nullus terminus potuit impo<text:span text:style-name="T323">n</text:span>i; igitur <text:span text:style-name="T324">antecedens patet quia si aliquis potuisset imponi ad significandum, maxime potuisset imponi a primo impositore, sed hoc non; igitur minor patet quia si primus impositor potuisset imponere aliquem terminum maxime ad significandum alicui alteri a se, sed hoc non; igitur consequentia tenet.</text:span></text:p>
      <text:p text:style-name="P329"><text:span text:style-name="T324">Cum maiori et minor patet, </text:span><text:span text:style-name="T325">quia dato illius opposito, ponamus ergo quod primus impositorum imposuisset istum terminum ‘homo’ ad significandum alteri a se. Tunc sic primus impositor imposuit aliquem terminum ad significandum alteri a se, et non dabatur processus in infinitum; ergo <text:s/>aliquando primo imposuit ad significandum alicui alteri a se, sed hoc est falsum; igitur consequentia tenet cum omnibus partibus antecedentis.</text:span></text:p>
      <text:p text:style-name="P331"><text:span text:style-name="T326">D</text:span><text:span text:style-name="T325">empta ultima quae sic probatur, quia dato illius opposito sit it quod</text:span><text:span text:style-name="T324"> </text:span><text:span text:style-name="T325">primus imposuisset istum terminum ‘homo’ ad significandum Platoni, sic quod numquam ante /33b/ </text:span><text:span text:style-name="T326">imposuisset aliquem terminum ad significandum alicui alteri a se, hoc habito vel ergo primus impositor imposuit istum terminum ‘</text:span><text:span text:style-name="T327">homo’ ad significandum Platoni, mediante se solo. Puta semel aut pluries proferendo ipsum aut mediantibus aliis vocibus, nullum istorum potest dici; igitur consequentia tenet a sufficienti divisione, et maior patet quia per hoc quod multotiens protulisset istum terminum ‘homo’, non potuisset Plato percipere qualiter volebat, quod significaret secunda pars antecedentis, patet quia non potui</text:span><text:span text:style-name="T328">s</text:span><text:span text:style-name="T327">set imponere mediantibus aliis </text:span><text:span text:style-name="T329">vocibus nisi Plato cognovisset secundum quas significationes primus impositor capiebat illas voces. Et cum cum non potuisset, per tales voces </text:span><text:soft-page-break/><text:span text:style-name="T329">captas secundum suas significationes naturales, illum terminum ad significandum, Platoni oportuit quod cum per illas imposuit, cepisset illas secundum significationes ad placitum, et per consequens oportuisset quod Plato cognovisset quid ille significabant ad placitum, antequam per illas fuisset impositis ille terminus ‘homo’, sed non potuisset aliunde illa cognoscere quam per impositionem factam sibi a primo impositore de illis vocibus; ergo prius fuissent illae voces impositae ad significandum </text:span><text:span text:style-name="T330">ipsi</text:span><text:span text:style-name="T329"> a primo impositore, quod repugnat hypothesi.</text:span></text:p>
      <text:h text:style-name="Heading_20_3" text:outline-level="3"><text:span text:style-name="T331">Hoc argumentum petit similem difficultatem huic, scilicet, posito quod sunt duo quorum unus sit Graecus et alter Latinus et nullus illorum intellegat penitus aliquod verbum de idiomate alterius. An poterit unus illorum </text:span><text:span text:style-name="T332">tunc</text:span><text:span text:style-name="T331"> alteri </text:span><text:span text:style-name="T3">ostendere</text:span><text:span text:style-name="T331"> suum idioma et si sic, quomodo poterit prius </text:span><text:span text:style-name="T3">ostendere</text:span><text:span text:style-name="T331"> </text:span><text:span text:style-name="T332">significationem alicuius termini ipsi in idiomate suo dato</text:span></text:h>
      <text:p text:style-name="P332"><text:span text:style-name="T332">Igitur </text:span><text:span text:style-name="T333">quod primus impositor imposuerit illum terminum ‘homo’ ad significandum Platoni, ita quod nullum prius imposuisset ad significandum Platoni vel alicui alteri cum arguis; vel ergo imposuit mediante se solo vel mediantibus aliis vocibus.</text:span></text:p>
      <text:p text:style-name="P334">Dico quod nec hoc nec illud nec illa est sufficiens divisio, et si petas qualis ergo imposuit, hoc est mihi dubium.</text:p>
      <text:p text:style-name="P334">Dico tamen quod potuit sic imponere, ut putat, proferendo saepe illum terminum ‘homo’ et continuo quandocumque protulisset, demonstrando unum hominem, quia per haec potuisset percipere Plato, quod primus impositor volebat imponere illum terminum ‘homo’ ad significandum 'omnes homines', et per hoc patet solutio ad illud quod tangis de illis duobus, quorum unus est Graecus et alter Latinus.</text:p>
      <text:p text:style-name="P334">Posset ibi replicari de verbis et aliis terminis syncategorematicis connotativus, et de terminis significatibus res incorporales qualiter potuisset imponere primus impositor tales terminos ad significandum, sed de his non est amplius pro nunc curandum.</text:p>
      <text:h text:style-name="Heading_20_3" text:outline-level="3">Secundo arguitur: Iste terminus vocalis ‘homo’ significat 'omnes homines' ad placitum, et non ex impositione</text:h>
      <text:p text:style-name="P333">Igitur minor patet, quia ille non imponitur, nec fuit impositus ad significandum 'omnes homines'; igitur prima pars antecedentis est manifesta, et secunda patet ille non fuit; ergo ille non fuit impositus et caetera.</text:p>
      <text:p text:style-name="P335"><text:span text:style-name="T335">Dices forte ad hoc negando istam ultimam consequentiam, et ratio est nam stat bene quod aliquis </text:span><text:span text:style-name="T334">terminus qui non est imponatur ad significandum quemadmodum si ego haberem auctoritatem imponendi, et dicerem volo quod ille terminus ‘homo’ quem tu proferes cras significabit omnes asinos, tunc per hoc ille imponeretur et tamen non est. </text:span><text:span text:style-name="T336">Dico igitur quod ille terminus ‘homo’ <text:s/>fuit impositus esto quod non fuerit.</text:span></text:p>
      <text:p text:style-name="P336">Et si petas quando dico quod quando primo fuit impositus aliquis terminus vocalis sibi similis, quia regulariter procedendo quando aliquis imponit aliquem terminum vocalem ad significandum aliquo modo, ipse imponit omnes terminos vocales similes in posterum proferendos ad significandum <text:soft-page-break/>eodem modo, et simile contingit de termino scripto. Dixi regulariter quia non oportet de necessitate illud habere verum.</text:p>
      <text:p text:style-name="P337"><text:span text:style-name="T337">Contra hoc arguitur: Sequitur tunc quod ille terminus qui imposuit illum terminum vocalem ‘homo’, imposuit omnes terminos similes illi in posterum proferendos, sed hoc est falsum; igitur quod sequatur patet ex solutione falsitas consequentis probatur, quia ex ipso sequitur quod aliquis terminus similiter semel significabit aliquid in potentia propinqua et non significabit illud in potentia propinqua, et non significabit illud in potentia propinqua quod implict contra dictionem. </text:span><text:span text:style-name="T338">Quod sequatur patet ex solutione.</text:span></text:p>
      <text:p text:style-name="P341">Falsitas consequentis probatur quia ex ipso sequitur quod aliquis terminus simul et semel significabit aliquid in potentia propinqua, et non significabit illud in potentia propinqua, quod implicat contradictionem.</text:p>
      <text:p text:style-name="P338"><text:span text:style-name="T338">Quod sequatur patet: Sit unus qui habeat tantam auctoritatem deponendi terminos a suis significationibus, sicut ille qui imposuit, habuit in imponendo, et deponat istum terminum /34a/ </text:span><text:span text:style-name="T339">homo et omnes ei similes in posterum proferendos, ita quod nullus talis debeat amplius in potentia propinqua significare homines. Tunc sic ille terminus ‘homo’ quem tu proferes cras, tunc significabit me in potentia propinqua et non significabit tunc me in potentia propinqua; igitur secunda pars antecedentis patet ex casu.</text:span></text:p>
      <text:p text:style-name="P339"><text:span text:style-name="T339">Prima probatur: Ille terminus fuit impositus ad significandum me, et non deponitur nec deponebatur </text:span><text:span text:style-name="T340">nec deponeretur a tali significatione, et erit tunc; ergo tunc significabit me in potentia propinqua. Consequentia tenet cum omnibus partibus antecedentis dempta.</text:span></text:p>
      <text:p text:style-name="P342">Secunda quae sic patet: Quia dato eius opposito vel deponitur ab illa significatione quam habet, habuit vel habebit &lt;...&gt; vel ab illa quam non habet habuit vel habebit, non primum prout patet ex casu, nec secundum.</text:p>
      <text:p text:style-name="P342">Tum primo quia omnis depositio alicuius significationis alicuius termini praesupponit talem significationem in tali termino, et non potest praesupponere talem significationem in tali termino, et non potest praesupponere in tali termino significationem quae non est, nec erit, nec fuit in illo; ergo praesupponet illam quae est, vel erit, vel fuit in illo, et per consequens non poterit aliquid deponi a significatione quam non habet, nec habuit, nec habebit.</text:p>
      <text:p text:style-name="P340">Tum secundo, si sit possibile quod aliquis terminus deponatur a significatione quam non habet, nec habuit, nec habebit sequeretur quod ly ‘buf’ posset deponi <text:s/>a qualibet significatione, non facta impositione.</text:p>
      <text:p text:style-name="P343">Si forte dicas quod in illo casu ille <text:span text:style-name="T341">terminus quem tu proferes cras non imponebatur ad significandum 'omnes homines' et caetera, quia ille solum imponebat terminos similes illi in posterum proferendos, qui non debebant in posterum deponi, haec solutio est ridiculosa, quia si tu dicas quod ille terminus ‘homo’ quem tu proferes cras, non deponatur ab isto, ex solutione tua sequatur quod imponebatur. Et si dicas quod deponitur ab isto, sequitur quod fuit impositus, quia depositio praesupponit impositionem.</text:span></text:p>
      <text:h text:style-name="Heading_20_3" text:outline-level="3"><text:soft-page-break/>Aliter ergo dicendum est, unde dato tali casu, dico quod ille deponitur a significatione quam non habet, nec habuit, nec habebit, et ad primam reprobationem consessa, maiore nego</text:h>
      <text:p text:style-name="P344">Minorem immo dico quod satis est quod talis depositio praesupponat significationem quam deberet habere talis terminus aliquando, nisi ante illud fieret depositio, quemadmodum prohibetur aliquod malum, quod non est, nec erit, nec fuit sed foret. Nisi fieret prohibitio, et per hoc patet solutio alterius probationis ad quam nego sequelam.</text:p>
      <text:p text:style-name="P344">Et ratio est quia nisi fieret impositio in ly ‘buf’ non habebit aliquam significationem esto quod non fiebat, aut fiat, aut fiet depositio in ipso. Ex quibus patet quod in hac propositione “Iste terminus deponitur ab ista significatione”, ly ‘iste terminus’ ampliatur ad duas differentias temporum, scilicet, praesentem et futuram, et ly ‘ista significatione’ ad quattuor differentias temporum, et consimiliter ampliatur illi termini ibi ‘iste’ deponit istum terminum ab ista significatione.</text:p>
      <text:h text:style-name="Heading_20_3" text:outline-level="3">Tertio: <text:span text:style-name="T342">Arguitur nullus terminus potest imponi ad significandum aliquid; ergo definitio praesupponit falsum</text:span></text:h>
      <text:p text:style-name="P351">Antecedens patet, quia si aliquis posset imponi ad significandum aliquid, qua ratione posset imponi ad significandum quodcumque ens, et per consequens posset imponi ad significandum se, sed hoc est falsum, igitur.</text:p>
      <text:p text:style-name="P345">Falsitas consequentis probatur, quia dato illo, ponatur ergo quod ille terminus ‘homo’ imponatur ad significandum se discrete. Tunc patet illud esse falsum, quia per illud, ille terminus non significabit aliquid quod prius non significabat; ergo non imponitur ad significandum aliquid.</text:p>
      <text:h text:style-name="Heading_20_3" text:outline-level="3">Et confirmatur ratio ly ‘homo’ significat ex impositione 'omnes homines' apud Graecos et non ad placitum</text:h>
      <text:p text:style-name="P346"><text:span text:style-name="T343">Igitur consequentia tenet cum minori, et maior patet, quia </text:span><text:span text:style-name="T344">quando ly ‘homo’ imponebatur ad significandum 'omnes homines', imponebatur tam pro Graecis, quam pro Latinis, quam pro aliis, et non deponitur, nec deponebatur apud Graecos; ergo significat ex impositione apud ipsos.</text:span></text:p>
      <text:p text:style-name="P347"><text:span text:style-name="T345">Consequentia tenet cum minori, et maior patet quia in aliquo casu, non faciendo novam impositionem, in ipso significabat 'omnes homines' ad placitum apud omnes Graecos, et hoc non esset nisi illa maior verificaretur; igitur </text:span><text:span text:style-name="T346">consequentia tenet cum minori, et maior patet.</text:span></text:p>
      <text:p text:style-name="P352">Volo quod cras centum Graeci addiscent idioma Latinum, et post cras, alii centum, et ita deinceps, donec omnes sciant.</text:p>
      <text:p text:style-name="P348"><text:span text:style-name="T347">I</text:span><text:span text:style-name="T346">llo facto ly ‘homo’ /34b/ </text:span><text:span text:style-name="T347">significabit 'omnes homines' omnibus Graecis, et per hoc non fiet nova impositio, quia alias sequeretur quod quicumque qui doceret aliquem in aliquo idiomate faceret impositione, et ex consequenti, quilibet haberet auctoritatem imponendi, et etiam parvulis fierent novae impositiones quando ostenduntur eis idiomata materna, quae omnia videntur falsa, igitur.</text:span></text:p>
      <text:h text:style-name="Heading_20_3" text:outline-level="3">Ad hoc arguentum respondetur</text:h>
      <text:p text:style-name="P349"><text:span text:style-name="T348">Concedo quo quilibet terminus potest imponi ad significandum sed, et ad illud quod tangis, dato illo casus, et concesso quod ille terminus ‘homo’ per illud non significabit aliquid quod prius non </text:span><text:soft-page-break/><text:span text:style-name="T348">significabant, </text:span><text:span text:style-name="T349">nego quod propterea non imponebatur ad significandum aliquid. Unde ad hoc aliquis terminus imponatur ad significandum aliquid, satis est quod per talem impositionem significet aliquid quod </text:span><text:span text:style-name="T350">prius non significabat in potentia propinqua, vel aliquo modo quo prius non significabat in potentia propinqua, vel alicui aliquo modo cui prius non significabat illo modo in potentia propinqua.</text:span></text:p>
      <text:p text:style-name="P749">Et proportionabiliter, ad hoc quod aliquis terminus imponatur ad significandum aliqualiter, satis est quod per talem impositionem debeat significare aliqualiter, qualiter prius non significabat in potentia propinqua, vel aliqualiter aliquo modo quo prius non significabat in potentia propinqua, vel aliqualiter alicui aliquo modo cui prius non significabat aliqualiter illo modo in potentia propinqua, et propterea, non obstante quod quaelibet res significet se esse, potest tamen quaelibet imponi ad significandum se esse, et consimiliter, potest etiam dici de depositione.</text:p>
      <text:p text:style-name="P350"><text:span text:style-name="T351">Modo dico quod in illo casu, per illam impositionem, ille terminus significabat aliquo modo se quo prius non significabat se in potentia propinqua, </text:span><text:span text:style-name="T352">ut puta, ad placitum proprie, et propterea ille terminus tunc imponitur ad significandum se, et propter consimilem causam, facta illa impositione poterit ab aliqua significatione deponi, secundum quam significat se.</text:span></text:p>
      <text:h text:style-name="Heading_20_3" text:outline-level="3">Hic tamen occurrit difficultas. Si Sortes habeat tantam auctoritatem imponendi sicut ille qui imposuit istum terminum ‘homo’ ad significandum 'omnes homines' habuit</text:h>
      <text:p text:style-name="P353">Si iam diceret volo quod ly ‘homo’ significet 'omnes homines' absolute, an per illud imponeret illum terminum ‘homo’ ad significandum 'omnes homines' ratio dubitationis est; quia si deponeretur impositio <text:span text:style-name="T353">facta ab alio, adhuc videretur significare per istam impositionem.</text:span></text:p>
      <text:p text:style-name="P357">Ad hanc dubitationem posset bene sustentari quod imponit, et diceretur quod ideo est quia facti quod significet virtute alicuius impositionis 'omnes homines', virtute cuius prius non significabat, et hoc sufficit ad hoc quod imponatur per illud ad significandum 'omnes homines'.</text:p>
      <text:p text:style-name="P358">Posset etiam dici quod per illud non imponit, nisi Sorte esset aliquis qui ignoraret impositionem factam ab alio qui per hoc comprehenderet in posterum ‘omnes homines’, et ad illud quod tangis, ut puta, si deponeretur impositio alterius quod adhuc significaret per istam impositionem, hoc negandum est, quia non facit istae impositionem.</text:p>
      <text:h text:style-name="Heading_20_3" text:outline-level="3">Ad confirmationem <text:span text:style-name="T363">r</text:span><text:span text:style-name="T354">espondetur negando maiorem, </text:span><text:span text:style-name="T355">pro cuius solutione potest duobus modis dici</text:span></text:h>
      <text:p text:style-name="P355"><text:span text:style-name="T355">Primo concedendo quod tunc imponebatur tam pro Graecis quam pro Latinis et aliis, et ratio huius esset illa quae tacta est in argumento. </text:span><text:span text:style-name="T356">E</text:span><text:span text:style-name="T355">t tunc concedendum est quod non deponitur nec deponebatur, et neganda est consequentia in qua ex illis infers quod significat ‘omnes homines’ apud omnes Graecos ex impositione quantumcumque intelligas adhuc in potentia propinqua. Unde non sufficiunt illa ad veritate illius consequentis, sed oportet cum hoc quod illis fuisset notificata illa impositio, et illa notificatio impositionis variat potentiam propinquam, ita quod illa particula in potentia propinqua in hac propositione </text:span><text:span text:style-name="T356">et similibus “Iste terminus ‘homo’ significat in potentia propinqua ‘omnes homines’”.</text:span></text:p>
      <text:p text:style-name="P359"><text:soft-page-break/>Platoni sic debet exponi, hoc est, potest significare nulla mutatione facta per quam fiat nova impositio Platoni, vel notificatio alicuius impositionis quae non erat ipsi nota.</text:p>
      <text:p text:style-name="P359">Si velles etiam dicere quod per notificationem impositionis, ille qui notificat illam impositionem aliquo modo imponit. Etiam posset sustentari sicut statim apparebit.</text:p>
      <text:p text:style-name="P354"><text:span text:style-name="T356">Aliter posset dici negando quod ille terminus tunc imponebatur pro Graecis, et ad illum casum quam tangis dicendum est quod per hoc quod illi ad</text:span><text:span text:style-name="T357">d</text:span><text:span text:style-name="T356">iscunt idioma Latinum /35a/ </text:span><text:span text:style-name="T358">fiunt eis impositiones aliquo modo, ut puta secundarie, praesupposita tamen alia impositione, et quilibet habet auctoritatem imponendi ista impositione secundaria. Immo quilibet ha</text:span><text:span text:style-name="T360">b</text:span><text:span text:style-name="T358">et auctoritatem imponendi sibi ipsi impositionem primaria, et impositio secundaria tolleret potentiam propinquam. Ita quod in, effectu, quando </text:span><text:span text:style-name="T359">fit aliquam impositio, solum fit illis qui tunc sciverunt illam impositionem fieri et postea ipsi, </text:span><text:span text:style-name="T360">virtute illius impositionis poterunt facere impositiones secundarias, praesupposita illa. Ex quo patet quod nullus terminus fuit pro nobis impositus ad significandum a primo impositore, licet possit bene concedi quod multi termini significant, virtute impositionum quae fiebat a primo impositore, </text:span><text:span text:style-name="T361">ex quo illae impositiones quae fiebant pro nobis praesupponebant impositiones primi impositoris.</text:span></text:p>
      <text:p text:style-name="P360">Qualitercumque igitur velis de his modis dicere, facillima est solutio argumenti.</text:p>
      <text:h text:style-name="Heading_20_3" text:outline-level="3">Quarto arguitur: Iste terminus vocalis ‘homo’ qu<text:span text:style-name="T364">e</text:span>m profert Sortes et audit Plato, significat ex impositione voluntaria, tamen non significat ad placitum</text:h>
      <text:p text:style-name="P356"><text:span text:style-name="T362">Igitur, consequentia tenet cum maiori, et minor probatur quia da</text:span><text:span text:style-name="T365">to eius opposito vel significat ad placitum audiens vel ad placitum proferentis. Nullum istorum, igitur; consequentia tenet et maior patet quia non videtur ad placitum cuius alterius debeat significare, et minor probatur quia non significat ex impositione voluntaria alicuius illorum formaliter vel aequivalenter, ut suppono.</text:span></text:p>
      <text:h text:style-name="P879" text:outline-level="3">Ad argumentum respondetur negando minorem, et ad probationem neganda est maior<text:span text:style-name="T355"> <text:s/></text:span><text:span text:style-name="T366"><text:s/></text:span></text:h>
      <text:p text:style-name="P361"><text:s/><text:span text:style-name="T367">Verum est tamen quod ubi unus illorum imposuisset illum terminum ad significandum alteri, tunc significaret ad placitum unius illorum, et ad probationem illius maioris dico quod significat ad placitum illius qui imposuit illum.</text:span></text:p>
      <text:p text:style-name="P362">Et si dicas ille non est; ergo non significat ad placitum illius.</text:p>
      <text:p text:style-name="P362">Ad hoc nego consequentiam, unde ly ‘illius’ ampliatur illic ad supponendum pro eo quod est vel fuit.</text:p>
      <text:p text:style-name="P362">Et si iterum dicas: “Si audiens non vellet non significaret ei in tali casu”; ergo iam significat ad placitum illius.</text:p>
      <text:p text:style-name="P362">Ad hoc nego consequentiam loquendo de ly ‘significare ad placitum’ alicuius sicut in proposito. Si tamen capis alio modo forte concedenda esset consequentia cum consequente. Immo, non inconveniret concedere simile de termino mentali respectu significati quod significat naturaliter proprie. </text:p>
      <text:p text:style-name="P363"/>
      <text:h text:style-name="P870" text:outline-level="2">De divisione termini in mentalem, vocalem, scriptum et mixtum</text:h>
      <text:p text:style-name="P364">Consequenter videndae sunt divisiones de ly ‘terminus’ qui sic dividitur.</text:p>
      <text:p text:style-name="P364">Terminorum alius mentalis, alius vocalis, alius scriptus et alius mixtus. Circa quam divisionem adverte primo quod si pro diviso ipsius caperetur terminus large, divisio non esset sufficiens, quia unus angelus potest esse terminus large, similiter et sapor et odor et ramus pendens ante tabernam.</text:p>
      <text:p text:style-name="P365">Tamen nullum membrorum dividentium convenit alicui illorum, ideo ad dandum divisionem sufficientem oportet addere <text:span text:style-name="T368">praeter illa quattuor membra, unum aliud sub quo comprehendantur omnia quae sub ly ‘terminus’ capiendo large continentur, et non sub aliquo illorum membrorum.</text:span></text:p>
      <text:p text:style-name="P366"><text:span text:style-name="T368">Si tamen </text:span><text:span text:style-name="T369">caperetur ly ‘terminus’, sicut capiatur in capitulo de termino divisio esset sufficiens, quia non posset dari aliquis terminus secundum illam acceptionem de ly ‘terminus’ quin ille esset mentalis, vel vocalis, vel scriptus, vel mixtus. Et pariforma divisio esset sufficiens si ly ‘terminus’ caperetur stricte.</text:span></text:p>
      <text:p text:style-name="P372">Si autem aliquo alio modo caperetur, facile esse videre an divisio esset sufficiens vel non, et quantumcumque non esse sufficiens non esset valde magna cura, quia esset addendum aliud membrum.</text:p>
      <text:p text:style-name="P372">Dico igitur resolutorie quod tenendo illam divisionem esse sufficientem, potest indifferenter dici quod divisum est ly ‘terminus’, capiendo sicut capiebatur in capitulo de termino, et potest etiam teneri quod est ly’ terminus’, stricte capiendo. Neque ex hoc potest deduci aliquod inconveniens, ex quo in quodlibet membro illius divisionis, subintelligitur ly ‘terminus’ capiendo ipsum eodem modo sicut capitur divisum. /35b/ Ex quibus patet quod sive divisum capiatur sicut in primo capitulo terminorum, sive capiatur stricte quemadmodum ramus pendens ante tabernam, non continetur sub divisio ita, nec sub aliquo membrorum dividentium. Et idem dico si iste lapis imponatur ad significandum ‘omnes homines’, sicut ly ‘homo’ et ita de similibus.</text:p>
      <text:p text:style-name="P373">Et si fiat argumentum de notitia sensitiva quae videtur esse terminus proprie, et non continetur sub aliquo membrorum dividentium.</text:p>
      <text:p text:style-name="P367"><text:span text:style-name="T370">Ad hoc dicendum est quod si teneatur quod universaliter talis notitia subiectatur in anima sensitiva, bene poterit dici terminus mentalis, immo adhuc proprie, quia quanvis in potentia sensitiva non poneretur </text:span><text:span text:style-name="T371">propositiones, </text:span><text:span text:style-name="T372">tamen talis notitia sensitiva bene posset poni in propositione mixta.</text:span></text:p>
      <text:p text:style-name="P374">Si enim subiectatur in composito ex organo et anima, non erit terminus mentalis, nec vocalis, nec scriptus, nec mixtus, et ex consequenti non poterit poni in propositione consueta nec erit terminus, capiendo ly ‘terminus’ prout capitur pro diviso.</text:p>
      <text:h text:style-name="Heading_20_3" text:outline-level="3">Terminus mentalis sic solet definiri: “Est conceptus seu passio animae naturaliter proprie significans aliquid, vel aliqua, vel aliqualiter”</text:h>
      <text:p text:style-name="P368"><text:span text:style-name="T373">Contra quam definitionem posset fieri argu</text:span><text:span text:style-name="T374">mentum, maxime si divisum huius divisionis capiatur stricte, quia vel in ipsa proceditur capiendo ly ‘significare’ naturaliter in toto suo ambitu vel capitur in ipsa loco de ly ‘significare’ naturaliter proprie.</text:span></text:p>
      <text:p text:style-name="P378"><text:soft-page-break/>Si primum sequitur quod habitus existens in anima est terminus proprie, quod est falsum.</text:p>
      <text:p text:style-name="P369"><text:span text:style-name="T375">Si autem des secundum, sequitur quod ista propositio “Omnis homo est animal”, non esset terminus mentalis, supposito quod illa pars eius, scilicet “Homo est animal” sit terminus mentalis ultimatus, et ly ‘ominis’ sit terminus mentalis non-ultimatus, ita quod praecise, secundum significationem ad placitum, ly ‘omnis’ distribuat ly ‘homo’, et non secundum significationem naturaliter propriam, sed secundum significationem naturaliter propriam sit naturalis similitudo distincta de ly ‘omnis’. Sed hoc est falsum; igitur falsitas consequentis patet quia cum illa sit terminus proprie et non sit terminus vocalis vel scriptus vel mixtus, </text:span><text:span text:style-name="T376">sequitur quod illa divisio erit insufficiens.</text:span></text:p>
      <text:p text:style-name="P379">Sequela probatur quia illa non significat naturaliter proprie, et eadem difficultas posset fieri supposito quod divisum illius divisionis caperetur, sicut capitur in capitulo de termino maxime, si teneatur quod habitus existens in anima non ponitur in propositione consueta.</text:p>
      <text:p text:style-name="P370"><text:span text:style-name="T377">Item etiam potest arguit qualitercumque capiatur divisum ipsius, quia si procedatur de ly ‘significare naturaliter’, primo modo videtur illa particula, scilicet ‘naturaliter significans’ superfluere, quia si non </text:span><text:span text:style-name="T378">superflueretur poneretur ad differentiam terminorum vocalium vel scriptorum, et hoc non quia illi etiam naturaliter significant procedendo illo modo, et etiam per ly ‘conceptus’ </text:span><text:span text:style-name="T379">seu passio animae secluduntur huiusmodi termini.</text:span></text:p>
      <text:p text:style-name="P371"><text:span text:style-name="T379">Si autem capiatur ly ‘naturaliter significans’ secundo modo, </text:span><text:span text:style-name="T380">tunc procedit argumentum de illa propositione assumpta “Omnis homo est animal”.</text:span></text:p>
      <text:p text:style-name="P380">Propter hoc argumentum oportet dicere quod ly ‘naturaliter significans’ capitur loco de ly ‘naturaliter proprie significans’, et non debet illud intelligi de significatione totali, sed de totali vel partiali indifferenter, et tunc possent bene omnia salvari sive capiatur divisum stricte sive capiatur sicut in capitulo de termino.</text:p>
      <text:h text:style-name="P880" text:outline-level="3">Sed aliter potest definire ille terminus sic: “Terminus mentalis est terminus existens subiective in potentia cognitiva”</text:h>
      <text:p text:style-name="Text_20_body"><text:span text:style-name="T381">C</text:span>apiendo ibi ly ‘terminus’ consimiliter sicut capitur pro divisio.</text:p>
      <text:h text:style-name="Heading_20_3" text:outline-level="3">Ly ‘terminus vocalis sic potest definiri: “Est terminus qui auditu corporali auditur, vel audiri potest per se”</text:h>
      <text:p text:style-name="Text_20_body"><text:span text:style-name="T382">Et ista definitio erit sufficiens sive divisum </text:span><text:span text:style-name="T383">capiatur stricte in illa divisione sive eo modo quo capitur in capitulo de termino. Verum est tamen quod capiendo divisum stricte posset huic definitioni addi hoc totum, scilicet “ad placitum significans aliquid vel aliqua vel aliqualiter”. Sed non est necessaria illa particula.</text:span></text:p>
      <text:p text:style-name="Text_20_body">Dixi in definitione “vel audiri potest de per se”, quia aliquis terminus scriptus bene potest audire de per accidens, sicut campana, ut puta terminus scriptus cupro vel argento.</text:p>
      <text:h text:style-name="P881" text:outline-level="3"><text:soft-page-break/>Ly ‘terminus scriptus’ sic potest definire: “Est terminus qui oculo corporali videtur vel videri potest”</text:h>
      <text:p text:style-name="P375">Et haec definitio erit sufficiens quocumque illorum duorum modorum capiatur divisum, /36a/ nec est necessarium in ipsa addere ly ‘ad placitum significans’ et caetera, licet posset addi capiendo divisum stricte.</text:p>
      <text:p text:style-name="P375">Sed ly ‘terminus mixtus’ sic potest definire: “Est terminus compositus ex termino mentali et termino vocali et termino scripto, vel ex aliquibus istorum, et haec definitio erit sufficiens quocumque illorum modorum capiatur divisum, dummodo ly ‘terminus’ quod capitur loco generis capiatur eodem modo quod etiam in definitionibus datis servari debet.</text:p>
      <text:p text:style-name="P376"><text:span text:style-name="T384">Et si arguas contra hoc, quia capiendo divisum stricte et propor</text:span><text:span text:style-name="T385">tionabiliter capiendo membra dividentia, videtur quod ista definitio termini mixti non sit sufficiens, et pro illo suppono quod ista propositio scripta “‘a’ est ‘b’” est terminus proprie, quanvis ly ‘a’ non sit terminus proprie nec ly ‘b’, quia illa oratio significat ad placitum proprie ratione significationis proprie de ly ‘est’, suppositis significationibus naturaliter communibus de ly ‘a’ et ly ‘b’.</text:span></text:p>
      <text:p text:style-name="P386">Tunc si arguo: Capio ista propositionem “‘a’ est ‘b’” in qua ly ‘a’ et ly ‘b’ capiantur in scripto secundum suas significationes naturaliter communes, et ly ‘est’ sit copula mentalis ultimata, et capiatur secundum suam significationem naturaliter propriam, tunc ista propositio erit terminus proprie, et hoc propter consimilem causam, sicut illa scripta “‘a’ est ‘b’” est terminus proprie et per consequens erit terminus mixtus, et tamen illa definitio non sibi convenit, quia non componitur ex terminis proprie.</text:p>
      <text:p text:style-name="P387">Hoc argumentum praesupponit quod illa copula ‘est’, mentalis ultimata, possit secundum suam significationem naturaliter propriam, unire terminos vocales et scriptos, et si illud negetur, argumentum est nullum.</text:p>
      <text:p text:style-name="P377"><text:span text:style-name="T386">Illum tamen concesso, dicendum est quod in illa definitione quantumcumque ly ‘terminus’ mixtus capiatur prout est membrum illius divisionis, capiendo illud divisum stricte illi termini, scilicet, </text:span><text:span text:style-name="T387">terminus mentalis, terminus vocalis, terminus scriptus, capiuntur prout sunt membra illius divisionis, capiendo illud divisum sicut capitur in capitulo de termino. Ex quo patet quod quemadmodum aliquis est terminus mentalis, stricte loquendo de termino qui non significat naturaliter proprie ita erit aliquis terminus mixtus, loquendo stricte de termino qui non significat ad placitum, sed significat naturaliter.</text:span></text:p>
      <text:p text:style-name="P377"><text:span text:style-name="T388">Primum patet de isto “Omnis homo est animal” cuius illa pars ‘homo est animal’ est mentalis ultimata, et ly ‘omnis’ est terminus mentalis non-ultimatus. Et secundum patet de propositone assumpta. Verum est tamen quod ut in pluribus termini mixti significant </text:span><text:span text:style-name="T389">a</text:span><text:span text:style-name="T388">d placitum.</text:span></text:p>
      <text:h text:style-name="Heading_20_3" text:outline-level="3">Sed circa definitione termini mentalis, est notandum quod communiter solet dici quod terminus mentalis potest poni subiective, in lapide ipso non remanente in mente, et potest etiam poni in lapide ipso remanente in anima</text:h>
      <text:p text:style-name="P381">Si tamen poneretur in lapide et non remaneret in mente, non esset notitia secundum ipsa posita in lapide et remanente in anima.</text:p>
      <text:p text:style-name="P382"><text:soft-page-break/>Istae propositiones <text:span text:style-name="T390">essent concedenda:</text:span></text:p>
      <text:list text:style-name="L15">
        <text:list-item>
          <text:p text:style-name="P926">Prima: Illa qualitas est notitia in anima.</text:p>
        </text:list-item>
        <text:list-item>
          <text:p text:style-name="P926">Secunda: Illa qualitas in lapide est notitia. Patet quia illa est notitia et illa est illa qualitas in lapide; ergo illa qualitas in lapide est notitia.</text:p>
        </text:list-item>
        <text:list-item>
          <text:p text:style-name="P926">Tertia: Illa qualitas non est notitia in lapide.</text:p>
        </text:list-item>
      </text:list>
      <text:p text:style-name="P383">Ex his patet supposito quod ideo aliquid essentialiter et intrinsece dicitur esse tale vel tale, quia ipsum est tale, et non stat ipsum esse quin sit tale quod illa qualitas <text:span text:style-name="T391">non essentialiter et intrinsece est notitia, bene potest concedi quo illa notitia essentialiter et intrinsece est qualitas, capiendo ly ‘qualitas’ taliter quod de quolibet aggregato et de quolibet ente dicitur et non aliter, et propterea licet ista debeat concedi, haec qualitas essentialiter et intrinsece est ens vel entia.</text:span></text:p>
      <text:p text:style-name="P385"><text:span text:style-name="T392">Tamen ista non debet concedi “</text:span><text:span text:style-name="T393">H</text:span><text:span text:style-name="T392">aec qualitas essentialiter et intrinsece est ens”. Haec tamen clarius poterunt </text:span><text:span text:style-name="T394">apparere</text:span><text:span text:style-name="T392"> ex dictis in exponibilibus, in capitulo de ly ‘essentialiter et intrinsece’.</text:span></text:p>
      <text:p text:style-name="P388">Et si arguas contra ista, quia ex his videtur sequi quod terminus mentalis, naturaliter proprie significans, potest cadere a sua significatione, patet si talis terminus ponatur in lapide, ad hoc quid sit dicendum, patet ex dictis superius.</text:p>
      <text:p text:style-name="P384"><text:span text:style-name="T395">Praeterea adverte quod communiter solet dici quod si aliqua qualitas sit notitia, oportet quod sit producta ab obiecto et potentia. Immo nulla illarum earum, si potentia sit creata potest se sola causare talem qualitatem, sed quaelibet partialiter concurrit ad productionem illius, et inde est quod si Deus se solo produceret unam talem qualitatem quae potuit produci ab obiecto, et potentia non esset notitia, et propterea solet concedi demonstrata una tali qualitate /36</text:span><text:span text:style-name="T396">b</text:span><text:span text:style-name="T395">/ </text:span><text:span text:style-name="T397">quod Deus se solo potest producere illam qualitatem, et non potest se solo producere illam notitiam.</text:span></text:p>
      <text:p text:style-name="P389">Sed ibi possunt occurrere plura dubia:</text:p>
      <text:list text:style-name="L68">
        <text:list-item>
          <text:p text:style-name="P1022"><text:span text:style-name="T397">Primum: </text:span><text:span text:style-name="T398">U</text:span><text:span text:style-name="T397">trum </text:span><text:span text:style-name="T398">quandocumque</text:span><text:span text:style-name="T397"> aliqua qualitas quae est notitia, quandocumque in anima sua manet, an ipsa sit notitia? </text:span><text:span text:style-name="T401">E</text:span><text:span text:style-name="T397">t videtur quod non, quia in dormiente manet talis qualitas et non est notitia ex quod non actualiter repraesentat.</text:span></text:p>
        </text:list-item>
        <text:list-item>
          <text:p text:style-name="P927"><text:span text:style-name="T397">Secundum: Quia ex di</text:span><text:span text:style-name="T399">citis sequitur quod si notitiam quam habeo, Deus ponat in lapidem ipsa, non manente in anima mea, quod illo facto illa non erit notitia, et ex consequenti non erit terminus proprie. Sed hoc videtur falsum, quia potest naturaliter proprie repraesentare Sortem in potentia propinqua, ex quod potest repraesentare nulla mutatione facta per quam fiet impositio de novo.</text:span></text:p>
        </text:list-item>
        <text:list-item>
          <text:p text:style-name="P930">Tertium: Utrum si Deus caperet notitiam quam habeo de Sorte, et poneret ipsam in anima tua, ipsa repraesentaret Sortem naturaliter proprie animae tuae?</text:p>
        </text:list-item>
        <text:list-item>
          <text:p text:style-name="P931">Quartum: Utrum <text:span text:style-name="T400">si Deus in productione notitiae suppleret causalitatem potentiae, ita quod mediante obiecto, nulla alia potentia concurrente produceret aliquam qualitatem quae fuisset notitia illius obiecti, si fuisset producta ab alia potentia cognitiva concurrente illo obiecto, et Deus poneret illam qualitatem in illa potentia cognitiva, </text:span><text:span text:style-name="T402">u</text:span><text:span text:style-name="T400">trum illa esset </text:span><text:span text:style-name="T402">notitia in illa</text:span><text:span text:style-name="T400"> potentia cognitiva?</text:span></text:p>
        </text:list-item>
        <text:list-item>
          <text:p text:style-name="P929"><text:soft-page-break/><text:span text:style-name="T400">Quintum: Utrum si corrumperetur notitia quam tu habes de Sorte, et postea Deus se solo reproduceret illam qualitatem et poneret ipsam in anima tua, utrum esset </text:span><text:span text:style-name="T403">tunc notitia? Et videtur ex una parte quod sic, ex quo illa est qualitas quae fuit producta ab obiecto et illa potentia; sed ex altera parte videtur quod non, </text:span><text:span text:style-name="T404">quia quando corrumpitur desinit esse notitia, et postea non incipi esse notitia, ex quo non incipit produci ab obiecto et potentia.</text:span></text:p>
        </text:list-item>
      </text:list>
      <text:list text:style-name="L67">
        <text:list-item>
          <text:p text:style-name="P928"><text:span text:style-name="T404">Ad primum: </text:span><text:span text:style-name="T405">R</text:span><text:span text:style-name="T404">espondeo affirmative, et ad illud quod tangis dico quod licet non actualiter significet, tunc tamen significat in potentia propinqua, quod sufficit.</text:span></text:p>
        </text:list-item>
        <text:list-item>
          <text:p text:style-name="P928"><text:span text:style-name="T404">Ad secundum: </text:span><text:span text:style-name="T405">C</text:span><text:span text:style-name="T404">oncedo illud et nego falsitatem consequentis, et ad probationem dico quod praesupponis falsum, puta quod illa particula in potentia propinqua debeat exponi illo modo, scilicet, nulla mutatione facta per quam fiat impositio de novo. Sed dico ipsam sic debere exponi, hoc est, nulla mutatione facta per quam de non existente in subiecto, cui potest repraesentare, fiat existens in subiecto cui potest repraesentare.</text:span></text:p>
        </text:list-item>
        <text:list-item>
          <text:p text:style-name="P932">Ad tertium: Potest affirmative responderi et etiam negative, et utrumque potest facile defendi.</text:p>
        </text:list-item>
        <text:list-item>
          <text:p text:style-name="P932">Ad quartum: Affirmative posset re<text:span text:style-name="T406">s</text:span>ponderi <text:span text:style-name="T407">et similiter negative.</text:span></text:p>
        </text:list-item>
        <text:list-item>
          <text:p text:style-name="P935">Ad quintum: Etiam posset negative responderi, sed melius est affirmative respondere, quia interdum naturaliter contingit quod aliqua notitia producatur et nihil concurrat, tunc immediate in ratione obiecti, ut puta quando producitur ab habitu.</text:p>
        </text:list-item>
        <text:list-item>
          <text:p text:style-name="P934">Et ad illud quod tangis, negandum est quod non incipiat post esse notitia, et ad probationem dico quod ad illud non requiritur quod incipiat produci ab obiecto et potentia, sed satis est quod incipiat esse ens, et incipiat esse subiective in aliqua potentia, cui naturaliter proprie potest repraesentare, <text:span text:style-name="T408">et quod aliquando fuerit producta ab obiecto et potentia, haec omnia contingerent in illo casu.</text:span></text:p>
        </text:list-item>
      </text:list>
      <text:p text:style-name="P390">Sed circa terminos mixtos est difficultas. An possit esse aliquis terminus incomplexus mixtus ex termino mentali et termino vocali vel scripto?</text:p>
      <text:p text:style-name="P391">Pro ista dubitatione pono propositiones:</text:p>
      <text:list text:style-name="L66">
        <text:list-item>
          <text:p text:style-name="P936">Prima: Datur aliquis incomplexus mixtus ex vocali et scripto.</text:p>
        </text:list-item>
        <text:list-item>
          <text:p text:style-name="P936">Secunda: Non datur aliquis terminus incomplexus ex termino mentali et vocali vel scripto, nec ex meditate unius termini mentalis incomplexi, et mediante unius termini incomplexi et medietate unius termini vocalis vel scripti, efficitur unus terminus incomplexus, quia non videtur habere unam significationem totalem illud aggregatum ex quo illa medietas illius termini mentalis incomplexi significat idem et eodem modo, sicut ille terminus cuius est medietas.</text:p>
        </text:list-item>
        <text:list-item>
          <text:p text:style-name="P933"><text:span text:style-name="T409">Tertia: </text:span><text:span text:style-name="T410">Si teneatur quod aggregatum ex uno termino mentali et uno vocali vel scripto possit imponi ad significandum incomplexe, tunc poterit dari aliquis terminus incomplexus mixtus ex termino mentali et vocali vel scripto, sin autem tunc non poterit talis terminus dari.</text:span></text:p>
        </text:list-item>
      </text:list>
      <text:p text:style-name="P392">/37a/</text:p>
      <text:h text:style-name="P882" text:outline-level="3"><text:soft-page-break/><text:span text:style-name="T411">Possent ibi fieri argumenta contra divisionem istam, probando ipsam insufficiente</text:span><text:span text:style-name="T412">m</text:span></text:h>
      <text:list text:style-name="L65">
        <text:list-item>
          <text:p text:style-name="P937">Tum primo, quia de pronomine demonstrante duos terminos, quorum unus est mentalis et alius vocalis, verificatur divisum, et nullum membrorum dividentium verificatur de illo.</text:p>
        </text:list-item>
        <text:list-item>
          <text:p text:style-name="P937">Tum secundo, quia omnis bona divisio debet esse bimembris et ista est quadrimembris.</text:p>
        </text:list-item>
      </text:list>
      <text:p text:style-name="P393"><text:span text:style-name="T414">Sed ad </text:span><text:span text:style-name="T413">ista</text:span><text:span text:style-name="T414"> similiter et ad </text:span><text:span text:style-name="T413">ea quae contra solutiones istorum possent adduci ex dictis in capitulo de divisione sufficienter patet quid sit dicendum.</text:span></text:p>
      <text:p text:style-name="P407">Posset etiam fieri argumentum ad probandum quod nullum sit divisum illius divisionis, quia vel divisum est terminus mentalis vel vocalis vel scriptus vel mixtus, sed qualiter debeat duci et solvi patet ex primo argumento facto in primo capitulo terminorum.</text:p>
      <text:h text:style-name="Heading_20_3" text:outline-level="3"><text:span text:style-name="T413">Ideo aliter arguitur contra dicta et significanter contra illud quod dictum est, vel quod in definitione termini vocalis, potest addi illa particula ‘a</text:span><text:span text:style-name="T415">d</text:span><text:span text:style-name="T413"> placitum’ significans aliquid vel aliqua vel aliqualiter, capiendo pro diviso illum terminum ‘terminus’ stricte</text:span></text:h>
      <text:p text:style-name="P394">Et arguitur sic: Aliquis est terminus vocalis stricte apud aliquos, et ille non significat illis ad placitum aliquid vel aliqua vel aliqualiter; igitur antecedens patet. Sit Sortes habens auctoritatem imponendi apud Platonem et Ciceronem qui dicat ipsius:</text:p>
      <text:p text:style-name="Quotations">Volo quod qualibet talis littera vocalis ‘a’ significet vobis ‘omnes homines’ eo modo quo ly ‘homo’, et volo quod non aliter debeat significare vobis proprie” quam illo modo ita quod intendat facere id quod verba eius sonant, et nullus alius imponat talem litteram ‘a’ vocalem, ad significandum istos.</text:p>
      <text:p text:style-name="P395">Sed Plato et Cicero decipiantur ita quod credant quod ipse Sortes intendit imponere talem litteram ‘a’ ad significandum omnes asinos, eo modo quod ly ‘asinus’ significat asinos, et propter hoc continuo per talem litteram concipiant omnes asinos.</text:p>
      <text:p text:style-name="P395">Hoc facto, illa littera vocalis ‘a’ est terminus vocalis proprie apud Sortem et Platonem, et tamen non significat eis ad placitum proprie; igitur maior est nota, et minor patet quia si ad placitum proprie significet apud illos maxime significabit ipsis ad placitum proprie omnes asinos. Sed hoc non igitur consequentia tenet cum maiori, et minor patet quia non significat ipsis omnes asinos ex impositione voluntaria; igitur antecedens patet quia si sic significaret ipsis ex impositione voluntaria ipsius Sortis, sed hoc non, quia ipse Sortes nolebat illum terminum imponere ad significandos omnes asino apud ipsos, immo volebat expresse quod non significaret omnes asinos ipsis; ergo non significat apud ipsos omnes asinos ex impositione voluntaria Sortis.</text:p>
      <text:h text:style-name="P883" text:outline-level="3">Ad hoc argumentum respondetur negando quod talis littera vocalis ‘a’ non significat omnes asinos apud istos ex impositione voluntaria, saltem aequivalenter</text:h>
      <text:p text:style-name="P396">Et ad probationem dico quod Sortes imponebat illum terminum apud istos ad significandum omnes asinos, esto quod non intendebat imponere talem terminum ad significandum illis illo modo, sed volebat quod non taliter significaret, quia frequenter aliquis nolens imponit, et ita dicendo oportet <text:soft-page-break/>dicere quod licet non significet ex impositione voluntaria ipsius Sortis, formaliter significat tamen ex impositione voluntaria ipsius aequivalenter, <text:span text:style-name="T416">ita quod in effectu, quamvis ille omnes causae quae concurrunt ad faciendum Platonem et Ciceronem credere quod Sortes intendit imponere talem litteram ‘a’ apud ipsos ad significandum omnes asinos, concurrunt etiam ad talem impositionem.</text:span></text:p>
      <text:p text:style-name="P397">Tamen in tali casu illa impositio attribuenda est Sorti, qui est principalis causa movens, et sic similiter solet fieri in huiusmodi casibus ex quo numquam aliquis facit impositionem apud aliquem alium a se, nisi multae aliae causae concurrant.</text:p>
      <text:h text:style-name="Heading_20_3" text:outline-level="3">Secundo arguitur contra illud quod dictum est, videlicet, quod in definitione termini scripti potest addi eadem particula, capiendo divisum illius divisionis stricte</text:h>
      <text:p text:style-name="P398">Ly ‘homo’ est terminus scriptus proprie, et non significat ad placitum; igitur maior est nota et minor patet, quia si significet ad placitum maxime significabit ‘omnes homines’, sed hoc est falsum; igitur maior est nota et minor patet quia &lt;...&gt; sequeretur quod iste terminus ‘asinus’ scriptus significaret ‘omnes homines’ ad placitum, quod est falsum.</text:p>
      <text:p text:style-name="P399"><text:span text:style-name="T417">Quod sequatur patet: /37b/ </text:span><text:span text:style-name="T418">illud atramentum ex quo lineatur ly ‘asinus’ significat ‘omnes homines’ ad placitum, et illud atramentum est simile terminus asinus; </text:span><text:span text:style-name="T419">igitur maior patet in aliquo casu, non faciendo novam impositione, illud atramentum significabit ‘omnes homines’ ad placitum; ergo iam in potentia propinqua significat ‘omnes homines’ ad placitum. </text:span><text:span text:style-name="T420">Consequentia videtur manifesta ex modo secundum quem debet exponi in proposito ly ‘in potentia propinqua’, et antecedens patet.</text:span></text:p>
      <text:p text:style-name="P400"><text:span text:style-name="T420">Volo quod ex illo atramento non amplius fiat talis terminus ‘asinus’, sed disponatur eius partes taliter quod ex illo fiat ille terminus ‘homo’, nihil addendo vel removendo. Hoc facto illud atramentum significabit ‘omnes homines’, ut constat, et per illud non facta est impositio nova; igitur minor patet, quia illud atramentum ante fuit impositum ad significandum ‘omnes homines’; </text:span><text:span text:style-name="T421">ergo iam non imponitur de novo ad illud.</text:span></text:p>
      <text:p text:style-name="P401"><text:span text:style-name="T421">Antecedens patet </text:span><text:span text:style-name="T422">quia ille qui imposuit talem terminum scriptum ‘homo’ ad significandum, imposuit ex consequenti omnes terminos scriptos sicut dos similes illi, nam aliqui virtute talis impositionis in posterum significabunt ‘omnes homines’, et per consequens aliqui tales per illud imponebantur ad significandum ‘omnes homines’, sed non est maior ratio de aliquibus talibus quam de aliis; ergo omnes indifferenter per illud imponebantur ad significandum ‘omnes homines’, et per consequens illud atramentum fuit impositum et caetera.</text:span></text:p>
      <text:h text:style-name="Heading_20_3" text:outline-level="3">Pro solutione argumenti suppono quod dupliciter aliquis terminus potest dici impositus ad significandum aliquo modo</text:h>
      <text:p text:style-name="P408">Primo quando est impositus taliter ad significandum illo modo quod per illam impositionem adhuc non significat nec significabit, nisi aliquid aliud fiat.</text:p>
      <text:p text:style-name="P402"><text:span text:style-name="T423">Exemplum ut si ego haberem auctoritatem imponendi et dicerem volo quod ly ‘a’ debeat significare ‘omnes homines’ sicut ly ‘homo’, postquam tu inceperis intrare hanc aulam et non ante, et sit ita quod non sis nec fuisses in hac aula nec eris per totum istum mensem sed in fine huius mensis incipies intrare hanc aulam. Tunc in toto isto tempore medio illa littera ‘a’ est imposita illo modo quia est imposita ad significandum ‘omnes homines’, sed per illam impositionem non significat nec </text:span><text:soft-page-break/><text:span text:style-name="T423">imposterum significabit nisi prius incipias intrare hanc aulam, et ista impositio potest vocari dependens ex eo quia ex hoc quod tu incipias intrare hanc aulam, dependet quod ille terminus actualiter significet illo modo quo per illam impositionem imponitur, et loquendo de hac impositione ista consequentia non valet. Iste terminus est impositus ad significandum hoc modo et non deponitur nec deponebatur a tali modo significandi, et est ergo in potentia propinqua significat illo modo.</text:span></text:p>
      <text:p text:style-name="P408">Alio modo potest aliquis terminus dici impositus ad significandum aliquo modo ex eo, quia habet talem impositionem quod virtute illius, per solam advertentiam absque hoc quod fiat alia mutatio, potest significatur illo modo. Et loquendo de ista impositione, illa consequentia statim tacta, bene valeret et pro maiori parte, quando fiunt impositiones fiunt hoc modo, et ex his potest apparere qualiter debeat exponi illa particula in potentia propinqua.</text:p>
      <text:p text:style-name="P409">Potest enim exponi isto modo nulla mutatione facta per quam fiat nova impositio vel ponatur inesse aliquid ex quod dependet actualis significatio, talis termini ad quam virtute alicuius impositionis est impositus.</text:p>
      <text:p text:style-name="P403"><text:span text:style-name="T424">Verum est tamen </text:span><text:span text:style-name="T425">quod posset dici quod illa particula in potentia propinqua potest sic exponi, hoc est, nulla mutatione facta per quam fiat impositio de novo formaliter vel aequivalenter, et tunc dicetur quod per positionem inesse illius a quo dependet actualis significatio et caetera.</text:span></text:p>
      <text:p text:style-name="P410">Fit nova impositio secundo modo aequivalenter, sed melius est dicere primo modo statim tacto. Tunc facile est respondere ad totum processum argumenti, unde concesso quod illud atramentum fuit impositum ad significandum ‘omnes homines’, primo modo ex quo actualis significatio quae debet provenire a tali impositione, dependet ex hoc quod illud atramentum lineetur sicut ly ‘homo’.</text:p>
      <text:p text:style-name="P404"><text:span text:style-name="T425">Negandum est quod propterea in potentia propinqua illud atramentum significet ‘omnes homines’, et ad </text:span><text:span text:style-name="T426">probationem neganda est illa consequentia, scilicet, in aliquo casu non faciendo novam impositionem illud atramentum significabit ‘omnes homines’; ergo iam in potentia propinqua et caetera. </text:span><text:span text:style-name="T427">Et ad probationem quam tangis per /38a/ </text:span><text:span text:style-name="T428">expositionem illius particulae in potentia propinqua, dico quod exponendo illam sicut dictum est, illam debere exponi. In proposito non sequitur ex illo bonitas illius consequentiae.</text:span><text:span text:style-name="T425"> </text:span></text:p>
      <text:h text:style-name="Heading_20_3" text:outline-level="3">Circa praedicta monentur aliquae dubitationes</text:h>
      <text:list text:style-name="L20">
        <text:list-item>
          <text:p text:style-name="P938">Prima: Utrum aliquis terminus naturaliter proprie significans possit cadere a tali significatione naturaliter propria.</text:p>
        </text:list-item>
        <text:list-item>
          <text:p text:style-name="P938">Secunda: Quare magis voces et scripturae sunt impositae ad significandum res quam aliae qualitates vel res.</text:p>
        </text:list-item>
        <text:list-item>
          <text:p text:style-name="P938">Tertia: Utrum voces universaliter significent conceptus et scripturas sibi correspondentes in significando, et scripturae conceptus et voces, similiter et conceptus voces et scripturas ipsis correspondentes in significando.</text:p>
        </text:list-item>
        <text:list-item>
          <text:p text:style-name="P938">Quarto: Utrum quilibet terminus vocalis vel scriptus per novam impositionem possit cuilibet alteri secundum suam significationem esse synonymus.</text:p>
        </text:list-item>
      </text:list>
      <text:h text:style-name="P884" text:outline-level="3"><text:soft-page-break/>Pro solutione primae oportet supponere distinctionem illam tactam in capitulo de significare</text:h>
      <text:p text:style-name="P405"><text:span text:style-name="T429">Qua ostendit quo</text:span><text:span text:style-name="T430">t</text:span><text:span text:style-name="T429"> modis </text:span><text:span text:style-name="T430">potest intelligi quod aliquis terminus, ab aliqua significatione naturali, cadat qua distinctione supposita.</text:span></text:p>
      <text:p text:style-name="P416">Dico quod quilibet terminus naturaliter proprie significans aliquid modo, bene potest ab illa significatione cadere primis tribus modis, scilicet, non quarto modo.</text:p>
      <text:h text:style-name="Heading_20_3" text:outline-level="3">Contra hoc arguitur ly ‘omnis’ in hac mentali ultimata “Omnis homo est animal”, significat naturaliter proprie aliquo modo</text:h>
      <text:p text:style-name="P417">Et potest ab illa significatione cadere quarto modo, de quo semper in sequentibus procedam.</text:p>
      <text:p text:style-name="P406"><text:span text:style-name="T431">Igitur consequentia tenet, et antecedens patet, quia significatio naturaliter propria de ly ‘omnis’ in illa propositione est distribuere illum terminum ‘homo’, et ab illa potest cadere. Hoc patet quia volo quod addatur illi propositioni una, negatio mentalis ultimata in principio, ita quod proveniat hace mentalis ultimata “Non omnis homo est animal”. Tunc per additionem illius negationis cadit ly ‘omnis’ a tali significatione, quia non amplius significat illo modo,</text:span><text:span text:style-name="T429"> </text:span><text:span text:style-name="T431">et apprehenditur eodem modo, sicut quando significabat ab illa potentia cui significabat illo modo; igitur quod autem non significet amplius illo modo patet quia adveniente illa significatione, non amplius ly ‘omnis’ distribuit illum terminum ‘homo’.</text:span></text:p>
      <text:p text:style-name="P418">Forte dices et bene quod licet non distribuat illum terminum ‘homo’ in ordine ad illam totam “Non omnis homo est animal” tamen distribuit in ordine ad illam partem “Omnis homo est animal”.</text:p>
      <text:p text:style-name="P411">Contra hoc arguitur, quia ex illo sequitur quod non significat eodem modo in ordine ad illam partem “Omnis homo est animal”, sicut in ordine ad illam totam, et per consequens aequivoce teneretur illic in parte et in toto.</text:p>
      <text:p text:style-name="P411">Item, etiam quaeram quae sit eius significatio naturaliter propria in ordine ad illam totam propositionem, et quacumque signata semota illa negatione quae addebatur ab illa significatione cadet.</text:p>
      <text:p text:style-name="P411">Item tertio capiam ly ‘omnis’ extra propositionem se solo aut cum ly ‘homo’ tunc cadet ab illa significatione naturaliter propria, igitur.</text:p>
      <text:h text:style-name="Heading_20_3" text:outline-level="3">Ad istud argumentum responsum est usque ad illas tres replicas</text:h>
      <text:p text:style-name="P412">A<text:span text:style-name="T432">d</text:span> quarum primam dico quod dupliciter <text:span text:style-name="T432">aliquis terminus potest teneri aequivoce uno modo quantum ad significationes quae proveniunt in ipso per respectum ad aliquam alium terminum vel ad aliquos alios. Ut puta per additionem vel remotionem alicuius vel aliquorum alio modo quantum ad significationes quae non proveniunt in ipso tali modo.</text:span></text:p>
      <text:p text:style-name="P419">Tunc pono propositiones:</text:p>
      <text:list text:style-name="L21">
        <text:list-item>
          <text:p text:style-name="P939"><text:span text:style-name="T433">Prima: Aliquis terminus mentalis ultimatus incomplexus potest aequivoce primo modo, secundum significationes naturaliter proprias capi, et secundum unam in ordine ad unam totam propositionem, et secundum aliam in ordine ad partem patet hoc de huiusmodi actibus </text:span><text:soft-page-break/><text:span text:style-name="T433">syncategorematicis, qui uno modo significant in ordine ad partem alicuius propositionis, </text:span><text:span text:style-name="T434">et alio modo in ordine ad totam.</text:span></text:p>
        </text:list-item>
        <text:list-item>
          <text:p text:style-name="P940">Secunda: Licet aliquis terminus mentalis ultimatus, conceptus tam propositionalis quam categorematicus utroque modo posset capi aequivoque secundo modo, secundum suas significationes naturaliter proprias, tamen non potest hoc contingere de termino mentali ultimo incomplexo. Prima pars ex alibi dicendis apparebit, et ex his patet sufficienter solutio ad primam replicam.</text:p>
        </text:list-item>
      </text:list>
      <text:p text:style-name="P413">Sed pro solutione aliarum duarum posset dici quod in huiusmodi casibus adhuc ly ‘omnis’ significat eodem modo sicut prius in potentia propinqua, et quod ill<text:span text:style-name="T435">a</text:span>e mutationes non varient potentia propinquam.</text:p>
      <text:p text:style-name="P414">Si tamen diceretur quod illae mutationes variant potentia<text:span text:style-name="T436">m</text:span> /38b/ <text:span text:style-name="T437">propinquam, tunc esset disceptatio inter istos modos, dicendi circa modum quomodo deberet exponi in proposito illa particula in potentia propinqua, dicendo tamen isto modo pro solutione illarum replicarum, est supponendum quod dupliciter aliquis terminus mentalis ultimatus significat naturaliter proprie.</text:span></text:p>
      <text:p text:style-name="P415">Uno modo respective in ordine ad alium terminum vel alios terminos, et hoc modo significant huiusmodi syncategoremata.</text:p>
      <text:p text:style-name="P415">Alio modo non respective, tunc pono propositiones:</text:p>
      <text:list text:style-name="L22">
        <text:list-item>
          <text:p text:style-name="P941">Prima: Terminus mentalis ultimatus potest a significatione naturaliter propria respectiva cadere quarto modo. Patet in huiusmodi casibus.</text:p>
        </text:list-item>
        <text:list-item>
          <text:p text:style-name="P941">Secunda: Nullus terminus mentalis ultimatus potest a significatione naturaliter propria non respectiva cadere quarto modo. Hoc sequitur ex communi modo loquendi.</text:p>
        </text:list-item>
      </text:list>
      <text:p text:style-name="P415">Tunc facile apparet solutio ad illas duas re<text:span text:style-name="T438">plicas, sive dicatur secundum primum modum tactum sive non.</text:span></text:p>
      <text:h text:style-name="Heading_20_3" text:outline-level="3">Occurrit tamen difficultas circa illud quod supponis in ultima replica</text:h>
      <text:p text:style-name="P420">Utrum possit ille terminus ‘omnis’ manere in mente absque hoc <text:span text:style-name="T439">quod capiatur cum aliquo termino, aut absque hoc quod ponatur in propositione, sed ad haec potest affirmative responderi. Posset etiam negative responderi, sed affirmative respondendo an actualiter possit significare absque hoc quod ponatur in propositione.</text:span></text:p>
      <text:p text:style-name="P421">Ad hoc etiam posset responderi affirmative et negative, sed affirmative respondendo esset quaestio qualiter significat.</text:p>
      <text:p text:style-name="P421">Ad hoc dico quod quando extra propositionem significaret actualiter deberet capi enim aliquo termino categorematico, quem determinaret quemadmodum ibi omnis homo, et tunc suum significare esset facere illum terminum homo taliter apprehendi quod ratione illius terminus compositus ex illis duobus significat id quod significat connotando quod fit omnis homo, nec video quod alius modus significandi possit illi attribui ex quod ille terminus ‘homo’ non potest supponere vel accipi distributive extra propositionem, et propterea melius est respondere negative, et tunc consequenter loquendo, dicendum est quod aliquis est terminus categorematicus utroque modi qui <text:soft-page-break/>secundum illam significationem secundum quam est terminus categorematicus, utroque modo non potest significare actualiter extra propositionem, patet te ly ‘omnis homo’.</text:p>
      <text:h text:style-name="Heading_20_3" text:outline-level="3">Posset ibi fieri argumentum ad probandum quod aliquis terminus naturaliter proprie significans aliquid possit cadere a tali significatione</text:h>
      <text:p text:style-name="P424"><text:span text:style-name="T443">S</text:span>upponendo quod ideo aliquod suppositum alicuius termini dicitur correspondere ipsi in ordine ad aliquam copulam, quia potest supponere in potentia propinqua.</text:p>
      <text:p text:style-name="P422">In ordine ad talem tunc ponatur quod crastina die nullus erit angelus, sed iste terminus angelus qui iam significat tibi naturaliter proprie omnes angelos, crastina die manebit in mente tua. Tunc sic ille terminus ‘angelus’ significat iam naturaliter proprie ‘angelum’, correspondentem sibi in ordine ad copulam de praesenti, et crastina die non significabit ‘angelum’, correspondentem sibi in ordine ad copulam de praesenti. Ex quo crastina die non poterit supponere in potentia propinqua pro aliquo angelo in ordine ad copulam de praesenti; ergo a tali significatione naturaliter propria cadet.</text:p>
      <text:p text:style-name="P428">Sed ad hoc quantumcumque concederetur minor, circa quam tamen posset esse difficultas propter ampliationem illius verbi, non obstante impositione facta, adhuc neganda esset consequentia, et satis apparet eius malitia, cognito quid requiratur, et sufficiat ad hoc quod aliquis terminus ab aliqua significatione naturaliter propria cadat quarto modo superius tacto, de quo ibi proceditur.</text:p>
      <text:h text:style-name="Heading_20_3" text:outline-level="3">Ad secundam dubitationem dico</text:h>
      <text:p text:style-name="P423"><text:span text:style-name="T440">Quod ratio est quia voces e</text:span><text:span text:style-name="T441">st quia voces et scripturae sunt magis in potestate notras quam aliae qualitates vel res quaecumque sunt.</text:span></text:p>
      <text:h text:style-name="Heading_20_3" text:outline-level="3"><text:span text:style-name="T441">Pro solutione tertiae dubitationis pono proposit</text:span><text:span text:style-name="T442">i</text:span><text:span text:style-name="T441">ones</text:span></text:h>
      <text:p text:style-name="P425">Prima aliqua vox proprie significat scripturam et conceptum, et aliqua <text:span text:style-name="T444">scriptura proprie significat vocem et conceptum, et aliquis conceptus proprie significat vocem et scripturam.</text:span></text:p>
      <text:list text:style-name="L23">
        <text:list-item>
          <text:p text:style-name="P942">Primum patet de ista voce ‘<text:span text:style-name="T445">terminus’ secundum patet de ista scriptura ‘terminus’, et tertium de sito conceptu ‘terminus’.</text:span></text:p>
        </text:list-item>
        <text:list-item>
          <text:p text:style-name="P943">Secunda: Aliqua vox proprie /39a/ significat scripturam et conceptum ipsius correspondentes, et aliqua script<text:span text:style-name="T446">ura proprie significat vocem et conceptum ipsius correspondentes, et aliquis conceptus proprie significat vocem et scripturam sibi correspondentes. Haec omnia patet de eiusdem terminus de quibus partes praecedentis probatae sunt.</text:span></text:p>
        </text:list-item>
        <text:list-item>
          <text:p text:style-name="P944">Tertia: Quaelibet vox habens conceptum et scripturam sibi correspondentes non significans proprie talem scripturam vel talem conceptum, significat ad placitum improprie talem scripturam et talem conceptum, propter correspondentiam quam habet sibi correspondentium, et de conceptu respectu vocis et scripturae sibi correspondentium.</text:p>
        </text:list-item>
      </text:list>
      <text:p text:style-name="P426">Propositio patet quia iste terminus vocalis ‘homo’ supponit pro tali termino scripto ‘homo’ et pro tali termino mentali ‘homo’, quia iste duae vocales conceduntur ‘homo’ est terminus scriptus. ‘Homo’ est terminus mentalis quae alias non essent concedendae; ergo ille terminus vocalis ‘homo’ significat illum terminum mentalem ‘homo’ et illum terminum scriptum ‘homo’ et non naturaliter, <text:soft-page-break/>quia non significat illa nescienti quod ille terminus homo correspondet illis in significando; ergo ad placitum significat illa et non ad placitum proprie, quia alias personaliter supponeret pro illis cuius oppositum. Patet ex communi modo; ergo ad placitum improprie significat illa et non propter aliam eam quam propter correspondentiam, quam habet cum illis; igitur et ex hoc potest inductive probari prima pars in omnibus de quibus procedit alia aut consimiliter possunt probari.</text:p>
      <text:p text:style-name="P427">Petes tamen quam corr<text:span text:style-name="T447">espondentiam habent termini vocales et mentales et scripti inter se. Ad hoc dico quod mentales cum vocalibus et scriptis universaliter habent correspondentiam in modo significandi, quia termini vocales et scripti mediante mentali significant, sed termini vocales et scripti habent talem correspondentiam quod significant eodem modo, et quantumcumque non significarent </text:span><text:span text:style-name="T448">proprie.</text:span></text:p>
      <text:p text:style-name="P427"><text:span text:style-name="T451">E</text:span><text:span text:style-name="T448">odem modo adhuc aliquam correspondentiam ex eo, quia regulariter procedendo dato aliquo termino vocali proprie significante, cuius una pars est ille terminus vocalis, qui non significat proprie, et data scriptura significante eodem modo sicut significat ille terminus vocalis, tunc ille terminus scriptus, qui dicitur correspondere illi termino vocali significanti improprie, erit pars illius scripturae reperta in ipsa.</text:span></text:p>
      <text:p text:style-name="P427"><text:span text:style-name="T452">I</text:span><text:span text:style-name="T448">n consimile ordine sicut ille terminus vocalis cui correspondet reperitur in illo vocali significanti proprie, </text:span><text:span text:style-name="T450">e</text:span><text:span text:style-name="T448">t hoc modo littera et syllabae vocales et scriptae dicuntur sibi invicem correspondere, quantumcumque non significent proprie, et etiam habent aliam correspondentiam quia regulariter procedendo.</text:span></text:p>
      <text:p text:style-name="P427"><text:span text:style-name="T449">S</text:span><text:span text:style-name="T448">i unus talium terminorum imponatur, reliquus imponitur, et quid istae correspondentiae ad placitum proveniunt, saltem ubi terminus vocalis vel scriptus non significaret se naturaliter mediante mentali, cui dicitur correspondere. Propterea ad placitum proveniunt huiusmodi significationes ut in pluribus.</text:span></text:p>
      <text:h text:style-name="P885" text:outline-level="3">Et si arguas contra ista, quia quilibet terminus vocalis significans scriptura, propter talem correspondentiam ad placitum significat illam ex impositione proprie dicta aequivalenter</text:h>
      <text:p text:style-name="P436"><text:span text:style-name="T455">A</text:span><text:span text:style-name="T453">deo </text:span><text:span text:style-name="T454">bene sicut terminus significans ex consuetudine </text:span><text:span text:style-name="T455">ergo, sicut terminus significans ex consuetudine significat ad placitum proprie ita, et ille significabit ad placitum proprie talem scripturam; consequentia tenet quia eadem est ratio utrobique, et antecedens patet quia ille eodem modi et mediante eodem conceptu significat, sicut significaret si proprie esset impositus formaliter ad significaret si proprie esset impositus formaliter ad significandum illo modo.</text:span></text:p>
      <text:p text:style-name="P437"><text:span text:style-name="T455">Ad hoc, concesso antecedente neganda est consequentia, et dicendum est quod non est alia ratio quare ista significatio vocetur improprie dicta magis quam alia, </text:span><text:span text:style-name="T456">nisi quia ista provenit propter tales correspondentias, et non alia.</text:span></text:p>
      <text:p text:style-name="P440">Verum est tamen quod propter hoc posset facilius sustentari quod talis modus significandi est proprius, adeo bene sicut modus significandi ex consuetudine, sed quia non communiter concederent hoc doctores, dicatur sicut dictum est.</text:p>
      <text:p text:style-name="P438"><text:span text:style-name="T457">Ex quo patet quod quamvis ista littera ‘a’ in significando se naturaliter communiter significet se eodem modo et mediante eodem conceptu mediante quo significaret se, si imponeretur ad </text:span><text:soft-page-break/><text:span text:style-name="T457">significandum se mediante illo, non tamen propterea significat se ex impositione voluntaria formaliter, vel aequivalenter loquendo, </text:span><text:span text:style-name="T458">sicut communiter loquimur in his materiis, quia oporteret ad /39b/ </text:span><text:span text:style-name="T459">illud quod non naturaliter proveniret talis modus significandi.</text:span></text:p>
      <text:h text:style-name="Heading_20_3" text:outline-level="3">Et si ultra arguas probando quod ille terminus vocalis ‘homo’ significet illum terminum scriptum ‘homo’ ad placitum proprie, quia illa scriptura ‘homo’ vocatur hoc nomine vocali ‘homo’ sicut patet</text:h>
      <text:p text:style-name="P439"><text:span text:style-name="T459">Quia hi qui docent </text:span><text:span text:style-name="T460">parvulos legere, ostendunt illam scripturam illo nomine <text:s/>vocali vocari, et simile est de illa littera scripta ‘a’ et etiam, quia nisi talibus nominibus vocentur illae scripturae </text:span><text:span text:style-name="T462">quam</text:span><text:span text:style-name="T460"> nomina illarum.</text:span></text:p>
      <text:p text:style-name="P441">Ad hoc nego adsumptum, saltem si de nomine proprie significante procedas. Et ad primum quod tangis dico quod illi qui docent parvulos nolunt per illud dicere id quod praetendis, sed volunt dicere per illud quod talis vox tali scripturae correspondet, modo superius declarato.</text:p>
      <text:p text:style-name="P442">Ad aliud quod tangis, dico quod non habemus nomina quae sint proprie imposita ad significandum tales scripturas incomplexae et singulariter, nec illud convenit magis quam de multis aliis rebus.</text:p>
      <text:h text:style-name="Heading_20_3" text:outline-level="3"><text:span text:style-name="T463">Petes tamen an iste terminus vocalis ‘homo’ significet scripturam Graecam vel Hebraicam, quae significat ‘omnes homines’ eodem modo sicut ly ‘homo’ saltem scienti illa</text:span><text:span text:style-name="T461"> </text:span><text:span text:style-name="T460"><text:s/></text:span><text:span text:style-name="T459"><text:s text:c="2"/></text:span><text:span text:style-name="T457"><text:s/></text:span><text:span text:style-name="T456"><text:s/></text:span><text:span text:style-name="T455"><text:s/></text:span></text:h>
      <text:p text:style-name="P443">Ad hoc dico <text:span text:style-name="T464">quod non est necessarium, quia haec quodam modo ex voluntate et usu dependent. Et si ex dictis inferas quod quilibet terminus mentalis naturaliter proprie significans, habens vocem et scripturam sibi correspondentes in sic significando, quam non significat secundum talem significatione, significat ad placitum talem vocem vel scripturam concedendum est illud.</text:span></text:p>
      <text:h text:style-name="Heading_20_3" text:outline-level="3">Sed arguitur contra dicta, quia ex ipsis videtur sequi quod iste terminus vocalis ‘homo’ significat illum terminus scriptum asinus hoc modo in proprie</text:h>
      <text:p text:style-name="P448">Sed hoc est falsum; igitur falsitas consequentis videtur nota ex communi modo, et quod sequatur patet quia suppono quod non sit aliquis talis terminus scriptus homo.</text:p>
      <text:p text:style-name="P448">Tunc sic iste terminus vocalis ‘homo’ significat illo modo communiter quodlibet atramentum ex quo potest fieri talis terminus ‘homo’, quia aliquod tale significat illo modo, et non est potior ratio de uno quam de alio, sed ex atramento ex quod fit ille terminus scriptus ‘asinus’ potest fieri talis terminus ‘homo’; ergo ille terminus vocalis ‘homo’, illud atramentum significat illo modo, et ex consequenti illum terminum scriptum ‘asinus’ significat illo modo cum illud atramentum sit ille terminus scriptus ‘asinus’.</text:p>
      <text:h text:style-name="Heading_20_3" text:outline-level="3">Ad hoc concedendum est illatum</text:h>
      <text:p text:style-name="P444"><text:span text:style-name="T465">Bene tamen verum est quod </text:span><text:span text:style-name="T466">oportet ponere aliquam connotationem in tali modo significandi, ratione cuius non supponet pro tali in ordine ad copulam de praesenti, et connotatio esset quod talis terminus habeat talem figuram qualem habet ille terminus ‘homo’ in scripto. Ex quo patet quod ista vocalis erit concedenda, ly ‘homo’ in scripto potest significare omnes asinos absolute absque </text:span><text:soft-page-break/><text:span text:style-name="T466">impositione, et facile est ipsam probare ex his. Patet secundo quod similes connotationes debebunt poni in huiusmodi significationibus ad placitum impropriis.</text:span></text:p>
      <text:h text:style-name="Heading_20_3" text:outline-level="3">Ad quartam dubitationem affirmative respondendum est</text:h>
      <text:p text:style-name="P449">Contra quod arguitur, ex illo sequitur quod aliquis terminus similis et semel significat aliquid et non significat illud, sed hoc est falsum; igitur quod sequatur patet. Volo quod unus habens auctoritatem imponendi dicat cum intentione imponendi: “Volo quod illa littera ‘a’ singulariter et discrete significet illum qui primo proferat talem litteram ‘a’”, et sit ita quod erunt duo aeque primo proferentes. Tunc sequitur quod aliquem illorum significabit illa littera ‘a’ per illud, et nullum illorum significabit.</text:p>
      <text:p text:style-name="P449">Igitur consequentia tenet et minor patet ex impositione, et casu maior autem patet quia dato illius opposito, tunc ille in tali casu non imponeret, sed hoc est falsum; igitur quod sequatur notum est, et falsitas consequentis probatur, quia si non imponat hoc, maxime erit qui in illa propositione per quam intendit imponere praesupponet falsum, sed hoc est falsum; igitur quod sequatur notum est quia non videtur esse alia causa quare ille non imponit, et falsitas consequentis probatur, quia volo cum toto casu quod sit ibi unus qui credat firmiter quod unus istorum sit primus proferens talem litteram, tunc illa littera significabit illum isti et non aliunde quam per illud quo ille impositorum dixit, ut suppono ergo propter illud significat illum isti, et per consequens ille per illud imponebat et praesupponebat falsum igitur.</text:p>
      <text:p text:style-name="P450">Si forte dicas quod per illud solum non imponit, sed propter illud cum illa credulitate quam ille habet, consurgit alis impositio.</text:p>
      <text:p text:style-name="P445"><text:span text:style-name="T467">Contra istam solutionem /40a/ </text:span><text:span text:style-name="T468">arguitur: Ex ipsa sequitur quod numquam aliquis impositor imponeret per aliqua verba, quia semper debet aliqua alia causa concurrere.</text:span></text:p>
      <text:p text:style-name="P446"><text:span text:style-name="T468">Ad argumentum dato illo casu dico quod si nullus credat vel sciat aliquem esse primo proferentem talem litteram ‘a’, per illud ille non imponet. Si tamen cum </text:span><text:span text:style-name="T469">illo aliquis credat aliquem esse primo proferentem ‘a’, bene fiet impositio per illud, quemadmodum in hoc casu contingit.</text:span></text:p>
      <text:p text:style-name="P451">Esset tamen difficultas an sit concedendum quod tunc per illud imponit postquam illud non sufficeret sine tali credulitate. Sed haec difficultas magis est ad nomen quam ad rem.</text:p>
      <text:p text:style-name="P451">Si tamen concedatur quod per illud imponit, concedendum est ex consequenti quod frequenter aliquis imponit per propositionem falsam. Immo ad significandum aliquid ad quod significandum non vellet imponere. Immo in casu dato posset per illud imponere ad significandum ‘decem homines’ et quotcumque plures.</text:p>
      <text:h text:style-name="Heading_20_3" text:outline-level="3">Circa istud dubium posset afferri omnis argumenta quae facta sunt in secunda et tertia quaestionibus impositionum</text:h>
      <text:p text:style-name="P447"><text:span text:style-name="T470">Sed quia difficultates illorum ab inchoantibus summulistis essent incomprehensibiles, et illic sufficienter sunt tactae pro his qui possunt ipsas capere et cupiunt, in illis exercitari non ampliorem processum. Faciam pro nunc circa istud dubium.</text:span><text:span text:style-name="T468"> </text:span><text:span text:style-name="T464"><text:s text:c="2"/></text:span></text:p>
      <text:h text:style-name="Heading_20_2" text:outline-level="2"><text:soft-page-break/>Terminus mentalis</text:h>
      <text:p text:style-name="P452">Solet dividi in terminum mentalem ultimatum et in terminum mentalem non-ultimatum, <text:span text:style-name="T471">et pro diviso huius divisionis debet capi ly ‘terminus mentalis’ naturaliter proprie, significans de significatione totali, quia quanvis illa propositio “Omnis homo est animal” cuius ly ‘omnis’ est terminus mentalis non-ultimatus ad placitum distribuens ly ‘homo’, et residua pars est terminus metalis ultimatus, quia non significat naturaliter proprie de significatione totali.</text:span></text:p>
      <text:p text:style-name="P453">Terminus mentalis ultimatus est terminus naturaliter pro<text:span text:style-name="T472">prie significans de significatione totali. Ex hac definitione statim sequitur quod illud membrum convertitur cum divisio. Immo apud omnes concedendum est hoc, sed ad salvandum bonitatem illius divisionis, oportet dicere quod divisum habet generaliorem modum connotandi quam habeat illud membrum, quemadmodum solet dici de ly ‘quantitas’ respectu de ly ‘quantitas discreta’. Sed de his non est pro nunc multum curandum.</text:span></text:p>
      <text:p text:style-name="P457">Terminus mentalis non-ultimatus sic solet definiri:</text:p>
      <text:p text:style-name="Quotations">Est naturalis similitudo distincta termini, capiendo terminum proprie.</text:p>
      <text:p text:style-name="P458">Per naturalem similitudinem distinctam intelligitur conceptus qui est singularis vel species specialissima. Ideo dicitur distincta ad secludendum conceptum qui naturaliter repraesentat omnis entia, et ad secludendum conceptum cui subordinatur ly ‘terminus’ et alios conceptus huiusmodi, et solet etiam dici quod per illam particulam secluditur conceptus cui subordinatur ly ‘vox’. Sed si omnis voces ponantur eiusdem speciei specialissimae non staret illud cum aliis.</text:p>
      <text:p text:style-name="P458">Et dicitur in definitione capiendo terminum proprie, quia naturalis similitudo distincta de ly ‘buf’ non est conceptus non-ultimatus, quia ly ‘buf’ non est terminus proprie, et solet dici quod universaliter talis conceptus repraesentat ad placitum quidquid repraesentat terminus cuius est naturalis similitudo distincta et eodem modo. Ex quo solet inferri quod si quilibet talis terminus scriptus ‘homo’ deponeretur a sua significatione, non acquirendo aliam de novo, ille conceptus qui est naturalis similitudo distincta illius termini, desineret esse non-ultimatus, quantumcumque maneret conceptus.</text:p>
      <text:p text:style-name="P454">Sed contra ista arguitur: Ex hoc sequitur quod si ille terminus scriptus ‘homo’ corrumperetur, manente naturali similitudine distincta eius in mente, non amplius ille conceptus maneret non-ultimatus, quod videtur falsum.</text:p>
      <text:p text:style-name="P454">Quod sequatur patet, quia ille terminus cuius est naturalis similitudo distincta desinit, tunc esse terminus proprie. Et si forte dicas quod quanvis desinat esse terminus proprie, quia tamen non manet, propterea non sequitur quod ille conceptus desinat esse conceptus non-ultimatus.</text:p>
      <text:p text:style-name="P455">Contra hoc arguitur: Sequitur tunc quod si iste terminus scriptus ‘homo’ desineret lineari illo modo, ita quod partes atramenti ex quo lineatur taliter disponerentur, quod compositum ex ipsius esset taliter dispositum sicut erat in calamo, /40b/ <text:span text:style-name="T473">tunc conceptus singularis illius desineret esse terminus mentalis non-ultimatus.</text:span></text:p>
      <text:p text:style-name="P456"><text:span text:style-name="T473">Sed hoc est falsum igitur. Quod sequatur notum est et falsitas consequentis patet, quia tunc ille terminus mentalis desineret significare in potentia propinqua omnes homines ad placitum, quod videtur falsum, quia tunc sequeretur quod si vidissem heri unum talem terminum scriptum ‘homo’ et formasse conceptum singularem eius quem iam habeam. Sed nunc ego dis</text:span><text:span text:style-name="T474">tem ab illo termino per </text:span><text:soft-page-break/><text:span text:style-name="T474">decem leucas, certum est quod iste conceptus significabat omnes homines mihi ad placitum, et tamen si unus deleret illum terminum scriptum ‘homo’ statim desineret mihi significare ille conceptus omnes homines, quod videtur absurdum.</text:span></text:p>
      <text:p text:style-name="P459">Item etiam arguitur quia vel in illa definitione cum dicitur est naturalis similitudo distincta termini proprie, intelligitur quod sit naturalis similitudo distincta alicuius, quod est actualiter terminus proprie, vel quod sit naturalis similitudo distincta alicuius quod est, vel erit, vel fuit terminus proprie, quocumque istorum dato sequitur repugnantia in dictis.</text:p>
      <text:p text:style-name="P460">Item etiam potest fieri difficultas, quia supposito quod quodlibet atramentum sit eiusdem speciei specialissimae cum quolibet atramento similiter, et quodlibet argentum cum quolibet argento, et aru cum auro, sequeretur quod conceptus cui subordinantur isti termini atramentum, aurum, argentum essent omnes non ultimati, quod videatur satis falsum. Et quod sequatur patet quia aliquod atramentum est terminus proprie similiter et aliquod aurum, et aliquod argentum.</text:p>
      <text:p text:style-name="P461">Haec omnis satis proterve videtur procedere contra istum modum dicendi. Ideo posset forte quis dicetur quod per naturalem similitudinem, distinctas debet intelligi in illa definitionem conceptus singularis. Sed contra istum modum adhuc procederent omnia argumenta tacta praeter ultimum, maxime si quantum ad alia coincidat cum primo modo tacto. Ideo pro his omnibus tangam primo unum modum dicendi satis facilem et clarum, postea vero tangam unum alium qui non multum extraneus est et facile poterit defendi.</text:p>
      <text:h text:style-name="P886" text:outline-level="3"><text:span text:style-name="T475">Pro his igitur sit prima propositio. </text:span>Sustentabile est quod ly ‘conceptus non-ultimatus’ sic definiatur</text:h>
      <text:p text:style-name="Quotations">Est conceptus singulariter et discrete repraesentans aliquid quod est terminus proprie.</text:p>
      <text:p text:style-name="P429"><text:span text:style-name="T476">Et dicendo isto modo oportet primo concedere, </text:span><text:span text:style-name="T477">quod si ego habeam conceptum singularem huius termini scripti ‘homo’, et ille terminus scriptus ‘homo’ corrumpatur, sic quod non maneat ens quantumcumque ille conceptus desineret significare ad placitum omnes homines, posset dici quod non, quia oportet quod per illud deponatur a significatione illa.</text:span></text:p>
      <text:p text:style-name="P430"><office:annotation office:name="__Annotation__3645_68901713" loext:resolved="false"><dc:creator>Unknown Author</dc:creator><dc:date>2025-07-12T18:21:31.427697874</dc:date><text:p><text:span text:style-name="T861">Potentia propinqua is not only <text:s/>a definition, as it is in Mair in the Perutile, but here also is the significatum:</text:span><text:span text:style-name="T861"><text:line-break/></text:span><text:span text:style-name="T861"/></text:p><text:p><text:span text:style-name="T861">As Lax says in De definitione:</text:span><text:span text:style-name="T861"><text:line-break/></text:span><text:span text:style-name="T861">Definitum propinquum est terminus cuius significatum explicatur per definitionem cum qua convertitur.</text:span></text:p><text:p><text:span text:style-name="T861"/></text:p><text:p><text:span text:style-name="T861">Here it says:</text:span><text:span text:style-name="T861"><text:line-break/></text:span><text:span text:style-name="T861">Patet secundo quod si ego habeam conceptum singularem illius terminis scripti ‘homo’ et ille terminus scriptus ‘homo’ desinat taliter lineari, sed atramentum ex quo lineatur disponatur taliter sicut erat dispositum in calamo et maneat ille conceptus, non amplius eri non ultimatus. Sed an per illud desinet ille conceptus significare omnes homines ad placitum in potentia propinqua, dico quod si sciam illud quod factum est de illo atramento propter quod desinit in potentia propinqua significare omnes homines, dico quod sic, sin autem non oportet. </text:span></text:p></office:annotation><text:span text:style-name="T478">Patet secundo quod si ego habeam conceptum singularem illius terminis scripti ‘homo’ et ille terminus scriptus ‘homo’ desinat taliter lineari, sed atramentum ex quo lineatur disponatur taliter sicut erat dispositum in calamo et maneat ille conceptus, non amplius eri non-ultimatus. Sed an per illud desinet ille conceptus significare omnes homines ad placitum in potentia propinqua, dico quod si sciam illud quod factum est de illo atramento propter quod desinit in potentia propinqua significare omnes homines, dico quod </text:span><text:span text:style-name="T479">sic, </text:span><text:span text:style-name="T478">sin autem non oportet.</text:span><office:annotation-end office:name="__Annotation__3645_68901713"/></text:p>
      <text:p text:style-name="P431"><text:span text:style-name="T478">Et simile </text:span><text:span text:style-name="T479">contingeret quod impositione unde esto quod habeam conceptum singularem illius litterae scriptae ‘a’, et illa littera scripta ‘a’ imponatur ad significandum omnes homines, non propterea consurget impositio in illo conceptu qua mediante significabit omnes homines, nisi sciam illam impositionem de ly ‘a’, ita quod in effectu, significatio ad placitum in termino mentali non ultimato dependet ex hoc quod sciam vel credam quod ille terminus, </text:span><text:span text:style-name="T480">quem ille terminus mentalis ultimatus naturaliter repraesentat, significet illo modo ad placitum. Et ad impositionem vel depositionem, talis termini quem ille conceptus taliter repraesentat, sequitur impositio vel depositio illius conceptus, dummodo sciatur talis impositio vel depositio talis termini, et non oportet alias.</text:span></text:p>
      <text:p text:style-name="P432"><text:soft-page-break/><text:span text:style-name="T481">Et per hoc quod sciretur talis impositio vel depositio variaretur potentia propinqua in tali conceptu, dicendo ergo isto modo, sequitur corollarie quod si quid habeat conceptum non-ultimatum alicuius termini proprie qui significat ad placitum, proprie aliterque ille conceptus naturaliter proprie significet, et sciat illum terminum cuius est ille conceptus significare ad placitum proprie, ille conceptus non /41a/ ultimatus significabit ipsi ad placitum proprie eo modo quo ille terminus et caetera </text:span><text:span text:style-name="T482">e</text:span><text:span text:style-name="T481">t non oportet alias. </text:span><text:span text:style-name="T482">E</text:span><text:span text:style-name="T481">t propterea stat quod aliquis sit terminus mentalis non-ultimatus alicuius termini significantis ad placitum proprie, et tamen ille non significet ad placitum proprie.</text:span></text:p>
      <text:p text:style-name="P462">Patet secundo, quod si habeam conceptum non-ultimatum huius termini mentalis ultimati ‘homo’ quem ego habe in anima mea, potest teneri quod ille naturaliter repraesentet omnes homines, non tamen naturaliter proprie repraesentare illos sicut ly ‘homo’. Sed qualis modus significandi naturaliter esset ille, satis potest apparere ex dictis.</text:p>
      <text:p text:style-name="P433"><text:span text:style-name="T483">Sed tunc esset difficultas: Si ille terminus ‘homo’ poneretur in lapidem, an propterea ille conceptus non-ultimatus eius ipso manente in mente desineret significare in potentia propinqua omnes homines, quemadmodum ly ‘homo’, quia ex una parte videtur quod sic, propter simile sicut de conceptu non ultimato termini scripti in casibus supra tactis contingit; et ex altera parte videtur quod non, quia tunc aliquis terminus significans naturaliter aliquid vel aliqua aliquo modo, posset ab illa significatione cadere </text:span><text:span text:style-name="T484">quarto modo superius tacto.</text:span></text:p>
      <text:p text:style-name="P434"><text:span text:style-name="T484">Item est difficultas an conceptu non-ultimatu</text:span><text:span text:style-name="T485">s, quem ego habeo de notitia quam tu habes, significet eodem modo sicut illa notitia, et si sic, an naturaliter vel ad placitum.</text:span></text:p>
      <text:p text:style-name="P463">Propter haec posset etiam teneri sicut in sequentibus apparebit, quod non oportet conceptum non-ultimatum termini significantis naturaliter, aliquo modo significare, eodem modo sicut ille terminus significat secundum illam significationem naturalem.</text:p>
      <text:p text:style-name="P435"><text:span text:style-name="T486">Si tamen velles tenere aliam partem, oporteret dicere quod naturaliter significaret illo modo, et non propterea quod talis terminus cuius est conceptus non-ultimatus poneretur in lapide, sic quod definiret significare in potentia propinqua, et maneret ens ille conceptus, definiret significare illo modo in potentia propinqua.</text:span><text:span text:style-name="T485"> </text:span><text:span text:style-name="T486">Ideo quantum ad hanc disceptationem poteris dicere sicut libeat.</text:span></text:p>
      <text:h text:style-name="Heading_20_3" text:outline-level="3"><text:span text:style-name="T487">Secunda propositio: </text:span><text:span text:style-name="T488">Sustentabile est quod ideo aliquis conceptus dicatur non-ultimatus</text:span></text:h>
      <text:p text:style-name="P464">Quia distincte significat aliquod significatum, connotando quod sit terminus proprie, et cum hoc posset indifferenter ly ‘distincte’ sic exponi, hoc est, singulariter, et posset etiam sic exponi scilicet singulariter vel specifice, ita quod in effectu, quilibet conceptus non-ultimatus deberet esse secundae intentionis, nec oportet ad conceptum non-ultimatum quod significet aliquid quod sit terminus proprie, et ex consequenti non oportet quod quilibet terminus mentalis non-ultimatus significet ad placitum, sed solum ille significat ad placitum qui est naturalis similitudo distincta termini significantis ad placitum proprie, aliter quam ille conceptus naturaliter proprie significet.</text:p>
      <text:p text:style-name="P465">Et quantum ad difficultates quae possunt circa hoc fieri, utrum universaliter conceptus non-ultimatus, qui repraesentat aliquid quod est terminus proprie, significet illud quod significat ille terminus. Et eodem modo dicendum est proportionabiliter sicut diceretur secundum modum statim tactum qualitercumque; igitur de his duobus modis tactis dicatur facile est loqui consequenter.</text:p>
      <text:h text:style-name="Heading_20_3" text:outline-level="3"><text:soft-page-break/>Ex quocumque tamen istorum modorum dicendi, sequuntur aliqua corollaria</text:h>
      <text:list text:style-name="L24">
        <text:list-item>
          <text:p text:style-name="P945">Primum quod esto quod nulla esset impositio adhuc essent termini mentale ultimati et non ultimati. De ultimatis non est quaestio, sed de non ultimatis patet quia adhuc esset conceptus reflexus singulariter repraesentans directum, qui esset non-ultimatus.</text:p>
        </text:list-item>
        <text:list-item>
          <text:p text:style-name="P946">Sequitur secundo quod non dicitur conceptus ultimatus quia ultimo productus, nec non-ultimatus quia non ultimo productus, quia stat quod primo habeatur ultimatus alicuius vocis quam non-ultimatus eiusdem. Ut si viderem Sortem et formarem solum conceptum eius, et postea audirem illam vocem ‘Sortes’ et formarem non-ultimatus eius. </text:p>
          <text:p text:style-name="P947">Regulariter tamen procedendo, et supposito quod tales conceptus debeant causari mediante voce vel scriptura, communiter solet dici quod primo causatur non-ultimatus et postea ultimatus. Sed an hoc sit universaliter verum non est multum curandum.</text:p>
        </text:list-item>
        <text:list-item>
          <text:p text:style-name="P948">Sequitur tertio quod cuilibet voci significanti proprie correspondet duplex conceptus, scilicet:</text:p>
        </text:list-item>
      </text:list>
      <text:list text:style-name="L25">
        <text:list-item>
          <text:list>
            <text:list-item>
              <text:p text:style-name="P949">Ultimatus, quo mediante significat proprie, et</text:p>
            </text:list-item>
            <text:list-item>
              <text:p text:style-name="P949">non-ultimatus, qui est naturalis similitudo distincta illius vocis.</text:p>
              <text:p text:style-name="P949">Et idem postes dici de scriptura /41b/ significante proprie.</text:p>
            </text:list-item>
          </text:list>
        </text:list-item>
      </text:list>
      <text:list text:style-name="L26">
        <text:list-item>
          <text:p text:style-name="P950">Patet quarto quod ubi alicui termino significanti proprie correspondet duplex conceptus, scilicet, ultimatus et non-ultimatus. Illi duo conceptus erunt synonymi secundum significationem propriam illius termini cui correspondent, quia ille non-ultimatus significabit eodem modo quo ille ultimatus. Hoc patet tum ex communi modo loquendi tum partim experientia, tum etiam propter unum argumentum tactum superius de termino vocali, quod praetendebat terminum vocalem significare quando non est.</text:p>
        </text:list-item>
        <text:list-item>
          <text:p text:style-name="P951">Patet quinto <text:span text:style-name="T489">quod quamvis conceptus singulariter significans illum terminum ‘ens’ indistincte significet omnia entia, tamen adhuc est non-ultimatus, ex quo secundum suam significationem naturaliter propriam distincte significat illum terminum ‘ens’.</text:span></text:p>
          <text:p text:style-name="P952">Petes tamen an naturalis similitudo distincta de ly ‘a’ significet ad placitum illa qua ly ‘a’ significat ad placitum improprie. Ad hoc posset <text:s/>indifferenter dici affirmative aut negative, nec altera pars posset efficaciter probari aut reprobari.</text:p>
        </text:list-item>
      </text:list>
      <text:h text:style-name="Heading_20_3" text:outline-level="3"><text:span text:style-name="T489">Contra dictam arguitur: Ex ipsis sequitur quod idem conceptus </text:span><text:span text:style-name="T490">est ultimatus et non-ultimatus</text:span></text:h>
      <text:p text:style-name="P466"><text:span text:style-name="T490">Immo quod quilibet non-ultimatus est ultima</text:span><text:span text:style-name="T491">tus, sed hoc est falsum; igitur quod sequatur notum est, et falsitas consequentis probatur quia illud sequitur contradictio, quia bene sequitur iste est conceptus ultimatus; ergo iste est conceptus qui est ultimatus, et ex consequenti, per resolutionem relativi, sequitur quod iste est conceptus et ille est ultimatus, et per idem sequitur iste est conceptus non-ultimatus; ergo iste est conceptus et ille est non-ultimatus, modo ultimae partes istarum copulativarum praedicunt igitur.</text:span></text:p>
      <text:h text:style-name="Heading_20_3" text:outline-level="3"><text:soft-page-break/>Et confirmatur ratio, ly ‘ultimatum’ et ly ‘non-ultimatum’ <text:span text:style-name="T492">non possunt eidem convenire</text:span></text:h>
      <text:p text:style-name="P467"><text:span text:style-name="T493">E</text:span><text:span text:style-name="T492">x quo contradicunt, et ly ‘conceptus ultimatus’ non potest alicui convenire nisi ly ‘ultimatum’ conveniat ei, nec ly ‘conceptus non-ultimatus’ potest alicui convenire quin ly ‘non-ultimatum’ conveniat eidem; ergo illi duo termini, conceptus ultimatus, conceptus non-ultimatus, non poterunt eidem convenire.</text:span></text:p>
      <text:h text:style-name="Heading_20_3" text:outline-level="3">Pro solutione argumenti</text:h>
      <text:p text:style-name="P468"><text:span text:style-name="T494">Est advertendum quod licet ly ‘ultimatum’ et ly ‘non-ultimatum’ contradicant, tamen illi duo termini conceptus ultimatus, conceptus non-ultimatus, non significa</text:span><text:span text:style-name="T495">n</text:span><text:span text:style-name="T494">t </text:span><text:span text:style-name="T495">iuxta tales significationes illorum terminorum contradictoriorum, qui sunt partes ipsorum, saltem </text:span><text:span text:style-name="T497">secundum</text:span><text:span text:style-name="T495"> quod capiuntur in proposito, </text:span><text:span text:style-name="T497">et ideo si dicatur quod ly ‘conceptus ultimatus’ significet iuxta significationem de ly ‘ultimatus’, secundum quod in proposito capitur quod videtur esse dicendum, negandum est tunc quod ly ‘conceptus non-ultimatus’ significet tunc iuxta significationem de ly ‘non-ultimatus’ secundum quam contradicit ad ly ‘ultimatus’, salte capiendo ly ‘conceptus non-ultimatus’ prout capitur in proposito.</text:span></text:p>
      <text:p text:style-name="P469"><text:span text:style-name="T498">Et per hoc patet solutio ad confirmationem. Negandum est enim quod ly ‘conceptus non-ultimatus’ non possit alicui convenire, nisi illi conveniat ly ‘non-ultimatus’, saltem capiendo ly ‘non-ultimatus’ prout contradicit ad ly ‘ultimatus’, quia si aliter caperetur nihil haberetur contra dicta. Et ratio quare illud debet negari est quid ly ‘conceptus non-ultimatus’</text:span><text:span text:style-name="T495"> </text:span><text:span text:style-name="T498">non significat iuxta talem significationem de ly ‘non-ultimatus’.</text:span></text:p>
      <text:p text:style-name="P474">Tunc ad argumentum facile apparet solutio. Neganda est enim illa consequentia, scilicet, iste conceptus non-ultimatus; ergo est conceptus et ille est non-ultimatus, capiendo ly ‘non-ultimatus’ sicut tantum est. Et ratio assignanda est sicut statim.</text:p>
      <text:h text:style-name="Heading_20_3" text:outline-level="3">Sed contra ista arguitur: Ex ipsis sequitur quod naturalis similitudo distincta huius termini scripti ‘homo’ est conceptus ultimatus</text:h>
      <text:p text:style-name="P470"><text:span text:style-name="T499">Sed hoc est falsum. </text:span><text:span text:style-name="T500">Falsitas consequentis probatur quia tunc sequeretur quod secundum illam significationem, secundum quam significat naturaliter proprie illum terminum scriptum ‘homo’ supponeret personaliter pro illo, sed hoc est falsum; igitur quod sequatur notum est.</text:span></text:p>
      <text:p text:style-name="P471"><text:span text:style-name="T500">Falsitas consequentis probatur quia tunc sequeretur quod ista consequentia vocalis esset bona “‘Homo’ est terminus incomplexus”; ergo ‘animal rationale’ est terminus incomplexus, quod patet quia illa consequentia mentalis, ubi pro </text:span><text:span text:style-name="T501">subiectis capientur termini mentales non-ultimati istorum terminorum ‘homo’, ‘animal rationale’, scilicet, ‘homo’ est terminus incomplexus; ergo “‘Animal rationale’ est terminus incomplexus” est bona; ergo ista vocalis erit bona consequentia tenet quia ista vocalis subordinatur isti mentali.</text:span></text:p>
      <text:p text:style-name="P472"><text:span text:style-name="T501">Sed antecedens patet quia in illa mentali arguitur a convertibilibus personaliter captis, quia convertuntur in mente non-ultimata, sed illas significationes /42a/ </text:span><text:span text:style-name="T502">secundum quas illi termini vocales convertuntur, ut patet ex dicitis. Et quod supponant personaliter clarum est.</text:span></text:p>
      <text:p text:style-name="P475"><text:soft-page-break/>Item, probatur quod illa vocalis sit bona, quia si sit mala, hoc ideo erit, quia non arguitur ab illis terminis personaliter captis, et si sic argueretur, esse bona. Sed in mentali non invenitur ille defectus; ergo illa mentalis erit bona et, ex consequenti, illa vocalis.</text:p>
      <text:p text:style-name="P473"><text:span text:style-name="T503">Item, in illa vocali ille terminus ‘homo’ supponit personaliter similiter, et ly ‘animal rationale’; ergo illa est bona. Antecedens patet, ille </text:span><text:span text:style-name="T504">terminus ‘homo’ supponit pro illo pro quo supponit conceptus non-ultimatus eius in consequentia illa mentali, et mediante eodem conceptu; ergo si ille conceptus in illa mentali supponat personaliter, similiter et ille terminus vocalis in illa vocali supponetur personaliter. Consequentia tenet quia ideo aliquis terminus dicitur supponere materialiter vel personaliter, quia supponit mediante tali vel tali conceptum. Et consimiliter potest probari propositum de illo termino ‘animal rationale’.</text:span></text:p>
      <text:p text:style-name="P483">Item ille terminus ‘homo’ supponit in illa vocali mediante conceptum ultimato; ergo personaliter. Et si dicas quod ille conceptus etiam est non-ultimatus et propterea non oportet quod supponat personaliter.</text:p>
      <text:p text:style-name="P476">Contra hoc arguitur quia saltem sequitur quod ly ‘buf’ in hac propositione “‘buf’ est terminus non significativus” supponeret personaliter, quod est falsum.</text:p>
      <text:p text:style-name="P476">Item etiam sequeretur quod posito quod ly ‘a’ significet proprie talem vocem ‘homo’ mediante conceptu non-ultimato eius, non supponeret personaliter pro illa, quod est falsum.</text:p>
      <text:p text:style-name="P476">Ad replicam respondetur negando quod illa consequentia vocalis sit bona, et negandum est etiam de illa mentali, et ad probationem dico quod licet in illa mentali arguatur a convertibilibus significative sumptus, tamen non arguitur secundum illa significationes secundum quas sunt convertibiles, et propterea non valet.</text:p>
      <text:p text:style-name="P477">Ad aliud quod tangis, nego quod propter illam causam illa vocalis non valeat, quia si illi termini proprie significarent se proprie, ex impositione mediantibus conceptibus mediantibus, quibus capiuntur illic, adhuc consequentia non valeret illis terminis captis secundum significationes secundum quas capiuntur, et tamen caperentur illi termini personaliter. Et propterea negandum est illud quod ‘asinus’, videlicet, quod si illi termini caperentur personaliter, illa consequentia valeret, sed ratio quare illa non valet debet assignari sicut assignata est de illa mentali.</text:p>
      <text:p text:style-name="P477">Ad alia quae tangis quid sit dicendum, patebit ex dicendis in suppositionibus.</text:p>
      <text:h text:style-name="Heading_20_3" text:outline-level="3">Ex his possunt deduci aliqua corollaria</text:h>
      <text:p text:style-name="P484">Primum: Dantur duae categoricae synonymae et subiectum unius supponit personaliter et subiectum alterius materialiter, patet de antecedentibus illarum duarum consequentiarum.</text:p>
      <text:p text:style-name="P484">Patet secundo quod aliquis terminus qui non est proprie significativus est synonymus cum termino significativo proprie, et ex consequenti, aliquis terminus stricte est synonymus cum non termino proprie. Et inde est quod non sequitur isti termini sunt synonymi secundum istas significationes, et unus illorum est terminus stricte, et significat proprie secundum unam illarum; ergo reliquus est terminus stricte vel significat proprie secundum unam illarum, nec ad terminos synonymos secundum aliquas significationes requiritur quod aliquis illorum proprie significet secundum unam illarum.</text:p>
      <text:p text:style-name="P484">Haec omnia sunt manifesta ex praedictis.</text:p>
      <text:h text:style-name="Heading_20_3" text:outline-level="3"><text:soft-page-break/>Secundo arguitur: Ex dicentis sequitur quod conceptus non-ultimatus de ly ‘homo’ significat omnes homines ad placitum</text:h>
      <text:p text:style-name="P479"><text:span text:style-name="T505">S</text:span>ed hoc est falsu; igitur falsitas consequentis probatur, quia tunc ille conceptus esset terminus secundum illam significationem ad placitu, sed hoc est falsum, igitur falsitas consequentis probatur quia tunc ille esset terminus mentalis secundum illam vel vocalis, vel scriptus, vel mixtus nullum istorum. Igitur quod sequatur patet ex divisione.</text:p>
      <text:p text:style-name="P478">Falsitas consequentis probatur, et signanter quod non sit mentalis secundum illam, quia de aliis membris non est quaestio, quia ex illo sequitur quod significat naturaliter proprie secundum illam, sed hoc est falsum; igitur consequentia tenet a definito cum aliquo addito ad definitionem cum consimili addito, et falsitas consequentis est manifesta.</text:p>
      <text:h text:style-name="Heading_20_3" text:outline-level="3">Ad hoc argumentum respondetur concesso quod ille conceptus sit terminus secundum illam significationem</text:h>
      <text:p text:style-name="P480">Immo, et quod sit mentalis secundum illam negando quod significet naturaliter proprie secundum illam, et ad illam consequentia dico quod non bene arguitur, propter variationem appellationis a definito cum aliquod addito /42b/ ad definitionem cum consimili, sed oportet sic argumentari:</text:p>
      <text:p text:style-name="Quotations">Est terminus mentalis secundum illam; ergo est significans secundum illam quod naturaliter proprie significat.</text:p>
      <text:p text:style-name="P481">Verum <text:span text:style-name="T506">est tamen quod posset poni talis appellatio in illa propositione. Est terminus mentalis secundum illam quod illa deberet negari. Sed ex illo non haberetur malitia divisionis. Et si dicas postquam: Ille terminus est mentalis secundum illam significationem, vel ergo mentalis ultimatus, sed illam vel mentalis non-ultimatus secundum illam. Sed nullum istorum igitur.</text:span></text:p>
      <text:p text:style-name="P482"><text:span text:style-name="T507">Ad hoc dico quod utraque pars illius consequentis posset bene concedi ad proportionabilem sensum, sicut concessum est quod est terminus mentalis secundum illam. Et si fiat argumentum ad defini</text:span><text:span text:style-name="T508">to cum aliquo addito ad definitionem cum consimili addito, consimiliter dicendum est sicut dictum est statim.</text:span></text:p>
      <text:h text:style-name="Heading_20_3" text:outline-level="3">Tertio arguitur contra ea quae dicta sunt in quarto corollario: Aliquis est conceptus non-ultimatus alicuius termini significantis ad placitum proprie, qui non significat eodem modo sicut ille terminus; <text:span text:style-name="T509">ergo in illo corollario praesupponitur falsum</text:span></text:h>
      <text:p text:style-name="P485">Consequentia tenet, et antecedens patet: “Volo quod ly ‘a’ imponatur ad significandum omnes homines, taliter quod nullus alius terminus imponatur per illud, aut debeat significare in potentia propinqua omnes homines ad placitum”. Per illud tunc, ille conceptus qui est naturalis similitudo distincta illius vocis et non-ultimatus termini significantis ad placitum proprie, prout ex terminis et casu apparet, et tamen non significat ad placitum eo modo quo illa littera igitur.</text:p>
      <text:p text:style-name="P486">Posset forte negari casus dato, tamen illo potest dici quod illud intelligitur extra tales casus per quos imponitur vox vel scriptura, et non naturalis similitudo eius distincta.</text:p>
      <text:p text:style-name="P486">Contra hoc arguitur: Extra tales casus contingit assumptum; igitur antecedens patet “<text:span text:style-name="T510">Volo quod quia habeat naturalem similitudinem distinctam de ly ‘homo’, non habito adhuc conceptu ultimatus </text:span><text:soft-page-break/><text:span text:style-name="T510">eius”. Hoc frequenter contingit, tunc contingit assumptum de illo conceptu ex quo non significat omnes homines, quia nec mediate se nec mediante aliquo alio igitur.</text:span></text:p>
      <text:p text:style-name="P490">Forte dices quod tunc bene contingit quod ille conceptus non significat eo modo quo ille terminus ‘homo’ significat actu, sed bene significat eo modo in potentia propinqua, et hoc sufficit quia illud corollarium non praesupponit quod actualiter significet illo modo et caetera.</text:p>
      <text:p text:style-name="P491">Contra hoc arguitur: Adhuc datur conceptus non-ultimatus termini significantis proprie, qui non significat eo modo in potentia propinqua et caetera. Antecedens patet, sint ibi Sortes et Plato, quorum Sortes sciat quod ly ‘homo’ significat proprie, et quid significat Plato vero non, et proferatur ille terminus ‘homo’, et quilibet illorum formet conceptum distincte repraesentantem illam vocem. Tunc ille quem format Plato est non-ultimatus illius vocis ‘homo’ significantis proprie, et non significat in potentia propinqua eo modo et caetera.</text:p>
      <text:p text:style-name="P491">Igitur maior patet ex terminis, et minor patet quia illa vox non significat in potentia propinqua proprie ipsi Platoni, nam alias iste terminus ‘homo’ in potentia propinqua significaret omnes homines Graecis, quod falsum est, et per consequens ille conceptus non significabit Platoni eo modo proprie quo illa vox, nec etiam conceptus significat in potentia propinqua alicui alteri eo modo quo illa vox, quia alias si conceptus quem tu habes de Sorte et poneretur solum in lapide, significaret in potentia propinqua naturaliter proprie.</text:p>
      <text:p text:style-name="P487">Ad argumentum responsum est usque ad ultimam replicam, ad quam dato casu nego quod ille conceptus quem Plato format de illa voce sit non-ultimatus, quia non est non-ultimatus apud alium a Platone nec apud Platonem, quia non est naturalis similitudo distincta alicuius quod est terminus proprie apud Platonem, quod requiritur loquendo consequenter ad dicta, et tunc definitio conceptus non-ultimatus intelligenda erit sic:</text:p>
      <text:p text:style-name="P487">Est naturalis similitudo distincta termini qui est terminus proprie apud illum qui illam naturalem similitudinem habet.</text:p>
      <text:p text:style-name="P487">Ex quo patet quod quantumcumque scias illum terminum ‘homo’ esse terminum proprie, dummodo nescias quid significat, proprie negandum est quod naturalis similitudo distincta quam habes de illo termino ‘homo’ sit conceptus non-ultimatus. Verum est tamen quod aliter posset dici, et difficultas esset ad nomen.</text:p>
      <text:p text:style-name="P487">Posset enim dici quod in tali casu, ille conceptus quem format Plato est non-ultimatus, /43a/ et tunc dicetur quod in tali casu est iterum instantia. Ut puta quando ille terminus cuius est naturalis similitudo distincta non significat proprie in potentia propinqua, illi qui habet illam naturalem similitudinem distinctam, et ita intelligatur illud quod tangitur in corollario.</text:p>
      <text:p text:style-name="P488">Et ex his patet solutio ad id quod posset ibi tangi, posito quod aliquando scivisses quid significabat proprie ille terminus ‘asinus’ sed iam sis oblitus. Scias tamen quod significat proprie et est terminus proprie, tunc videtur quod naturalis similitudo distincta quam habes de illo termino sit conceptus non-ultimatus, et non significat tibi proprie eo modo quo ille terminus, unde si in tali casu concedatur quod ille terminus ‘asinus’ in potentia propinqua significat tibi proprie. Idem dicendum est de illo conceptu, et tunc argumentum erit nullum.</text:p>
      <text:p text:style-name="P488">Si autem dicatur quod non in potentia propinqua significat tibi proprie, ille terminus ‘asinus’ dicatur consimiliter sicut ad ultimam replicam tactam.</text:p>
      <text:h text:style-name="Heading_20_3" text:outline-level="3"><text:soft-page-break/>Quarto: Arguitur ad idem conceptus reflexus qui est naturalis similitudo distincta</text:h>
      <text:p text:style-name="P489">Conceptus non-ultimati huius termini scripti ‘homo’ est conceptus non-ultimatus alicuius termini significantis ad placitum proprie omnes homines, et ille non significat ad placitum proprie omnes homines; <text:span text:style-name="T511">ergo illud corollarium praesuponit falsum.</text:span></text:p>
      <text:p text:style-name="P492">Consequentia tenet cum maiori, et minor patet quia si significaret ad placitu<text:span text:style-name="T512">m proprie omnes homines, hoc esset propter impositionem qua imponebatur ille terminus scriptus ‘homo’, sed hoc non patet, quia tunc ubicumque imponeretur aliquis terminus scriptus ad significandum proprie, per illud imponerentur infiniti conceptus distincti speciem, quia per illud imponeretur naturalis similitudo distincta illius termini scripti, et etiam naturalis similitudo distincta illius naturalis similitudinis, et sic in infinitum.</text:span></text:p>
      <text:p text:style-name="P493">Pro solutione argumenti est supponendum quod ideo, aliquis conceptus dicitur reflexus, quia secundum significationem naturaliter propriam, adaequate repraesentat conceptum, saltem capiendo conceptum large prout comprehendit actus syncategorematicos.</text:p>
      <text:p text:style-name="P493">Dicitur adaequate ad secludendum conceptus quibus subordinantur ly ‘ens’, et ly ‘qualitas’, et ly ‘terminus’ et alios huiusmodi. Ex quo patet quod nullus terminus mentalis qui naturaliter proprie significat aliqualiter de significatione totali, potest dici conceptus reflexus.</text:p>
      <text:p text:style-name="P493">Hic tamen possent incidere duo dubia:</text:p>
      <text:list text:style-name="L27">
        <text:list-item>
          <text:p text:style-name="P953">Primum. Posito quod iste terminus mentalis ‘homo’ ponatur sollum in lapide, an tunc ille conceptus qui distincte repraesentat illum maneat reflexus sicut antecedente.</text:p>
        </text:list-item>
        <text:list-item>
          <text:p text:style-name="P953">Secundum. Posito quod ille terminus mentalis ‘homo’ desinat esse et maneat conceptus distincte repraesentans illum an maneat reflexus, et ex consequenti utrum stet habere conceptum reflexum, non habendo directum cuius ille est reflexus.</text:p>
        </text:list-item>
      </text:list>
      <text:p text:style-name="P494"><text:s/><text:span text:style-name="T513">Ad ista dubia potest responderi affirmative et etiam negative, et difficultas solum erit ad nomen:</text:span></text:p>
      <text:list text:style-name="L28">
        <text:list-item>
          <text:p text:style-name="P954">Si enim dicatur quod ad conceptum reflexum sufficit quod adaequate repraesentet aliquid quod est, vel erit, vel fuit, vel potest esse conceptus, oportet respondere affirmative.</text:p>
        </text:list-item>
        <text:list-item>
          <text:p text:style-name="P954">Si vero dicatur quod requiritur quod adaequate repraesentet aliquid quod est conceptus, tunc oportet respondere negative, et ita dicendo licet non stet habere conceptum reflexum, non habendo directum cuius est reflexus. Tamen quocumque reflexo dato stat habere illum absque hoc quod habeatur directus, quem ille repraesentat.</text:p>
        </text:list-item>
      </text:list>
      <text:p text:style-name="P494"><text:s/><text:span text:style-name="T514">Melius tamen est dicere promo istorum modorum, qualitercumque tamen dicatur, concedendum est quod aliquis est conceptus reflexus qui non potest manere ens vel conceptus, saltem naturaliter absque hoc quod ille conceptus, cuius est reflexus, fit hoc, patet de notitia intuitiva conceptus directi.</text:span></text:p>
      <text:h text:style-name="Heading_20_3" text:outline-level="3">Ex praedictis patet aliqua corollaria</text:h>
      <text:list text:style-name="L29">
        <text:list-item>
          <text:p text:style-name="P955">Primum. Dicitur <text:span text:style-name="T515">in infinitum potest procedi in conceptibus reflexis ascendendo, nec sequitur ex illo quod infinitos conceptus, categorematice constituentes unum actu, possumus habere, </text:span><text:soft-page-break/><text:span text:style-name="T515">quia non oportet quando formamus aliquem reflexum quod omnes descendendo consequenter usque ad ultimum, qui nullo modo est reflexus actualiter sint.</text:span></text:p>
        </text:list-item>
        <text:list-item>
          <text:p text:style-name="P956">Secundum. Quilibet conceptus reflexus est directus.</text:p>
        </text:list-item>
        <text:list-item>
          <text:p text:style-name="P956">Tertium. Descendendo consequenter in conceptibus reflexis tandem deveniendum est ad unum qui non est reflexus.</text:p>
        </text:list-item>
      </text:list>
      <text:p text:style-name="P495">Tunc pro difficultate argumenti est advertendum quod sustentabile /43b/ est quod talis conceptus reflexus illius termini mentalis non ultimati significet ad placitum omnes homines, et eius oppositum est etiam sustentabile, et dicendo secundo modo illud quartum corollarium deberet intelligi de conceptibus non-ultimatus, quia non sunt reflexi, dicendo autem primo modo oporteret concedere id quod tangitur in argumento, videlicet, quod per impositionem illius termini scripti ‘homo’ infiniti termini mentales specie distincti imponebantur. Nec ex illo potest deduci inconveniens.</text:p>
      <text:p text:style-name="P495">Et si teneatur quod ille conceptus reflexus non repraesentet ad placitum omnes homines, eadem facilitate posset defendi quod ille non significat naturaliter illud quod ille conceptus, cui est conceptus reflexus, naturaliter repraesentat. Ut puta illum terminum scriptum ‘homo’, et ad rationem quae potest fieri, quia conceptus non-ultimatus huius termini scripti ‘homo’, significat omnes hominis ex eo quia ille terminus scriptus significat illos; ergo simile continget in proposito negandum esset antecedens, unde non ideo est, sed ex eo qui quando imponebatur ille terminus scriptus ‘homo’ imponebatur ille conceptus.</text:p>
      <text:p text:style-name="P496"><text:span text:style-name="T516">Et si dicas ille conceptus reflexus facit apprehendere illum conceptum </text:span><text:span text:style-name="T517">directum; ergo significat illud quod significat ille directus. Consequentia tenet quia non aliter vox significat mediante conceptu, nisi quia vox facit apprehendere mediante illo conceptu.</text:span></text:p>
      <text:p text:style-name="P496"><text:span text:style-name="T517">Ad hoc dicendum est quod aliter ille conceptus reflexus facit apprehendere directum, et aliter vox facit apprehendere conceptum quo mediante significat, quia vox in ratione signi, et ille conceptus in ratione signati. </text:span><text:s/></text:p>
      <text:p text:style-name="P497">Sed quantumcumque teneatur quod ille conceptus reflexus illius conceptus non-ultimati non significet ad placitum illud quod ille conceptus non-ultimatus significat, adhuc tamen poterit cum hoc sustentari quod naturaliter significet illud quod ille non-ultimatus naturaliter proprie repraesentat, et facile potest defendi ex superioribus dictis. Et praedictis potest apparere quod poterit dari aliquis conceptus reflexus absolutus, et poterit dari aliquis talis connotativus, et poterit dari aliquis talis primae intentionis et aliquis talis secundae.</text:p>
      <text:p text:style-name="P497">His suppositis qualitercumque dicatur facile apparet solutio ad argumentum.</text:p>
      <text:h text:style-name="Heading_20_3" text:outline-level="3">Sed circa praedicta occurrunt aliqua dubia</text:h>
      <text:list text:style-name="L30">
        <text:list-item>
          <text:p text:style-name="P957">Primum. <text:span text:style-name="T518">Utrum cuilibet propositioni significanti ad placitum proprie correspondeant propositio mentalis ultimata et mentalis non-ultimata. Similiter et cuilibet consequentiae.</text:span></text:p>
        </text:list-item>
        <text:list-item>
          <text:p text:style-name="P957"><text:span text:style-name="T518">Secundum. Utrum aggregatum ex conceptu ultimato de ly ‘homo’ et ex conceptu non-ultimato eius et ex ly ‘et’ </text:span><text:span text:style-name="T519">s</text:span><text:span text:style-name="T518">it conceptus ultimatus vel non-ultimatus. Et si sit ultimatus, utrum possit dici non-ultimatus.</text:span></text:p>
        </text:list-item>
      </text:list>
      <text:list text:style-name="L31">
        <text:list-item>
          <text:p text:style-name="P958"><text:soft-page-break/>Ad primum respondetur quod sic, unde quaelibet propositio vocalis habet conceptum non-ultimatus, qui est simplex et in repraesentando illam propositionem naturaliter proprie, saltem <text:span text:style-name="T520">si illa propositio possit esse unum ens, quia alia deberet esse complexus complexione distanti, quemadmodum copulatum naturaliter communiter significans Sortem et Platonem, quo mediante etiam Sortes et Plato significant se naturaliter communiter.</text:span></text:p>
          <text:p text:style-name="P959"><text:span text:style-name="T520">Sed in significando propositionaliter, sicut significat illa propositio, esset </text:span><text:span text:style-name="T521">terminus complexus et propositio. Et si propositio illa sit vel possit esse unum ens, tunc ille conceptus non significabit propositionaliter expresse, iuxta significationes suarum partium, sed solum significaret aequivalenter. Si tamen non posset esse unum ens bene significaret propositionaliter illo modo iuxta significationes suarum partium.</text:span></text:p>
        </text:list-item>
        <text:list-item>
          <text:p text:style-name="P965">Ad secundum dico quod si ly ‘et’ ad placitum uniat illos duos conceptus, et non secundum significationem naturaliter propriam, tunc illud copulatum non erit terminus mentalis ultimatus nec non-ultimatus. Si tamen secundum significationem naturaliter propriam uniat illos terminos, dicendum est quod ille est ultimatus et non non est non-ultimatus.</text:p>
          <text:p text:style-name="P965">Sed tunc esset difficultas capto copulato ex conceptu non-ultimato de ly ‘homo’ et ex conceptus non-ultimato de ly ‘asinus’, et ex ly ‘et’ naturaliter proprie uniente illos conceptus an tunc illud copulatum sit terminus mentalis non-ultimatus.</text:p>
          <text:p text:style-name="P965">Ad hoc potest dici quod sic, quia quantumcumque non sit naturalis similitudo distincta termini, capiendo terminum proprie, est naturalis similitudo distincta terminorum proprie, et tunc illud copulatum non significaret ad placitum, nisi forte diceretur quod illa coniunctio et naturaliter proprie unit /44a/ illos terminos secundum suas significationes ad placitum.</text:p>
          <text:p text:style-name="P965">Posset etiam teneri quod non est conceptus non-ultimatus, quia ad illud requiritur quod sit naturalis similitudo distincta termini proprie, et non sufficit quod sit naturalis similitudo <text:span text:style-name="T522">distincta terminorum proprie. Ex quo patet quod copulatum ex termino mentali ultimato de ly ‘homo’ et ex mentali non-ultimato de ly ‘asinus’ non est terminus mentalis non-ultimatus quantumcumque concederetur quod significet omnes homines et omnes asinos ad placitum, eo modo quo istud copulatum scriptum ‘homo et asinus’, et si ita diceretur quantumcumque posset, bene concedi quod ille terminus est mentalis secundum illam significationem, immo, etiam posset ad propo</text:span><text:span text:style-name="T523">r</text:span><text:span text:style-name="T522">tionabilem sensum concedi quod est mentalis ultimatus. Secundum illam tamen ad nullum deberet concedi quod est non-ultimatus secundum illam.</text:span></text:p>
        </text:list-item>
      </text:list>
      <text:p text:style-name="P499"/>
      <text:h text:style-name="P869" text:outline-level="2">De termino complexo et incomplexo</text:h>
      <text:h text:style-name="Heading_20_3" text:outline-level="3">Sequitur alia divisio de ly ‘terminus’, unde terminorum quidam est complexus et quidam incomplexus</text:h>
      <text:p text:style-name="P500"><text:span text:style-name="T524">Huius divisionis divisum potest esse ly ‘terminus’ in toto suo ambitu ex quod quilibet terminus signi</text:span><text:span text:style-name="T525">ficans aliquo modo, sive proprie sive improprie, est complexus vel incomplexus in significando.</text:span></text:p>
      <text:p text:style-name="P502">Potest etiam pro divisio capi ille terminus terminus stricte, et tunc consimiliter deberet capi in membris dividentibus, et posset etiam capi sicut in capitulo de termino et consimiliter deberet tunc capi in membris dividentibus, ita quod in effectum, qualitercumque capiatur ille terminus terminus pro diviso, eodem modo debet capi in membris dividentibus. Sed quidquid sit in proposito capiemus illum terminum terminus large pro diviso. Unde terminus complexus sic definitur.</text:p>
      <text:h text:style-name="Heading_20_3" text:outline-level="3">Est terminus habens plurales partes significantes iuxta significationem totalem illius formaliter vel aequivalenter</text:h>
      <text:p text:style-name="P503">Dicitur in definitione significantes iuxta significationem totalem illius propter duo:</text:p>
      <text:list text:style-name="L32">
        <text:list-item>
          <text:p text:style-name="P966">Primo. Ad secludendum terminum qui habet partes significantes, sed non iuxta significationem totalem illius, quemadmodum contingit de ly ‘dominus’.</text:p>
        </text:list-item>
        <text:list-item>
          <text:p text:style-name="P960"><text:span text:style-name="T526">Secundo. Dicitur illud ad denotandum quod ad hoc quod aliquis terminus sit complexus non sufficit quod habeat partes significantes iuxta significationem partialem illius, sed requiritur </text:span><text:span text:style-name="T527">quod habet partes significantes iuxta significationem totalem illius, unde si istud aggregatum “homo est animal” et ‘b’ sit unum ens, et non habeat aliquam significationem totalem complexam, quantumcumque illa pars “homo est animal” significet complexe, et illud totum habeat partes significantes iuxta talem significationem illius partis complexam, quae potest dici significatio partialis illius totius, non propterea illud totum debet dici terminus complexus.</text:span></text:p>
        </text:list-item>
      </text:list>
      <text:p text:style-name="P504">Dicitur in definitione formaliter propter terminos qui expresse habent partes et caetera, cuiusmodi est iste terminus “Homo albus” et similes.</text:p>
      <text:p text:style-name="P504">Dicitur aequivalenter propter terminos complexos qui non expresse habent tales partes et caetera, quemadmodum contingit de ista littera ‘a’, posito quod significet eodem modo sicut ista propositio “Homo est albus” et de similibus.</text:p>
      <text:p text:style-name="P505">Sed hic occurrit difficultas quare aliquis terminus dicatur formaliter habere partes significantes iuxta significationem totalem ipsius, et quare aliquid dicatur habere aequivalenter:</text:p>
      <text:list text:style-name="L33">
        <text:list-item>
          <text:p text:style-name="P961"><text:span text:style-name="T528">Ad primum dico quod ideo est quia significat aliquo modo de significatione totali, et ille modus significandi resultat in ipso ex significationibus partium eius. </text:span><text:span text:style-name="T529">Taliter conceptis sicut concipiuntur in illo.</text:span></text:p>
        </text:list-item>
        <text:list-item>
          <text:p text:style-name="P967">Ad secundum dico quod ideo est quia significat de significatione totali aliquo modo, et est synonymus secundum illam significationem alicui termino secundum significationem totalem, quia habet partes formaliter significantes iuxta illam significationem totalem ipsius.</text:p>
          <text:list>
            <text:list-item>
              <text:p text:style-name="P967"><text:soft-page-break/>Ex quo patet quod si aliquid habet formaliter partes significantes iuxta significationem totalem ipsius, illud habet aequivalenter partes significantes iuxta talem significationem totalem illius. Non tamen oportet si aliquid aequivalenter habeat tales quod formaliter habeat tales.</text:p>
            </text:list-item>
            <text:list-item>
              <text:p text:style-name="P967">Patet secundo quod si haec /44b/ littera ‘a’ significet tantum sicut ly “Sortes est currens”, tunc ista “‘Homo est animal’ et ‘a’” habebit partes formaliter significantes iuxta significationem totalem ipsius, secundum quam significat quod homo est animal et Sortes est currens.</text:p>
            </text:list-item>
            <text:list-item>
              <text:p text:style-name="P962"><text:span text:style-name="T529">Patet tertio </text:span><text:span text:style-name="T530">quod si ly ‘currit’ non reperiatur in mente, ista “Sortes currit” non habebit partes formaliter significantes iuxta significationem totalem illius, secundum quam significat quod Sortes est currens, sed solum habebit aequivalenter, et ex consequenti tento illo ly ‘currit’ non habet unam significationem totalem, nec est unus terminus secundum quod est verbum adiectivum magis quam aggregatum ex ly “et” et ly ‘currens’, non capiendo ly ‘currens’ prout exercet duo officia.</text:span></text:p>
            </text:list-item>
          </text:list>
        </text:list-item>
      </text:list>
      <text:h text:style-name="P887" text:outline-level="3">Terminus incomplexus potest sic definiri</text:h>
      <text:p text:style-name="Text_20_body">Est terminus significans aliquo modo de significatione totali, non habens plures partes significantes iuxta illam significationem totalem ipsius formaliter vel aequivalenter</text:p>
      <text:list text:style-name="L34">
        <text:list-item>
          <text:p text:style-name="P963"><text:span text:style-name="T531">Ex his duabus </text:span><text:span text:style-name="T532">definitionibus patet primo quod idem terminus est complexus et incomplexus secundum diversas significationes totales, neque ex hoc si bene intelligas distinctiones, poteris aliquam contradictionem d</text:span><text:span text:style-name="T533">e</text:span><text:span text:style-name="T532">ducetur.</text:span></text:p>
        </text:list-item>
        <text:list-item>
          <text:p text:style-name="P964"><text:span text:style-name="T532">Patet secundo quod in hac propo</text:span><text:span text:style-name="T533">sitione “Homo est animal” est propositio vera, in qua sicut communiter solet dici ly ‘homo’ est animal capiatur materialiter pro se si capiatur discrete pro se, et ipsa possit esse unum ens.</text:span></text:p>
        </text:list-item>
      </text:list>
      <text:p text:style-name="P507">Poterit capi mediante conceptu incomplexo singulari qui erit non-ultimatus illius.</text:p>
      <text:p text:style-name="P507">Si autem non possit esse unum ens, capietur mediante quodam copulato singulari, cuius una pars naturaliter proprie et singulariter significabit primam partem illius propositionis, et secunda simili modo significabit secundam, et tertia simili modo significabit tertiam, saltem si quaelibet illarum trium partium principalium illius propositionis sit unum ens, et ex consequenti tunc, illa propositio naturaliter communiter significabit se complexe, mediante illo copulato. Nec oportet quod in sic significando habeat partes formaliter significantes iuxta talem significationem totalem illius, prout ex dictis potest apparere.</text:p>
      <text:p text:style-name="P507">Non obstante, quod illae tres partes eius significent mediantibus tribus partibus illius copulati naturaliter communiter. Et proportionabiliter loquendum est cum consimili distinctione si capiatur illa propositio discrete materialiter pro aliqua alia propositione aut communiter.</text:p>
      <text:p text:style-name="P501"><text:span text:style-name="T533">His tamen non obstantibus, quantumcumque illa propositio possit esse universaliter ens, adhuc in potentia propinqua significabit naturaliter communiter se, aut illas tres partes quae sunt ipsamet mediante tali copulato naturaliter communiter. Hoc facile potest concludi ex quo tunc illae tres partes in potentia propinqua naturaliter communiter repraesentat se ipsas, mediante tali copulato, nec obstat quin tunc in potentia propinqua significet se illa propositio incomplexe naturaliter </text:span><text:soft-page-break/><text:span text:style-name="T533">communiter. Et simile potest contingere de aggregato ex his tribus litteris ‘a’, ‘b’, ‘c’, sive illud possit esse unum ens sive non, sicut de illa propositione “Homo est animal” capiendo istam propositionem “‘a’, ‘b’, ‘c’”est aggregatum ex his tribus litteris.</text:span></text:p>
      <text:p text:style-name="P507">Patet tertio quod quaecumque res sive possit constituere unum sive non, possunt significare se naturaliter communiter, mediante conceptu complexo, et ex consequenti, quaecumque tales poterunt dici unus terminus complexus.</text:p>
      <text:p text:style-name="P507">Patet quarto quod quantumcumque divisum huius divisionis caperetur stricte vel non, eo modo quo capitur in capitulo de termino, et proportionabiliter caperetur membra consimiliter, etiam deberent definiri sicut definita, capiendo in quacumque illarum, illum terminum ‘terminus’ loco generis eo modo quo capitur pro diviso.</text:p>
      <text:p text:style-name="P507">Sed hic occurrit difficultas. Si divisum capiatur stricte, et proportionabiliter capiantur membra dividentia, quia videntur quod ista oratio “‘a’ est ‘b’” sit terminus complexus, capiendo ly ‘terminus complexus’ sicut tunc caperetur, et tamen non videtur habere partes significantes iuxta significationem et caetera, quia ad terminum complexum, isto modo requiretur quod habeat partes proprie significantes et caetera, et illa oratio non sic se habet et caetera, quia quantumcumque una pars eius proprie significet tamen non aliae.</text:p>
      <text:p text:style-name="P506">Pro solutione huius, pono propositiones:</text:p>
      <text:list text:style-name="L35">
        <text:list-item>
          <text:p text:style-name="P968"><text:span text:style-name="T534">Prima. Ad terminum complexum proprie non requiritur quod formaliter habet partes proprie significantes iuxta significationem totalem illius et caetera, sed satis est quod aequivalenter /45a/ </text:span><text:span text:style-name="T535">habeat propositio pro utraque partes est clara.</text:span></text:p>
        </text:list-item>
        <text:list-item>
          <text:p text:style-name="P969">Secunda. Capiendo ly ‘<text:span text:style-name="T536">terminus complexus’ isto modo, in definitione eius debet capi ly ‘terminus proprie’, et ly ‘significans’ aliquo modo de significatione totali debet etiam capi proprie. Propositio de se est clara.</text:span></text:p>
        </text:list-item>
        <text:list-item>
          <text:p text:style-name="P970">Tertia. Cum in illa definitione dicitur habens partes significantes indifferenter, ly ‘significantes’ poterit capi proprie, et poterit capi improprie, et utroque modo definitio erit sufficiens postquam in ipsa ponitur ly ‘formaliter’ vel ‘aequivalenter’.</text:p>
        </text:list-item>
        <text:list-item>
          <text:p text:style-name="P970">Quarta. Aliquis est terminus complexus isto modo, qui formaliter habet partes significantes et caetera, large capiendo ly ‘significantes’, et non habet partes formaliter significantes et caetera. Stricte propositio patet de ista propositione “‘a’ est ‘b’”.</text:p>
        </text:list-item>
      </text:list>
      <text:p text:style-name="P508">Ex his igitur patet solutio difficultatis quantumcumque enim diceretur quod ad terminum complexum isto modo requiritur, quod habeat partes proprie significantes et caetera, postquam ponitur ly ‘formaliter’ vel ‘aequivalenter’ adhuc stabit id quod dictum est. <text:s/></text:p>
      <text:h text:style-name="Heading_20_3" text:outline-level="3"><text:span text:style-name="T537">Contra definitionem termini complexi arguitur ly ‘omnis homo’ est terminus complexus extra propositionem, et tamen non habet plures partes significantes extra propositionem igitur</text:span><text:span text:style-name="T533"> <text:s text:c="3"/></text:span><text:span text:style-name="T531"><text:s text:c="2"/></text:span><text:span text:style-name="T529"><text:s/></text:span><text:span text:style-name="T528"><text:s text:c="3"/></text:span><text:span text:style-name="T526"><text:s/></text:span><text:span text:style-name="T520"><text:s/></text:span><text:s text:c="2"/></text:h>
      <text:p text:style-name="P513">AD hoc posset forte dici quod ly ‘omnis’ significat adhuc extra propositionem, sicut superius tangebatur, et ita dicendo argumentum esset nullum, sed tenendo quod non possit significare extra propositionem aliter esse dicendum, et pro illo modo dicendi suppono quod ly ‘omnis homo’ non poterit etiam significare extra propositionem tenendo illud.</text:p>
      <text:p text:style-name="P514"><text:soft-page-break/>Tunc dico quod ista propositio ly “‘omnis homo’ est terminus complexus extra propositionem” potest distingui, quia potest capi in hoc sensu ly ‘omnis homo’ extra propositionem est aliquid quod est terminus significans aliquo modo de significatione totali, qui habet plures partes et caetera. Et in hoc sensu illa est vera, quia ly ‘significans’ et ly ‘significantes’ dicuntur aptitudinem in potentia propinqua et non actu.</text:p>
      <text:p text:style-name="P515">Alio modo potest capi in tali sensu, scilicet, quod ly ‘extra propositionem’ appellet supra ly ‘significans’ aliquod modo de significatione totali, <text:s/>vel supra ly ‘partes significantes’ et caetera, et sic nego illam propositionem.</text:p>
      <text:p text:style-name="P515">Minor etiam argumenti posset distingui iuxta proportionabiles sensus, et in sensu in quo illa determinatio appellaret supra ly ‘significantes’ concedenda esset, et in alio neganda.</text:p>
      <text:p text:style-name="P515">Si igitur capias maiorem et minorem in sensibus in quibus debent concedi, neganda est consequentia.</text:p>
      <text:p text:style-name="P498"><text:span text:style-name="T539">Si autem capias alteram </text:span><text:span text:style-name="T540">illarum in sensu in quo est neganda, argumentum non procedit, et simile argumentum potest fieri demonstrato uno termino complexo qui non significet actu de significatione totali, nec habet partes actu significantes iuxta significationem et caetera,arguendo sic iste est terminus complexus actu, tamen non habet plures partes significantes actu et caetera, et proportionabiliter omnino dicendum est.</text:span><text:span text:style-name="T538"> </text:span><text:s/></text:p>
      <text:p text:style-name="P509">Secundo <text:span text:style-name="T541">ar</text:span>guitur: <text:span text:style-name="T541">I</text:span>ste terminus ‘homo albus’ est terminus complexus, tamen non habet plures partes et caetera; igitur minor patet, nulla partes eius significant iuxta significationem totalem illius, formaliter vel aequivalenter; ergo non habet plures partes et caetera. Consequentia tenet et antecedens patet, quia dato eius opposito, si aliquae partes eius significent iuxta significationem totalem illius, illud continget de his duabus partibus eius ‘homo’ ‘albus’, sed hoc est falsum; igitur consequentia tenet cum maiori, et minor patet “Istae quattuor syllabae” demonstrando illas quattuor syllabas ex quibus illi termini resultant, non significat iuxta significationem totalem illius termini formaliter vel aequivalenter, et illae quattuor syllabae sunt illi duo termini ‘homo’ ‘albus’; ergo illi duo termini non significant et caetera.</text:p>
      <text:p text:style-name="P509">Consequentia tenet expositorie et maior et minor sunt manifestae.</text:p>
      <text:h text:style-name="Heading_20_3" text:outline-level="3">Ad argumentum respondentur concessa maiori, negando minorem, et ad probationem nego antecedens</text:h>
      <text:p text:style-name="P510">Et ad probationem concessa maiore nego minorem, et ad eius probationem distinguo illam maiorem, quia vel capis illam in isto sensu, scilicet: “istae quattuor syllabae non sunt illae quattuor syllabae significantes iuxta significationem totalem et caetera”. Et sic concedo illam, similiter et minorem, et nego consequentiam.</text:p>
      <text:p text:style-name="P510">Si autem capias illam in isto sensu: “illae quattuor syllabae non sunt significantia vel aliqui termini significantes et caetera” et sic nego illam.</text:p>
      <text:h text:style-name="Heading_20_3" text:outline-level="3"><text:soft-page-break/>Tertio arguitur: Posit<text:span text:style-name="T542">o quod ista littera ‘a’ sit imposita ad significandum eo modo quo ly ‘homo albus’, tunc ly ‘a’ est terminus complexus et non habet plures partes /45b/ </text:span><text:span text:style-name="T543">significantes et caetera</text:span></text:h>
      <text:p text:style-name="P516">Igitur consequentia tenet cum maiori, et minor patet quia quibuscumque partibus demonstratis falsum est quod habeat istas partes significantes et caetera.</text:p>
      <text:p text:style-name="P511"><text:span text:style-name="T544">Fortes dices quod demonstratis partibus </text:span><text:span text:style-name="T545">termini mentales cui subordinatur in significando secundum illam impositionem, verum est dicere quod ille terminus habet illas partes significantes et caetera. Tunc supponam quod non sit actualiter aliquis terminus synonymus illi in sic significando qui habeat expresse partes et caetera, tunc procedet argumentum.</text:span></text:p>
      <text:h text:style-name="Heading_20_3" text:outline-level="3">Et confirmatur ratio, retento illo casu nullae partes illius litterae ‘a’ significant iuxta significationem et caetera; ergo illa littera ‘a’ non habet partes formaliter et caetera</text:h>
      <text:p text:style-name="P523">Consequentia videtur manifesta, et antecedens patet propter non suppositionem sibi.</text:p>
      <text:h text:style-name="Heading_20_3" text:outline-level="3">Pro solutione argumenti et confirmationis occurrit ista difficultas discutienda, ex cuius dissolutione dependet solutio illarum difficultatum</text:h>
      <text:p text:style-name="P512"><text:span text:style-name="T546">Difficultas est haec, quid requiratur ad hoc quod iste </text:span><text:span text:style-name="T547">terminus, scilicet habens partes significantes iuxta significationem totalem illius, formaliter vel aequivalenter supponat pro aliquo, an requiratur ad illud quod aliquid habet partes quae significent in potentia propinqua, iuxta significationem synonymam significationi totali illius.</text:span></text:p>
      <text:p text:style-name="P517"><text:span text:style-name="T547">Pro solutione huius difficultatis solum tangam unum modum dicendi per quem facillime et clarissime illa difficultas, et ex consequenti difficultates argumenti et confirmationis poterunt dissolvi pro illo; igitur pono istam propositionem: “</text:span>In definitione termini complexi illa particula, scilicet habens plures partes significantes et caetera, non capitur secundum significationem quam videtur habere ab illis partibus, <text:span text:style-name="T548">sed capitur loco huius disiuncti, scilicet habens plures partes significantes iuxta significationem totalem illius, vel aequivalens in significando alicui habenti plures partes significantes iuxta significationem synonymam <text:s/>illi significationi totali illius. </text:span><text:span text:style-name="T549">Et ibi ly ‘aequivalens’ dicit aptitudinem in potentia propinqua, ita quod in effectu, definitio termini complexi in toto rigore, procedendo debet hoc modo dari vel intelligi”.</text:span></text:p>
      <text:p text:style-name="Quotations">Terminus complexus est terminus significans aliquo modo de significatione totali qui formaliter habet plures partes significantes iuxta illam significationem totalem illius, vel aequivalet in significando alicui habenti plures partes significantes iuxta significationem synonymam ili significationi totali illius, capiendo ibi ly ‘aequivalet’ ut dictum est, et proportionabi<text:span text:style-name="T550">l</text:span>iter debet dari vel intelligi definitio termini incomplexi.</text:p>
      <text:p text:style-name="P518">Tunc respondeo ad argumentum datis illis quae supponis, concesso quod quibuscumque partibus demonstratis illa sit falsa.</text:p>
      <text:p text:style-name="P519">Concedo ex consequenti quod illa est falsa, ly ‘a’ habet plures partes significantes et caetera, capiendo illam in sensu quem videtur facere iuxta illa significationes partium. Sed ex hoc non <text:soft-page-break/>sequitur aliquid contra definitionem, quia non sic debet capi illa particula in definitione, scilicet habens plures partes, sed debet capi sicut dictum est.</text:p>
      <text:p text:style-name="P519">Et si arguas contra hoc, quia adhuc videtur esse falsum, in illo casu, quod ly ‘a’ habet plures partes significantes et caetera, quia si illa sit vera hoc erit ex eo, <text:span text:style-name="T551">quia in illo casu, verum est quod ly ‘a’ in potentia propinqua aequivalet in significando alicui formaliter, habenti plures partes et caetera. Sed hoc non, quia videtur etiam quod ly ‘partes significantes’ non supponat in illo casu.</text:span></text:p>
      <text:p text:style-name="P520"><text:span text:style-name="T551">Ad hanc replicam </text:span><text:span text:style-name="T552">nego quod non supponat ille terminus, quia ratione de ly ‘in potentia propinqua’ ampliatur ly ‘</text:span><text:span text:style-name="T555">h</text:span><text:span text:style-name="T552">abenti plures partes et caetera’. Ex consequenti ly ‘partes ampliatur’ et hoc ad quattuor differentias temporum, nec ad veritatem illius requiritur quod aliquid in potentia propinqua, habeat partes et caetera, nec quod aliquae partes alicuius in potentia propinqua significant iuxta significationem et caetera. Et inde est quod ista consequentia non valet: Ly ‘a’ in potentia propinqua aequivalet in significando alicui habenti plures partes et caetera; ergo aliquid habens plures partes et caetera in potentia propinqua aequivalet in significando illi termino ‘a’ et caetera.</text:span></text:p>
      <text:p text:style-name="P521">Ad confirmationem argumenti nego illam consequentiam, et dico breviter quod si ly ‘habens plures partes significantes’ caperetur <text:span text:style-name="T553">in definitione secundum significationem quam videtur habere iuxta significationes illarum partium, bene valet illa consequentia. Sed capiendo sicut dictum est non valet.</text:span></text:p>
      <text:h text:style-name="Heading_20_3" text:outline-level="3">Quarto arguitur. /46a/ Volo quod isto aggregato “Homo est albus” ly ‘est’ deponatur a significationem secundum quam unit, sed totum illus aggregatu imponatur ad significandum tantum quamtum significat hoc totum “Homo albus”</text:h>
      <text:p text:style-name="P522"><text:span text:style-name="T554">Tunc sic ex defini</text:span><text:span text:style-name="T556">tione termini incomplexi sequitur quod illo facto, illud aggregatum est terminus incomplexus secundum significationem quam habet ab illa impositione, sed hoc est falsum igitur. Falsitas consequentis est nota et quod sequatur patet, quia non habet partes significantes iuxta illam significationem totalem illius formaliter vel aequivalenter, quia si haberet maxime haberet formaliter, et haberet illas duas scilicet “Homo albus”, sed hoc non, quia tunc sequeretur quod seclusa illa impositione etiam haberet illas partes significantes iuxta significationem illius, et per consequens esset terminus complexus.</text:span></text:p>
      <text:p text:style-name="P524">Ad hoc argumentum datis his quae supponis, dico quod tunc ille terminus non habet illas partes significantes iuxta illam significationem totalem illius formaliter, quia illa significatio totalis illius non resultat ex illis significationibus illarum partium, ex quo ex illis sic conceptus secundum illas significationes quacumque alia impositione seclusa non resultaret de significatione totali illo modo, et ex consequenti, ita dicendo non habebit partes significantes iuxta illam significationem totalem illius formaliter, habebit tamen aequivalenter.</text:p>
      <text:p text:style-name="P525">Hoc supposito respondeo ad argumentum negando sequelam, et ad probationem nego assumptum, et ad probationem nego iterum assumptum utrum tamen posset concedi quod aequivalenter habeat illas et caetera. Ad hoc dico quod si illud capitur in hoc sensu, scilicet secundum illam significationem totalem aequivalenter in significando aggregato ex illis significantibus iuxta <text:soft-page-break/>significationem, illius aggregati synonymam illi totali, dico quod debet concedi. Si autem in alio oporteret videre quis esset ille et secundum exigentiam illius ita oportebit dicere.</text:p>
      <text:p text:style-name="Text_20_body"/>
      <text:h text:style-name="P869" text:outline-level="2">Duplex est terminus complexus. Quidam est complexus complexionem distanti et quidam est complexus complexione indistanti</text:h>
      <text:h text:style-name="P888" text:outline-level="3">Terminus complexus complexione distanti</text:h>
      <text:p text:style-name="Text_20_body"><text:span text:style-name="T557">E</text:span>st terminus significans aliquo modo de significatione totali <text:span text:style-name="T557">qui formaliter vel aequivalenter habet praecise tres partes principales significantes iuxta illam significationem totalem illius quarum duae per reliquam illarum coniunguntur.</text:span></text:p>
      <text:p text:style-name="P526">Exemplum patet de ista propositione “Homo est animal” et de ly “Sortes et Plato”. Et si teneatur quod verba adiectiva sunt incomplexa, ubi dicitur formaliter vel aequivalenter habet praecise et caetera, adde vel praecise duas significantes et caetera, quarum una seipsam cum altera coniungit, et hoc additur ut comprehendatur ista “Sortes currit” et similes.</text:p>
      <text:p text:style-name="P526">Sed hic occurrit difficultas quid in proposito per partem principalem alicuius termini intelligi debet. Huius dubitationis solutio difficilior est quam appareat prima facie, quia secundum communem modum loquendi, ista propositio “Homo est animal album” habet praecise tres partes principales, et tamen qualitercumque fiat assignatio illius quod requi<text:span text:style-name="T558">ri</text:span>tur et sufficit ad partem principalem. Videtur quod illa “Homo est animal” sit pars princip<text:span text:style-name="T558">alis illius, et ex consequenti ly ‘homo’ non esset pars principalis illius.</text:span></text:p>
      <text:p text:style-name="P527">Ideo pro ista difficultate, dico quod ad hoc quod ‘a’ terminus quicumque fuerit, sit pars principalis ‘b’ termini, requiritur et sufficit quod ‘b’ terminus sit complexus secundum aliquam significationem, et ‘a’ determinet aliquem terminum vel determinet ab aliquo, et talis significatio ‘b’ adaequate resultet ex significatione ‘a’, secundum quam determinat illum terminum vel determinatur ab ‘a’, vel quod ‘a’ coniungantur cum aliquo termino, vel coniungat aliquos terminos, et talis significatio ‘b’ adaequate resultet ex significationibus illorum terminorum coniunctorum, secundum quas coniunguntur, et significatione copulae coniungentis illos, secundum quam coniungit illos.</text:p>
      <text:p text:style-name="P527">Et ex consequenti, per partem minus principalem alicuius termini, poteris intelligere indifferenter partem illius quae non est pars principalis eius, aut partem illius quae est pars partis principalis eius, dicendo primo modo, de hac propositione scripta “Sortes albus” est Sortes, concedendum esset quod aliqua est pars subiecti eius /46b/ quae non est pars minus principalis eius. Et dicendo secundo modo, concedendum esset quod aliqua est pars huius “Homo est animal album” quae non est pars principalis eius, nec pars minus principalis ipsius, patet de illa parte huius “homo est animal”.</text:p>
      <text:p text:style-name="P528"><text:span text:style-name="T559">Et hoc idem contingeret </text:span><text:span text:style-name="T560">ly ‘omnis’ ibi “Omnis homo est animal” est enim pars illius propositionis et non principalis nec minus principalis. Et si ista assignatio illius quod requiratur et sufficit ad partem principalem alicuius termini videatur aliquantulum prolixa, non debes de hoc curare postquam est tuta, et certe non reperi breviorem quae mihi satis tuta videretur secundum istam aut, salvantur omnia dicta communia absque difficultatem.</text:span></text:p>
      <text:h text:style-name="Heading_20_3" text:outline-level="3"><text:soft-page-break/>Terminus complexus complexione indistanti est terminus complexus secundum aliquam significationem secundum quam non est complexus complexione distanti</text:h>
      <text:p text:style-name="P531">Haec definitio est clara intellecta praecedenti.</text:p>
      <text:p text:style-name="P534">Ex his definitionibus patet quod posito quod hoc totum “Homo est albus” imponatur ad significandum sicut significat ly ‘Homo albus’, partibus manentibus cum suis significationibus sive cum hoc illud totum maneat, significans sicut prius sive non. Tunc ille terminus non erit complexus complexione distanti secundum significationem quam habet ab illa impositione hac manifeste apparet ex processu tacto.</text:p>
      <text:p text:style-name="P529"><text:span text:style-name="T561">Ex praedictis sufficienter apparet qualiter possunt definiri isti termini ‘terminus mentalis complexus’. ‘terminus mentalis incomplexus’, ‘terminus mentalis complexus complexione distanti’ et ‘terminus mentalis complexus complexione indistanti’. Pariforma capiendo ly ‘terminus vocalis’ aut ly ‘terminus scriptus’ aut ly ‘terminus mixtus’ loco de ly ‘terminus mentalis’, et ita si caperetur ly ‘terminus mentalis ultimatus’ ut ly ‘terminus mentalis non-ultimatus’, </text:span><text:span text:style-name="T562">e</text:span><text:span text:style-name="T561">t circa hoc similiter.</text:span></text:p>
      <text:p text:style-name="P529"><text:span text:style-name="T562">E</text:span><text:span text:style-name="T561">t circa istas denominationes istorum terminorum secundae intentionis qualiter sit cognoscendum an alicui </text:span><text:span text:style-name="T562">debeant attribui vel non, ponam duas regulas generales satis utiles. Quarum prima est ista:</text:span></text:p>
      <text:h text:style-name="P889" text:outline-level="3">Ubicumque occurrit aliquod aggregatum ex determinatione et determinabili</text:h>
      <text:p text:style-name="P535">Quorum utrumque potest definiri secundum significationem secundum quam capitur in illo aggregato, si velis definire tale aggregatum secundum significationem quam habet iuxta illas significationes illarum partium, cape aggregatum ex illo determinabili et definitione illius determinationis pro determinatione illius determinabilis.</text:p>
      <text:p text:style-name="P532">Consimiliter determinante illud determinabile, sicut illa determinatio determinat aut aggregatum ex definitione determinabilis pro determinabili et determinatione determinante ipsum et caetera, aut aggregatum ex definitionibus illorum quarum definitionum definitio determinationis, determinet alteram et caetera, cavendo a variatione appellationis et nugatione et quodlibet, tale aggregatum erit definitio illius termini complexi secundum illam significationem et caetera.</text:p>
      <text:h text:style-name="Heading_20_3" text:outline-level="3">Secunda regula. Quocumque termino secundae intentionis proposito</text:h>
      <text:p text:style-name="P530"><text:span text:style-name="T564">S</text:span><text:span text:style-name="T563">i vis videre an alicui convenit ille vel non, vide an universaliter ex hoc quod ille terminus conveniat alicui termino, utputa ‘a’ secundum aliquam certam significationem utputa ‘b’, et </text:span><text:span text:style-name="T564">alicui utputa ‘c’ secundum aliquam certam significationem utputa ‘d’, non conveniat possit inferri quod ‘a’ non est synonymus secundum ‘b’ significationem, ipsius ‘c’ secundum ‘d’ significationem.</text:span></text:p>
      <text:p text:style-name="P536">Vel non possit inferri et si sic, dicendum est quod quocumque termino dato significare aliquo modo, si ille terminus propositus conveniat mentali cui subordinatur, aut alicui termino synonymo illi secundum significationem synonymam illi modo significandi illius, tunc ille terminus propositus conveniet illi dato. Et si aliquis terminus sit synonymus illi secundum significationem et caetera, et illi non conveniat ille terminus propositus, tunc ille propositus non convenit illi dato.</text:p>
      <text:p text:style-name="P533"><text:soft-page-break/>Si autem non possit universaliter concludi illud ex illis, tunc non habebunt ista verum. Sed qualiter debeat cognosci, tunc an ille terminus propositus conveniat illi dato vel non, oportebit respicere ad connotationem illius illius termini propositi, et secundum exigentiam illius, ita oportebit iudicare exempla pro his omnibus, quia facillime possunt haberi reliquam.</text:p>
      <text:p text:style-name="P533"/>
      <text:h text:style-name="P869" text:outline-level="2">De termino categorematico et syncategorematico</text:h>
      <text:p text:style-name="Text_20_body">/<text:span text:style-name="T567">47a</text:span>/</text:p>
      <text:h text:style-name="Heading_20_3" text:outline-level="3">Sequitur alia divisio de ly ‘terminus’ unde terminorum quidam est terminus syncategorematicus</text:h>
      <text:p text:style-name="P537"><text:span text:style-name="T566">Solet in hac divisione ad</text:span><text:span text:style-name="T568">di aliud membrum, utputa ly ‘terminus’ mixtus, sed non est illo necessarium, quia quilibet terminus mixtus est categorematicus aliquo modo, vel syncategorematicus aliquo modo. In fine tamen huius capitis tangetur aliquid de illo.</text:span></text:p>
      <text:p text:style-name="P542">Divisum huius divisionis potest esse ly ‘terminus’ in toto suo ambitu, quia si aliquis terminus significet aliquo modo sive proprie sive improprie, est categorematicus aliquo modo, sed illam significationem vel syncategorematicus aliquo modo secundum illam.</text:p>
      <text:p text:style-name="P538"><text:span text:style-name="T569">Posset etiam capi ly ‘terminus’ stricte pro diviso huius divisionis, et posset etiam capi sicut in capite de termino, sed qualitercumque capiatur continuo, simili modo debet capi in membris dividentibus, et in distinctionibus membrorum debet capi ly ‘significat’, et suum participium proportionabiliter, sicut </text:span><text:span text:style-name="T570">capitur</text:span><text:span text:style-name="T569"> divisum in membris dividentibus. </text:span><text:span text:style-name="T570">E</text:span><text:span text:style-name="T569">t proportionabiliter quantum ad hoc est dicendum de aliis divisionibus tangendis, in quibus poterit capi ly ‘terminus’ in toto suo ambitu, quare de simili difficultate in sequentibus non fiet amplior mentio, sed solum tangetur qualiter divisum capiatur.</text:span></text:p>
      <text:p text:style-name="P539">Ly ‘terminus categorematicus’ solet dividi absque hoc quod definiatur simili et ly ‘terminus syncategorematicus’, et hoc forte ideo est quia antiqui imaginabantur illum terminum ‘terminus categorematicus’ aequivoce dici de membris dividentibus ipsum similiter, et ly ‘terminus syncategorematicus’ sed tenendo quod univoce dicatur ly ‘terminus categorematicus’ de quocumque termino syncategorematico inferius apparebunt definitiones illorum terminorum, capiendo quaelibet illorum in toto suo ambitu. Et pariforma, definitiones istorum terminorum ‘terminus categorematicus’ officio terminus categorematicus significatione, ‘terminus syncategorematicus’ officio terminus syncategorematicus significatione.</text:p>
      <text:p text:style-name="P540"><text:span text:style-name="T571">Dividitur ergo ly ‘terminus categorematicus’ in categorematicum officio tantum, et in categorematicum significatione tantum, et in categorematicum officio et significatione </text:span><text:span text:style-name="T572">simul</text:span><text:span text:style-name="T571">.</text:span></text:p>
      <text:h text:style-name="Heading_20_3" text:outline-level="3">Terminus categorematicus officio tantum est terminus significans aliquid modo secundum quem potest exercere officium sibi, vel praedicati, vel copulae in propositione categorica, et non significat aliquid vel aliqua</text:h>
      <text:p text:style-name="P541">Exemplum <text:span text:style-name="T573">patet de ly ‘est’ in tertio adiacente.</text:span></text:p>
      <text:p text:style-name="P543">Terminus categorematicus significatione tantum est terminus significans aliquo modo, sed quem significat aliquid vel aliqua, et non potest exercere officium sibi, vel praedicari, vel copulae in propositione categorica.</text:p>
      <text:p text:style-name="P543">Exemplum patet de quolibet obliquo, obliqua tento, significante aliquid vel aliqua.</text:p>
      <text:h text:style-name="P890" text:outline-level="3"><text:soft-page-break/>Terminus categorematicus utroque modo est terminus significans aliquo modo secundum quem significat aliquid vel aliqua, et potest exercere officium et caetera</text:h>
      <text:p text:style-name="P544">Exemplum patet de ly ‘homo’.</text:p>
      <text:p text:style-name="P544">Sed ly ‘terminus syncategorematicus’ dividitur etiam in ‘terminum syncategorematicum officio tantum’ et in ‘terminum syncategorematicum significatione tantum’ et in ‘terminum syncategorematicum officio et significatione simul’.</text:p>
      <text:h text:style-name="Heading_20_3" text:outline-level="3">Ly ‘terminus syncategorematicus officio tantum’ eodem modo definitur omnino sicut ly ‘terminus categorematicus significatione tantum’</text:h>
      <text:p text:style-name="P545">Quia illi duo termini sunt synonymi vel convertuntur, et propter consimilem causam ly ‘terminus syncategorematicus significatione tantum’ omnino eodem modo definitur sicut ly ‘terminus syncategorematicus officio’.</text:p>
      <text:h text:style-name="Heading_20_3" text:outline-level="3"><text:span text:style-name="T576">Ly ‘terminus syncategorematicus’ utroque modo sic definitur. Est terminus significans aliquo modo sed quem non significat aliquid vel aliqua, et non potest exercere officium et caetera</text:span><text:span text:style-name="T575"> </text:span><text:span text:style-name="T574"><text:s/></text:span><text:span text:style-name="T569"><text:s/></text:span><text:span text:style-name="T565"><text:s/></text:span><text:span text:style-name="T561"><text:s text:c="2"/></text:span><text:span text:style-name="T560"><text:s/></text:span><text:span text:style-name="T558"><text:s/></text:span></text:h>
      <text:h text:style-name="Heading_20_3" text:outline-level="3">Ex his definitionibus sequuntur aliqua corollaria</text:h>
      <text:list text:style-name="L36">
        <text:list-item>
          <text:p text:style-name="P973">Primum. Nullum categorema utroque modo secundum aliquam certam significationem est syncategorema aliquo modo secundum eandem.</text:p>
        </text:list-item>
        <text:list-item>
          <text:p text:style-name="P974">Secundum. Nullum syncategorema utroque modo, secundum aliquam certam significationem, est categorema aliquo modo secundum eandem.</text:p>
        </text:list-item>
        <text:list-item>
          <text:p text:style-name="P971"><text:span text:style-name="T577">Tertio. Omne categorema officio tantum secundum aliquam significationem, est syncategorema significatione tantum secundum eandem. Et omne syncategorema significatione tantum </text:span><text:span text:style-name="T578">secundum</text:span><text:span text:style-name="T577"> aliquam est categorema officio tantum secundum eandem.</text:span></text:p>
        </text:list-item>
        <text:list-item>
          <text:p text:style-name="P975">Quartum. Omne categorema significatione tantum secundum aliquam significationem, est syncategorema /47b/ officio tantum secundum eandem. Et omne syncategorema officio tantum secundum aliquam est categorema significatione tantum secundum eandem. Haec omnia patet ex definitionibus.</text:p>
        </text:list-item>
        <text:list-item>
          <text:p text:style-name="P972"><text:span text:style-name="T580">Quintum. Nullum categorema officio </text:span><text:span text:style-name="T579">tantum aut syncategorema significatione tantum secundum aliquam, est categorema significatione tantum vel syncategorema officio tantum, sed eandem.</text:span></text:p>
        </text:list-item>
        <text:list-item>
          <text:p text:style-name="P976">Sextum. Stat bene quod aliquis terminus sit categorematicus quocumque illorum trium modorum similiter, et syncategorematicus quocumque illorum trium modorum secundum diversas significationes, nec vere vel apparenter poterit deduci aliquod inconveniens ex hoc definitionibus datis, eo modo quo dare sunt.</text:p>
        </text:list-item>
        <text:list-item>
          <text:p text:style-name="P972"><text:span text:style-name="T579">Septimus. <text:s/>Quaelibet propositio de significatione propositionali est terminus syncategorematicus utroque modo, et ex consequenti quaelibet res, sed aliquam significationem naturaliter communem est terminus categorematicus utroque modo. Sed </text:span><text:soft-page-break/><text:span text:style-name="T579">utrum quodlibet ens secundum aliquam naturaliter communem sit terminus categorematicus officio tantum, et secundum aliquam categorematicus significatione tantum, aut utrumque saltem aliquod illorum contingat.</text:span></text:p>
        </text:list-item>
      </text:list>
      <text:p text:style-name="P546"><text:span text:style-name="T579">Haec difficultas, quia </text:span><text:span text:style-name="T581">parvae</text:span><text:span text:style-name="T579"> est utilit</text:span><text:span text:style-name="T581">a</text:span><text:span text:style-name="T579">tis, qualitercumque dictatur non est magna cura, videtur tamen melius quod dicatur negative.</text:span></text:p>
      <text:h text:style-name="Heading_20_3" text:outline-level="3">Ex his igitur patet quod si ly ‘terminus categorematicus aequivoce’ et non analogice dicatur de illis tribus membris</text:h>
      <text:p text:style-name="P547">Et petatur eius definitio antequam detur, debet determinari eius significatio secundum quam illae qui petit definitionem vult, quod definiatur.</text:p>
      <text:p text:style-name="P547">Si tamen aequivoce analogice diceretur de suis membris, et primo de termino categorematico utroque modo. Et petatur eius definitio, tunc debebit definiri sicut ly ‘terminus categorematicus utroque modo’, et proportionabiliter dicatur de ly ‘terminus syncategorematicus’.</text:p>
      <text:p text:style-name="P548"><text:span text:style-name="T582">Sed </text:span><text:span text:style-name="T583">supposito quod univoce dicatur isti termini brevissime et clarissime, poterunt definiri sicut statim tanget. Et si aliter ab aliis definiatur in idem, redibunt ille definitionis cum his quae statim tangentur, saltem si ille sint sufficientes.</text:span></text:p>
      <text:h text:style-name="Heading_20_3" text:outline-level="3"><text:span text:style-name="T583">Terminus ergo categorematicus est terminus significans aliqui modo secundum quem significat aliquid vel aliqua vel potest exercere </text:span><text:span text:style-name="T584">officium sibi et caetera</text:span></text:h>
      <text:list text:style-name="L37">
        <text:list-item>
          <text:p text:style-name="P977">Terminus categorematicus officio est terminus significans aliquo modo secundum quem potest exercere officium et caetera.</text:p>
        </text:list-item>
        <text:list-item>
          <text:p text:style-name="P977">Terminus categorematicus significatione est terminus significans aliquo modo secundum quem significat aliquid vel aliqua.</text:p>
        </text:list-item>
        <text:list-item>
          <text:p text:style-name="P977">Terminus syncategorematicus est terminus significans aliquo modo secundum quem non significat aliquid vel aliqua aut non potest exercere officium et caetera.</text:p>
        </text:list-item>
        <text:list-item>
          <text:p text:style-name="P978">Terminus syncategorematicus officio est terminus significans aliquo modo secundum quem non potest exercere officium et caetera.</text:p>
        </text:list-item>
        <text:list-item>
          <text:p text:style-name="P978">Terminus syncategorematicus significatione est terminus significans aliquo modo sed quem non significat aliquid vel aliqua.</text:p>
        </text:list-item>
      </text:list>
      <text:p text:style-name="P549"><text:span text:style-name="T585">Ex quibus definitionibus patet quod tres primi termini primo definiri ibi, bene possunt eidem termino convenire ratione eiusdem significationes. Similiter et ultimi tres, sed nec primi tres cum liqua trium ulteriorum, nec ultimi tres cum aliquo </text:span><text:span text:style-name="T586">trium</text:span><text:span text:style-name="T585"> primorum, nec duo ultimi trium primorum cum aliquo trium ultimorum, nec duo ultimi </text:span><text:span text:style-name="T587">trium</text:span><text:span text:style-name="T585"> ultimorum cum aliquo trium </text:span><text:span text:style-name="T587">primorum possunt eidem ratione eiusdem significationis convenire.</text:span></text:p>
      <text:p text:style-name="P551">Patet secundo quod nulli duo illorum.</text:p>
      <text:p text:style-name="P551">Sex terminorum convertuntur aut sunt disparati, sed disiunctum ex duobus trium primorum convertitur cum primo ipsorum, et disiunctum ex duobus trium ultimorum cum primo ipsorum.</text:p>
      <text:p text:style-name="P551"><text:soft-page-break/>Patet tertio quod nullis istorum sex convertitur cum aliquo illorum, sex prius definitorum. Sed isti sex sunt superiores ad illos sex, referendo singula singulis sicut decet.</text:p>
      <text:p text:style-name="P552">Patet quarto quod quilibet trium primorum es terminus disparatus cum ly ‘terminus syncategorematicus utroque modo’ similiter, et quilibet trium ultimorum cum ly ‘terminus categorematicus utroque modo’.</text:p>
      <text:p text:style-name="P552">Haec omnia ex definitionibus sunt manifesta.</text:p>
      <text:h text:style-name="P891" text:outline-level="3">Hic posset fieri difficultas circa illud quod tantum est in quodam exemplo de ly ‘est’ <text:span text:style-name="T589">q</text:span><text:span text:style-name="T588">uia videtur ly ‘est’ significare </text:span><text:span text:style-name="T589">aliquid vel aliqua secundum significationem secundum quam est tertium adiacens</text:span></text:h>
      <text:p text:style-name="Text_20_body"><text:span text:style-name="T589">S</text:span>ed de hoc videbitur in capitulo de verbo.</text:p>
      <text:p text:style-name="P550">Posset etiam fieri difficultas circa definitionem termini categorematici utroque modo posito quod ly ‘a’ imponatur ad significandum sicut significat ly ‘homo’, taliter quod numquam virtute illius impositionis debet significare propositione sed solum extra propositionem, quia tunc ly ‘a’ erit terminus categorematicus et non poterit exercere officium et caetera, secundum illam impositionem et significationem. Sed huius solutio patet ex solutione /48a/ <text:span text:style-name="T590">similis difficultatis tactae in capitulo de termino.</text:span></text:p>
      <text:p text:style-name="P553">Contra definitionem termini categorematici significatione tantum, arguitur sic: Ly ‘albus’ est terminus categorematicus significatione tantum, secundum significationem secundum qua capitur adiective, et potest exer<text:span text:style-name="T591">cere officium et caetera secundum. Secundum illam igitur maior patet, ex communi modo loquendi minor patet. Ille terminus significat eodem modo secundum significationem secundum quam capitur substantive, sicut significat secundum illam secundum quam capitur adiective; igitur consequentia, licet et antecedens patet, quia dato eius opposito nunc solam albedinem significaret secundum illam significationem secundum quam capitur adiective.</text:span></text:p>
      <text:p text:style-name="P558">Sed hoc est falsum. Igitur quod sequatur patet quia non videtur quid aliud significet, et etiam illi qui concedunt maiorem tenent hoc.</text:p>
      <text:p text:style-name="P558">Idem falsitas consequentis probatur, supposito quod procedamus de illo termino in mente, quia vel tunc significaret albedinem absolute vel connotative. Si primum tunc aequivaleret huic termino ‘albedo’ et per consequens ly ‘homo albus’ aequivaleret huic ‘homo albedo’ quod est falsum.</text:p>
      <text:p text:style-name="P558">Si forte dicas quod capiendo illum terminum adiective subordinatur obliquo, sequitur tunc quod non poterit se solo ille terminus taliter determinare ly ‘homo’, quod aggregatum ex illis significet taliter quod ad hoc quod supponat pro aliquo in ordine ad copulam de praesenti requiratur, et sufficiat quod illud sit ‘homo albus’.</text:p>
      <text:p text:style-name="P554">Si forte dicas quod connotative <text:span text:style-name="T593">significat albedinem, simile deduceretur ex hoc, et etiam sequeretur quod supponeret pro albedine, quod ipsi negarent.</text:span></text:p>
      <text:h text:style-name="Heading_20_3" text:outline-level="3"><text:soft-page-break/>Propter hoc argumentum sive concludat concedentibus illam maiorem sive non, nolo dicere sicut ipsi dicunt, sed nego maiorem argumenti, et ex consequenti, auctoritatem illorum quamtum ad hoc</text:h>
      <text:p text:style-name="P559">Et propterea exemplificatum est pro illa distinctione de obliquo obliquo tento, unde dico quod synonymo modo et mediante eodem termino mentali capitur ly ‘album’ quando capitur substantive et quando capitur adiective.</text:p>
      <text:p text:style-name="P555"><text:span text:style-name="T594">N</text:span><text:span text:style-name="T593">ec obstat quod secundum grammaticos in neutro genere substantivetur, et non in masculino vel feminino, quia illud non tollit synonymitatem inter ipsum captum substantive et ipsum captum adiective. </text:span><text:span text:style-name="T594">Verum est tamen quod numquam exercet officium subiecti et caetera in propositione in qua capitur adiective, saltem secundum quod capitur adiective, nec est illud possibile </text:span><text:span text:style-name="T595">quia</text:span><text:span text:style-name="T594"> si in aliqua capiatur adiective est extremum ipsa et non extremum secundum quod capitur adiective. </text:span><text:span text:style-name="T596">Et si propter hoc, adhuc sensum, velles concedere quod ille terminus est categorematicus significatione tantum captus adiective, non contradicam tibi in hoc. Sed extraneus esset iste sentus, et etiam ipsi non praetendunt hoc in illo quod dicunt in hoc proposito.</text:span><text:span text:style-name="T594"> </text:span><text:span text:style-name="T592"><text:s/></text:span></text:p>
      <text:h text:style-name="Heading_20_3" text:outline-level="3">Et si arguas contra dicta, probando quod ly ‘albus’ secundum quod capitur adiective sit extremum in aliqua propositione</text:h>
      <text:p text:style-name="P556"><text:span text:style-name="T597">Quia capio istam scriptam “Sortes est albus”, in ipsa ly ‘albus’ capitur adiective, ex quo capitur in masculino genere in quo non substantivatur secundum grammaticos, et </text:span><text:span text:style-name="T598">in illa est praedicatum, quia non est aliud praedicatum expresse, sed subintellecte, ita quod eius praedicatum est aggregatum ex illo termino et quodam substantivo subintellecto.</text:span></text:p>
      <text:p text:style-name="P560">Contra hoc arguitur: Sequitur tunc quod illa non erit propositio scripta, quod est contra hypothesim. Et consimiliter, posset argui ad probandum quod ly ‘hominis’ possit esse extremum propositionis categoricae, secundum significationem secundum quam est obliquus, capta illa propositione scripta “Iste asinus est hominis”. Sed de ista difficultate de ly ‘hominis’ tangetur in capitulo de nomine, et ex solutione illius poterit apparere solutio illius quae fit de ly ‘albus’.</text:p>
      <text:p text:style-name="P557"><text:span text:style-name="T599">Secundo: Arguitur contra definitionem termini categorematici utroque modo. </text:span><text:span text:style-name="T600">Volo quod ly ‘est’ ultra significationem quam habet, imponatur ad significandum tantum sicut significat ly ‘hominis’, et non habeat aliunde aliquam significationem propriam secundum quam sit terminus categorematicus utroque modo et loquor de termino categorematico utroque modo proprie. Tunc sic ex illa definitione /48b/ sequitur quod ly ‘est’ non est terminus categorematicus utroque modo proprie, sed hoc est falsum igitur.</text:span></text:p>
      <text:p text:style-name="P561"><text:span text:style-name="T600">Quod sequatur patet quia secundum nullam significationem est terminus categorematicus utroque modo proprie. Sed falsitas consequentis patet, quia tunc </text:span><text:span text:style-name="T601">ille est terminus categorematicus significatione proprie; ergo est terminus categorematicus officio et significatione proprie, et ex consequenti est terminus categorematicus, utroque modo consequentia videtur tenere copulativa, ab propositionem de copulato et totum antecedens patet ex causa.</text:span></text:p>
      <text:h text:style-name="Heading_20_3" text:outline-level="3"><text:soft-page-break/>Ad hoc argumentum respondetur datis his quae supponis, concedendo illam sequelam et negando falsitatem consequentis</text:h>
      <text:p text:style-name="P568">Et ad probationem nego consequentiam, saltem capiendo consequens sicut in proposito capitur, nec ille modus arguendi valet a copulativa ad propositionem de copulato eo modo quo in proposito, quia aequivalenter arguitur illic. Ac si argueretur hoc modo, ille terminus secundum aliquam significationem est categorematicus significatione; ergo secundum aliquam est terminus categorematicus officio et significatione, et manifestum est quod iste modus arguendi non valet, sicut nec istae “Sortes una manu tangit Platonem, et Una manum tangit Ciceronem; ergo una manu tangit Platonem et Ciceronem”.</text:p>
      <text:h text:style-name="Heading_20_3" text:outline-level="3">Sed circa terminos mixtos est advertendum quod propter causam tantam in principio huius capituli, non est necessarium in divisionem tertium membrum pro ipsis addere</text:h>
      <text:p text:style-name="P562">Nec esset etiam necessarium processum pro ipsis facere, nisi ut intelligantur termini. Ideo, pro ipsis dico quod ad terminum mixtum, loquendo de mixto sicut in proposito, requiritur et sufficit quod sit terminus formaliter vel aequivalenter compositus ex duobus terminis tamquam ex duabus partibus principalibus eius, quod unus sit terminus categorematicus aliquo modo et alius syncategorematicus eodem modo. Significans iuxta significationes illorum terminorum secundum quarum unam unus illorum est terminus categorematicus uno modo, et secundum aliam alius est est terminus syncategorematicus simili modo.</text:p>
      <text:p text:style-name="P562">Ex quo patet quod, non obstante ista definitione, bene poterit dari aliquis terminus mixtus ex duobus <text:s/>terminis, quorum quilibet quocumque modo est terminus categorematicus vel syncategorematicus, quo alius est categorematicus vel syncategorematicus, postquam illi capiantur pro partibus illius termini mixti, secundum illas significationes secundum quas sunt termini categorematici vel syncategorematici eodem modo.</text:p>
      <text:p text:style-name="P569">Multiplices sunt termini mixti, sumendo diversitatem ex diversis modis, quibus partes terminorum mixtorum dicuntur termini categorematici et syncategorematici. Unde quidam est terminus mixtus ex categorematico utroque modo et syncategorematico utroque modo, ut ly ‘omnis homo’ et ly ‘non-homo’.</text:p>
      <text:p text:style-name="P569">Alius est mixtus ex termino categorematico utroque modo et syncategorematico officio tantum et syncategorematico utroque modo, ut ly ‘possibiliter’ est tenendo quod ly ‘possibiliter’ faciat unum terminum cum ly ‘est’. Alias enim non video quo modo posset dari talis terminus mixtus.</text:p>
      <text:p text:style-name="P569">Alius ext mixtus ex categorematico significatione tantum et syncategorematico utroque modo, ut ly ‘cuiuslibet hominis’.</text:p>
      <text:p text:style-name="P570">Alius posset poni mixtus ex categorematico officio tantum et syncategorematico officio tantum, si teneatur quod ly ‘in instanti’ sit terminus syncategorematicus officio et possit constituere unum terminum cum ly ‘est’. Et tunc continget illud de isto toto in instanti est, sed non occurrit aliquis terminus mixtus ex categorematico utroque modo et syncategorematico significatione tantum.</text:p>
      <text:h text:style-name="Heading_20_3" text:outline-level="3"><text:soft-page-break/>Hic posset fieri argumentum contra divisionem supponendo quod postquam ly ‘terminus’ sufficienter dividitur in terminum categorematicum et in terminum syncategorematicum</text:h>
      <text:p text:style-name="P563"><text:span text:style-name="T603">E</text:span><text:span text:style-name="T602">t quodlibet illorum membrorum sufficienter dividitur in tria membra, quod ly ‘terminus’ etiam sufficienter dividetur immediate in illa sexta membra. </text:span><text:span text:style-name="T604">Et ipso sic diviso videtur quod divisio non valeat, quia illorum membrorum duo erunt synonyma vel convertibilia inter se similiter et alia duo ab illis. Sed quid sit dicendum ad hoc, patet in capitulo de divisione.</text:span></text:p>
      <text:p text:style-name="P563"/>
      <text:h text:style-name="P869" text:outline-level="2">De termino primae et secundae intentionis</text:h>
      <text:p text:style-name="Text_20_body">/<text:span text:style-name="T605">49a</text:span>/</text:p>
      <text:h text:style-name="Heading_20_3" text:outline-level="3">Nunc videndum est de alia divisione termini, unde terminus dividitur adhuc in terminum secundae intentionis et terminum primae intentionis</text:h>
      <text:p text:style-name="P567">Divisum huius divisionis est ly ‘terminus significans aliquid vel aliqua’, et hoc ideo est quia si aliquis terminus sit primae vel secundae intentionis, secundum aliquam significationem, ille significat aliquid vel aliqua secundum illam.</text:p>
      <text:p text:style-name="P567">Pro qua divisione suppono primo quod, quamvis <office:annotation office:name="__Annotation__4968_794076871" loext:resolved="false"><dc:creator>Unknown Author</dc:creator><dc:date>2025-08-06T23:12:01.265125361</dc:date><text:p><text:span text:style-name="T861">Intentio / impositio.</text:span><text:span text:style-name="T861"><text:line-break/></text:span><text:span text:style-name="T861">secundum aliquos intentio solum conveniat terminis mentalibus et impositio solum terminis vocalibus et scriptis</text:span></text:p></office:annotation>secundum aliquos intentio solum conveniat terminis mentalibus et impositio solum terminis vocalibus et scriptis<office:annotation-end office:name="__Annotation__4968_794076871"/>, no<text:span text:style-name="T606">s</text:span> tamen, causa breviloquii, tam terminos vocales quam scriptos quam mentales primae vel secundae intentionis vocabimus. </text:p>
      <text:p text:style-name="P564"><text:span text:style-name="T607">Secundo, sup</text:span><text:span text:style-name="T608">pono quod in sequentibus non ponemus differentiam inter tales propositiones “Iste terminus est secundae intentionis”, “Iste terminus est secundae intentio”, nec inter istas “Iste terminus est primae intentionis”, “Iste terminus est primae intentio”.</text:span></text:p>
      <text:h text:style-name="Heading_20_3" text:outline-level="3">His suppositis terminus secundae intentionis sic definitur</text:h>
      <text:p text:style-name="P834">Est terminus significans aliquid, ea ratione quae est signum vel significatum, et capitur ly ‘aliquid’ transcendentaliter prout valet tantum sicut ly ‘aliquid’ vel ‘aliqua’. Et proportionabiliter capiuntur ly ‘signum’ et ly ‘significatum’, et hoc ut comprehendantur ly ‘nomina’ et ly ‘genera’ et alii termini secundae intentionis pluralis numeri et collectivi.</text:p>
      <text:p text:style-name="Text_20_body">Dicitur in definitione ea ratione qua est signum propter istos terminos et similes ‘nomen’, ‘verbum’ et caetera.</text:p>
      <text:p text:style-name="Text_20_body">Dicitur vel ea ratione qua est significatum propter istos terminos et similes ‘aequivocatum’, ‘univocatum’ quorum quilibet significat aliquid ea ratione qua est significatum, et non ea ratione qua est signum qualiter debeant capi ly ‘signum’, et ly ‘significatum’ patebit ex processu.</text:p>
      <text:h text:style-name="Heading_20_3" text:outline-level="3">Terminus primae intentionis sic definitur</text:h>
      <text:p text:style-name="P571">Est terminus significans aliquid non ea ratione qua est signum vel significatum, et capiuntur ly ‘aliquid’, et ly ‘signum’, et ly ‘significatum’ sicut in praedicata definitione, ut comprehendantur termini primae intentionis pluralis numeri et collectivi. </text:p>
      <text:h text:style-name="Heading_20_3" text:outline-level="3">Circa istas definitiones est difficultas de expositione illarum particularum ‘ea ratione qua est signum’, ‘ea ratione qua est significatum’</text:h>
      <text:p text:style-name="P578">Quae ponuntur in definitione termini secundae intentionis, unde prima particula sic communiter exponitur.</text:p>
      <text:p text:style-name="P565"><text:span text:style-name="T609">Significat aliquid ea ratione quae est signum, hoc est, significat taliter quod si illud non esset signum, non amplius significaretur per talem terminum. Ex qua expositione infertur una regula ad </text:span><text:soft-page-break/><text:span text:style-name="T609">cognoscendum quis terminus sit secundae intentionis, unde demonstrato uno significato talis termini de quo est dubitatio, si illa consequentia sit bona, hoc non significat; ergo hoc non est tale. Tunc talis terminus est secundae intentionis, si vero non, non.</text:span></text:p>
      <text:p text:style-name="P566"><text:span text:style-name="T609">Exemplum primi: Ista consequentia est bona “Hoc non significat, demonstrato illo termino ‘homo’; ergo ‘hoc’ non est nomen”. </text:span><text:span text:style-name="T610">Possumus concludere quod ille terminus ‘nomen’ est secundae intentionis.</text:span></text:p>
      <text:p text:style-name="P572"><text:span text:style-name="T610">Exemplum secundi: Ista consequentia non valet “</text:span><text:span text:style-name="T611">Homo non significat, demonstrato Sorte; ergo hoc non est homo”. Sufficienter possumus concludere ex hoc quod ille terminus ‘homo’ </text:span><text:span text:style-name="T612">non est secundae intentionis.</text:span></text:p>
      <text:p text:style-name="P572"><text:span text:style-name="T612">Et si contra regulam arguatur quia tunc iste terminus ‘asinus’ esset secundae intentionis, nam ista consequentia est bona “</text:span><text:span text:style-name="T613">Hoc non significat, demonstrato sorte; ergo ‘hoc’ non est asinus”. Ad hoc dicitur quod illud non sufficit, sed oportet praesupponere quod demonstretur aliquid pro quo possit talis terminus supponere mediante tali copula, quod non fit in proposito.</text:span></text:p>
      <text:p text:style-name="P573">Sed ex ista solutione sequitur quod regula non valet ad iudicandum in omnibus, patet de isto termino ‘nomen non existens pars orationis’, nam non potest demonstrari aliquid tale suppositum eius.</text:p>
      <text:p text:style-name="P574">Sed contra istum modum exponendi multipliciter arguitur.</text:p>
      <text:p text:style-name="P576"><text:span text:style-name="T614">Primo tamen arguitur dando instantias </text:span><text:span text:style-name="T616">regulae</text:span><text:span text:style-name="T614"> quae elicitur ex modo exponendi, supponendo unum quod termini in Biblia clausa sunt nomina, dato quod non actualiter significent, et quod in tali consequentia per quam debemus iudicare de talibus. Quando dicimus “Hoc non significat” non solum intelligimus actu, sed etiam nec aptitudine in potentia propinqua, nam alias illa consequentia non esset bona “Hoc non significat, </text:span><text:span text:style-name="T615">demonstrato illo termino homo; ergo non est nomen” patet </text:span><text:span text:style-name="T617">in</text:span><text:span text:style-name="T615"> Biblia clausa.</text:span></text:p>
      <text:p text:style-name="P575"><text:span text:style-name="T616">Isto supposito, arguitur contra regulam. </text:span><text:span text:style-name="T617">Sequ</text:span><text:span text:style-name="T618">e</text:span><text:span text:style-name="T617">retur </text:span><text:span text:style-name="T618">primo quod iste terminus existens in anima esset terminus secundae intentionis. Patet ista consequentia est bona “Hoc non significat, demonstrato /49b/ illo termino mentali ‘homo’ ultimato; ergo non est existens in anima.</text:span></text:p>
      <text:p text:style-name="P579">Si dicas quod datur antecedens verum et consequens falsum, quando homo dormit et ille terminus est in anima, super quam nihil actualiter cogitet.</text:p>
      <text:p text:style-name="P577"><text:span text:style-name="T618">Contra, antecedens est falsum, nam <text:s/>significat in potentia propinqua, et antecedens sumitur in isto sensu, non significat in potentia propinqua ut </text:span><text:span text:style-name="T619">ostensum </text:span><text:span text:style-name="T618">est.</text:span></text:p>
      <text:p text:style-name="P580"><text:span text:style-name="T618">Similiter potest dari instantia de illo termino similitudo Sortis, nam ista consequentia est bona “Hoc non significat; ergo non est similitudo Sortis”, demonstrata naturali similitudine Sor</text:span><text:span text:style-name="T620">t</text:span><text:span text:style-name="T618">is mentali, et </text:span><text:span text:style-name="T620">in talibus instantiis demonstratur supposita talium terminorum de quibus est quaestio eo modo quo oportet.</text:span></text:p>
      <text:p text:style-name="P581"><text:span text:style-name="T620">Et si dicas quod sensus antecedentis debet esse hoc, non significat hoc non est signum propositionale, adhuc illae consequentiae essent bonae sive capiatur signum propositionale large sive stricte, sed quod illi termini non sunt secundate intentionis reliquo tamquam clarum. Tunc arguitur contra modum exponendi illius particulae “Iste terminus nomen est secundae intentionis”, tamen non significat aliquid ea ratione qua est signum exponendo illo modo; igitur maior est nota. </text:span><text:soft-page-break/><text:span text:style-name="T620">Minor probatur quia si sic, maxime significaret istum terminum ‘homo’ illo modo, sed hoc est falsum; igitur maior est nota. Minor probatur dato quod ille terminus ‘homo’ deponatur a sua significatione, adhuc significabit illum. </text:span><text:span text:style-name="T621">I</text:span><text:span text:style-name="T620">gitur </text:span><text:span text:style-name="T621">antecedens probatur ista est vera, in illo casu “Hoc fuit nomen” demonstrando illum terminum ‘homo’, et est affirmativa extra omnes instantias et caetera; ergo subiectum et praedicatum supponunt pro eodem; ergo praedicatum supponit </text:span><text:span text:style-name="T622">pro illo, demonstrato, et per consequens significant illud, demonstratum ab inferiori ad superius.</text:span></text:p>
      <text:h text:style-name="Heading_20_3" text:outline-level="3">Confirmatur ista ratio. Primo, capto illo termino mentali cui subordinatur ly ‘nomen’, ille significat illum terminum ‘homo’ non e<text:span text:style-name="T627">a</text:span> ratione qua est signum; ergo nec ille vocalis antecedens</text:h>
      <text:p text:style-name="P582"><text:span text:style-name="T626">P</text:span><text:span text:style-name="T623">robatur nam si sic sequeretur quod aliquis terminus mentalis caderet a sua significatione quam significat naturaliter hoc antecedens est falsum; ergo et antecedens. Quod sequatur illud patet “Volo quod ille terminus ‘homo’ vocalis cadat a sua significatione”, tunc vel ille terminus mentalis significat illud vel non. Si sic, sequitur quod non significabat ea ratione quae est signum, nam adhuc significat dato quod non sit signum, si non significet habeo intentum.</text:span></text:p>
      <text:h text:style-name="P892" text:outline-level="3">Et confirmatur secundo, quia tunc ista esset impossibilis “Hoc est nomen” demonstrato ly ‘buf’</text:h>
      <text:p text:style-name="P584">Patet non stante significatio, ne illius termini ‘nomen’ non potest ita esse nisi ly ‘buf’ imponatur de novo, et in illo casu ille terminus ‘nomen’ non habet eandem omnino significationem ut prius, nam significat aliquid quod prius non significabat patet quia significat illum terminum ‘buf’ quem prius non significabat igitur.</text:p>
      <text:h text:style-name="Heading_20_3" text:outline-level="3">Et confirmatur tertio “Iste terminus ‘nomen’ significat omne id quod est, vel erit, vel fuit, vel potest esse nomen” quia pro quolibet tali supponit in potentia propinqua mediante copula de possibili</text:h>
      <text:p text:style-name="P585">Sed iste terminus ‘buf’ potest esse nomen; ergo significat istum terminum ‘buf’ et non significat ea ratione qua est signum; igitur maior est nota.</text:p>
      <text:p text:style-name="P586">Minor autem probatur quia tunc ista esset falsa “Hoc potest esse nomen”, quia ex illa sequitur quod potest esse aliquod signum, ea ratione qua est signum, ut patet per connotationem de ly ‘nomen’, sed consequens est falsum, quia praedicatum non supponit pro illo, quia deficit ei connotatio, nam praedicatum connotat quod sit signum et tamen ille terminus non est signum.</text:p>
      <text:h text:style-name="Heading_20_3" text:outline-level="3">Et confirmatur quarto, quia tunc iste terminus ‘nomen’ esset propositio vel includeret propositionem</text:h>
      <text:p text:style-name="P583"><text:span text:style-name="T628">N</text:span><text:span text:style-name="T625">am significat aliquid connotando quod sit signum, et hoc totum quod sit signum non potest significari nisi per propositionem vel per aliquid includens propositionem, nam ponitur copula implicationis igitur.</text:span></text:p>
      <text:h text:style-name="Heading_20_3" text:outline-level="3"><text:soft-page-break/>Ad istud argumentum respondetur quod in illa propositione, quando dicitur si non esset signum non significaret, illum capitur significare pro supponere mediante copula de praesenti</text:h>
      <text:p text:style-name="P587">Et valet tamen dicere non significaret illud, hoc est, non supponeret pro illo mediante copula de praesenti in potentia propinqua, et non capiatur significare quemadmodum capiebamus in capitulo de significare. Et tunc dico, ad formam argumenti, verum est quod significat illum terminum, in illo casu capiendo ly ‘significare’ sicut capiebatur in capitulo de significare. Et hoc concludit argumentum, non tamen capiendo significare sicut capitur in /50a/ proposito nec illud probat argumentum, nam illa consequentia non verum supponit pro illo; ergo significat illud, capiendo significare sicut nos capimus, sed oportet addere ad antecedens hoc totum, mediante copula de praesenti non ampliata nec ampliativa.</text:p>
      <text:h text:style-name="Heading_20_3" text:outline-level="3"><text:span text:style-name="T629">Ad </text:span><text:span text:style-name="T630">primam confirmationem dicitur quod in illo casu non significabit, capiendo ut nos capimus ibi</text:span></text:h>
      <text:p text:style-name="P594">Nec inconvenit quod cadat a sua significatione, capiendo significationem isto modo, quia idem est dictu, id est, cadit a sua suppositione in ordine ad copulam de praesenti et caetera, et hoc solum probat argumentum. Inconveniret tamen quod caderet a sua significatione, capiendo ut in capitulo de significare neque hoc probat argumentum.</text:p>
      <text:h text:style-name="Heading_20_3" text:outline-level="3">Ad secundam confirmationem, nego quod illa esset impossibilis, et ad probationem distinguo quod non possit ita esse, manente eadem significatione adaequata terminorum</text:h>
      <text:p text:style-name="P588">Vel capiendo significationem pro suppositione in ordine ad talem copulam, quemadmodum capimus ibi, et sic concedo antecedens, et nego consequentiam, quia non requiritur illud ad propositionem possibilem, nam tunc ista non esset possibilis “Antichristus est homo”, vel capiendo significationem ut in capitulo de significare, et sic nego antecedens. Nec probatur in illo sensu in confirmatione, sed solum in alio.</text:p>
      <text:p text:style-name="P588">Ad alias duas confirmationes postea respondebitur, quia aequaliter currunt contra modum exponendi quem insequemur. Sed contra solutionem argumenti, arguitur si illud esset verum, quod capiatur significare in expositione, sicut dictum est sequeretur ‘verbum’ posito casu quod nullum esset verum, non esset terminus secundae intentionis, sed hoc est falsum igitur. Minor est nota e maior probatur. In illo casu ille terminus non significat aliquid, capiendo significare sicut tu dicis capi illic; igitur antecedens probatur, non supponit pro aliquo mediante copula de praesenti in potentia propinqua; ergo non significat aliquid illo modo.</text:p>
      <text:p text:style-name="P588">Dices forte ad hoc, sicut dicendum est quod ly ‘significat’. In primo loco non capitur sicut dictum est, sed in secundo loco, quando dicitur si non esset signum, non significaret illum.</text:p>
      <text:p text:style-name="P589">Contra hoc arguitur illo modo, adhuc exponendo sequeretur quod iste terminus ‘similitudo Sortis’ esset terminus secundae intentionis. <text:span text:style-name="T631">Hoc est falsum, igitur falsitas illius ostensa est superius. Quod sequatur probatur, significat conceptum Sortis ea ratione qua est signum propositionale exponendo.</text:span></text:p>
      <text:p text:style-name="P595"><text:soft-page-break/>Isto modo igitur probo antecedens. Si illa naturalis similitudo Sortis non esset signum proportionale, non significaretur per illum terminum illo modo, quia non esset similitudo Sortis; igitur significat illo modo veritatem istius conditionalis.</text:p>
      <text:p text:style-name="P590"><text:span text:style-name="T631">Relinquo tamquam claram, supposito quod in libro clauso sint termini, non videtur posse dari antecedens illius verum et consequens fa</text:span><text:span text:style-name="T632">lsum, nisi casu quod poneretur in lapide solum, et tunc non esset similitudo Sortis, ut clarum est, et per consequens esset verum.</text:span></text:p>
      <text:p text:style-name="P596">Potest etiam argui de isto termino ‘hoc’ quod est in anima Sortis, causatum ab anima Sortis tamquam a causa efficiente, et forte melius demonstrando similitudinem Platonis, quae est in anima Sortis causata ab ipsa tamquam a sua causa efficiente. Significat enim illam similitudinem Platonis ea ratione qua est signum. Exponendo ut dictum est tamen non est secundae intentionis.</text:p>
      <text:p text:style-name="P597">Item, etiam arguitur contra regulam et contra modum exponendi, capiendo istum terminum significativum proprie, ille terminus est secundae intentionis, supposito quod capiatur ampliative. Tamen regula non habet verum in eo, quia ista consequentia non valet “Hoc non significat; ergo hoc non est significativum proprie capiendo illo modo, igitur”.</text:p>
      <text:p text:style-name="P591"><text:span text:style-name="T633">Item, etiam contra</text:span><text:span text:style-name="T631"> </text:span><text:span text:style-name="T633">modum exponendi, arguitur de eodem termino, nam est secundae intentionis, ut omnes logici concederent, tamen non significat aliquid ea ratione qua est signum, exponendo illo modo; ergo modus exponendi non valet. Minor probatur quia quocumque signato dato quod non significet adhuc ille terminus verificaretur de illo mediante copula de praesenti, capiendo illo modo; ergo non significat ea ratione qua est signum exponendo illo modo.</text:span></text:p>
      <text:p text:style-name="P592"><text:span text:style-name="T634">Item, etiam contra illum modum exponendi, arguitur ille modus exponendi esset bonus. Sequeretur quod iste terminus ‘a’ esset secundae intentionis, casu quo imponeretur ad significandum omnes tales terminos ‘homo’ /</text:span><text:span text:style-name="T637">50b</text:span><text:span text:style-name="T634">/ absolute, mediante tali impositione, et tali entia sint termini proprie et signa ponibilia in propositione significet illa, et non alio modo. Sed illud est falsum quia non ponitur in praedicamento signi, nec habet aliquam talem connotationem, et patet ex impositione. </text:span><text:span text:style-name="T635">Igitur, quod sequatur illud probo. Significat illa quae significat taliter, quo si non esset signa ponibilia in propositione ad huc non amplius significaret illa per talem impositionem, exponendo illo modo, ut patet ex modo impositionis factae igitur.</text:span></text:p>
      <text:p text:style-name="P593"><text:span text:style-name="T636">Item </text:span><text:span text:style-name="T638">etiam arguitur si modus exponendi haberet veritatem, sequeretur quod quilibet terminus mundi esset secundae intentionis, sed hoc est falsum; igitur quod sequatur patet. Capio istum terminum ‘homo’, ille significat omnes homines ea ratione qua sunt signa propositionalia, capiendo signum large et exponendo illo modo, et hoc sufficit ad terminum secundae intentionis.</text:span></text:p>
      <text:p text:style-name="P599"><text:span text:style-name="T638">Igitur minor probatur: “Hoc totum significans naturaliter communiter est terminus secundae intentionis”, et solum significat aliquid ea ratione qua est signum propositionale, capiendo signum large. Igitur quod ille terminus secundae intentionis probo, nam dato opposito ly ‘significare’ capiendo large non esset secundae intentionis, quod est contra communem modum loquendi logicorum. </text:span><text:span text:style-name="T639">Quod sequatur illud patet, quia capiendo ly ‘significare’ large mediante copula de praesenti supponit pro aliquod quod non est signum ponibile in propositione, capiendo ly ‘signum’ stricte.</text:span></text:p>
      <text:p text:style-name="P598"><text:span text:style-name="T639">Iam probatur maior argumenti: “Si sortes non esset signum large, non significaretur illo modo per istum terminum ‘homo’”; </text:span><text:span text:style-name="T640">ergo propositum antecedens probatur, quia si Sortes non esset signum </text:span><text:soft-page-break/><text:span text:style-name="T640">propositionale capiendo large, non esset homo, quia non est ponibile quod aliquid sit in rerum natura quin sit signum large, et possit poni in propositione large, capiendo propositionem igitur.</text:span></text:p>
      <text:p text:style-name="P600">Et si dicas quod capiatur ly ‘propositio’ stricte, tunc ly ‘significare large’ non esset secundae intentionis.</text:p>
      <text:p text:style-name="P600">Item etiam iste terminus ‘hoc es<text:span text:style-name="T645">t</text:span>’ demonstrando ly ‘buf’ non est secundae intentionis, tamen significat illo modo ly ‘buf’, vel ad minus capiam istum terminum hoc ly ‘buf’, et istum hoc ly ‘a’, et tunc melius curret argumentum.</text:p>
      <text:p text:style-name="P601">Item etiam contra istum modum exponendi arguitur. <text:span text:style-name="T643">S</text:span>equeretur quod iste <text:span text:style-name="T641">terminus ‘ens’</text:span> <text:span text:style-name="T641">esset secundae intentionis, sed hoc est falsum. </text:span><text:span text:style-name="T644">I</text:span><text:span text:style-name="T642">gitur quod sequatur probo: Significat seipsum ea ratione qua est signum exponendo illo modo; igitur antecedens patet, si non esset signum proprie non significaretur per seipsum exponendo illo modo, quia tunc non supponeret pro seipso igitur.</text:span></text:p>
      <text:h text:style-name="Heading_20_3" text:outline-level="3">Secunda particula definitionis est ista vel rem significatam ea ratione qua significata est</text:h>
      <text:p text:style-name="P602"><text:span text:style-name="T645">Communiter ‘hoc est’ </text:span><text:span text:style-name="T646">significat rem significatam taliter quod si non esset significata non amplius significaretur per talem terminum, et capitur ly ‘significare’ in ultimo loco eo modo quo capiebatur in explicatione alterius particulae.</text:span></text:p>
      <text:p text:style-name="P604">Ex qua expositione potest inferri una regula ad cognoscendum qui termini sint secundae intentionis ratione istius particulae, demonstrato uno termino, si ista consequentia est bona hoc non est significatum; ergo hoc non est tale, tunc signum est quod talis terminus, quia capitur pro praedicato in consequente est terminus secundae intentionis ratione istius particulae, quae regula proportionabiliter intelligitur, et cum eisdem limitationibus sicut alia.</text:p>
      <text:p text:style-name="P605">Contra quam regulam posset afferri instantia de isto termino ‘aliquid’ quod erit nomen et de multis aliis, non stando tamen in regula, posset fieri argumentum cum confirmationibus, sicut fiebat contra aliam particulam, et solveretur eodem modo sicut prius omnibus. Tamen illis dimissis contra modum exponendi illius particulae aliter.</text:p>
      <text:p text:style-name="P606">Arguitur sic: Si modus exponendi esset bonus, sequeretur quod iste terminus vocalis ‘homo’ esset secundae intentionis, sed hoc est falsum. Igitur quod sequatur patet: Significat omnes homines ea ratione qua significati sunt, exponendo illo modo; ergo est secundae intentionis.</text:p>
      <text:p text:style-name="P606">Antecedens probatur: Si sortes non esset significatus per aliquem terminum, non significaretur per istum terminum; ergo significat illo modo Sortem. Antecedens est clarum et consequentia similiter potest probari de quocumque alio homine. Igitur dices forte quod illud intelligitur per alium terminum, hoc est, quod si non significaretur per alium terminum non significaretur per illum.</text:p>
      <text:p text:style-name="P603"><text:span text:style-name="T647">Contra hoc arguitur: Adhuc ille /51a/ </text:span><text:span text:style-name="T648">terminus vocalis significat Sortem illo modo. Ergo propositum antecedens probatur: Si Sortes non significaretur per alium terminum ab illo vocali ‘homo’, non significaretur per illum. Igitur antecedens probatur: Non est possibile quod ille terminus vocalis ‘homo’ significet aliquid, nisi illud idem terminus mentalis significet; ergo si non significaretur per alium terminum ab illo ‘Sortes’ non significaretur per illum terminum ‘homo’, et per consequens significat illum ea ratione qua est significatur per alium terminum.</text:span></text:p>
      <text:h text:style-name="Heading_20_3" text:outline-level="3"><text:soft-page-break/><text:span text:style-name="T648">Et confirmatur ista ratio, quia tunc conceptus non ultimatus huius termini ‘homo’ esset secundae intentionis in significando omnes homines</text:span><text:span text:style-name="T647"> </text:span><text:span text:style-name="T645"><text:s/></text:span><text:span text:style-name="T642"><text:s/></text:span></text:h>
      <text:p text:style-name="P607"><text:span text:style-name="T649">Patet, significat omnes </text:span><text:span text:style-name="T650">ea ratione qua sunt significati per illum terminum vocalem ‘homo’, quia si terminus vocalis non significaret ille conceptus non-ultimatus, non significaret omnes homines, quia significat ex impositione termini vocalis, ut dictum est in materia de conceptibus igitur.</text:span></text:p>
      <text:p text:style-name="P608"><text:span text:style-name="T650">Et confirmatur secunda ratio, </text:span><text:span text:style-name="T651">s</text:span><text:span text:style-name="T650">i modus exponendi</text:span><text:span text:style-name="T625"> </text:span><text:span text:style-name="T650">esset bonus, sequeretur quod iste terminus aequivocatum, non esset terminus secundae intentionis </text:span><text:span text:style-name="T654">p</text:span><text:span text:style-name="T650">atet. </text:span><text:span text:style-name="T654">N</text:span><text:span text:style-name="T650">on significat aliquid ea ratione qua est significatum per alium terminum, igitur patet, nam capiamus gratia exempli quod significet Sortem </text:span><text:span text:style-name="T651">illo modo. Arguitur sic: Non signific</text:span><text:span text:style-name="T652">at Sortem ea ratione qua est significatus per istum terminum Sortes alium ab ipso, nec ea ratione qua est significatus per istum terminum ‘homo’ alium ab ipso, et sic</text:span><text:span text:style-name="T624"> </text:span><text:span text:style-name="T652">de omnibus aliis; ergo non significat Sortem ea ratione qua significatus est per alium terminum ab ipso. Consequentia videtur ascensus et antecedens probatur, nam quocumque illorum terminorum dato, Sortes potest esse aequivocatus absque hoc quod significetur per alium, ut notum est igitur.</text:span></text:p>
      <text:h text:style-name="P893" text:outline-level="3">Ad replicam, cum prima confirmatione, dicitur communiter quod quando dicitur ea ratione quae est significatum per alium terminum, oportet addere vel subintelligere per alium a se, et a sibi simili, et a sibi synonymo</text:h>
      <text:p text:style-name="P609">Et aliter posset dici quod, quando dicitur si non significaretur per alium terminum non significaretur per ipsum, oportet intelligere ad hoc ut habeat verum illud, <text:span text:style-name="T653">q</text:span>uod maneat talis termini significatio quod non habet verum in illis.</text:p>
      <text:h text:style-name="Heading_20_3" text:outline-level="3">Ad aliam confirmationem nego consequentiam, et dico quod non debet sic ascendi sub tali termino, quia supponit confuse tantum</text:h>
      <text:p text:style-name="P610">Sed contra solutionem argumenti arguitur sic: Sequeretur quod iste terminus univocatum non esset terminus secundae intentionis “Hoc consequens est falsum”; ergo et antecedens.</text:p>
      <text:p text:style-name="P610">Quod sequatur patet, non significat <text:span text:style-name="T655">Sortem illo modo nec aliquid aliud, igitur antecedens probatur, dato quod Sortes non significetur univoce per alium terminum ab isto termino univocatum, adhuc significabitur per istum terminum, eo modo quo capitur in expositione; igitur antecedens probatur “Volo quod non sit alius terminus nisi ly ‘univocatum’”, tunc probo illam veram “Sortes est univocatus”, et sic habeo intentum et suppono quod ly ‘univocatum’ tantum valeat sicut hoc totum aliquid significatum univoce per aliquem terminum, et capiendo ly ‘significare’ eo modo quo capitur in capitulo de significare. </text:span><text:span text:style-name="T656">Et si neges quod significet illud, impono ad significandum tantum sicut illud, vel procedo de illo termino in mente ultimata, adhuc erit terminus secundae intentionis, et tunc argumentum curret.</text:span></text:p>
      <text:p text:style-name="P611"><text:span text:style-name="T657">Tunc probo propositum, et arguo sic: Ista est vera “Sortes potest esse univocatus”. In illo casu et cum sit affirmativa et caetera, sequitur quod praedicatum significat Sortem, nam supponit pro eo, et ultra significat Sortem. Quocumque modo capiatur</text:span><text:span text:style-name="T655"> </text:span><text:span text:style-name="T657">non est cura, et non significat aequivoce; ergo univoce. Ergo Sortes univoce significatur per illum terminum, capiendo ly ‘significatur’ sicut in </text:span><text:soft-page-break/><text:span text:style-name="T657">capitulo de significare, nam pro illo supponit ille terminus, ex quibus sequitur ultra quod Sortes est univocatus patet, hoc ex terminis.</text:span></text:p>
      <text:p text:style-name="P615">Potest confirmari ista ratio similiter sicut arguebatur contra expositionem alterius particulae, nam quilibet terminus videtur significatur res, ea ratione qua sunt significatae naturaliter communiter per aliquem terminum, large loquendo de termino et de significare, nam non potest esse aliqua res quin significetur per aliquam terminum illo modo, et illud videtur sufficere ut patet.</text:p>
      <text:p text:style-name="P615">In istis terminis significatum, capiendo large ‘significare similiter’ ‘significatum naturaliter communiter’, qui sunt secundae intentionis. /51b/ Tamen non alio modo significant, et per consequens, quilibet terminus muni esset secundae intentionis secundum istum modum exponendi, quod est falsum.</text:p>
      <text:p text:style-name="P615">Item etiam potest argui de isto termino ‘significatum’, capiendo ampliative est terminus secundae intentionis ratione istius particulae, et tamen non significat aliquid ea ratione qua est significatum, exponendo illo modo, et in eo regula fallit.</text:p>
      <text:p text:style-name="P616">Similiter potest argui de isto termino ‘significabile’, et de ly ‘praedicabile’, capiendo ampliative.</text:p>
      <text:p text:style-name="P616">Item etiam de isto termino ‘ens’, quia videtur quod significet se ea ratione qua est significatum, exponendo illo modo. Tamen non est secundae intentionis ut notum est propter ista argumenta et multa alia similia, quae posset fieri aliter exponentur definitiones datae.</text:p>
      <text:h text:style-name="P894" text:outline-level="3">Unde prima definitio sic exponitur</text:h>
      <text:p text:style-name="Quotations"><office:annotation office:name="__Annotation__5084_1355971545" loext:resolved="false"><dc:creator>Unknown Author</dc:creator><dc:date>2025-08-18T22:42:32.475999074</dc:date><text:p text:style-name="P1023"><text:span text:style-name="T861">Terminus secundae intentionis est terminus significans aliquid ea ratione quae est signum vel significatum.</text:span></text:p></office:annotation>Terminus secundae intentionis est terminus significans aliquid ea ratione quae est signum vel significatum.<office:annotation-end office:name="__Annotation__5084_1355971545"/></text:p>
      <text:p text:style-name="P612">Hoc est connotando generaliter vel specialiter quod sit signum vel significatum.</text:p>
      <text:p text:style-name="P613">Dicitur generaliter propter terminos synonymos vel similes in connotatione, cum ly ‘signum’ vel ‘signa’, vel ly ‘significatum’ vel ‘significata’.</text:p>
      <text:p text:style-name="P614">Dicitur specialiter quia ad hoc quod aliquis terminus sit secundae intentionis, non requiritur quod significet <text:span text:style-name="T658">aliquid connotando in forma quod sit signum vel significatum, sed satis est quod habeat connotationem inferiorem quidditativae ad ly ‘signum’, vel ly ‘signa’, vel ly ‘significatum’, vel ly ‘significata’, quemadmodum contingit de ly ‘nomen’ et ly ‘genus’ et similibus.</text:span></text:p>
      <text:list text:style-name="L38">
        <text:list-item>
          <text:p text:style-name="P979"><office:annotation office:name="__Annotation__4879_1355971545" loext:resolved="false"><dc:creator>Unknown Author</dc:creator><dc:date>2025-08-18T22:22:38.003974719</dc:date><text:p text:style-name="P1023"><text:span text:style-name="T861">1. Quilibet terminus secundae intentionis est terminus connotativus.</text:span></text:p><text:p text:style-name="P1023"><text:span text:style-name="T861"><text:s/></text:span><text:span text:style-name="T861">2. Non oportet in definitione termini secundae intentionis addere ly ‘propositionale’ ad ly ‘signum’.</text:span></text:p></office:annotation><text:span text:style-name="T659">Ex ista expositione sequitur primo quod quilibet terminus secundae intentionis est terminus connotativus.</text:span></text:p>
        </text:list-item>
        <text:list-item>
          <text:p text:style-name="P979"><text:span text:style-name="T659">Sequitur secundo quod non oportet in definitione termini secundae intentionis addere ly ‘propositionale’ ad ly ‘signum’.</text:span><office:annotation-end office:name="__Annotation__4879_1355971545"/></text:p>
        </text:list-item>
      </text:list>
      <text:p text:style-name="P614"><text:span text:style-name="T659">Hoc patet partim ex dicitis et partim patebit ex solutionibus argumentorum. </text:span><text:span text:style-name="T660">Et si petas quomodo cognoscetur quando aliquis terminus habet connotationem specialem seu inferiorem ad connotationem de ly ‘signum’ vel ly ‘signa’ et caetera, dico quod hoc debet cognosci ex libris Praedicabilium et Praedicamentorum et illis in quibus de illo termino consideratur. </text:span><office:annotation office:name="__Annotation__4930_1355971545" loext:resolved="false"><dc:creator>Unknown Author</dc:creator><dc:date>2025-08-18T22:38:06.820054132</dc:date><text:p><text:span text:style-name="T861">Quare si aliquis proponat tibi aliquem terminum... si significet aliquid ea ratione qua est signum vel significatum, est terminus secundae intentionis, sin autem non.</text:span></text:p></office:annotation><text:span text:style-name="T660">Quare si aliquis proponat tibi aliquem terminum tibi ignotum, ita ut non videris librum ubi in quo de ipso consideratur, et petat at te an sit primae vel secundae intentionis, non teneris respondere aliter quam </text:span><text:soft-page-break/><text:span text:style-name="T660">conditionaliter sic, scilicet, quod si significet aliquid ea ratione qua est signum vel significatum, est terminus secundae intentionis, sin autem non.</text:span><office:annotation-end office:name="__Annotation__4930_1355971545"/><text:span text:style-name="T660"> <text:s text:c="2"/></text:span></text:p>
      <text:list text:style-name="L39">
        <text:list-item>
          <text:p text:style-name="P980">Sequitur tertio quod omnes termini de quibus in hac materia terminorum consideratur principaliter similiter, et in tota logica sunt secundae intentionis.</text:p>
        </text:list-item>
      </text:list>
      <text:h text:style-name="Heading_20_3" text:outline-level="3">Definitio termini primae intentionis sic intelligitur</text:h>
      <text:p text:style-name="Quotations"><office:annotation office:name="__Annotation__5087_1355971545" loext:resolved="false"><dc:creator>Unknown Author</dc:creator><dc:date>2025-08-18T22:43:18.589409207</dc:date><text:p><text:span text:style-name="T861">Terminus primae intentionis terminus significans aliquid non ea ratione qua est signum vel significatum, hoc est, non connotando generaliter nec specialiter quod sit signum vel significatum.</text:span></text:p></office:annotation>Est terminus significans aliquid non ea ratione qua est signum vel significatum, hoc est, non connotando generaliter nec specialiter quod sit signum vel significatum.<office:annotation-end office:name="__Annotation__5087_1355971545"/></text:p>
      <text:p text:style-name="P617">Semper in his definitionibus et earum expositionibus capiuntur ly ‘aliquid’ loco de ly ‘aliquid’ vel ‘aliqua’, et ly ‘signum’ loco de ly ‘signum’ vel ‘signa’, et ly ‘significatum’ loce de ly ‘significatum’ vel ‘significata.</text:p>
      <text:h text:style-name="Heading_20_3" text:outline-level="3">Contra primam definitionem multipliciter arguitur</text:h>
      <text:p text:style-name="P618">Primo sic: Ex ipsa sequitur quod quilibet terminus secundae intentionis est propositio vel includens propositionem, sed hoc est falsum. Igitur quod sequatur patet quia quilibet terminus secundae intentionis significat aliquid connotando quod sit signum vel significatum, et hoc non potest connotari nisi per propositionem vel aliquid includens propositionem.</text:p>
      <text:h text:style-name="Heading_20_3" text:outline-level="3">Ad hoc nego sequelam</text:h>
      <text:p text:style-name="P619">Et ad probationem, concessa maiore, distinguo minorem. <text:span text:style-name="T661">V</text:span>el quod non possit illud connotari nisi per propositionem vel per aliquid includens eam complexe, sicut <text:span text:style-name="T661">sonant verba et sic concedo. Vel incomplexe, eo modo quo iste terminus album significat aliquid connotando quod sit album, et nego.</text:span></text:p>
      <text:p text:style-name="P620">In explanatione non intelligimus quod connotat complexe, sed indifferenter complex vel incomplexe, et quia non possumus congruenti explicare connotationem talium terminorum, explicamus illo modo.</text:p>
      <text:h text:style-name="P895" text:outline-level="3">Secundo arguitur, si definitio esse bona, sequeretur quod iste terminus similitudo Sortis esset terminus secundae intentionis, <text:span text:style-name="T663">s</text:span><text:span text:style-name="T662">ed hoc est falsum</text:span></text:h>
      <text:p text:style-name="P621">Igitur quod sequatur <text:span text:style-name="T664">probo. Significat conceptum Sortis ea ratione qua est signum. Igitur antecedens probatur: si ille conceptus non esset signum non significaretur per illum terminum ‘similitudo Sortis’, quia tunc non esse similitudo /52a/ </text:span><text:span text:style-name="T665">Sortis; ergo significat illum conceptum ea ratione qua est signum. Antecedens est clarum. Consequentia probatur per communem modum exponendi illius particulae.</text:span></text:p>
      <text:p text:style-name="P622">Similiter potest argui de isto termino existens in anima Sortis.</text:p>
      <text:h text:style-name="Heading_20_3" text:outline-level="3"><text:soft-page-break/>Ad hoc argumentum respondetur negando sequelam, et ad probationem nego antecedens</text:h>
      <text:p text:style-name="P623">Vel capis significare et sic nego antecedens, et dico quod dato quod non sit similitudo Sortis, adhuc significatur per illum terminum, quia ille terminus significat omne illud quod potest esse similitudo Sortis, vel capio significare in antecedente prout tantum valet sicut supponere mediante copula de praesenti non ampliata nec ampliativa, et sic concedo antecedens et nego consequentiam. Et quando probas per communem modum exponendi, dico quod non debet sic exponi nec sufficit illud, sed requiritur quod connotet generaliter vel specialiter quod sit signum et non, sic est, de illo termino.</text:p>
      <text:h text:style-name="Heading_20_3" text:outline-level="3">Tertio arguitur: Si definitio esse bona sequeretur quod ly ‘imago’ esset terminus secundae intentionis, sed hoc est falsum</text:h>
      <text:p text:style-name="P623">Igitur quod sequatur probo. Significat illam imaginem Sor<text:span text:style-name="T666">tis connotando quod sit signum; igitur antecedens probatur. Significat illam imaginem connotando quod sit imago et non potest esse imago nisi sit signum; ergo connotat quod sit sig</text:span><text:span text:style-name="T667">n</text:span><text:span text:style-name="T666">um.</text:span></text:p>
      <text:h text:style-name="Heading_20_3" text:outline-level="3">Ad hoc argumentum respondetur negando sequelam</text:h>
      <text:p text:style-name="P624">Et ad probationem nego antecedens, et ad probationem nego consequentiam <text:span text:style-name="T668">et do instantiam in simili iste, terminus ‘album’ significat aliquid, connotando quod sit album, et nihil potest esse album nisi sit quantum; ergo connotat quod sit quantum consequentia non valet.</text:span></text:p>
      <text:p text:style-name="P625"><text:span text:style-name="T668">Et si arguas connotatio eius infert connotationem de ly ‘signum’ et non econtra; </text:span><text:span text:style-name="T669">ergo est inferior ad connotationem de ly ‘signum’, quod sufficit ad terminum esse secundae intentionis, ut dictum est, nego consequentiam.</text:span></text:p>
      <text:p text:style-name="P625"><text:span text:style-name="T669">Et si probes quia tunc sequitur quod aequivalenter habebit connotationem de ly ‘signum’, et hoc sufficit igitur. Dico quod si per aequivalenter habetur, intelligas quod infert</text:span> <text:span text:style-name="T669">connotationem de ly ‘signum’, concedo, et nego quod sufficit. Si vero intelligas per aequivalenter habere quod habeat inferiorem, nego quod sequatur illud. Patet instantia in istis terminis ‘album’ et ‘quantum’.</text:span></text:p>
      <text:p text:style-name="P631">Et si arguas de ly ‘imaginatum’, quod videtur esse secundae intentionis et per consequens ly ‘imago’, nam est abstractum eius, ad hoc dico quod ly ‘imaginatum’ non est secundae intentionis, prout est concretum illius termini ‘imago’. Si tamen capias ly ‘imaginatum’ prout descendit de imago et, dummodo ponas in eo connotationem requisitam, est terminus secundae intentionis et aliter hoc torum stat ad nomen.</text:p>
      <text:h text:style-name="Heading_20_3" text:outline-level="3">Quarto arguitur sic: Iste terminus nomen est secundae intentionis tamen significat aliquid, non ea ratione qua est signum; ergo definitio mala</text:h>
      <text:p text:style-name="P626">Maior est nota, minor probatur: Significat illum terminum ‘buf’ et non ea ratione qua est signum; ergo propositum.</text:p>
      <text:p text:style-name="P626">Maior probatur: Iste terminus ‘nomen’ significat omne illud quod est, vel erit, vel fuit, vel potest esse nomen, sed ly ‘buf’ est huiusmodi; igitur significat ly ‘buf’.</text:p>
      <text:p text:style-name="P628"><text:soft-page-break/>Iam probatur minor, quia non significat ly ‘buf’ ea ratione qua est signum, et significat ly ‘buf’; ergo significat ly ‘buf’ non ea ratione qua est signum. Consequentia tenet cum minori, et maior probatur, quia si significaret ly ‘buf’ ea ratione qua est signum, tunc significaret ly ‘buf’ ea ratione qua est signum stricte, cum ad hoc quod aliquid sit nomen, requiratur quod sit nomen stricte, sed non significat ly ‘buf’ ea ratione qua est signum stricte.</text:p>
      <text:p text:style-name="P627">Consequentia tenet cum maiori, et minor probatur quia ly ‘buf’ non est signum stricte; ergo non significat ly ‘buf’ ea ratione qua est signum stricte, quia dato opposito sequeretur quod ly ‘nomen’ significaret aliquid cui deficeret connotatio, et per consequens aliquid esset nomen cui deficeret connotatio de ly nomen.</text:p>
      <text:h text:style-name="Heading_20_3" text:outline-level="3">Ad arguentum concessa maiore nego minorem, et ad probationem iterum concessa maiore nego minorem</text:h>
      <text:p text:style-name="P629"><text:span text:style-name="T670">Et ad probationem nego maiorem, ad cuius probationem, concessa </text:span><text:span text:style-name="T671">maiore</text:span><text:span text:style-name="T670"> nego minorem, et ad </text:span><text:span text:style-name="T671">probationem nego consequentiam. Et ad probationem distinguo quod ly ‘nomen’ significet aliquid cui deficit sua connotatio, vel cui deficit in ordine ad copulam de praesenti, et sic concedo, et nego illud quod ex illo infers vel cui deficit in ordine ad copulam de possibili, et sic nego illud.</text:span></text:p>
      <text:p text:style-name="P630"><text:span text:style-name="T672">Et si arguas /52b/ </text:span><text:span text:style-name="T673">connotatio de ly ‘nomen’ deficit ly ‘buf’ in ordine ad copulam de possibile; ergo ly ‘nomen’ significat aliud cui deficit connotatio in ordine ad copulam de possibili.</text:span></text:p>
      <text:p text:style-name="P632"><text:span text:style-name="T674">Antecedens patet, ista est falsa “Hoc potest esse nomen”, demonstrando ly ‘buf’; igitur antecedens patet,</text:span><text:span text:style-name="T673"> </text:span><text:span text:style-name="T674">quia bene sequitur “Hoc potest esse nomen; ergo Hoc potest esse aliquid”, quod est signum stricte, et consequens est falsum igitur. Et antecedens patet quia ly ‘nomen’ significat </text:span><text:span text:style-name="T675">aliquid, connotando quod sit signum stricte; ergo in ordine ad nullam copulam poterit alicui convenire nisi connotatio eius conveniat eidem in ordine ad eandem copulam, cum igitur connotatio eius sit quod sit signum stricte, sequitur quod non poterit aliquid esse nomen nisi possit esse aliquid quod sit signum stricte, unde apparet bonitas consequentiae assumptae in maiori, et ex consequenti, veritas maioris. </text:span><text:span text:style-name="T677">Ad hoc respondetur negando antecedens, et ad probationem nego antecedens. Et ad probationem nego maiorem.</text:span></text:p>
      <text:p text:style-name="P632"><text:span text:style-name="T677">Et ad probationem, si intelligas quod ly ‘nomen’ connotet quod sit signum stricte, </text:span><text:span text:style-name="T676">mediante illa copula implicationis formaliter vel aequivalenter, negandum est illud. Si autem non intelligas illo modo, concedendum est illud antecedens cum illa prima consequentia, et ad probationem concesso antecedente in proportionabili sensu, neganda est consequentia. Optime tamen concluderetur intentum si concederetur quod ly ‘nomen’ significat, connotando quod sit signum stricte, mediante tali copula implicationis formaliter vel aequivalenter.</text:span></text:p>
      <text:h text:style-name="Heading_20_3" text:outline-level="3">Quinto arguitur: Si definitio esset bona, sequeretur quod ly ‘verbum adiectivum’ non esset terminus secundae intentionis <text:span text:style-name="T679">casu posito quod nullum esset verbum adiectivum, sed hoc est falsum</text:span></text:h>
      <text:p text:style-name="P633">Igitur quod sequatur probo, et capio in illo casu illam propositionem “Hoc est verbum adiectivum”, demonstrando ly ‘buf’ et arguitur sic: Ly ‘verbum adiectivum’ nihil significat in ordine ad copulam de praesenti; ergo nihil significat illic, et per consequens non est secundae intentionis.</text:p>
      <text:p text:style-name="P633"><text:soft-page-break/>Maiorem probo: Nullum significatum correspondet ei in ordine ad copulam de praesenti, quia nullum est verbum adiectivum in casu, igitur.</text:p>
      <text:h text:style-name="Heading_20_3" text:outline-level="3">Ad hoc respondetur negando sequelam, et ad probationem, admisso casu, nego quod ille terminus nihil significet in ordine ad copulam de praesenti</text:h>
      <text:p text:style-name="P634"><text:span text:style-name="T681">E</text:span>t ad probationem, nego quod nullum significatum correspondeat ei in ordine ad copulam de praesenti, immo, in ordine ad illam accipitur pro multis. Et quando probas, de nullo termino verificatus in ordine ad talem copulam, concedo; <text:span text:style-name="T680">ergo nullum ei correspondet.</text:span></text:p>
      <text:p text:style-name="P635">Nego consequentiam: Per illud solum probas quod pro nullo supponit in ordine ad illam copulam, quod est verum, sed cum hoc stat quod significet in ordine ad illam.</text:p>
      <text:h text:style-name="Heading_20_3" text:outline-level="3">Sexto arguitur sic: Contra illam particulam ea ratione qua est significatum et eius expositionem ex illis, sequitur quod iste terminus ‘homo’ est terminus secundae intentionis, sed hoc est falsum</text:h>
      <text:p text:style-name="P636">Igitur quod sequatur patet: Significat omnes homines <text:span text:style-name="T682">ea ratione quae sunt significati per aliquem terminum; ergo est terminus secundae intentionis. Antecedens probatur: Si nullus homo significaretur per aliquem terminum, nullus significaretur per situm terminum ‘homo’; ergo significat illos ea ratione qua sunt significati.</text:span></text:p>
      <text:h text:style-name="Heading_20_3" text:outline-level="3">Et confirmatur ista ratio: Conceptus non-ultimatus istius termini ‘homo’ significat omnes homines ea ratione qua sunt significati per istum terminum vocalem</text:h>
      <text:p text:style-name="P637">Igitur antecedens probatur: Si non significare<text:span text:style-name="T683">ntur per istum terminum vocalem, non significarentur per illum mentalem, nam ille significat ex impositione illud igitur.</text:span></text:p>
      <text:h text:style-name="Heading_20_3" text:outline-level="3">Ad argumentum respondetur negando sequelam</text:h>
      <text:p text:style-name="P640">Et ad probationem nego antecedens, et ad probationem nego consequentiam. Concesso antecedente non sufficit illud ad terminum esse secundae intentionis. Et per hoc patet solutio confirmationis.</text:p>
      <text:h text:style-name="Heading_20_3" text:outline-level="3">Septimo arguitur: Iste terminus mentalis nominatum est terminus secundae intentionis, tamen non significat aliquid ea ratione qua est significatum</text:h>
      <text:p text:style-name="P641">Igitur maior est nota, et minor patet, quia dato eius oppositio tunc iste terminus mentalis aequivocatum significaret aliquid ea ratione quae est significatum aequivoce per aliquem terminum. Sed hoc est falsum. Patet dato quod Sortes non significetur aequivoce per aliquem terminum adhuc significatur per istum terminum aequivocatum; ergo non significat ea ratione qua est significatum per aliquem terminum.</text:p>
      <text:p text:style-name="P638"><text:span text:style-name="T684">Consequentia videtur /53a/ </text:span><text:span text:style-name="T685">tenere per communem modum exponendi, nam dato opposito, terminus mentalis caderet a sua significatione, quod est falsum.</text:span></text:p>
      <text:h text:style-name="Heading_20_3" text:outline-level="3"><text:soft-page-break/>Ad istud argumentum quid sit dicendum patet ex solutionibus aliorum argumentorum</text:h>
      <text:p text:style-name="P639"><text:span text:style-name="T685">Quando tamen dicis in argumento dato quod Sortes non significaretur aequivoce per aliquem, tamen adhuc significaretur per illum. Si capias significare ut capitur in capitulo de significare, </text:span><text:span text:style-name="T686">concedo. Si vero capias per supponere mediante copula de praesenti, nego.</text:span></text:p>
      <text:p text:style-name="P642">Et quando probas quod terminus mentalis caderet a sua significatione, si intelligas hoc est a sua suppositione, concedo consequentiam cum consequente, si vero capias significationem sicut in capitulo de significare, nego consequentia cum consequente.</text:p>
      <text:h text:style-name="Heading_20_3" text:outline-level="3">Octavo: Arguitur contra expositionem definitionis termini secundae intentionis</text:h>
      <text:p text:style-name="P643"><text:span text:style-name="T687">Ex ipsa sequitur quod iste terminus ‘significans naturaliter communiter’, et iste terminus ‘significatur capiendo large’, similiter ly ‘terminus capiendo large’ essent termini secundae inten</text:span><text:span text:style-name="T688">tionis, nam habent conditiones requisitas, sed hoc est falsum. Patet quia tunc sufficeret ad terminum esse secundae intentionis, quod significaret aliquid connotando quod sit signum large, ut patet de illis terminis, sed hoc est falsum. Patet quia tunc iste terminus ‘imago’ esset terminus secundae intentionis, quia videtur connotare quod sit signum large.</text:span></text:p>
      <text:h text:style-name="Heading_20_3" text:outline-level="3">Ad hoc respondetur concedendo sequelam, et quando dicis: Tunc sufficeret quod significarent aliquid, connotando quod sit signum, capiendo ly ‘signum’ large, concedo</text:h>
      <text:p text:style-name="P644">Et quando infers de ly ‘imago’, nego quod connotet illud, licet bene verum sit quod habeat aliquam connotationem ad quam sequitur connotatio de ly ‘signum’ large. Sed ex hoc non sequitur quod connotet illud, ut dictum est.</text:p>
      <text:p text:style-name="P644">Ex ista solutione sequitur veritas corollarii illati superius, quod non oportet addere ly ‘propositionale’ in definitione termini secundae intentionis.</text:p>
      <text:h text:style-name="Heading_20_3" text:outline-level="3">Nono: Arguitur contra illas duas definitiones simul</text:h>
      <text:p text:style-name="P644">Ex ipsis sequitur quod nullus terminus poterit simul esse primae et secundae intentionis copulative. Sed hoc est falsum. Igitur falsitas consequentis probatur quia ly ‘genus’ est secundae intentionis prout a logico consideratur, et est primae <text:span text:style-name="T689">prout significat parallelam.</text:span></text:p>
      <text:p text:style-name="P645">Sequela probatur quia dato opposito illius illati sequitur contradictio, quia bene sequitur “Iste terminus est secundae intentionis; ergo significat aliquid ea ratione qua est signum vel significatum”. Similiter sequitur “Iste est terminus primae intentionis; ergo significat aliquid ea ratione qua est signum vel significatum”. Sed ista duo videtur implicare contradictionem.</text:p>
      <text:p text:style-name="P645">Forte negabis hoc, quia aliquis terminus significat aliquid ea ratione qua est signum vel significatum, et idem significat aliquid aliud non ea ratione qua est signum vel significatum.</text:p>
      <text:p text:style-name="P645">Contra hoc arguitur, quia saltem sequitur quod non poterit aliquis terminus esse primae intentionis respectu eiusdem significati copulative, quia dato huius opposito, sequitur quod significat illud ea ratione qua est signum vel significatum, et quod significat illud non ea ratione qua est signum vel <text:soft-page-break/>significatum, quae duo repugnant. Sed si falsitas illati probatur, volo quod iste terminus ‘a’ uno modo significet illum terminum ‘homo’ discrete, nihil connotando, et alio modo significet eundem discrete, connotando quod sit signum, tunc continget oppositum illati de illo termino ‘a’.</text:p>
      <text:h text:style-name="Heading_20_3" text:outline-level="3">Ideo ad argumentum respondetur negando sequelam</text:h>
      <text:p text:style-name="P650">Immo oppositum illati contingit, ut probatum est, sed non continget secundum eandem significationem. Et quando arguis ad illud sequitur contradictio, nego. Et ad probationem nego illam consequentiam.</text:p>
      <text:p text:style-name="P650">In rigore iste terminus est primae intentionis; ergo significat aliquid non ea ratione qua est signum, sed oportet hoc inferre. Ergo secundum aliquam significationem significat aliquid non ea ratione qua est signum, et cum tali addito, debet intelligi definitio termini primae intentionis, et non simpliciter.</text:p>
      <text:p text:style-name="P650">Et similiter potest dici de omnibus definitionibus, quae in hac materia terminorum dantur quodammodo per abnegationem, et non debent intelligi simpliciter, sed cum consimilibus additis.</text:p>
      <text:h text:style-name="Heading_20_3" text:outline-level="3">Decimo: Arguitur contra divisionem termini in terminum primae et secundae intentionis</text:h>
      <text:p text:style-name="P646">Aliquis terminus significat aliquid vel aliqua qui non est primae nec secundae intentionis; ergo divisio mala. Consequentia tenet et antecedens patet.</text:p>
      <text:p text:style-name="P646">Hoc copulatum “Homo et nomen” significat aliquid vel aliqua, et non est /53b/ primae nec secundae intentionis; igitur consequentia tenet et maiorem est nota. Et minor probatur, quia si sit primae qua ratione erit primae eadem erit secundae, et si secunde qua ratione erit secundae, eadem erit primae, quia non videtur magis significare aliquid ea ratione qua est signum quam aliquid non ea ratione qua est signum.</text:p>
      <text:p text:style-name="P646">Consimilis difficultas potest fieri de illo disiuncto “Sortes vel nomen”.</text:p>
      <text:h text:style-name="Heading_20_3" text:outline-level="3">Confirmatus ratio: Illud copulatum nomen et nominatum significat aliqua, et non est primae nec secundae</text:h>
      <text:p text:style-name="P649">Quis si sic, maxime esset secundae, <text:span text:style-name="T690">sed hoc non, quia non significat aliqua ea ratione qua est signum, nec significat aliqua ea ratione qua est significatum; igitur non est secundae intentionis.</text:span></text:p>
      <text:h text:style-name="Heading_20_3" text:outline-level="3">Circa materiam argumenti, est advertendum, quod antiqui nullam mentionem fecerint de copulatis aut disiunctis quorum aliquae partes principales sunt termini secundae intentionis et aliae primae</text:h>
      <text:p text:style-name="P651">Quia tales <text:span text:style-name="T691">termini non sunt de consideratione alicuius scientiae. De ipsis tamen et de aliis terminis complexis complexione indistanti, quorum aliquae partes sunt termini primae intentionis et aliae secundae, occurrit tam difficultas an divisio cum definitionibus datis sufficiat pro illis.</text:span></text:p>
      <text:p text:style-name="P652">Ideo primo dicam de huiusmodi copulatis, secundo de disiunctis et tertio de aliis complexis statim nominatis.</text:p>
      <text:p text:style-name="P652"><text:soft-page-break/>Pro primo igitur est advertendum quod secundum aliquos, definitiones datae non sufficerent sine ulteriori additione, et propterea addebant aliquid in definitione termini secundae intentionis. Sed quia sine tali additione possunt divisio et definitiones salvari, relicto isto modo dicendi, alios duos modos tangam, pro quibus sit haec prima propositio:</text:p>
      <text:p text:style-name="Quotations">Sustentabile est quod nullum copulatum significet aliquid de connotatione totali, nisi connotatio eius proveniat a connotatione ambarum partium eius.</text:p>
      <text:p text:style-name="P652">Et ita dicendo quantumcumque aliquod copulatum cuius una pars principalis est primae intentionis et alia secundae significet aliquod ens, unum pro quo potest supponere. Non tamen nisi connotatio illius partis quae est secundae conveniat illi. Tamen illud copulatum, non connotaret de significatione totali, esse signum vel signa.</text:p>
      <text:p text:style-name="P657">Prima pars patet de isto copulato ‘hoc ens’ et ‘hoc nomen’, continuo demonstranto uno termino scripto qui est unum ens.</text:p>
      <text:p text:style-name="P657">Secunda patet ex supposito, et tenendo hanc propositionem, oporteret dicere quod quodlibet tale copulatum esset terminus primae intentionis et nullum esse secundae, quia ad terminum secundae requiritur quod significet aliquid, connotando de significatione totali quod sit signum vel significatum. Et ad terminum primae quod significet aliquid, non connotando de significatione totali quod sit signum vel significatum.</text:p>
      <text:p text:style-name="P657">Et iste modus dicendi facillime potest defendi, et facilius et clarius quam aliquis alius, quia nullum argumentum habens aliquid difficultatis contra ipsum fieri posset.</text:p>
      <text:p text:style-name="P653">Secundae:</text:p>
      <text:p text:style-name="Quotations">Sustentabile est quod ubicumque aliquod copulatum, cuius una pars principalis est terminus connotativus sive alia, sit terminus connotativus sive non, significat de significatione totali aliquod significatum pro quo non potest supponere nisi connotatio illius partis eius, quae est connotativa, conveniat illi, <text:span text:style-name="T693">i</text:span>llud copulatum de significatione totali connotet supra illud significatum taliter qualiter connotat illa pars eius quae est connotativa. Et ubicumque aliquod copulatum tale de significatione totali, significat aliquod significatum pro quo potest supponere absque hoc quod connotatio talis partis conveniat illi, quod illud non connotet de significatione totali supra illud significatum taliter qualiter illa pars connotativa connotat.</text:p>
      <text:p text:style-name="P654">Ista propositio non eget probatione dummodo <text:span text:style-name="T694">solvantur argumenta quae contra ipsam fieri possunt. Et loquendo consequenter ad hanc propositionem, infero tria corollaria declarativa, propositi per quae poterunt solvi omnia argumenta contra istum modum dicendi applicabilia.</text:span></text:p>
      <text:list text:style-name="L40">
        <text:list-item>
          <text:p text:style-name="P981">Primum: Aliquod copulatum, cuius una pars principalis est terminus primae intentionis et alia secundae, est terminus primae intentionis, et non secundae. Patet de sito copulato “Sortes et Terminus mentalis”, capiendo ly ‘Sortes’ personaliter secundum significationem secundum quam significat Sortem.</text:p>
        </text:list-item>
        <text:list-item>
          <text:p text:style-name="P981">Secundum: Aliquod tale copulatum est terminus secundae intentionis et non primae. Patet de isto “Hoc ens et Hoc nomen”, eodem termino scripto /54a/ <text:span text:style-name="T695">utrobique demonstrato.</text:span></text:p>
        </text:list-item>
        <text:list-item>
          <text:p text:style-name="P982"><text:soft-page-break/>Tertium: Aliquod tale copulatum est primae intentionis et etiam secundae copulative, et secundum eandem significationem. Hoc patet de isto copulato “Substantia indivisibilis et Significatum” per istum terminum ‘angelus’ secundum istam definitionem, demonstrando significationem de ly ‘angelus’, unde illud copulatum “Quemlibet angelum” significat de significatione totali, connotando quod sit significatus et caetera.</text:p>
        </text:list-item>
      </text:list>
      <text:p text:style-name="P655">Prout ex propositione apparet, <text:span text:style-name="T696">et quemlibet binarium ex uno angelo et una anima intellectiva, significat de significatione totali, non connotando quod sit signum vel signa vel significatum vel significata, prout etiam ex propositione apparere potest, et per consequens ex definitionibus, ille terminus erit simul primae intentionis et secundae copulative secundum illam significationem.</text:span></text:p>
      <text:p text:style-name="P658">Et idem contingit de isto termino ‘ens’ et hoc nomen scriptum, demonstrando unum nomen scriptum. Nec hoc quod corollarium proponit debet tibi apparere; adeo extraneum quod propter hoc relinquas hunc modum dicendi, quia in disiunctis hoc idem debet concedi qualitercumque dicatur, prout statim apparebit.</text:p>
      <text:p text:style-name="P656"><text:span text:style-name="T697">Et si fiat difficultas de copulato cuius una pars principalis est primae intentionis et altera secundae, quod non potest supponere pro significato quod significat de signific</text:span><text:span text:style-name="T698">atione totali, dico quod secundum propositionem fundamentalem positam, debet poni secundae intentionis.</text:span></text:p>
      <text:p text:style-name="P661">Ex his igitur patet facilis modus ad iudicandum de quocumque copulato cuius una pars est primae intentionis et altera secundae, an sit primae vel secundae intentionis, vel primae et secundae simul.</text:p>
      <text:p text:style-name="P661">Videndum est etiam an possit supponere pro aliquo significato totali vel non. Si non est secundae intentionis, et si sic, iterum videndum est an pro quolibet significato pro quo potest supponere, possit supponere absque hoc quod connotatio illius partis eius, quae est secundae intentionis, conveniat illi, vel pro nullo tali possit supponere absque tali, vel pro aliquo tali possit supponere absque illo, et pro aliquo tali non possit supponere absque illo si primum erit terminus primae et non secundae, et si secundum erit secundae et non primae, et si tertium erit primae et secundae copulativae.</text:p>
      <text:p text:style-name="P662">Ex isto modo dicendi, sequitur quod aliquis est terminus secundae intentionis, qui de significatione totali significat aliquid, connotando etiam de significatione totali quod sit nomen. Et potest supponere pro aliquo quod significat de significatione totali absque hoc quod sit nomen. Patet de isto copulato, qualitas et hoc nomen, demonstrato nomine mentali.</text:p>
      <text:h text:style-name="Heading_20_3" text:outline-level="3">Sed pro disiunctis quorum una pars principalis est terminus primae intentionis et altera secundae, ponam duas propositiones per quas apparebunt duo modi qui poterunt in ipsis defendi</text:h>
      <text:p text:style-name="P659">Sustentabile est quod quodlibet disiunctum cuius una pars principalis est terminus connotativus, sive alia sit terminus connotativus sive absolutus de significatione totali, significet illud quod pars eius connotativa significat. Et de significatione totali etiam connotet supra illud significatum illius partialiter qualiter illa pars connotat.</text:p>
      <text:p text:style-name="P660">Haec propositio fundatur in hoc, quia quemadmodum quodlibet disiunctum cuius quilibet pars est terminus categorematicus significatione de significatione totali, significat quidquid per aliquam partem eius categorematicam significatur.</text:p>
      <text:p text:style-name="P660"><text:soft-page-break/>Ita etiam poterit sustentari id quod propositio proponit, et consequenter, loquendo ad hanc propositionem, quodlibet disiunctum cuius una pars principalis est primae intentionis et altera secundae esset secundae intentionis. Et aliquod tale esset etiam primae, secundum eandem significationem, sicut apparet de isto termino ‘Sortes’ vel hic terminus scriptus, demonstrando unum terminum scriptum, et hic modus valde facile potest sustentari.</text:p>
      <text:p text:style-name="P660">Et ex isto modo dicendi, sequitur corollarie quod aliquis terminus secundae intentionis significat aliquid de significatione totali, et connotat de significatione totali quod sit nomen, et tamen potest supponere pro illo in ordine ad copulam de praesenti, secundum talem significationem, absque hoc quod sit nomen. Patet de isto ens vel hoc nomen, demonstrato uno nomine scripto.</text:p>
      <text:p text:style-name="P660"><text:span text:style-name="T699">Secunda: Sustentabile est quod ubicumque aliquod disiunctum cuius una pars principalis est terminus connotativus, sive alia sit terminus connotativus sive non, significat aliquid de significatione totali, pro quo non potest supponere absque hoc quod connotatio /54b/ </text:span><text:span text:style-name="T700">illius partis eius, quae est terminus connotativus, conveniat illi significato de significatione totali supra illud significatum, taliter qualiter illa pars eius connotativa connotat. Et ubicumque aliquod tale disiunctum significat aliquod significatum de significatione totali, pro quo potest supponere absque hoc quod connotatio illius partis conveniat illi, tunc illud disiunctum non connotet</text:span> <text:span text:style-name="T700">ultra illud significatum totale, taliter qualiter illa pars connotat et communiter loquendo, ad istam propositionem infero tria corollaria huius materiae declarativa, per quae poterunt solvi omnia argumenta contra istum modum dicendi applicabilia.</text:span></text:p>
      <text:list text:style-name="L41">
        <text:list-item>
          <text:p text:style-name="P983">Primum: <text:span text:style-name="T701">Aliquod tale disiunctum est terminus primae et non secundae. Patet de isto “Sortes vel ‘Sortes’ significatus per illum terminum scriptum ‘homo’”, demonstrando illum terminum scriptum ‘homo’ qui non est pars huius disiuncti.</text:span></text:p>
        </text:list-item>
        <text:list-item>
          <text:p text:style-name="P984">Secundum: Aliquod tale disiunctum est terminus secundae et non primae. Patet de isto “<text:span text:style-name="T702">N</text:span>on-intelligibile vel nomen” imitando praecise ly ‘intelligibile’ per illam dictionem ‘non’.</text:p>
        </text:list-item>
        <text:list-item>
          <text:p text:style-name="P984">Tertium: Aliquod tale disiunctum est primae et secundae intentionis copulative, secundum eandem significationem. Patet de isto “<text:span text:style-name="T702">Sortes vel hoc nomen”, demonstrando unum nomen scriptum.</text:span></text:p>
        </text:list-item>
      </text:list>
      <text:p text:style-name="P663">Haec omnia patent ex propositione fundamentali et definitionibus. Et si <text:span text:style-name="T703">fiat difficultas de aliquo tali disiuncto non potente supponere pro aliquo significato totali, de illo dico quod stando in fundamento illud debet esse secundae intentionis et non primae.</text:span></text:p>
      <text:p text:style-name="P664">Ex his igitur habes facilem modum ad cognoscendum de quocumque tali disiuncto an sit primae vel secundae intentionis, vel secundae et primae copulative.</text:p>
      <text:p text:style-name="P664">Videndum enim est primo an possit supponere pro aliquod suo totali significato vel non, si non erit secundae, et si sic iterum videndum est an pro quolibet suo significato totali pro quo potest supponere, possit supponere absque hoc quod connotatio illius partis eius, quae est secundae intentionis conveniat illi, vel pro nullo tali possit supponere absque illo, vel pro aliquo tali possit et pro aliquo tali non possit absque illo si primum erit terminus primae et non secundae, si secundum erit secundae et non primae, et si tertium erit primae et secundae copulative.</text:p>
      <text:p text:style-name="P664">Et omnes isti modi tacti circa talia copulata et talia disiuncta indifferenter placent mihi. Tu autem illos quid tibi magis placebunt eliges.</text:p>
      <text:p text:style-name="P665"><text:soft-page-break/>Posset occurrere difficultas de conditionatis, in quibus terminus inferens est primae intentionis et terminus illatus secundae, aut ediverso se habent. <text:span text:style-name="T704">Sed pro illis potest dici quod quodlibet conditionatum cuius terminus illatus est primae intentionis, debet poni primae intentionis qualitercumque se habet terminus inferens. Sed de conditionatis, quorum terminus illatus est secundae intentionis qualitercumque se habeat terminus inferens, potest dici quod quolibet tale est terminus secundae intentionis, et potest dici ad ultimos modos dicendi tactos in copulatis et disiunctis, et magis apparenter diceretur hoc modo quam aliquod alio.</text:span></text:p>
      <text:p text:style-name="P667">Sed pro terminis complexus complexione indistanti, quorum aliquae partes principales sunt termini primae intentionis et aliae secundae, pono hanc propositionem:</text:p>
      <text:p text:style-name="Quotations"><text:span text:style-name="T705">Quodlibet complexum indistans adaequate compositum ex determinabili prime intentionis et determinatione secundae, vel ex determinabili secundae et determinatione primae, vel ex </text:span><text:span text:style-name="T706">determinabili secundae et determinatione etiam secundae tamquam ex partibus principalibus, cuius determinatio et determinabile denotantur eidem convenire et pro eodem supponere, dummodo illud totum significet iuxta tales significatione partium, est secundae intentionis.</text:span></text:p>
      <text:p text:style-name="P668">Dicitur tanquam ex partibus principalibus ad secludendum istum terminum et similes ‘videns terminum significativum’. Dicitur cuius determinatio et determinabile denotantur eidem convenire, et pro eodem supponere ad secludendum ly ‘videns nomen’ est similes terminos.</text:p>
      <text:p text:style-name="P666"><text:span text:style-name="T707">Dicitur dummodo significet iuxta talem significationem partium, quia alias non oportet. Sicut patet de istis terminis ‘cappa categorica’, ‘cappa hypothetica’. Ex qua propositione sequitur primo quod isti termini ‘atramentum’ significans omnes homines, aliquid quod est nomen, aliquid quod est propositio et similes, sunt termini secundae intentionis. Similiter iste terminus ‘haec scriptura’ significans </text:span><text:span text:style-name="T708">alius</text:span><text:span text:style-name="T707"> adiectivum, </text:span><text:span text:style-name="T708">alius</text:span><text:span text:style-name="T707"> substantivum /55a/ et similes, et de omnibus his patet exemplum primae partis propositionis.</text:span></text:p>
      <text:p text:style-name="P669">Sequitur secundo quo omnes isti termini ‘nomen mentale’, ‘nomen vocale’, ‘nomen scriptum’. ‘propositio alba’, ‘propositio nigra’, ‘nomen quod est ens’ sunt termini secundae intentionis.</text:p>
      <text:p text:style-name="P670"><text:span text:style-name="T707">Similiter et isti terminus ‘non’ significans aliquid ea ratione quae est signu</text:span><text:span text:style-name="T709">m vel significatum. Iste terminus qui non est signum vel significatum quolibet illorum demonstrante se, nec ista consequentia valet: Quilibet illorum significat aliquid ratione qua non est signum vel significatum; ergo quilibet illorum significat aliquid non ea ratione qua est signum vel significatum, et de omnibus his terminis apparet exemplum secundae partis propositionis.</text:span></text:p>
      <text:p text:style-name="P674">Sequitur tertio quod isti termini ‘propositio categorica’, ‘propositio hypothetica’, ‘propositio vera’, ‘propositio falsa’, ‘nomen substantivum’, ‘nomen adiectivum’, ‘nominativus casus’, ‘genitivus casus’. Et sic discurrendo per alia accidentia nominis et verbi, et aliarum partium orationis, et de his omnibus et similibus, apparet exemplum tertia partis propositionis.</text:p>
      <text:p text:style-name="P671"><text:span text:style-name="T710">Resta iam difficultas de terminis infinitis, an aliquis sit secundae intentionis. Pro quo dico quod si hoc totum ‘non non-nomen’ supposito quod terminus infinitus possit infinitari, vel hoc totum ‘non-aliquid’ quod non est nomen, vel ly ‘non-aliquid non-nomen’ ponatur de significatione totali connotare sicut ly ‘nomen’, </text:span><text:span text:style-name="T711">o</text:span><text:span text:style-name="T710">mnes illi termini infiniti et similes erunt secundae intentionis.</text:span></text:p>
      <text:p text:style-name="P671"><text:soft-page-break/><text:span text:style-name="T711">S</text:span><text:span text:style-name="T710">i vero non ponatur talis connotatio in illis, nullus poterit esse secundae intentionis esto quod nullus illorum sumptorum possit pro aliquo supponere in ordine ad copulam de praesenti, nisi connotando de ly ‘nomen’ conveniat eidem ordine ad illam copulam, sed melius est dicere primo modo.</text:span></text:p>
      <text:p text:style-name="P672">Sed circa illud occurrit difficultas, postquam terminus infinitus potest infinitari, ponendo infinitas negationes infinitantes, taliter quod prima infinitet ly ‘nomen’, et secunda infinitet compositum ex prima et ly ‘nomen’, et terti infinitet compositum ex secundae et illo composito, et ita de aliis dubium est tunc an illud totum sit primae vel secundae intentionis.</text:p>
      <text:p text:style-name="P672">Ad hoc potest probabiliter dici quod est secundae intentionis, et aequivalet ad ly ‘nomen’, et dato quod auferatur una negatio ab illis, adhuc erit secundae intentionis.</text:p>
      <text:p text:style-name="P672">Simile est sicut si ponerentur infinitae negationes, neganter captae, ante copulam alicuius categoricae, tunc illa tota erit propositio affirmativa, sicut inferius dicetur, et dato quod tollatur una, manebis affirmativa, quia continuo omnes mutuo se impediunt. Si tamen ponatur quod omnes mutuo se impediant una dempta, quod potest bene concipi, et quod illa non impedita cadat supra illam copulam, illa propositio erit negativa.</text:p>
      <text:p text:style-name="P672">Proportionabiliter potest dici in proposito si enim tento ordine in casu argumenti posito, adhuc adderetur una quae non impediretur, sed infinitaret totum quod praeerat, tunc totum proveniens esset primae intentionis, et aequivalenter ad ly ‘non-nomen’, ex quibus patet quod quamvis aliquis terminus infinitus sit secundae intentionis, tamen nullus terminus infinitus cuius terminus infinitus est incomplexus, est terminus secundae intentionis.</text:p>
      <text:p text:style-name="P675">Tunc facile est respondere ad argumentum, unde nego consequentis, et ad probationem nego minorem. Immo dico quod ille terminus est primae intentionis et non secundae, sive dicatur consequenter ad primum modum <text:s/>dicendi, sive consequenter ad secundum, quia secundum primum non est quaestio, sed secundum alium patet, quia quocumque significato dato quod significat de significatione totali, potest supponere pro illo absque hoc quod connotatio de ly ‘nomen’ conveniat illi. Quare ex processu, iuxta secundum modum dicendi, non significabit aliquod tale significatum, connotando de significatione totali, quod sit signum vel significatum, et per consequens non erit terminus secundae intentionis.</text:p>
      <text:p text:style-name="P675">Et ad illud quod tangis, scilicet quod qua ratione erit primae eadem erit secundae, secundum utrumque modum, debet hoc negari et facile apparet illud esse falsum.</text:p>
      <text:p text:style-name="P675">Et si dicas ille terminus potest supponere pro Sorte in ordine ad copulam de praesenti, et non poterit pro illo supponere nisi sit nomen. Ad hoc neganda est minor, concessa maiori.</text:p>
      <text:p text:style-name="P673"><text:span text:style-name="T712">Si enim in manu Sortis sculpatur ferro ignito, iste terminus ‘homo’ erit tunc Sortes homo et nomen. Quare in ordine ad copulam de praesenti, tunc supponet pro Sorte, tamen Sortes non erit tunc nomen. /</text:span><text:span text:style-name="T713">55b</text:span><text:span text:style-name="T712">/</text:span></text:p>
      <text:p text:style-name="P680">Ad illud quod tangis de illo disiuncto “Sortes vel nomen”, dico quod secundum utrumque duorum modorum dicendi tactorum, debet poni terminus primae, et terminus secundae intentionis copulative, et facile post hoc concedere unusquisque intelligens illos modos dicendi.</text:p>
      <text:h text:style-name="P896" text:outline-level="3"><text:soft-page-break/>Pro solutione confirmationis argumenti est advertendum quod definitio terminus secundae intentionis posita est illo modo quia sic sole communiter assignari <text:span text:style-name="T714">et loquendum est ut plures</text:span></text:h>
      <text:p text:style-name="P676">Hoc tamen non obstante si definitio illa debeat salvari oportebit in ea multa sub intelligere, qua non expresse tacta sunt unde sic intelligenda erit.</text:p>
      <text:h text:style-name="Heading_20_3" text:outline-level="3">Terminus secundae intentionis est terminus significans aliquid ea ratione qua est signum vel significatum vel signum et significatum</text:h>
      <text:p text:style-name="P677">Semper capiendo ly ‘aliquid’ loco de ly ‘aliquid vel aliqua’, et ly ‘signum’ loco de ly ‘signum vel signa’, et ly ‘significatum’ loco de ly ‘significatum vel significata’. Et proportionabile additum debet addi in definitione termini primae intentionis, et consimiliter debent capi ly ‘aliquid’ et ly ‘signum’ et ly ‘significatum’ in illa sicut in ista.</text:p>
      <text:p text:style-name="P678">Tunc respondeo ad forma confirmationis negando minorem, immo dico quod est secundae intentionis, et ad illud quod tangis ad probandum huius oppositum neganda est consequentia, nec illa tenet per definitionem intellectam, sicut debet intelligi. Bene tamen teneret per illam si deberet capi in rigore, sicut posita fuit sine ulteriori additione, tamen non sic debet capi ut dictum est.</text:p>
      <text:p text:style-name="P660"/>
      <text:h text:style-name="P869" text:outline-level="2">De termino singulari et communi</text:h>
      <text:h text:style-name="Heading_20_3" text:outline-level="3">Consequenter videndum est de alia divisione termini, unde terminus adhuc dividitur in communem et singularem </text:h>
      <text:p text:style-name="P679">Cuius divisionis divisum est ly ‘terminus categorematicus significatione’, quia non potest aliquis terminus esse communis vel singularis secundum aliquam significationem nisi significet aliquid vel aliqua secundum illam.</text:p>
      <text:h text:style-name="Heading_20_3" text:outline-level="3">Unde terminus singularis est terminus cui ex modo suae significationis repugnat verificari de pluribus, ut ‘Sortes’</text:h>
      <text:h text:style-name="Heading_20_3" text:outline-level="3"><text:span text:style-name="T715">Terminus communis est terminus cui ex modo suae significationis non repugnat verificari de pluribus, ut ‘homo’</text:span><text:span text:style-name="T692"> <text:s/></text:span><text:s/></text:h>
      <text:p text:style-name="P681">Ex his definitionibus et superius dictis, potest inferri quod quilibet terminus est singularis et communis copulative.</text:p>
      <text:list text:style-name="L42">
        <text:list-item>
          <text:p text:style-name="P985">‘Singularis’ enim secundum significationem secundum quam significat se discrete naturaliter communiter.</text:p>
        </text:list-item>
        <text:list-item>
          <text:p text:style-name="P986">‘Communis’ autem secundum significationem secundum quam significat plura sibi similia.</text:p>
        </text:list-item>
      </text:list>
      <text:p text:style-name="P682">Non tamen hoc contingeret secundum eandem significationem, nec posset contingere nec contingit iam secundum significationes proprias, licet possit contingere in aliquibus terminis diversas significationes proprias habentibus.</text:p>
      <text:h text:style-name="Heading_20_3" text:outline-level="3">Contra primam definitionem arguitur primo sic: Ly ‘Sortes’ est terminus singularis et verificatur de pluribus; ergo definitio mala</text:h>
      <text:p text:style-name="P683">Minor patet, verificatur de his terminis ‘homo’, ‘animal’, ‘substantia’ et illi sunt plures igitur.</text:p>
      <text:p text:style-name="P683">Fortes dices quod licet verificetur de pluribus terminis, non tamen pro pluribus suppositis, quia omnes illae propositiones in quibus verificatur de pluribus praecise, pro uno verificantur, et in definitione ubi dicitur de pluribus, debet intelligi pro pluribus.</text:p>
      <text:p text:style-name="P647"><text:span text:style-name="T716">Et si dicas illi termini de quibus verificatur supponunt pro pluribus ergo verificatur</text:span> <text:s/><text:span text:style-name="T716">de pluribus pro pluribus, ad hoc nego consequentiam.</text:span></text:p>
      <text:p text:style-name="P683">Bene tamen posset concedi consequens in hoc sensu de pluribus pro pluribus. Hoc est, supponentibus pro pluribus, sed non capitur in illo sensu, sed sic verificatur de pluribus pro pluribus, hoc est, verificatur in propositione quae redditur vera pro pluribus, vel in propositionibus quae redduntur vere pro pluribus.</text:p>
      <text:p text:style-name="P683">Contra hoc arguitur: Verificatur de pluribus pro pluribus ad illum sensum, igitur antecedens patet. Verificatur de pronomine demonstrante istum qui vocatur ‘Sortes’, et de pronomine demonstrante illum alium qui vocatur Sortes, et hoc pro illis ad sensum datum igitur.</text:p>
      <text:p text:style-name="P683">Forte dices quod verum est aequivoce, sed non univoce.</text:p>
      <text:p text:style-name="P648"><text:soft-page-break/><text:span text:style-name="T716">Contra hoc arguitur: Univoce verificatur de illis; igitur antecedens patet. Univoce verificatur de isto et univoce verificatur de isto; ergo univoce verificatur de illis. Consequentia /56a/ </text:span><text:span text:style-name="T717">tenet, quia singulare geminatum infert plurale.</text:span></text:p>
      <text:p text:style-name="P684">Ad argumentum sufficienter patet solutio, usque ad ultimam replicam ad quam nego consequentiam, ad cuius probationem dico quod non oportet tales modos arguendi habere verum, ubi arguitur respectu alicuius termini singularis numeri, qui servatur in partibus antecedentis, et in consequente formaliter vel aequivalenter. Unde arguere illo modo est aequivalenter arguere hoc modo, mediante uno conceptu verificatur de illo, et mediante uno conceptu verificatur de illo. Ergo mediante uno conceptu verificatur de illis. Modo manifeste apparet hunc modum arguendi non valere magis quam site valeat: </text:p>
      <text:p text:style-name="P828">Sortis una manu tangit Platonem, et</text:p>
      <text:p text:style-name="P828">Una manu tangit Ciceronem;</text:p>
      <text:p text:style-name="P828">ergo</text:p>
      <text:p text:style-name="P828">Una manum tangit Platonem et Ciceronem.</text:p>
      <text:p text:style-name="P828"/>
      <text:h text:style-name="Heading_20_3" text:outline-level="3">Secundo: Arguitur ly ‘Sortes’ verificatur de pluribus univoce ad sensum definitionis, et est terminus singularis; ergo definitio mala</text:h>
      <text:p text:style-name="P685">Maior p<text:span text:style-name="T718">atet: Verificatur mediante suo conceptu de ly ‘Sortes’ pro Sorte, et mediante eodem verificatur de ly ‘Plato’ pro Platone; igitur maior est nota.</text:span></text:p>
      <text:p text:style-name="P685"><text:span text:style-name="T718">Minor probatur: Captis his duabus propositionibus “Plato est Sortes”, “Plato non est Sortes” tunc sic ly ‘Sortes’ ver praedicatur mediante suo conceptu de ly ‘Plato’ pro ‘Platone’, utputa in illa negativa et mediante eodem conceptu praedicatur affirmative de ly ‘Plato’</text:span> <text:s/><text:span text:style-name="T718">sumpto pro Platone; ergo mediante illo vere et affirmative praedicatur de ly ‘Plato’ pro Platone; ergo mediante illo verificatur de Platone pro Platone.</text:span></text:p>
      <text:h text:style-name="Heading_20_3" text:outline-level="3">Ad hoc neganda est ultima consequentia: Unde hoc quod ly ‘Sortes’, mediante eodem conceptu verificetur de ly ‘Plato’ pro Platone non sufficit quod mediante illo vere et affirmative praedicetur de ly ‘Plato’ sumpto pro Platone</text:h>
      <text:p text:style-name="P686"><text:span text:style-name="T720">S</text:span>ed oportet cum hoc quod vere et affirmative praedicetur de illo in eadem propositionem et in eodem sensu.</text:p>
      <text:p text:style-name="P687">Contra hoc arguitur. Illo modo <text:span text:style-name="T719">verificatur de illo; igitur antecedens patet:</text:span></text:p>
      <text:p text:style-name="Quotations"><text:span text:style-name="T719">Volo q</text:span><text:span text:style-name="T721">uod illa propositio “Plato est Sortes” manente significatione eius quam habet, imponantur ultra ad significandum tantum sicut ista “Deus est Deus” nulla parte eius imposita.</text:span></text:p>
      <text:p text:style-name="P694">Tunc sic ly ‘Sortes’ affirmative praedicatur de ly ‘Plato’ pro Platone in illa “Plato est Sortes” et vere praedicatur de eodem in eadem et in eadem sensu; igitur maior est nota. Et minor patet quia praedicatur de illo in illa propositione, et non in alio sensu quam in illo; ergo vere praedicantur de illo in illa in illo sensu.</text:p>
      <text:p text:style-name="P694"><text:soft-page-break/>Consequentia tenet cum minori ex eo, quia ly ‘Sortes’ non est praedicatum illius propositionis in alio sensu quam in illo, prout ex hypothesi apparet; igitur maior probatur:</text:p>
      <text:p text:style-name="Quotations">Illa propositio est vera et est affirmativa, et habet subiectum et praedicatum expresse.</text:p>
      <text:p text:style-name="P688"><text:span text:style-name="T722">E</text:span><text:span text:style-name="T721">rgo praedicatum eius verificatur de subiecto illius in illa, et non est aliud subiectum in illa nisi ly ‘Plato’, neque aliud praedicatum nisi ly ‘Sortes’; ergo Sortes verificatur in illa de ly ‘Plato’.</text:span></text:p>
      <text:p text:style-name="P689">Ad hanc replicam, dato illo casu, nego minorem, et ad probationem nego maiorem. Ad eius probationem neganda est consequentia, procedendo in rigore, quia facile potest dari antecedens verum, consequente falso.</text:p>
      <text:p text:style-name="P689">Si autem caperes antecedens hoc modo, illa est categorica affirmativa vera, in sensu categorico vero, et habet subiectum et praedicatum expresse, distinguendum esset tunc consequens, quia vel intelligis ipsum sic, quod formaliter praedicatum eius verificetur de subiecto et sic neganda est consequentia cum consequente, vel intelligis quod formaliter vel aequivalenter praedicatum eius verificetur de eius subiecto in illa, et sic concedenda est consequentia cum consequente.</text:p>
      <text:p text:style-name="P689">Et cum ultra dicis, non est aliud subiectum in illa, nisi ly ‘Plato’, nec aliud praedicatum nisi ly ‘Sortes’, distinguo, vel formaliter et sic concedo, vel aequivalenter et sic nego, et tunc non sequitur illud consequens.</text:p>
      <text:p text:style-name="P689">Et si dicas <office:annotation office:name="__Annotation__5813_4070523189" loext:resolved="false"><dc:creator>Unknown Author</dc:creator><dc:date>2025-09-01T22:58:56.758750201</dc:date><text:p><text:span text:style-name="T861">Verificari non est nisi praedicari in propositone vera affirmativa</text:span></text:p></office:annotation>“<text:span text:style-name="T777">v</text:span>erificari non est nisi praedicari in propositone vera affirmativa”<office:annotation-end office:name="__Annotation__5813_4070523189"/>; ergo illa consequentia erit bona. Nego antecedens, sed dico quod verificari est praedicari in propositione affirmativa vera, secundum sensum secundum quem ille terminus qui dicitur praedicari capitur pro praedicato eius.</text:p>
      <text:h text:style-name="Heading_20_3" text:outline-level="3">Tertio arguitur: Ly ‘Sortes’ est terminus singularis, et verificatur de pluribus pro pluribus univoce <text:span text:style-name="T723">igitur</text:span></text:h>
      <text:p text:style-name="P692">Minor probatur. Verificatur de ly ‘Sortes’ pro Sorte, et de illo copulato ista materia et ista forma pro illa materia et illa forma, et Sortes et illa materia et illa forma sunt plura igitur.</text:p>
      <text:p text:style-name="P693">Dices forte quod ex illo antecedente non concluditur quod ly ‘Sortes’ verificatur de pluribus pro pluribus ad sensum secundum quem debet intelligi illud in definitione, quia ad illud oportet quod verificetur /56b/ de aliquo pro aliquo supposito, et verificetur etiam de aliquo pro aliquo supposito, quod non potest esse illud, modo Sortes potest esse illa materia et illa forma.</text:p>
      <text:p text:style-name="P693">Et ad hunc sensum debet intelligi illud quod solet communiter dici, scilicet quod ad terminum communem requiritur quod ipso non repugnet, ex modo sue significationis, verificari de pluribus pro pluribus divisim, et ad singularem requiritur quod sibi repugnet illud ex modo suae significationis. <text:s/></text:p>
      <text:p text:style-name="P690"><text:span text:style-name="T724">Et inde est quod quantumcumque possit </text:span><text:span text:style-name="T725">stare quod ‘a’ terminus singularis secundum significationem secundum quam est terminus singularis, supponat in ordine ad aliquam copulam quae non est de imaginario pro ‘b’, et secundum eandem supponat pro ‘c’ in ordine ad aliquam talem, et tamen ‘b’ non est ‘c’, nec ‘b’ fuit ‘c’ nec ‘b’ erit ‘c’, et ‘b’ est vel erit vel fuit, et ‘c’ est vel erit vel fuit.</text:span></text:p>
      <text:p text:style-name="P695"><text:soft-page-break/>Hoc tamen non tollit illum esse singularem, et adhuc totum hoc verificatur ubi ly ‘b’ et ly ‘c’ sunt termini singulariter et absolute significantes. Illa supposita facile apparet totum hoc intelligenti viam Nominalium.</text:p>
      <text:p text:style-name="P695">Contra istam solutionem arguitur: Ex ipsa sequitur quod ly ‘Sortes’ et illud copulatum, scilicet illa materia et illa forma pro eodem supponunt, sed hoc est falsum. Igitur falsitas consequentis patet, quia si pro eodem supponant quum quilibet sit terminus singularis, pro nullo supponet unus illorum quin pro eodem supponat alter. Sed hoc est falsum, igitur falsitas consequentis patet, quia dato illo consequente cum nullus illorum terminorum sit connotativum, sequitur quod non stabit quod aliquis illorum supponat pro aliquo ipsis manentibus, cum illis significationibus quin alter supponat pro eodem, sed hoc est falsum. Igitur falsitas consequentis patet, quia posito quod Sortes non sit, sed illa materia et illa forma maneant, tunc illud copulatum supponet pro illo binario, et ly ‘Sortes’ non supponet pro illo.</text:p>
      <text:p text:style-name="P695">Quod sequatur patet, quia si illud staret, tunc posset stare quod aliquis illorum terminorum uno tempore supponeret pro aliquo, et alio tempore supponeret pro aliquo, et illo tempore non supponeret pro illo pro quod alio tempore supponeret. Sed hoc est falsum quia ex hoc sequitur quod stabit quod ille terminus supponat pro aliquo et supponat etiam pro aliquo differente ab illo quod, quod est falsum quia tunc non esset terminus singularis.</text:p>
      <text:p text:style-name="P696">Ad argumentum, responsum est usque ad replicam ad quam concessa sequela, nego falsitatem consequentis, et ad probationem, concedo illud quod infers ad hunc sensum, videlicet quod ubi ambo supponunt, nullus illorum supponit pro aliquo quin alter pro eodem supponat, et nego illud esse falsum, et ad probationem nego sequelam. Et ad probationem probationem, concesso illo quod infers, nego falsitatem illius, et ad probationem nego illam sequelam unde illud copulatum ‘Sorte’ existente supponit pro Sorte, et Sorte corrupto supponit pro illa materia et illa forma, et non supponit pro Sorte pro quo supponebat Sorte existente.</text:p>
      <text:p text:style-name="P691"><text:span text:style-name="T726">Modo ex illo non sequitur penultimum illatum, bene tamen sequeretur si quando illud copulatum supponit pro Sortes et supponit etiam pro illa materia et illa forma, verum est dicere quod illa materia et illa forma differt a Sorte, aut quod Sortes differt ab illa materia et illa forma. <text:s/></text:span><text:span text:style-name="T725"><text:s/></text:span><text:s text:c="3"/></text:p>
      <text:p text:style-name="P697">Contra solutionem arguitur: Corrupto Sorte et manentibus illa materia et illa forma, illud copulatum supponit pro Sorte, ergo solutio nulla. Antecedens patet, tunc ly ‘Sortes’ supponit pro Sorte; ergo et illud copulatum. Antecedens patet quia tunc Sortes supponit et non nisi pro Sorte; ergo supponit pro Sorte.</text:p>
      <text:p text:style-name="P697">Maior patet, quia si tunc non supponat, vel ergo hoc est propter defectum significati materialis, quia nullum significatum materiale eius est, vel propter defectum significati formalis. Puta quia eius significato materiali deficit, connotatio sua non potest dici. Secundum, quia tunc ly ‘Sortes’ esset terminus connotativus, nec potest dari primum, quia significatum materiale eius est.</text:p>
      <text:p text:style-name="P697">Hoc patet, quia iste binarius est, et iste binarius est significatum materiale eius; ergo significatum materiale eius est. Consequentia tenet cum maiori, et minor patet, quia quando Sortes erat ille binarius et ly ‘Sortes’ significat eodem modo sicut tunc significabat, ergo nunc ille binarius est significatum materiale de ly ‘Sortes’.</text:p>
      <text:p text:style-name="P697"><text:soft-page-break/>Ad hanc replicam nego antecedens, et ad probationem nego antecedens, ad cuius probationem nego maiorem, ad cuius probationem dico quod tunc /57a/ propter defectum significati materialis de ly ‘Sortes’, ly ‘Sortes’ non supponit. Tunc non materialiter, quod propterea non supponit quod significatum materiale eius non sit, sed propterea quod significatum materiale eius non est Sortes, et ratio est quia ex quo ly ‘Sortes’ absolute et singulariter significat Sortem, non erit possibile quod secundum talem significationem supponat in ordine ad copulam de praesenti, in ordine quam ibi procedimus pro suo significato materialis, nisi illus sit Sortes.</text:p>
      <text:p text:style-name="P698">Et si dicas non est possibile quod aliquis terminus sup<text:span text:style-name="T727">ponat pro aliquo suo significato, in ordine ad copulam de praesenti et desinat supponere pro eodem significato in ordine ad eandem, illo significato manente, et illo termino capto eodem modo in ordine ad eandem copulam, nisi hoc sit propterea, quia connotatio illius termini desinit convenire illi significato, vel quia incipit deficere illi supposito / illa connotatio, hoc negandum est, quia in proposito patitur instantiam de ly ‘Sortes’ respectu illius binarii.</text:span></text:p>
      <text:p text:style-name="P699">Hoc argumentum aliqui tantum ponderaverunt, quod videtur eis propter ipsum secundum viam Nominalium, debere concedi quod ly ‘homo’ et ly ‘Sortes’ sunt termini connotativi, sed non videtur mihi ipsum esse tantum ponderandum.</text:p>
      <text:p text:style-name="P701">Ex praedictis patet quod dantur duo termini singulares absoluti, sic se habentes quod non est possibile quod ambo supponant quin quilibet illorum supponat pro quocumque supposito pro quo alter supponit, tamen stat bene quod aliquis illorum supponat pro aliquo supposito absque hoc, alter supponat pro illo, et absque hoc quod alter supponat si hoc sufficiat ad hoc quod aliqui termini se habeat sicut superius et inferius in supponendo, unus illorum erit superior ad alterum, sin autem non oportebit illud.</text:p>
      <text:p text:style-name="P702">Patet secundo, ex processu argumenti, quod quantumcumque ly ‘Sorte’ et ‘Plato’ verificetur de pluribus terminis pro pluribus, non tamen est terminus communis sed singularis, quia non verificatur de pluribus pro pluribus ad sensum superius tactum, et idem dico de ly ‘omnes partes Sortis’, et de ly ‘ista materia’ et ‘ista forma’, unde omnes isti termini sunt singulares, quia cuilibet illorum repugnat, ex modo suae significationis,verificari de pluribus pro pluribus divisim ad sensum definitionis termini singularis.</text:p>
      <text:p text:style-name="P702">Forte in aliquo alio bono sensu posset concedi quod quilibet illorum verificatur de pluribus pro pluribus divisim. Sed ex nihil haberetur contra dicta.</text:p>
      <text:p text:style-name="P702">Patet tertio ex his quod acceptio unius istorum terminorum ‘omnes partes Sortis’, ‘omnes asini Sortis’ loco alterius in aliqua propositione, variat similitudinem formae, caeteris adhuc servatis partibus in ipsis, quia unus illorum terminorum est communis et alter singularis, et ex consequenti dantur duo termini communes quorum nullius acceptio loco alterius in propositione, ubi caetera servantur, paria variat similitudinem formae.</text:p>
      <text:p text:style-name="P702">Et tamen, addendo eandem determinationem utrique unum compositorum provenientium erit terminus singularis et alterum terminus communis, et acceptio unius illorum compositorum loco alterius in propositione, ubi caetera servantur paria, variat similitudinem formae.</text:p>
      <text:p text:style-name="P702"><text:soft-page-break/>Per “caetera servari paria in propositio” intelligo quod taliter serventur quod nullus illorum sumatur in aliqua tali propositione nisi praecise semel, ita quod nullus alius defectus tollat similitudinem formae illarum propositionem, nisi diversitas quantitatis tolleret.</text:p>
      <text:p text:style-name="P703">Quarto arguitur: Iste terminus ‘iste homo’ est terminus singularis et sibi non repugnat verificari de pluribus pro pluribus univoce; ergo <text:span text:style-name="T728">definitio mala.</text:span></text:p>
      <text:p text:style-name="P703"><text:span text:style-name="T728">Minor patet,</text:span> non repugnat illi <text:span text:style-name="T728">pronomini demonstrativo demonstrare plures homines univoce; ergo non repugnat illi termino ‘iste homo’ verificari et caetera.</text:span> </text:p>
      <text:p text:style-name="P704">Consequentia tenet, quia si illud repugnaret illi termino ‘homo’, illa repugnantia proveniret ex parte illius pronominis demonstrativi.</text:p>
      <text:p text:style-name="P704">Antecedens patet, volo quod formetur illud pronomen demonstrativum in mente, et non capiatur cum aliquo termino categorematico, tunc illud quantum est ex se, non poterit magis demonstrare unum quam aliud, quia non erit maior ratio de uno quam de alio; ergo indifferenter poterit demonstrare plura.</text:p>
      <text:p text:style-name="P700"><text:span text:style-name="T729">Forte dices ad hoc quod non est admittendus ille casus si intelligatur quod quando debet causari, non praesupponatur aliquis terminus categorematicus, qui tunc fit post. Tamen bene sustentari quod postquam est causatus potest conservari absque termino categorematico, /</text:span><text:span text:style-name="T730">57b</text:span><text:span text:style-name="T729">/ sed tunc ratio quare magis possit demonstrari unum quam alterum est quia ab uno causatur partim in ratione obiecti et non ab alio. Ideo aliter arguitur probando quod illi pronomini non repugnet demonstrare plura, quia in ordine ad copulam de imaginario demonstrant plures homines; igitur antecedens patet quia ly ‘iste’ homo, in ordine ad copulam de imaginario supponit pro pluribus, et non est possibile quod supponat pro aliquo, nisi illud demonstretur per illud pronomen igitur.</text:span> </text:p>
      <text:p text:style-name="P705">Forte dices quod licet in ordine ad copu<text:span text:style-name="T731">lam de imaginario demonstret plura, non tamen in ordine ad copulam de praesenti.</text:span></text:p>
      <text:p text:style-name="P705"><text:span text:style-name="T731">Contra hoc arguitur: </text:span><text:span text:style-name="T732">Capio istam propositionem “Iste homo imaginarie est homo” in qua illud pronomine demonstret Sortem et Platonem, sed in ordine ad copulam de praesenti solum Sortem demonstret. Tunc sic illud in ordine ad copulam de praesenti, in ordine ad quam demonstrat Sortem, potest demonstrare Platonem.</text:span></text:p>
      <text:p text:style-name="P706">Antecedens patet, volo quod corrumpatur illa determinatio imaginarie aliis partibus illis propositionis manentibus. Illo facto illud pronomen demonstrabit Platonem in ordine ad illam copulam de praesenti. Antecedens patet quia per corruptionem de ly ‘imaginarie’ a nulla significatione cadat illud pronomen demonstrativum, quia procedendo de tali propositione mentali ultimata. Et tunc dato illius opposito, <text:span text:style-name="T733">terminus </text:span>ment<text:span text:style-name="T733">a</text:span>lis <text:span text:style-name="T733">caderet a sua significatione naturaliter propria, sed ante corruptionem de ly ‘imaginarie’ illud pronomen. Sed suam significationem demonstrabat Platonem, et suum significare est demonstrare; ergo post corruptionem illius, demonstrabit Platonem.</text:span></text:p>
      <text:p text:style-name="P706"><text:span text:style-name="T733">Ideo aliter dico, negando quod in ordine ad copulam de imaginario, illud pronomen demonstrativum possit demonstrare plura, esto quod ille terminus in ordine ad illam, possit supponere pro pluribus. </text:span><text:span text:style-name="T734">E</text:span><text:span text:style-name="T733">t ad illud quod tangis, </text:span><text:span text:style-name="T735">scilicet</text:span><text:span text:style-name="T733"> quod non possit pro aliquo supponere nisi illud demonstretur per tale pronomen, dico quod illud est verum in ordine ad illas copulas, sed in ordine ad copulas de imaginario non est verum.</text:span></text:p>
      <text:p text:style-name="P706"><text:soft-page-break/><text:span text:style-name="T734">Ex quod patet quod licet ratione illius pronominis demonstrativi, utputa </text:span><text:span text:style-name="T736">quia non potest demonstrare plura repugnet illi termino ex modo suae significationis verificari de pluribus in ordine ad aliam copulam quam de imaginario, tamen quantumcumque illud pronomen in ordine ad copulam de imaginario non possit demonstrare plura, ratione illius non repugnabit illi verificari de pluribus in ordine ad talem copulam de imaginario, et ex consequenti, in ordine ad copulam de imaginario non impediet illud pronomen aliquo modo quin ille terminus supponat pro quocumque pro quo supponit ly ‘homo’.</text:span><text:span text:style-name="T733"> </text:span><text:s/></text:p>
      <text:p text:style-name="P707">Hic tamen adverte quod illud verbum demonstro similiter et eius passivum, cum participiis eorum interdum capiuntur taliter quod ampliant ad quinque terminum, supra cuius suppositum actus, talis verbi vel participii denota<text:span text:style-name="T737">tur ferri quemadmodum apparet in multis propositionibus, quae conceduntur in materia suppositionum, non tamen semper capiuntur taliter illa verba vel participia, et signanter in materia terminorum, et specialiter in hoc propositio. Unde ad veritatem huius hoc demonstratur per illud pronomen secundum illam significationem, procedendo sicut in proposito, requiritur quod illud pronomen, secundum illam significationem, subordinetur pronomini causato ab <text:s/>isto partialiter in ratione obiecti, ad quod terminatur conceptus supra quem cadit. Et ita procedendo, manifeste apparent omnia quae statim dicta sunt.</text:span></text:p>
      <text:p text:style-name="P708">Si tamen caperetur ly ‘demonstrat’ prout ampliat ad quinque, concedendum est quod illud pronomen ‘quodlibet ens’ demonstrat uno etiam in ordine ad quamlibet copulam. Sed ubi pronomen demonstrativum demonstraret aliquod intelligibile, quod non potest esse si illud possit fieri, non esset concedendum de illo quod aliquid demonstraret, nisi procederetur cum ampliatione ad quinque, et ex consequenti, tunc esset concedendum quod illud pronomen quodlibet illorum demonstrat.</text:p>
      <text:p text:style-name="P709">Et si arguas contra dicta, ex illis sequitur quod non repugnat illi termino ‘iste homo’ <text:span text:style-name="T738">verificari de pluribus pro pluribus univoce, quia in ordine ad copulam de imaginario verificatur taliter, et ex illo sequitur illum non esse singularem, quod est contra dicta.</text:span></text:p>
      <text:p text:style-name="P710"><text:span text:style-name="T738">Ad hoc dico quod verum est quod non /58a/ </text:span><text:span text:style-name="T739">repugnat illi verificari illo modo in ordine ad copulam de imaginario, licet repugnet illi in ordine ad quamlibet aliam copulam, et ex illo non sequitur quod non sit terminus singularis, quia in definitionibus proceditur de verificatione in ordine ad alias copulas de imaginario. Et si ex hoc inferas quod non possit esse aliquis terminus singularis in ordine ad copulam de imaginario, dico quod si ad oppositum illius illati requiratur quod ex modo suae significationis repugnet illi verificari in ordine ad copulam de imaginario, concedendum est illatum. Nec ex illo sequitur quod non possit fieri descensus in ordine ad copulam de imaginario, nec quod nulla sit singularis cuius copula est de imaginario.</text:span></text:p>
      <text:p text:style-name="P712">Si autem ad veritatem illius non requiratur illud, sed satis sit quod tali termino repugnet praedicari de pluribus in ordine ad aliam copulam quam de imaginario, neganda est consequentia.</text:p>
      <text:p text:style-name="P711"><text:span text:style-name="T739">Et si contra dicta </text:span><text:span text:style-name="T740">arguas: “Ex ipsis sequitur quod ly ‘iste homo’ in ordine ad copulam de imaginario significat plura”. Sed hoc est falsum, igitur. Quod sequatur patet quia in ordine ad illam supponit pro pluribus, sed falsitas consequentis patet, quia ex illo poterit concludi quod in ordine ad copulam de praesenti significet plura, sicut statim concludebatur quod illud pronomen demonstrativum potest demonstrare plura in ordine ad copulam de praesenti si in ordine ad illam de possibili possit demonstrare plura.</text:span></text:p>
      <text:p text:style-name="P711"><text:soft-page-break/><text:span text:style-name="T740">Ad hoc concedo sequelam et nego falsitatem consequentis, et ad probationem quae potest fieri proportionabiliter, sicut superius fiebat de illo pronomine, dicendum est quod corrupta illa determinatione imaginarie adhuc significat plura in ordine ad copulam de imaginario. Esto quod actualiter non ponatur cum tali, nec sit talis copula, quia non requiritur aliquod istorum, adhoc quod in potentia propinqua dicatur significare in ordine ad talem copulam, licet bene requiretur si actualiter deberet significare, modo ex his non potest concludi quod ille terminus, per corruptionem illius determinationis, cadat a sua significatione, procedendo in sensu in quo debet negari. Neque etiam poterit ex his inferri quod significatio illius termini, secundum quam in ordine ad copulam de imaginario significat plura, proveniat ab illa copula vel determinatione, licet actualis significatio eius, in ordine ad illam, praesupponat illam esse,</text:span><text:span text:style-name="T739"> </text:span><text:span text:style-name="T740">unde ex sui natura provenit illa significatio.</text:span></text:p>
      <text:h text:style-name="Heading_20_3" text:outline-level="3">Quinto arguitur: Ille terminus ‘Sortes’ est singularis et non repugnat ipsi, ex modo suae significationis, verificari de pluribus et caetera</text:h>
      <text:p text:style-name="P718">Igitur, minor patet quando imponebatur ad significandum Sortem, imponebatur per illam impositionem ad significandum quemlibet hominem pictum similem Sorti; ergo non repugnat ei secundum significationem provenientem ex illa impositione verificari de pluribus et caetera.</text:p>
      <text:p text:style-name="P718">Antecedens patet ex impositione. Significat omnes illos homines pictos, et non ex alia, quod ex illa per quam imponebatur ad significandum Sortem igitur.</text:p>
      <text:h text:style-name="Heading_20_3" text:outline-level="3"><text:span text:style-name="T741">Et confirmatur ratio ly ‘hominis’ et ly ‘albus’ adiective non sunt singulares</text:span> </text:h>
      <text:p text:style-name="P713">Et cuilibet illorum ex modo suae significationis repugnat et caetera, qui nullus potest esse extremum propositionis secundum talem significationem.</text:p>
      <text:h text:style-name="Heading_20_3" text:outline-level="3">Ad argumentum nego minorem, et ad probationem dico quod licet per illam impositionem imponebantur ad significandum quaelibet hominem pictum similem Sorti, <text:span text:style-name="T743">n</text:span><text:span text:style-name="T742">on tamen mediante conceptu mediante quo </text:span><text:span text:style-name="T743">significat Sortem verum, sed mediante alio communi</text:span></text:h>
      <text:p text:style-name="P714">Propterea concedendum est illud quod infers ex illo antecedente. Sed ex illo non sequitur intentum cum ex illo non sequatur quod secundum illam significationem, secundum quam significat Sortem singulariter, non repugnet sibi et caetera.</text:p>
      <text:p text:style-name="P715">Contra hoc arguitur: Conceptus mediante quo significat Sortem singulariter, significat omnes illos homines pictos; ergo mediante illo conceptu ly ‘Sortes’ significat plura, et ex consequenti, secundum significationem secundum quam significat mediante illo conceptu, non repugnabit sibi et caetera.</text:p>
      <text:p text:style-name="P717"><text:span text:style-name="T744">Antecedens patet. </text:span><text:span text:style-name="T745">T</text:span><text:span text:style-name="T744">um primo, </text:span><text:span text:style-name="T745">quia illa vox </text:span><text:span text:style-name="T746">ideo</text:span><text:span text:style-name="T745"> significat quemlibet hominem pictum similem Sorti, quia quilibet illorum est similis Sorti, quem principaliter significat; ergo simile continget de illo conceptu.</text:span></text:p>
      <text:p text:style-name="P716"><text:span text:style-name="T745">Item secundo. Quodlibet simile naturaliter repraesentat id quod est sibi simile naturaliter, sed ille /58b/ conceptus cuilibet illorum hominem pictorum est naturaliter similis, quia quemcumque quae </text:span><text:soft-page-break/><text:span text:style-name="T745">sunt naturaliter similia uni tertio sunt naturaliter similia inter se; ergo ille conceptus quemlibet illorum significat.</text:span> <text:s/></text:p>
      <text:p text:style-name="P643"><text:span text:style-name="T745">Ad hanc replicam, concesso antecedente, nego consequentiam. Ratio est quia quamvis ille conceptus significet omnes illos homines pictos, non tamen mediante se nec secundum significationem secundum quam ly ‘Sortes’ subordinatur illi in significando Sortem singulariter. Et </text:span><text:span text:style-name="T747">si ex hoc inferas quod aliquis conceptus ultimatus incomplexus sit aequivocus, concedendum est </text:span><text:span text:style-name="T748">illud, licet inconveniret talem conceptum habere diversas significationes naturaliter proprias. Ex quibus patet quod capta ista propositione “Sortes est individuum” secundum significationem secundum quam conceditur ly ‘Sortes’ non capitur in ipsa secundum significationem secundum quam est terminus singularis, et ex consequenti non redditur illa vera, ratione significationis de ly ‘Sortes’ secundum quam illic capitur.</text:span></text:p>
      <text:h text:style-name="Heading_20_3" text:outline-level="3">Ad confirmationem: Propter tales terminos potest dici quo oportet subintelligere in definitione ly ‘vel’ significare plura de significatione totali et materiali</text:h>
      <text:p text:style-name="P719">Quod additur <text:span text:style-name="T749">propter ly ‘hoc album’, et ideo breviter et sufficienter possent dari illae definitiones, ponendo ly ‘supponere’ loco de ly ‘verificari’, caeteris servatis paribus et intellectis, sicut dictum est. Modo licet nullus illorum terminorum possit esse extremum in aliqua propositione, tamen ex hoc et caetera, non sequitur quod eis repugnet supponere pro pluribus, sicut apparebit in suppositionibus.</text:span></text:p>
      <text:h text:style-name="Heading_20_3" text:outline-level="3">Sexto arguitur: Iste terminus Sortes est terminus singularis et sibi non repugnat et ca<text:span text:style-name="T750">e</text:span>tera</text:h>
      <text:p text:style-name="P720">Minor patet mediante illo conceptu mediante quo significat Sortem, significat plura; igitur antecedens patet. Mediante illo significat Sortem, qui nunc est et Sortem qui fuit puer, prout ex communi modo loquendi apparet et Sortes, qui nunc est, non potest esse Sorte qui fuit puer; igitur minor patet quia dato illius opposito cum Sortes, qui nunc est, habeat aliquas partes quarum nullam habuit Sortes, qui fuit puer. Concedendum est quod aliquod totum potest esse sua pars, hoc patet quod Sortes, qui fuit puer, secundum se, et quodlibet fui, sit iam, et totus Sortes qui est iam ultra illum, addat aliquid.</text:p>
      <text:p text:style-name="P721">Simili modo potest argui de illo termino ‘Iber’, qui secundum communem modum hominum, significat Iberum, qui est et Iberum qui fuit heri, mediante eodem conceptu singulari ex quod singulariter et univoce significat illum qui est et illum qui fuit heri et ille qui iam est, non potest esse ille qui fuit heri quia aliquas partes habet ‘Iber’, qui tam est quarum nullam habuit ille qui fuit heri.</text:p>
      <text:h text:style-name="Heading_20_3" text:outline-level="3">Pro materia argumenti solent poni liqui modi identitatis</text:h>
      <text:p text:style-name="P722">Quis succincte tangam ut clarius intelligantur dicenda.</text:p>
      <text:list text:style-name="L64">
        <text:list-item>
          <text:p text:style-name="P987"><text:span text:style-name="T751">Dicitur enim primo modo </text:span><text:span text:style-name="T752">a</text:span><text:span text:style-name="T751">liquid idem alicui quando sic est idem illi quod nulla est pars ipsius, quin illa sit pars illius, et ediverso. Et hoc modo ‘Iber’ qui iam est, non est idem illi qui fuit heri, nec Sortes qui iam est esset idem illi qui fuit heri, supposito quod Sortes habeat </text:span><text:soft-page-break/><text:span text:style-name="T751">aliquas partes quarum nullam ille qui fuit heri habuisset quantumcumque totus Sorte qui fuit heri sit iam.</text:span></text:p>
        </text:list-item>
        <text:list-item>
          <text:p text:style-name="P988">Secundo modo dicitur aliquid idem alicui quando aliqua pars principalis unius est eadem primo modo, cum aliqua parte principali alterius, et isto modo Sortes, qui est, iam est idem illi qui fuit heri, in casu statim tacto propter identitatem animae in utroque, et sic, assignando istum secundum modum in casu aliquis homo est idem alicui asino. Hoc patet si communicent in tota materia unus homo et unus asinus. Si tamen diceretur quod illa pars principalis debet esse forma secus esset.</text:p>
        </text:list-item>
        <text:list-item>
          <text:p text:style-name="P1021"><text:span text:style-name="T752">Tertio modo d</text:span><text:span text:style-name="T753">icitur aliquid idem alicui, quia maior pars quam medietas ipsius est eadem primo modo cum maiori parte quam </text:span><text:span text:style-name="T754">mediante illius, et hoc modo, in casu aliquis homo est idem alicui asino. Et similiter in aliquo casu ‘a’ est idem ipsi ‘b’, et ‘b’ est idem ‘c’, et tamen ‘a’ non est idem ‘c’, posito enim quod ‘a’ componatur ex ‘d’, ‘e’ et ‘f’, tribus partibus aequalibus non communicantibus, et ‘b’ ex ‘e’, ‘f’ et ‘g’, tribus aequa</text:span><text:span text:style-name="T755">libus /59a/ et non communicantibus, quarum ‘g’ non sit ‘d’ nec communicet cum ‘d’, et ‘c’ componatur ex ‘f’, ‘g’, ‘b’ tribus aequalibus non communicantibus, quarum ‘b’ non sit ‘d’ vel ‘e’ vel communicans cum ‘d’ vel ‘e’. Tunc enim continget illud. Immo posset contingere quod ‘a’ sit idem ‘b’ isto modo, et ‘b’ idem ‘c’, et ‘c’ idem ‘d’, et tamen ‘d’ non sit idem ‘a’ vel communicans cum ‘a’, et hoc facile potest verificari. Similia possunt contingere de secundo modo identitatis, non tenendo quod illa pars principalis debet esse forma, sed non contingerent similia de primo modo.</text:span></text:p>
        </text:list-item>
        <text:list-item>
          <text:p text:style-name="P1020"><text:span text:style-name="T755">Quarto modo dicitur aliquid idem alicui quia </text:span><text:span text:style-name="T756">partes eius succedunt partibus illius in simili situ et consimili figura esto quod non omnino, et hoc modo Iber, qui iam non sit. Ex quo patet quod nihil dicitur esse idem alicui primo modo, nisi illud sit, nec aliquid fuit idem alicui nisi illud fuerit et caetera. Nec aliquid sit idem alicui nisi illud erit et caetera. Tamen aliquid est idem ‘a’ quarto modo, esto quod ‘a’ non sit, et aliquid fuit aut erit idem ‘a’ quarto modo absque hoc quod fuerit aut erit ‘a’.</text:span></text:p>
        </text:list-item>
      </text:list>
      <text:p text:style-name="P725">Sed an de secundo et tertio modo idem contingat sicut de quarto vel an simile sicut de primo, haec difficultas magis est ad nomen quam ad rem. Possent enim assignari illi duo primi modi, taliter quod simile contingeret de ipsis, quantum ad illud sicut de quarto, et possent taliter assignari quod non contingeret simile quantum ad illud de ipsis sicut de quarto.</text:p>
      <text:p text:style-name="P723"><text:span text:style-name="T756">Et si petas an similia contingant secundum quartum modum sicut concessa sunt secundum tertium et secundum, potest dici quod sic, quia si Iber aliter mutetur quod acquiret decem pedalitates versus septemtrionem et tantum perdere versus meridiem quod non maneret idem quarto modo, et hoc supposito facile possent illa verificari signando certam distantiam quae sit maxima quam potest acquirere versus septemtrionem, per totum illum locum </text:span><text:span text:style-name="T757">ipsam deperdendo, per totum illum locum versus meridiem ipso manente idem quarto modo, vel sit illa minima quam non et talis distantia debet assignari secundum iudicium rationes iuxta communem modum dicendi sicut et multitudo requisita a populum.</text:span></text:p>
      <text:p text:style-name="P726">Sed occurrit difficultas loquendo de propositione affirmativa, sicut loquuntur logici, cum dicitur quod ad veritatem affirmative requiritur et sufficit quod extrema supponant pro eodem, an ad veritatem talis sufficiat quod extrema supponant pro eiusdem secundo vel tertio vel quarto modo.</text:p>
      <text:p text:style-name="P726"><text:soft-page-break/>Pro ista difficultate respiciendum est ad communem modum loquendi, secundum quem interdum sufficit illud et interdum non, sed quidquid sit tutius est respicere ad sensus talium propositionum per quos clarius apparebit veritas vel falsitas talium.</text:p>
      <text:p text:style-name="P724"><text:span text:style-name="T758">His suppositis sit haec prima propositio: Ubicumque aliquis terminus mediante aliquo conceptu significat duo divisim, quorum unum non potest esse idem alteri primo modo, ille terminus est communis in sic significando et non singularis, quia dato huius opposito concluderetur quod aliquod totum omni modo identitatis esset sua pars quod patet, quia si oppositum illius possit contingere, maxime continget in hoc casu, scilicet, quod significet ly ‘Sortes’ singulariter et discrete totum Sortem et ‘a’ partem eius divisim quae est eadem toti Sorti omni alio modo a primo, et </text:span><text:span text:style-name="T759">non primo mediante eodem conceptu.</text:span></text:p>
      <text:p text:style-name="P727">Sed hoc non, igitur consequentia tenet et antecedens probatur, quia non videtur in quo alio casu possit contingere, et dato illo adhuc sequitur intentum, quia tunc certum est quod illa erit concedenda “‘a’ est Sortes” capiendo ly ‘Sortes’ mediante eodem conceptu. Tunc deduco intentum, supposito quod ly ‘a’ discrete singulariter et absolute significet ‘a’ partem Sortis, sic arguendo: “Sortes omni modo identitatis est totus Sortes, et Sortes omni modo identitatis est ‘a’; ergo totus Sortes omni modo identitatis est ‘a’”.</text:p>
      <text:p text:style-name="P727">Consequentia tenet expositorie, et maior est manifesta, et minor probatur: “‘a’ omni modo identitatis est ‘a’, et ‘a’ est Sortes; ergo Sortes omni modo identitatis /59b/ est ‘a’” et totum antecedens ex praedictis est manifestum.</text:p>
      <text:p text:style-name="P728"><text:span text:style-name="T759">Ex hac constat quod ad hoc quod aliquis terminus sit singularis non sufficit quod significet aliquid vel aliqua, et non significat plura divisim, quae non identificantur secundo vel tertio vel quarto modo </text:span><text:span text:style-name="T760">identitatis, nec ad hoc quod aliquis terminus sit communis requiritur quod significet plura divisim quae non identificantur secundo vel tertio vel quarto modo identitatis. Sed ad hoc quod aliquis sit singularis requiritur quod non significet plura divisim quae sint eadem aliquo modo vel nullo modo sint eadem, et ad hoc quod aliquis terminus sit communis satis est quod significet plura divisim, sive illa sint eadem secundo vel <text:s/>tertio vel quarto modo identitatis sive non.</text:span></text:p>
      <text:list text:style-name="L44">
        <text:list-item>
          <text:p text:style-name="P990">Primum patet quia dato eius opposito ly ‘pars’ quantitativa Sortis esset terminus singularis, et dato opposito secundi ille terminus, non esset communis aliae partes, patent universaliter in omnibus.</text:p>
        </text:list-item>
        <text:list-item>
          <text:p text:style-name="P991">Secunda propositio. Quando aliquis terminus singularis imponitur ad significandum aliquem hominem discrete, non solum imponitur per illud ad significandum discrete illum hominem. Verum etiam imponitur ad significandum discrete quemlibet qui debet succedere illi, servata eadem anima. Hoc patet ex communi modo loquendi, ex quod sequitur:</text:p>
          <text:list>
            <text:list-item>
              <text:p text:style-name="P989"><text:span text:style-name="T762">P</text:span><text:span text:style-name="T761">rimo quod quando aliquis talis terminus imponitur illo modo mediantibus infinitis conceptibus singularibus, imponitur ad significandum discrete.</text:span></text:p>
            </text:list-item>
            <text:list-item>
              <text:p text:style-name="P991">Patet secundo quod ad hoc quod aliquis terminus imponatur ad significandum aliquid discrete mediante aliquo conceptu, non oportet quod illud ad quod significandum imponatur, cognoscatur singulariter nec oportet quod ille conceptus, mediante imponitur ad significandum illud, actualiter sit.</text:p>
            </text:list-item>
          </text:list>
        </text:list-item>
      </text:list>
      <text:p text:style-name="P729"><text:soft-page-break/>Patet insuper quod si numquam maneat idem Sortes primo modo in diversis instantibus vitae suae, et in quolibet tali instanti ly ‘Sortes’ significet discrete illum Sortem qui in tali instanti est continuo, mediante alio et alio conceptu significabit.</text:p>
      <text:h text:style-name="Heading_20_3" text:outline-level="3">Tunc respondeo ad argumentum negando minorem, et ad probationem nego antecedens, et ad probationem nego etiam antecedens. Neque illud sequitur ex communi modo loquendi</text:h>
      <text:p text:style-name="P730">Sed contra hoc arguitur: Si non significaret mediante eodem conceptu Sortem qui nunc est, et Sortem qui fuit puer, hoc ideo esset quia Sortes, qui nunc est non est idem cum illo quid fuit puer. Sed hoc est falsum igitur. Quod sequatur notum est, sed falsitas consequentis probatur: Ex illo sequuntur multa inconvenientia:</text:p>
      <text:list text:style-name="L63">
        <text:list-item>
          <text:p text:style-name="P1019"><text:span text:style-name="T762">Pri</text:span><text:span text:style-name="T763">mum: Quod iste non est filius huius mulieris, demonstrando per primum pronomen ‘Sortem’, qui est viginti annorum, et per secundum demonstrando Bertam quae est eius mater.</text:span></text:p>
        </text:list-item>
        <text:list-item>
          <text:p text:style-name="P992">Secundo: Quod iste non est alicuius patriae, demonstrando Sortem Parisiensem.</text:p>
        </text:list-item>
        <text:list-item>
          <text:p text:style-name="P992">Tertium: Quod iste non est Christianus, demonstrando Sortem Christianum.</text:p>
        </text:list-item>
        <text:list-item>
          <text:p text:style-name="P1018"><text:span text:style-name="T763">Quartum: Quod iste non est natus eodem, demonstrato primum. </text:span><text:span text:style-name="T764">Patet quia iste non nascebatur ex illa muliere, quia non est ille parvulus qui nascebatur ex illa. Secundum patet quia iste non nascebatur nec generabatur in aliqua patria, et consimiliter patent tertium et quartum.</text:span></text:p>
        </text:list-item>
      </text:list>
      <text:p text:style-name="P731">Ad hanc replicam concessa sequela, nego falsitatem consequentis, et ad illa quattuor corollaria quae infers ad primum nego illud, et dico quod licet iste non fuit natus ex ista muliere, tamen succedit illi, vel manet idem secundo modo identitatis, cum illo qui nascebatur ex muliere cui succedit illa, vel manet eadem cum illa secundo modo, et hoc sufficit ad hoc quod ille sit filius illius mulieris. Sed esset difficultas si ex forma huius et materia alterius isto, adhuc manente, fieret Plato, an ille esset filius illius mulieris.</text:p>
      <text:p text:style-name="P731">Ad hoc potest dici affirmative et etiam negative, et non est difficultas nisi ad nomen.</text:p>
      <text:p text:style-name="P731">Si dicatur affirmative dicetur quod ad illud sufficit quod sit idem secundo modo cum illo et caetera.</text:p>
      <text:p text:style-name="P731">Si dicatur secundo modo, dicetur quod illud non sufficit, sed requiretur quod succedat illi vel successisset per augmentationem vel diminutionem naturalem, per conversionem alimenti in substantiam aliti. Aliquando esset tota materia quam informaret illa forma, tunc rediret idem Plato omni modo identitatis, et quando sic rediret esset filius illius mulieris, et ex consequenti, si Sortes iam deberet tibi centum scuta plata, antequam illo modo succederet non teneretur, solveretur /60a/ tibi, sed postquam successerit tenebitur, et isto modo dicendo patent duo corollaria quae videntur satis mirabilia:</text:p>
      <text:list text:style-name="L62">
        <text:list-item>
          <text:p text:style-name="P993">Primum. Plato est et Berta, et Plato non est filius Bertae, et cras erit filius Bertae, et tamen nulla mulier parit vel pariet, et nullus homo nascitur nec nascetur.</text:p>
        </text:list-item>
        <text:list-item>
          <text:p text:style-name="P995"><text:soft-page-break/><text:span text:style-name="T764">Secundum. Sortes non est dignus suspendio et est, et cras erit dignus suspendio, et nihil mali facit, vel in posterum faciet, nec faciet aliquis homo aliquid mali, et multo plura </text:span><text:span text:style-name="T765">posset inferri dicendo illo secundo modo, respiciendo ad ea quae statim tacta sunt.</text:span></text:p>
        </text:list-item>
      </text:list>
      <text:p text:style-name="P736">Ad secundum corollarium quod infers, nego illud, et dico quod ad illud non requiritur quod ille fuerit natus in tali patria, sed satis est quod succedat illi et caetera. Et si interdum concedatur ista “Iste est natus in tali patria” sic debet intelligi “Hoc est iste, succedit illi et caetera”, vel est idem secundo modo cum illo et caetera.</text:p>
      <text:p text:style-name="P736">Consimiliter dicatur ad tertium corollarium negando ipsum, et ratio assignetur sicut statim ad quartum correlarium. Concedatur in rigore si tamen quis vellet capere illud in hoc sensu “Hoc est iste, succedit illi et caetera”, vel est idem secundo modo cum illo et caetera, esset concedendum, et propterea in his materiis oportet videre, in quibus sensibus capiantur propositiones, et iuxta sensus illarum facile apparebit quid sit dicendum de veritate illarum, et qualiter debeat salvari communis modus loquendi.</text:p>
      <text:h text:style-name="Heading_20_3" text:outline-level="3">Septimo arguitur: Iste terminus ‘homo’ est communis secundum acceptionem quam habet ibi “Iste homo currit” capiendo ly ‘iste” pro non parte subiecti, et tamen repugnat illi ex modo suae significationis verificari de pluribus secundum illam; ergo illa definitio mala</text:h>
      <text:p text:style-name="P737">Consequentia probatur, quia ex illo antecedente poterit concludi quod definitum illius definitionis cum aliquo addito verificabitur de aliquo de quo illa definitio, cum consimili addito, non verificabitur minor, autem est manifesta.</text:p>
      <text:list text:style-name="L61">
        <text:list-item>
          <text:p text:style-name="P996">Sed maior probatur, tum primo, quia eidem conceptui subordinatur secundum illam acceptionem cui subordinatur secundum illam secundum quam capitur communiter, et per additionem illius pronominis non cadit a sua significatione, sicut potest apparere de illo termino mentali ultimato; ergo est communis secundum illam.</text:p>
        </text:list-item>
        <text:list-item>
          <text:p text:style-name="P994"><text:span text:style-name="T766">Tum secundo, quia ille terminus </text:span><text:span text:style-name="T767">qui subicitur illic non est singularis secundum illam acceptionem, quia alias, in definitione termini singularis superflue adderetur illa particula vel terminus communis cum pronomine demonstrativo igitur.</text:span></text:p>
        </text:list-item>
        <text:list-item>
          <text:p text:style-name="P997">Tum tertio, quia quod terminus sit singularis non attenditur penes acceptionem, sed penes modum significandi, cum igitur eodem modo significet secundum illam acceptionem, sicut sine illa; ergo secundum illam erit communis.</text:p>
        </text:list-item>
      </text:list>
      <text:p text:style-name="P738">Ad hoc posset distingui maior, quia posset in ipsa poni talis appellatio quod esset neganda, et posset taliter capi quod esset concedenda, et tunc negando esset consequentia, et ad probationem dico quod non inconvenit si illud additum definitioni faciat talem appellationem quod impediat eius verificationem de aliquo, et cum definito non faciat talem appellationem quod impediat verificationem de eodem. Verum est tamen quod si definitum cum tali addito verificetur de aliquo, poterit illud additum taliter addi definitioni quod ipsa cum illo verificabitur de eodem.</text:p>
      <text:p text:style-name="P732"><text:span text:style-name="T768">Contra: ex ipsa sequitur quod ille terminus ‘homo’ discrete tentus est communis, sed hoc est falsum igitur. Falsitas consequentis probatur, quia bene sequitur ille discrete tentus significat discrete; ergo est singularis. Consequentia tenet et antecedens patet: ille supponit discrete; ergo significat discrete. </text:span><text:soft-page-break/><text:span text:style-name="T768">Antecedens est clarum et consequentia tenet ab inferiori ad superius, cum consimili addito quemadmodum ista tenet “Iste est homo albus; ergo est animal album”.</text:span></text:p>
      <text:p text:style-name="P739">Forte dices, negando istam ultima consequentiam, quia ratione illius determinationis quae additur superiori et inferiori, aequivalenter arguitur cum distributione. Ac si argueretur isto modo non supponit pro pluribus; ergo non significat plura, prout intelligenti sensus illarum propositionum apparere potest.</text:p>
      <text:p text:style-name="P733">Contra hoc arguitur: Non stat quod supponat discrete absque hoc quod significet discrete; ergo solutio nulla. Antecedens patet, quia si illud posset stare, hoc esset in illa propositione assumpta, sed hoc non, quia ille terminus potest verificari de pluribus, taliter /60b/ qualiter sufficit ad hoc quod illic capiatur pro pluribus, quia potest verificari de pluribus sine pronomine demonstrativo, et illud pronomine non debet manere in verificatione, quia alias pariforma deberet manere ly ‘omnis’ in verificatione de ly ‘homo’ pro suppositone eius in ista propositione “Omnis homo est animal”, et per consequens, pro nullo supponeret ibi. Et si forte dicas quod secus de pronomine demonstrativo et de signo distributivo.</text:p>
      <text:p text:style-name="P740">Contra hoc arguitur: Sequitur quod ly ‘quilibet’ non debebit manere in verificatione pro suppositione illius termini ‘homo’ in hac propositione “Quilibet homo currit”, et per consequens indifferenter supponet ibi ly ‘homo’ pro viris et mulieribus.</text:p>
      <text:h text:style-name="Heading_20_3" text:outline-level="3">Ad argumentum sufficienter responsum est, usque ad ultimam replicam ad quam concedo quod ly ‘quilibet’ non debet manere in verificatione de ly ‘homo’, quia tamen restringit ly ‘homo’ pro masculis</text:h>
      <text:p text:style-name="P741">Debebit loco illius poni unum aliud signum, ratione cuius consimiliter restringatur. Propterea non sequitur illud quod infers, sed quia ly ‘omnis’ nullo pacto restringit nec ly ‘omnis’ debebit manere in verificatione, nec oportebit quod aliud signum loco illius maneat.</text:p>
      <text:h text:style-name="Heading_20_3" text:outline-level="3">Octavo arguitur: Iste termini ‘Sol’, ‘Luna’ sunt communes, et ipsis repugnat ex modis suarum significationum verificari de pluribus igitur</text:h>
      <text:p text:style-name="P734"><text:span text:style-name="T769">Maior patet ex communi modo, et minor probatur, quia non possunt esse plures </text:span><text:span text:style-name="T770">s</text:span><text:span text:style-name="T769">oles nec </text:span><text:span text:style-name="T770">plures lunae.</text:span></text:p>
      <text:p text:style-name="P746">Forte dices quod verum est quod non possunt esse plures soles nec plures lunae naturaliter, sed bene supernaturaliter. Tunc supponam quod loquamur naturaliter, et redibit difficultas.</text:p>
      <text:p text:style-name="P734"><text:span text:style-name="T770">Si forte dicas quod licet naturaliter non possint esse plures soles aut plures lunae totales, tamen bene possunt esse plures partiales, quod sufficit ad illos terminos esse communes, postquam nullus connotat totalitem. Hoc mihi faceret ad difficultatem, quia ducam ipsam de istis terminis ‘Sol totalis’, ‘Luna totalis’, et propterea in sequentibus procedam de ly ‘Sol’ et de ly ‘Luna’ loco istorum terminorum. </text:span><text:span text:style-name="T771">Ideo forte dices aliter ad argumentum, negando minorem, et ad probationem dices quod licet non possunt esse plures soles aut lunae, tamen non repugnat ilis ex modis suarum significationum verificari de pluribus, quia si per possibile vel impossibile essent plures soles, ly ‘sol’ verificaretur de pluribus, et ita de ly ‘luna’, et hoc sufficit ad hoc quod ipsis non repugnet ex modis suarum significationum verificari de pluribus.</text:span></text:p>
      <text:p text:style-name="P742"><text:soft-page-break/>Contra hoc arguitur: Sequitur ex ipso quod ille terminus ‘Sortes’ est communis, quod est falsum quod sequatur. <text:span text:style-name="T772">Patet quia ex modo suae significationis non repugnat verificari de pluribus; ergo est communis. Antecedens patet, quia si per possibile vel impossibile essent plures distincti quorum quilibet esset Sortes, ille terminus ‘Sortes’ verificaretur de illis; ergo ex modo suae significationis et caetera modus arguendi est similis cum illo quem facis de ly ‘Sol’, et illa conditionalis tenet. Tunc propter impossibilitatem antecedentis tum etiam, hoc relicto, tenet eodem modo, sicut teneret illa quam facis de ly ‘Sol’ ex eo, quia ly ‘Sortes’ significat quidquid potest esse Sortes mediante conceptu mediate qui est singularis, sicut ly ‘Sol’ significat quidquid postes esse Sol mediante suo conceptu.</text:span></text:p>
      <text:h text:style-name="Heading_20_3" text:outline-level="3">Et confirmatur ratio: Iste terminus ‘Deus’ est communis et sibi repugnat et caetera; igitur maior est nota et minor probatur quia non possunt esse plures dei</text:h>
      <text:p text:style-name="P744">Forte dices quod licet non possunt esse plures dei tamen verificatur de tribus <text:span text:style-name="T860">p</text:span>ersonis in divinis, quae realiter distinguuntur, et hoc sufficit ad ipsum esse communem.</text:p>
      <text:p text:style-name="P744">Contra: Sequitur quod ly ‘hic deus’, demonstrata Essentia Divina, esset communis, et ex consequenti aliqua esset universalis, quae <text:span text:style-name="T773">nullam posset habere singularem in ordine ad copulam de praesenti. Patet de illa omnis </text:span><text:span text:style-name="T858">D</text:span><text:span text:style-name="T773">eus est.</text:span></text:p>
      <text:h text:style-name="Heading_20_3" text:outline-level="3">Et confirmatur secundo: Iste terminus ‘Chimaera’ est communis et tamen repugnat ei, ex modo suae significationis, verificari de pluribus</text:h>
      <text:p text:style-name="P745">Maior est nota, et minor patet, quia ille non potest verificari de pluribus, et hoc provenit ex modo suae significationis. Utputa quia illo modo /6<text:span text:style-name="T779">1</text:span>a/ significat omnia entia, nam si significaret illa eo modo sicut ly ‘ens’, bene verificaretur de pluribus.</text:p>
      <text:p text:style-name="P745">Forte dices quod potest verificari de pluribus in ordine ad copulam de imaginario et illud sufficit.</text:p>
      <text:p text:style-name="P745">Contra: Ex hoc sequitur quod ly ‘Sortes’ est eodem modo communis sicut ly ‘Chimaera’, quod est falsum, quia ly ‘Chimaera’ in ordine ad quamlibet copulam est communis et non ly ‘Sortes’. Et quod sequatur patet quia verificatur de pluribus in ordine ad copulam de imaginario eodem modo sicut ly ‘Chimaera’.</text:p>
      <text:h text:style-name="Heading_20_3" text:outline-level="3"><text:span text:style-name="T774">Ad argumentum respondetur concessa maiore. Sive loquamur naturaliter sive supernaturaliter</text:span> <text:span text:style-name="T774">nego minorem, et a probationem dico quod licet non possunt esse plures soles aut lunae, non tamen propterea illis repugnat ex modis suarum significationum et caetera</text:span></text:h>
      <text:p text:style-name="P747">Causam huius assignant aliqui, quia si per possibile vel impossibile et caetera, sed propter replicam tactam nihil vale illa assignatio.</text:p>
      <text:p text:style-name="P743"><text:span text:style-name="T775">Et si petas quomodo ergo cognoscetur quando alicui ex modo suae significationis repugnat verificari de pluribus, multi sunt qui non possunt verificari quibus non repugnat illud et multi sunt quibus repugnat.</text:span><text:span text:style-name="T772"> <text:s/></text:span></text:p>
      <text:p text:style-name="P735"><text:span text:style-name="T775">Ad hoc dico quod oportet respicere an talis terminus de significatione totali det intelligere plura in ordine ad aliam copulam quam de imaginario aut non, et si sic non repugnabit sibi illud ex modo </text:span><text:soft-page-break/><text:span text:style-name="T775">suae significationis, et si non sibi repugnabit hoc supposito. P</text:span><text:span text:style-name="T776">ro clariore intellectione est advertendum quod ly ‘Sol’ in ordine ad quamlibet copulam dat intelligere plures soles intelligibiles et ly ‘luna’ plures lunas </text:span><text:span text:style-name="T780">intelligibiles, et ly ‘</text:span><text:span text:style-name="T857">D</text:span><text:span text:style-name="T780">eus’ plures deos intelligibiles, et ly ‘Chimaera’ plura imaginata impossibilia divisim. Et propterea omnes isti termini sunt communes, et nisi ita dicatur, tunc oporteret aut quod ly ‘Sortes’ non significat plura in ordine ad copulam de imaginario, quemadmodum ly ‘Chimaera’, licet pro pluribus supponat in ordine ad illam, aut oportet dicere quod isti termini non sunt communes naturaliter loquendo in ordine alias copulas quam de imaginario.</text:span></text:p>
      <text:p text:style-name="P751">Sed dicendo eo modo quod dictum est, occurrit difficultas, quia videtur quod pariforma quod ly ‘homo’ in ordine ad qualibet copulam significet omnes homines intelligibiles et ex consequenti omnia entia mundi, sed ad hoc oporteret dicere quod non sequitur illud, et ratio discriminis est quia quidam sunt termini quorum significationes praecise terminantur ad possibilia et non ad omnia intelligibilia, quidam vero sunt quorum significationes terminantur ad intelligibilia.</text:p>
      <text:p text:style-name="P751">Ille terminus ‘homo’ et similes se habent primo modo termini autem de quibus facta est mentio in argumento et confirmationibus se habent secundo modo, et si petas ratione diversitatis non erit alia quam diversa natura terminorum. Poterit tamen dari aliquis conceptus qui significet omnes homines intelligibiles, absolute potens, praecise supponere in ordine ad copulam de possibili pro hominibus.</text:p>
      <text:p text:style-name="P751">Si tamen aliquis terminus praecise significaretur istum Solem in ordine ad alias copulas quam de imaginario, secundum istum modum dicendi, deberet esse singularis et non communis. De his autem modis dicendi tactis eliges quem malveris. Ille tamen qui primo tactus est et ultime prosequebatur videtur magis conformis communi modi loquendi.</text:p>
      <text:list text:style-name="L60">
        <text:list-item>
          <text:p text:style-name="P998">Ex quo patet primo quod omnes illi termini ‘Sol’, ‘Luna’, ‘Deus’, ‘Chimaera’ sunt communes.</text:p>
        </text:list-item>
        <text:list-item>
          <text:p text:style-name="P998">Patet secundo quod ly ‘ista Chimaera’, quidquid demonstretur, est terminus singularis, quia quemadmodum ly ‘hoc ens’ et ly ‘Sortes’, qui licet in ordine a copulam de imaginario significet plura divisim, sicut illi termini ‘hoc ens Sortes’ tamen non in ordine ad alias copulas, et propterea ille est singularis et non communis, et per hoc patet solutio secundae confirmationis.</text:p>
        </text:list-item>
      </text:list>
      <text:p text:style-name="P750"><text:span text:style-name="T781">Ad primam confirmationem </text:span><text:span text:style-name="T782">nego minorem, qui certum est quod non repugnat illi, ex modo suae significationis, de pluribus realiter distinctis, nec etiam de pluribus essentialiter distinctis, esto quod non possit in ordine ad aliam copulam quam de imaginario verificari de pluribus essentialiter distinctis. Et ad illud quod tangis de ly ‘hic </text:span><text:span text:style-name="T856">D</text:span><text:span text:style-name="T782">eus’, dico primo quod illi non repugnat ex modo suae significationis verificari de pluribus realiter distinctis, sed bene de pluribus essentialiter distinctis.</text:span></text:p>
      <text:p text:style-name="P752"><text:span text:style-name="T783">Dico secundo quod si ad /61b/ </text:span><text:span text:style-name="T784">terminum singularem requiratur quod ex modo suae significationis repugnet sibi verificari de pluribus realiter distinctis, ille non est singularis sed communis, et tunc concedendum est totum quod infers in illa replica, nec illud inconvenit.</text:span></text:p>
      <text:p text:style-name="P753"><text:span text:style-name="T785">Si autem dicatur quod ad ter</text:span><text:span text:style-name="T786">minum singularem sufficit quod repugnet sibi, ex modo suae significationis, verificari de pluribus essentialiter distinctis,</text:span><text:span text:style-name="T783"> </text:span><text:span text:style-name="T786">tunc neganda erit sequela pro omni parte, et quia discrimen inter istos duos modos dicendi solum est ad nomen, poteris indifferenter unum vel alterum tenere.</text:span></text:p>
      <text:h text:style-name="Heading_20_3" text:outline-level="3"><text:soft-page-break/>Nono arguitur contra primam definitionem: Iste terminus ‘ens’ quod est Sortes est singularis, et repugnat ipsi ex modo suae significationis verificari de pluribus igitur</text:h>
      <text:p text:style-name="P755">Maior est nota. Minor probatur quia ille significat quidquid illa pars ens significat igitur.</text:p>
      <text:p text:style-name="P755">Si forte dicas quod verum est de significatione partiali et non de totali et illud oportet. Contra de significatione totali significat plura adhuc in ordine ad copulam de praesenti; igitur antecedens patet in quocumque aggregatio ex determinatione, et determinabili significatio totalis attenditur penes significationem determinabilis. Sed ly ‘ens’ quod est Sortes est tale aggregatum cuius determinabile est ly ‘ens’ quod significat plura; ergo ly ‘ens’ quod est Sortes de significatione totali significat plura.</text:p>
      <text:p text:style-name="P755">Maior patet supposito quod loquamur de determinatione quae non est distrahens aut diminuens. Tunc sic in quolibet tali aggregato, suppositio totalis attenditur pene impositionem determinabilis; ergo in quolibet tali significatio totalis attenditur penes significationem determinabilis.</text:p>
      <text:p text:style-name="P755">Consequentia tenet per modum arguendi ab inferiori ad superius affirmative sine errore, et antecedens patet quia pro qu<text:span text:style-name="T788">o</text:span>cumque pro quo supponit determinabile talis aggregati, supponit totum aggregatum et non pro alio.</text:p>
      <text:p text:style-name="P756">Forte dices, negando ultimam consequentiam, quia licet arguatur in ipsa ab inferiore ad superius affirmative, tamen committitur error, nam aequivalenter arguitur cum distributione superioris, quia sensus antecedentis est quod pro quocumque pro quo supponit determinabile, talis aggregati supponit <text:span text:style-name="T789">illud aggregatum de significatione totali, et non pro alio, et proportionabilis est sensus consequentis prout ex communi usu apparet. Modo ex his sensibus manifeste apparet ille error.</text:span></text:p>
      <text:p text:style-name="P756"><text:span text:style-name="T790">Contra ista arguitur probando quod illud consequens sit verum, et ex consequenti, quod non committatur ille error in illa consequentia, volo quod illa pars quod est Sortes deponatur a sua significatione omnino residua, manente imposita, et suppono ulta quod ille duae sint unum ens, et loquor de illo aggregato. Scripto hoc facto “Illud aggregatum significat omnis entia mundi de significatione totali, et per dispositionem illius partis illud totum non imponitur de novo” ut suppono ergo prius significabat omnia entia de significatione totali sicut nunc. </text:span><text:span text:style-name="T789"><text:s/></text:span></text:p>
      <text:p text:style-name="P754"><text:span text:style-name="T790">Consequentia tenet cum minori, et maior patet, quia nunc significat omnia entia, ut suppono; ergo de significatione totali significat illa. Item significat omnia entia et non de significatione partile; ergo de totali consequentia tenet cum maiori, et minor patet quia si illa significatio, secundum quam significat illa, </text:span><text:span text:style-name="T791">s</text:span><text:span text:style-name="T790">it partialis respectu alicuius totalis, </text:span><text:span text:style-name="T791">e</text:span><text:span text:style-name="T790">rit partialis, </text:span><text:span text:style-name="T791">s</text:span><text:span text:style-name="T790">ed non habet aliam totalem ab illa; ergo non est partialis, vel saltem illa est totalis.</text:span><text:span text:style-name="T787"> </text:span><text:span text:style-name="T786"><text:s/></text:span><text:span text:style-name="T782"><text:s/></text:span><text:span text:style-name="T781"><text:s/></text:span><text:s/></text:p>
      <text:h text:style-name="P897" text:outline-level="3"><text:span text:style-name="T790">Ad argumentum patet quid </text:span><text:span text:style-name="T791">sit dicendum usque ad ultimam replicam ad quam datis omnibus illis quae supponis, nego maiorem</text:span></text:h>
      <text:p text:style-name="P757">Immo dico quod in tali casu, illud atramentum non habet significationem totalem saltem propriam, et ad probationem nego consequentiam, unde non sufficit assumere illud quod assumis ad inferendum illud consequens, sed oportet cum illo addere antecedenti hoc, scilicet, et illud habet aliquam significationem totalem.</text:p>
      <text:p text:style-name="P758"><text:soft-page-break/>Ad aliam probationem distinguo minorem. Si enim per significationem partialem intelligas significationem provenientem a parte, nego illam. Si autem per significationem partialem intelligas significationem ex qua cum alia significatione constituitur una significatio totalis illius, concedenda est illa /62a/ <text:span text:style-name="T792">minor, et neganda est consequentia.</text:span></text:p>
      <text:p text:style-name="P761">Contra solutionem primi arguitur: Tunc illud atramentum est terminis proprie; ergo habet significationem totalem propriam, et per consequens adhuc concludetur intentum. Antecedens patet quia tunc illud significat proprie; ergo est terminus proprie.</text:p>
      <text:p text:style-name="P759"><text:span text:style-name="T793">Item probo quod de significatione totali significet proprie, quia significat omnia entia, </text:span><text:span text:style-name="T794">et omnia naturaliter similia.</text:span></text:p>
      <text:p text:style-name="P762">Secundae parti proprie et non de significatione partiali, ergo de totali, et is forte dicas quod de partiali significat illa proprie, quia prima <text:s/>pars significat illa proprie, tunc ducatur argumentum de ly ‘animal’ quid est Sortes et non cades illic solutio. Ideo forte dices procedendo de ly ‘animal’ quod est Sortes quod non proprie significat omnia animalia, et omnia similia secundae parti.</text:p>
      <text:p text:style-name="P762">Contra: Significat illa ad placitum proprie, igitur antecedes patet. Significat illa large, capiendo significare et non naturaliter aliquo modo, ut clarum est; ergo ad placitum. Et hoc proprie, quia illud provenit ex impositione propria de ly ‘animal’ igitur.</text:p>
      <text:h text:style-name="Heading_20_3" text:outline-level="3">Ad primum istorum nego antecedens, et ad probationem dico quod licet significet proprie non tamen de significatione totali, quod requiritur ad terminum proprie</text:h>
      <text:p text:style-name="P760"><text:span text:style-name="T795">Ad aliud distinguo quod ly ‘animal’ quod est Sortes significet omnia animalia et omnia similia secundae parti vel mediante uno conceptu, et sic nego, quia ille non posset esse simplex nec complex aliqua complexione. Non enim complexione distanti ut claru est, nec indistanti, quia non est aggregatum ex determinatione et determinabili. Sed quod non possit esse simplex patet, quia nullus conceptus simplex videtur posse significare omnia animalia et omnia similia secundae parti quin </text:span><text:span text:style-name="T796">significet aliqua alia.</text:span></text:p>
      <text:p text:style-name="P763">Si vero intelligas quod significat illa mediantibus diversis conceptibus, concedo, et tunc nego quod significet illa proprie, sed aliqua significat proprie et aliqua improprie, et ex hoc non sequitur quod divisio de ly ‘significare’ proprie et improprie insufficiens oporteret assumere quod significet illa mediante uno conceptu quod non contingit in proposito.</text:p>
      <text:p text:style-name="P764">Et cum ultra arguas: “Significat illa et non de significatione partiali”, hoc posset negari, quia posset dici quod totum ipsum, dempta una parva parte imperceptibili ex ly ‘animal’, significat illa. Sed quantumcumque concedatur illud ad hunc sensum, videlicet, quod non significat illa secundum aliquam significationem ex qua cum aliqua alia fiat una significatio totalis, ex illo non sequitur quod de significatione totali significet illa, et ratio est quia non habet significationem totalem, nec secundum unam significationem significat illa, sed secundum diversas partiales, et propterea cum assumis quod non significet illa de significatione partiali, si intelligas ad hunc sensum quod non significet illa de significatione alicuius partis vel aliquarum partium, hoc negandum est.</text:p>
      <text:p text:style-name="P765"><text:soft-page-break/>Posset ibi fieri argumentum, quia videtur quod illud totum significet se et omnia animalia, et hoc de significatione totali, ex quod non de significatione partiali, et videtur quod non significet illa. Et hoc potest probari ut prius.</text:p>
      <text:p text:style-name="P766">Ad hoc dico quod verum est quod significat illa, sed non de significatione totali nec partiali nec proprie nec improprie, seu mediante uno conceptu significat illa, sed mediantibus diversis conceptibus, et una illarum significationum est totalis impropria, altera autem illarum significationum est partialis et impropria.</text:p>
      <text:p text:style-name="P767">Sed occurrit difficultas circa praedicta, quia videtur quod ly ‘ens’ ibi “Ens quod est Sortes”, non sit terminus communis secundum significationem secundum quam capitur illic, cuius oppositum est dictum, et probatur illud illic solum significat Sortem; ergo non est terminus communis secundum quod capitur illic. Antecedens patet, suppositio illius termini restringitur illic pro Sorte; ergo significatio eius restringitur illic pro sorte. Antecedens est clarum et consequentia tenet ab inferiori ad superius et sine errore.</text:p>
      <text:p text:style-name="P767">Ad hoc neganda est illa consequentia, unde aequivalenter arguitur in ipsa cum distributione superioris, quia ad veritatem consequentis requiritur quod non significet illic nisi Sortem, unde manifeste apparet falsitas consequentis cum malitia consequentiae.</text:p>
      <text:h text:style-name="Heading_20_3" text:outline-level="3">Circa istam materiam incidit dubium de copulatis distinctis et conditionatis, quorum cuiuslibet una pars principalis est terminus communis et alia singularis. An /62b/ tales termini sint communes vel singulares</text:h>
      <text:p text:style-name="P768">Pro cuius solutione pono propositiones: </text:p>
      <text:list text:style-name="L59">
        <text:list-item>
          <text:p text:style-name="P999">Prima: Omne copulatum cuius utraque pars principalis est terminus singularis, est terminus singularis.</text:p>
        </text:list-item>
        <text:list-item>
          <text:p text:style-name="P1000">Secunda: Omne copulatum cuius utraque pars principalis est terminus communis, est terminus communis.</text:p>
        </text:list-item>
        <text:list-item>
          <text:p text:style-name="P1001">Istae duae sunt manifestae.</text:p>
        </text:list-item>
        <text:list-item>
          <text:p text:style-name="P1001">Tertia ponitur ab aliquibus sic: Omne copulatum cuius una pars principalis est terminus communis sive alia sit singularis sive communis, est terminus communis.</text:p>
        </text:list-item>
        <text:list-item>
          <text:p text:style-name="P1001">Quid tamen veritatis habeat haec tertia propositio videbitur inferius.</text:p>
        </text:list-item>
        <text:list-item>
          <text:p text:style-name="P1002"><text:span text:style-name="T797">Quarta: Omne disiunctum quod est categorema, significatione cuius non utraque pars principalis est terminus singularis, </text:span><text:span text:style-name="T798">significans adaequate de significatione totali. Idem cum altera parte principalis eius est terminus communis.</text:span></text:p>
        </text:list-item>
      </text:list>
      <text:p text:style-name="P769">Sed pro conditionatis, tenendo ipsa non ampliativa pono hanc conclusionem:</text:p>
      <text:p text:style-name="P835"><text:span text:style-name="T798">Omne conditionatum est terminus communis, nisi terminus illatus eius sit singularis; et terminus inferens transcendens vel contradictorius simpliciter, termini illati.</text:span> </text:p>
      <text:p text:style-name="P770"><text:span text:style-name="T678"><text:s/></text:span><text:span text:style-name="T676"><text:s/></text:span><text:span text:style-name="T799">Propositio intelligatur quando ly ‘est’ in conditionato non negatur et, seclusus terminus ampliativus in quibus forte non haberet illud, verum. Sed tenendo conditionata ampliativa, difficile </text:span><text:soft-page-break/><text:span text:style-name="T799">esse dare ali</text:span><text:span text:style-name="T800">quod conditionatum quod esset terminus singularis, nisi dicatur quod aliquod istorum est huiusmodi “Hoc risibile est intelligibile”, capiendo ly ‘hoc risibile’ ampliative. Hic “Deus si est intelligibile” hic ‘</text:span><text:span text:style-name="T859">D</text:span><text:span text:style-name="T800">eus’ si est Sortes dummodo teneatur </text:span><text:span text:style-name="T801">&lt;quod </text:span><text:span text:style-name="T800">pro duobus ultimis</text:span><text:span text:style-name="T801">&gt;</text:span><text:span text:style-name="T800">, quod ly ‘hic </text:span><text:span text:style-name="T859">D</text:span><text:span text:style-name="T800">eus’ sit terminus singularis.</text:span></text:p>
      <text:p text:style-name="P771"><text:span text:style-name="T800">Sed quid parva est in his difficultas, similiter et in disiunctis non ampliorem mentionem faciam pro nunc de ipsis, sed solum inquiram de veritate tertiae propositionis positae pro copulatis. </text:span><text:span text:style-name="T801">Contra quam arguitur primo sic: Ly ‘Sortes’ et omnis homo est copulatum cuius una pars principalis et caetera, et non est terminus communis; igitur maior est nota et minor patet quia repugnat ei, ex modo suae definitionis, verificari de alio quam de Sorte, et de solo Sorte potest verificari.</text:span></text:p>
      <text:p text:style-name="P776">Dices forte quod illud copulatum non potest verificari de aliquo, quia ly ‘omnis homo’ non potest supponere, ex quo non est possibile quod praecise sit unus homo, nam pars hominis est homo. Hoc non tolleret ipsum esse terminum communem, sed quidquid sit, tunc capiam argumentum de isto toto Sortes et omnis homo non partialis.</text:p>
      <text:p text:style-name="P777">Propter ista argumenta dixerunt aliqui quod tertia propositio patitur instantiam in his et universaliter de quocumque copulato, cuius una pars principalis est terminus singularis et alia est aggregatum ex signo distributivo et termino superiori ad illum terminum singularem.</text:p>
      <text:p text:style-name="P778">Sed contra hoc arguitur: Posito quod iam sit unus homo totalis, cuius Sortes sit una pars et ‘a’ sit residua pars, et non sit alius homo totalis, sed cras ex illo qui iam est totalis cum ‘b’ portione materiae efficitur unus homo totalis et nullus alius, erit tunc totalis. Tunc clarum est quod successive verificabitur de his duobus quorum unus est iam totalis et alius erit cras totalis; ergo est terminus communis. Consequentia tenet quia illud sufficit ad hoc quod sit terminus communis, nam alias ly ‘omnis homo totalis’ non esset terminus communis.</text:p>
      <text:p text:style-name="P772">Forte dices propter hoc quod illa propositio non patitur instantiam in his, sed bene in similibus in quibus termini important res simplices, sicut ibi Michael et omnis angelus.</text:p>
      <text:p text:style-name="P772">Contra hoc arguitur: Huic termino non repugnat ex modo suae significationis verificari de pluribus et caetera; igitur antecedens patet, quia de significatione totali significat plura divisim. Ergo ex superius dicitis non repugnat illi et caetera.</text:p>
      <text:p text:style-name="P772">Antecedens patet quia ex una parte de significatione totali significat Michaelem et Gabrielem, ex altera autem parte significat Michaelem et Raphaelem de significatione totali. Hoc potest probari supposito quod secunda pars principalis illius, quemlibet angelum de significatione totali significat, quia ly ‘Sortes’ et omnis asinus, ex una parte Sortem et Brunellum de significatione totali significat, et ex /63a/ <text:span text:style-name="T802">altera Sortem et Favellum, et hoc est propterea quia una pars principalis eius significat Sortem et altera quemlibet asinum de significatione totali significat. Ergo per idem, in proposito continget illus assumptum.</text:span></text:p>
      <text:p text:style-name="P773">Forte dices aliter ad argumentum, ducendo ipsum de illo copulato Michael et omnis angelus, quod licet non possit verificari de pluribus secundum se. Tamen aliquod copulatum similis formae cum illo potest verificari de pluribus. Patet de isto Sortes et omnis angelus et illud sufficit ad hoc quod illud copulatum sit terminus communis.</text:p>
      <text:p text:style-name="P774">Sed haec solutio peteret principium ex quod per hoc quod illa duo copulata sint eiusdem formae vult concludere quod primum copulatum sit terminus communis, quia ex conditionibus requisitis ad <text:soft-page-break/>similitudinem formae, postquam secundum est terminus communis. Ad hoc quod illa sint eiusdem formae requiretur quod primum sit terminus communis, unde manifeste apparet quod illud quod assumit ad concludendum intentum, praesupponit illud quod per illud assumptum vult concludere, et ex consequenti, qualitercumque intelligeretur definitio termini communis, in ipsa peteretur principium. Et etiam posse argui <text:span text:style-name="T803">de isto “Hic angelus et omnis angelus” de quo rediret difficulta</text:span><text:span text:style-name="T804">s quia non videtur quod aliquis similis formae cum illo possit verificari de pluribus.</text:span></text:p>
      <text:p text:style-name="P781">Reliqueris igitur, his modis dicendi, aliter dicam pro difficultate argumenti, unde dico quod quodlibet illorum copulatorum, quae in processu argumenti tacta sunt, est terminus communis, et licet aliquod illorum non possit verificari de pluribus, tamen nulli illorum repugnat, ex modo suae significationis, verificari de pluribus et caetera, quia quodlibet illorum de significatione totali significat plura divisim, prout ex processu potest apparere.</text:p>
      <text:p text:style-name="P775"><text:span text:style-name="T805">Secundo arguitur: Volo quod ly ‘Plato’ ultra significationem quam habet, imponatur ad significandum tantum sicut ly ‘homo’, non tamen propterea istud copulatum Sortes et Plato significet aliter quam prius. </text:span><text:span text:style-name="T806">Hoc dato una pars principalis illius copulati ‘Sortes et Plato’ est terminus communis, et altera singularis, et illud copulatum non est terminus communis.</text:span></text:p>
      <text:p text:style-name="P782">Forte dices et bene quod procedendo de significationibus propriis, si detur ille casus, tunc verum est antecedens, quia illud copulatum non significat iuxta significationes suarum partium, secundum quarum unam, una illarum, est terminus singularis, et secundum unam illarum est terminus communis, haec propositio intelligitur dummodo tale copulatum significet iuxta tales significationes suarum partium.</text:p>
      <text:p text:style-name="P783">Contra hoc arguitur: Ly ‘hoc’ ens Sortes est copulatum de quo propositio procedit, et una pars principalis eius est terminus communis et altera singularis, et tamen non est terminus communis; igitur prima et ultima partes antecedentis sunt manifeste.</text:p>
      <text:p text:style-name="P783">Aliae duae patent, quia una pars principalis eius est ly ‘Sortes, quod est terminus singularis, et ly ‘ens et ‘Sortes’ est terminus communis, et est altera pars principalis eius; igitur prima et secunda partes antecedentis sunt manifestae. Et tertia probatur quia ly ‘ens’ et ‘Sortes’ est pars illius copulati et non minus principalis, ex quo non est pars partis principalis nec syncategorema; ergo est pars principalis.</text:p>
      <text:h text:style-name="Heading_20_3" text:outline-level="3">Et confirmatur ratio: Ly ‘ista entia et entia”, demonstrando duos angelos, et supposito quod ly ‘ista’ cadat in totum sequens, est copulatum cuius una pars principalis est terminus communis et alia singularis, et non est terminus communis</text:h>
      <text:p text:style-name="P779"><text:span text:style-name="T808">I</text:span><text:span text:style-name="T807">gitur ultima pars antecedentis est manifesta, supposito quod solum habeat illam significationem, </text:span><text:span text:style-name="T809">et prima probatur, et primo quod sit copulatum, quia totum quod praecedit ly ‘et’ est unus terminus, et totum quod sequitur est alius terminus, et illi duo uniuntur per ly’ et’, alias non faceretur unum; ergo <text:s/>illud totum est copulatum.</text:span></text:p>
      <text:p text:style-name="P784">Sed quod una pars principalis eius sit terminus communis et alia singularis patet, quia totum quod praecedit ly ‘et’ est terminus singularis, et totum quod sequitur est terminus communis. Et postquam illud est copulatum totum, quod praecedit ly ‘et’ erit una pars principalis, et totum quod sequitur altera pars principalis.</text:p>
      <text:h text:style-name="P898" text:outline-level="3"><text:soft-page-break/>Ad argumentum patet solutio usque ad replicam, ad quam nego quod una pars principalis illius copulati sit terminus communis et alia singularis, <text:span text:style-name="T810">quia pars principalis copulati dicitur pars eius, quae cum alia parte eiusdem unitur per ly ‘et’</text:span></text:h>
      <text:p text:style-name="P780"><text:span text:style-name="T810">Ex hoc clarum est </text:span><text:span text:style-name="T811">quod ly ‘ens et Sortes’ non est pars principalis /63b/ </text:span><text:span text:style-name="T812">eius. Et cum arguis: “Est pars illius et non minus principalis”, posses taliter loqui de parte minus principali, quod concedendum esset illud antecedens, et neganda esse consequentia. Nec tunc oporteret quod quemlibet pars alicuius termini esset pars principalis vel minus principalis eiusdem, nec ly pars termini sufficienter divideretur per illos terminos, illo modo capiendo ly ‘pars minus principalis’.</text:span></text:p>
      <text:p text:style-name="P785">Si tamen per partem minus principalem illius copulati intelligas partem illius copulati quae non est pars principalis eiusdem, neganda erit minor.</text:p>
      <text:h text:style-name="Heading_20_3" text:outline-level="3">Ad confirmationem: Negandum est quod illud totum sit copulatum</text:h>
      <text:p text:style-name="P786"><text:span text:style-name="T812">Saltem secundum significationem secundum qua</text:span><text:span text:style-name="T813">m procedis et ad probationem, dico quod licet totum quod praecedit ly ‘et’ sit unus terminus, non tamen secundum significationem secundum quam significat iuxta significationem totalem illius termini, immo secundum nullam unam significationem capitur pro parte illius totius, et propterea non uniter per ly ‘et’ cum altero termino secundum significationem secundum quam significat iuxta significationem totalem illius termini, et propterea ille totalis terminus non est unum copulatum. Et licet habeat partes unitas per ly ‘et’ tamen ille non sunt principales partes eius, sed illud pronomen est una pars principalis eius et totum residuum reliqua.</text:span></text:p>
      <text:h text:style-name="Heading_20_3" text:outline-level="3">Tertio arguitur: Ly ‘Sortes’ et significatum per ly ‘Sortes’ est copulatum cuius una pars principalis est terminus communis et alia singularis, et non est terminus communis</text:h>
      <text:p text:style-name="P789">Consequentia tenet cum maiori et minor patet, supposito quod ly ‘Sortes’ non significet proprie nisi unum nec aequivoce nec univoce, et loquor de significato proprie per ly ‘Sortes’. Tunc sic illud copulatum praecise significat Sortem; ergo non est terminus communis.</text:p>
      <text:p text:style-name="P789">Consequentia ex superius dictis est manifesta et antecedens patet: “Illud totum praecise significat Sortem et illud quod significatur per ly ‘Sortes’”. Sed ille terminus ‘Sortes’ praecise significat Sortem; ergo illud copulatum praecise significat Sortem.</text:p>
      <text:p text:style-name="P789">Consequentia tenet cum minori et maior patet, quia una pars illius copulati praecise significat Sortem et altera praecise significat illud quod significatur per ly ‘Sortes’, quia una est ly ‘Sortes’ quae praecise significat Sortem et altera est significatum per ly ‘Sortes’, quae praecise significat illud quod praecise significat per ly ‘Sortes’; ergo illud copulatum praecise significat Sortem, et illud quod significatur per ly ‘Sortes’.</text:p>
      <text:h text:style-name="Heading_20_3" text:outline-level="3"><text:soft-page-break/>Et confirmatur ratio: Capio ly ‘homo et Sorte<text:span text:style-name="T814">s</text:span>’, et volo quod ly ‘et’ manente sua significatione ultra significet sicut ly ‘existens’, <text:span text:style-name="T814">ita quod ly ‘homo est Sortes’ significet Platoni iuxta secundam significationem de ly ‘et apud alium’ vero alio modo significet</text:span></text:h>
      <text:p text:style-name="P787"><text:span text:style-name="T814">Tunc sic, ly ‘homo et Sortes apud Platonem’ est terminus singularis, et illis copulati una pars principalis est terminus communis et alia singularis apud </text:span><text:span text:style-name="T815">P</text:span><text:span text:style-name="T814">latonem; igitur </text:span><text:span text:style-name="T815">maior est nota. Minor patet quia apud Platonem una pars principalis est ly ‘homo’ et altera ly ‘existens Sortes’.</text:span></text:p>
      <text:h text:style-name="Heading_20_3" text:outline-level="3">Ad argumentum nego minore et ad probationem nego antecedens</text:h>
      <text:p text:style-name="P788"><text:span text:style-name="T815">Ad cuius probationem nego maiorem et ad probationem nego quod ly ‘significatum’ per ly ‘Sortes’ praecise significet omne illud quod significatur per ly ‘Sortes’, quia certum est quod significat omne illud quod potest esse significatum per ly ‘Sortes’ proprie. </text:span><text:span text:style-name="T816">Et si arguas ly ‘significatum’ per ly ‘Sortes’ praecise significat significatum per ly ‘Sortes’ et omne significatum per ly ‘Sortes’ est aliquid quod significatur per ly ‘Sortes’; ergo praecise significat illud quod significat per ly ‘Sortes’.</text:span></text:p>
      <text:p text:style-name="P790">Ad hoc neganda est consequentia, saltem tenendo illam veram “Omne possibile est”, et si vis unum simile, reperies in hac consequentia “Ly ‘album’ significat album et omne album est aliquid quod est homo”; ergo ly ‘album’ praecise significat aliquid quod est homo.</text:p>
      <text:p text:style-name="P791">Et si arguas contra istam solutionem, quia ex illa propositione concessa, scilicet “Ille terminus praecise significat significatum per ly ‘Sortes”, sequitur quod ille terminus non significat nisi Sortem, et ex illo iterum sequitur bonitas consequentiae. Igitur maior patet quia dato opposito si significet aliquid quod non est Sortes maxime significat Platonem; sed hoc est falsum igitur falsitas consequentis patet, quia bene sequitur praecise significatum per ly ‘Sortes’ significat ille terminus. Ergo nihil non significatum per ly ‘Sortes’ significat ille terminus, et ultra nihil non significatum per ly ‘Sortes’ significat ille terminus, /64a/ sed Plato est non significatum per ly ‘Sortes’; ergo Platone non significat ille terminus.</text:p>
      <text:p text:style-name="P792"><text:span text:style-name="T817">Haec omnia sunt manifesta dempto illo quod Plato sit non significatum per ly ‘Sortes’. Bene sequitur Plato non est non significatum per ly ‘Sortes’ et Plato est; ergo Plato est significatum per ly Sortes’, et hoc consequens est falsum et minor est vera, ut suppono. Ergo maior falsa et per consequens eius contradictoria vera, ut</text:span><text:span text:style-name="T818">puta illa “Plato est non significatu per ly ‘Sortes’.</text:span></text:p>
      <text:p text:style-name="P796">Solutio huius replicae: Aliqua praesuponit ex ampliationibus quae succincte tangam. Unde in hac propositione hoc est significatum per ly ‘Sortes’. Praedicatum non habet amplum modum significandi, saltem loquendo sicut in his materis loquimur, nec ampliatur, et ex consequenti nulla erit ampliatio. Ibi “Hoc est non significantum per ly ‘Sortes’”, sed ibi significatum per ly ‘Sortes’ significat ille terminus ly ‘significatum’ per ly ‘Sortes’, ampliatur ad quattuor differentias temporum.</text:p>
      <text:p text:style-name="P796">Immo in his materiis taliter proceditur quod in similibus propositionibus est ampliatio ad quinque, sicut patet ibi “Chimaeram significat ly ‘Chimaera’” et ex consequenti ibi nihil “non significatum per ly ‘Sortes’” significat ille terminus. Si ly “non significatum per ly ‘Sortes’” supponeret, deberet supponere pro illo quod non potest esse significatum per ly ‘Sortes’, et ideo ad illam replicam neganda est ultima consequentia quam facis, nec est bonus syllogismus quia medium in minori, in qua non distribuitur, supponit pro aliquo pro quo non supponit in maiori in qua distribuitur.</text:p>
      <text:h text:style-name="Heading_20_3" text:outline-level="3"><text:soft-page-break/>Ad confirmationem dico quod verum est quod illud copulatum apud Platonem est terminus singularis, et apud ipsum una pars principalis est terminus communis et altera singularis</text:h>
      <text:p text:style-name="P797">sed non est copulatum apud ipsum, et propterea nihil sequitur contra dicta. Quia habendum intentum oportet illud assumere et probare cum illis.</text:p>
      <text:h text:style-name="Heading_20_3" text:outline-level="3">Quarto arguitur: Ly ‘Sortes et Plato’ et ‘Sortes vel Plato’ capiendo ly ‘et’ secundum pro copula principali, est copulatum cuius una pars principalis est terminus communis et alia singularis, et non est terminus communis</text:h>
      <text:p text:style-name="P793">Igitur maior <text:span text:style-name="T819">est nota et minor probatur, quia non significat plura divisim de significatione totali; igitur consequentia tenet ex superius dictis, et antecedens patet quia ex quo prima pars significat Sortem et Platonem simul de significatione totali, et secunda, quemlibet illorum de significatione totali significat, scilicet Sortem Platonem sequitur, quod illud copulatum de significatione totali non significabit nisi Sortem et Platonem cum quolibet significato secundae partis. Sed Sortes et Plato et quodlibet significatum secundae partis sunt Sortes et Plato; ergo de significatione totali non significat nisi Sortem et Platonem simul, et per consequens non significat plura divisim.</text:span></text:p>
      <text:p text:style-name="P798">Et confirmatur ratio: Ly ‘Sortes’ et pars Sortis est copulatum cuius una pars principalis est terminus communis et alia singularis, et non est terminus singularis igitur. Consequentia tenet cum maiori et minor patet, quia Sortem praecise, de significatione totali, significat; igitur antecedens patet, quia Sortem et quamlibet partem Sortis de significatione totali significat, sed Sortes et quaelibet pars sortis est Sortes; ergo Sortem praecise de significatione totali significat. Consequentia tenet et totum antecedens est manifestum.</text:p>
      <text:p text:style-name="P794"><text:span text:style-name="T821">Et potest confirmari secundo argumentum, quia tenendo quod ly ‘Haec Essentia Divina’ est terminus communis, hoc totum “Haec Essentia Divina et </text:span><text:span text:style-name="T822">I</text:span><text:span text:style-name="T821">stae </text:span><text:span text:style-name="T822">T</text:span><text:span text:style-name="T821">res </text:span><text:span text:style-name="T822">P</text:span><text:span text:style-name="T821">ersonae” est copulatum cuius una pars principalis est terminus communis et alia singularis, et non est terminus communis sed singularis; igitur consequentia tenet cum maiori et minor patet, quia illud copulatum praecise significat hanc essentiam divinam, et ‘</text:span><text:span text:style-name="T822">I</text:span><text:span text:style-name="T821">stas </text:span><text:span text:style-name="T822">T</text:span><text:span text:style-name="T821">res </text:span><text:span text:style-name="T822">P</text:span><text:span text:style-name="T821">ersonas’ simul de significatione totali; ergo non significat plura divisim de significatione totali, et per consequens est terminus singularis et non communis.</text:span></text:p>
      <text:p text:style-name="P795"><text:span text:style-name="T822">Propter hoc argumentum et primam confirmationem oportet dicere quod illa tertia propositio patitur instantiam de his terminis et similibus, et etiam patitur instantiam de illo termino scripto in secunda confirmatione, supposito quod ly ‘Istae Tres Personae’ sit terminus singularis et ly ‘Ista Essentia Divina’</text:span><text:span text:style-name="T820"> </text:span><text:span text:style-name="T823">terminus communis; propterea propositio non universaliter intelligenda est, sed intelligatur extra similes terminos. /64b/</text:span></text:p>
      <text:p text:style-name="P795"/>
      <text:h text:style-name="P871" text:outline-level="2">De aliis divisionibus terminorum</text:h>
      <text:h text:style-name="Heading_20_3" text:outline-level="3">Consequenter videndum est de aliis divisionibus terminorum</text:h>
      <text:p text:style-name="P799">De quibus principaliter spectat considerare in aliis partibus logices. Ideo pro nunc solum definitive et divisive videbitur quarum prima est:</text:p>
      <text:p text:style-name="P800">Terminorum quidam est absolutus et quidam connotativus. <text:span text:style-name="T824">Divisum huius divisionis est ly ‘terminus’ significans aliquid vel aliqua.</text:span></text:p>
      <text:list text:style-name="L51">
        <text:list-item>
          <text:p text:style-name="P1003">Terminus connotativus est qui ultra significatum suum materiale significat aliquid vel aliqua vel aliqualiter sibi convenire. Dicitur aliquid propter istum terminum ‘alba’ et similes, et dicitur aliqualiter et caetera propter istum terminum ‘ridens’ et similes. Et de quolibet illorum dicimus quod ultra suum significatum materiale, significat aliquid vel aliqua vel aliqualiter sibi convenire, et hic modus loquendi servatur in definitione, quia non possumus convenientius loqui in huiusmodi terminis definiendis, nec ex isto modo loquendi potest inferri quod quilibet terminus connotativus sit complexus.</text:p>
          <text:p text:style-name="P1003">Per significatum materiale alicuius termini intelligimus significatum eius pro quo accipitur in potentia propinqua.</text:p>
          <text:p text:style-name="P1003">Quid sit terminum accipi videbitur in suppositionibus.</text:p>
        </text:list-item>
        <text:list-item>
          <text:p text:style-name="P1004">Terminus absolutus est terminus <text:span text:style-name="T825">significans aliquid vel aliqua, qui ultra suum significatum materiale non significat aliquid vel aliqua vel aliqualiter sibi convenire.</text:span></text:p>
          <text:p text:style-name="P1005">Ista definitio manifesta est intellecta praecedenti</text:p>
        </text:list-item>
      </text:list>
      <text:p text:style-name="P804">Et ex his patet quid sit connotare, unde connotare est ultra significatum materiale aliquid vel aliqua vel aliqualiter sibi convenire denotare.</text:p>
      <text:p text:style-name="P804">Dupliciter contingit connotare, scilicet, extrinsece et intrinsece. Connotare intrinsece apud aliquos sic solet definire:</text:p>
      <text:p text:style-name="Quotations">Est connotare partem essentialem.</text:p>
      <text:p text:style-name="P804">Alii addunt illi definitioni ‘hoc totum’, scilicet, vel est connotare aliquid per modum partis essentialis.</text:p>
      <text:p text:style-name="P805">Sed propter argumentum quod potest fieri de ly ‘homo’ intelligens animam rationalem. Melius est definire ly ‘connotare’ intrinsece sic:</text:p>
      <text:p text:style-name="Quotations">Est connotare partem essentialem per modum partis essentialis, vel partes essentiales per modum paritum essentialium.</text:p>
      <text:p text:style-name="P805">Ly ‘connotare extrinsece’ sic:</text:p>
      <text:p text:style-name="Quotations">Est connotare aliquid vel aliqua vel aliqualiter non per modum partis essentialis, vel partium essentialium.</text:p>
      <text:p text:style-name="P805">Haec ad longum declarabuntur in libris praedicabilium.</text:p>
      <text:p text:style-name="P801"><text:soft-page-break/><text:span text:style-name="T826">Sed </text:span><text:span text:style-name="T827">ly ‘terminus connotativus intrinsece’ poterit sic definiri:</text:span></text:p>
      <text:p text:style-name="Quotations">Est terminus qui connotat intrinsece.</text:p>
      <text:p text:style-name="P806">Et ly ‘terminus connotativus extrinsece’:</text:p>
      <text:p text:style-name="Quotations">Est terminus qui connotat extrinsece.</text:p>
      <text:p text:style-name="P802"><text:span text:style-name="T828">Nec inconvenit stando in his definitionibus quod idem terminus sit connotativus intrin</text:span><text:span text:style-name="T829">sece, et ille idem sit connotativus extrinsece.</text:span></text:p>
      <text:h text:style-name="Heading_20_3" text:outline-level="3">Sequitur alia divisio termini, unde terminorum quidam est univocus et alius aequivocus</text:h>
      <text:p text:style-name="P807">Divisum huius divisionis est ly ‘terminus large’, quia omnis terminus tam categorematicus quam syncategorematicus est univocus vel aequivocus.</text:p>
      <text:list text:style-name="L52">
        <text:list-item>
          <text:p text:style-name="P1006">Terminus univocus est terminus significans mediante uno actu vel conceptu.</text:p>
        </text:list-item>
        <text:list-item>
          <text:p text:style-name="P1006">Terminus aequivocus est terminus significans diversis modis totalibus non synonymis.</text:p>
        </text:list-item>
      </text:list>
      <text:p text:style-name="P808">Dicitur totalibus quia propter diversos modos significandi partiales non diceretur terminus aequivocus. Et dicitur non synonymis quia propter hoc quod ly ‘a’ significet se ex impositione et etiam naturaliter communiter, non diceretur secundum illos duos diversos modos significandi terminus aequivocus.</text:p>
      <text:p text:style-name="P809">Duplex est terminus aequivocus, scilicet a casu e a consilio:</text:p>
      <text:list text:style-name="L53">
        <text:list-item>
          <text:p text:style-name="P1008">Terminus aequivocus a casu est terminus significans diversis modis totalibus non synonymis aeque primo.</text:p>
        </text:list-item>
        <text:list-item>
          <text:p text:style-name="P1007"><text:span text:style-name="T830">Terminus aequivocus a consilio est terminus significans diversis modis totalibus non synonymis no</text:span><text:span text:style-name="T831">n</text:span><text:span text:style-name="T830"> aeque primo, sed uno modo per prius et alio modo per posterius.</text:span></text:p>
        </text:list-item>
      </text:list>
      <text:p text:style-name="P803">Exemplum primi patet de ly ‘canis’ in significando canem latrabilem, piscem marinum et sidus caeleste.</text:p>
      <text:p text:style-name="P803">Exemplum secundi patet de ly ‘homo’ in significando hominem verum et hominem pictum. Unde ly ‘homo’ primo et principaliter significat homines veros et secundario homines /65a/ sicut visum est superius, circa modos significandi ex impositione. Et aequivocum a consilio solet vocari analogum, circa quod solent poni duae regulae quarum prima est:</text:p>
      <text:list text:style-name="L54">
        <text:list-item>
          <text:p text:style-name="P1009">Omne analogum sumptum cum aliqua determinatione quae est membrum divisionis analogice eius, vel quod subiicitur respectu praedicati dividentis ipsum divisione analogica, stat secundum exigentiam illius determinationis vel membri, ita quod capitur mediante conceptu mediante quo significat significata illius determinationis vel membri.</text:p>
          <text:p text:style-name="P1009">Exemplum patet ibi “Homo pictus” est ubi ly ‘homo’ capitur mediante conceptu mediante quo significat homines pictos.</text:p>
          <text:p text:style-name="P1009">Exemplum secundi “Homo est pictus” ubi ly ‘homo’ capitur mediante eodem conceptu.</text:p>
          <text:p text:style-name="P1009"><text:soft-page-break/>Et hoc quod tangitur in ultima parte est quod communiter solet dici: “Talia sunt substantia qualia permittuntur ab eorum praedicatis”. Quod apud aliquod intelligitur in analogis.</text:p>
        </text:list-item>
      </text:list>
      <text:p text:style-name="P803">Utrum autem in aliquo alio casu analogum stet secundum exigentiam membri dividentis ipsum divisione analogica ex dicendis in capitulo de nomine manifeste apparebit secunda regula:</text:p>
      <text:list text:style-name="L55">
        <text:list-item>
          <text:p text:style-name="P1010">Omne analogum per se sumptum stat pro famosiori et principaliori significato.</text:p>
        </text:list-item>
      </text:list>
      <text:p text:style-name="P810">Utputa mediante conceptu mediante quo significat famosius et principalius significatum. <text:span text:style-name="T833">E</text:span>t dicetur analogum sumi per se quando non capitur aliquo modorum tactorum in prima regula.</text:p>
      <text:p text:style-name="P811"><text:span text:style-name="T832">Omnium istorum no</text:span><text:span text:style-name="T833">n est alia causa quam modus concipiendi, ex quibus patet quod iste duae sunt concedendae “Omnis homo est verus” et “Omis homo est pictus”.</text:span></text:p>
      <text:p text:style-name="P816">Patet secundo quod terminus aequivocus non est unus terminus secundum illas significationes secundum quas est aequivocus, sed an dicatur plures termini secundum illas, haec difficultates magis esset ad nomen quod ad rem.</text:p>
      <text:p text:style-name="P816">Et si contra dicta arguas ex ipsis, videtur sequi quod ad hoc quod aliqui termini sint aequivoci secundum significationes proprias requiritur et sufficit quod significent secundum illas diversis modis totalibus non synonymis.</text:p>
      <text:p text:style-name="P812"><text:span text:style-name="T833">Sed hoc est falsum, igitur quod sequatur patet, definiendo proportionabiliter illum terminum ‘terminus aequivocus’ in plurali, sicut definiebatur in singulari falsitas. Tamen consequentis probatur, quia tunc sequeretur quod si ly ‘Sortes proprie praecise’ significet Sortem, et ly ‘Plato proprie praecise’ significet Platonem. </text:span><text:span text:style-name="T834">T</text:span><text:span text:style-name="T833">unc illi termini </text:span><text:span text:style-name="T834">essent aequivoci secundum significationes proprias et ex consequenti aliqui essent aequivoci secundum significationes proprias quorum nullus est aequivocus secundum propriam.</text:span></text:p>
      <text:p text:style-name="P814">Hoc argumentum petit difficultatem: An ille terminus proportionabiliter debeat definiri in plurali sicut in singulari, et si non, qualiter debeat definiri. Sed quia haec difficultas frequenter tangetur in aliis partibus logice, et eius solutio apparebit ex his quae dicentur illic, pro nunc eius solutionem relinquo.</text:p>
      <text:p text:style-name="P813">Occurrit tamen difficultas circa istos terminos: ‘univocatum’, ‘aequivocatum’, ‘aequivocatum a casu’, ‘aequivocatum a consilio’. Sed pro his dicam resolutorie id quod mihi videbitur esse dicendum. Unde dico quod ly ‘univocatum’ sic debe definiri:</text:p>
      <text:list text:style-name="L56">
        <text:list-item>
          <text:p text:style-name="P1011">Univocatum: est quod significatur per tertium univocum.</text:p>
        </text:list-item>
        <text:list-item>
          <text:p text:style-name="P1012">Aequivocatum: est quod significatur per aliquem terminum aequivocum secundum unam illarum significationum secundum quas ille terminus est aequivocus.</text:p>
          <text:p text:style-name="P1012">Et ly ‘aequivocatum a casu’ sic: </text:p>
        </text:list-item>
        <text:list-item>
          <text:p text:style-name="P1012">Aequivocatum a casu: est quod significatur per terminum aequivocum a casu secundum unam illarum significationum secundum quas est aequivocum a casu.</text:p>
        </text:list-item>
        <text:list-item>
          <text:p text:style-name="P1013"><text:span text:style-name="T835">Et proportionabiliter debet definiri ly ‘aequivocatum a consilio’, nec inconvenit </text:span><text:span text:style-name="T836">quod idem sit univocatum et aequivocatum respectu eiusdem significationis.</text:span></text:p>
        </text:list-item>
      </text:list>
      <text:p text:style-name="P815"><text:soft-page-break/>Si quis tamen vellet definire istos terminos vel aliquos istorum aliter, ita quod ad hoc quod aliquid sit aequivocatum, requiretur et sufficeret quod aequivoce significetur per aliquem terminum, et ad hoc quod aliquis sit aequivocatum a casu, quod aequivoce a casu significetur per aliquem terminum. Et proportionabiliter de aequivocato a consilio facile posset seipsum defendere, quia non esest disceptatio nisi ad nomen.</text:p>
      <text:p text:style-name="P815">Tamen illo modo dicendo, oporteret concedere quod aliquis terminus est aequivocus secundum significationes categorematicas utroque modo, et nullum est aequivocatum respectu illius termini. Et actualiter sunt illa supposita quae significat secundum illas significationes et proportionabilia /65b/ concederentur de aequivoco a casu et de aequivoco a consilio.</text:p>
      <text:h text:style-name="Heading_20_3" text:outline-level="3">Sequitur alia divisio termini. Unde terminorum alius est transcendens et alius non transcendens</text:h>
      <text:p text:style-name="P817">Divisum huius divisionis potest esse ly ‘terminus in toto suo ambitu’.</text:p>
      <text:p text:style-name="P817">Terminus transcendes est duplex: quidam in significando, et quidam in significando et supponendo simul.</text:p>
      <text:list text:style-name="L57">
        <text:list-item>
          <text:p text:style-name="P1014"><text:span text:style-name="T837">Terminus transcendens in significando est terminus significans omnia entia mundi de significatione totali, sive in ordine ad qua</text:span><text:span text:style-name="T838">m</text:span><text:span text:style-name="T837">libet copulam possit supponere pro pluribus sive non, et isto modo ly ‘Chimaera’ est transcendes.</text:span></text:p>
        </text:list-item>
        <text:list-item>
          <text:p text:style-name="P1015">Terminus transcendes in significando et supponendo simul, est terminus mediante uno conceptu significas omnia entia mundi, taliter quod non stat aliquem terminum non habentem amplum modum significandi supponere pro aliquo supposito in ordine ad aliquam copulam vel differentiam temporis quin ille, secundum illam significationem, supponat pro eodem in ordine ad talem copulam vel differentiam temporis in potentia propinqua, servatis consimilibus proprietatibus logicalibus.</text:p>
          <text:p text:style-name="P1015">Exemplum patet de omnibus his terminis: ‘ens’, ‘res’, ‘aliquid’, ‘unum’, ‘verum’, ‘bonum’, et non obstante, divisione tacta de termino transcendenti, cum communiter sit mentio de termino transcendenti, proceditur ut in pluribus de transcendenti secundo modo, nisi limitetur locutio.</text:p>
        </text:list-item>
      </text:list>
      <text:p text:style-name="P818">Hic tamen adverte, quod si teneatur quod <text:span text:style-name="T839">ly ‘ens’ analogice dicatur de substantia et accidente, primo de substantia et secundario de accidente, et ita dicatur de aliis terminis de quibus exemplificabatur statim, et hoc non obstante dicantur transcendentes in significando </text:span><text:span text:style-name="T840">e</text:span><text:span text:style-name="T839">t supponendo tunc definitio data non est sufficiens, sed oportebit illi addere “</text:span><text:span text:style-name="T840">H</text:span><text:span text:style-name="T839">oc totum vel est terminus mediante uno conceptu significans omnes substantias”. </text:span><text:span text:style-name="T840">E</text:span><text:span text:style-name="T839">t mediante alio secundario omnia accidentia, taliter quod disiunctum ex talibus duobus conceptibus se habet, sicut tangitur in illa definitione quae primo dabatur, et ponetur illud quod tangebatur in prima definitione propter aliqua transcendentia complexa cuius modi sunt aliqua disiuncta, quae mediante uno conceptu significant omnes substantias et omnia accidentia, et addetur ista secunda particula “</text:span><text:span text:style-name="T841">P</text:span><text:span text:style-name="T839">ropter illos terminos de quibus statim exemplificabatur, qualitercumque dicatur de his modis” facile est loqui consequenter.</text:span></text:p>
      <text:p text:style-name="P819">Et ex hoc apparet quo modo debeat definiri ly ‘terminus non transcendens’ unde est terminus qui non significat et caetera, sicut in definitione termini transcendes.</text:p>
      <text:h text:style-name="Heading_20_3" text:outline-level="3"><text:soft-page-break/>Sequitur alia divisio termini, unde terminorum quidam est terminus infinitus et alius finitus</text:h>
      <text:p text:style-name="P849">Sequitur alia divisio termini, unde terminorum quidam est terminus infinitus et alius finitus. Divisum huius divisionis erit ly ‘terminus in toto suo ambitu’ si teneatur quod terminus syncategorematicus significatione, est terminus finitus. Sin autem erit ly ‘terminus categorematicus significatione’.</text:p>
      <text:list text:style-name="L58">
        <text:list-item>
          <text:p text:style-name="P1016">Terminus infinitus est terminus significans mediante termino mentali ultimato adaequate composito ex aliquo termino tamquam ex una parte principali et ex negatione infinitantem illum tamquam ex alia.</text:p>
        </text:list-item>
        <text:list-item>
          <text:p text:style-name="P1017">Terminus autem finitus est terminus non significans mediante aliquo termino mentali ultimato et caetera.</text:p>
        </text:list-item>
      </text:list>
      <text:p text:style-name="P850">Sicut in praedicta definitione, exemplum primum patet de ly ‘non-homo’, exemplum secundi patet de ly ‘homo’.</text:p>
      <text:p text:style-name="P851">Ex quibus definitionibus patet quod non inconvenit quod aliquis terminus sit finitus et infinitus copulative, et hoc continget secundum diversas significationes.</text:p>
      <text:p text:style-name="P851">Pro clariore intellectione istorum, est advertendum quod duplex est negatio, scilicet ‘negans’ et ‘infinitans’, et multipliciter differunt istae negationes. Primo quia vis negationis infinitantis potest supra aliquem terminum cadere, non cadendo supra copulam. Sed de negatione negante non sic contingit.</text:p>
      <text:p text:style-name="P852">Item negatio infinitans semper constituit unum terminum cum termino quem infinitat, sed negatio negans non semper constituit unum terminum cum termino quem negat.</text:p>
      <text:p text:style-name="P852">Item vis negationis infinitantis solum fertur supra terminum quem infinitat, sed vis negationis negantis non solum fertur supra terminum quem negat.</text:p>
      <text:p text:style-name="Quotations"><text:span text:style-name="T842">Negatio ergo negans sic potest definiri: e</text:span>st negatio cuius vis apta nate est cadere supra copulam propositionalem, negando ipsam.</text:p>
      <text:p text:style-name="Quotations">Negatio infinitans: est negatio cuius vis non apta nata est cadere supra copulam propositionalem negando ipsam.</text:p>
      <text:p text:style-name="P820"><text:span text:style-name="T842">Et ex his potest apparere qui termini sint contradictorii. Unde termini contradictorii /</text:span><text:span text:style-name="T843">66a</text:span><text:span text:style-name="T842">/ </text:span><text:span text:style-name="T843">sunt duo termini categorematici, quorum unus significat mediante uno conceptu et alius significat mediante termino mentali ultimato adaequate composito ex illo conceptu vel sibi synonymo et negatione infinitante ipsum. Circa quam materiam solent poni duae regulae, sed alibi tangentur et disputabitur de illis.</text:span></text:p>
      <text:h text:style-name="Heading_20_3" text:outline-level="3">Sequitur alia divisio termini, unde terminorum alii sunt pertinentes, alii impertinentes</text:h>
      <text:p text:style-name="P853">Divisum huius divisionis est ly ‘duo termini categorematici significatione’.</text:p>
      <text:p text:style-name="Quotations"><text:span text:style-name="T844">Termini impertinentes sunt duo termini, sic se habentes, quod nullius recti alicuius illorum affirmatio infert affirmationem vel negationem recti alterius, respectu </text:span><text:soft-page-break/><text:span text:style-name="T844">cuiuscumque copulae </text:span><text:span text:style-name="T845">e</text:span><text:span text:style-name="T844">t suppositi. </text:span><text:span text:style-name="T845">N</text:span><text:span text:style-name="T844">ec alicuius recti alicuius illorum negatio infert affirmationem vel negationem recti alterius illorum respectu cuiuscumque copulae </text:span><text:span text:style-name="T845">et suppositi. Et quantumcumque prima pars principalis huius definitionis converteretur cum tota definitione.</text:span></text:p>
      <text:p text:style-name="P863">Tamen secunda non nec ex illo haberetur definitionem illam esse insufficientem, quia ponitur ultima particula ad maiorem explicationem. Ita definitio assignata est modo tacto ut termini obliqui impertinentes comprehendantur et pertinentes ab ipsa secludantur.</text:p>
      <text:p text:style-name="P854">Dicitur respectu cuiuscumque copulae et suppositi, quia alias ly ‘homo’ et ly ‘album’ non essent termini impertinentes, quia respectu alicuius copulae affirmatio unius illorum infert affirmationem alterius respectu cuiuscumque suppositi, et respectu alicuius suppositi affirmatio unius infert affirmationem alterius respectu cuiuscumque copulae.</text:p>
      <text:p text:style-name="Quotations">Termini pertinentes sunt duo termini se habentes quod affirmatio recti unius illorum respectu cuiuscumque copulae et suppositi infert negationem vel affirmationem recti alterius illorum, vel negatio recti unius illorum respectu cuiuscumque copulae illorum. Et suppositi infert affirmationem vel negationem recti alterius.</text:p>
      <text:p text:style-name="P855">Ex his possunt inferri multa correlaria. Primum quod si ‘a’ sit pertinentes ‘b’, ‘a’ et ‘b’ sunt pertinentes, et si impertinens impertinentes, unde idem requiritur et sufficit ad hoc quod aliquis terminus sit pertinens alicui ad hoc quod illi sint pertinentes, et idem ad hoc quod aliquid sit impertinens alicui et ad hoc quod illi sint impertinentes.</text:p>
      <text:p text:style-name="P855">Si tamen quis vellet oppositum dicere difficultas esset ad nomen.</text:p>
      <text:p text:style-name="P855">Patet secundo quod licet isti termini quod est ‘album’ et album sint pertinentes, tamen isti termini quod est ‘non-album’ et non-album non sunt pertinentes sed impertinentes.</text:p>
      <text:p text:style-name="P855">Patet tertio quod ly ‘non-intelligibile’ cuilibet termino est pertinens, et ly ‘Chimaera’ est pertinens huic termino ‘homo’, non tamen huic termino ‘non-album’. Si tamen diceretur quod ad terminos <text:span text:style-name="T846">pertinentes requiritur quod non sint disparati, difficultas erit ad nomen, et facile erit in ipsis loqui consequenter, aliter tamen oporteret dare definitiones, stando tamen in definitionibus datis quas insequimur, oportet concedere ea quae tacta sunt.</text:span></text:p>
      <text:p text:style-name="P856">Patet ultra quod aliqui termini sunt pertinentes uni tertio, sic quod quilibet illorum est illi pertinens, et tamen illi sunt impertinentes. Patet de his duobus ‘animal album’, ‘animal currens’ respectu de ly ‘animal’.</text:p>
      <text:p text:style-name="P856">Esset tamen an tres vel quattuor termini possit dici pertinentes inter se vel impertine<text:span text:style-name="T847">n</text:span>tes. <text:span text:style-name="T847">Ad hoc potest dici quod sic, sed quia non habemus certum modum loquendi in his quamtum ad illud quod requiretur et sufficeret ad hoc, ut plures quam duo essent impertinentes inter se oportet convenire quantum ad illud, et tunc facile erit loqui consequenter. Propterea nolo amplius in hoc immorari.</text:span></text:p>
      <text:p text:style-name="P857">Duplices sunt termini pertinentes, scilicet disparati et non-disparati:</text:p>
      <text:p text:style-name="Quotations">Termini disparati sunt termini sic se habentes quod affirmatio recti unius infert <text:span text:style-name="T851">affirmationem</text:span> recti alterius respectu cuiuscumque copulae et suppositi.</text:p>
      <text:p text:style-name="P858">Ex quod patet quod is<text:span text:style-name="T848">ti termini ‘homo’, ‘asinus’ non sunt termini disparati.</text:span></text:p>
      <text:p text:style-name="P859"><text:soft-page-break/><text:span text:style-name="T848">Si tamen in omnibus his definitionibus, ubi dicitur respectu cuiuscumque copulae, procederetur solum de copula non de imaginario, aliter esset dicendum quod ad hoc immo illi termini essent disparati, et ly ‘Chimaera’ cuilibet termino esset pertinens et disparatus.</text:span></text:p>
      <text:p text:style-name="P864">Patet ultra quod aliqui termini synonymi sunt disparati, patet de his ‘non-intelligibile’, ‘non-intelligibile’.</text:p>
      <text:p text:style-name="Quotations"><text:span text:style-name="T848">Termini pertinentes non-disparati sunt termini pertinentes non sic se habentes sicut in </text:span><text:span text:style-name="T849">praedicta</text:span><text:span text:style-name="T848"> definitione.</text:span></text:p>
      <text:p text:style-name="P860"><text:span text:style-name="T849">Et isti sunt duplices, scilicet /66b/ convertibiles </text:span><text:span text:style-name="T850">et habentes se sicut superius et inferius.</text:span></text:p>
      <text:p text:style-name="P865">Et iterum convertibilium alii sunt synonymi alii non synonymi.</text:p>
      <text:p text:style-name="Quotations"><text:span text:style-name="T850">Termini pertinentes non-disparati, habentes se tamquam superius et inferius, sunt termini pertinentes non-disparati sic se habentes quod affirmatio unius, respectu cuiuscumque copulae et suppositi, i</text:span><text:span text:style-name="T851">nfert </text:span><text:span text:style-name="T852">affirmationem</text:span><text:span text:style-name="T851"> alterius </text:span><text:span text:style-name="T852">et non ediverso,</text:span><text:span text:style-name="T849"> </text:span><text:span text:style-name="T852">sed negatio alterius respectu cuiuscumque copulae et suppositi infert negationem alterius.</text:span></text:p>
      <text:p text:style-name="Quotations">Termini pertinentes non-disparati convertibiles sunt termini pertinentes non-disparati sic se habentes quod cuiuslibet illorum affirmatio respectu cuiuscumque copulae et suppositi infert affirmationem alterius, et cuiuslibet illorum negatio respectu cuiuscumque copulae et suppositi infert negationem alterius.</text:p>
      <text:p text:style-name="Quotations"><text:span text:style-name="T848"><text:s/></text:span><text:span text:style-name="T853">Termini synonymi non-disparati sunt termini non-disparati qui significant de significatione totali mediante eodem termino mentali ultimato secundum eandem eius significationem.</text:span></text:p>
      <text:p text:style-name="P861">Sed ly ‘termini synonymi in toto suo ambitu’ prout comprehendit tam termino<text:span text:style-name="T854">s</text:span> synonymos non-disparatos quam terminos synonymos disparatos, debet definiri sicut statim seclusa illa particula “non-disparati”.</text:p>
      <text:p text:style-name="P862">Aliqui dicunt quod ad synonymitatem in voce requiritur diversitas vocum et ita de scriptura, propterea isti duo termini ‘homo’, ‘homo’ in voce non erunt synonymi nec in scripto sed identici. Hoc tamen ad nomen consistit.</text:p>
      <text:p text:style-name="Quotations">Termini non-disparati convertibiles et non-synonymi sunt termini non disparati convertibiles qui non significant et caetera.</text:p>
      <text:p text:style-name="P862">Sicut in praecedenti definitione.</text:p>
      <text:p text:style-name="P862">Si vis tamen definire ly ‘termini convertibiles non-synonymi in toto suo ambito’ prout comprehendit omnes convertibiles non-synonymos tam disparatos quam non disparatos, deme a praecedenti definitone ly ‘non-disparati’ <text:span text:style-name="T855">et totum residuum erit definitio illius termini. Sic capti exemplum patet de ly ‘homo’ et de ly ‘animal rationale’.</text:span></text:p>
      <text:h text:style-name="P867" text:outline-level="1">Tractatus summularum Petri Hispani</text:h>
      <text:p text:style-name="Subtitle"><text:span text:style-name="T264">Sequitur primus tractatus summularum Petri Hispani</text:span> </text:p>
      <text:h text:style-name="Heading_20_2" text:outline-level="2">Capitulum de nomine</text:h>
      <text:p text:style-name="P217"/>
      <text:p text:style-name="P214"><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la" fo:country="V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in" style:writing-mode="lr-tb"/>
      <style:text-properties style:use-window-font-color="true" loext:opacity="0%" style:font-name="Liberation Serif" fo:font-size="12pt" fo:language="la" fo:country="V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Original" style:family="paragraph" style:parent-style-name="Text_20_body">
      <style:paragraph-properties style:writing-mode="lr-tb"/>
      <style:text-properties fo:font-size="16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22:17:06.019193893</meta:creation-date>
    <meta:generator>LibreOffice/24.2.7.2$Linux_X86_64 LibreOffice_project/420$Build-2</meta:generator>
    <dc:date>2026-03-25T21:06:32.662702766</dc:date>
    <meta:editing-duration>P8DT10H35M45S</meta:editing-duration>
    <meta:editing-cycles>3399</meta:editing-cycles>
    <meta:document-statistic meta:table-count="0" meta:image-count="0" meta:object-count="0" meta:page-count="161" meta:paragraph-count="1700" meta:word-count="67542" meta:character-count="473026" meta:non-whitespace-character-count="407181"/>
  </office:meta>
</office:document-meta>
</file>