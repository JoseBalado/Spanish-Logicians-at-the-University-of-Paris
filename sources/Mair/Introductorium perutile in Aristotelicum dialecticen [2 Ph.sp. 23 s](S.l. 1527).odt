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2973fcc" officeooo:paragraph-rsid="02973fcc"/>
    </style:style>
    <style:style style:name="P2" style:family="paragraph" style:parent-style-name="Text_20_body">
      <style:text-properties officeooo:rsid="02988b9c" officeooo:paragraph-rsid="02988b9c"/>
    </style:style>
    <style:style style:name="P3" style:family="paragraph" style:parent-style-name="Text_20_body">
      <style:text-properties officeooo:rsid="029df6bf" officeooo:paragraph-rsid="029df6bf"/>
    </style:style>
    <style:style style:name="P4" style:family="paragraph" style:parent-style-name="Text_20_body">
      <style:text-properties officeooo:rsid="029f7162" officeooo:paragraph-rsid="029f7162"/>
    </style:style>
    <style:style style:name="P5" style:family="paragraph" style:parent-style-name="Text_20_body">
      <style:text-properties officeooo:rsid="02a71d51" officeooo:paragraph-rsid="04317162"/>
    </style:style>
    <style:style style:name="P6" style:family="paragraph" style:parent-style-name="Text_20_body">
      <style:text-properties officeooo:rsid="02a8f0d1" officeooo:paragraph-rsid="02a8f0d1"/>
    </style:style>
    <style:style style:name="P7" style:family="paragraph" style:parent-style-name="Text_20_body">
      <style:text-properties officeooo:rsid="02a8f0d1" officeooo:paragraph-rsid="042ac4ec"/>
    </style:style>
    <style:style style:name="P8" style:family="paragraph" style:parent-style-name="Text_20_body">
      <style:text-properties officeooo:rsid="02a94994" officeooo:paragraph-rsid="02a94994"/>
    </style:style>
    <style:style style:name="P9" style:family="paragraph" style:parent-style-name="Text_20_body">
      <style:text-properties officeooo:rsid="02a94994" officeooo:paragraph-rsid="0429ee38"/>
    </style:style>
    <style:style style:name="P10" style:family="paragraph" style:parent-style-name="Text_20_body">
      <style:text-properties officeooo:rsid="02ab01fc" officeooo:paragraph-rsid="02ab01fc"/>
    </style:style>
    <style:style style:name="P11" style:family="paragraph" style:parent-style-name="Text_20_body">
      <style:text-properties officeooo:rsid="02ab01fc" officeooo:paragraph-rsid="0427b604"/>
    </style:style>
    <style:style style:name="P12" style:family="paragraph" style:parent-style-name="Text_20_body">
      <style:text-properties officeooo:rsid="02acfe54" officeooo:paragraph-rsid="02acfe54"/>
    </style:style>
    <style:style style:name="P13" style:family="paragraph" style:parent-style-name="Text_20_body">
      <style:text-properties officeooo:rsid="02acfe54" officeooo:paragraph-rsid="041f1352"/>
    </style:style>
    <style:style style:name="P14" style:family="paragraph" style:parent-style-name="Text_20_body">
      <style:text-properties officeooo:rsid="02ad1a0a" officeooo:paragraph-rsid="02ad1a0a"/>
    </style:style>
    <style:style style:name="P15" style:family="paragraph" style:parent-style-name="Text_20_body">
      <style:text-properties officeooo:rsid="02ad1a0a" officeooo:paragraph-rsid="041e8a79"/>
    </style:style>
    <style:style style:name="P16" style:family="paragraph" style:parent-style-name="Text_20_body">
      <style:text-properties officeooo:rsid="02ae253c" officeooo:paragraph-rsid="02ae253c"/>
    </style:style>
    <style:style style:name="P17" style:family="paragraph" style:parent-style-name="Text_20_body">
      <style:text-properties officeooo:rsid="02b35b31" officeooo:paragraph-rsid="02b35b31"/>
    </style:style>
    <style:style style:name="P18" style:family="paragraph" style:parent-style-name="Text_20_body">
      <style:text-properties officeooo:rsid="02b68f06" officeooo:paragraph-rsid="02b68f06"/>
    </style:style>
    <style:style style:name="P19" style:family="paragraph" style:parent-style-name="Text_20_body">
      <style:text-properties officeooo:rsid="02b7668f" officeooo:paragraph-rsid="02b7668f"/>
    </style:style>
    <style:style style:name="P20" style:family="paragraph" style:parent-style-name="Text_20_body">
      <style:text-properties officeooo:rsid="02b7668f" officeooo:paragraph-rsid="04d981f2"/>
    </style:style>
    <style:style style:name="P21" style:family="paragraph" style:parent-style-name="Text_20_body">
      <style:text-properties officeooo:rsid="02b838d2" officeooo:paragraph-rsid="02b838d2"/>
    </style:style>
    <style:style style:name="P22" style:family="paragraph" style:parent-style-name="Text_20_body">
      <style:text-properties officeooo:rsid="02b9c6ab" officeooo:paragraph-rsid="02b9c6ab"/>
    </style:style>
    <style:style style:name="P23" style:family="paragraph" style:parent-style-name="Text_20_body">
      <style:text-properties officeooo:rsid="02bb7564" officeooo:paragraph-rsid="04059374"/>
    </style:style>
    <style:style style:name="P24" style:family="paragraph" style:parent-style-name="Text_20_body">
      <style:text-properties officeooo:rsid="02bd1121" officeooo:paragraph-rsid="040539ff"/>
    </style:style>
    <style:style style:name="P25" style:family="paragraph" style:parent-style-name="Text_20_body">
      <style:text-properties officeooo:rsid="02c0acae" officeooo:paragraph-rsid="02c0acae"/>
    </style:style>
    <style:style style:name="P26" style:family="paragraph" style:parent-style-name="Text_20_body">
      <style:text-properties officeooo:rsid="02c0acae" officeooo:paragraph-rsid="0402ba14"/>
    </style:style>
    <style:style style:name="P27" style:family="paragraph" style:parent-style-name="Text_20_body">
      <style:text-properties officeooo:rsid="02c247e6" officeooo:paragraph-rsid="02c247e6"/>
    </style:style>
    <style:style style:name="P28" style:family="paragraph" style:parent-style-name="Text_20_body">
      <style:text-properties officeooo:rsid="02c247e6" officeooo:paragraph-rsid="04eecd18"/>
    </style:style>
    <style:style style:name="P29" style:family="paragraph" style:parent-style-name="Text_20_body">
      <style:text-properties officeooo:rsid="02ccf2e8" officeooo:paragraph-rsid="03f9b389"/>
    </style:style>
    <style:style style:name="P30" style:family="paragraph" style:parent-style-name="Text_20_body">
      <style:text-properties officeooo:rsid="02d0529a" officeooo:paragraph-rsid="02d0529a"/>
    </style:style>
    <style:style style:name="P31" style:family="paragraph" style:parent-style-name="Text_20_body">
      <style:paragraph-properties fo:text-align="start" style:justify-single-word="false"/>
      <style:text-properties officeooo:rsid="02d74475" officeooo:paragraph-rsid="03f63824"/>
    </style:style>
    <style:style style:name="P32" style:family="paragraph" style:parent-style-name="Text_20_body">
      <style:text-properties officeooo:rsid="02d74475" officeooo:paragraph-rsid="02d74475"/>
    </style:style>
    <style:style style:name="P33" style:family="paragraph" style:parent-style-name="Text_20_body">
      <style:text-properties officeooo:rsid="02d8f5c4" officeooo:paragraph-rsid="03f3df0c"/>
    </style:style>
    <style:style style:name="P34" style:family="paragraph" style:parent-style-name="Text_20_body">
      <style:text-properties officeooo:rsid="02daa49c" officeooo:paragraph-rsid="02daa49c"/>
    </style:style>
    <style:style style:name="P35" style:family="paragraph" style:parent-style-name="Text_20_body">
      <style:text-properties officeooo:rsid="02daa49c" officeooo:paragraph-rsid="0512d994"/>
    </style:style>
    <style:style style:name="P36" style:family="paragraph" style:parent-style-name="Text_20_body">
      <style:text-properties officeooo:rsid="02dbf3f5" officeooo:paragraph-rsid="02dbf3f5"/>
    </style:style>
    <style:style style:name="P37" style:family="paragraph" style:parent-style-name="Text_20_body">
      <style:paragraph-properties fo:text-align="start" style:justify-single-word="false"/>
      <style:text-properties officeooo:rsid="02dbf3f5" officeooo:paragraph-rsid="051491d0"/>
    </style:style>
    <style:style style:name="P38" style:family="paragraph" style:parent-style-name="Text_20_body">
      <style:text-properties officeooo:rsid="02e4fe8c" officeooo:paragraph-rsid="02e4fe8c"/>
    </style:style>
    <style:style style:name="P39" style:family="paragraph" style:parent-style-name="Text_20_body">
      <style:text-properties officeooo:rsid="02e9cb7d" officeooo:paragraph-rsid="02e9cb7d"/>
    </style:style>
    <style:style style:name="P40" style:family="paragraph" style:parent-style-name="Text_20_body">
      <style:text-properties officeooo:rsid="02e9f74a" officeooo:paragraph-rsid="02e9f74a"/>
    </style:style>
    <style:style style:name="P41" style:family="paragraph" style:parent-style-name="Text_20_body">
      <style:text-properties officeooo:rsid="02f82c16" officeooo:paragraph-rsid="02f82c16"/>
    </style:style>
    <style:style style:name="P42" style:family="paragraph" style:parent-style-name="Text_20_body">
      <style:paragraph-properties fo:text-align="start" style:justify-single-word="false"/>
      <style:text-properties officeooo:rsid="02f82c16" officeooo:paragraph-rsid="03a05a45"/>
    </style:style>
    <style:style style:name="P43" style:family="paragraph" style:parent-style-name="Text_20_body">
      <style:text-properties officeooo:rsid="02f96c04" officeooo:paragraph-rsid="02f96c04"/>
    </style:style>
    <style:style style:name="P44" style:family="paragraph" style:parent-style-name="Text_20_body">
      <style:paragraph-properties fo:text-align="start" style:justify-single-word="false"/>
      <style:text-properties officeooo:rsid="02f96c04" officeooo:paragraph-rsid="05612a24"/>
    </style:style>
    <style:style style:name="P45" style:family="paragraph" style:parent-style-name="Text_20_body">
      <style:text-properties officeooo:rsid="02fb06e3" officeooo:paragraph-rsid="02fb06e3"/>
    </style:style>
    <style:style style:name="P46" style:family="paragraph" style:parent-style-name="Text_20_body">
      <style:text-properties officeooo:rsid="02fb06e3" officeooo:paragraph-rsid="039efd46"/>
    </style:style>
    <style:style style:name="P47" style:family="paragraph" style:parent-style-name="Text_20_body">
      <style:text-properties officeooo:rsid="02fb6a5e" officeooo:paragraph-rsid="02fb6a5e"/>
    </style:style>
    <style:style style:name="P48" style:family="paragraph" style:parent-style-name="Text_20_body">
      <style:text-properties officeooo:rsid="02fb6a5e" officeooo:paragraph-rsid="05625600"/>
    </style:style>
    <style:style style:name="P49" style:family="paragraph" style:parent-style-name="Text_20_body">
      <style:text-properties officeooo:rsid="02fe51bf" officeooo:paragraph-rsid="02fe51bf"/>
    </style:style>
    <style:style style:name="P50" style:family="paragraph" style:parent-style-name="Text_20_body">
      <style:text-properties officeooo:rsid="02fe51bf" officeooo:paragraph-rsid="039c9f46"/>
    </style:style>
    <style:style style:name="P51" style:family="paragraph" style:parent-style-name="Text_20_body">
      <style:text-properties officeooo:rsid="0301fe9b" officeooo:paragraph-rsid="0301fe9b"/>
    </style:style>
    <style:style style:name="P52" style:family="paragraph" style:parent-style-name="Text_20_body">
      <style:text-properties officeooo:rsid="0301fe9b" officeooo:paragraph-rsid="0394d310"/>
    </style:style>
    <style:style style:name="P53" style:family="paragraph" style:parent-style-name="Text_20_body">
      <style:text-properties officeooo:rsid="0305a897" officeooo:paragraph-rsid="0305a897"/>
    </style:style>
    <style:style style:name="P54" style:family="paragraph" style:parent-style-name="Text_20_body">
      <style:text-properties officeooo:rsid="0350d63f" officeooo:paragraph-rsid="0350d63f"/>
    </style:style>
    <style:style style:name="P55" style:family="paragraph" style:parent-style-name="Text_20_body">
      <style:text-properties officeooo:rsid="0350d63f" officeooo:paragraph-rsid="03795e2b"/>
    </style:style>
    <style:style style:name="P56" style:family="paragraph" style:parent-style-name="Text_20_body">
      <style:text-properties officeooo:rsid="03550a94" officeooo:paragraph-rsid="03550a94"/>
    </style:style>
    <style:style style:name="P57" style:family="paragraph" style:parent-style-name="Text_20_body">
      <style:text-properties officeooo:rsid="03550a94" officeooo:paragraph-rsid="0370c395"/>
    </style:style>
    <style:style style:name="P58" style:family="paragraph" style:parent-style-name="Text_20_body">
      <style:text-properties officeooo:rsid="0355dd64" officeooo:paragraph-rsid="0355dd64"/>
    </style:style>
    <style:style style:name="P59" style:family="paragraph" style:parent-style-name="Text_20_body">
      <style:text-properties officeooo:rsid="0355dd64" officeooo:paragraph-rsid="03706b4d"/>
    </style:style>
    <style:style style:name="P60" style:family="paragraph" style:parent-style-name="Text_20_body">
      <style:text-properties officeooo:rsid="035606d5" officeooo:paragraph-rsid="035606d5"/>
    </style:style>
    <style:style style:name="P61" style:family="paragraph" style:parent-style-name="Text_20_body">
      <style:text-properties officeooo:rsid="035606d5" officeooo:paragraph-rsid="03706b4d"/>
    </style:style>
    <style:style style:name="P62" style:family="paragraph" style:parent-style-name="Text_20_body">
      <style:text-properties officeooo:rsid="035a3542" officeooo:paragraph-rsid="035a3542"/>
    </style:style>
    <style:style style:name="P63" style:family="paragraph" style:parent-style-name="Text_20_body">
      <style:text-properties officeooo:rsid="035a3542" officeooo:paragraph-rsid="036ec755"/>
    </style:style>
    <style:style style:name="P64" style:family="paragraph" style:parent-style-name="Text_20_body">
      <style:text-properties officeooo:rsid="035ba71a" officeooo:paragraph-rsid="035ba71a"/>
    </style:style>
    <style:style style:name="P65" style:family="paragraph" style:parent-style-name="Text_20_body">
      <style:text-properties officeooo:rsid="035ba71a" officeooo:paragraph-rsid="036ec755"/>
    </style:style>
    <style:style style:name="P66" style:family="paragraph" style:parent-style-name="Text_20_body">
      <style:text-properties officeooo:rsid="035faf6f" officeooo:paragraph-rsid="035faf6f"/>
    </style:style>
    <style:style style:name="P67" style:family="paragraph" style:parent-style-name="Text_20_body">
      <style:text-properties officeooo:rsid="035faf6f" officeooo:paragraph-rsid="036dad12"/>
    </style:style>
    <style:style style:name="P68" style:family="paragraph" style:parent-style-name="Text_20_body">
      <style:text-properties officeooo:rsid="03618c3c" officeooo:paragraph-rsid="03618c3c"/>
    </style:style>
    <style:style style:name="P69" style:family="paragraph" style:parent-style-name="Text_20_body">
      <style:text-properties officeooo:rsid="03618c3c" officeooo:paragraph-rsid="04aa428b"/>
    </style:style>
    <style:style style:name="P70" style:family="paragraph" style:parent-style-name="Text_20_body">
      <style:text-properties officeooo:rsid="03664a91" officeooo:paragraph-rsid="03664a91"/>
    </style:style>
    <style:style style:name="P71" style:family="paragraph" style:parent-style-name="Text_20_body">
      <style:text-properties officeooo:rsid="03664a91" officeooo:paragraph-rsid="04aa428b"/>
    </style:style>
    <style:style style:name="P72" style:family="paragraph" style:parent-style-name="Text_20_body">
      <style:text-properties officeooo:rsid="0369000e" officeooo:paragraph-rsid="0369000e"/>
    </style:style>
    <style:style style:name="P73" style:family="paragraph" style:parent-style-name="Text_20_body">
      <style:text-properties officeooo:rsid="0369000e" officeooo:paragraph-rsid="04aa428b"/>
    </style:style>
    <style:style style:name="P74" style:family="paragraph" style:parent-style-name="Text_20_body">
      <style:text-properties officeooo:rsid="035cb53e" officeooo:paragraph-rsid="036dad12"/>
    </style:style>
    <style:style style:name="P75" style:family="paragraph" style:parent-style-name="Text_20_body">
      <style:text-properties officeooo:rsid="035df40f" officeooo:paragraph-rsid="036dad12"/>
    </style:style>
    <style:style style:name="P76" style:family="paragraph" style:parent-style-name="Text_20_body">
      <style:text-properties officeooo:rsid="035ef0e7" officeooo:paragraph-rsid="036dad12"/>
    </style:style>
    <style:style style:name="P77" style:family="paragraph" style:parent-style-name="Text_20_body">
      <style:text-properties officeooo:rsid="0352c6a6" officeooo:paragraph-rsid="0352c6a6"/>
    </style:style>
    <style:style style:name="P78" style:family="paragraph" style:parent-style-name="Text_20_body">
      <style:text-properties officeooo:rsid="0352c6a6" officeooo:paragraph-rsid="03716392"/>
    </style:style>
    <style:style style:name="P79" style:family="paragraph" style:parent-style-name="Text_20_body">
      <style:text-properties officeooo:rsid="0351f90e" officeooo:paragraph-rsid="037214e4"/>
    </style:style>
    <style:style style:name="P80" style:family="paragraph" style:parent-style-name="Text_20_body">
      <style:text-properties officeooo:rsid="0351b42a" officeooo:paragraph-rsid="0351b42a"/>
    </style:style>
    <style:style style:name="P81" style:family="paragraph" style:parent-style-name="Text_20_body">
      <style:text-properties officeooo:rsid="0351b42a" officeooo:paragraph-rsid="03752f08"/>
    </style:style>
    <style:style style:name="P82" style:family="paragraph" style:parent-style-name="Text_20_body">
      <style:text-properties officeooo:rsid="03764d38" officeooo:paragraph-rsid="03764d38"/>
    </style:style>
    <style:style style:name="P83" style:family="paragraph" style:parent-style-name="Text_20_body">
      <style:text-properties officeooo:rsid="034dc219" officeooo:paragraph-rsid="034dc219"/>
    </style:style>
    <style:style style:name="P84" style:family="paragraph" style:parent-style-name="Text_20_body">
      <style:text-properties officeooo:rsid="034dc219" officeooo:paragraph-rsid="037b1f84"/>
    </style:style>
    <style:style style:name="P85" style:family="paragraph" style:parent-style-name="Text_20_body">
      <style:text-properties officeooo:paragraph-rsid="037cc8bf"/>
    </style:style>
    <style:style style:name="P86" style:family="paragraph" style:parent-style-name="Text_20_body">
      <style:text-properties officeooo:rsid="037dc7b6" officeooo:paragraph-rsid="037dc7b6"/>
    </style:style>
    <style:style style:name="P87" style:family="paragraph" style:parent-style-name="Text_20_body">
      <style:text-properties officeooo:paragraph-rsid="037e9346"/>
    </style:style>
    <style:style style:name="P88" style:family="paragraph" style:parent-style-name="Text_20_body">
      <style:text-properties officeooo:rsid="037ff211" officeooo:paragraph-rsid="037ff211"/>
    </style:style>
    <style:style style:name="P89" style:family="paragraph" style:parent-style-name="Text_20_body">
      <style:text-properties officeooo:paragraph-rsid="037ff211"/>
    </style:style>
    <style:style style:name="P90" style:family="paragraph" style:parent-style-name="Text_20_body">
      <style:text-properties officeooo:rsid="0386e2d5" officeooo:paragraph-rsid="0386e2d5"/>
    </style:style>
    <style:style style:name="P91" style:family="paragraph" style:parent-style-name="Text_20_body">
      <style:text-properties officeooo:paragraph-rsid="030700f5"/>
    </style:style>
    <style:style style:name="P92" style:family="paragraph" style:parent-style-name="Text_20_body">
      <style:text-properties officeooo:paragraph-rsid="03919c03"/>
    </style:style>
    <style:style style:name="P93" style:family="paragraph" style:parent-style-name="Text_20_body">
      <style:text-properties officeooo:rsid="03937c3a" officeooo:paragraph-rsid="03937c3a"/>
    </style:style>
    <style:style style:name="P94" style:family="paragraph" style:parent-style-name="Text_20_body">
      <style:text-properties officeooo:rsid="030051d8" officeooo:paragraph-rsid="030051d8"/>
    </style:style>
    <style:style style:name="P95" style:family="paragraph" style:parent-style-name="Text_20_body">
      <style:text-properties officeooo:rsid="039bc0aa" officeooo:paragraph-rsid="039bc0aa"/>
    </style:style>
    <style:style style:name="P96" style:family="paragraph" style:parent-style-name="Text_20_body">
      <style:text-properties officeooo:rsid="030700f5" officeooo:paragraph-rsid="038f8238"/>
    </style:style>
    <style:style style:name="P97" style:family="paragraph" style:parent-style-name="Text_20_body">
      <style:text-properties officeooo:rsid="03635c10" officeooo:paragraph-rsid="03635c10"/>
    </style:style>
    <style:style style:name="P98" style:family="paragraph" style:parent-style-name="Text_20_body">
      <style:text-properties officeooo:rsid="03635c10" officeooo:paragraph-rsid="04aa428b"/>
    </style:style>
    <style:style style:name="P99" style:family="paragraph" style:parent-style-name="Text_20_body">
      <style:text-properties officeooo:paragraph-rsid="039c7e2f"/>
    </style:style>
    <style:style style:name="P100" style:family="paragraph" style:parent-style-name="Text_20_body">
      <style:text-properties officeooo:paragraph-rsid="02f7ae9c"/>
    </style:style>
    <style:style style:name="P101" style:family="paragraph" style:parent-style-name="Text_20_body">
      <style:text-properties officeooo:rsid="03add5bd" officeooo:paragraph-rsid="03add5bd"/>
    </style:style>
    <style:style style:name="P102" style:family="paragraph" style:parent-style-name="Text_20_body">
      <style:text-properties officeooo:paragraph-rsid="03aec759"/>
    </style:style>
    <style:style style:name="P103" style:family="paragraph" style:parent-style-name="Text_20_body">
      <style:text-properties officeooo:paragraph-rsid="03b97bb9"/>
    </style:style>
    <style:style style:name="P104" style:family="paragraph" style:parent-style-name="Text_20_body">
      <style:paragraph-properties fo:text-align="start" style:justify-single-word="false"/>
    </style:style>
    <style:style style:name="P105" style:family="paragraph" style:parent-style-name="Text_20_body">
      <style:paragraph-properties fo:text-align="start" style:justify-single-word="false"/>
      <style:text-properties officeooo:paragraph-rsid="03bb7524"/>
    </style:style>
    <style:style style:name="P106" style:family="paragraph" style:parent-style-name="Text_20_body">
      <style:paragraph-properties fo:text-align="start" style:justify-single-word="false"/>
      <style:text-properties officeooo:paragraph-rsid="03da6da6"/>
    </style:style>
    <style:style style:name="P107" style:family="paragraph" style:parent-style-name="Text_20_body">
      <style:paragraph-properties fo:text-align="start" style:justify-single-word="false"/>
      <style:text-properties officeooo:paragraph-rsid="053a04b2"/>
    </style:style>
    <style:style style:name="P108" style:family="paragraph" style:parent-style-name="Text_20_body">
      <style:paragraph-properties fo:text-align="start" style:justify-single-word="false"/>
      <style:text-properties officeooo:paragraph-rsid="06364b10"/>
    </style:style>
    <style:style style:name="P109" style:family="paragraph" style:parent-style-name="Text_20_body">
      <style:paragraph-properties fo:text-align="start" style:justify-single-word="false"/>
      <style:text-properties officeooo:paragraph-rsid="06db3317"/>
    </style:style>
    <style:style style:name="P110" style:family="paragraph" style:parent-style-name="Subtitle">
      <style:paragraph-properties fo:text-align="start" style:justify-single-word="false"/>
    </style:style>
    <style:style style:name="P111" style:family="paragraph" style:parent-style-name="Subtitle">
      <style:paragraph-properties fo:text-align="start" style:justify-single-word="false"/>
      <style:text-properties officeooo:paragraph-rsid="048433e4"/>
    </style:style>
    <style:style style:name="P112" style:family="paragraph" style:parent-style-name="Subtitle">
      <style:paragraph-properties fo:text-align="start" style:justify-single-word="false"/>
      <style:text-properties officeooo:paragraph-rsid="049b2acd"/>
    </style:style>
    <style:style style:name="P113" style:family="paragraph" style:parent-style-name="Subtitle">
      <style:paragraph-properties fo:text-align="start" style:justify-single-word="false"/>
      <style:text-properties officeooo:paragraph-rsid="049c1c24"/>
    </style:style>
    <style:style style:name="P114" style:family="paragraph" style:parent-style-name="Subtitle">
      <style:paragraph-properties fo:text-align="start" style:justify-single-word="false"/>
      <style:text-properties officeooo:paragraph-rsid="04c40df6"/>
    </style:style>
    <style:style style:name="P115" style:family="paragraph" style:parent-style-name="Subtitle">
      <style:paragraph-properties fo:text-align="start" style:justify-single-word="false"/>
      <style:text-properties officeooo:paragraph-rsid="04f8c20a"/>
    </style:style>
    <style:style style:name="P116" style:family="paragraph" style:parent-style-name="Subtitle">
      <style:paragraph-properties fo:text-align="start" style:justify-single-word="false"/>
      <style:text-properties officeooo:paragraph-rsid="0512d994"/>
    </style:style>
    <style:style style:name="P117" style:family="paragraph" style:parent-style-name="Subtitle">
      <style:paragraph-properties fo:text-align="start" style:justify-single-word="false"/>
      <style:text-properties officeooo:paragraph-rsid="03b3360b"/>
    </style:style>
    <style:style style:name="P118" style:family="paragraph" style:parent-style-name="Subtitle">
      <style:paragraph-properties fo:text-align="start" style:justify-single-word="false"/>
      <style:text-properties officeooo:paragraph-rsid="057b688e"/>
    </style:style>
    <style:style style:name="P119" style:family="paragraph" style:parent-style-name="Subtitle">
      <style:paragraph-properties fo:text-align="start" style:justify-single-word="false"/>
      <style:text-properties officeooo:paragraph-rsid="05c005a0"/>
    </style:style>
    <style:style style:name="P120" style:family="paragraph" style:parent-style-name="Subtitle">
      <style:paragraph-properties fo:text-align="start" style:justify-single-word="false"/>
      <style:text-properties officeooo:paragraph-rsid="06146bfb"/>
    </style:style>
    <style:style style:name="P121" style:family="paragraph" style:parent-style-name="Text_20_body">
      <style:text-properties officeooo:rsid="03be17ce" officeooo:paragraph-rsid="03be17ce"/>
    </style:style>
    <style:style style:name="P122" style:family="paragraph" style:parent-style-name="Text_20_body">
      <style:text-properties officeooo:rsid="02ecf2f7" officeooo:paragraph-rsid="02ecf2f7"/>
    </style:style>
    <style:style style:name="P123" style:family="paragraph" style:parent-style-name="Text_20_body">
      <style:text-properties officeooo:paragraph-rsid="02eb9ddc"/>
    </style:style>
    <style:style style:name="P124" style:family="paragraph" style:parent-style-name="Text_20_body">
      <style:text-properties officeooo:rsid="03cac8b6" officeooo:paragraph-rsid="03cac8b6"/>
    </style:style>
    <style:style style:name="P125" style:family="paragraph" style:parent-style-name="Text_20_body">
      <style:text-properties officeooo:rsid="02e770da" officeooo:paragraph-rsid="02e770da"/>
    </style:style>
    <style:style style:name="P126" style:family="paragraph" style:parent-style-name="Text_20_body">
      <style:paragraph-properties fo:text-align="start" style:justify-single-word="false"/>
      <style:text-properties officeooo:rsid="02e770da" officeooo:paragraph-rsid="03cdd03a"/>
    </style:style>
    <style:style style:name="P127" style:family="paragraph" style:parent-style-name="Text_20_body">
      <style:text-properties officeooo:rsid="02e770da" officeooo:paragraph-rsid="052ab1c4"/>
    </style:style>
    <style:style style:name="P128" style:family="paragraph" style:parent-style-name="Text_20_body">
      <style:text-properties officeooo:paragraph-rsid="03cf060c"/>
    </style:style>
    <style:style style:name="P129" style:family="paragraph" style:parent-style-name="Text_20_body">
      <style:text-properties officeooo:rsid="02e40f2a" officeooo:paragraph-rsid="02e40f2a"/>
    </style:style>
    <style:style style:name="P130" style:family="paragraph" style:parent-style-name="Text_20_body">
      <style:text-properties officeooo:paragraph-rsid="03e1e2e1"/>
    </style:style>
    <style:style style:name="P131" style:family="paragraph" style:parent-style-name="Text_20_body">
      <style:text-properties officeooo:rsid="02cebb60" officeooo:paragraph-rsid="02cebb60"/>
    </style:style>
    <style:style style:name="P132" style:family="paragraph" style:parent-style-name="Text_20_body">
      <style:text-properties officeooo:paragraph-rsid="03f8569c"/>
    </style:style>
    <style:style style:name="P133" style:family="paragraph" style:parent-style-name="Text_20_body">
      <style:text-properties officeooo:rsid="02cbbe2c" officeooo:paragraph-rsid="02cbbe2c"/>
    </style:style>
    <style:style style:name="P134" style:family="paragraph" style:parent-style-name="Text_20_body">
      <style:text-properties officeooo:rsid="03fc268e" officeooo:paragraph-rsid="03fc268e"/>
    </style:style>
    <style:style style:name="P135" style:family="paragraph" style:parent-style-name="Text_20_body">
      <style:text-properties officeooo:rsid="02c83287" officeooo:paragraph-rsid="03fe092f"/>
    </style:style>
    <style:style style:name="P136" style:family="paragraph" style:parent-style-name="Text_20_body">
      <style:text-properties officeooo:paragraph-rsid="040539ff"/>
    </style:style>
    <style:style style:name="P137" style:family="paragraph" style:parent-style-name="Text_20_body">
      <style:text-properties officeooo:paragraph-rsid="0406f77d"/>
    </style:style>
    <style:style style:name="P138" style:family="paragraph" style:parent-style-name="Text_20_body">
      <style:text-properties officeooo:rsid="02b915e0" officeooo:paragraph-rsid="02b915e0"/>
    </style:style>
    <style:style style:name="P139" style:family="paragraph" style:parent-style-name="Text_20_body">
      <style:text-properties officeooo:paragraph-rsid="040c1e8c"/>
    </style:style>
    <style:style style:name="P140" style:family="paragraph" style:parent-style-name="Text_20_body">
      <style:text-properties officeooo:paragraph-rsid="040f7a58"/>
    </style:style>
    <style:style style:name="P141" style:family="paragraph" style:parent-style-name="Text_20_body">
      <style:text-properties officeooo:paragraph-rsid="0417973c"/>
    </style:style>
    <style:style style:name="P142" style:family="paragraph" style:parent-style-name="Text_20_body">
      <style:text-properties officeooo:rsid="02b4dde2" officeooo:paragraph-rsid="02b4dde2"/>
    </style:style>
    <style:style style:name="P143" style:family="paragraph" style:parent-style-name="Text_20_body">
      <style:text-properties officeooo:rsid="0419e977" officeooo:paragraph-rsid="0419e977"/>
    </style:style>
    <style:style style:name="P144" style:family="paragraph" style:parent-style-name="Text_20_body">
      <style:text-properties officeooo:paragraph-rsid="041cb7c1"/>
    </style:style>
    <style:style style:name="P145" style:family="paragraph" style:parent-style-name="Text_20_body">
      <style:text-properties officeooo:paragraph-rsid="04383f75"/>
    </style:style>
    <style:style style:name="P146" style:family="paragraph" style:parent-style-name="Text_20_body">
      <style:text-properties officeooo:rsid="02998986" officeooo:paragraph-rsid="02998986"/>
    </style:style>
    <style:style style:name="P147" style:family="paragraph" style:parent-style-name="Text_20_body">
      <style:text-properties officeooo:paragraph-rsid="0444fbb6"/>
    </style:style>
    <style:style style:name="P148" style:family="paragraph" style:parent-style-name="Text_20_body">
      <style:text-properties officeooo:rsid="0445c246" officeooo:paragraph-rsid="0445c246"/>
    </style:style>
    <style:style style:name="P149" style:family="paragraph" style:parent-style-name="Text_20_body">
      <style:text-properties officeooo:paragraph-rsid="044784ea"/>
    </style:style>
    <style:style style:name="P150" style:family="paragraph" style:parent-style-name="Text_20_body">
      <style:text-properties officeooo:paragraph-rsid="044aec79"/>
    </style:style>
    <style:style style:name="P151" style:family="paragraph" style:parent-style-name="Text_20_body">
      <style:text-properties officeooo:rsid="044b4833" officeooo:paragraph-rsid="044b4833"/>
    </style:style>
    <style:style style:name="P152" style:family="paragraph" style:parent-style-name="Text_20_body">
      <style:text-properties officeooo:rsid="044c7531" officeooo:paragraph-rsid="044c7531"/>
    </style:style>
    <style:style style:name="P153" style:family="paragraph" style:parent-style-name="Text_20_body">
      <style:text-properties officeooo:rsid="044dc3d0" officeooo:paragraph-rsid="044dc3d0"/>
    </style:style>
    <style:style style:name="P154" style:family="paragraph" style:parent-style-name="Text_20_body">
      <style:text-properties officeooo:paragraph-rsid="044fb30f"/>
    </style:style>
    <style:style style:name="P155" style:family="paragraph" style:parent-style-name="Text_20_body">
      <style:text-properties officeooo:rsid="0450cc8b" officeooo:paragraph-rsid="0450cc8b"/>
    </style:style>
    <style:style style:name="P156" style:family="paragraph" style:parent-style-name="Text_20_body">
      <style:text-properties officeooo:rsid="0451d61c" officeooo:paragraph-rsid="0451d61c"/>
    </style:style>
    <style:style style:name="P157" style:family="paragraph" style:parent-style-name="Text_20_body">
      <style:text-properties officeooo:rsid="04545b11" officeooo:paragraph-rsid="04545b11"/>
    </style:style>
    <style:style style:name="P158" style:family="paragraph" style:parent-style-name="Text_20_body">
      <style:text-properties officeooo:rsid="0455700a" officeooo:paragraph-rsid="0455700a"/>
    </style:style>
    <style:style style:name="P159" style:family="paragraph" style:parent-style-name="Text_20_body">
      <style:text-properties officeooo:rsid="0459f43c" officeooo:paragraph-rsid="0459f43c"/>
    </style:style>
    <style:style style:name="P160" style:family="paragraph" style:parent-style-name="Text_20_body">
      <style:text-properties officeooo:rsid="045d2b43" officeooo:paragraph-rsid="045d2b43"/>
    </style:style>
    <style:style style:name="P161" style:family="paragraph" style:parent-style-name="Text_20_body">
      <style:text-properties officeooo:rsid="045efefb" officeooo:paragraph-rsid="045efefb"/>
    </style:style>
    <style:style style:name="P162" style:family="paragraph" style:parent-style-name="Text_20_body">
      <style:text-properties officeooo:paragraph-rsid="02950d39"/>
    </style:style>
    <style:style style:name="P163" style:family="paragraph" style:parent-style-name="Text_20_body">
      <style:text-properties officeooo:rsid="0465e938" officeooo:paragraph-rsid="0465e938"/>
    </style:style>
    <style:style style:name="P164" style:family="paragraph" style:parent-style-name="Text_20_body">
      <style:text-properties officeooo:rsid="02965c82" officeooo:paragraph-rsid="02965c82"/>
    </style:style>
    <style:style style:name="P165" style:family="paragraph" style:parent-style-name="Text_20_body">
      <style:text-properties officeooo:paragraph-rsid="043dc6b5"/>
    </style:style>
    <style:style style:name="P166" style:family="paragraph" style:parent-style-name="Text_20_body">
      <style:text-properties officeooo:rsid="043d678e" officeooo:paragraph-rsid="043d678e"/>
    </style:style>
    <style:style style:name="P167" style:family="paragraph" style:parent-style-name="Text_20_body">
      <style:text-properties officeooo:rsid="046e2955" officeooo:paragraph-rsid="046e2955"/>
    </style:style>
    <style:style style:name="P168" style:family="paragraph" style:parent-style-name="Text_20_body">
      <style:text-properties officeooo:rsid="029bc372" officeooo:paragraph-rsid="029bc372"/>
    </style:style>
    <style:style style:name="P169" style:family="paragraph" style:parent-style-name="Text_20_body">
      <style:text-properties officeooo:rsid="046fbbd1" officeooo:paragraph-rsid="046fbbd1"/>
    </style:style>
    <style:style style:name="P170" style:family="paragraph" style:parent-style-name="Text_20_body">
      <style:text-properties officeooo:rsid="029b622b" officeooo:paragraph-rsid="029b622b"/>
    </style:style>
    <style:style style:name="P171" style:family="paragraph" style:parent-style-name="Text_20_body">
      <style:text-properties officeooo:rsid="0471e1a1" officeooo:paragraph-rsid="0471e1a1"/>
    </style:style>
    <style:style style:name="P172" style:family="paragraph" style:parent-style-name="Text_20_body">
      <style:text-properties officeooo:rsid="029bc56b" officeooo:paragraph-rsid="029bc56b"/>
    </style:style>
    <style:style style:name="P173" style:family="paragraph" style:parent-style-name="Text_20_body">
      <style:text-properties officeooo:rsid="0478b2e3" officeooo:paragraph-rsid="0478b2e3"/>
    </style:style>
    <style:style style:name="P174" style:family="paragraph" style:parent-style-name="Text_20_body">
      <style:text-properties officeooo:rsid="047e3962" officeooo:paragraph-rsid="047e3962"/>
    </style:style>
    <style:style style:name="P175" style:family="paragraph" style:parent-style-name="Text_20_body">
      <style:text-properties officeooo:rsid="029ed095" officeooo:paragraph-rsid="029ed095"/>
    </style:style>
    <style:style style:name="P176" style:family="paragraph" style:parent-style-name="Text_20_body">
      <style:text-properties officeooo:rsid="0484a890" officeooo:paragraph-rsid="0484a890"/>
    </style:style>
    <style:style style:name="P177" style:family="paragraph" style:parent-style-name="Text_20_body">
      <style:text-properties officeooo:rsid="02a3a6e9" officeooo:paragraph-rsid="0486a19f"/>
    </style:style>
    <style:style style:name="P178" style:family="paragraph" style:parent-style-name="Text_20_body">
      <style:text-properties officeooo:rsid="0489d223" officeooo:paragraph-rsid="0489d223"/>
    </style:style>
    <style:style style:name="P179" style:family="paragraph" style:parent-style-name="Text_20_body">
      <style:text-properties officeooo:rsid="02a53228" officeooo:paragraph-rsid="02a53228"/>
    </style:style>
    <style:style style:name="P180" style:family="paragraph" style:parent-style-name="Text_20_body">
      <style:text-properties officeooo:rsid="048b62da" officeooo:paragraph-rsid="048b62da"/>
    </style:style>
    <style:style style:name="P181" style:family="paragraph" style:parent-style-name="Text_20_body">
      <style:text-properties officeooo:rsid="0492d5d4" officeooo:paragraph-rsid="0492d5d4"/>
    </style:style>
    <style:style style:name="P182" style:family="paragraph" style:parent-style-name="Text_20_body">
      <style:text-properties officeooo:rsid="04945dea" officeooo:paragraph-rsid="04945dea"/>
    </style:style>
    <style:style style:name="P183" style:family="paragraph" style:parent-style-name="Text_20_body">
      <style:text-properties officeooo:paragraph-rsid="042112c1"/>
    </style:style>
    <style:style style:name="P184" style:family="paragraph" style:parent-style-name="Text_20_body">
      <style:text-properties officeooo:paragraph-rsid="041f1352"/>
    </style:style>
    <style:style style:name="P185" style:family="paragraph" style:parent-style-name="Text_20_body">
      <style:paragraph-properties fo:text-align="start" style:justify-single-word="false"/>
      <style:text-properties officeooo:rsid="02b1a662" officeooo:paragraph-rsid="049fdfea"/>
    </style:style>
    <style:style style:name="P186" style:family="paragraph" style:parent-style-name="Text_20_body">
      <style:paragraph-properties fo:text-align="start" style:justify-single-word="false"/>
      <style:text-properties officeooo:rsid="02b25ced" officeooo:paragraph-rsid="04a1dbe4"/>
    </style:style>
    <style:style style:name="P187" style:family="paragraph" style:parent-style-name="Text_20_body">
      <style:paragraph-properties fo:text-align="start" style:justify-single-word="false"/>
      <style:text-properties officeooo:rsid="04a56400" officeooo:paragraph-rsid="04a56400"/>
    </style:style>
    <style:style style:name="P188" style:family="paragraph" style:parent-style-name="Text_20_body">
      <style:paragraph-properties fo:text-align="start" style:justify-single-word="false"/>
      <style:text-properties officeooo:rsid="04a6e1a5" officeooo:paragraph-rsid="04a6e1a5"/>
    </style:style>
    <style:style style:name="P189" style:family="paragraph" style:parent-style-name="Text_20_body">
      <style:text-properties officeooo:paragraph-rsid="04aa428b"/>
    </style:style>
    <style:style style:name="P190" style:family="paragraph" style:parent-style-name="Text_20_body">
      <style:text-properties officeooo:rsid="04b1ea2d" officeooo:paragraph-rsid="04b1ea2d"/>
    </style:style>
    <style:style style:name="P191" style:family="paragraph" style:parent-style-name="Text_20_body">
      <style:text-properties officeooo:rsid="02a271c2" officeooo:paragraph-rsid="02a271c2"/>
    </style:style>
    <style:style style:name="P192" style:family="paragraph" style:parent-style-name="Text_20_body">
      <style:text-properties officeooo:rsid="02a41188" officeooo:paragraph-rsid="02a41188"/>
    </style:style>
    <style:style style:name="P193" style:family="paragraph" style:parent-style-name="Text_20_body">
      <style:text-properties officeooo:rsid="04d4d7f3" officeooo:paragraph-rsid="04d4d7f3"/>
    </style:style>
    <style:style style:name="P194" style:family="paragraph" style:parent-style-name="Text_20_body">
      <style:paragraph-properties fo:text-align="start" style:justify-single-word="false"/>
      <style:text-properties officeooo:rsid="04d981f2" officeooo:paragraph-rsid="04d981f2"/>
    </style:style>
    <style:style style:name="P195" style:family="paragraph" style:parent-style-name="Text_20_body">
      <style:paragraph-properties fo:text-align="start" style:justify-single-word="false"/>
      <style:text-properties officeooo:rsid="04d9c745" officeooo:paragraph-rsid="04d9c745"/>
    </style:style>
    <style:style style:name="P196" style:family="paragraph" style:parent-style-name="Text_20_body">
      <style:text-properties officeooo:rsid="02b93d00" officeooo:paragraph-rsid="040c1e8c"/>
    </style:style>
    <style:style style:name="P197" style:family="paragraph" style:parent-style-name="Text_20_body">
      <style:paragraph-properties fo:text-align="start" style:justify-single-word="false"/>
      <style:text-properties officeooo:rsid="04e21b32" officeooo:paragraph-rsid="04e21b32"/>
    </style:style>
    <style:style style:name="P198" style:family="paragraph" style:parent-style-name="Subtitle">
      <style:paragraph-properties fo:text-align="start" style:justify-single-word="false"/>
      <style:text-properties officeooo:rsid="04e21b32" officeooo:paragraph-rsid="04e21b32"/>
    </style:style>
    <style:style style:name="P199" style:family="paragraph" style:parent-style-name="Text_20_body">
      <style:paragraph-properties fo:text-align="start" style:justify-single-word="false"/>
      <style:text-properties officeooo:rsid="04e2e935" officeooo:paragraph-rsid="04e2e935"/>
    </style:style>
    <style:style style:name="P200" style:family="paragraph" style:parent-style-name="Subtitle">
      <style:paragraph-properties fo:text-align="start" style:justify-single-word="false"/>
      <style:text-properties officeooo:rsid="04e2e935" officeooo:paragraph-rsid="04e2e935"/>
    </style:style>
    <style:style style:name="P201" style:family="paragraph" style:parent-style-name="Text_20_body">
      <style:text-properties officeooo:rsid="04e4de44" officeooo:paragraph-rsid="04e4de44"/>
    </style:style>
    <style:style style:name="P202" style:family="paragraph" style:parent-style-name="Text_20_body">
      <style:paragraph-properties fo:text-align="start" style:justify-single-word="false"/>
      <style:text-properties officeooo:rsid="04ecdde6" officeooo:paragraph-rsid="04ecdde6"/>
    </style:style>
    <style:style style:name="P203" style:family="paragraph" style:parent-style-name="Text_20_body">
      <style:paragraph-properties fo:text-align="start" style:justify-single-word="false"/>
      <style:text-properties officeooo:rsid="02c468bd" officeooo:paragraph-rsid="04f3c983"/>
    </style:style>
    <style:style style:name="P204" style:family="paragraph" style:parent-style-name="Text_20_body">
      <style:paragraph-properties fo:text-align="start" style:justify-single-word="false"/>
      <style:text-properties officeooo:rsid="05039099" officeooo:paragraph-rsid="05039099"/>
    </style:style>
    <style:style style:name="P205" style:family="paragraph" style:parent-style-name="Text_20_body">
      <style:paragraph-properties fo:text-align="start" style:justify-single-word="false"/>
      <style:text-properties officeooo:rsid="05069ef6" officeooo:paragraph-rsid="05069ef6"/>
    </style:style>
    <style:style style:name="P206" style:family="paragraph" style:parent-style-name="Text_20_body">
      <style:paragraph-properties fo:text-align="start" style:justify-single-word="false"/>
      <style:text-properties officeooo:rsid="0506d771" officeooo:paragraph-rsid="0506d771"/>
    </style:style>
    <style:style style:name="P207" style:family="paragraph" style:parent-style-name="Text_20_body">
      <style:paragraph-properties fo:text-align="start" style:justify-single-word="false"/>
      <style:text-properties officeooo:rsid="02d06a3d" officeooo:paragraph-rsid="05088178"/>
    </style:style>
    <style:style style:name="P208" style:family="paragraph" style:parent-style-name="Text_20_body">
      <style:text-properties officeooo:rsid="050cc008" officeooo:paragraph-rsid="050cc008"/>
    </style:style>
    <style:style style:name="P209" style:family="paragraph" style:parent-style-name="Text_20_body">
      <style:text-properties officeooo:rsid="02d87e3e" officeooo:paragraph-rsid="02d74475"/>
    </style:style>
    <style:style style:name="P210" style:family="paragraph" style:parent-style-name="Text_20_body">
      <style:paragraph-properties fo:text-align="start" style:justify-single-word="false"/>
      <style:text-properties officeooo:rsid="0516f194" officeooo:paragraph-rsid="0516f194"/>
    </style:style>
    <style:style style:name="P211" style:family="paragraph" style:parent-style-name="Text_20_body">
      <style:paragraph-properties fo:text-align="start" style:justify-single-word="false"/>
      <style:text-properties officeooo:rsid="0529e1ad" officeooo:paragraph-rsid="0529e1ad"/>
    </style:style>
    <style:style style:name="P212" style:family="paragraph" style:parent-style-name="Text_20_body">
      <style:paragraph-properties fo:text-align="start" style:justify-single-word="false"/>
      <style:text-properties officeooo:rsid="052c1d84" officeooo:paragraph-rsid="052c1d84"/>
    </style:style>
    <style:style style:name="P213" style:family="paragraph" style:parent-style-name="Text_20_body">
      <style:text-properties officeooo:rsid="05092184" officeooo:paragraph-rsid="05092184"/>
    </style:style>
    <style:style style:name="P214" style:family="paragraph" style:parent-style-name="Text_20_body">
      <style:text-properties officeooo:rsid="0533a50d" officeooo:paragraph-rsid="0533a50d"/>
    </style:style>
    <style:style style:name="P215" style:family="paragraph" style:parent-style-name="Text_20_body">
      <style:paragraph-properties fo:text-align="start" style:justify-single-word="false"/>
      <style:text-properties officeooo:rsid="05386b5d" officeooo:paragraph-rsid="05386b5d"/>
    </style:style>
    <style:style style:name="P216" style:family="paragraph" style:parent-style-name="Text_20_body">
      <style:paragraph-properties fo:text-align="start" style:justify-single-word="false"/>
      <style:text-properties officeooo:rsid="03c0e20a"/>
    </style:style>
    <style:style style:name="P217" style:family="paragraph" style:parent-style-name="Text_20_body">
      <style:text-properties officeooo:rsid="02eee390" officeooo:paragraph-rsid="03c017ad"/>
    </style:style>
    <style:style style:name="P218" style:family="paragraph" style:parent-style-name="Text_20_body">
      <style:text-properties officeooo:rsid="02f290fc" officeooo:paragraph-rsid="02eee390"/>
    </style:style>
    <style:style style:name="P219" style:family="paragraph" style:parent-style-name="Text_20_body">
      <style:paragraph-properties fo:text-align="start" style:justify-single-word="false"/>
      <style:text-properties officeooo:rsid="05473a69"/>
    </style:style>
    <style:style style:name="P220" style:family="paragraph" style:parent-style-name="Text_20_body">
      <style:text-properties officeooo:rsid="02f7104c" officeooo:paragraph-rsid="02f7104c"/>
    </style:style>
    <style:style style:name="P221" style:family="paragraph" style:parent-style-name="Text_20_body">
      <style:text-properties officeooo:rsid="054ae9b1" officeooo:paragraph-rsid="054ae9b1"/>
    </style:style>
    <style:style style:name="P222" style:family="paragraph" style:parent-style-name="Text_20_body">
      <style:text-properties officeooo:paragraph-rsid="054f997e"/>
    </style:style>
    <style:style style:name="P223" style:family="paragraph" style:parent-style-name="Text_20_body">
      <style:paragraph-properties fo:text-align="start" style:justify-single-word="false"/>
      <style:text-properties officeooo:rsid="053c133e" officeooo:paragraph-rsid="053c133e"/>
    </style:style>
    <style:style style:name="P224" style:family="paragraph" style:parent-style-name="Text_20_body">
      <style:text-properties officeooo:rsid="02f8fd20" officeooo:paragraph-rsid="055f61be"/>
    </style:style>
    <style:style style:name="P225" style:family="paragraph" style:parent-style-name="Text_20_body">
      <style:text-properties officeooo:paragraph-rsid="0563714e"/>
    </style:style>
    <style:style style:name="P226" style:family="paragraph" style:parent-style-name="Text_20_body">
      <style:text-properties officeooo:rsid="02fecb32" officeooo:paragraph-rsid="039a4a3d"/>
    </style:style>
    <style:style style:name="P227" style:family="paragraph" style:parent-style-name="Text_20_body">
      <style:text-properties officeooo:rsid="02fef548" officeooo:paragraph-rsid="02fef548"/>
    </style:style>
    <style:style style:name="P228" style:family="paragraph" style:parent-style-name="Text_20_body">
      <style:text-properties officeooo:rsid="05716919" officeooo:paragraph-rsid="05716919"/>
    </style:style>
    <style:style style:name="P229" style:family="paragraph" style:parent-style-name="Text_20_body">
      <style:text-properties officeooo:rsid="05782487" officeooo:paragraph-rsid="05782487"/>
    </style:style>
    <style:style style:name="P230" style:family="paragraph" style:parent-style-name="Text_20_body">
      <style:text-properties officeooo:rsid="059dbb77" officeooo:paragraph-rsid="059dbb77"/>
    </style:style>
    <style:style style:name="P231" style:family="paragraph" style:parent-style-name="Text_20_body">
      <style:text-properties officeooo:rsid="05a071af" officeooo:paragraph-rsid="05a071af"/>
    </style:style>
    <style:style style:name="P232" style:family="paragraph" style:parent-style-name="Text_20_body">
      <style:text-properties officeooo:rsid="05a2d15c" officeooo:paragraph-rsid="05a2d15c"/>
    </style:style>
    <style:style style:name="P233" style:family="paragraph" style:parent-style-name="Text_20_body">
      <style:text-properties officeooo:rsid="05a49a28" officeooo:paragraph-rsid="05a49a28"/>
    </style:style>
    <style:style style:name="P234" style:family="paragraph" style:parent-style-name="Text_20_body">
      <style:text-properties officeooo:rsid="05ada029" officeooo:paragraph-rsid="05ae0552"/>
    </style:style>
    <style:style style:name="P235" style:family="paragraph" style:parent-style-name="Text_20_body">
      <style:text-properties officeooo:rsid="05b729b5" officeooo:paragraph-rsid="05b729b5"/>
    </style:style>
    <style:style style:name="P236" style:family="paragraph" style:parent-style-name="Text_20_body">
      <style:text-properties officeooo:rsid="05b7cf90" officeooo:paragraph-rsid="05b7cf90"/>
    </style:style>
    <style:style style:name="P237" style:family="paragraph" style:parent-style-name="Text_20_body">
      <style:text-properties officeooo:rsid="05b7d751" officeooo:paragraph-rsid="05b7d751"/>
    </style:style>
    <style:style style:name="P238" style:family="paragraph" style:parent-style-name="Text_20_body">
      <style:paragraph-properties fo:text-align="start" style:justify-single-word="false"/>
      <style:text-properties officeooo:rsid="05c69c44" officeooo:paragraph-rsid="05c69c44"/>
    </style:style>
    <style:style style:name="P239" style:family="paragraph" style:parent-style-name="Text_20_body">
      <style:text-properties officeooo:rsid="05ccc566" officeooo:paragraph-rsid="05ccc566"/>
    </style:style>
    <style:style style:name="P240" style:family="paragraph" style:parent-style-name="Text_20_body">
      <style:text-properties officeooo:rsid="05cf5f81" officeooo:paragraph-rsid="05cf5f81"/>
    </style:style>
    <style:style style:name="P241" style:family="paragraph" style:parent-style-name="Text_20_body">
      <style:text-properties officeooo:rsid="05d8cb0a" officeooo:paragraph-rsid="05d8cb0a"/>
    </style:style>
    <style:style style:name="P242" style:family="paragraph" style:parent-style-name="Text_20_body">
      <style:text-properties officeooo:rsid="05de7614" officeooo:paragraph-rsid="05de7614"/>
    </style:style>
    <style:style style:name="P243" style:family="paragraph" style:parent-style-name="Text_20_body">
      <style:paragraph-properties fo:text-align="start" style:justify-single-word="false"/>
      <style:text-properties officeooo:rsid="05ed6fc4" officeooo:paragraph-rsid="05ed6fc4"/>
    </style:style>
    <style:style style:name="P244" style:family="paragraph" style:parent-style-name="Text_20_body">
      <style:paragraph-properties fo:text-align="start" style:justify-single-word="false"/>
      <style:text-properties officeooo:rsid="05ed7fee" officeooo:paragraph-rsid="05ef108b"/>
    </style:style>
    <style:style style:name="P245" style:family="paragraph" style:parent-style-name="Text_20_body">
      <style:paragraph-properties fo:text-align="start" style:justify-single-word="false"/>
      <style:text-properties officeooo:rsid="05ed7fee" officeooo:paragraph-rsid="05f0b5ad"/>
    </style:style>
    <style:style style:name="P246" style:family="paragraph" style:parent-style-name="Text_20_body">
      <style:paragraph-properties fo:text-align="start" style:justify-single-word="false"/>
      <style:text-properties officeooo:rsid="05f10814" officeooo:paragraph-rsid="05f10814"/>
    </style:style>
    <style:style style:name="P247" style:family="paragraph" style:parent-style-name="Text_20_body">
      <style:paragraph-properties fo:text-align="start" style:justify-single-word="false"/>
      <style:text-properties officeooo:rsid="05f2ebec" officeooo:paragraph-rsid="05f2ebec"/>
    </style:style>
    <style:style style:name="P248" style:family="paragraph" style:parent-style-name="Text_20_body">
      <style:paragraph-properties fo:text-align="start" style:justify-single-word="false"/>
      <style:text-properties officeooo:rsid="05ef108b" officeooo:paragraph-rsid="05ef108b"/>
    </style:style>
    <style:style style:name="P249" style:family="paragraph" style:parent-style-name="Text_20_body">
      <style:paragraph-properties fo:text-align="start" style:justify-single-word="false"/>
      <style:text-properties officeooo:rsid="05f0b5ad" officeooo:paragraph-rsid="05f0b5ad"/>
    </style:style>
    <style:style style:name="P250" style:family="paragraph" style:parent-style-name="Text_20_body">
      <style:paragraph-properties fo:text-align="start" style:justify-single-word="false"/>
      <style:text-properties officeooo:rsid="05f69a9d" officeooo:paragraph-rsid="05f69a9d"/>
    </style:style>
    <style:style style:name="P251" style:family="paragraph" style:parent-style-name="Text_20_body">
      <style:paragraph-properties fo:text-align="start" style:justify-single-word="false"/>
      <style:text-properties officeooo:rsid="05f6b39e" officeooo:paragraph-rsid="05f6b39e"/>
    </style:style>
    <style:style style:name="P252" style:family="paragraph" style:parent-style-name="Text_20_body">
      <style:paragraph-properties fo:text-align="start" style:justify-single-word="false"/>
      <style:text-properties officeooo:rsid="05f81f6b" officeooo:paragraph-rsid="05f81f6b"/>
    </style:style>
    <style:style style:name="P253" style:family="paragraph" style:parent-style-name="Text_20_body">
      <style:text-properties officeooo:rsid="05fcaa74" officeooo:paragraph-rsid="05fcaa74"/>
    </style:style>
    <style:style style:name="P254" style:family="paragraph" style:parent-style-name="Text_20_body">
      <style:text-properties officeooo:rsid="06003e59" officeooo:paragraph-rsid="06003e59"/>
    </style:style>
    <style:style style:name="P255" style:family="paragraph" style:parent-style-name="Text_20_body">
      <style:text-properties officeooo:rsid="0603bb6f" officeooo:paragraph-rsid="0603bb6f"/>
    </style:style>
    <style:style style:name="P256" style:family="paragraph" style:parent-style-name="Text_20_body">
      <style:text-properties officeooo:rsid="0604322c" officeooo:paragraph-rsid="0604322c"/>
    </style:style>
    <style:style style:name="P257" style:family="paragraph" style:parent-style-name="Text_20_body">
      <style:paragraph-properties fo:text-align="start" style:justify-single-word="false"/>
      <style:text-properties officeooo:rsid="0606e07a" officeooo:paragraph-rsid="0606e07a"/>
    </style:style>
    <style:style style:name="P258" style:family="paragraph" style:parent-style-name="Text_20_body">
      <style:paragraph-properties fo:text-align="start" style:justify-single-word="false"/>
      <style:text-properties officeooo:rsid="0606e07a" officeooo:paragraph-rsid="060784b9"/>
    </style:style>
    <style:style style:name="P259" style:family="paragraph" style:parent-style-name="Text_20_body">
      <style:paragraph-properties fo:text-align="start" style:justify-single-word="false"/>
      <style:text-properties officeooo:rsid="0608709a" officeooo:paragraph-rsid="06094056"/>
    </style:style>
    <style:style style:name="P260" style:family="paragraph" style:parent-style-name="Text_20_body">
      <style:paragraph-properties fo:text-align="start" style:justify-single-word="false"/>
      <style:text-properties officeooo:rsid="0608709a" officeooo:paragraph-rsid="060c3034"/>
    </style:style>
    <style:style style:name="P261" style:family="paragraph" style:parent-style-name="Text_20_body">
      <style:paragraph-properties fo:text-align="start" style:justify-single-word="false"/>
      <style:text-properties officeooo:rsid="06094056" officeooo:paragraph-rsid="0609b2de"/>
    </style:style>
    <style:style style:name="P262" style:family="paragraph" style:parent-style-name="Text_20_body">
      <style:paragraph-properties fo:text-align="start" style:justify-single-word="false"/>
      <style:text-properties officeooo:rsid="0609b2de" officeooo:paragraph-rsid="0609b2de"/>
    </style:style>
    <style:style style:name="P263" style:family="paragraph" style:parent-style-name="Text_20_body">
      <style:paragraph-properties fo:text-align="start" style:justify-single-word="false"/>
      <style:text-properties officeooo:rsid="060c3034" officeooo:paragraph-rsid="060c3034"/>
    </style:style>
    <style:style style:name="P264" style:family="paragraph" style:parent-style-name="Text_20_body">
      <style:paragraph-properties fo:text-align="start" style:justify-single-word="false"/>
      <style:text-properties officeooo:rsid="06146bfb" officeooo:paragraph-rsid="06146bfb"/>
    </style:style>
    <style:style style:name="P265" style:family="paragraph" style:parent-style-name="Text_20_body">
      <style:text-properties officeooo:paragraph-rsid="061502ea"/>
    </style:style>
    <style:style style:name="P266" style:family="paragraph" style:parent-style-name="Text_20_body">
      <style:text-properties officeooo:rsid="06170818" officeooo:paragraph-rsid="06170818"/>
    </style:style>
    <style:style style:name="P267" style:family="paragraph" style:parent-style-name="Text_20_body">
      <style:text-properties officeooo:rsid="06170818" officeooo:paragraph-rsid="0618a004"/>
    </style:style>
    <style:style style:name="P268" style:family="paragraph" style:parent-style-name="Text_20_body">
      <style:text-properties officeooo:rsid="06170818" officeooo:paragraph-rsid="061a5ea2"/>
    </style:style>
    <style:style style:name="P269" style:family="paragraph" style:parent-style-name="Text_20_body">
      <style:text-properties officeooo:rsid="06170818" officeooo:paragraph-rsid="061c677a"/>
    </style:style>
    <style:style style:name="P270" style:family="paragraph" style:parent-style-name="Text_20_body">
      <style:text-properties officeooo:rsid="06170818" officeooo:paragraph-rsid="06210a1b"/>
    </style:style>
    <style:style style:name="P271" style:family="paragraph" style:parent-style-name="Text_20_body">
      <style:text-properties officeooo:rsid="06170818" officeooo:paragraph-rsid="06229bff"/>
    </style:style>
    <style:style style:name="P272" style:family="paragraph" style:parent-style-name="Text_20_body">
      <style:text-properties officeooo:rsid="062576ad" officeooo:paragraph-rsid="062576ad"/>
    </style:style>
    <style:style style:name="P273" style:family="paragraph" style:parent-style-name="Text_20_body">
      <style:text-properties style:text-underline-style="none" officeooo:rsid="06264060" officeooo:paragraph-rsid="06264060"/>
    </style:style>
    <style:style style:name="P274" style:family="paragraph" style:parent-style-name="Text_20_body">
      <style:text-properties style:text-underline-style="none" officeooo:rsid="06267986" officeooo:paragraph-rsid="06267986"/>
    </style:style>
    <style:style style:name="P275" style:family="paragraph" style:parent-style-name="Text_20_body">
      <style:text-properties style:text-underline-style="none" officeooo:rsid="062bb066" officeooo:paragraph-rsid="062bb066"/>
    </style:style>
    <style:style style:name="P276" style:family="paragraph" style:parent-style-name="Text_20_body">
      <style:text-properties style:text-underline-style="none" officeooo:rsid="062a2ba2" officeooo:paragraph-rsid="062a2ba2"/>
    </style:style>
    <style:style style:name="P277" style:family="paragraph" style:parent-style-name="Text_20_body">
      <style:text-properties officeooo:rsid="061502ea" officeooo:paragraph-rsid="061502ea"/>
    </style:style>
    <style:style style:name="P278" style:family="paragraph" style:parent-style-name="Text_20_body">
      <style:text-properties officeooo:rsid="0618a004" officeooo:paragraph-rsid="0618a004"/>
    </style:style>
    <style:style style:name="P279" style:family="paragraph" style:parent-style-name="Text_20_body">
      <style:text-properties officeooo:rsid="061e0bf0" officeooo:paragraph-rsid="061e0bf0"/>
    </style:style>
    <style:style style:name="P280" style:family="paragraph" style:parent-style-name="Text_20_body">
      <style:text-properties officeooo:rsid="061f7d1e" officeooo:paragraph-rsid="061f7d1e"/>
    </style:style>
    <style:style style:name="P281" style:family="paragraph" style:parent-style-name="Text_20_body">
      <style:paragraph-properties fo:text-align="start" style:justify-single-word="false"/>
      <style:text-properties officeooo:rsid="0632fb14" officeooo:paragraph-rsid="06331761"/>
    </style:style>
    <style:style style:name="P282" style:family="paragraph" style:parent-style-name="Text_20_body">
      <style:paragraph-properties fo:text-align="start" style:justify-single-word="false"/>
      <style:text-properties officeooo:rsid="0632fb14" officeooo:paragraph-rsid="06398872"/>
    </style:style>
    <style:style style:name="P283" style:family="paragraph" style:parent-style-name="Text_20_body">
      <style:paragraph-properties fo:text-align="start" style:justify-single-word="false"/>
      <style:text-properties officeooo:rsid="0634f363" officeooo:paragraph-rsid="0634f363"/>
    </style:style>
    <style:style style:name="P284" style:family="paragraph" style:parent-style-name="Text_20_body">
      <style:paragraph-properties fo:text-align="start" style:justify-single-word="false"/>
      <style:text-properties officeooo:rsid="063e05d5" officeooo:paragraph-rsid="063e05d5"/>
    </style:style>
    <style:style style:name="P285" style:family="paragraph" style:parent-style-name="Text_20_body">
      <style:paragraph-properties fo:text-align="start" style:justify-single-word="false"/>
      <style:text-properties officeooo:rsid="063fcc78" officeooo:paragraph-rsid="063fcc78"/>
    </style:style>
    <style:style style:name="P286" style:family="paragraph" style:parent-style-name="Text_20_body">
      <style:paragraph-properties fo:text-align="start" style:justify-single-word="false"/>
      <style:text-properties officeooo:rsid="0641b1fd" officeooo:paragraph-rsid="0641b1fd"/>
    </style:style>
    <style:style style:name="P287" style:family="paragraph" style:parent-style-name="Text_20_body">
      <style:text-properties officeooo:rsid="06420c38" officeooo:paragraph-rsid="06420c38"/>
    </style:style>
    <style:style style:name="P288" style:family="paragraph" style:parent-style-name="Text_20_body">
      <style:paragraph-properties fo:text-align="start" style:justify-single-word="false"/>
      <style:text-properties officeooo:rsid="06331761" officeooo:paragraph-rsid="06331761"/>
    </style:style>
    <style:style style:name="P289" style:family="paragraph" style:parent-style-name="Text_20_body">
      <style:paragraph-properties fo:text-align="start" style:justify-single-word="false"/>
      <style:text-properties officeooo:rsid="06364b10" officeooo:paragraph-rsid="06364b10"/>
    </style:style>
    <style:style style:name="P290" style:family="paragraph" style:parent-style-name="Text_20_body">
      <style:paragraph-properties fo:text-align="start" style:justify-single-word="false"/>
      <style:text-properties officeooo:rsid="06398872" officeooo:paragraph-rsid="06398872"/>
    </style:style>
    <style:style style:name="P291" style:family="paragraph" style:parent-style-name="Text_20_body">
      <style:paragraph-properties fo:text-align="start" style:justify-single-word="false"/>
      <style:text-properties officeooo:rsid="06445540" officeooo:paragraph-rsid="06445540"/>
    </style:style>
    <style:style style:name="P292" style:family="paragraph" style:parent-style-name="Text_20_body">
      <style:paragraph-properties fo:text-align="start" style:justify-single-word="false"/>
      <style:text-properties officeooo:rsid="06445908" officeooo:paragraph-rsid="06445908"/>
    </style:style>
    <style:style style:name="P293" style:family="paragraph" style:parent-style-name="Text_20_body">
      <style:paragraph-properties fo:text-align="start" style:justify-single-word="false"/>
      <style:text-properties officeooo:rsid="0644b326" officeooo:paragraph-rsid="0644b326"/>
    </style:style>
    <style:style style:name="P294" style:family="paragraph" style:parent-style-name="Text_20_body">
      <style:text-properties officeooo:rsid="06478aed" officeooo:paragraph-rsid="06498a9d"/>
    </style:style>
    <style:style style:name="P295" style:family="paragraph" style:parent-style-name="Text_20_body">
      <style:text-properties officeooo:rsid="06462738" officeooo:paragraph-rsid="06462738"/>
    </style:style>
    <style:style style:name="P296" style:family="paragraph" style:parent-style-name="Text_20_body">
      <style:text-properties officeooo:paragraph-rsid="06498a9d"/>
    </style:style>
    <style:style style:name="P297" style:family="paragraph" style:parent-style-name="Text_20_body">
      <style:text-properties officeooo:rsid="064f5f3f" officeooo:paragraph-rsid="06511d28"/>
    </style:style>
    <style:style style:name="P298" style:family="paragraph" style:parent-style-name="Text_20_body">
      <style:text-properties officeooo:rsid="064f5f3f" officeooo:paragraph-rsid="065d96aa"/>
    </style:style>
    <style:style style:name="P299" style:family="paragraph" style:parent-style-name="Text_20_body">
      <style:text-properties officeooo:rsid="065f2bcb" officeooo:paragraph-rsid="065f2bcb"/>
    </style:style>
    <style:style style:name="P300" style:family="paragraph" style:parent-style-name="Text_20_body">
      <style:text-properties officeooo:rsid="065f2bcb" officeooo:paragraph-rsid="06462738"/>
    </style:style>
    <style:style style:name="P301" style:family="paragraph" style:parent-style-name="Text_20_body">
      <style:text-properties officeooo:rsid="0661a626" officeooo:paragraph-rsid="0661a626"/>
    </style:style>
    <style:style style:name="P302" style:family="paragraph" style:parent-style-name="Text_20_body">
      <style:text-properties officeooo:rsid="0661c8bd" officeooo:paragraph-rsid="0661c8bd"/>
    </style:style>
    <style:style style:name="P303" style:family="paragraph" style:parent-style-name="Text_20_body">
      <style:text-properties officeooo:paragraph-rsid="066780df"/>
    </style:style>
    <style:style style:name="P304" style:family="paragraph" style:parent-style-name="Text_20_body">
      <style:text-properties officeooo:paragraph-rsid="066a2653"/>
    </style:style>
    <style:style style:name="P305" style:family="paragraph" style:parent-style-name="Text_20_body">
      <style:text-properties officeooo:rsid="066f4bb7" officeooo:paragraph-rsid="066f4bb7"/>
    </style:style>
    <style:style style:name="P306" style:family="paragraph" style:parent-style-name="Text_20_body">
      <style:text-properties officeooo:paragraph-rsid="067292de"/>
    </style:style>
    <style:style style:name="P307" style:family="paragraph" style:parent-style-name="Text_20_body">
      <style:text-properties officeooo:paragraph-rsid="06735e59"/>
    </style:style>
    <style:style style:name="P308" style:family="paragraph" style:parent-style-name="Text_20_body">
      <style:text-properties officeooo:rsid="0677799a" officeooo:paragraph-rsid="0677799a"/>
    </style:style>
    <style:style style:name="P309" style:family="paragraph" style:parent-style-name="Text_20_body">
      <style:text-properties officeooo:rsid="06786cca" officeooo:paragraph-rsid="06786cca"/>
    </style:style>
    <style:style style:name="P310" style:family="paragraph" style:parent-style-name="Text_20_body">
      <style:text-properties officeooo:rsid="0679c362" officeooo:paragraph-rsid="0679c362"/>
    </style:style>
    <style:style style:name="P311" style:family="paragraph" style:parent-style-name="Text_20_body">
      <style:text-properties officeooo:rsid="067b835c" officeooo:paragraph-rsid="067b835c"/>
    </style:style>
    <style:style style:name="P312" style:family="paragraph" style:parent-style-name="Text_20_body">
      <style:text-properties officeooo:rsid="066d5a0b" officeooo:paragraph-rsid="066d5a0b"/>
    </style:style>
    <style:style style:name="P313" style:family="paragraph" style:parent-style-name="Text_20_body">
      <style:text-properties officeooo:rsid="066e3337" officeooo:paragraph-rsid="066e3337"/>
    </style:style>
    <style:style style:name="P314" style:family="paragraph" style:parent-style-name="Text_20_body">
      <style:text-properties officeooo:rsid="066fc147" officeooo:paragraph-rsid="066fc147"/>
    </style:style>
    <style:style style:name="P315" style:family="paragraph" style:parent-style-name="Text_20_body">
      <style:text-properties officeooo:rsid="06735e59" officeooo:paragraph-rsid="06735e59"/>
    </style:style>
    <style:style style:name="P316" style:family="paragraph" style:parent-style-name="Text_20_body">
      <style:text-properties officeooo:rsid="067e515a" officeooo:paragraph-rsid="0681220d"/>
    </style:style>
    <style:style style:name="P317" style:family="paragraph" style:parent-style-name="Text_20_body">
      <style:text-properties officeooo:rsid="0682fa10" officeooo:paragraph-rsid="0682fa10"/>
    </style:style>
    <style:style style:name="P318" style:family="paragraph" style:parent-style-name="Text_20_body">
      <style:text-properties officeooo:rsid="06847b94" officeooo:paragraph-rsid="06847b94"/>
    </style:style>
    <style:style style:name="P319" style:family="paragraph" style:parent-style-name="Text_20_body">
      <style:text-properties officeooo:rsid="06864fde" officeooo:paragraph-rsid="06864fde"/>
    </style:style>
    <style:style style:name="P320" style:family="paragraph" style:parent-style-name="Text_20_body">
      <style:text-properties officeooo:rsid="06883dfb" officeooo:paragraph-rsid="06883dfb"/>
    </style:style>
    <style:style style:name="P321" style:family="paragraph" style:parent-style-name="Text_20_body">
      <style:text-properties officeooo:rsid="06898f55" officeooo:paragraph-rsid="06898f55"/>
    </style:style>
    <style:style style:name="P322" style:family="paragraph" style:parent-style-name="Text_20_body">
      <style:text-properties officeooo:rsid="067fd33a" officeooo:paragraph-rsid="067fd33a"/>
    </style:style>
    <style:style style:name="P323" style:family="paragraph" style:parent-style-name="Text_20_body">
      <style:text-properties officeooo:paragraph-rsid="068de852"/>
    </style:style>
    <style:style style:name="P324" style:family="paragraph" style:parent-style-name="Text_20_body">
      <style:text-properties officeooo:paragraph-rsid="0690e14d"/>
    </style:style>
    <style:style style:name="P325" style:family="paragraph" style:parent-style-name="Text_20_body">
      <style:text-properties officeooo:rsid="06918920" officeooo:paragraph-rsid="06932c0f"/>
    </style:style>
    <style:style style:name="P326" style:family="paragraph" style:parent-style-name="Text_20_body">
      <style:text-properties officeooo:rsid="06918920" officeooo:paragraph-rsid="0693ec03"/>
    </style:style>
    <style:style style:name="P327" style:family="paragraph" style:parent-style-name="Text_20_body">
      <style:text-properties officeooo:rsid="069559f7" officeooo:paragraph-rsid="069559f7"/>
    </style:style>
    <style:style style:name="P328" style:family="paragraph" style:parent-style-name="Text_20_body">
      <style:text-properties officeooo:rsid="068c7637" officeooo:paragraph-rsid="068c7637"/>
    </style:style>
    <style:style style:name="P329" style:family="paragraph" style:parent-style-name="Text_20_body">
      <style:text-properties officeooo:rsid="068f590b" officeooo:paragraph-rsid="068f590b"/>
    </style:style>
    <style:style style:name="P330" style:family="paragraph" style:parent-style-name="Text_20_body">
      <style:text-properties officeooo:rsid="0693ec03" officeooo:paragraph-rsid="0693ec03"/>
    </style:style>
    <style:style style:name="P331" style:family="paragraph" style:parent-style-name="Text_20_body">
      <style:text-properties officeooo:rsid="0695f83d" officeooo:paragraph-rsid="0695f83d"/>
    </style:style>
    <style:style style:name="P332" style:family="paragraph" style:parent-style-name="Text_20_body">
      <style:text-properties officeooo:rsid="0697da6a" officeooo:paragraph-rsid="0697da6a"/>
    </style:style>
    <style:style style:name="P333" style:family="paragraph" style:parent-style-name="Text_20_body">
      <style:text-properties officeooo:rsid="06985833" officeooo:paragraph-rsid="06985833"/>
    </style:style>
    <style:style style:name="P334" style:family="paragraph" style:parent-style-name="Text_20_body">
      <style:text-properties officeooo:rsid="0699a03f" officeooo:paragraph-rsid="0699a03f"/>
    </style:style>
    <style:style style:name="P335" style:family="paragraph" style:parent-style-name="Text_20_body">
      <style:text-properties officeooo:rsid="0699c6f2" officeooo:paragraph-rsid="069ae4a1"/>
    </style:style>
    <style:style style:name="P336" style:family="paragraph" style:parent-style-name="Text_20_body">
      <style:text-properties officeooo:rsid="069b7bea" officeooo:paragraph-rsid="069b7bea"/>
    </style:style>
    <style:style style:name="P337" style:family="paragraph" style:parent-style-name="Text_20_body">
      <style:text-properties officeooo:paragraph-rsid="069d173a"/>
    </style:style>
    <style:style style:name="P338" style:family="paragraph" style:parent-style-name="Text_20_body">
      <style:text-properties officeooo:paragraph-rsid="069f188e"/>
    </style:style>
    <style:style style:name="P339" style:family="paragraph" style:parent-style-name="Text_20_body">
      <style:text-properties officeooo:paragraph-rsid="06a261ab"/>
    </style:style>
    <style:style style:name="P340" style:family="paragraph" style:parent-style-name="Text_20_body">
      <style:text-properties officeooo:paragraph-rsid="06a4eb23"/>
    </style:style>
    <style:style style:name="P341" style:family="paragraph" style:parent-style-name="Text_20_body">
      <style:text-properties officeooo:rsid="06a79b60" officeooo:paragraph-rsid="06a79b60"/>
    </style:style>
    <style:style style:name="P342" style:family="paragraph" style:parent-style-name="Text_20_body">
      <style:text-properties officeooo:rsid="06a8e4d6" officeooo:paragraph-rsid="06a8e4d6"/>
    </style:style>
    <style:style style:name="P343" style:family="paragraph" style:parent-style-name="Text_20_body">
      <style:text-properties officeooo:rsid="069ae4a1" officeooo:paragraph-rsid="069ae4a1"/>
    </style:style>
    <style:style style:name="P344" style:family="paragraph" style:parent-style-name="Text_20_body">
      <style:text-properties officeooo:rsid="06a04c36" officeooo:paragraph-rsid="06a04c36"/>
    </style:style>
    <style:style style:name="P345" style:family="paragraph" style:parent-style-name="Text_20_body">
      <style:text-properties officeooo:rsid="06a0a83e" officeooo:paragraph-rsid="06a0a83e"/>
    </style:style>
    <style:style style:name="P346" style:family="paragraph" style:parent-style-name="Text_20_body">
      <style:text-properties officeooo:paragraph-rsid="06aa8b4a"/>
    </style:style>
    <style:style style:name="P347" style:family="paragraph" style:parent-style-name="Text_20_body">
      <style:text-properties officeooo:rsid="06ad0df2" officeooo:paragraph-rsid="06ad0df2"/>
    </style:style>
    <style:style style:name="P348" style:family="paragraph" style:parent-style-name="Text_20_body">
      <style:text-properties officeooo:rsid="06ae8fd5" officeooo:paragraph-rsid="06ae8fd5"/>
    </style:style>
    <style:style style:name="P349" style:family="paragraph" style:parent-style-name="Text_20_body">
      <style:text-properties officeooo:rsid="06ae8fd5" officeooo:paragraph-rsid="06b00f9a"/>
    </style:style>
    <style:style style:name="P350" style:family="paragraph" style:parent-style-name="Text_20_body">
      <style:text-properties officeooo:rsid="06ae8fd5" officeooo:paragraph-rsid="06b0cf6d"/>
    </style:style>
    <style:style style:name="P351" style:family="paragraph" style:parent-style-name="Text_20_body">
      <style:paragraph-properties fo:text-align="start" style:justify-single-word="false"/>
      <style:text-properties officeooo:rsid="06b505c0" officeooo:paragraph-rsid="06b505c0"/>
    </style:style>
    <style:style style:name="P352" style:family="paragraph" style:parent-style-name="Text_20_body">
      <style:paragraph-properties fo:text-align="start" style:justify-single-word="false"/>
      <style:text-properties officeooo:rsid="06b6d945" officeooo:paragraph-rsid="06b6d945"/>
    </style:style>
    <style:style style:name="P353" style:family="paragraph" style:parent-style-name="Text_20_body">
      <style:text-properties officeooo:rsid="06b94767" officeooo:paragraph-rsid="06b94767"/>
    </style:style>
    <style:style style:name="P354" style:family="paragraph" style:parent-style-name="Text_20_body">
      <style:text-properties officeooo:rsid="06b98435" officeooo:paragraph-rsid="06ba4271"/>
    </style:style>
    <style:style style:name="P355" style:family="paragraph" style:parent-style-name="Text_20_body">
      <style:text-properties officeooo:rsid="06bc32a4" officeooo:paragraph-rsid="06bc32a4"/>
    </style:style>
    <style:style style:name="P356" style:family="paragraph" style:parent-style-name="Text_20_body">
      <style:text-properties officeooo:rsid="06bd15c3" officeooo:paragraph-rsid="06bd15c3"/>
    </style:style>
    <style:style style:name="P357" style:family="paragraph" style:parent-style-name="Text_20_body">
      <style:text-properties officeooo:rsid="06be9a4b" officeooo:paragraph-rsid="06be9a4b"/>
    </style:style>
    <style:style style:name="P358" style:family="paragraph" style:parent-style-name="Text_20_body">
      <style:text-properties officeooo:rsid="06a9ff56" officeooo:paragraph-rsid="06a9ff56"/>
    </style:style>
    <style:style style:name="P359" style:family="paragraph" style:parent-style-name="Text_20_body">
      <style:text-properties officeooo:rsid="06aa8b4a" officeooo:paragraph-rsid="06aa8b4a"/>
    </style:style>
    <style:style style:name="P360" style:family="paragraph" style:parent-style-name="Text_20_body">
      <style:text-properties officeooo:rsid="06ac2992" officeooo:paragraph-rsid="06aa8b4a"/>
    </style:style>
    <style:style style:name="P361" style:family="paragraph" style:parent-style-name="Text_20_body">
      <style:text-properties officeooo:rsid="06b0cf6d" officeooo:paragraph-rsid="06b0cf6d"/>
    </style:style>
    <style:style style:name="P362" style:family="paragraph" style:parent-style-name="Text_20_body">
      <style:text-properties officeooo:rsid="06ba4271" officeooo:paragraph-rsid="06ba4271"/>
    </style:style>
    <style:style style:name="P363" style:family="paragraph" style:parent-style-name="Text_20_body">
      <style:text-properties officeooo:rsid="06c08352" officeooo:paragraph-rsid="06c08352"/>
    </style:style>
    <style:style style:name="P364" style:family="paragraph" style:parent-style-name="Text_20_body">
      <style:paragraph-properties fo:text-align="start" style:justify-single-word="false"/>
      <style:text-properties officeooo:rsid="06c1663d" officeooo:paragraph-rsid="06c1663d"/>
    </style:style>
    <style:style style:name="P365" style:family="paragraph" style:parent-style-name="Text_20_body">
      <style:paragraph-properties fo:text-align="start" style:justify-single-word="false"/>
      <style:text-properties officeooo:rsid="06c16c43" officeooo:paragraph-rsid="06c16c43"/>
    </style:style>
    <style:style style:name="P366" style:family="paragraph" style:parent-style-name="Text_20_body">
      <style:paragraph-properties fo:text-align="start" style:justify-single-word="false"/>
      <style:text-properties officeooo:rsid="06c36381" officeooo:paragraph-rsid="06c36381"/>
    </style:style>
    <style:style style:name="P367" style:family="paragraph" style:parent-style-name="Text_20_body">
      <style:text-properties officeooo:rsid="06c7d9c1" officeooo:paragraph-rsid="06c7d9c1"/>
    </style:style>
    <style:style style:name="P368" style:family="paragraph" style:parent-style-name="Text_20_body">
      <style:text-properties officeooo:paragraph-rsid="06cab2d7"/>
    </style:style>
    <style:style style:name="P369" style:family="paragraph" style:parent-style-name="Text_20_body">
      <style:paragraph-properties fo:text-align="start" style:justify-single-word="false"/>
      <style:text-properties officeooo:rsid="06cd6423" officeooo:paragraph-rsid="06cd6423"/>
    </style:style>
    <style:style style:name="P370" style:family="paragraph" style:parent-style-name="Text_20_body">
      <style:paragraph-properties fo:text-align="start" style:justify-single-word="false"/>
      <style:text-properties officeooo:rsid="06cdc005" officeooo:paragraph-rsid="06cdc005"/>
    </style:style>
    <style:style style:name="P371" style:family="paragraph" style:parent-style-name="Text_20_body">
      <style:text-properties officeooo:rsid="06c8e647" officeooo:paragraph-rsid="06c8e647"/>
    </style:style>
    <style:style style:name="P372" style:family="paragraph" style:parent-style-name="Text_20_body">
      <style:text-properties officeooo:rsid="06cab2d7" officeooo:paragraph-rsid="06cab2d7"/>
    </style:style>
    <style:style style:name="P373" style:family="paragraph" style:parent-style-name="Text_20_body">
      <style:paragraph-properties fo:text-align="start" style:justify-single-word="false"/>
      <style:text-properties officeooo:rsid="06d3eb7f" officeooo:paragraph-rsid="06d3eb7f"/>
    </style:style>
    <style:style style:name="P374" style:family="paragraph" style:parent-style-name="Text_20_body">
      <style:paragraph-properties fo:text-align="start" style:justify-single-word="false"/>
      <style:text-properties officeooo:rsid="06d44be3" officeooo:paragraph-rsid="06d44be3"/>
    </style:style>
    <style:style style:name="P375" style:family="paragraph" style:parent-style-name="Text_20_body">
      <style:paragraph-properties fo:text-align="start" style:justify-single-word="false"/>
      <style:text-properties officeooo:rsid="06d44be3" officeooo:paragraph-rsid="06d4170d"/>
    </style:style>
    <style:style style:name="P376" style:family="paragraph" style:parent-style-name="Text_20_body">
      <style:paragraph-properties fo:text-align="start" style:justify-single-word="false"/>
      <style:text-properties officeooo:rsid="06d4170d" officeooo:paragraph-rsid="06d4170d"/>
    </style:style>
    <style:style style:name="P377" style:family="paragraph" style:parent-style-name="Subtitle">
      <style:paragraph-properties fo:text-align="start" style:justify-single-word="false"/>
      <style:text-properties style:font-name="Liberation Sans" fo:font-size="18pt" officeooo:rsid="03da6da6" officeooo:paragraph-rsid="03da6da6" style:font-name-asian="Noto Sans CJK SC" style:font-size-asian="18pt" style:font-name-complex="Lohit Devanagari1" style:font-size-complex="18pt"/>
    </style:style>
    <style:style style:name="P378" style:family="paragraph" style:parent-style-name="Subtitle">
      <style:paragraph-properties fo:text-align="start" style:justify-single-word="false"/>
      <style:text-properties style:font-name="Liberation Sans" fo:font-size="18pt" officeooo:rsid="04de3d7e" officeooo:paragraph-rsid="04de3d7e" style:font-name-asian="Noto Sans CJK SC" style:font-size-asian="18pt" style:font-name-complex="Lohit Devanagari1" style:font-size-complex="18pt"/>
    </style:style>
    <style:style style:name="P379" style:family="paragraph" style:parent-style-name="Subtitle">
      <style:paragraph-properties fo:text-align="start" style:justify-single-word="false"/>
      <style:text-properties officeooo:rsid="04b31950" officeooo:paragraph-rsid="04b31950"/>
    </style:style>
    <style:style style:name="P380" style:family="paragraph" style:parent-style-name="Subtitle">
      <style:paragraph-properties fo:text-align="start" style:justify-single-word="false"/>
      <style:text-properties officeooo:rsid="04b444e8" officeooo:paragraph-rsid="04b444e8"/>
    </style:style>
    <style:style style:name="P381" style:family="paragraph" style:parent-style-name="Subtitle">
      <style:paragraph-properties fo:text-align="start" style:justify-single-word="false"/>
      <style:text-properties officeooo:rsid="04b52053" officeooo:paragraph-rsid="04b52053"/>
    </style:style>
    <style:style style:name="P382" style:family="paragraph" style:parent-style-name="Subtitle">
      <style:paragraph-properties fo:text-align="start" style:justify-single-word="false"/>
      <style:text-properties officeooo:rsid="04b6ef0d" officeooo:paragraph-rsid="04b6ef0d"/>
    </style:style>
    <style:style style:name="P383" style:family="paragraph" style:parent-style-name="Subtitle">
      <style:paragraph-properties fo:text-align="start" style:justify-single-word="false"/>
      <style:text-properties officeooo:rsid="04b6f702" officeooo:paragraph-rsid="04b6f702"/>
    </style:style>
    <style:style style:name="P384" style:family="paragraph" style:parent-style-name="Subtitle">
      <style:paragraph-properties fo:text-align="start" style:justify-single-word="false"/>
      <style:text-properties officeooo:rsid="04b7b86b" officeooo:paragraph-rsid="04b7b86b"/>
    </style:style>
    <style:style style:name="P385" style:family="paragraph" style:parent-style-name="Subtitle">
      <style:paragraph-properties fo:text-align="start" style:justify-single-word="false"/>
      <style:text-properties officeooo:rsid="04b7dd6b" officeooo:paragraph-rsid="04b7dd6b"/>
    </style:style>
    <style:style style:name="P386" style:family="paragraph" style:parent-style-name="Subtitle">
      <style:paragraph-properties fo:text-align="start" style:justify-single-word="false"/>
      <style:text-properties officeooo:rsid="04bc14db" officeooo:paragraph-rsid="04bc14db"/>
    </style:style>
    <style:style style:name="P387" style:family="paragraph" style:parent-style-name="Subtitle">
      <style:paragraph-properties fo:text-align="start" style:justify-single-word="false"/>
      <style:text-properties officeooo:rsid="04be08f1" officeooo:paragraph-rsid="04be08f1"/>
    </style:style>
    <style:style style:name="P388" style:family="paragraph" style:parent-style-name="Subtitle">
      <style:paragraph-properties fo:text-align="start" style:justify-single-word="false"/>
      <style:text-properties officeooo:rsid="04bfc0ec" officeooo:paragraph-rsid="04bfc0ec"/>
    </style:style>
    <style:style style:name="P389" style:family="paragraph" style:parent-style-name="Subtitle">
      <style:paragraph-properties fo:text-align="start" style:justify-single-word="false"/>
      <style:text-properties officeooo:rsid="04c231d0" officeooo:paragraph-rsid="04c231d0"/>
    </style:style>
    <style:style style:name="P390" style:family="paragraph" style:parent-style-name="Subtitle">
      <style:paragraph-properties fo:text-align="start" style:justify-single-word="false"/>
      <style:text-properties officeooo:rsid="04c6a58e" officeooo:paragraph-rsid="04c6a58e"/>
    </style:style>
    <style:style style:name="P391" style:family="paragraph" style:parent-style-name="Subtitle">
      <style:paragraph-properties fo:text-align="start" style:justify-single-word="false"/>
      <style:text-properties officeooo:rsid="04cab00a" officeooo:paragraph-rsid="04cab00a"/>
    </style:style>
    <style:style style:name="P392" style:family="paragraph" style:parent-style-name="Subtitle">
      <style:paragraph-properties fo:text-align="start" style:justify-single-word="false"/>
      <style:text-properties officeooo:rsid="04cca217" officeooo:paragraph-rsid="04cca217"/>
    </style:style>
    <style:style style:name="P393" style:family="paragraph" style:parent-style-name="Subtitle">
      <style:paragraph-properties fo:text-align="start" style:justify-single-word="false"/>
      <style:text-properties officeooo:rsid="04d0640b" officeooo:paragraph-rsid="04d0640b"/>
    </style:style>
    <style:style style:name="P394" style:family="paragraph" style:parent-style-name="Subtitle">
      <style:paragraph-properties fo:text-align="start" style:justify-single-word="false"/>
      <style:text-properties officeooo:rsid="04d0f101" officeooo:paragraph-rsid="04d0f101"/>
    </style:style>
    <style:style style:name="P395" style:family="paragraph" style:parent-style-name="Subtitle">
      <style:paragraph-properties fo:text-align="start" style:justify-single-word="false"/>
      <style:text-properties officeooo:rsid="04de3d7e" officeooo:paragraph-rsid="04de3d7e"/>
    </style:style>
    <style:style style:name="P396" style:family="paragraph" style:parent-style-name="Subtitle">
      <style:paragraph-properties fo:text-align="start" style:justify-single-word="false"/>
      <style:text-properties officeooo:rsid="04fc159f" officeooo:paragraph-rsid="04fc159f"/>
    </style:style>
    <style:style style:name="P397" style:family="paragraph" style:parent-style-name="Subtitle">
      <style:paragraph-properties fo:text-align="start" style:justify-single-word="false"/>
      <style:text-properties officeooo:rsid="051b428f" officeooo:paragraph-rsid="051b428f"/>
    </style:style>
    <style:style style:name="P398" style:family="paragraph" style:parent-style-name="Subtitle">
      <style:paragraph-properties fo:text-align="start" style:justify-single-word="false"/>
      <style:text-properties officeooo:rsid="051def79" officeooo:paragraph-rsid="051def79"/>
    </style:style>
    <style:style style:name="P399" style:family="paragraph" style:parent-style-name="Subtitle">
      <style:paragraph-properties fo:text-align="start" style:justify-single-word="false"/>
      <style:text-properties officeooo:rsid="053a04b2" officeooo:paragraph-rsid="053a04b2"/>
    </style:style>
    <style:style style:name="P400" style:family="paragraph" style:parent-style-name="Subtitle">
      <style:paragraph-properties fo:text-align="start" style:justify-single-word="false"/>
      <style:text-properties officeooo:rsid="03c8d18f" officeooo:paragraph-rsid="03c8d18f"/>
    </style:style>
    <style:style style:name="P401" style:family="paragraph" style:parent-style-name="Subtitle">
      <style:paragraph-properties fo:text-align="center" style:justify-single-word="false"/>
    </style:style>
    <style:style style:name="P402" style:family="paragraph" style:parent-style-name="Subtitle">
      <style:text-properties officeooo:paragraph-rsid="03b255f3"/>
    </style:style>
    <style:style style:name="P403" style:family="paragraph" style:parent-style-name="Standard">
      <style:paragraph-properties fo:margin-left="0.5in" fo:margin-right="0in" fo:text-indent="0in" style:auto-text-indent="false"/>
    </style:style>
    <style:style style:name="P404" style:family="paragraph" style:parent-style-name="Standard">
      <style:paragraph-properties fo:margin-left="0.5in" fo:margin-right="0in" fo:text-indent="0in" style:auto-text-indent="false"/>
      <style:text-properties officeooo:paragraph-rsid="06d63406"/>
    </style:style>
    <style:style style:name="P405" style:family="paragraph" style:parent-style-name="Standard">
      <style:paragraph-properties fo:margin-left="0.5in" fo:margin-right="0in" fo:text-indent="0in" style:auto-text-indent="false"/>
      <style:text-properties officeooo:paragraph-rsid="06d82313"/>
    </style:style>
    <style:style style:name="P406" style:family="paragraph" style:parent-style-name="Text_20_body">
      <style:paragraph-properties fo:margin-left="0in" fo:margin-right="0in" fo:text-indent="0in" style:auto-text-indent="false"/>
      <style:text-properties officeooo:rsid="05dee3a3" officeooo:paragraph-rsid="05dee3a3"/>
    </style:style>
    <style:style style:name="P407" style:family="paragraph" style:parent-style-name="Text_20_body">
      <style:paragraph-properties fo:margin-left="0in" fo:margin-right="0in" fo:text-indent="0in" style:auto-text-indent="false"/>
      <style:text-properties officeooo:rsid="05e0cc6c" officeooo:paragraph-rsid="05e0cc6c"/>
    </style:style>
    <style:style style:name="P408" style:family="paragraph" style:parent-style-name="Text_20_body">
      <style:paragraph-properties fo:margin-left="0in" fo:margin-right="0in" fo:text-indent="0in" style:auto-text-indent="false"/>
      <style:text-properties officeooo:rsid="05e12db7" officeooo:paragraph-rsid="05e22b72"/>
    </style:style>
    <style:style style:name="P409" style:family="paragraph" style:parent-style-name="Text_20_body">
      <style:paragraph-properties fo:margin-left="0in" fo:margin-right="0in" fo:text-indent="0in" style:auto-text-indent="false"/>
      <style:text-properties officeooo:rsid="05e12db7" officeooo:paragraph-rsid="05e3f3c5"/>
    </style:style>
    <style:style style:name="P410" style:family="paragraph" style:parent-style-name="Text_20_body">
      <style:paragraph-properties fo:margin-left="0in" fo:margin-right="0in" fo:text-indent="0in" style:auto-text-indent="false"/>
      <style:text-properties officeooo:rsid="05e5bbae" officeooo:paragraph-rsid="05e5bbae"/>
    </style:style>
    <style:style style:name="P411" style:family="paragraph" style:parent-style-name="Text_20_body">
      <style:paragraph-properties fo:margin-left="0in" fo:margin-right="0in" fo:text-indent="0in" style:auto-text-indent="false"/>
      <style:text-properties officeooo:rsid="05e7a563" officeooo:paragraph-rsid="05e7a563"/>
    </style:style>
    <style:style style:name="P412" style:family="paragraph" style:parent-style-name="Text_20_body">
      <style:paragraph-properties fo:margin-left="0in" fo:margin-right="0in" fo:text-indent="0in" style:auto-text-indent="false"/>
      <style:text-properties officeooo:rsid="05e7db70" officeooo:paragraph-rsid="05e7db70"/>
    </style:style>
    <style:style style:name="P413" style:family="paragraph" style:parent-style-name="Text_20_body">
      <style:paragraph-properties fo:margin-left="0in" fo:margin-right="0in" fo:text-indent="0in" style:auto-text-indent="false"/>
      <style:text-properties officeooo:rsid="05e9174b" officeooo:paragraph-rsid="05e9174b"/>
    </style:style>
    <style:style style:name="P414" style:family="paragraph" style:parent-style-name="Text_20_body">
      <style:paragraph-properties fo:margin-left="0in" fo:margin-right="0in" fo:text-indent="0in" style:auto-text-indent="false"/>
      <style:text-properties officeooo:rsid="05ecfcd9" officeooo:paragraph-rsid="05ecfcd9"/>
    </style:style>
    <style:style style:name="P415" style:family="paragraph" style:parent-style-name="Quotations">
      <style:text-properties officeooo:paragraph-rsid="0644b326"/>
    </style:style>
    <style:style style:name="P416" style:family="paragraph" style:parent-style-name="Heading_20_1">
      <style:paragraph-properties fo:break-before="page"/>
    </style:style>
    <style:style style:name="P417" style:family="paragraph" style:parent-style-name="Heading_20_2">
      <style:paragraph-properties fo:break-before="page"/>
    </style:style>
    <style:style style:name="P418" style:family="paragraph" style:parent-style-name="Heading_20_2">
      <style:paragraph-properties fo:break-before="page"/>
      <style:text-properties officeooo:rsid="062ddb1d" officeooo:paragraph-rsid="062ddb1d"/>
    </style:style>
    <style:style style:name="P419" style:family="paragraph" style:parent-style-name="Heading_20_2">
      <style:text-properties officeooo:rsid="044fb30f" officeooo:paragraph-rsid="044fb30f"/>
    </style:style>
    <style:style style:name="P420" style:family="paragraph" style:parent-style-name="Heading_20_2">
      <style:text-properties officeooo:rsid="043dc6b5" officeooo:paragraph-rsid="043dc6b5"/>
    </style:style>
    <style:style style:name="P421" style:family="paragraph" style:parent-style-name="Heading_20_2">
      <style:text-properties officeooo:rsid="0417973c" officeooo:paragraph-rsid="0417973c"/>
    </style:style>
    <style:style style:name="P422" style:family="paragraph" style:parent-style-name="Heading_20_2">
      <style:paragraph-properties fo:break-before="page"/>
      <style:text-properties officeooo:rsid="040f7a58" officeooo:paragraph-rsid="040f7a58"/>
    </style:style>
    <style:style style:name="P423" style:family="paragraph" style:parent-style-name="Heading_20_2">
      <style:paragraph-properties fo:break-before="page"/>
      <style:text-properties officeooo:paragraph-rsid="04f8c20a"/>
    </style:style>
    <style:style style:name="P424" style:family="paragraph" style:parent-style-name="Heading_20_2">
      <style:text-properties officeooo:rsid="0308bf86" officeooo:paragraph-rsid="0308bf86"/>
    </style:style>
    <style:style style:name="P425" style:family="paragraph" style:parent-style-name="Heading_20_2">
      <style:paragraph-properties fo:break-before="page"/>
      <style:text-properties officeooo:rsid="0563714e" officeooo:paragraph-rsid="0563714e"/>
    </style:style>
    <style:style style:name="P426" style:family="paragraph" style:parent-style-name="Heading_20_2">
      <style:text-properties officeooo:rsid="039a4a3d" officeooo:paragraph-rsid="039a4a3d"/>
    </style:style>
    <style:style style:name="P427" style:family="paragraph" style:parent-style-name="Heading_20_2">
      <style:text-properties officeooo:rsid="0394d310" officeooo:paragraph-rsid="0394d310"/>
    </style:style>
    <style:style style:name="P428" style:family="paragraph" style:parent-style-name="Heading_20_2">
      <style:paragraph-properties fo:break-before="page"/>
      <style:text-properties style:font-name="Liberation Sans" fo:font-size="16.1000003814697pt" fo:font-weight="bold" officeooo:rsid="0574ebd9" officeooo:paragraph-rsid="0574ebd9" style:font-name-asian="Noto Sans CJK SC" style:font-size-asian="16.1000003814697pt" style:font-weight-asian="bold" style:font-name-complex="Lohit Devanagari1" style:font-size-complex="16.1000003814697pt" style:font-weight-complex="bold"/>
    </style:style>
    <style:style style:name="P429" style:family="paragraph" style:parent-style-name="Heading_20_2">
      <style:text-properties style:font-name="Liberation Sans" fo:font-size="16.1000003814697pt" fo:font-weight="bold" officeooo:rsid="057d4d8a" officeooo:paragraph-rsid="057d4d8a" style:font-name-asian="Noto Sans CJK SC" style:font-size-asian="16.1000003814697pt" style:font-weight-asian="bold" style:font-name-complex="Lohit Devanagari1" style:font-size-complex="16.1000003814697pt" style:font-weight-complex="bold"/>
    </style:style>
    <style:style style:name="P430" style:family="paragraph" style:parent-style-name="Heading_20_2">
      <style:paragraph-properties fo:break-before="page"/>
      <style:text-properties officeooo:rsid="0358461b" officeooo:paragraph-rsid="0358461b"/>
    </style:style>
    <style:style style:name="P431" style:family="paragraph" style:parent-style-name="Heading_20_2">
      <style:paragraph-properties fo:break-before="page"/>
      <style:text-properties officeooo:rsid="0357f7be" officeooo:paragraph-rsid="0357f7be"/>
    </style:style>
    <style:style style:name="P432" style:family="paragraph" style:parent-style-name="Heading_20_2">
      <style:paragraph-properties fo:break-before="page"/>
      <style:text-properties officeooo:paragraph-rsid="05c892f2"/>
    </style:style>
    <style:style style:name="P433" style:family="paragraph" style:parent-style-name="Heading_20_3">
      <style:text-properties officeooo:paragraph-rsid="06985833"/>
    </style:style>
    <style:style style:name="P434" style:family="paragraph" style:parent-style-name="Heading_20_3">
      <style:paragraph-properties fo:break-before="page"/>
    </style:style>
    <style:style style:name="P435" style:family="paragraph" style:parent-style-name="Heading_20_3">
      <style:paragraph-properties fo:text-align="start" style:justify-single-word="false"/>
      <style:text-properties officeooo:paragraph-rsid="05237cfc"/>
    </style:style>
    <style:style style:name="P436" style:family="paragraph" style:parent-style-name="Heading_20_3">
      <style:paragraph-properties fo:break-before="page"/>
      <style:text-properties officeooo:rsid="052ab1c4" officeooo:paragraph-rsid="052ab1c4"/>
    </style:style>
    <style:style style:name="P437" style:family="paragraph" style:parent-style-name="Heading_20_3">
      <style:text-properties officeooo:rsid="03aec759" officeooo:paragraph-rsid="03aec759"/>
    </style:style>
    <style:style style:name="P438" style:family="paragraph" style:parent-style-name="Heading_20_3">
      <style:text-properties officeooo:rsid="03adc287" officeooo:paragraph-rsid="03adc287"/>
    </style:style>
    <style:style style:name="P439" style:family="paragraph" style:parent-style-name="Heading_20_3">
      <style:text-properties officeooo:rsid="037ff211" officeooo:paragraph-rsid="037ff211"/>
    </style:style>
    <style:style style:name="P440" style:family="paragraph" style:parent-style-name="Heading_20_3">
      <style:text-properties officeooo:rsid="037e9346" officeooo:paragraph-rsid="037e9346"/>
    </style:style>
    <style:style style:name="P441" style:family="paragraph" style:parent-style-name="Subtitle">
      <style:paragraph-properties fo:text-align="center" style:justify-single-word="false"/>
    </style:style>
    <style:style style:name="P442" style:family="paragraph" style:parent-style-name="Text_20_body" style:list-style-name="L1">
      <style:text-properties officeooo:rsid="06003e59" officeooo:paragraph-rsid="06003e59"/>
    </style:style>
    <style:style style:name="P443" style:family="paragraph" style:parent-style-name="Text_20_body" style:list-style-name="L1">
      <style:text-properties officeooo:rsid="0603bb6f" officeooo:paragraph-rsid="0603bb6f"/>
    </style:style>
    <style:style style:name="P444" style:family="paragraph" style:parent-style-name="Text_20_body" style:list-style-name="L2">
      <style:text-properties officeooo:rsid="06170818" officeooo:paragraph-rsid="06170818"/>
    </style:style>
    <style:style style:name="P445" style:family="paragraph" style:parent-style-name="Text_20_body" style:list-style-name="L3">
      <style:paragraph-properties fo:text-align="start" style:justify-single-word="false"/>
      <style:text-properties officeooo:rsid="06c36381" officeooo:paragraph-rsid="06c36381"/>
    </style:style>
    <style:style style:name="T1" style:family="text">
      <style:text-properties officeooo:rsid="028e17f9"/>
    </style:style>
    <style:style style:name="T2" style:family="text">
      <style:text-properties officeooo:rsid="028e6104"/>
    </style:style>
    <style:style style:name="T3" style:family="text">
      <style:text-properties officeooo:rsid="02918636"/>
    </style:style>
    <style:style style:name="T4" style:family="text">
      <style:text-properties officeooo:rsid="02927fbd"/>
    </style:style>
    <style:style style:name="T5" style:family="text">
      <style:text-properties officeooo:rsid="02929f4f"/>
    </style:style>
    <style:style style:name="T6" style:family="text">
      <style:text-properties officeooo:rsid="02950771"/>
    </style:style>
    <style:style style:name="T7" style:family="text">
      <style:text-properties officeooo:rsid="02a27546"/>
    </style:style>
    <style:style style:name="T8" style:family="text">
      <style:text-properties officeooo:rsid="02afdc61"/>
    </style:style>
    <style:style style:name="T9" style:family="text">
      <style:text-properties officeooo:rsid="02beb659"/>
    </style:style>
    <style:style style:name="T10" style:family="text">
      <style:text-properties officeooo:rsid="02e867b5"/>
    </style:style>
    <style:style style:name="T11" style:family="text">
      <style:text-properties officeooo:rsid="02f06906"/>
    </style:style>
    <style:style style:name="T12" style:family="text">
      <style:text-properties officeooo:rsid="02f48722"/>
    </style:style>
    <style:style style:name="T13" style:family="text">
      <style:text-properties officeooo:rsid="02f4899e"/>
    </style:style>
    <style:style style:name="T14" style:family="text">
      <style:text-properties officeooo:rsid="02fd0653"/>
    </style:style>
    <style:style style:name="T15" style:family="text">
      <style:text-properties officeooo:rsid="02fd3f31"/>
    </style:style>
    <style:style style:name="T16" style:family="text">
      <style:text-properties officeooo:rsid="03026225"/>
    </style:style>
    <style:style style:name="T17" style:family="text">
      <style:text-properties officeooo:rsid="0308bf86"/>
    </style:style>
    <style:style style:name="T18" style:family="text">
      <style:text-properties officeooo:rsid="030a14f9"/>
    </style:style>
    <style:style style:name="T19" style:family="text">
      <style:text-properties officeooo:rsid="030a28c8"/>
    </style:style>
    <style:style style:name="T20" style:family="text">
      <style:text-properties officeooo:rsid="030d8d14"/>
    </style:style>
    <style:style style:name="T21" style:family="text">
      <style:text-properties officeooo:rsid="030d9f09"/>
    </style:style>
    <style:style style:name="T22" style:family="text">
      <style:text-properties officeooo:rsid="030e9ecb"/>
    </style:style>
    <style:style style:name="T23" style:family="text">
      <style:text-properties officeooo:rsid="03104479"/>
    </style:style>
    <style:style style:name="T24" style:family="text">
      <style:text-properties officeooo:rsid="03112653"/>
    </style:style>
    <style:style style:name="T25" style:family="text">
      <style:text-properties officeooo:rsid="03124f2b"/>
    </style:style>
    <style:style style:name="T26" style:family="text">
      <style:text-properties officeooo:rsid="03135ebb"/>
    </style:style>
    <style:style style:name="T27" style:family="text">
      <style:text-properties officeooo:rsid="0315ad9d"/>
    </style:style>
    <style:style style:name="T28" style:family="text">
      <style:text-properties officeooo:rsid="03178db1"/>
    </style:style>
    <style:style style:name="T29" style:family="text">
      <style:text-properties officeooo:rsid="0319741b"/>
    </style:style>
    <style:style style:name="T30" style:family="text">
      <style:text-properties officeooo:rsid="031b6deb"/>
    </style:style>
    <style:style style:name="T31" style:family="text">
      <style:text-properties officeooo:rsid="031bbcc3"/>
    </style:style>
    <style:style style:name="T32" style:family="text">
      <style:text-properties officeooo:rsid="031cddbf"/>
    </style:style>
    <style:style style:name="T33" style:family="text">
      <style:text-properties officeooo:rsid="031f1283"/>
    </style:style>
    <style:style style:name="T34" style:family="text">
      <style:text-properties officeooo:rsid="03204677"/>
    </style:style>
    <style:style style:name="T35" style:family="text">
      <style:text-properties officeooo:rsid="032082b0"/>
    </style:style>
    <style:style style:name="T36" style:family="text">
      <style:text-properties officeooo:rsid="0320cf54"/>
    </style:style>
    <style:style style:name="T37" style:family="text">
      <style:text-properties officeooo:rsid="03211219"/>
    </style:style>
    <style:style style:name="T38" style:family="text">
      <style:text-properties officeooo:rsid="03224c8c"/>
    </style:style>
    <style:style style:name="T39" style:family="text">
      <style:text-properties officeooo:rsid="0323ac3b"/>
    </style:style>
    <style:style style:name="T40" style:family="text">
      <style:text-properties officeooo:rsid="032429a6"/>
    </style:style>
    <style:style style:name="T41" style:family="text">
      <style:text-properties officeooo:rsid="03250652"/>
    </style:style>
    <style:style style:name="T42" style:family="text">
      <style:text-properties officeooo:rsid="03253275"/>
    </style:style>
    <style:style style:name="T43" style:family="text">
      <style:text-properties officeooo:rsid="03257c71"/>
    </style:style>
    <style:style style:name="T44" style:family="text">
      <style:text-properties officeooo:rsid="03262854"/>
    </style:style>
    <style:style style:name="T45" style:family="text">
      <style:text-properties officeooo:rsid="03268052"/>
    </style:style>
    <style:style style:name="T46" style:family="text">
      <style:text-properties officeooo:rsid="03274c4f"/>
    </style:style>
    <style:style style:name="T47" style:family="text">
      <style:text-properties officeooo:rsid="03274dcd"/>
    </style:style>
    <style:style style:name="T48" style:family="text">
      <style:text-properties officeooo:rsid="032a5e57"/>
    </style:style>
    <style:style style:name="T49" style:family="text">
      <style:text-properties officeooo:rsid="032c14cc"/>
    </style:style>
    <style:style style:name="T50" style:family="text">
      <style:text-properties officeooo:rsid="032c1bab"/>
    </style:style>
    <style:style style:name="T51" style:family="text">
      <style:text-properties officeooo:rsid="032d7abf"/>
    </style:style>
    <style:style style:name="T52" style:family="text">
      <style:text-properties officeooo:rsid="0330957b"/>
    </style:style>
    <style:style style:name="T53" style:family="text">
      <style:text-properties officeooo:rsid="03314a9f"/>
    </style:style>
    <style:style style:name="T54" style:family="text">
      <style:text-properties officeooo:rsid="0333bf2c"/>
    </style:style>
    <style:style style:name="T55" style:family="text">
      <style:text-properties officeooo:rsid="03360467"/>
    </style:style>
    <style:style style:name="T56" style:family="text">
      <style:text-properties officeooo:rsid="033871bc"/>
    </style:style>
    <style:style style:name="T57" style:family="text">
      <style:text-properties officeooo:rsid="033a154d"/>
    </style:style>
    <style:style style:name="T58" style:family="text">
      <style:text-properties officeooo:rsid="033b641a"/>
    </style:style>
    <style:style style:name="T59" style:family="text">
      <style:text-properties officeooo:rsid="033c18c9"/>
    </style:style>
    <style:style style:name="T60" style:family="text">
      <style:text-properties officeooo:rsid="033e0c7a"/>
    </style:style>
    <style:style style:name="T61" style:family="text">
      <style:text-properties officeooo:rsid="03422dce"/>
    </style:style>
    <style:style style:name="T62" style:family="text">
      <style:text-properties officeooo:rsid="0343ab14"/>
    </style:style>
    <style:style style:name="T63" style:family="text">
      <style:text-properties officeooo:rsid="03450b5a"/>
    </style:style>
    <style:style style:name="T64" style:family="text">
      <style:text-properties officeooo:rsid="0346cfa8"/>
    </style:style>
    <style:style style:name="T65" style:family="text">
      <style:text-properties officeooo:rsid="034a758b"/>
    </style:style>
    <style:style style:name="T66" style:family="text">
      <style:text-properties officeooo:rsid="034bcc72"/>
    </style:style>
    <style:style style:name="T67" style:family="text">
      <style:text-properties officeooo:rsid="034d2197"/>
    </style:style>
    <style:style style:name="T68" style:family="text">
      <style:text-properties officeooo:rsid="034f21e8"/>
    </style:style>
    <style:style style:name="T69" style:family="text">
      <style:text-properties officeooo:rsid="035ef0e7"/>
    </style:style>
    <style:style style:name="T70" style:family="text">
      <style:text-properties officeooo:rsid="036520b2"/>
    </style:style>
    <style:style style:name="T71" style:family="text">
      <style:text-properties officeooo:rsid="036763f9"/>
    </style:style>
    <style:style style:name="T72" style:family="text">
      <style:text-properties officeooo:rsid="037cc8bf"/>
    </style:style>
    <style:style style:name="T73" style:family="text">
      <style:text-properties officeooo:rsid="037d8793"/>
    </style:style>
    <style:style style:name="T74" style:family="text">
      <style:text-properties officeooo:rsid="037e9346"/>
    </style:style>
    <style:style style:name="T75" style:family="text">
      <style:text-properties officeooo:rsid="037ff211"/>
    </style:style>
    <style:style style:name="T76" style:family="text">
      <style:text-properties officeooo:rsid="03837808"/>
    </style:style>
    <style:style style:name="T77" style:family="text">
      <style:text-properties officeooo:rsid="038f8238"/>
    </style:style>
    <style:style style:name="T78" style:family="text">
      <style:text-properties officeooo:rsid="03919c03"/>
    </style:style>
    <style:style style:name="T79" style:family="text">
      <style:text-properties officeooo:rsid="03960ddf"/>
    </style:style>
    <style:style style:name="T80" style:family="text">
      <style:text-properties officeooo:rsid="039c9f46"/>
    </style:style>
    <style:style style:name="T81" style:family="text">
      <style:text-properties officeooo:rsid="03a591c7"/>
    </style:style>
    <style:style style:name="T82" style:family="text">
      <style:text-properties officeooo:rsid="03a688b2"/>
    </style:style>
    <style:style style:name="T83" style:family="text">
      <style:text-properties officeooo:rsid="03a90463"/>
    </style:style>
    <style:style style:name="T84" style:family="text">
      <style:text-properties officeooo:rsid="03a94733"/>
    </style:style>
    <style:style style:name="T85" style:family="text">
      <style:text-properties officeooo:rsid="03add5bd"/>
    </style:style>
    <style:style style:name="T86" style:family="text">
      <style:text-properties officeooo:rsid="03b09e88"/>
    </style:style>
    <style:style style:name="T87" style:family="text">
      <style:text-properties officeooo:rsid="03b255f3"/>
    </style:style>
    <style:style style:name="T88" style:family="text">
      <style:text-properties officeooo:rsid="03b815bb"/>
    </style:style>
    <style:style style:name="T89" style:family="text">
      <style:text-properties style:font-name="Liberation Sans" fo:font-size="14.1000003814697pt" fo:font-weight="bold" officeooo:rsid="03bc8036" style:font-name-asian="Noto Sans CJK SC" style:font-size-asian="14.1000003814697pt" style:font-weight-asian="bold" style:font-name-complex="Lohit Devanagari1" style:font-size-complex="14.1000003814697pt" style:font-weight-complex="bold"/>
    </style:style>
    <style:style style:name="T90" style:family="text">
      <style:text-properties style:font-name="Liberation Sans" fo:font-size="14.1000003814697pt" fo:font-weight="bold" officeooo:rsid="041acf58" style:font-name-asian="Noto Sans CJK SC" style:font-size-asian="14.1000003814697pt" style:font-weight-asian="bold" style:font-name-complex="Lohit Devanagari1" style:font-size-complex="14.1000003814697pt" style:font-weight-complex="bold"/>
    </style:style>
    <style:style style:name="T91" style:family="text">
      <style:text-properties style:font-name="Liberation Sans" fo:font-size="16.1000003814697pt" fo:font-weight="bold" officeooo:rsid="03ffcf27" style:font-name-asian="Noto Sans CJK SC" style:font-size-asian="16.1000003814697pt" style:font-weight-asian="bold" style:font-name-complex="Lohit Devanagari1" style:font-size-complex="16.1000003814697pt" style:font-weight-complex="bold"/>
    </style:style>
    <style:style style:name="T92" style:family="text">
      <style:text-properties style:font-name="Liberation Sans" fo:font-size="16.1000003814697pt" fo:font-weight="bold" officeooo:rsid="048e7433" style:font-name-asian="Noto Sans CJK SC" style:font-size-asian="16.1000003814697pt" style:font-weight-asian="bold" style:font-name-complex="Lohit Devanagari1" style:font-size-complex="16.1000003814697pt" style:font-weight-complex="bold"/>
    </style:style>
    <style:style style:name="T93" style:family="text">
      <style:text-properties style:font-name="Liberation Sans" fo:font-size="16.1000003814697pt" fo:font-weight="bold" officeooo:rsid="048fdd28" style:font-name-asian="Noto Sans CJK SC" style:font-size-asian="16.1000003814697pt" style:font-weight-asian="bold" style:font-name-complex="Lohit Devanagari1" style:font-size-complex="16.1000003814697pt" style:font-weight-complex="bold"/>
    </style:style>
    <style:style style:name="T94" style:family="text">
      <style:text-properties style:font-name="Liberation Sans" fo:font-size="16.1000003814697pt" fo:font-weight="bold" officeooo:rsid="04bd175f" style:font-name-asian="Noto Sans CJK SC" style:font-size-asian="16.1000003814697pt" style:font-weight-asian="bold" style:font-name-complex="Lohit Devanagari1" style:font-size-complex="16.1000003814697pt" style:font-weight-complex="bold"/>
    </style:style>
    <style:style style:name="T95" style:family="text">
      <style:text-properties style:font-name="Liberation Sans" fo:font-size="16.1000003814697pt" fo:font-weight="bold" officeooo:rsid="04c3be10" style:font-name-asian="Noto Sans CJK SC" style:font-size-asian="16.1000003814697pt" style:font-weight-asian="bold" style:font-name-complex="Lohit Devanagari1" style:font-size-complex="16.1000003814697pt" style:font-weight-complex="bold"/>
    </style:style>
    <style:style style:name="T96" style:family="text">
      <style:text-properties style:font-name="Liberation Sans" fo:font-size="16.1000003814697pt" fo:font-weight="bold" officeooo:rsid="057f6400" style:font-name-asian="Noto Sans CJK SC" style:font-size-asian="16.1000003814697pt" style:font-weight-asian="bold" style:font-name-complex="Lohit Devanagari1" style:font-size-complex="16.1000003814697pt" style:font-weight-complex="bold"/>
    </style:style>
    <style:style style:name="T97" style:family="text">
      <style:text-properties style:font-name="Liberation Sans" fo:font-size="16.1000003814697pt" fo:font-weight="bold" officeooo:rsid="06129959" style:font-name-asian="Noto Sans CJK SC" style:font-size-asian="16.1000003814697pt" style:font-weight-asian="bold" style:font-name-complex="Lohit Devanagari1" style:font-size-complex="16.1000003814697pt" style:font-weight-complex="bold"/>
    </style:style>
    <style:style style:name="T98" style:family="text">
      <style:text-properties officeooo:rsid="03be17ce"/>
    </style:style>
    <style:style style:name="T99" style:family="text">
      <style:text-properties officeooo:rsid="03e1e2e1"/>
    </style:style>
    <style:style style:name="T100" style:family="text">
      <style:text-properties officeooo:rsid="03e24208"/>
    </style:style>
    <style:style style:name="T101" style:family="text">
      <style:text-properties officeooo:rsid="03e35a26"/>
    </style:style>
    <style:style style:name="T102" style:family="text">
      <style:text-properties officeooo:rsid="040a77ba"/>
    </style:style>
    <style:style style:name="T103" style:family="text">
      <style:text-properties officeooo:rsid="040c1e8c"/>
    </style:style>
    <style:style style:name="T104" style:family="text">
      <style:text-properties officeooo:rsid="040f7a58"/>
    </style:style>
    <style:style style:name="T105" style:family="text">
      <style:text-properties officeooo:rsid="0417973c"/>
    </style:style>
    <style:style style:name="T106" style:family="text">
      <style:text-properties officeooo:rsid="041a32b3"/>
    </style:style>
    <style:style style:name="T107" style:family="text">
      <style:text-properties officeooo:rsid="041b7da3"/>
    </style:style>
    <style:style style:name="T108" style:family="text">
      <style:text-properties officeooo:rsid="02acfe54"/>
    </style:style>
    <style:style style:name="T109" style:family="text">
      <style:text-properties officeooo:rsid="04289287"/>
    </style:style>
    <style:style style:name="T110" style:family="text">
      <style:text-properties officeooo:rsid="04383f75"/>
    </style:style>
    <style:style style:name="T111" style:family="text">
      <style:text-properties officeooo:rsid="043dc6b5"/>
    </style:style>
    <style:style style:name="T112" style:family="text">
      <style:text-properties officeooo:rsid="04411ecb"/>
    </style:style>
    <style:style style:name="T113" style:family="text">
      <style:text-properties officeooo:rsid="04437bfa"/>
    </style:style>
    <style:style style:name="T114" style:family="text">
      <style:text-properties officeooo:rsid="0443e97f"/>
    </style:style>
    <style:style style:name="T115" style:family="text">
      <style:text-properties officeooo:rsid="0444fbb6"/>
    </style:style>
    <style:style style:name="T116" style:family="text">
      <style:text-properties officeooo:rsid="0445c246"/>
    </style:style>
    <style:style style:name="T117" style:family="text">
      <style:text-properties officeooo:rsid="044784ea"/>
    </style:style>
    <style:style style:name="T118" style:family="text">
      <style:text-properties officeooo:rsid="044aec79"/>
    </style:style>
    <style:style style:name="T119" style:family="text">
      <style:text-properties officeooo:rsid="044fb30f"/>
    </style:style>
    <style:style style:name="T120" style:family="text">
      <style:text-properties officeooo:rsid="04545b11"/>
    </style:style>
    <style:style style:name="T121" style:family="text">
      <style:text-properties officeooo:rsid="0455700a"/>
    </style:style>
    <style:style style:name="T122" style:family="text">
      <style:text-properties officeooo:rsid="04595cd6"/>
    </style:style>
    <style:style style:name="T123" style:family="text">
      <style:text-properties officeooo:rsid="0462c5b7"/>
    </style:style>
    <style:style style:name="T124" style:family="text">
      <style:text-properties officeooo:rsid="04793f57"/>
    </style:style>
    <style:style style:name="T125" style:family="text">
      <style:text-properties officeooo:rsid="048e7433"/>
    </style:style>
    <style:style style:name="T126" style:family="text">
      <style:text-properties officeooo:rsid="048fdd28"/>
    </style:style>
    <style:style style:name="T127" style:family="text">
      <style:text-properties officeooo:rsid="04975951"/>
    </style:style>
    <style:style style:name="T128" style:family="text">
      <style:text-properties officeooo:rsid="02abcd17"/>
    </style:style>
    <style:style style:name="T129" style:family="text">
      <style:text-properties officeooo:rsid="04a6e1a5"/>
    </style:style>
    <style:style style:name="T130" style:family="text">
      <style:text-properties officeooo:rsid="04e21b32"/>
    </style:style>
    <style:style style:name="T131" style:family="text">
      <style:text-properties officeooo:rsid="04e5cc3d"/>
    </style:style>
    <style:style style:name="T132" style:family="text">
      <style:text-properties officeooo:rsid="04fd91c4"/>
    </style:style>
    <style:style style:name="T133" style:family="text">
      <style:text-properties officeooo:rsid="0500b13b"/>
    </style:style>
    <style:style style:name="T134" style:family="text">
      <style:text-properties officeooo:rsid="05092184"/>
    </style:style>
    <style:style style:name="T135" style:family="text">
      <style:text-properties officeooo:rsid="050cc008"/>
    </style:style>
    <style:style style:name="T136" style:family="text">
      <style:text-properties officeooo:rsid="05195b90"/>
    </style:style>
    <style:style style:name="T137" style:family="text">
      <style:text-properties officeooo:rsid="0525a0fb"/>
    </style:style>
    <style:style style:name="T138" style:family="text">
      <style:text-properties officeooo:rsid="054d484b"/>
    </style:style>
    <style:style style:name="T139" style:family="text">
      <style:text-properties officeooo:rsid="054e1e80"/>
    </style:style>
    <style:style style:name="T140" style:family="text">
      <style:text-properties officeooo:rsid="056c2eb4"/>
    </style:style>
    <style:style style:name="T141" style:family="text">
      <style:text-properties officeooo:rsid="057adfba"/>
    </style:style>
    <style:style style:name="T142" style:family="text">
      <style:text-properties officeooo:rsid="0595bacf"/>
    </style:style>
    <style:style style:name="T143" style:family="text">
      <style:text-properties officeooo:rsid="059dbb77"/>
    </style:style>
    <style:style style:name="T144" style:family="text">
      <style:text-properties officeooo:rsid="05adff89"/>
    </style:style>
    <style:style style:name="T145" style:family="text">
      <style:text-properties officeooo:rsid="05ae0552"/>
    </style:style>
    <style:style style:name="T146" style:family="text">
      <style:text-properties officeooo:rsid="05b4a6eb"/>
    </style:style>
    <style:style style:name="T147" style:family="text">
      <style:text-properties officeooo:rsid="05b91f09"/>
    </style:style>
    <style:style style:name="T148" style:family="text">
      <style:text-properties officeooo:rsid="05bd7c17"/>
    </style:style>
    <style:style style:name="T149" style:family="text">
      <style:text-properties officeooo:rsid="05bd919d"/>
    </style:style>
    <style:style style:name="T150" style:family="text">
      <style:text-properties officeooo:rsid="05c47541"/>
    </style:style>
    <style:style style:name="T151" style:family="text">
      <style:text-properties officeooo:rsid="05c69c44"/>
    </style:style>
    <style:style style:name="T152" style:family="text">
      <style:text-properties officeooo:rsid="05c761c8"/>
    </style:style>
    <style:style style:name="T153" style:family="text">
      <style:text-properties officeooo:rsid="05d46a80"/>
    </style:style>
    <style:style style:name="T154" style:family="text">
      <style:text-properties officeooo:rsid="05d541b4"/>
    </style:style>
    <style:style style:name="T155" style:family="text">
      <style:text-properties officeooo:rsid="05d59e40"/>
    </style:style>
    <style:style style:name="T156" style:family="text">
      <style:text-properties officeooo:rsid="05dfe993"/>
    </style:style>
    <style:style style:name="T157" style:family="text">
      <style:text-properties officeooo:rsid="05e22b72"/>
    </style:style>
    <style:style style:name="T158" style:family="text">
      <style:text-properties officeooo:rsid="05e25c96"/>
    </style:style>
    <style:style style:name="T159" style:family="text">
      <style:text-properties officeooo:rsid="05e3f3c5"/>
    </style:style>
    <style:style style:name="T160" style:family="text">
      <style:text-properties officeooo:rsid="05ecfcd9"/>
    </style:style>
    <style:style style:name="T161" style:family="text">
      <style:text-properties officeooo:rsid="05ef108b"/>
    </style:style>
    <style:style style:name="T162" style:family="text">
      <style:text-properties officeooo:rsid="05f0b5ad"/>
    </style:style>
    <style:style style:name="T163" style:family="text">
      <style:text-properties officeooo:rsid="05f10814"/>
    </style:style>
    <style:style style:name="T164" style:family="text">
      <style:text-properties officeooo:rsid="05f2ebec"/>
    </style:style>
    <style:style style:name="T165" style:family="text">
      <style:text-properties style:font-name="Liberation Serif"/>
    </style:style>
    <style:style style:name="T166" style:family="text">
      <style:text-properties style:font-name="Liberation Serif" officeooo:rsid="05fb0707"/>
    </style:style>
    <style:style style:name="T167" style:family="text">
      <style:text-properties officeooo:rsid="05fe7225"/>
    </style:style>
    <style:style style:name="T168" style:family="text">
      <style:text-properties officeooo:rsid="0605acf7"/>
    </style:style>
    <style:style style:name="T169" style:family="text">
      <style:text-properties officeooo:rsid="0606c8f2"/>
    </style:style>
    <style:style style:name="T170" style:family="text">
      <style:text-properties officeooo:rsid="060784b9"/>
    </style:style>
    <style:style style:name="T171" style:family="text">
      <style:text-properties officeooo:rsid="06094056"/>
    </style:style>
    <style:style style:name="T172" style:family="text">
      <style:text-properties officeooo:rsid="060ba20c"/>
    </style:style>
    <style:style style:name="T173" style:family="text">
      <style:text-properties officeooo:rsid="060c3034"/>
    </style:style>
    <style:style style:name="T174" style:family="text">
      <style:text-properties officeooo:rsid="06108c85"/>
    </style:style>
    <style:style style:name="T175" style:family="text">
      <style:text-properties officeooo:rsid="0611a3ea"/>
    </style:style>
    <style:style style:name="T176" style:family="text">
      <style:text-properties officeooo:rsid="060cb700"/>
    </style:style>
    <style:style style:name="T177" style:family="text">
      <style:text-properties officeooo:rsid="0612fa43"/>
    </style:style>
    <style:style style:name="T178" style:family="text">
      <style:text-properties officeooo:rsid="06146bfb"/>
    </style:style>
    <style:style style:name="T179" style:family="text">
      <style:text-properties officeooo:rsid="061502ea"/>
    </style:style>
    <style:style style:name="T180" style:family="text">
      <style:text-properties officeooo:rsid="0618a004"/>
    </style:style>
    <style:style style:name="T181" style:family="text">
      <style:text-properties officeooo:rsid="061a5ea2"/>
    </style:style>
    <style:style style:name="T182" style:family="text">
      <style:text-properties officeooo:rsid="061b0eb6"/>
    </style:style>
    <style:style style:name="T183" style:family="text">
      <style:text-properties officeooo:rsid="061c677a"/>
    </style:style>
    <style:style style:name="T184" style:family="text">
      <style:text-properties officeooo:rsid="061f7d1e"/>
    </style:style>
    <style:style style:name="T185" style:family="text">
      <style:text-properties officeooo:rsid="06210a1b"/>
    </style:style>
    <style:style style:name="T186" style:family="text">
      <style:text-properties officeooo:rsid="06221251"/>
    </style:style>
    <style:style style:name="T187" style:family="text">
      <style:text-properties officeooo:rsid="06229bff"/>
    </style:style>
    <style:style style:name="T188" style:family="text">
      <style:text-properties officeooo:rsid="062576ad"/>
    </style:style>
    <style:style style:name="T189" style:family="text">
      <style:text-properties officeooo:rsid="0626368c"/>
    </style:style>
    <style:style style:name="T190" style:family="text">
      <style:text-properties officeooo:rsid="06331761"/>
    </style:style>
    <style:style style:name="T191" style:family="text">
      <style:text-properties officeooo:rsid="0634f363"/>
    </style:style>
    <style:style style:name="T192" style:family="text">
      <style:text-properties officeooo:rsid="06364b10"/>
    </style:style>
    <style:style style:name="T193" style:family="text">
      <style:text-properties officeooo:rsid="0638028d"/>
    </style:style>
    <style:style style:name="T194" style:family="text">
      <style:text-properties officeooo:rsid="06398872"/>
    </style:style>
    <style:style style:name="T195" style:family="text">
      <style:text-properties officeooo:rsid="06480646"/>
    </style:style>
    <style:style style:name="T196" style:family="text">
      <style:text-properties officeooo:rsid="06498a9d"/>
    </style:style>
    <style:style style:name="T197" style:family="text">
      <style:text-properties officeooo:rsid="064b5769"/>
    </style:style>
    <style:style style:name="T198" style:family="text">
      <style:text-properties officeooo:rsid="064be849"/>
    </style:style>
    <style:style style:name="T199" style:family="text">
      <style:text-properties officeooo:rsid="064c9751"/>
    </style:style>
    <style:style style:name="T200" style:family="text">
      <style:text-properties officeooo:rsid="064cf0fe"/>
    </style:style>
    <style:style style:name="T201" style:family="text">
      <style:text-properties officeooo:rsid="06511d28"/>
    </style:style>
    <style:style style:name="T202" style:family="text">
      <style:text-properties officeooo:rsid="06525937"/>
    </style:style>
    <style:style style:name="T203" style:family="text">
      <style:text-properties officeooo:rsid="0654663c"/>
    </style:style>
    <style:style style:name="T204" style:family="text">
      <style:text-properties officeooo:rsid="06576ec7"/>
    </style:style>
    <style:style style:name="T205" style:family="text">
      <style:text-properties officeooo:rsid="065899c7"/>
    </style:style>
    <style:style style:name="T206" style:family="text">
      <style:text-properties officeooo:rsid="065a126e"/>
    </style:style>
    <style:style style:name="T207" style:family="text">
      <style:text-properties officeooo:rsid="065bcf5e"/>
    </style:style>
    <style:style style:name="T208" style:family="text">
      <style:text-properties officeooo:rsid="065c9535"/>
    </style:style>
    <style:style style:name="T209" style:family="text">
      <style:text-properties officeooo:rsid="065d96aa"/>
    </style:style>
    <style:style style:name="T210" style:family="text">
      <style:text-properties officeooo:rsid="0666b695"/>
    </style:style>
    <style:style style:name="T211" style:family="text">
      <style:text-properties officeooo:rsid="066780df"/>
    </style:style>
    <style:style style:name="T212" style:family="text">
      <style:text-properties fo:font-style="italic" officeooo:rsid="066780df" style:font-style-asian="italic" style:font-style-complex="italic"/>
    </style:style>
    <style:style style:name="T213" style:family="text">
      <style:text-properties fo:font-style="italic" officeooo:rsid="0674b6bf" style:font-style-asian="italic" style:font-style-complex="italic"/>
    </style:style>
    <style:style style:name="T214" style:family="text">
      <style:text-properties fo:font-style="italic" officeooo:rsid="06767328" style:font-style-asian="italic" style:font-style-complex="italic"/>
    </style:style>
    <style:style style:name="T215" style:family="text">
      <style:text-properties fo:font-style="italic" officeooo:rsid="0693ec03" style:font-style-asian="italic" style:font-style-complex="italic"/>
    </style:style>
    <style:style style:name="T216" style:family="text">
      <style:text-properties officeooo:rsid="066978d4"/>
    </style:style>
    <style:style style:name="T217" style:family="text">
      <style:text-properties officeooo:rsid="066a2653"/>
    </style:style>
    <style:style style:name="T218" style:family="text">
      <style:text-properties officeooo:rsid="067292de"/>
    </style:style>
    <style:style style:name="T219" style:family="text">
      <style:text-properties officeooo:rsid="06735e59"/>
    </style:style>
    <style:style style:name="T220" style:family="text">
      <style:text-properties officeooo:rsid="0674b6bf"/>
    </style:style>
    <style:style style:name="T221" style:family="text">
      <style:text-properties officeooo:rsid="0677799a"/>
    </style:style>
    <style:style style:name="T222" style:family="text">
      <style:text-properties officeooo:rsid="067fd33a"/>
    </style:style>
    <style:style style:name="T223" style:family="text">
      <style:text-properties officeooo:rsid="0681220d"/>
    </style:style>
    <style:style style:name="T224" style:family="text">
      <style:text-properties officeooo:rsid="0683123e"/>
    </style:style>
    <style:style style:name="T225" style:family="text">
      <style:text-properties officeooo:rsid="06883dfb"/>
    </style:style>
    <style:style style:name="T226" style:family="text">
      <style:text-properties officeooo:rsid="068c7637"/>
    </style:style>
    <style:style style:name="T227" style:family="text">
      <style:text-properties officeooo:rsid="068de852"/>
    </style:style>
    <style:style style:name="T228" style:family="text">
      <style:text-properties officeooo:rsid="068f590b"/>
    </style:style>
    <style:style style:name="T229" style:family="text">
      <style:text-properties officeooo:rsid="0690e14d"/>
    </style:style>
    <style:style style:name="T230" style:family="text">
      <style:text-properties officeooo:rsid="06932c0f"/>
    </style:style>
    <style:style style:name="T231" style:family="text">
      <style:text-properties officeooo:rsid="0693ec03"/>
    </style:style>
    <style:style style:name="T232" style:family="text">
      <style:text-properties officeooo:rsid="0697da6a"/>
    </style:style>
    <style:style style:name="T233" style:family="text">
      <style:text-properties officeooo:rsid="069559f7"/>
    </style:style>
    <style:style style:name="T234" style:family="text">
      <style:text-properties officeooo:rsid="0699c6f2"/>
    </style:style>
    <style:style style:name="T235" style:family="text">
      <style:text-properties officeooo:rsid="069ae4a1"/>
    </style:style>
    <style:style style:name="T236" style:family="text">
      <style:text-properties officeooo:rsid="069b7bea"/>
    </style:style>
    <style:style style:name="T237" style:family="text">
      <style:text-properties officeooo:rsid="069bc81d"/>
    </style:style>
    <style:style style:name="T238" style:family="text">
      <style:text-properties officeooo:rsid="069bf237"/>
    </style:style>
    <style:style style:name="T239" style:family="text">
      <style:text-properties officeooo:rsid="069d173a"/>
    </style:style>
    <style:style style:name="T240" style:family="text">
      <style:text-properties officeooo:rsid="069f188e"/>
    </style:style>
    <style:style style:name="T241" style:family="text">
      <style:text-properties officeooo:rsid="06a0a83e"/>
    </style:style>
    <style:style style:name="T242" style:family="text">
      <style:text-properties officeooo:rsid="06a261ab"/>
    </style:style>
    <style:style style:name="T243" style:family="text">
      <style:text-properties officeooo:rsid="06a267c8"/>
    </style:style>
    <style:style style:name="T244" style:family="text">
      <style:text-properties officeooo:rsid="06a3c72e"/>
    </style:style>
    <style:style style:name="T245" style:family="text">
      <style:text-properties officeooo:rsid="06a4eb23"/>
    </style:style>
    <style:style style:name="T246" style:family="text">
      <style:text-properties officeooo:rsid="06a8e4d6"/>
    </style:style>
    <style:style style:name="T247" style:family="text">
      <style:text-properties officeooo:rsid="06a9624d"/>
    </style:style>
    <style:style style:name="T248" style:family="text">
      <style:text-properties officeooo:rsid="06ae8fd5"/>
    </style:style>
    <style:style style:name="T249" style:family="text">
      <style:text-properties officeooo:rsid="06b00f9a"/>
    </style:style>
    <style:style style:name="T250" style:family="text">
      <style:text-properties officeooo:rsid="06ba4271"/>
    </style:style>
    <style:style style:name="T251" style:family="text">
      <style:text-properties officeooo:rsid="06bc32a4"/>
    </style:style>
    <style:style style:name="T252" style:family="text">
      <style:text-properties officeooo:rsid="06cab2d7"/>
    </style:style>
    <style:style style:name="T253" style:family="text">
      <style:text-properties officeooo:rsid="06cb4c29"/>
    </style:style>
    <style:style style:name="T254" style:family="text">
      <style:text-properties officeooo:rsid="06d15047"/>
    </style:style>
    <style:style style:name="T255" style:family="text">
      <style:text-properties officeooo:rsid="06d25b42"/>
    </style:style>
    <style:style style:name="T256" style:family="text">
      <style:text-properties officeooo:rsid="06d3eb7f"/>
    </style:style>
    <style:style style:name="T257" style:family="text">
      <style:text-properties officeooo:rsid="06dbfacb"/>
    </style:style>
    <style:style style:name="T25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a" fo:country="V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ior terminorum tractatu<text:span text:style-name="T1">lu</text:span>s facilis</text:h>
      <text:p text:style-name="Text_20_body">/<text:span text:style-name="T6">16</text:span><text:span text:style-name="T122">a</text:span>/</text:p>
      <text:p text:style-name="Subtitle">De terminis.</text:p>
      <text:h text:style-name="Heading_20_2" text:outline-level="2">Praefatio</text:h>
      <text:p text:style-name="Subtitle"/>
      <text:p text:style-name="P110">Apud sapientem proverbium, XXII capitulo, legimus: “Ne transgrediaris terminos antiquos, quos posuerunt patres tui”.</text:p>
      <text:p text:style-name="P110">Quod impraesentiarum dupliciter exponere lubet.</text:p>
      <text:p text:style-name="P110">Uno modo sic: Ne tu Summulista future logicam in limine salutaveris, donec terminos (quos patre tui dialectici tradidere) praelibaberis.</text:p>
      <text:p text:style-name="P110"><text:span text:style-name="T153">Secundo sic: Novas terminorum sectiones cum senticosis argutiolis tamquam aconitum logices fugito, quia illae temporis curriculo in introductionibus et logica examussim colligentur. Sed terminorum definitiones et partitiones antiquas (quas patres tui posuere) non tran</text:span><text:span text:style-name="T154">s</text:span><text:span text:style-name="T153">grediaris.</text:span></text:p>
      <text:p text:style-name="P110">Proptere<text:span text:style-name="T155">a</text:span> non demirabere si succin<text:span text:style-name="T155">c</text:span>te et lu<text:span text:style-name="T155">cid</text:span>e, in hoc terminorum tractatulo, captu faciliora noviti<text:span text:style-name="T155">i</text:span>s in hac arte trad<text:span text:style-name="T154">e</text:span>ndo, sine rationum ampullosis nexibus et elaboratis sophismatis procedam. Remigitur aggredientes dicamus.</text:p>
      <text:p text:style-name="P241">Sicut primo Elenchorum Aristoteles dicit qui terminorum significantias non capiunt, facile paralogizantur. Eam ob rem aliqua communis et introductoria in terminis sine nodosis vorticibus tradenda veniunt.</text:p>
      <text:h text:style-name="Heading_20_2" text:outline-level="2">Consequentia finitio</text:h>
      <text:p text:style-name="P110">Consequentia est oratio ex antecedente, consequente et illationis nota, illative tenta conflata.</text:p>
      <text:p text:style-name="P110">Antecedens est propositio aliam inferens.</text:p>
      <text:p text:style-name="P242">Ut in hac:</text:p>
      <text:p text:style-name="P403"><text:soft-page-break/>Homo currit; ergo</text:p>
      <text:p text:style-name="P403">Animal currit.</text:p>
      <text:p text:style-name="P406"/>
      <text:p text:style-name="P406">“Homo currit” est antecedens, “Animal currit” consequens, et ‘ergo’ illationis repr<text:span text:style-name="T156">a</text:span>esentatio.</text:p>
      <text:p text:style-name="P407">In conditionali antecedens immediate sequitur coniunctionem ‘si’ <text:span text:style-name="T157">s</text:span>ic in causali. <text:span text:style-name="T157">U</text:span>nde fit consequens est totius nexus pars, sicut et ipsum antecedens.</text:p>
      <text:p text:style-name="P408">Consequentis definitio <text:span text:style-name="T157">ex antecedentis descriptione facile cognoscitur. Est enim propositio ab alia illata.</text:span></text:p>
      <text:p text:style-name="P409"><text:span text:style-name="T158">Caeterum /16b/ </text:span><text:span text:style-name="T159">quando sunt duae propositiones in antecedente ut in syllogismo, prior maior, posterior vero minor, appellatur. At si plures quam duae ponantur singularibus nominibus respondeto.</text:span></text:p>
      <text:p text:style-name="P110">Consequentia bona est ea cuius antecedens non potest esse verum, consequente existente falso.</text:p>
      <text:p text:style-name="P110"><text:span text:style-name="T159">Mala oppositio modo describitur. </text:span><text:s/></text:p>
      <text:p text:style-name="P410">Ex hac definitione propositiones corollariae sunto, quas ingeniosus iuvenis facile seriatim recitaverit, quarum prima esto:</text:p>
      <text:p text:style-name="P410">Omnis consequentia cuius antecedens non potest esse verum est bona. De hac “Omnis propositio est particularis; ergo Homo est asinus” in praesentia non insisto.</text:p>
      <text:p text:style-name="P411">Secunda: <text:span text:style-name="T160">E</text:span>x hac statim sequens est haec: Omnis consequentia cuius antecedens est impossibile, est bona.</text:p>
      <text:p text:style-name="P412">Tertia: Omnis consequentia cuius antecedens potest esse verum et consequens impossibile est mala.</text:p>
      <text:p text:style-name="P412">Quarta: Omnis consequentia cuius antecedens est necessarium et consequens contingens est invalida.</text:p>
      <text:p text:style-name="P412">Quinta: Omnis consequentia cuius consequens est necessarium est bona.</text:p>
      <text:p text:style-name="P413">Sexto patet hanc esse bonam:</text:p>
      <text:p text:style-name="P403">Sortes currit; ergo</text:p>
      <text:p text:style-name="P403">Sortes movetur.</text:p>
      <text:p text:style-name="P413"/>
      <text:p text:style-name="P413">Et hanc malam:</text:p>
      <text:p text:style-name="P403">Sortes movetur; ergo</text:p>
      <text:p text:style-name="P403">Sortes currit.</text:p>
      <text:p text:style-name="P414"/>
      <text:p text:style-name="P414">Septima: Ex vero non sequitur falsum. Bene autem econverso doctrinaliter et non de rigore hic procedo. Protinus ex quid nominis bonae consequentiae haec stipare potes. Item idem aliarum malitiam enucleare.</text:p>
      <text:p text:style-name="P110"><text:soft-page-break/>Ante omnia doceatur opponens probare negatum.</text:p>
      <text:p text:style-name="P243">Ut negata hac propositione “Non-Deus est” argumentor sic. Omne sequens ex vero est verum, “Non-Deus est” huiuscemodi; ergo est vera quod restabat probandum. Maior est corollarium nuperrime illatum, et minor patet.</text:p>
      <text:p text:style-name="P243">Bene sequitur:</text:p>
      <text:p text:style-name="P404">Aliquod ens quod non est Deus est;</text:p>
      <text:p text:style-name="P404">ergo</text:p>
      <text:p text:style-name="P403">Non-Deus est.</text:p>
      <text:p text:style-name="Standard"/>
      <text:p text:style-name="P244">Antecedens est verum; ergo et consequens, <text:span text:style-name="T161">quod erat probandum.</text:span></text:p>
      <text:p text:style-name="P248">Antecedens probo, bene sequitur:</text:p>
      <text:p text:style-name="P404">Sortes est;</text:p>
      <text:p text:style-name="P404">ergo</text:p>
      <text:p text:style-name="P403">Aliquod ens quod non est Deus est.</text:p>
      <text:p text:style-name="P403"/>
      <text:p text:style-name="P248">Per definitionem bonae consequentiae, et antecedens est verum; ergo et consequens quod ostendendum relinquebatur.</text:p>
      <text:p text:style-name="P249">Concesso consequentiae sic argumentor:</text:p>
      <text:p text:style-name="P404">Aliquod ens quod non est Deus est; </text:p>
      <text:p text:style-name="P404">ergo</text:p>
      <text:p text:style-name="P403">Non-Deus est.</text:p>
      <text:p text:style-name="P403"/>
      <text:p text:style-name="P245"><text:span text:style-name="T162">Ab aequivalentibus antecedens est verum; ergo et consequens, quod roborandum </text:span><text:span text:style-name="T163">manserat, dicetur capiendo non infinitanter consequentia est bona, neganter ipsa est mala.</text:span></text:p>
      <text:p text:style-name="P246">Doceatur etiam opponens inferre quod erat probandum, et cum exercitatus /17a/ <text:span text:style-name="T164">fuerit temporis curriculo non opus est passim ita inferre.</text:span></text:p>
      <text:p text:style-name="P110">Agnita vera concede, falsa inficiaberis, duplicia distinctione separaveris.</text:p>
      <text:p text:style-name="P250">Cum ex vero falsum minime sequatur et ob falsi interemptionem eius oppositum verum in valore concedis, haud improbe respondes, amphibologica occurrentia distinguas, ut de hac praefata “Non-Deus est” quare si proponatur tibi haec “Asini sunt sacerdotes” eam negabis etsi opponens argumentaretur:</text:p>
      <text:p text:style-name="P403">Omnes episcopi sunt sacerdotes;</text:p>
      <text:p text:style-name="P405">Asini sunt episcopi;</text:p>
      <text:p text:style-name="P405">ergo</text:p>
      <text:p text:style-name="P403">Asini sunt sacerdotes.</text:p>
      <text:p text:style-name="P403"/>
      <text:p text:style-name="P251">Dicas transeat maior, minorem distingue, penes hoc quod ‘episcopi’ potest esse obliquus aut rectus. Si primum, mox vides consequentiam negandam, esto quod nec Darii aut fallaciae ullum vigorem cognoveris, et quando talem portum inveneris non opponas te maiori. Sed dicas “Transeat”, hoc est, <text:soft-page-break/>quidquid sit de eius veritate consequenter respondeo. Nec per maioris aut alterius partis ultroneum transitum illam concedere posthac cogeris.</text:p>
      <text:p text:style-name="P251">Si secundum, consequentia est bona sed sicut consequens est falsum, ita et antecedens pro minore.</text:p>
      <text:p text:style-name="P252"><text:span text:style-name="T165">Caeterum argumentationem </text:span><text:span text:style-name="T166">antequam respondens ad partes loquatur integrae illibareque repetat, quia ratiocinatio digeste repetita est partim soluta, et inter respondendum quorsum argumentationis virtus tendat pensiculate trutinet, quia ex praecipiti et impraemeditata responsione saepius respondens hallucinatur. In qua responsione maxime enitendum est ut in eadem forma repetatur, quia ab opponente est proposita non mutata sententia, dein quaelibet particula singillatim est repetenda quibus propriis et peculiaribus nominibus respondebis distinguendo, negando, aut affirmando. <text:s text:c="5"/></text:span></text:p>
      <text:p text:style-name="P247"/>
      <text:p text:style-name="Text_20_body"/>
      <text:p text:style-name="Text_20_body"/>
      <text:p text:style-name="Text_20_body"/>
      <text:p text:style-name="Text_20_body"/>
      <text:h text:style-name="P417" text:outline-level="2">De definitione</text:h>
      <text:p text:style-name="Subtitle">Definitionis finitio facilis</text:p>
      <text:p text:style-name="P110">Definitio est oratio superfluitatis expers, definiti explicativa, et cum eo convertibilis.</text:p>
      <text:p text:style-name="P253">Et hoc est quod Aristoteles Primo Topicorum innuit inquiens: “Definitio est oratio indicativa rei”.</text:p>
      <text:p text:style-name="P253">Et Quintilianus: “Finitio est rei propositae, propria dilucida et breviter comprehensa verbis enuntiatio”.</text:p>
      <text:p text:style-name="P253"><text:span text:style-name="T167">Et Porphyrius definitionem generis pro hoc quod nihil superfui aut penuriae contineat probat esse bonam. </text:span><text:s/></text:p>
      <text:p text:style-name="P254">Ad bonam definitionem tria requiruntur et sufficiunt:</text:p>
      <text:list text:style-name="L1">
        <text:list-item>
          <text:p text:style-name="P442">Primo: definitionem cuilibet contexto sub definito convenire necessum est. Quare haec non est /17b/ bona definitio animalis “Substantia rationalis”, quae belluis non convenit, quae sub definito continentur.</text:p>
        </text:list-item>
        <text:list-item>
          <text:p text:style-name="P443">Secundo: Soli definitio competere debet, quare haec oratio “Substantia sensitiva”, non est bona definitio hominis, cum pecoribus conveniat.</text:p>
        </text:list-item>
        <text:list-item>
          <text:p text:style-name="P443">Tertia: Definitionis proprietas est luculenter naturam definiti explanare. Idcirco arbor eversa haud quamquam est hominis bona definitio.</text:p>
        </text:list-item>
      </text:list>
      <text:p text:style-name="P255">Contra ista argumentor: Non sequitur “Animal rationale” est definitio hominis; ergo ‘homo’ est definitio hominis; ergo definitio non convertitur cum definito.</text:p>
      <text:p text:style-name="P256">Responsio est clara, <text:span text:style-name="T168">n</text:span>am sicut dicit Philosophus Secundo Metaphysicae: “Indigne ferunt in convivis <text:s/>si ad nimium solutio fiat”. Si tamen iuvenes respondere nequeant regentis est suppetias ferre.</text:p>
      <text:p text:style-name="P110">Definitum propinquum est terminus cuius rei significa<text:span text:style-name="T169">ta</text:span>e naturam definitio convertibiliter aperit.</text:p>
      <text:p text:style-name="P109"><text:span text:style-name="T176">Exemplariter patet “Animal rationale” est </text:span><text:span text:style-name="T175">definitio</text:span><text:span text:style-name="T176"> hominis, cuius definitum propinquum est terminus ‘homo’.</text:span></text:p>
      <text:p text:style-name="P109"><text:span text:style-name="T176">Et quaelibet res proprie per definitum propinquum significata, est </text:span><text:span text:style-name="T177">definitum </text:span><text:span text:style-name="T176">remotum.</text:span></text:p>
      <text:p text:style-name="P257">Contra: Ex isto sequitur eiusdem definitionis plura esse definita, consequens est falsum; ergo et antecedens.</text:p>
      <text:p text:style-name="P258">Respondetur: <text:span text:style-name="T171">D</text:span>istinguendo <text:span text:style-name="T171">s</text:span>equelam vel plura <text:span text:style-name="T170">definita quorum unum est propinquum et aliud remotum, vel ambo remota et sic eam concedo, vel plura propinqua et sic eo inficias.</text:span></text:p>
      <text:p text:style-name="P259">Contra hoc argumentor: Iste terminus ‘homo’ in voce et in scripto est definitu<text:span text:style-name="T171">m</text:span> propinquum huius definitionis “animal rationale”; ergo <text:span text:style-name="T171">eiusdem definitionis plura sunt definita propinqua.</text:span></text:p>
      <text:p text:style-name="P261"><text:soft-page-break/>Respondetur: Distinguendo consequens vel plura propinqua synonyma et sic conceditur, vel non synonyma et sic negatur, vocalis enim notio scriptae est synonyma.</text:p>
      <text:p text:style-name="P262">Ex quo sequitur cuiuslibet definitionis definito propinquo vocabulum quolibet synonymum est etiam definitum propinquum, secus est in remotis definitis. Patet de scriptura ‘homo’ et voce ‘homo’ respectu definitionis substantiae.</text:p>
      <text:p text:style-name="P260"><text:span text:style-name="T172">Secundo: Sequitur eandem rem esse definitum remotum et definitionem respectu eiusdem definiti propinqui. Patet in definitione /18a/ </text:span><text:span text:style-name="T173">definitionis.</text:span></text:p>
      <text:p text:style-name="P263">Tertio <text:span text:style-name="T178">s</text:span>equitur: <text:span text:style-name="T178">I</text:span>dem est definitum propinquum et remotum respectu eiusdem definitionis. Patet in praesentia ex quo iterum sequitur relative opposita verificantur de eodem respectu eiusdem, diversis tamen rationibus.</text:p>
      <text:p text:style-name="P260"><text:span text:style-name="T174">Quarto </text:span><text:span text:style-name="T178">s</text:span><text:span text:style-name="T174">equitur: </text:span><text:span text:style-name="T178">A</text:span><text:span text:style-name="T174">liquid est definitum remotum cui definitio non convenit, </text:span><text:span text:style-name="T178">patet definiendo hunc terminum non definitum remotum.</text:span></text:p>
      <text:p text:style-name="P264">Quinto sequitur: Licet conceptus non-ultimatus termini ‘homo’ ipsum proprie significet, non tamen sequitur terminum ‘homo’ esse definitum remotum huius definitionis “homo est animal rationale”, quia licet conceptus ille sit definitum propinquum, non tamen in sic repraesentando sed significando omnes homines, et hoc est quod per particulam ‘inquantum’ huiusmodi intelligimus.</text:p>
      <text:p text:style-name="P120">Materiam aliquam aggressurus definitionem praefaberis.</text:p>
      <text:p text:style-name="P277">Panitium primo officiorum hanc praetermittentem Cicero carpit: Alicuius materiae definitio non parum momenti ad illius intelligentiam administrat, prius vocabulum eius est superius ad definitum, posterius vero cum eo communius convertibile, ipsam rem complectens alienaque ab eo (instar agelli finis agrum suum ab aliis separans) segregare.</text:p>
      <text:p text:style-name="P265"><text:span text:style-name="T179"><text:s text:c="3"/></text:span><text:s/></text:p>
      <text:p text:style-name="P104"/>
      <text:p text:style-name="P255"/>
      <text:p text:style-name="Text_20_body"/>
      <text:h text:style-name="P417" text:outline-level="2">De divisione</text:h>
      <text:p text:style-name="Subtitle">Divisionis finitio</text:p>
      <text:p text:style-name="P110">Divisio logicalis est notionis superioris in suos ramos partitio, inter quos et divisum convertibilitas exigitur.</text:p>
      <text:p text:style-name="P266">Haec (sicut reliqui termini secundae intentionis) partitionis realis est similia, sicut partes integri toti aequantur. Ita disiunctum specierum dividentium toti parificantur.</text:p>
      <text:p text:style-name="P266">Tria ad divisionem logicalem requiruntur et sufficiunt.</text:p>
      <text:list text:style-name="L2">
        <text:list-item>
          <text:p text:style-name="P444">Primo: Exigitur divisum non transcendere membra dividentia.</text:p>
        </text:list-item>
        <text:list-item>
          <text:p text:style-name="P444">Secundo: Exigitur membra dividentia non posse exuperare divisum.</text:p>
        </text:list-item>
        <text:list-item>
          <text:p text:style-name="P444">Tertio: Membra partientia erunt formaliter opposita, licet nonnumquam materialiter coincidant supponendo pro eodem, numquam tamen secundum eandem rationem.</text:p>
        </text:list-item>
      </text:list>
      <text:p text:style-name="P278">Idem terminus est secundae intentionis et primae, ut mox paulo dicemus, sed alia est ratio sive causa quare est primae et alia ratio quare secundae dicatur.</text:p>
      <text:p text:style-name="P267"><text:span text:style-name="T180">Ex dictis infero aliqua primum illatum est, haec est mala divisio: </text:span><text:span text:style-name="T182">A</text:span><text:span text:style-name="T180">nimalium, aliud homo, aliud bos. Ob primae conditionis defectum.</text:span></text:p>
      <text:p text:style-name="P268"><text:span text:style-name="T180">Secundo. </text:span><text:span text:style-name="T182">H</text:span><text:span text:style-name="T180">aec est mala partitio: /18b/ </text:span><text:span text:style-name="T182">A</text:span><text:span text:style-name="T181">nimalium, aliud homo, aliud non-homo. Ob secundae mendum.</text:span></text:p>
      <text:p text:style-name="P269"><text:span text:style-name="T182">Tertio. Haec est bona divisio: </text:span><text:span text:style-name="T183">Animalium, quoddam homo, quoddam brutum. Patet illae tres conditiones praefatae isti conveniunt. Si enim haec tria alicui conveniant segregatio est bona, non est vis de veritate aut falsitate, propterea divisio bona et non vera aut falsa propositio appellatur.</text:span></text:p>
      <text:p text:style-name="P279">Contra dicta argumentor. Haec est bona divisio: Animalium, quoddam homo, quoddam brutum. Et tamen divisum excedit membra dividentia; ergo finitio divisionis est mala. Consequentia tenet cum maiore et minor patet. Divisum excedit hoc membrum dividens et illud membrum dividens; ergo divisum excedit membra dividentia.</text:p>
      <text:p text:style-name="P280">Secundo. Homo dividitur in vivum et pictum, et tamen unum membrorum dividentium excedit divisum, patet, homo pictus de Herculeo simulacro verificatur et non divisum.</text:p>
      <text:p text:style-name="P270"><text:span text:style-name="T184">Tertio. Haec est bona partitio: </text:span><text:span text:style-name="T185">Coloratum, aliud album, aliud nigrum, et sic de singulis coloratis. Et tamen divisum verificatur de scuto pro media parte alba secundum se et quodlibet sui, et alia medietate nigra, de quo nullum membrorum dividentium verificatur, igitur.</text:span></text:p>
      <text:p text:style-name="P271"><text:span text:style-name="T185">Quarto. </text:span><text:span text:style-name="T186">Vel iste terminus ‘animal’ dividitur in hominem et in brutum vel </text:span><text:span text:style-name="T187">animal in communi. </text:span><text:span text:style-name="T188">N</text:span><text:span text:style-name="T187">on secundum, quia nullum est tale distinctum ab homine et bruto. </text:span><text:span text:style-name="T188">N</text:span><text:span text:style-name="T187">on primum, iste terminus ‘animal’ nec est homo nec brutum.</text:span></text:p>
      <text:p text:style-name="P272">Ad primum negetur minor, et ad probationem concedo antecedens, copulative capiendo <text:span text:style-name="T189">coniunctionem et, et nego consequentiam.</text:span></text:p>
      <text:p text:style-name="P273"><text:soft-page-break/>Sed contra istud argumentor. Haec non est bona divisio: Animalium, quaedam homines, quaedam bruta; ergo nec alia de singulari numero. Antecedens patet, quia divisum verificatur de equite et suo caballo, de quibus nullum membrorum dividentium verificatur, igitur.</text:p>
      <text:p text:style-name="P274">Respondetur ad replicationem concedendo antecedens divisum posse verificari de aliquo de quo nullum membrorum dividentium verificatur, ut inter argumentandum probatur, et hoc est divisum ipsum membra dividentia transcendere, ut iacet divisio non valet in plurali numero, quoad disiunctum convertibile cum diviso capiatur, sic practicabis: Animalium, quaedam homines, quaedam bruta, quaedam homo et brutum, quaedam homo et belluae, quaedam bellua et homines, quaedam homines et bruta. /19a/</text:p>
      <text:p text:style-name="P276">Ad secundum respondetur. Quando est divisio aequivoci in sua aequivocata, divisum convertitur cum membro principali dividente, et alterum membrum transcendit divisum, et licet pictum dicatur de homine sine addito explicite, et non de homine vivo, tamen hominem pictum dat intelligere, talia sunt subiecta qualia permittuntur ab eorum praedicatis in aequivocis a consilio.</text:p>
      <text:p text:style-name="P275">Ad tertium bifariam respondeto.</text:p>
      <text:p text:style-name="P275">Primo: Scutum datum non est coloratum sed colorata, et consequenter concedendum est non omen corpus esse coloratum.</text:p>
      <text:p text:style-name="P275">Secundo: Concedo illud esse coloratum, nec partitio est bona, nisi aliud vel alia membra addantur, secundum exigentiam mixtionis, conformiter ad solutionem replicae argumenti primi.</text:p>
      <text:p text:style-name="P275">Ad quartum, dicitur iste terminus animal in communi non restrictus in hos ramos partitur, non ratione sui sed ratione rei proprie per ipsum significate.</text:p>
      <text:h text:style-name="P418" text:outline-level="2">De definitione termini ac significare</text:h>
      <text:p text:style-name="Subtitle">Definitio termini</text:p>
      <text:p text:style-name="P110">Terminus est signum ponibile in potentia propinqua in propositione consueta, tanquam pars eius praecipua.</text:p>
      <text:p text:style-name="P281">Signum ponitur loco generis est vocabulum communis. Siquidem omnis terminus est signum et non contra. Simulacrum Marianum est signum et non terminus, ponibile in potentia propinqua ob atramentum in lagena, <text:span text:style-name="T190">et aurum in monili locabile in propositione in potentia remota, ponibile in potentia propinqua. In propositione est ponibile in propositione sine mutatione per quam acquirit novam significationem.</text:span></text:p>
      <text:p text:style-name="P288">In propositione consueta per impositionem equus, asseres et res, ad extra possunt esse vocabula et propositiones, ad hoc sunt in pura obedientia, sed tales propositiones sunt inconsuetae, et termini inconsueti, de quibus impraesentiarum non loquimur.</text:p>
      <text:p text:style-name="P283">Tanquam pars eius, ob albedinem ponibilem inter pates propositionis.</text:p>
      <text:p text:style-name="P283">Diximus praecipua, pars remotissima propositionis est dictionis elementum. Pars remota est syllaba vocabuli, quae non sunt termini inquantum huiusmodi. Pars propinqua sive praecipua integrum vocabulum, ex cuius significatione repraesentatio totius propositionis consurget, ut ‘Deus’.</text:p>
      <text:p text:style-name="P108"><text:span text:style-name="T191">Contra definitionem sic explicatam argumentor, ex ea sequitur, ‘buf’ est terminus, similiter /19b/ </text:span><text:span text:style-name="T192">copula, oppositum posthac dicemus.</text:span></text:p>
      <text:p text:style-name="P289">Secundo: Nullus terminus alicuius fundi est definibilis a logico, et terminus est agelli extremitas, igitur.</text:p>
      <text:p text:style-name="P289">Tertio: Haec definitio convenit non-termino, patet, currendo per omnes particulas, et definitum non convenit huic cum termino opponatur.</text:p>
      <text:p text:style-name="P108"><text:span text:style-name="T193">Ad primum: Conceditur illatum, iam late vocabulum capimus alis strictius de eo locuturi.</text:span><text:span text:style-name="T191"> <text:s/></text:span></text:p>
      <text:p text:style-name="P282"><text:span text:style-name="T193">Ad secundum: </text:span><text:span text:style-name="T194">Concedo maiorem, distinguendo minorem, capiendo terminum primae intentionaliter et sic conceditur. Secundae intentionaliter negatur.</text:span></text:p>
      <text:p text:style-name="P290">Ad tertium: Distinguo maiorem, ‘si non’ terminus capiatur materialiter conceditur, significative negetur.</text:p>
      <text:p text:style-name="P282"><text:span text:style-name="T194">Primo modo non-terminus est terminus personaliter capto praedicato, et terminus est non-terminus similiter capiendo.</text:span> </text:p>
      <text:p text:style-name="P104"/>
      <text:p text:style-name="Text_20_body"/>
      <text:h text:style-name="Heading_20_2" text:outline-level="2"><text:soft-page-break/>De significare</text:h>
      <text:p text:style-name="Subtitle">De significare</text:p>
      <text:p text:style-name="P110">Significare est potentiae cognitivae aliquid, aliqua aut aliqualiter repraesentare.</text:p>
      <text:p text:style-name="P284">Repraesentare in definitionis calce loco generis locatur, licet repraesentare cum significare convertatur, quia eius significantia est notior in eius quid nominis ponitur.</text:p>
      <text:p text:style-name="P285">Dicitur potentiae cognitivae et non intellectivae, quia non solum potentiae intellectivae aliquid significatur, verum etiam potentiae cognitivae, agnati balatum ovis pia mater agnoscit, et liberali gallo vociferanti gallinae pro pastu occurrunt.</text:p>
      <text:p text:style-name="P286">Aliquid ob terminos singularis numeri non collectivos, quia praecise unum pro quo accipiuntur, et univoce significant, aliqua propter termino communes numeri pluralis et singularis numeri, collectivos ponitur, ut populus prima brevi homines. Et nunc non curamus partem hominis integralem hominem appellare. Vulgarem modum et facilem amplectimur.</text:p>
      <text:p text:style-name="P286">Dicitur aliqualiter propter syncategoremata significatione, quae nullam rem aut res significant, sed denotant conceptus vel terminos, super quos feruntur aliter accipit. Nonnumquam tamen ob breviloquium aliquid transcendenter capimus, ut aliqua et aliqualiter includat.</text:p>
      <text:h text:style-name="Heading_20_2" text:outline-level="2">De significare naturaliter et ad placitum</text:h>
      <text:p text:style-name="P159">/20a/</text:p>
      <text:p text:style-name="Subtitle">De significare naturaliter et ad placitum.</text:p>
      <text:p text:style-name="P110">Significare bifariam seiugatur. Nam quoddam est significare naturaliter, quod impositione semota repraesentat.</text:p>
      <text:p text:style-name="P110">Significare ad placitum est per se impositionem factam denotare.</text:p>
      <text:p text:style-name="P291">Non enim secludimus impositionem qualibet a dictione naturaliter significante, quaelibet res imponi potest ut significet, consequens est notionem imponi posse.</text:p>
      <text:p text:style-name="P291">Contra priorem definitionem argumentor: Vox ‘homo’ naturaliter significat se, ut posthac patebit, et tamen significat ad placitum; ergo non repraesentat impositione seclusa.</text:p>
      <text:p text:style-name="P292">Contra aliam definitionem argumentor: Tunc quilibet potest imponere vocabula ad significandum et sic eloquium a barbarie minime segregaretur.</text:p>
      <text:p text:style-name="P293">Ad priorem rationem respondetur: Seclusa impositione tantum valet quantum hoc complexum ‘si nulla esset’ circa hoc facta impositio istud significaret.</text:p>
      <text:p text:style-name="P293">Ad secundam respondetur: Impositio vocabulorum multifariam in usu est.</text:p>
      <text:p text:style-name="P293"><text:soft-page-break/>Sed triplicem modum et vulgatiorem enarrabimus.</text:p>
      <text:p text:style-name="P293">Primo est: Impositio ab eo (qui communiti praesenti aut future praeest) et sic Adamus protoparens quadripedibus altilibus et caeteris id genus nomina indidit. Unde recitatur Geneseos capite tertio:</text:p>
      <text:p text:style-name="P415">Formatis igitur Dominus Deus de homo cunctis animantibus terrae, et universis volatilibus caeli adduxit ea ad Adam, ut videret quid vocaret ea.</text:p>
      <text:p text:style-name="P295">Omne enim quod vocavit Adam, nomine viventis ipsum est nomen eius appellavitque. Adam nominibus suis cincta animantia et universa volatilia caeli, et omnes bestias terrae adduxit, hoc est, suo imperio fecit omnia esse Adamo praesentia, sicut volitio Dei efficax senis in diebus universum fabricatus est, sic raptim cuncta animantia collegit, a rerum proprietatibus nomina artificiose indidit. <text:s text:c="2"/>Illud fuit idioma Hebraeum quo post cataclysmum universi ad turris Babylonicae structuram usque sunt usi.</text:p>
      <text:p text:style-name="P294">Secundo: Ex variarum linguarum commercio novus ritus fandi emergit. Lingua Hibernica hoc explanat, quae cum ritu Hispanic<text:span text:style-name="T196">o</text:span> /20<text:span text:style-name="T195">b</text:span>/ <text:span text:style-name="T196">et insulanorum symbolizat. </text:span><text:span text:style-name="T198">E</text:span><text:span text:style-name="T196">t Saxones Britannis mixti Germanicam linguam plurimum alterarunt, et nos eam magis variatam hausimus. Picardi, Flandris finitimi, alienum modum loquendi Parisiensibus habent. </text:span><text:span text:style-name="T197">P</text:span><text:span text:style-name="T196">ropterea fidem his non impartior qui tantum septuaginta duas linguas ponunt.</text:span></text:p>
      <text:p text:style-name="P296"><text:span text:style-name="T199">Tertio: </text:span><text:span text:style-name="T208">M</text:span><text:span text:style-name="T199">odo consuetudine vocabula incrementum suscipiunt, sic in concinnum modum loquendi barbaries, et contra nonnumquam convertitur, cui astipulatur Horatius. Ut silvae foliis pronos mutantur in annos prima cadunt, ita verborum vetus interit aetas. Et paulo mox, multa renascentur quae iam cecidere cadentque quae nunc sunt in honore vocabula, </text:span><text:span text:style-name="T200">s</text:span><text:span text:style-name="T199">i volet usus et caetera. Tametsi insulso auspicio originem traxere, </text:span><text:span text:style-name="T200">temporum tractu, validas vires accipiunt, non alias Paracletus tertia brevi Spiritum Sanctum et non infamem significat. Ita Latii multa saecula dictionem acceperunt, nec ad Graecos oculus ullo modo est flectendus, dictio est Latina Graecanico cum fonte nihil commercii habens.</text:span></text:p>
      <text:p text:style-name="P297">Quo fit eorum acerbitas qui ecclesiastico ritu pronuntiantes taxant indiscreta. Res praescriptibiles titulo praescriptiones, sine alio titulo, dominii legitime praescribentis fiunt. Haud secus vocabula tempestatis curriculo fulcimentum susceptant. Insultas ‘<text:span text:style-name="T205">P</text:span>aracletus’ paenultima producta, hortatorem ac patronum significat. <text:span text:style-name="T201">At ‘</text:span><text:span text:style-name="T206">P</text:span><text:span text:style-name="T201">aracletus’ paenultima corrupta non est secum synonyma; igitur minorem inficior, nec alia ratio ab eruditorum receptissimo usu expiscanda est, nempe teste Flacco, </text:span><text:span text:style-name="T207">n</text:span><text:span text:style-name="T201">am penes arbitrium stat vis et norma loquendi.</text:span></text:p>
      <text:p text:style-name="P298"><text:span text:style-name="T201">Caeterum Franciscus Philelphus quadam in epistola arbitratur feminas, pueros et Terentiana usam fuisse lingua, quam forensem Cicero vocat. Hoc contra Leonardum Arentinum probare multifariam satagit, nunc ex peregrinorum commercio alius vulgaris successit sermo. </text:span><text:span text:style-name="T203">S</text:span><text:span text:style-name="T201">emper tamen litterati grammaticae insudantes linguam separatam a vulgo habebant, uti in nostris hodierno die usu venit. Porro si vulgus omne Plautinas comoedias ac Terentianas non calluisset, ineptissime fuissent in theatris vulgo recitatae, quid enim absurdius qua</text:span><text:span text:style-name="T204">m</text:span><text:span text:style-name="T201"> Praedicabilia, Praedicamenta aut Evangelum Latino sermone conscriptum coram indocta pleb</text:span><text:span text:style-name="T202">e</text:span><text:span text:style-name="T201">culare recitare. </text:span><text:span text:style-name="T202">S</text:span><text:span text:style-name="T201">ed ne latius in his calamus evagetur, derelictam ad orbitam redeamus oportet.</text:span></text:p>
      <text:p text:style-name="P298"><text:span text:style-name="T209">Quarto: Vocabula in obligationibus et in aliis disceptationibus imponuntur. At haec institutio haud est autentica, finita disputatione /21a/ ea interit. Ex his ad argumenti aculeum respondere potes.</text:span><text:span text:style-name="T201"> </text:span><text:s text:c="4"/></text:p>
      <text:h text:style-name="Heading_20_3" text:outline-level="3"><text:soft-page-break/>Triplex est significatus naturalis</text:h>
      <text:p text:style-name="Subtitle">Triplex est significatus naturalis</text:p>
      <text:p text:style-name="P110">Rursus significatio naturalis trifariam extenditur. Nam quoddam signum naturaliter proprie significat, ut conceptus in animo quoddam naturaliter ex instinctu naturae, suum significatum significat, ut gemitus infirmi dolorem, quaelibet res mundi sese obiective repraesentat. </text:p>
      <text:p text:style-name="P300">Haec vox ‘Sortes’ Sortem repraesentat ad placitum mediante conceptu Sortis. Hoc est, mediante eius naturali similitudine, conceptus Sortis eum mediante seipso notificari, qua regula est.</text:p>
      <text:p text:style-name="P299">Quilibet terminus nonnihil significans illud mediante naturali similitudine illius repraesentat.</text:p>
      <text:p text:style-name="P299">Significare ex instinctum naturae est aliud a se non ex impositione mediate significare. Hac significantia murelegus sub intempesta nocte, suo rauco clamore, plures feles congregat. Similiter procus laesus suo grunnitu sues omnes advolare facit. <text:s/></text:p>
      <text:p text:style-name="P299">Tertium membrum vulgariter significare naturaliter communiter vocatur.</text:p>
      <text:p text:style-name="P299">Unde fit, non est idem relatu significare communiter et naturaliter communiter. Illa res quae est Sortes significat communiter et tamen non est terminus communis, cum non est vocabulum.</text:p>
      <text:p text:style-name="P301">Ulterius sequitur, quemlibet terminum naturaliter, proprie aut ex instinctu naturae significantem naturaliter communiter etiam repraesentare.</text:p>
      <text:p text:style-name="P302">Contra regulam commentarii, litterae explanativam argumentor, ex ea sequitur eundem conceptum mediante se repraesentare, patet de conceptu entis, conceptu qualitatis aut conceptus.</text:p>
      <text:p text:style-name="P302">Respondetur concedendo illatum, sed hoc lucidius aperietur cum de conceptu ultimato et non ultimato sermo fuerit.</text:p>
      <text:p text:style-name="P302"><text:s text:c="2"/></text:p>
      <text:p text:style-name="P287"/>
      <text:h text:style-name="Heading_20_2" text:outline-level="2"><text:soft-page-break/>De termino mentali, vocali, et scripto</text:h>
      <text:p text:style-name="P401">De termino mentali, vocali, et scripto</text:p>
      <text:p text:style-name="P110">Terminorum quidam mentalis, et est terminus immediate significans.</text:p>
      <text:p text:style-name="P110">Vocalis est terminus ab ore prolatus.</text:p>
      <text:p text:style-name="P110">Terminus scriptus est terminus qui oculo corporeo percipitur.</text:p>
      <text:p text:style-name="P303"><text:span text:style-name="T210">Licet oculus quilibet sit corporeus proprie loquendo, tamen intellectus metaphorice oculus mentis appellatur, mentem ipsam /21b/ </text:span><text:span text:style-name="T211">spiritualiter illuminat omnes transferentes, secundum aliquam similitudinem transferunt. Secundum Aristotelem </text:span><text:span text:style-name="T212">Topicorum Sexto</text:span><text:span text:style-name="T211">.</text:span></text:p>
      <text:h text:style-name="Heading_20_2" text:outline-level="2">Prima partitio</text:h>
      <text:p text:style-name="P304"><text:span text:style-name="T216">Contra hac partitionem argumentor: Divisum membra dividentia transcendit; ergo divisio nulla. Antecedens patet, divisum transcendere membra dividentia nihil aliud est quam divisum posse verificari de aliquo deo quo nullum membrorum dividentium verificatur, sed sic est in proposito; igitur probatur minor de termino partim scripto partim vocali. Ostendendo tibi scripto terminum ‘</text:span><text:span text:style-name="T217">homo’ cui in voce addo “est animal”, concedis hoc totum esse verum; ergo hoc totum est propositio et ex consequenti terminus.</text:span></text:p>
      <text:p text:style-name="P312">Secundo patet, eadem minor in plurali numero divisum verificatur de termino mentali et vocali et tamen nullum membrorum dividens de illis duobus verificatur, igitur.</text:p>
      <text:p text:style-name="P312">Respondetur ad priorem rationem: Dando complexum ex membris membrum mixtum est apponendum et quomodo mixtio intelligenda veniat, posthac in aliis terminis in hac terminorum partitione numine propitio discutietur.</text:p>
      <text:p text:style-name="P312">Ad secundum dicitur: Haec divisio data est in singulari numero. In plurali autem nihil valet nisi latius membra cumulaveris.</text:p>
      <text:p text:style-name="P313">Tertio argumentor contra definitionem termini scripti: Sequitur terminum scriptum in libro clauso non esse terminum cum non percipitur.</text:p>
      <text:p text:style-name="P313">Quarto: Tunc <text:span text:style-name="T257">a</text:span>equus ad extra erit terminus scriptus cum oculo corporali videatur.</text:p>
      <text:p text:style-name="P305">Quinto: Termino a chalcographis impresso definitio convenit, et non definitum cum non est terminus scriptus, igitur.</text:p>
      <text:p text:style-name="P305">Ad tertium respondetur: ‘Percipitur’ dicit aptitudinem et non actum. Ita verba crebrius in definitionibus capiuntur, et in vulgari modo fandi dicimus “Equum suum pabulum avide mandentem impigre cursitare”.</text:p>
      <text:p text:style-name="P314">Ad quartum: Eo inficias sequelam, mannus autem per genus definiti secluditur.</text:p>
      <text:p text:style-name="P314"><text:soft-page-break/>Ad quintum dicitur: Terminus ‘impressus’ sub scripto ob eius affinitatem continetur. Haec definitio est antiqua et ante impressionem data, etiam, scriptura est impressione communior quo ad hominum multitudinem, licet plures libri impressi quae scripti inveniantur.</text:p>
      <text:p text:style-name="P306"><text:span text:style-name="T218">Sexto: Nullus est terminus mentalis; ergo divisio est insufficiens. Antecedens patet: Omnis /22a/ terminus est alicuius generis, at mentalis nullius est generis, igitur. Consequentia est in Baroco, et maior videtur vera inductive discurrendo. Superest ergo probare </text:span><text:span text:style-name="T219">minorem quam sic ostendo: Termini mentales nullius sunt idiomatis (ut posthac in posterioris tractatus terminorum septena partitione numine propitio dicemus); ergo non sunt alicuius generis. Tenet consequium: </text:span><text:span text:style-name="T221">G</text:span><text:span text:style-name="T219">enus a dictionis calce dependet. Regulae enim in generibus pro ‘a’, ‘e’, ‘i’, ‘t’ et similibus a classiariis Grammaticorum traduntur; ergo cum in mente non est dictionis, fini illic nequaquam erit genus.</text:span></text:p>
      <text:p text:style-name="P315">At dictis propter rationem: Termini mentales ultimati nullius sunt generis.</text:p>
      <text:p text:style-name="P307"><text:span text:style-name="T220">Contra haec est incongrua “Vir alba currit”, modo verum et falsum congruum praesupponunt </text:span><text:span text:style-name="T214">Primo</text:span><text:span text:style-name="T213"> Perihermeneias</text:span><text:span text:style-name="T220">.</text:span><text:span text:style-name="T216"> </text:span><text:span text:style-name="T210"><text:s/></text:span></text:p>
      <text:p text:style-name="P308">Secundo: Casus ac numeri in mente inveniuntur, proinde genus, postquam eadem sit ratio in hisce accidentibus.</text:p>
      <text:p text:style-name="P309">Ad sextum sufficienter responsum est ad replicas usque exclusive.</text:p>
      <text:p text:style-name="P310">Ad quartum priorem respondetur: Illa vocata ‘oratio ad placitum significans’ est inepta cui mentalis incongruitas minime respondet, quamobrem nihil vetat eam in animo esse enuntiationem.</text:p>
      <text:p text:style-name="P311">Ad secundam: Concesso antecedente, connexionem eo inficias. Accidentia veritatem atque falsitatem variantia in mente offenduntur. Multum enim refert dicere duo genii salutarunt Christiferam dicentes: “Ave gratia plena”, et unis hoc ipsum casus ac numerus efficit, quocirca mens eorum haud est exors.</text:p>
      <text:h text:style-name="Heading_20_2" text:outline-level="2">Terminorum alia divisio</text:h>
      <text:h text:style-name="Heading_20_3" text:outline-level="3">De termino categorematico et syncategorematico</text:h>
      <text:p text:style-name="Subtitle">De termino categorematico et syncategorematico</text:p>
      <text:p text:style-name="P110">Categorema officio iuxta significatione, est vocabulum aliquid significans et in propositione officium vendicans. Categorema significatione tantum est aliquid significans officii tamen expers. Categorema officio tantum est vocabulum officio munitum, nihil tamen repraesentans. Ex his syncategorematis triplex partitio facile capitur.</text:p>
      <text:p text:style-name="P322">Officium in propositione habere est ‘posse esse’ suppositum significative sumptum respectu verbi personalis modi finiti, vel esse appositum, sicut grammatici loquuntur de verbo quod appositum appellant.</text:p>
      <text:p text:style-name="P322"><text:soft-page-break/>Exemplum primi: /22a/ ‘Rami’, ut ‘homo’ omnes homines significat et officium in propositione sibi usurpat.</text:p>
      <text:p text:style-name="P322">Exemplum secundi: Ut virorum, et istud coincidit cum syncategoremate officio tantum.</text:p>
      <text:p text:style-name="P316"><text:span text:style-name="T222">Exemplum tertii: </text:span><text:span text:style-name="T223">Ut est tertium adiacens, et istud coincidit cum syncategoremate significatione tantum.</text:span></text:p>
      <text:p text:style-name="P316"><text:span text:style-name="T223">Syncategorema officio et significatione simul nihil ne aliqua repraesentans officii propositionalis, expers significat aliqualiter, ut ‘omnis’, ‘quilibet’, aliquis.</text:span> </text:p>
      <text:p text:style-name="P317">Significare autem aliqualiter est facere categoremata in quae talis significantia fertur aliter et aliter accipi pro suis significatis, ut amplius post hoc patebit.</text:p>
      <text:p text:style-name="P317">Contra ista argumentor: Non sequitur hoc verbum ‘est’ tertium adiacens est categorema officio tantum; ergo est categorema. Et in omni bona divisione divisum verificatur de quolibet membro dividente, igitur.</text:p>
      <text:p text:style-name="P317">Secundo: Idem terminus est categorematicus et syncategorematicus; ergo membra coincidunt contra unam conditionem bonae divisionis.</text:p>
      <text:p text:style-name="P317">Tertio argumentor: Nullus est terminus syncategorematicus; ergo divisio est invalida. Antecedens patet, maxime esset negatio non in ista propositione “Nullus homo non currit”, sed hoc non; igitur minor patet. Negatio ibi aliqualiter minime repraesentat, nam nec distribuit nec negat modo distribuere et negare sunt illius signi significationes aliquales, non enim videtur quo alio modo significaret; ergo non est terminus syncategorematicus et per consequens divisum exuperat membra dividentia.</text:p>
      <text:p text:style-name="P317">Quarto argumentor: <text:span text:style-name="T224">Hoc signum ‘aliquis’ non est terminus syncategorematicus; ergo male dictum est. Antecedens patet non significat aliqualiter; igitur antecedens iterum patet. ‘Homo’ non aliter supponit in ista “Aliquis homo est animal”, quae ista “Homo est animal”; ergo non aliter accipitur categorema super quod cadit quae eo secluso, et non significat esse vel non esse nec alio modo per quem concluderetur eius significantia ‘aliqualis’; ergo non significat aliqualiter, et hoc mostrandum erat. Similiter de quolibet signo particulari argumentabor, igitur.</text:span></text:p>
      <text:p text:style-name="P318">Quinto: ‘Quilibet’ reddit suppositum verbo. Hac ‘quilibet’ est purum syncategorema, igitur.</text:p>
      <text:p text:style-name="P319">Ad <text:s/>primum concedo: Non sequitur haec est divisio aequivoci in sua aequivocata, modo in talibus divisum de membro minus principali simpliciter non praedicatur.</text:p>
      <text:p text:style-name="P319">Ad secundum concedo: Illa membra /23a/ coincidere in supponendo simpliciter vel cum addito, non tamen secundum rationes formales.</text:p>
      <text:p text:style-name="P319"><text:s/><text:span text:style-name="T225">Ad tertium respondetur: Argumentum nihil concludit.</text:span></text:p>
      <text:p text:style-name="P320">Tum primo hoc dato quod argumentum praetendit adhuc negatio aliqualiter significat impeditive.</text:p>
      <text:p text:style-name="P320">Tum secundo in potentia propinqua distribuit ac negat, postquam deposita priori negatione, negaret ac distribueret actualiter secundum se vel aliam negationem eiusdem speciei essentialis secum, et hoc ad terminum significativum sufficit.</text:p>
      <text:p text:style-name="P321"><text:soft-page-break/>Et si dicas negatio in hac “Homo non est animal”, non impedit; ergo nec adveniente negatione nullus impediet. Tenet consequentia, aliter terminus naturaliter significans potest a sua significantia cadere.</text:p>
      <text:p text:style-name="P328">Respondetur: Argumentum non magis cogit quam de distributione, sive actu impedit sive non. Semper impeditive repraesentat, cum in potentia propinqua impediat. Per adventum alterius negationis actu impedit, ignis enim non calefacit passum nisi applicatum, quae etiam naturaliter agit. Eodem modo erit dicendum impraesentiarum, signum non impedit nisi applicato in quod praepedimentum exerceret.</text:p>
      <text:p text:style-name="P328">Ex his liquidum est negationem triplicem habere significantiam utpote distribuere, negare et impedire, quas simul actualiter respectu eiusdem propositionis exercere nequit.</text:p>
      <text:p text:style-name="P323"><text:span text:style-name="T226">Ad quartum respondetur: Signum aliquis a sua natura necnon quodlibet aliud signum particulare, facit categorema super quod fertur supponere determinate, </text:span><text:span text:style-name="T227">secluso obstaculo, sicut universale distribuit terminum in quem fertur, qua via particularis ab indefinita discrepet in suppositionibus (modo fata sinant) dicemus, ubi huiusce rationis discussio clare patebit.</text:span></text:p>
      <text:p text:style-name="P329">Ad quintum dicitur: Reddit suppositum verbo materialiter et non significative.</text:p>
      <text:p text:style-name="P324"><text:span text:style-name="T228">Caeterum puellis regens ad longum, tales faciles argumentationes fabricetur, ut si respondens dicat quilibet esse syncategorema officio et significatione. Sic argumentabere nullum categorema officio est syncategorema officio et significatione. At ‘quilibet’ est huiusmodi, igitur puella maior est nota, et discursus evidens. Negabit ergo minorem, quam sic prolixius probabis </text:span><text:span text:style-name="T229">o</text:span><text:span text:style-name="T228">mne habens officium in /23b/ </text:span><text:span text:style-name="T229">propositione est categorema officio. At ‘quilibet’ est huiusmodi, igitur.</text:span></text:p>
      <text:p text:style-name="P324"><text:span text:style-name="T229">Probabis minorem sic, in hac oratione ‘quilibet’ est syncategorema, aliquid</text:span><text:span text:style-name="T228"> </text:span><text:span text:style-name="T229">reddit suppositum verbo</text:span><text:span text:style-name="T228"> <text:s text:c="3"/></text:span><text:span text:style-name="T229">et nihil nisi dictio ‘quilibet, igitur.</text:span></text:p>
      <text:p text:style-name="P324"><text:span text:style-name="T229">Dicet sicut iam dictum est hoc est verum materialiter, non autem significative.</text:span><text:span text:style-name="T226"> <text:s text:c="2"/></text:span></text:p>
      <text:h text:style-name="Heading_20_3" text:outline-level="3">De termino significativo et non significativo</text:h>
      <text:p text:style-name="Subtitle">De termino significativo et non significativo</text:p>
      <text:p text:style-name="P110">Terminorum quidam significativus, quidam vero non significativus.</text:p>
      <text:p text:style-name="P110">Terminus significativus est vocabulum aliquid significans.</text:p>
      <text:p text:style-name="P110">Terminus non significativus opposito modo definitur.</text:p>
      <text:p text:style-name="P325"><text:span text:style-name="T230">Sub ‘aliquid’, ‘aliqua’ et ‘aliqualiter’ intelligimus. Paradigmatibus binis bini rami patefiunt, ‘homo’ omnes homines significans est terminus significativus, ‘</text:span><text:span text:style-name="T231">b</text:span><text:span text:style-name="T230">uf’ autem nihil repraesentans, est autem terminus non significativus.</text:span></text:p>
      <text:p text:style-name="P330">At obiter dubitas an ‘buf’ est dictio significativa.</text:p>
      <text:p text:style-name="P326"><text:span text:style-name="T231">Sine argutiarum telis strictim respondeo: Illa oratio ex potioribus terminis non significativis conflatur, hoc plane concedimus. Sed quia praecise syncategorema eius aliqualiter significat tota </text:span><text:soft-page-break/><text:span text:style-name="T231">categoremata est significativa. Probatio est propositio eam ob rem oratio. Ast omnis oratio est vox significativa, ut philosophorum princeps, </text:span><text:span text:style-name="T215">Primo Perihermeneias</text:span><text:span text:style-name="T231"> affirmat, crispitudo tenuis caesariei totum Aethiopum crispum denominat verum. Hoc uni soli parti convenit, significativum vero reliquis, hoc est, subiecto et praedicato. </text:span></text:p>
      <text:p text:style-name="P327">Et si dicas partes illius aggregati nihil separatim significant, nec aliqua pars eius; ergo non est oratio et per consequens probatio est invalida. Item omnis oratio significat naturaliter vel ad placitum. At nullo horum modorum illa oratio repraesentat, igitur. Ad haec in oratione respondebitur.</text:p>
      <text:p text:style-name="P327">Contra ista argumento sic: Quilibet terminus mundi significat se naturaliter communiter; ergo significat aliquid; ergo est significativus ab actu ad aptitudinem.</text:p>
      <text:p text:style-name="P327">Secundo: Quilibet terminus significat suum prolatorem; ergo significat aliud a se, antecedens patet, quia in prolatione termini ‘hem’ aut ‘buf’, prolatorem deprehendes more Isaac, Iacob filio dicenti: “Vox quidem vox Iacob est, sed manus sunt Esau”. <text:s text:c="3"/></text:p>
      <text:p text:style-name="P327">Tertio: ‘Quilibet’ nihil significat; ergo /24a/ non est terminus significativus.</text:p>
      <text:p text:style-name="P327">Quarto: Nullus terminus dividitur in significativum et non significativum et nihil a termino; ergo nihil hic dividitur. Probatur maior, nec terminus significativus dividitur, quia tunc unum membrum dividens converteretur cum diviso, et per eandem rationem, nec terminus non significativus dividitur.</text:p>
      <text:p text:style-name="P327">Quinto: ‘Buf’ cum indignatione prolatum iram et displicentiam denotat; ergo est significativum.</text:p>
      <text:p text:style-name="P331">Ad primum respondetur: <text:span text:style-name="T232">D</text:span>istinguendo consequens, capiendo significare late, et sic conceditur hoc ad terminum significativum non sufficit. Oportet ipsum significare aliud a se et partibus.</text:p>
      <text:p text:style-name="P331">Ad secundum respondetur: <text:span text:style-name="T232">A</text:span>ssumptum non sufficit. Ad terminum esse significativum oportet ipsum significare aliud a se et suis partibus et a suo prolatore.</text:p>
      <text:p text:style-name="P332">Respondetur: Termini significativi est aliud repraesentare a suo prolatore, si non ponatur ad significandum ipsum.</text:p>
      <text:p text:style-name="P332">Contra: Nullus imposuit hanc vocem quam ego profero ad significandum ‘Robertum’. Probatur antecedens quia haec vox ‘Robertus’ numquam prius fuit.</text:p>
      <text:p text:style-name="P332">Respondetur: Unum vocabulum imponens omne synonymum simile in eodem idiomate secum imponit, nomen illi indidit ille qui cum de baptisterio levavit.</text:p>
      <text:p text:style-name="P333">Ad tertium nego consequentiam: Significat aliqualiter quod satis est.</text:p>
      <text:p text:style-name="P333">Ad quartum respondetur: Terminus in communi sumptus dividitur. Secundo terminus significative sumptus partitur significative capiendo vocabulum. Sed non hoc complexum ‘terminus significativus’.</text:p>
      <text:p text:style-name="P333">Ad quintum dicitur: Gestus talis et non dictio hoc repraesentat.<text:span text:style-name="T233"> </text:span></text:p>
      <text:h text:style-name="P433" text:outline-level="3"><text:soft-page-break/>De termino communi et singulari</text:h>
      <text:p text:style-name="Subtitle">De termino communi et singulari</text:p>
      <text:p text:style-name="P110">Terminorum quidam communis, et est vocabulum cui non repugnat accipi pro pluribus.</text:p>
      <text:p text:style-name="P110">Terminis singularis opposito modo describitur.</text:p>
      <text:p text:style-name="P333">/24b/</text:p>
      <text:p text:style-name="P334">Contra ista argumentor sic: Deus est terminus communis, et tamen hace definitio non ei convenit; igitur maior, ex grammaticis, est nota. <text:span text:style-name="T234">Probatur minor, repugnat ei accipi pro pluribus.</text:span></text:p>
      <text:p text:style-name="P335">Secundo: ‘Chimaera’ est <text:span text:style-name="T235">terminus communis et tamen ei repugnat accipi pro pluribus, cum pro nullo potest accipi, igitur.</text:span></text:p>
      <text:p text:style-name="P343">Tertio: Repugnat huic termino ‘homo’ in mente accipi pro duobus lapidibus; ergo repugnat ei accipi pro duabus rebus ab inferiore ad superius.</text:p>
      <text:p text:style-name="P336">Quarto: ‘Homo’ est terminus singularis et, pari iure, nullus est terminus communis; ergo divisio praesupponit falsum. Assumptum patet, terminus ‘homo’ est res singularis.</text:p>
      <text:p text:style-name="P337"><text:span text:style-name="T236">Ad primum respondetur: ‘Deus’ imponebatur ad communiter significandum, defectus ergo non est ex parte impositionis, sed rei significatae. Ethnici delire rebantur </text:span><text:span text:style-name="T237">varios fuisse deos, propterea Pantheon Romani (dum rerum potiebantur) </text:span><text:span text:style-name="T238">coluerunt, licet philosophi dei unitatem ex creaturis cognoverunt plerusque, eorum timore perculsi vulgo contradicere non audebant, et potestatibus blandientes conniverunt. </text:span><text:span text:style-name="T239">Sed veritate apud omnes agnita, adhuc modus imponendi mansit.</text:span></text:p>
      <text:p text:style-name="P338"><text:span text:style-name="T240">Ad secundum negetur minor: </text:span><text:span text:style-name="T244">n</text:span><text:span text:style-name="T240">on enim potest supponere pro pluribus citra copulam de imaginarie est, aut sine termino amplum modum repraesentandi habente, tamen ex parte suae significationis ei non repugnat accipi pro pluribus, communiter imponitur ad significandum sicut hoc vocabulum ‘Homo existens asinus’.</text:span></text:p>
      <text:p text:style-name="P344">Ad tertium dicitur: Concesso antecedente, negetur consequentia, non enim est inferioritas extremorum totalium quod requiritur.</text:p>
      <text:p text:style-name="P345">Ad quartum respondetur: ‘Homo’ est singulare prime intentionaliter, hoc est, una res sic singulare est transcendens. Secunda intentionaliter solum supponit pro termino singulari.</text:p>
      <text:p text:style-name="P339"><text:span text:style-name="T241">Contra: </text:span><text:span text:style-name="T242">Nullum est singulare secundae intentionaliter; ergo divisio praesupponit falsum, antecedens patet. Si esset aliquod tale maxime esset vocabulum ‘Iohannes’, sed hoc non praedicatur autem de hoc Iohanne et de illo.</text:span></text:p>
      <text:p text:style-name="P340"><text:span text:style-name="T243">Respondetur negando antecedens: et ad improbationem </text:span><text:span text:style-name="T245">negetur minor, ad cuius probationem distinguitur antecedens vel univoce, et sic negatur, vel aequivoce, et sic conceditur vocabulum. Cum pro diversis, mediantibus diversis conceptibus, accipitur, aequivoce capitur.</text:span></text:p>
      <text:p text:style-name="P341">Contra hoc argumentor: ponendo duos in die Iohannis Zachariae filii baptizatos, quorum uterque vocabitur Iohannes, eo quod in eius die generantur, iam uterque istorum unica ratione est Iohannes; ergo univoce.</text:p>
      <text:p text:style-name="P341"><text:soft-page-break/>Ad replicam: /25a/ <text:span text:style-name="T246">A</text:span>dmisso casu, si univoce capiatur et tantum valet sicut unica ratione, conceditur assumptum. Si univoce, tantum valet sicut unico conceptu, negatur.</text:p>
      <text:p text:style-name="P342">Contra: Praedicatur univoce, ut univoce tantum valet sicut uno conceptu; ergo solutio nulla. Antecedens patet. Praedicatur de isto unico conceptu, et de illo unico conceptu; ergo isto et illo unico conceptu praedicatur.</text:p>
      <text:p text:style-name="P342">Respondetur: Capiendo <text:span text:style-name="T247">consequens in sensu copulato consequentia est nulla, ut in antepraedicamentis (Deus coepta secundet) dicetur.</text:span></text:p>
      <text:p text:style-name="P358">Contra: Praedicatur de hoc et illo univoce, patet in his “Iste est Iohannes”, “Ille est Iohannes”, Iohannem et Robertum demonstrando.</text:p>
      <text:p text:style-name="P358">Respondetur: Distinguendo vocabulum istud de pluribus praedicari vel vere et sic negatur, vel false et sic conceditur.</text:p>
      <text:p text:style-name="P358">Contra: Istae sunt verae “Petrus non est Iohannes”, “Robertus non est Iohannes”; ergo praedicatur de pluribus unico conceptu et vere.</text:p>
      <text:p text:style-name="P358">Respondetur: Concedendo antecedens et distinguendo consequens vel negative conceditur, vel affirmative negatur.</text:p>
      <text:p text:style-name="P358">Contra hoc argumentor: Haec est vera “Materia et forma sunt Iohannes”; ergo praedicatur de pluribus unico conceptu vere et affirmative.</text:p>
      <text:p text:style-name="P359">Respondetur iterum: Concesso antecedente, distinguo consequens, vel copulatim conceditur, haec enim est vera solum in sensu copulato, copulative negatur.</text:p>
      <text:p text:style-name="P360">Contra: Haec est vera “Animal est Iohannes”, similiter “Haec homo est Iohannes”; ergo praedicatur de pluribus unico conceptu vere affirmative et divisum cum illa copulativa est vera “Animal est Iohannes, et Homo est Iohannes”.</text:p>
      <text:p text:style-name="P347">Respondetur: Non praedicatur de pluribus et pro pluribus copulative. Alienum esset hic copulam de imaginarie est in medium ciere, et illa citata singularitatem in communitatem converteremus. Et licet istae sunt verae “Plato est vel non est Iohannes”, “Non tantum Plato non est Iohannes”, non est consequens ad hoc quod Iohannes sit terminus communis, nam in priori capitur copula disiuncta, secundo vero est affirmativa pr<text:span text:style-name="T248">ae</text:span>gnans.</text:p>
      <text:p text:style-name="P348">Ex his facilibus argumentatiunculis termini singularis descripto colligitur quae est haec. Terminus singularis est vocabulum cui non repugnat accipi pro pluribus univoce vere affirmative divisim et pro pluribus. Brevis etiam si volueris dices, pluribus pro significatis totalibus non capitur. Modo licet terminus singularis de pluribus subiectis aut pluribus terminis copulatim praedicetur, nihil contra definitionem, unde fit ‘Iohannes’ est terminus singularis.</text:p>
      <text:p text:style-name="P349">Secundo: Sequitur homo est /25b/ <text:span text:style-name="T249">vocabulum commune, quia ei non repugnat accipi pro pluribus univoce et divisim, vere et affirmative, et pro pluribus haec copulativa est vera “Sortes est homo, et Plato est homo”. Inibi vocabulum ‘homo’ de pluribus et pro pluribus verificatur.</text:span></text:p>
      <text:p text:style-name="P361">Tertio sequitur: ‘Haec essentia’ demonstrando omnia entia mundi, est terminus singularis, patet per totum quid nominis eius.</text:p>
      <text:p text:style-name="P350"><text:s/></text:p>
      <text:p text:style-name="P347"><text:soft-page-break/><text:s/></text:p>
      <text:p text:style-name="P346"/>
      <text:p text:style-name="P335"><text:s/></text:p>
      <text:p text:style-name="P160"/>
      <text:p text:style-name="P160"/>
      <text:h text:style-name="Heading_20_3" text:outline-level="3">De termino secundae intentionis et primae</text:h>
      <text:p text:style-name="Subtitle">De termino secundae intentionis et primae</text:p>
      <text:p text:style-name="P110">Terminus secundae intentionis est terminus significans vocabula ea ratione qua sunt significativa.</text:p>
      <text:p text:style-name="P110">Terminus primae intentionis per oppositum describitur, et est vocabulum non significans notiones, aut si eas significet non ea ratione qua significative sunt.</text:p>
      <text:p text:style-name="P351">Participium est terminus secundae intentionis, patet per eius quid nominis, nam significat praecise terminos, ut omnia participia, et per consequens participum ‘amans’ ea ratione qua significativum est, quia si ‘amans’ a sua significantia exuatur, vocabulum participium non amplius accipitur pro illo. ‘Res’ est terminus primae intentionis licet vocabulum significet non tamen ea ratione qua est significativum.</text:p>
      <text:p text:style-name="P352"><office:annotation office:name="__Annotation__6905_2021017708" loext:resolved="false"><dc:creator>Unknown Author</dc:creator><dc:date>2025-04-08T23:19:06.284505931</dc:date><text:p><text:span text:style-name="T258">Termini primae intentionis nomina rerum, et secundae nomina nominum appellantur.</text:span></text:p></office:annotation>Termini primae intentionis nomina rerum, et secundae nomina nominum appellantur.<office:annotation-end office:name="__Annotation__6905_2021017708"/></text:p>
      <text:p text:style-name="P353">Contra hanc partitionem argumentor sic: ‘Buf’ est terminus et non primae ne secundae; ergo dividentia membra divisum transcendit.</text:p>
      <text:p text:style-name="P353">Secundo: Nihil hic dividitur, patet, nec non terminus nec terminus.</text:p>
      <text:p text:style-name="P353">At dicis terminus saltem significativus dividitur.</text:p>
      <text:p text:style-name="P353">Contra: Quilibet terminus significativus est primae intentionis aut secundae. Terminus qui dividitur nec est primae nec secundae; ergo non est terminus. Antecedens est verum; ergo et consequens.</text:p>
      <text:p text:style-name="P354">Tertio: Ex dictis vocabulum ‘imago’ non esset terminus secundae intentionis, consequens inconvenit. Simulacrum <text:span text:style-name="T250">Herculeum repraesentat ea ratione qua est significativum.</text:span></text:p>
      <text:p text:style-name="P362">Quarto: ly ‘terminus’ non erit terminus secundae intentionis patet. Accipitur pro vocabulo ‘buf’ non tamen ea ratione qua est significativum.</text:p>
      <text:p text:style-name="P362">Ad primum respondetur: Per divisum ‘buf’ excluditur. Divisum est terminus significativus etiam categorematicus.</text:p>
      <text:p text:style-name="P362">Secundum argumentum solvitur in solutione ad quartum.</text:p>
      <text:p text:style-name="P354">/<text:span text:style-name="T251">26a</text:span>/ <text:s/></text:p>
      <text:p text:style-name="P355"><text:soft-page-break/>Ad tertium dicitur: Imago non significat signum propositionale ea ratione qua est significativum, eapropter non est terminus secundae intentionis.</text:p>
      <text:p text:style-name="P356">Ad quartum dicitur: Si terminus in toto suo ambitu accipitur, non est terminus secundae proprie, capiendo terminum secundae intentionis. Secus est si capiatur pro termino significativo, sic de vocabulo signum dicatur.</text:p>
      <text:p text:style-name="P357">Aequivocum aequivocatum ratione connotati secundae intentionis fuerit (Deo auspice) in aliis terminis videbitur. Facilia tenellis ingeniis ne confundatur tradere satagimus. Puelli ab unguiculis et teneris annis femineo lacte pascuntur, postea rudioribus cibis miscemus tamen cum tenuibus, paulo difficiliora captu, ne Minerva pollentes fastidiantur.</text:p>
      <text:p text:style-name="P357">Dubitatur an terminus secundae intentionis terminos primae significet, et contra.</text:p>
      <text:p text:style-name="P363">Respondetur affirmative: Res est transcendens in significatu. Similiter vox scriptura et huiusmodi vocabula secundae intentionis significant. Econverso, nomen, terminos primae sicut secundae significat quinimo ‘buf’ significat. Quod eius conceptus naturaliter repraesentat patet, significat omne illud quod potest esse pars orationis utpote nomen participium et caetera id genus, sicut terminus ‘homo’ omnem hominem possibilem repraesentat.</text:p>
      <text:p text:style-name="P363">Item haec est vera “‘buf’ potest esse nomen”; ergo extrema supponunt pro eodem mediante tali copula. Verum licet hoc complexum ‘terminus secundae intentionis’ est vocabulum secundae, cum quo stat. Haec in veritate terminus primae intentionis est terminus primae, licet enim impositio vocabulis ad placitum significantibus et intentio conceptibus conveniat, ipsa vocabula vulgari cum usu confundimus et idem convertibiliter hic intellige per terminum secundae intentionis et secundam ipsam intentionem.</text:p>
      <text:h text:style-name="Heading_20_3" text:outline-level="3">De termino absoluto et connotativo</text:h>
      <text:p text:style-name="Subtitle">De termino absoluto et connotativo</text:p>
      <text:p text:style-name="P110">Terminorum quidem absolutus quidem vero connotativus.</text:p>
      <text:p text:style-name="P110">Terminus absolutus est vocabulum quod ultra significatum pro quo accipitur nihil connotat.</text:p>
      <text:p text:style-name="P110">Terminus connotativus ultra illud pro quo accipitur nonnihil de significato formali importat.</text:p>
      <text:p text:style-name="P364">Exemplum primi: ut terminus ‘homo’ et omnes termini de praedicamento substantiae. /26b/</text:p>
      <text:p text:style-name="P364">Paradigma secundi: ut vocabulum ‘album’ pro re alba accipitur, et hoc est eius significatum materiale. Ultra illud significatum albedinem connotat illi rei albae adiacere quam denominat, et haec significantia significatum formale appellatur.</text:p>
      <text:p text:style-name="P365">Contra hanc partitionem argumentor: ‘Buf’ est terminus et tamen nec absolutus nec connotativus.</text:p>
      <text:p text:style-name="P365">Secundo: ‘Quilibet’ est terminus etiam significativus et nec absolutus nec connotativus; ergo divisum excedit membra dividentia.</text:p>
      <text:p text:style-name="P366"><text:soft-page-break/>Tertio: ‘Homo albus’ est terminus et nec absolutus nec connotativus, cum est eorum congeries.</text:p>
      <text:p text:style-name="P366">Ad duo prima argumenta respondetur: Divisum est hoc complexum terminus significativus categorematicus, ex quo fit non omnis terminus, non absolutus, est connotativus.</text:p>
      <text:p text:style-name="P366">Ad tertium trifariam respondetur</text:p>
      <text:list text:style-name="L3">
        <text:list-item>
          <text:p text:style-name="P445">Primo: Tertium membrum superaddere oportet, pro termino mixto.</text:p>
        </text:list-item>
        <text:list-item>
          <text:p text:style-name="P445">Secundo: Dicitur divisum est terminus incomplexus.</text:p>
        </text:list-item>
        <text:list-item>
          <text:p text:style-name="P445">Tertio: Terminus datus est connotativus.</text:p>
        </text:list-item>
      </text:list>
      <text:p text:style-name="P365"/>
      <text:p text:style-name="P161"/>
      <text:p text:style-name="P161"/>
      <text:h text:style-name="Heading_20_3" text:outline-level="3">De termino transcendente</text:h>
      <text:p text:style-name="Subtitle">De termino transcendente</text:p>
      <text:p text:style-name="P110">Transcendens est vocabulum de quolibet praedicabile.</text:p>
      <text:p text:style-name="P367">Sex transcendentia communiter numerari solent: ‘res’, ‘ens’, ‘verum’, ‘bonum’, ‘aliquid’, ‘unum’.</text:p>
      <text:p text:style-name="P367">‘Verum ens’ secundum Priscianum non est in usu. Valla in exordio suae putatae logicae solum ponit unum transcendens, ‘res’ praecise est transcendens secundum eum. Nam ‘unum’ una res est, ‘ens’ suapte natura participium est omnis generis, non tamen artistarum communem ritum insequimur.</text:p>
      <text:p text:style-name="P371">Contra ista argumentor: ‘Verum’ non praedicatur de falso; ergo non praedicatur de quolibet.</text:p>
      <text:p text:style-name="P371">Secundo: Sortes vel non-Sortes praedicatur de quolibet et non reputatur transcendens; igitur plura sunt transcendentia quam sex.</text:p>
      <text:p text:style-name="P372">Ad priorem rationem: ‘Falsum’ est verum veritate entis, sed non veritate propositionali, quantum aliquid habet de entitate, tantum habet de veritate.</text:p>
      <text:p text:style-name="P368"><text:span text:style-name="T252">Ad secundum respondetur: Transcendens est incomplexum, et dumtaxat sex praefata ab artistis in communi usu ponuntur, licet multo plura superaddi possunt, ut ‘signum’, ‘qualitas’, ‘perfectum’ et huiusmodi. /</text:span><text:span text:style-name="T253">27a</text:span><text:span text:style-name="T252">/</text:span></text:p>
      <text:h text:style-name="Heading_20_3" text:outline-level="3">De conceptu ultimato et non ultimato</text:h>
      <text:p text:style-name="Subtitle">De conceptu ultimato et non ultimato</text:p>
      <text:p text:style-name="P110">Demum conceptum quidam non-ultimatus, et hic est distincta similitudo vocabuli.</text:p>
      <text:p text:style-name="P110">Omnis alius conceptus ultimatus fuerit.</text:p>
      <text:p text:style-name="P369">Haec partitio (ut dari solet) tirunculus est captu difficili, ea propter eam facile tradere curavi.</text:p>
      <text:p text:style-name="P370"><text:soft-page-break/>Dicitur distincta hoc est individualis aut specifica, ut conceptus singulariter repraesentans hanc vocem, ‘homo’ vel hanc vocem ‘homo’, et sibi similes in specie et cum scriptura et vox specie differant, earum sunt alii conceptus non ultimati. Dicitur vocabuli et capitur sicut in definitione termini. Disiuncta enim similitudo termini inconsueti non est conceptus non-ultimatus.</text:p>
      <text:p text:style-name="P370">Ex definitionibus sequitur conceptum omnium animalium ad extra esse ultimatum.</text:p>
      <text:p text:style-name="P370">Secundo: Sequitur notitiam distinctam vocabuli ‘animal’ esse conceptum non-ultimatum.</text:p>
      <text:p text:style-name="P370">Tertio: Patet. <text:span text:style-name="T256">N</text:span>otitiam omnium entium omni<text:span text:style-name="T254">um</text:span> vocum aut terminorum esse conceptum ultimatum. Proba: <text:span text:style-name="T255">Q</text:span>uaelibet illarum est conceptus non non-ultimatus; ergo ultimatus.</text:p>
      <text:p text:style-name="P373">Quarto: Patet. Non est idem dictu significatum ultimatum et conceptus ultimatus, sane haec longo interstitio inter se distant. Significatum ultimatum est illud quod terminus proprie significat, hoc es ad placitum proprie aut naturaliter proprie, ut in suppositionibus latius numine ‘propitio’ dicemus. Omne aliud significatum vocatur non-ultimatum. Unde fit terminus vocalis ‘homo’ ultimate omnes homines repraesentat, quia imponebatur ad omnes tales significandos. Ipsam vocem sus partes prolatorem quae non ultimate significat.</text:p>
      <text:p text:style-name="P373">Similiter conceptus non-ultimatus vocis ‘homo’ ultimate vocem et omnes homines significat, naturaliter proprie vocem, quia est eius naturalis similitudo, repraesentat. Et quidquid terminus vocalis ad placitum significat conceptus non-ultimatus etiam, ad placitum, repraesentat seipsum non ultimate significat.</text:p>
      <text:p text:style-name="P373">Conceptus ultimatus hominum eos ultimate significat, et seipsum naturaliter communiter, mediante conceptu /27b/ reflexo naturali similitudine eiusdem, quia regula generalis est, ut paulo superius retulimus, quilibet terminus nonnihil significans illud mediante naturali similitudine rei repraesentatae repraesentat.</text:p>
      <text:p text:style-name="P376">Contra ista argumentor: Divisum excedit membra dividentia; ergo divisio mala. Antecedens patet de actu syncategorematico.</text:p>
      <text:p text:style-name="P376">Secundo: Ex dictis nullus idem conceptus erit ultimatus et non-ultimatus, sed hoc est falsum si ‘buf’ imponatur ad significandum se tunc eius conceptus erit naturalis similitudo rei proprie significatae per terminum, utpote, per vocem ‘buf’; ergo erit conceptus ultimatus et est non-ultimatus, igitur.</text:p>
      <text:p text:style-name="P375">Ad priorem rationem nego antecedens: Terminus syncategorematicus ad placitum significans non subordinatur conceptui sed actui.</text:p>
      <text:p text:style-name="P374">Secundo: Conceptus distinctus termini est conceptus non-ultimatus, et conceptus respondens aliqualiter significare, est conceptus ultimatus. Patet per definitionem et hoc extendendo conceptum ad actum, sed tunc oportet supplere aliqualiter significare pro syncategoremate.</text:p>
      <text:p text:style-name="P374">Ad posteriorem rationem: Negetur minor, et ad eius probationem dico illam impositionem inanem cum late se significet, et ad huc impositione superflua data. Ulterior, consequentia est nulla, cuius antecedens est verum et consequens falsum.</text:p>
      <text:p text:style-name="P374">Haec vox ‘homo’ tribus conceptibus subordinatur uni conceptui singulari, qui distinctissime terminum illum repraesentat.</text:p>
      <text:p text:style-name="P374">Secundo: Subordinatur uni conceptui communi qui hanc vocem et similes praecise repraesentat.</text:p>
      <text:p text:style-name="P374"><text:soft-page-break/>Tertio: Subordinatur communi omnium hominum conceptui repraesentativo. Hic conceptus est ultimatus, illi vero non ultimati.</text:p>
      <text:p text:style-name="P374">Ulterius: Patet aliquem conceptum nunc non esse non-ultimatum, et mox paulo esse non-ultimatum, hoc de atramento in calamo (cuius conceptus iamiam est est ultimatus, et cum ex eo scriptura fuerit eius notitia, est non ultimata) patet. Et ita huic tractatui terminorum perbrevi facilique captu finem imponimus.</text:p>
      <text:p text:style-name="Subtitle">Prioris tractatus terminorum.</text:p>
      <text:p text:style-name="Subtitle">Finis.</text:p>
      <text:h text:style-name="P416" text:outline-level="1">Posterior terminorum tractatus</text:h>
      <text:p text:style-name="Title">Tractatus terminorum secundus</text:p>
      <text:h text:style-name="Heading_20_2" text:outline-level="2">De <text:span text:style-name="T97">definitione</text:span> termini</text:h>
      <text:p text:style-name="Text_20_body">/<text:span text:style-name="T121">28a</text:span>/</text:p>
      <text:p text:style-name="P158"/>
      <text:h text:style-name="Heading_20_2" text:outline-level="2">De termino mentali, vocali, et scripto</text:h>
      <text:p text:style-name="Text_20_body">/<text:span text:style-name="T120">31a</text:span>/</text:p>
      <text:p text:style-name="P157"/>
      <text:h text:style-name="Heading_20_2" text:outline-level="2">De termino categorematico et syncategorematico</text:h>
      <text:p text:style-name="P156">/33b/</text:p>
      <text:p text:style-name="Text_20_body"/>
      <text:h text:style-name="Heading_20_2" text:outline-level="2">De termino significativo et non significativo</text:h>
      <text:p text:style-name="P155">/36b/</text:p>
      <text:p text:style-name="P155"/>
      <text:h text:style-name="P419" text:outline-level="2">De termino complex<text:span text:style-name="T123">o</text:span> et incomplex<text:span text:style-name="T123">o</text:span></text:h>
      <text:p text:style-name="P154">/<text:span text:style-name="T119">37b</text:span>/</text:p>
      <text:h text:style-name="Heading_20_2" text:outline-level="2">De termino transcendente et non transcendente</text:h>
      <text:p text:style-name="P153">/39a/</text:p>
      <text:p text:style-name="Text_20_body"/>
      <text:h text:style-name="Heading_20_2" text:outline-level="2">De termino connotativo et absoluto</text:h>
      <text:p text:style-name="P152">/40a/</text:p>
      <text:h text:style-name="Heading_20_2" text:outline-level="2">De significare naturaliter et ad placitum</text:h>
      <text:p text:style-name="P151">/41b/</text:p>
      <text:p text:style-name="P151"/>
      <text:h text:style-name="Heading_20_2" text:outline-level="2"><text:soft-page-break/>De termino communi et singulari</text:h>
      <text:p text:style-name="P150">/<text:span text:style-name="T118">45b</text:span>/</text:p>
      <text:p text:style-name="P150"/>
      <text:h text:style-name="Heading_20_2" text:outline-level="2">De conceptu ultimato et non ultimato</text:h>
      <text:p text:style-name="P149">/<text:span text:style-name="T117">50b</text:span>/</text:p>
      <text:p text:style-name="Text_20_body"/>
      <text:h text:style-name="Heading_20_2" text:outline-level="2">De termino primae intentionis et secundae</text:h>
      <text:p text:style-name="Text_20_body">/<text:span text:style-name="T116">55b</text:span>/</text:p>
      <text:p text:style-name="Text_20_body"/>
      <text:h text:style-name="Heading_20_2" text:outline-level="2">De prima intentione et secunda</text:h>
      <text:p text:style-name="P148">/59b/</text:p>
      <text:p text:style-name="P148"/>
      <text:h text:style-name="Heading_20_2" text:outline-level="2">De terminis pertinentibus ac impertinentibus</text:h>
      <text:p text:style-name="P147">/<text:span text:style-name="T115">61a</text:span>/</text:p>
      <text:h text:style-name="Heading_20_2" text:outline-level="2">De terminis convertibilibus ac synonymis</text:h>
      <text:p text:style-name="Text_20_body">/<text:span text:style-name="T114">62b</text:span>/</text:p>
      <text:h text:style-name="P416" text:outline-level="1">Primus introductionum liber de enuntiatione et proprietatibus eius</text:h>
      <text:p text:style-name="P110">Sequuntur introductiones (quas alii communiter summulas dicunt) primo a logices finitione exordiendo.</text:p>
      <text:p text:style-name="P190"/>
      <text:h text:style-name="Heading_20_2" text:outline-level="2">De <text:span text:style-name="T11">d</text:span>ialectica</text:h>
      <text:p text:style-name="P162">/<text:span text:style-name="T5">64</text:span><text:span text:style-name="T21">a</text:span>/</text:p>
      <text:p text:style-name="P379">De dialectica.</text:p>
      <text:p text:style-name="P110">Dialectica est ars artium, scientia scientiarum. Secundum autem Aristotelem Primo Topicorum haec facultas ad exercitationem et ad philosophiam capessendam apprimae me conducit, quocirca infert, et ad omnium methodorum principia viam habet. </text:p>
      <text:p text:style-name="Text_20_body"/>
      <text:h text:style-name="Heading_20_2" text:outline-level="2">De sono</text:h>
      <text:p text:style-name="P164">/66<text:span text:style-name="T22">a</text:span>/</text:p>
      <text:p text:style-name="P380">De sono.</text:p>
      <text:p text:style-name="P110">Verum quia disputatio vocalis vocem, et vos sonum efflagitat, ea de re a sono tanquam communiori inchoamentum capimus. Quidquid per se ab auditu percipitur est sonus.</text:p>
      <text:p text:style-name="P163"/>
      <text:h text:style-name="P420" text:outline-level="2">De nomine</text:h>
      <text:p text:style-name="P165">/<text:span text:style-name="T111">68a</text:span>/</text:p>
      <text:p text:style-name="P110"><text:soft-page-break/><text:span text:style-name="T22">Sequitur de n</text:span>omine <text:span text:style-name="T22">et verbo propositionem constantibus, et prius de nomine.</text:span></text:p>
      <text:p text:style-name="P110">Nomen vocale est vox incomplexa, finita, potens significative reddere suppositum verbo.</text:p>
      <text:p text:style-name="P104"/>
      <text:p text:style-name="P1"/>
      <text:h text:style-name="Heading_20_2" text:outline-level="2">De verbo</text:h>
      <text:p text:style-name="P2">/70<text:span text:style-name="T23">a</text:span>/</text:p>
      <text:p text:style-name="P381">De verbo.</text:p>
      <text:p text:style-name="P110">Verbum vocale est vox incomplexa praesentis temporis modi indicativi.</text:p>
      <text:p text:style-name="P2"/>
      <text:h text:style-name="Heading_20_2" text:outline-level="2">De oratione</text:h>
      <text:p text:style-name="P146">/71<text:span text:style-name="T24">a</text:span>/</text:p>
      <text:p text:style-name="P382">De oratione.</text:p>
      <text:p text:style-name="P110">Oratio est vox conceptui complexo subordinata. </text:p>
      <text:p text:style-name="P146"/>
      <text:h text:style-name="Heading_20_3" text:outline-level="3">De oratione perfecta</text:h>
      <text:p text:style-name="P166">/72a/</text:p>
      <text:p text:style-name="P110">De oratione perfecta et imperfecta.</text:p>
      <text:p text:style-name="P110">Oratio perfecta est complexio non interrogativa, nec solum implicativa, in qua rectus reddit suppositum verbo, imperfecta opposito modo definiatur.</text:p>
      <text:p text:style-name="P167"/>
      <text:h text:style-name="Heading_20_2" text:outline-level="2">De definitione propositionis</text:h>
      <text:p text:style-name="P170">/72<text:span text:style-name="T25">b</text:span>/</text:p>
      <text:p text:style-name="P383"><text:soft-page-break/>De definitione propositionis.</text:p>
      <text:p text:style-name="P110">Propositio est oratio verae vel falsae significans.</text:p>
      <text:p text:style-name="P104"/>
      <text:h text:style-name="Heading_20_2" text:outline-level="2">De divisione propositionis</text:h>
      <text:p text:style-name="P168">/73<text:span text:style-name="T25">a</text:span>/</text:p>
      <text:p text:style-name="P384">De divisione propositionis.</text:p>
      <text:p text:style-name="P110">Propositionum quaedam categorica quaedam vero hypothetica.</text:p>
      <text:p text:style-name="P171"/>
      <text:p text:style-name="P169"/>
      <text:h text:style-name="Heading_20_2" text:outline-level="2">De propositi<text:span text:style-name="T112">o</text:span>ne categorica</text:h>
      <text:p text:style-name="P172">/75<text:span text:style-name="T26">a</text:span>/</text:p>
      <text:p text:style-name="P385">De propositione categorica.</text:p>
      <text:p text:style-name="P110">Propositione categorica est oratio indicativi modi verae vel falsae repraesentans, vel est propositio habens subiectum, praedicatum, et copulam tanquam partes principales sui. </text:p>
      <text:p text:style-name="P172"/>
      <text:p text:style-name="Text_20_body"/>
      <text:h text:style-name="Heading_20_2" text:outline-level="2">De <text:span text:style-name="T94">subiecto propositionis</text:span></text:h>
      <text:p text:style-name="Text_20_body">/<text:span text:style-name="T124">77b</text:span>/</text:p>
      <text:p text:style-name="P110">De subiecto propositionis.</text:p>
      <text:p text:style-name="P110">Subiecto propositionis est terminus de quo praedicatum dicitur. Et praedicatum est terminus qui de alio enuntiatur. Copula vero est verbum hoc cum illo connectens.</text:p>
      <text:p text:style-name="P173"/>
      <text:h text:style-name="Heading_20_2" text:outline-level="2">De extremis propositionis categoricae</text:h>
      <text:p text:style-name="P3">/79<text:span text:style-name="T27">a</text:span>/</text:p>
      <text:p text:style-name="P386"><text:soft-page-break/>De extremis propositionis categoricae</text:p>
      <text:p text:style-name="P110">Virtus signi in uno extremo exhausta, secum pars efficitur.</text:p>
      <text:p text:style-name="P3"/>
      <text:h text:style-name="Heading_20_2" text:outline-level="2">De determinatione accepta unica</text:h>
      <text:p text:style-name="P3">/80<text:span text:style-name="T28">a</text:span>/</text:p>
      <text:p text:style-name="P387">De determinatione accepta unica.</text:p>
      <text:p text:style-name="P110">Determinatio accepta unica acceptione cum suo determinabili est determinatio determinabile sequens, vel ipsum antecedens inserta inter adiectivum determinabilis et ipsum determinabile.</text:p>
      <text:p text:style-name="P174"/>
      <text:p text:style-name="P3"/>
      <text:h text:style-name="Heading_20_2" text:outline-level="2">De signo quantificante</text:h>
      <text:p text:style-name="P175">/80<text:span text:style-name="T29">b</text:span>/</text:p>
      <text:p text:style-name="P388">De signo quantificante.</text:p>
      <text:p text:style-name="P110">Signum quantificans est signum cuius appositio subtractiove quantitatem variat.</text:p>
      <text:p text:style-name="P104"/>
      <text:p text:style-name="P104"/>
      <text:h text:style-name="Heading_20_2" text:outline-level="2">De divisione propositionis categoricae penes quantitatem</text:h>
      <text:p text:style-name="P4">/82<text:span text:style-name="T30">a</text:span>/</text:p>
      <text:p text:style-name="P110">De divisione propositionis categoricae penes quantitatem.</text:p>
      <text:p text:style-name="P110">Item propositionum categoricarum quaedam universalis, quaedam particularis, quaedam indefinita, quaedam vero singularis.</text:p>
      <text:p text:style-name="P4"/>
      <text:h text:style-name="Heading_20_3" text:outline-level="3"><text:soft-page-break/>De propositione universali, particulari et indefinita</text:h>
      <text:p text:style-name="P191">/83<text:span text:style-name="T31">a</text:span>/</text:p>
      <text:p text:style-name="P110">De propositione universali, particulari et indefinita.</text:p>
      <text:p text:style-name="P111">Propositio universalis est illa cuius subiectum distribuitur.</text:p>
      <text:p text:style-name="P111">Propositio particularis est illa in qua subiicitur terminus communis signo particulari aut particularibus determinatus.</text:p>
      <text:p text:style-name="P111">Propositio indefinita est illa in qua subiicitur terminus communis sine signo quantificante.</text:p>
      <text:p text:style-name="Text_20_body"/>
      <text:h text:style-name="Heading_20_3" text:outline-level="3">De propositione si<text:span text:style-name="T7">n</text:span>gulari</text:h>
      <text:p text:style-name="Text_20_body">/<text:span text:style-name="T7">86</text:span><text:span text:style-name="T32">a</text:span>/</text:p>
      <text:p text:style-name="P389">De propositione singulari.</text:p>
      <text:p text:style-name="P110">Propositio singularis est illa in qua terminus discrete acceptus subiicitur, ut “Sortes currit”, “Iste homo movetur”.</text:p>
      <text:p text:style-name="Text_20_body"/>
      <text:p text:style-name="P176"/>
      <text:p text:style-name="Text_20_body"/>
      <text:p text:style-name="P145"/>
      <text:p text:style-name="Text_20_body"/>
      <text:h text:style-name="P417" text:outline-level="2">De <text:span text:style-name="T95">propositione affirmativa et negativa</text:span></text:h>
      <text:p text:style-name="P177">/<text:span text:style-name="T110">88a</text:span>/</text:p>
      <text:p text:style-name="P114">De qualitate propositionis categoricae</text:p>
      <text:p text:style-name="P110">Item propositionum categoricarum quaedam negativa. Et est illa cuius copula aut eius principalior pars negatur.</text:p>
      <text:p text:style-name="P110">Propositio affirmativa opposito modo definitur. Et sicut propositio trifariam scinditur ita eius est triplex signum interrogativum ut carmine vulgari patet.</text:p>
      <text:p text:style-name="P110">Quae ea vel hip, qualis nevel af, v quarta par in sin. <text:s/></text:p>
      <text:p text:style-name="P177"/>
      <text:h text:style-name="Heading_20_2" text:outline-level="2">Propositionis categoricae alia partitio</text:h>
      <text:p text:style-name="P192">/91<text:span text:style-name="T33">b</text:span>/</text:p>
      <text:p text:style-name="P110">Propositionis categoricae alia partitio.</text:p>
      <text:p text:style-name="P110">Item propositionum categoricarum quaedam utroque termino participant, quaedam altero dumtaxat, quaedam vero nullo.</text:p>
      <text:p text:style-name="P104"/>
      <text:p text:style-name="P104"/>
      <text:p text:style-name="P178"/>
      <text:p text:style-name="Text_20_body"/>
      <text:h text:style-name="Heading_20_2" text:outline-level="2"><text:span text:style-name="T92">De</text:span> opposition<text:span text:style-name="T125">ibus</text:span> in generali</text:h>
      <text:p text:style-name="P179">/92<text:span text:style-name="T34">a</text:span>/</text:p>
      <text:p text:style-name="P390"><text:soft-page-break/>Sequuntur oppositiones in generali.</text:p>
      <text:p text:style-name="P110">Propositionum utroque vocabulo participantium quaedam sunt oppositae, quaedam vero opponuntur. Ac rursus oppositarum quaedam sunt contrariae, quaedam contradictoriae, quaedam subcontrariae, quaedam vero subalternae.</text:p>
      <text:p text:style-name="P180"/>
      <text:p text:style-name="Text_20_body"/>
      <text:h text:style-name="Heading_20_2" text:outline-level="2"><text:span text:style-name="T93">D</text:span>e opposition<text:span text:style-name="T126">ibus</text:span> in speciali</text:h>
      <text:p text:style-name="P5">/93<text:span text:style-name="T35">b</text:span>/</text:p>
      <text:h text:style-name="Heading_20_3" text:outline-level="3">De contrariis</text:h>
      <text:p text:style-name="P110">Sequuntur oppositiones in speciali et primo de contrariis.</text:p>
      <text:p text:style-name="P110">Contrariae sunt duae universales qualitatis oppositae, in quibus universalitates, particularitates transcendunt, quaelibet particularitas in una erit universalitas in alter, et non vice versa. Omnes notiones perfecta in contrarietate mobilitare potes.</text:p>
      <text:p text:style-name="P181"/>
      <text:p text:style-name="Text_20_body"/>
      <text:h text:style-name="P434" text:outline-level="3">De contradictoriis</text:h>
      <text:p text:style-name="P7">/97<text:span text:style-name="T36">a</text:span>/</text:p>
      <text:p text:style-name="P110">De oppositionibus in contradictoriis.</text:p>
      <text:p text:style-name="P110">Contradictoriae sunt duae singulares aut universalis ac particulares qualitates adversae.</text:p>
      <text:p text:style-name="P110">Quattuor sibi peculiaria contradictio efflagitat.</text:p>
      <text:p text:style-name="P110">In primis quaelibet notio non distributa in una, in alia distribuetur et viceversa, nisi fuerit determinatio accepta unica.</text:p>
      <text:p text:style-name="P110">Secundo vocabulum distributum, collatione suppositionis confusae in contradictorio stabit determinate.</text:p>
      <text:p text:style-name="P110">Et respectu suppositionis determinate stabit confuse.</text:p>
      <text:p text:style-name="P110">At si distribuatur in ordine ad binos (quorum alter stat confuse, alter vero determinate) stabit in contradictorio, mixte partim determinate partim confuse.</text:p>
      <text:p text:style-name="P182"/>
      <text:p text:style-name="Text_20_body"/>
      <text:p text:style-name="P6"/>
      <text:p text:style-name="Text_20_body"/>
      <text:h text:style-name="Heading_20_3" text:outline-level="3">De subcontrariis</text:h>
      <text:p text:style-name="P9">/112<text:span text:style-name="T37">b</text:span>/</text:p>
      <text:p text:style-name="P110">De oppositis subcontrariis.</text:p>
      <text:p text:style-name="P110">Subcontrariae <text:span text:style-name="T127">sunt duae particulares qualitatis oppositae in quibus vulgo particularitates universalitatem exuperant, quaelibet universalitas in una erit particularitas in alie et non econverso, opposito modo ad contrarias.</text:span></text:p>
      <text:p text:style-name="Text_20_body"/>
      <text:p text:style-name="P8"/>
      <text:p text:style-name="P8"><text:soft-page-break/></text:p>
      <text:h text:style-name="Heading_20_3" text:outline-level="3"><text:span text:style-name="T109">De </text:span><text:span text:style-name="T113">s</text:span>ubalternis</text:h>
      <text:p text:style-name="P11">/113<text:span text:style-name="T38">b</text:span>/</text:p>
      <text:p text:style-name="P391">De oppositione subalterna.</text:p>
      <text:p text:style-name="P110">Subalternae sunt universales et particulares /114a/ qualitatis eiusdem illationem inter subalternantem et sublaternatam, haec oppositio efflagitat.</text:p>
      <text:p text:style-name="P10"/>
      <text:p text:style-name="Text_20_body"/>
      <text:h text:style-name="Heading_20_2" text:outline-level="2">De categoricarum materiis</text:h>
      <text:p text:style-name="P183"><text:span text:style-name="T128">/115</text:span><text:span text:style-name="T39">a</text:span><text:span text:style-name="T128">/</text:span></text:p>
      <text:p text:style-name="P110">De categoricarum triplici materia</text:p>
      <text:p text:style-name="P110">Propositionum triplex est materia, scilicet: naturalis, contingens et remota.</text:p>
      <text:p text:style-name="P112">Pro omnibus materiis haec regula generalis esto: Omnes propositiones ex terminis convertibilibus conflate eandem materiam sibi vendicant, quarum metrum affirmativa indicativi fuerit.</text:p>
      <text:p text:style-name="P13"/>
      <text:p text:style-name="P13"/>
      <text:h text:style-name="Heading_20_3" text:outline-level="3">De materia naturali</text:h>
      <text:p text:style-name="P184"><text:span text:style-name="T108">/117</text:span><text:span text:style-name="T40">a</text:span><text:span text:style-name="T108">/</text:span></text:p>
      <text:p text:style-name="P392">De materia naturali.</text:p>
      <text:p text:style-name="P113">Propositio materiae naturalis est ea cuius praedicatum de subiecto supponente negari nequit.</text:p>
      <text:p text:style-name="P12"/>
      <text:p text:style-name="Text_20_body"/>
      <text:h text:style-name="Heading_20_3" text:outline-level="3"><text:soft-page-break/>De materia contingenti</text:h>
      <text:p text:style-name="P15">/119<text:span text:style-name="T41">a</text:span>/</text:p>
      <text:p text:style-name="P393">De materia contingenti.</text:p>
      <text:p text:style-name="P110">Materia contingens est illa cuius praedicatum potest adesse et abesse subiecto praeter subiecti corruptionem.</text:p>
      <text:p text:style-name="P14"/>
      <text:h text:style-name="Heading_20_3" text:outline-level="3">De materia remota</text:h>
      <text:p text:style-name="P16">/120<text:span text:style-name="T42">a</text:span>/</text:p>
      <text:p text:style-name="P394">De materia remota.</text:p>
      <text:p text:style-name="P110">Materia remota sive propositio materiae remotae est illa cuius praedicatum subiecto minime competit.</text:p>
      <text:p text:style-name="Text_20_body"/>
      <text:h text:style-name="Heading_20_2" text:outline-level="2">De oppositionum legibus</text:h>
      <text:p text:style-name="P144">/<text:span text:style-name="T8">122</text:span><text:span text:style-name="T43">a</text:span>/</text:p>
      <text:p text:style-name="P110">Sequitur de oppositionum legibus sive regulis. Et primo de contrariarum lege.</text:p>
      <text:p text:style-name="P110">Contrariae neutiquam esse vere queunt, falsitatem tamen haud abnuunt.</text:p>
      <text:p text:style-name="Text_20_body"/>
      <text:h text:style-name="Heading_20_2" text:outline-level="2">Contradictoriarum lex</text:h>
      <text:p text:style-name="P185">/123<text:span text:style-name="T44">a</text:span>/</text:p>
      <text:p text:style-name="P110">Contradictoriarum norma sive lex.</text:p>
      <text:p text:style-name="P110">Et veritatem et falsitatem extra insolubilia contradictoriae formaliter recusant.</text:p>
      <text:p text:style-name="Text_20_body"/>
      <text:h text:style-name="Heading_20_2" text:outline-level="2">Subcontrariarum lex</text:h>
      <text:p text:style-name="P186">/125<text:span text:style-name="T45">b</text:span>/</text:p>
      <text:p text:style-name="P110"><text:soft-page-break/>Regula sive lex subcontrariarum.</text:p>
      <text:p text:style-name="P110">Verum neutiquam falsum subcontrariae admittunt.</text:p>
      <text:p text:style-name="Text_20_body"/>
      <text:h text:style-name="Heading_20_3" text:outline-level="3">Subalternarum <text:span text:style-name="T90">lex</text:span></text:h>
      <text:p text:style-name="P17">/127<text:span text:style-name="T46">a</text:span>/</text:p>
      <text:p text:style-name="P110">Subalternarum regula</text:p>
      <text:p text:style-name="P110">Subalterna<text:span text:style-name="T107">tam</text:span> subalternans infert, inter quas impropria est adversitas.</text:p>
      <text:p text:style-name="P17"/>
      <text:p text:style-name="Text_20_body"/>
      <text:h text:style-name="P417" text:outline-level="2">De conversionibus in generali</text:h>
      <text:p text:style-name="P17">/127<text:span text:style-name="T46">b</text:span>/</text:p>
      <text:p text:style-name="P110">Sequitur de conversionibus in generali.</text:p>
      <text:p text:style-name="P110">Conversio est consequentia formalis qua de praedicato converse subiectum convertentis, et de subiecto converse praedicatum convertentis efficitur.</text:p>
      <text:p text:style-name="P110">Et haec trifariam scinditur in simplicem, per accidens et pro contrapositionem.</text:p>
      <text:p text:style-name="P110">In conversione simplici eandem qualitatem cum quantitate servabis.</text:p>
      <text:p text:style-name="P110">Qualitatem (quantitate variata) per accidens conversio servat, de conversione per contrapositionem sequenti littera ad partem loquemur. Quot propositionum genera hac triplici conversione convertuntur hisce versiculis hauries.</text:p>
      <text:p text:style-name="P110">Simpliciter feci convertitur, e<text:span text:style-name="T129">u</text:span>a per acci<text:span text:style-name="T129">dens</text:span>.</text:p>
      <text:p text:style-name="P110">Asto per contra, sic fit conversio tota.</text:p>
      <text:p text:style-name="P110">Asserit a, negat e, stant universaliter ambae.</text:p>
      <text:p text:style-name="P110">Asserit i, negat o, sed particulariter ambo.</text:p>
      <text:p text:style-name="P188"/>
      <text:p text:style-name="P187"/>
      <text:p text:style-name="P143"/>
      <text:h text:style-name="Heading_20_2" text:outline-level="2">De conversione simplici et per accidens</text:h>
      <text:p text:style-name="Text_20_body">/<text:span text:style-name="T106">129a</text:span>/</text:p>
      <text:p text:style-name="Text_20_body">Et duplex est conversio, quaedam est simplex et definitur sicut conversio in communi interserendo hos terminos, manente eadem qualitate et quantitat<text:span text:style-name="T106">e.</text:span></text:p>
      <text:p text:style-name="P193">Alia est conversio per accidens, et etiam definitur sicut conversio vulgariter super addendo illam particulam variata praecise quantitate.</text:p>
      <text:p text:style-name="P193"/>
      <text:p text:style-name="Text_20_body"><text:soft-page-break/></text:p>
      <text:p text:style-name="P143"/>
      <text:h text:style-name="Heading_20_2" text:outline-level="2">De conversione per contrapositionem</text:h>
      <text:p text:style-name="P142">/135<text:span text:style-name="T47">a</text:span>/</text:p>
      <text:p text:style-name="P110">De conversione per contrapositionem.</text:p>
      <text:p text:style-name="P110">In conversione vero per contrapositionem termini finiti in infinitos et contra mutantur.</text:p>
      <text:p text:style-name="P104"/>
      <text:h text:style-name="P421" text:outline-level="2">De aequipollentiis</text:h>
      <text:p text:style-name="P141">/<text:span text:style-name="T105">137b</text:span>/</text:p>
      <text:p text:style-name="P110">Sequitur de aequipollentis.</text:p>
      <text:p text:style-name="P110">Aequipollentia est propositiones utroque termino participantes per negationis propositionem, postpositionem vel utique aequivalentes.</text:p>
      <text:p text:style-name="P110">Unde fit omnes aequipollentes aequivalent et non contra.</text:p>
      <text:p text:style-name="P18"/>
      <text:p text:style-name="Text_20_body"/>
      <text:h text:style-name="Heading_20_3" text:outline-level="3">De aequipollentiarum regulis</text:h>
      <text:p text:style-name="P20">/138<text:span text:style-name="T48">a</text:span>/</text:p>
      <text:p text:style-name="P110">Sequitur regulae aequipollentiarum.</text:p>
      <text:p text:style-name="P110">Aequipollentias carmen vulgare enucleat.</text:p>
      <text:p text:style-name="P110">‘Pre’ contradic, ‘post’ contra, ‘prae’ ‘post’que subalter.</text:p>
      <text:p text:style-name="P194"/>
      <text:p text:style-name="P19"/>
      <text:p text:style-name="Text_20_body"/>
      <text:p text:style-name="Text_20_body"/>
      <text:h text:style-name="P422" text:outline-level="2">De modalibus</text:h>
      <text:p text:style-name="P140">/<text:span text:style-name="T104">145a</text:span>/</text:p>
      <text:p text:style-name="P110">Sequitur de modalibus.</text:p>
      <text:p text:style-name="P110">Propositio modalis est propositio cuius principalior pars copulae aliquo istorum modorum, necesse, impossibile, contingens et possibile determinatur, vel in cuius fronte vel tergo similis modus ponitur.</text:p>
      <text:p text:style-name="P195"/>
      <text:p text:style-name="P21"/>
      <text:p text:style-name="Text_20_body"/>
      <text:h text:style-name="Heading_20_3" text:outline-level="3">De modali composita</text:h>
      <text:p text:style-name="P139">/<text:span text:style-name="T103">147a</text:span>/</text:p>
      <text:p text:style-name="P110">De modali composita.</text:p>
      <text:p text:style-name="P110">In modali composita in uno extremorum dictum, in alter vero modum collocant.</text:p>
      <text:p text:style-name="P139"/>
      <text:h text:style-name="Heading_20_3" text:outline-level="3">De modalium qualitate et quantitate</text:h>
      <text:p text:style-name="P196">/147<text:span text:style-name="T50">b</text:span>/</text:p>
      <text:p text:style-name="P110">De modalium qualitate en quantitate.</text:p>
      <text:p text:style-name="P110">Qualitates et quantitates in modalibus perinde ac in eis de inesse apprehenduntur.</text:p>
      <text:p text:style-name="Text_20_body"/>
      <text:h text:style-name="Heading_20_3" text:outline-level="3">De modali composita</text:h>
      <text:p text:style-name="P138">/14<text:span text:style-name="T102">8</text:span><text:span text:style-name="T49">a</text:span>/</text:p>
      <text:p text:style-name="P395"><text:soft-page-break/>De modis cognoscendi veritatem modalis compositae.</text:p>
      <text:p text:style-name="P378">Modalium compositarum veritates per officiantes, et extremorum suppositionem /148b/ instar aliarum de inesse venaberis. </text:p>
      <text:p text:style-name="Text_20_body"/>
      <text:p text:style-name="Text_20_body"/>
      <text:p text:style-name="Text_20_body"/>
      <text:p text:style-name="Text_20_body"/>
      <text:p text:style-name="Text_20_body"/>
      <text:p text:style-name="P137"/>
      <text:h text:style-name="Heading_20_3" text:outline-level="3">De modis cognoscendi veritatem</text:h>
      <text:p text:style-name="P22">/149<text:span text:style-name="T51">a</text:span>/</text:p>
      <text:p text:style-name="P110">De modis cognoscendi veritatem modalis divisae de possibili.</text:p>
      <text:p text:style-name="P104"/>
      <text:p text:style-name="P197">/149b/</text:p>
      <text:p text:style-name="P198">Quae modalis divisa de possibili sit necessaria quae vero impossibilis.</text:p>
      <text:p text:style-name="Text_20_body"/>
      <text:h text:style-name="Heading_20_3" text:outline-level="3">Modalis divisa de possibili</text:h>
      <text:p text:style-name="P23">/1<text:span text:style-name="T130">50a</text:span>/</text:p>
      <text:p text:style-name="P200">Modalem divisam in veritate modalis composita de possibili cum termino discreto imitatur, dummodo propositio dicto modalis compositae respondens divisae de inesse extiterit.</text:p>
      <text:p text:style-name="P199"/>
      <text:h text:style-name="Heading_20_3" text:outline-level="3">Modalis divisa de necessario</text:h>
      <text:p text:style-name="Text_20_body">/<text:span text:style-name="T131">150b</text:span>/</text:p>
      <text:p text:style-name="P110"><text:soft-page-break/>De modo cognoscendi veritatem modalis divisae de necessario.</text:p>
      <text:p text:style-name="P104"/>
      <text:p text:style-name="P201"/>
      <text:p text:style-name="Text_20_body"/>
      <text:p text:style-name="Text_20_body"/>
      <text:p text:style-name="P24"/>
      <text:h text:style-name="Heading_20_3" text:outline-level="3">De modalium oppositionibus</text:h>
      <text:p text:style-name="P24">/<text:span text:style-name="T9">151</text:span><text:span text:style-name="T52">b</text:span>/</text:p>
      <text:p text:style-name="P110">Sequitur de oppositionibus modalium.</text:p>
      <text:p text:style-name="P110">Necesse et impossibile modos universales in volarum superciliis locabis, sub quibus possibile et possibile-non modos illis subalternatos inter se subcontrarios trahes. In his oppositionem omnem cum dictis in de inesse deprehendere potes.</text:p>
      <text:p text:style-name="P24"/>
      <text:p text:style-name="P24"/>
      <text:p text:style-name="P136"/>
      <text:h text:style-name="Heading_20_3" text:outline-level="3">De modalium aequipollentis ac conversionibus</text:h>
      <text:p text:style-name="P26">/153<text:span text:style-name="T53">a</text:span>/</text:p>
      <text:p text:style-name="P110">Sequitur de aequipollentiis modalium.</text:p>
      <text:p text:style-name="P110">Si modorum naturam cum his (quae in propositionibus de inesse de aequipollentibus relata sunt) cognoveris, modalium aequivalentes in promptu habes.</text:p>
      <text:p text:style-name="P202"/>
      <text:p text:style-name="P25"/>
      <text:p text:style-name="P28"/>
      <text:p text:style-name="P28"/>
      <text:p text:style-name="P28"/>
      <text:p text:style-name="P28"><text:soft-page-break/>/153<text:span text:style-name="T53">b</text:span>/</text:p>
      <text:p text:style-name="P110">Sequitur de modalium conversionibus.</text:p>
      <text:p text:style-name="P110">Et primo de possibili.</text:p>
      <text:p text:style-name="P110">Propositio de possibili affirmativa in unam de possibili convertitur, quo fit ex opposito consequentis propositio de impossibili in aliam de impossibili transit.</text:p>
      <text:p text:style-name="P27"/>
      <text:p text:style-name="P27"/>
      <text:p text:style-name="Text_20_body"/>
      <text:p text:style-name="Text_20_body"/>
      <text:h text:style-name="Heading_20_3" text:outline-level="3">De contingenti specialiter capto</text:h>
      <text:p text:style-name="P203">/154<text:span text:style-name="T54">b</text:span>/</text:p>
      <text:p text:style-name="P110">De contingenti specialiter capto.</text:p>
      <text:p text:style-name="P115">Contingens specialiter captum in oppositam qualitatem convertitur. Hoc est affirmativa negativae aequipollet. Ipsa exponitur per possibile et possibile-non copulativae, si modus non negetur. Si vero negetur, disiunctive per contradictorias exponentes elucidabitur. Sed si contingens terminus communis antecedat, ut “Ens contingenter est Deus”. Primo illam resolve, quia a primo vocabulo probatio primordium indipiscitur.</text:p>
      <text:p text:style-name="Text_20_body"/>
      <text:h text:style-name="P423" text:outline-level="2"><text:span text:style-name="T91">D</text:span>e hypotheticis</text:h>
      <text:p text:style-name="P135">/157<text:span text:style-name="T55">a</text:span>/</text:p>
      <text:p text:style-name="P110">Sequitur de hypotheticis</text:p>
      <text:p text:style-name="P110">Propositio hypothetica est propositio habens plures categoricas, aut plura complex propositionalia, per aliquam coniunctionem coniunctas. </text:p>
      <text:p text:style-name="Text_20_body"/>
      <text:p text:style-name="Text_20_body"/>
      <text:h text:style-name="Heading_20_3" text:outline-level="3">De conditionalibus</text:h>
      <text:p text:style-name="P133">/157<text:span text:style-name="T56">b</text:span>/</text:p>
      <text:p text:style-name="P396">De conditionalibus.</text:p>
      <text:p text:style-name="P110">Conditionalis est hypothetica per notam ‘si’ notificata, et propositio sive complexum propositionale immediate sequens ly ‘si’ est antecedens, reliquum vero /158a/ consequens.</text:p>
      <text:p text:style-name="Text_20_body"/>
      <text:h text:style-name="Heading_20_3" text:outline-level="3">De conditionali illativa</text:h>
      <text:p text:style-name="Text_20_body">/<text:span text:style-name="T132">158a</text:span>/</text:p>
      <text:p text:style-name="P110">Ad veritatem propositionis conditionalis illativae captae sufficit et consequii bonitas, et ad eius falsitatem consequentiae malitia.</text:p>
      <text:p text:style-name="P110">Quo sit nulla conditionalis in qua ly ‘si’ illative capitur est contingens propositio, sed omnis impossibilis aut necessaria. Eius contradictoriam per negationis praepositionem dabit, quae illationem non valere denotat, aut per expletivam ex antecedente et consequentis contradictorio conflatam.</text:p>
      <text:p text:style-name="P134"/>
      <text:p text:style-name="Text_20_body"/>
      <text:p text:style-name="Text_20_body"><text:soft-page-break/></text:p>
      <text:h text:style-name="Heading_20_3" text:outline-level="3">De conditionali promissiva</text:h>
      <text:p text:style-name="P29">/161<text:span text:style-name="T57">b</text:span>/</text:p>
      <text:p text:style-name="P110">De conditionali promissiva.</text:p>
      <text:p text:style-name="P110">Ad conditionalis promissivae veritatem sat est si ponatur ita esse sicut significatur per vocatum antecedens ita sicut significatur per consequens fuerit, consequentiae tamen valor minime exigitur.</text:p>
      <text:p text:style-name="P104"/>
      <text:h text:style-name="Heading_20_3" text:outline-level="3">De conditionatis</text:h>
      <text:p text:style-name="Text_20_body">/<text:span text:style-name="T133">163b</text:span>/</text:p>
      <text:p text:style-name="P110">Sequuntur propositiones de conditionatis extremis.</text:p>
      <text:p text:style-name="P110">Pro conditionatis est specialis difficultas inter artistas non spernenda. Pro cuius uberior intelligentia nonnullae regulae perstringuntur.</text:p>
      <text:p text:style-name="P110">Prima regula.</text:p>
      <text:p text:style-name="P110">Conditionati suppositio per reductionem propriam ad conditionalem cognoscitur, illius antecedens dictionem inferentem pro praedicato, consequens illatum eodem pro extremo habebit, pronomine demonstrativo pro utriusque subiecto assumpto, rem pro qua tale conditionatum supponere putatur demonstrante. In conditionalis antecedente conditionati copulam, in consequente vero copulam principalem servabis, et si conditionalis vera extiterit, conditionatum pro tali supponebat.</text:p>
      <text:p text:style-name="P104"/>
      <text:p text:style-name="P104"/>
      <text:p text:style-name="P204"/>
      <text:p text:style-name="Text_20_body"/>
      <text:h text:style-name="Heading_20_3" text:outline-level="3"><text:soft-page-break/>De propositione rationali</text:h>
      <text:p text:style-name="P131">/169<text:span text:style-name="T58">b</text:span>/</text:p>
      <text:p text:style-name="P110">De propositione rationali</text:p>
      <text:p text:style-name="P110">Rationalis est propositio hypothetica cuius nota principalis est ‘ergo’ aut aequivalens. Ad cuius veritatem si affirmativa fuerit ultra consequentiae valorem antecedentis consequentisque veritas exigitur. Per affirmativae qualitatem negativae veritas falsitasve lucide deprehenditur.</text:p>
      <text:p text:style-name="P205"><text:s/></text:p>
      <text:p text:style-name="P132"/>
      <text:h text:style-name="Heading_20_3" text:outline-level="3">De propositione causali</text:h>
      <text:p text:style-name="P30">/170<text:span text:style-name="T59">a</text:span>/</text:p>
      <text:p text:style-name="P110">De propositione causali.</text:p>
      <text:p text:style-name="P110">Ultra rationalis proprietates causalis illationis causam efflagitat.</text:p>
      <text:p text:style-name="P206"/>
      <text:p text:style-name="Text_20_body"/>
      <text:h text:style-name="Heading_20_3" text:outline-level="3">De copulativis</text:h>
      <text:p text:style-name="P207">/171<text:span text:style-name="T60">a</text:span>/</text:p>
      <text:p text:style-name="P110">Sequitur de copulativa</text:p>
      <text:p text:style-name="P110">Co<text:span text:style-name="T134">pulativa est hypothetica cum nota copulativa signata. Ad copulativae affirmativae veritatem, iuxta significationem partium significantis, satis est et exigitur utramque partem principalem esse veram, et ad eius falsitatem alteram partium esse falsam sufficit.</text:span></text:p>
      <text:p text:style-name="P213"><text:s/></text:p>
      <text:p text:style-name="Text_20_body"/>
      <text:h text:style-name="Heading_20_3" text:outline-level="3">De copulatis complexive sumptis</text:h>
      <text:p text:style-name="P31">/176<text:span text:style-name="T61">a</text:span>/</text:p>
      <text:p text:style-name="P110"><text:soft-page-break/>Sequitur de propositionibus copulatorum extremorum, et prius de copulatis complexive sumptis.</text:p>
      <text:p text:style-name="P32">/<text:span text:style-name="T135">176b</text:span>/</text:p>
      <text:p text:style-name="P110">Veritas affirmativae de extremo copulato (modo coniunctio complexive sumatur) penes terminorum suppositionem instar aliarum categoricarum mensuranda venit.</text:p>
      <text:p text:style-name="P110">Ad hoc enim quod copulatum pro aliquo supponat sat est et exigitur quamlibet eius partem pro illo accipi, vel unam partem pro toto, reliquam vero pro illius integri portione, vel unam partem copulati pro parte alteramque pro illius totius residuo sumi.</text:p>
      <text:p text:style-name="P208"/>
      <text:p text:style-name="P209"/>
      <text:p text:style-name="Text_20_body"/>
      <text:h text:style-name="Heading_20_3" text:outline-level="3">De copulativis divisive sumptis</text:h>
      <text:p text:style-name="P33">/181<text:span text:style-name="T62">a</text:span>/</text:p>
      <text:p text:style-name="P110">Sequitur de copulatis divisive sumptis</text:p>
      <text:p text:style-name="P110">Si autem et affirmatum divisive sumatur, alterum extremum utrique parti copulati convenire necessum est. Quare copulativa in quam reducitur illius veritatis falsitatisve mensura infallibilis erit.</text:p>
      <text:p text:style-name="P104"/>
      <text:p text:style-name="Text_20_body"/>
      <text:h text:style-name="P434" text:outline-level="3">De disiunctivis</text:h>
      <text:p text:style-name="P35">/185<text:span text:style-name="T63">b</text:span>/</text:p>
      <text:p text:style-name="P116">Sequitur de disiunctivis.</text:p>
      <text:p text:style-name="P116">Disiunctiva est hypothetica cuius nota principalis est vel, aut ei aequivalens. Ad cuius veritatem alteram partem esse veram necessum est.</text:p>
      <text:p text:style-name="P34"/>
      <text:p text:style-name="P34"/>
      <text:p text:style-name="P34"/>
      <text:p text:style-name="P37">/186<text:span text:style-name="T64">a</text:span>/</text:p>
      <text:p text:style-name="P110">De necessitate et possibilitate disiunctivae</text:p>
      <text:p text:style-name="P110">Ad disiunctive necessitatem alteram partem esse necessariam sat est, aut eam contradictoriis ex partibus subcontrariisve esse conflatam. Ad eius possibilitatem unius partis principalis possibilitas sufficit et exigitur. Si enim utraque pars sit impossibilis ipsa impossibilis erit.</text:p>
      <text:p text:style-name="Text_20_body"/>
      <text:h text:style-name="Heading_20_3" text:outline-level="3">De disiunctis complexive su<text:span text:style-name="T100">m</text:span>ptis</text:h>
      <text:p text:style-name="P130">/<text:span text:style-name="T99">19</text:span><text:span text:style-name="T101">2b</text:span>/</text:p>
      <text:p text:style-name="P110">Superest de categoricis disiunctis loqui, et prius de disiunctis complexive sumptis.</text:p>
      <text:p text:style-name="P110">Enuntiationis de disiuncto extremo vel complexive sumpto veritas atque falsitas per subiecti praedicatique acceptionem (more caeterarum propositionum de extremis incomplexis) indagatur.</text:p>
      <text:p text:style-name="P210"/>
      <text:p text:style-name="P210"/>
      <text:p text:style-name="Text_20_body"/>
      <text:h text:style-name="P434" text:outline-level="3">De disiunctis divisive sumptis</text:h>
      <text:p text:style-name="Text_20_body">/<text:span text:style-name="T136">195a</text:span>/</text:p>
      <text:p text:style-name="P397">De propositione de disiuncto vel divisive sumpto.</text:p>
      <text:p text:style-name="P110">Propositio de disiuncto vel divisive sumpto penes disiunctivam ad quam reducitur veri falsique fulcimentum usurpat.</text:p>
      <text:p text:style-name="Text_20_body"/>
      <text:p text:style-name="Text_20_body"/>
      <text:h text:style-name="Heading_20_3" text:outline-level="3">De propositionibus copulatae ac disiuncte copulae</text:h>
      <text:p text:style-name="P129">/197<text:span text:style-name="T65">a</text:span>/</text:p>
      <text:p text:style-name="P110">De propositionibus copulatae ac disiunctae copulae.</text:p>
      <text:p text:style-name="P110">Propositionem de copulata copula ‘si’ et affirmetur per copulativam, et ‘si’ coniunctio negetur per disiunctivam (ad quam reducitur) metieris. Proportionabiliter enuntiationem de copula disiuncta resolvas.</text:p>
      <text:p text:style-name="Text_20_body"/>
      <text:h text:style-name="Heading_20_3" text:outline-level="3">De localibus et temporalibus</text:h>
      <text:p text:style-name="P38">/198<text:span text:style-name="T66">a</text:span>/</text:p>
      <text:p text:style-name="P398">De localibus et temporalibus.</text:p>
      <text:p text:style-name="P110">Demum cum locales et temporales categoricas reor circa hypotheticarum species vela complico.</text:p>
      <text:p text:style-name="P38"/>
      <text:p text:style-name="P36"/>
      <text:p text:style-name="Text_20_body"/>
      <text:h text:style-name="P416" text:outline-level="1">Secundus liber de parvis logicalibus</text:h>
      <text:h text:style-name="P424" text:outline-level="2">De suppositionibus</text:h>
      <text:p text:style-name="P128">/<text:span text:style-name="T4">200</text:span><text:span text:style-name="T17">a</text:span>/</text:p>
      <text:p text:style-name="P110">Sequitur secundus introductionum liber sive parva logicalia. Et primo de suppositionibus agemus, deinde de reliquis ordine congruo est agendum.</text:p>
      <text:p text:style-name="P104"/>
      <text:h text:style-name="P435" text:outline-level="3">De suppositioni<text:span text:style-name="T137">s</text:span> definitione</text:h>
      <text:p text:style-name="P110">De suppositionis definitione.</text:p>
      <text:p text:style-name="P110">Suppositio est notio verificabilis, de pronomine suum, significatum demonstrante secundum exigentiam copulae propositionis in qua ponitur in potentia propinqua, nisi obicem reflectio praestiterit.</text:p>
      <text:p text:style-name="P104"/>
      <text:p text:style-name="Text_20_body"/>
      <text:p text:style-name="Text_20_body"/>
      <text:h text:style-name="Heading_20_3" text:outline-level="3">Suppositionum regulae sive annotamenta</text:h>
      <text:p text:style-name="P126">/205<text:span text:style-name="T17">a</text:span>/</text:p>
      <text:p text:style-name="P110">Sequuntur annotamenta aliqua de propositionum veritatibus penes suppositionem agnoscendis.</text:p>
      <text:p text:style-name="P110">Primum annotamentum.</text:p>
      <text:p text:style-name="P110">Omnis affirmativa cuius extrema non supponunt pro eodem est falsa.</text:p>
      <text:p text:style-name="P211"/>
      <text:p text:style-name="P125"/>
      <text:p text:style-name="Text_20_body"/>
      <text:h text:style-name="P436" text:outline-level="3">Suppositionis divisio in propriam et impropriam</text:h>
      <text:p text:style-name="P127">/<text:span text:style-name="T10">207</text:span><text:span text:style-name="T17">b</text:span>/</text:p>
      <text:p text:style-name="P110">Divisio suppositionis in propriam et impropriam.</text:p>
      <text:p text:style-name="P110">Caeterum suppositionum quaedam propriae quaedam vero impropria, et est impropria acceptio notionis significativae sumptae pro suo significato, omnis alia suppositio personalis propria vocatur.</text:p>
      <text:p text:style-name="P212"/>
      <text:p text:style-name="Text_20_body"/>
      <text:h text:style-name="Heading_20_3" text:outline-level="3">De suppositione materiali</text:h>
      <text:p text:style-name="P39">/209<text:span text:style-name="T18">a</text:span>/</text:p>
      <text:p text:style-name="P110">De suppositione materiali.</text:p>
      <text:p text:style-name="P110">Suppositio materialis est notio pro significantia non ultimata secundum conceptum non-ultimatum supponens, vel sic et facilius, suppositio materialis est terminus pro se et sibi similibus praecise supponens, quaelibet alia suppositio est personalis.</text:p>
      <text:p text:style-name="P214"/>
      <text:p text:style-name="P39"/>
      <text:h text:style-name="Heading_20_3" text:outline-level="3">De suppositione personali</text:h>
      <text:p text:style-name="P40">/210<text:span text:style-name="T19">b</text:span>/</text:p>
      <text:p text:style-name="P110">De suppositione personali.</text:p>
      <text:p text:style-name="P110">Suppositio personalis est vocabulum pro suo significato ultimato in ordine ad conceptum ultimatum supponens, vel ipse conceptus supponens pro suo significato ultimato quod formaliter significat.</text:p>
      <text:p text:style-name="P40"/>
      <text:p text:style-name="P40"/>
      <text:h text:style-name="Heading_20_3" text:outline-level="3"><text:soft-page-break/>De suppositione personali et materiali</text:h>
      <text:p text:style-name="P215">/213b/</text:p>
      <text:p text:style-name="P110">Sequuntur species suppositionum materialis et personalis.</text:p>
      <text:p text:style-name="P110">Item suppositionis quaedam discreta et est vocabulum singulariter supponens.</text:p>
      <text:p text:style-name="P215"/>
      <text:p text:style-name="P123"/>
      <text:h text:style-name="Heading_20_3" text:outline-level="3">De suppositione communi et discreta</text:h>
      <text:p text:style-name="P124">/213b/</text:p>
      <text:p text:style-name="P399">Suppositio communis est terminus communiter acceptus.</text:p>
      <text:p text:style-name="P107"/>
      <text:p text:style-name="P107"/>
      <text:h text:style-name="Heading_20_3" text:outline-level="3">De suppositione confusa et determinata</text:h>
      <text:p text:style-name="P223">/215b/</text:p>
      <text:p text:style-name="P110">Divisio suppositionis communis in determinatam et confusam</text:p>
      <text:p text:style-name="P122"/>
      <text:p text:style-name="P400">Suppositionis communis alia confusa, alia autem determinata.</text:p>
      <text:h text:style-name="Heading_20_3" text:outline-level="3">De suppositione determinata</text:h>
      <text:p text:style-name="P110">Omnis terminus communiter supponens super quem nullum cadit signum aut particulare, non impeditum, supponit determinate.</text:p>
      <text:p text:style-name="P216"/>
      <text:p text:style-name="P216"/>
      <text:p text:style-name="Text_20_body"/>
      <text:h text:style-name="P434" text:outline-level="3">De suppositione confusa</text:h>
      <text:p text:style-name="P217">/216<text:span text:style-name="T20">b</text:span>/</text:p>
      <text:p text:style-name="P110">Suppositionis confusae definitio.</text:p>
      <text:p text:style-name="P110">Suppositio confusa est suppositio super quam signum confusivum non impeditum cadit.</text:p>
      <text:p text:style-name="P218"/>
      <text:p text:style-name="P218"/>
      <text:h text:style-name="Heading_20_4" text:outline-level="4">Suppositionis confusae <text:span text:style-name="T89">et distributivae </text:span>regulae</text:h>
      <text:p text:style-name="Text_20_body">/<text:span text:style-name="T98">217b</text:span>/</text:p>
      <text:p text:style-name="P110">Prima regula</text:p>
      <text:p text:style-name="P110">Terminus communis signum universale affirmativum immediate sequens distribuitur.</text:p>
      <text:p text:style-name="P104"/>
      <text:p text:style-name="P121"/>
      <text:h text:style-name="Heading_20_4" text:outline-level="4">Suppositionis confusae tantum regulae</text:h>
      <text:p text:style-name="P103">/<text:span text:style-name="T12">222</text:span><text:span text:style-name="T13">b</text:span>/</text:p>
      <text:p text:style-name="P401">Sequuntur regulae suppositiones confusae tantum</text:p>
      <text:p text:style-name="Subtitle">Prima</text:p>
      <text:p text:style-name="P110">Dictio mediate sequens signum universale affirmativum confunditur.</text:p>
      <text:p text:style-name="P219"/>
      <text:p text:style-name="Text_20_body"/>
      <text:h text:style-name="Heading_20_2" text:outline-level="2">De natura duorum signorum universalium</text:h>
      <text:p text:style-name="P105">/<text:span text:style-name="T88">224a</text:span>/</text:p>
      <text:p text:style-name="P401">Nunc ponitur una regula de natura duorum signorum universalium.</text:p>
      <text:p text:style-name="Subtitle">Quidquid mobilitat immobilitatum immobilitat mobilitatum.</text:p>
      <text:h text:style-name="P417" text:outline-level="2">Sequitur de relativis</text:h>
      <text:p text:style-name="P220">/227a/</text:p>
      <text:p text:style-name="Subtitle">Sequitur de relativis.</text:p>
      <text:p text:style-name="P110">Relativum grammaticale est vocabulum rei antelate recordativum, abs quo eius acceptio dependet. Et seiungitur, nam quoddam est substantiae, quoddam vero accidentis, et rursus quoddam ide<text:span text:style-name="T138">n</text:span>titatis, quoddam vero diversitatis.</text:p>
      <text:p text:style-name="P221"/>
      <text:p text:style-name="Text_20_body"/>
      <text:h text:style-name="P437" text:outline-level="3">De relativo substantiae identitatis</text:h>
      <text:p text:style-name="P102">/<text:span text:style-name="T87">229a</text:span>/</text:p>
      <text:p text:style-name="Subtitle">Circa relativa nonnullas regulas <text:span text:style-name="T139">per</text:span>breves posuerimus.</text:p>
      <text:p text:style-name="Subtitle">Prima est.</text:p>
      <text:p text:style-name="P110">Relativum substantiae identitatis in copulativa affirmativa positum relatione personali, referens suum antecedens in categorica affirmativa, quod est totale extremum vel extremi principalior pars, accipitur pro illo solo pro quo propositio antecedentis verificari denotatur, dummodo non amplietur ad standum pro pluribus, nec restringatur ad standum pro paucioribus.</text:p>
      <text:p text:style-name="P102"/>
      <text:p text:style-name="P222"/>
      <text:p text:style-name="P222"/>
      <text:p text:style-name="P222"/>
      <text:p text:style-name="P222"/>
      <text:p text:style-name="P222"/>
      <text:p text:style-name="P222"/>
      <text:p text:style-name="P222"/>
      <text:p text:style-name="P222"><text:soft-page-break/>/<text:span text:style-name="T86">232b</text:span>/</text:p>
      <text:p text:style-name="P402">Secunda relativorum regula.</text:p>
      <text:p text:style-name="P117">Tale relativum in aliis a copulativa irrestricte suum antecedens refert, ita quod loco talis relativi suum antecedens ponere licebit.</text:p>
      <text:p text:style-name="Text_20_body"/>
      <text:h text:style-name="P438" text:outline-level="3">De relativo substantiae identitatis <text:span text:style-name="T85">non reciproco</text:span></text:h>
      <text:p text:style-name="P101">/234a/</text:p>
      <text:p text:style-name="Subtitle">Tertia relativorum regula.</text:p>
      <text:p text:style-name="P110">Relativum substantiae identitatis non reciprocum supponit sicut terminus absolutus loco suo positus, ut illae confusae tantum in hac “Aliquis homo est et quilibet homo est ille”, proinde vice relativi subtracti antecedens respective sumptum collocaveris, et propositionis veritatem falsitatemve cernes.</text:p>
      <text:p text:style-name="P101"/>
      <text:h text:style-name="Heading_20_3" text:outline-level="3">De relativo diversitatis</text:h>
      <text:p text:style-name="P100">/<text:span text:style-name="T84">235a</text:span>/</text:p>
      <text:p text:style-name="Subtitle">Quarta relativorum regula.</text:p>
      <text:p text:style-name="P110">Relativum diversitatis perinde ac aliud verbum non relativum supponit.</text:p>
      <text:p text:style-name="P104"/>
      <text:p text:style-name="Text_20_body"/>
      <text:h text:style-name="P434" text:outline-level="3">De relativo reciproco primitivae specie</text:h>
      <text:p text:style-name="Text_20_body">/<text:span text:style-name="T83">236a</text:span>/</text:p>
      <text:p text:style-name="Subtitle">Quinta relativorum regula.</text:p>
      <text:p text:style-name="P110">Relativum reciprocum sive reflexivum primitivae speciei sui antecedentis suppositionem (uti sponsa Phoebi Apollinem) imitatur.</text:p>
      <text:p text:style-name="P104"/>
      <text:p text:style-name="Text_20_body"/>
      <text:h text:style-name="Heading_20_3" text:outline-level="3">De relativo reciproco derivative speciei</text:h>
      <text:p text:style-name="P100">/<text:span text:style-name="T82">237b</text:span>/</text:p>
      <text:p text:style-name="Subtitle">Sexta relativorum regula.</text:p>
      <text:p text:style-name="P110">Relativum reciprocum derivative speciei in reflexivum primitivum resolvitur, ut “Suum cornipedem Cyrus Maior equitat”, “Suum ipsius sonipedem Cyrus Maior equitat”.</text:p>
      <text:p text:style-name="Text_20_body"/>
      <text:p text:style-name="Text_20_body"/>
      <text:h text:style-name="Heading_20_3" text:outline-level="3">De relativo accidentis</text:h>
      <text:p text:style-name="Text_20_body">/<text:span text:style-name="T81">239b/</text:span></text:p>
      <text:p text:style-name="Subtitle">Ultima relativorum regula.</text:p>
      <text:p text:style-name="P110">Relativum accidentis pro re simili vel aequali illi, pro quo proposito antecedentis verificatur accipitur, ut Absalon est candidus et talis est Alexis, Pigmeus est sesquipedalis, et tantus est Ephebus.</text:p>
      <text:h text:style-name="P417" text:outline-level="2">De ascensu et descensu</text:h>
      <text:p text:style-name="P42">/240a/</text:p>
      <text:p text:style-name="Subtitle">Descensus definitio.</text:p>
      <text:p text:style-name="P110">Descensus est consequentia formalis qua a vocabulo superiori ad eius inferiora cum constantia proceditur.</text:p>
      <text:p text:style-name="Text_20_body"/>
      <text:p text:style-name="P41"/>
      <text:p text:style-name="P224">/240b/</text:p>
      <text:p text:style-name="Subtitle">Ascensus definitio.</text:p>
      <text:p text:style-name="P110">In ascensu vero formaliter econtratio. A singularibus ad ipsum universali itur.</text:p>
      <text:p text:style-name="P104"/>
      <text:p text:style-name="P104"/>
      <text:p text:style-name="P44">/242a/</text:p>
      <text:p text:style-name="Subtitle">Sequuntur descensus et ascensus regulae.</text:p>
      <text:p text:style-name="P43"/>
      <text:p text:style-name="Text_20_body"/>
      <text:h text:style-name="P417" text:outline-level="2">De ampliationibus</text:h>
      <text:p text:style-name="P46">/266a/</text:p>
      <text:p text:style-name="Subtitle">Sequitur tractatus ampliationum.</text:p>
      <text:p text:style-name="Subtitle">De ampliatione definitione.</text:p>
      <text:p text:style-name="P110">Ampliatio logicaliter sumpta est notio supponens pro suo significato in ordine ad terminum importantem plures temporum differentias ad suas, saltem separatim verificabiles. Omnis enim ampliatio est ampla suppositio sive ampliatio temporum suppositorum fuerit.</text:p>
      <text:p text:style-name="P45"/>
      <text:p text:style-name="P48"/>
      <text:p text:style-name="P48"/>
      <text:p text:style-name="P48">/267a/</text:p>
      <text:p text:style-name="Subtitle">Sequuntur ampliationum decem regulae: Prima est</text:p>
      <text:p text:style-name="P47"/>
      <text:p text:style-name="Text_20_body"/>
      <text:h text:style-name="P425" text:outline-level="2">De appellationibus</text:h>
      <text:p text:style-name="P225">/<text:span text:style-name="T14">278a</text:span>/</text:p>
      <text:p text:style-name="Subtitle">Sequitur de appellationibus.</text:p>
      <text:p text:style-name="P110">Appellatio est terminus connotativus in propositione existens.</text:p>
      <text:p text:style-name="Text_20_body"/>
      <text:h text:style-name="Heading_20_3" text:outline-level="3">De appellatione reali</text:h>
      <text:p text:style-name="P50">/279a/</text:p>
      <text:p text:style-name="P110">Circa appellationem realem sex regulae notandae veniunt. Quarum prima est<text:span text:style-name="T80">o: Deficiente connotatione vocabuli positivi mediante copula propositionis, eius supposito deest.</text:span></text:p>
      <text:p text:style-name="P49"/>
      <text:h text:style-name="Heading_20_3" text:outline-level="3">De appellatione rationis</text:h>
      <text:p text:style-name="P99">/<text:span text:style-name="T15">285a</text:span>/</text:p>
      <text:p text:style-name="Subtitle">Sequitur de appellationi rationis.</text:p>
      <text:p text:style-name="P110">Appellatio rationis passiva est notio secundum propriam rationem secundum quam significat accepta.</text:p>
      <text:p text:style-name="Text_20_body"/>
      <text:p text:style-name="Text_20_body"/>
      <text:p text:style-name="Text_20_body"/>
      <text:p text:style-name="P95"/>
      <text:h text:style-name="P426" text:outline-level="2">De restrictione</text:h>
      <text:p text:style-name="P226">/288b/</text:p>
      <text:p text:style-name="Subtitle">Sequitur de restrictione.</text:p>
      <text:p text:style-name="P110">Vocabulum restringitur quod pro paucioribus accipitur quae acciperetur restrictione semota.</text:p>
      <text:p text:style-name="P104"/>
      <text:h text:style-name="P417" text:outline-level="2">De Statu <text:span text:style-name="T140">et alienatione</text:span></text:h>
      <text:p text:style-name="P227">/289a/</text:p>
      <text:p text:style-name="P110">Status est vocabulum nec ample ne restricte acceptum.</text:p>
      <text:p text:style-name="P110">Status suppositionis est terminus supponens nec ample nec restricte.</text:p>
      <text:p text:style-name="P104"/>
      <text:p text:style-name="Text_20_body"/>
      <text:p text:style-name="P110">Alienatio est dictio a sua propria suppositione alienata secundum exigentiam additi accepta.</text:p>
      <text:p text:style-name="P104"/>
      <text:h text:style-name="Heading_20_2" text:outline-level="2">De remotione</text:h>
      <text:p text:style-name="P94">/289b/</text:p>
      <text:p text:style-name="P110">Remotio est vox non supponens gratia determinationis additae in propositione qua supponeret si additum removeretur.</text:p>
      <text:p text:style-name="Text_20_body"/>
      <text:h text:style-name="P427" text:outline-level="2">De positione propositionum inesse</text:h>
      <text:p text:style-name="P52">/289b/</text:p>
      <text:p text:style-name="Subtitle">Sequitur de modo cognoscendi veritates propositionum per earum de inesse. <text:span text:style-name="T79">Et primo ponitur haec regula fundamentalis.</text:span></text:p>
      <text:p text:style-name="P110">Cuiuslibet propositionis de praeterito, futuro et modalis, veritas falsitasque per suam vel suas de inesse mensurari potest.</text:p>
      <text:p text:style-name="P104"/>
      <text:p text:style-name="P228"/>
      <text:p text:style-name="P51"/>
      <text:p text:style-name="Text_20_body"/>
      <text:h text:style-name="P428" text:outline-level="2">Definitio consequentiae</text:h>
      <text:p text:style-name="P106">/<text:span text:style-name="T16">296a</text:span>/</text:p>
      <text:p text:style-name="P401">Sequitur de consequentiis in communi, et primo de consequentiae definitione.</text:p>
      <text:p text:style-name="P377">Consequentia est oratio ex antecedente consequente et nota illationis illativae sumpta conflata.</text:p>
      <text:p text:style-name="Text_20_body"/>
      <text:h text:style-name="Heading_20_3" text:outline-level="3">Divisio consequentiae in bonam et malam</text:h>
      <text:p text:style-name="P93">/297a/</text:p>
      <text:p text:style-name="P110">Consequentiarum quaedam bona, quaedam vero mala. Consequentia bona est ea in qua ita esse sicut significatur vel significari potest per antecedens, et non sicut significatur per consequens (extra reflexiva) impossibile est esse. Per oppositum consequentia mala definitur.</text:p>
      <text:p text:style-name="P104"/>
      <text:p text:style-name="P104"/>
      <text:h text:style-name="Heading_20_3" text:outline-level="3">De consequentia formali et materiali</text:h>
      <text:p text:style-name="P92">/<text:span text:style-name="T78">299a</text:span>/</text:p>
      <text:p text:style-name="P110">Caeterum illationum bonarum, quaedam est bona gratia materiae, quaedam vero gratia formae, in simili enim forma malam consequentiam formalis non admittit. Ad hoc ut propositiones similis formae dicantur similem qualitatem, parem quantitatem, et haud dissimilem vocabulorum situm efflagitant.</text:p>
      <text:p text:style-name="P104"/>
      <text:p text:style-name="P104"/>
      <text:p text:style-name="P53"/>
      <text:p text:style-name="Text_20_body"/>
      <text:h text:style-name="P434" text:outline-level="3">De regulus consequentialibus</text:h>
      <text:p text:style-name="P96">/301b/</text:p>
      <text:p text:style-name="P110">Reliquum est aliquas regulas generales argumentandi tradere, <text:span text:style-name="T77">et praecise numero denario contenti manebimus, quarum princeps est. Cuiuslibet bonae consequentiae contradictorium consequentis, antecedentis contradictorium infert.</text:span></text:p>
      <text:p text:style-name="P91"/>
      <text:h text:style-name="P416" text:outline-level="1">Tertius liber de syllogismis</text:h>
      <text:h text:style-name="Heading_20_2" text:outline-level="2">De syllogismis</text:h>
      <text:p text:style-name="P90">/<text:span text:style-name="T3">306</text:span><text:span text:style-name="T67">a</text:span>/</text:p>
      <text:p text:style-name="Subtitle">Exordium tertii libri summularum de syllogismis.</text:p>
      <text:p text:style-name="P110">Syllogismus categoricus est consequentia formalis cuius conclusio ex praemissis medii gratia infertur.</text:p>
      <text:p text:style-name="P229"/>
      <text:p text:style-name="Text_20_body"/>
      <text:h text:style-name="Heading_20_2" text:outline-level="2">Errata syllogismum impedientia</text:h>
      <text:p text:style-name="Text_20_body">/<text:span text:style-name="T76">309b</text:span>/</text:p>
      <text:p text:style-name="P118">Caeterumne inter syllogizandum hallucineris aliquas mendas obiter occurrentes evitaveris. Prima ut medium in praemissa in qua non mobilitatur /<text:span text:style-name="T141">309a</text:span>/ numquam copiosius quae in praemissa in qua distribuitur accipiatur.</text:p>
      <text:p text:style-name="Text_20_body"/>
      <text:p text:style-name="Text_20_body"/>
      <text:h text:style-name="P429" text:outline-level="2">De modis primae figurae.</text:h>
      <text:p text:style-name="Text_20_body">/<text:span text:style-name="T68">311a</text:span>/</text:p>
      <text:p text:style-name="P110">Novenario numero primae figurae modos, supputant qui hisce versiculis patent: Barbara, Celarent, Dari, Ferio, Baralipton, Celantes, Dabitis, Fapesmo, Frisesomorum.</text:p>
      <text:p text:style-name="Text_20_body"/>
      <text:p text:style-name="Text_20_body"/>
      <text:h text:style-name="Heading_20_3" text:outline-level="3"><text:span text:style-name="T75">Primus </text:span><text:span text:style-name="T96">modus primae figurae</text:span><text:span text:style-name="T75"> Barbara</text:span></text:h>
      <text:p text:style-name="P89">/<text:span text:style-name="T75">311b</text:span>/</text:p>
      <text:p text:style-name="P110">In prima figura maiori particulari directe nihil concluseris.</text:p>
      <text:p text:style-name="P104"/>
      <text:p text:style-name="P104"><text:soft-page-break/></text:p>
      <text:p text:style-name="Text_20_body"/>
      <text:p text:style-name="Text_20_body"/>
      <text:h text:style-name="P439" text:outline-level="3">Secundus primae Celarent</text:h>
      <text:p text:style-name="P89">/<text:span text:style-name="T75">315b</text:span>/</text:p>
      <text:p text:style-name="P110">Celarent ex maiori universali negativa et minore universali affirmativa universalem inficiativam directe concludit.</text:p>
      <text:p text:style-name="P88"/>
      <text:p text:style-name="P88"/>
      <text:p text:style-name="P88"/>
      <text:h text:style-name="P440" text:outline-level="3">Tertius primae Darii</text:h>
      <text:p text:style-name="P87">/<text:span text:style-name="T74">317a</text:span>/</text:p>
      <text:p text:style-name="P110">Darii est modus evidens ex suis elementis pervius cuius imperium longe lateque dominatur.</text:p>
      <text:p text:style-name="P104"/>
      <text:p text:style-name="P104"/>
      <text:p text:style-name="P104"/>
      <text:h text:style-name="Heading_20_3" text:outline-level="3">Quartus primae Ferio</text:h>
      <text:p text:style-name="P86">/322b/</text:p>
      <text:p text:style-name="P110">Litterae in Ferio suum modum sufficienter enucleant.</text:p>
      <text:p text:style-name="Text_20_body"/>
      <text:p text:style-name="Text_20_body"/>
      <text:p text:style-name="Text_20_body"/>
      <text:h text:style-name="P434" text:outline-level="3">Modi inevidentes primae figurae</text:h>
      <text:p text:style-name="P85">/<text:span text:style-name="T72">323b</text:span>/</text:p>
      <text:p text:style-name="P110">Quinque modorum invedentium primae figurae per conversionem et praemissarum transpositionem formalitatem medullitus capies, quomodo sunt convertendae et transponendae carmina protrita indicant.</text:p>
      <text:p text:style-name="P110">Simpliciter verti vult ‘s’, ‘p’ vero per acci. M vul<text:span text:style-name="T73">t</text:span> transponi, ‘c’ per impossibile duci.</text:p>
      <text:p text:style-name="P104"/>
      <text:p text:style-name="P104"/>
      <text:p text:style-name="P104"/>
      <text:p text:style-name="P104"/>
      <text:p text:style-name="P104"/>
      <text:h text:style-name="Heading_20_2" text:outline-level="2">Modi secundae figurae</text:h>
      <text:p text:style-name="P84">/326b/</text:p>
      <text:p text:style-name="Subtitle">Sequitur de modis secundae figurae.</text:p>
      <text:p text:style-name="P110">In secunda figura quattuor modi inveniuntur, scilicet, Cesare, Camestres, Festino, Baroco, quae illationes conversivae et per reductionem ad impossibile bene deprehenduntur. Nam per impossibile reducere est cum opposito conclusionis, et altera praemissarum alterius praemissae oppositu inferre.</text:p>
      <text:p text:style-name="P110">In secunda figura maiore servata minor variatur, iuxta carmen: Servat maiorem, variatque secunda minorem.</text:p>
      <text:p text:style-name="Text_20_body"/>
      <text:p text:style-name="Text_20_body"/>
      <text:p text:style-name="P83"/>
      <text:p text:style-name="Text_20_body"/>
      <text:h text:style-name="P417" text:outline-level="2">Modi tertiae figurae</text:h>
      <text:p text:style-name="P55">/330a/</text:p>
      <text:p text:style-name="Subtitle">Sequitur de tertia figura.</text:p>
      <text:p text:style-name="P110">In tertia figura sex sunt modi, scilicet, Darapti, Felapton, Disamis, Datisi, Bocardo, Ferison, quorum evidentiae per reductionem conversivae et per impossibile cognoscuntur, sed quo ad reductionem per impossibile hunc modum notato.</text:p>
      <text:p text:style-name="P110">Tertia maiorem variat, servat minorem.</text:p>
      <text:p text:style-name="Text_20_body"/>
      <text:p text:style-name="Text_20_body"/>
      <text:p text:style-name="P54"/>
      <text:p text:style-name="Text_20_body"/>
      <text:h text:style-name="P417" text:outline-level="2">Syllogismus expositorius</text:h>
      <text:p text:style-name="P82">/331b/</text:p>
      <text:p text:style-name="P110">Syllogismus expositorius est consequentia syllogistica de medio singulari, ad cuius formalitatem quattuor requiruntur et sufficiunt.</text:p>
      <text:p text:style-name="P110">Primo: Medium teneri discrete.</text:p>
      <text:p text:style-name="P110">Secundo: Medium esse totale extremum in altera praemissarum.</text:p>
      <text:p text:style-name="P110">Tertio: Praemissas aequivalere uni de omni aut de nullo.</text:p>
      <text:p text:style-name="P110">Quarto: Medium cum determinatione accepta non unica acceptione non involvi exigitur.</text:p>
      <text:h text:style-name="P416" text:outline-level="1">Quartus liber de exponibilibus</text:h>
      <text:h text:style-name="Heading_20_2" text:outline-level="2">De exponibilibus</text:h>
      <text:p text:style-name="P81">/336a/</text:p>
      <text:p text:style-name="P401">Sequuntur exponibilia Iohannis Maioris Scoti, artium ac theologiae professoris doctissimi.</text:p>
      <text:p text:style-name="P110">Propositio exponibilis est enuntiatio tenebrosum sensum habens ratione signi exponibilis in ea positi.</text:p>
      <text:p text:style-name="P80"/>
      <text:p text:style-name="Text_20_body"/>
      <text:p text:style-name="Text_20_body"/>
      <text:h text:style-name="P417" text:outline-level="2">De exclusivis</text:h>
      <text:p text:style-name="P79">/337b/</text:p>
      <text:p text:style-name="P110">Exponibilia ab exclusivis ordiendo artistae ponere solent, dictiones exclusivae sunt: ‘tantum’, ‘tantummodo’, ‘solum’, ‘solummodo’, ‘praecise’, ‘duntaxat’, ‘unicus’ et similia.</text:p>
      <text:p text:style-name="P104"/>
      <text:p text:style-name="P104"/>
      <text:h text:style-name="Heading_20_3" text:outline-level="3">De exclusivarum regulis</text:h>
      <text:p text:style-name="Text_20_body">/<text:span text:style-name="T142">341b</text:span>/</text:p>
      <text:p text:style-name="P110">Caeterum pro exclusivis plenius capessendis nonnullae regulae notandae veniunt, quarum prime esto: Exclusivam primi ordinis non exclusiva, cuius subiectum non distributum est superius consequentiale vel convertibile cum eiusdem praedicato ubilibet infert.</text:p>
      <text:p text:style-name="Text_20_body"/>
      <text:p text:style-name="Text_20_body"/>
      <text:h text:style-name="P417" text:outline-level="2">De exceptivis</text:h>
      <text:p text:style-name="P78">/352b/</text:p>
      <text:p text:style-name="Subtitle">Sequitur de exceptivis.</text:p>
      <text:p text:style-name="P110">In exceptivis tres exponentes accipito, quarum prima erit praeiacens, at vice partis extra captae notionem contradictoriae oppositam locabis.</text:p>
      <text:p text:style-name="P110">In secunda vocabulum a quo fit exceptio de parte extra capta modo nota exceptiva non negetur, affirmabitur de qua praedicatum cum adversa qualitate ad exponibilem in tertia exponente enuntiabitur.</text:p>
      <text:p text:style-name="Text_20_body"/>
      <text:p text:style-name="Text_20_body"/>
      <text:p text:style-name="P77"/>
      <text:p text:style-name="Text_20_body"/>
      <text:p text:style-name="Text_20_body"/>
      <text:h text:style-name="P417" text:outline-level="2">De reduplicativis</text:h>
      <text:p text:style-name="P57">/362b/</text:p>
      <text:p text:style-name="Subtitle">Sequitur de exponibilibus reduplicativis.</text:p>
      <text:p text:style-name="P110">Quidquid obscurum sensum ratione dictionis reduplicativae sortitur, propositio reduplicativa dicitur.</text:p>
      <text:p text:style-name="P56"/>
      <text:p text:style-name="Text_20_body"/>
      <text:p text:style-name="Text_20_body"/>
      <text:h text:style-name="P430" text:outline-level="2">De immediate</text:h>
      <text:p text:style-name="P59">/365a/</text:p>
      <text:p text:style-name="P110">Signum immediate mensura intercapedinem prohibens in priore exponente praeiacentem, in posteriore vero qualitatem exponibili adversam cum dictione quin expostulat.</text:p>
      <text:p text:style-name="P104"/>
      <text:p text:style-name="P58"/>
      <text:p text:style-name="Text_20_body"/>
      <text:h text:style-name="P431" text:outline-level="2">De incipit et desinit</text:h>
      <text:p text:style-name="P61">/367a/</text:p>
      <text:p text:style-name="Subtitle">Sequuntur exponibilia de incipit et desinit.</text:p>
      <text:p text:style-name="Text_20_body">/<text:span text:style-name="T143">368a</text:span>/</text:p>
      <text:p text:style-name="P110">Per praesentis positionem praeteritique remotionem, aut per futuri positionem, praesentisque remotionem propositio de incipit philosophice fando (modo restrictio aboleatur) illustranda venit.</text:p>
      <text:p text:style-name="P104"/>
      <text:p text:style-name="P230"/>
      <text:p text:style-name="Text_20_body"/>
      <text:p text:style-name="Text_20_body"/>
      <text:p text:style-name="P60"/>
      <text:p text:style-name="Text_20_body"/>
      <text:h text:style-name="P417" text:outline-level="2">De signo alietatis</text:h>
      <text:p text:style-name="P63">/383b/</text:p>
      <text:p text:style-name="Subtitle">Sequitur de differt et caeteris signis alietatis.</text:p>
      <text:p text:style-name="P110">Sortes differt a Platone, sic illustratur Sortes est simul tempore cum Platone, et Sortes non est Plato, opposito modo oppositum detegetur.</text:p>
      <text:p text:style-name="P231"/>
      <text:p text:style-name="Text_20_body"/>
      <text:p text:style-name="Text_20_body"/>
      <text:p text:style-name="P62"/>
      <text:p text:style-name="Text_20_body"/>
      <text:h text:style-name="P417" text:outline-level="2">De ita et sicut</text:h>
      <text:p text:style-name="P65">/388a/</text:p>
      <text:p text:style-name="Subtitle">Sequitur de ita et sicut.</text:p>
      <text:p text:style-name="P110">Ita et sicut exponibiliter capte propositionem reddunt exponibilem hoc pacto “Salomon est ita dives, sicut Cresus”, Salomon est dives et simul tempore Cresus est dives, quia est comparatio in divitiis et Cresus non exuperat Salomonem in divitiis.</text:p>
      <text:p text:style-name="P232"/>
      <text:p text:style-name="P64"/>
      <text:p text:style-name="Text_20_body"/>
      <text:h text:style-name="P417" text:outline-level="2">De comparativo</text:h>
      <text:p text:style-name="P74">/389b/</text:p>
      <text:p text:style-name="Subtitle">Sequitur de comparativo.</text:p>
      <text:p text:style-name="P110">Propositio de comparativo cum una habitudine trifariam exponi solet.</text:p>
      <text:p text:style-name="P110">Uno modo: Proprie et tunc denotat illud in quo est comparatio. Utrique comparabilium debere simul tempore convenire.</text:p>
      <text:p text:style-name="P110">Secundo modo: Capitur improprie et tunc sat est idem rei excedenti competere.</text:p>
      <text:p text:style-name="P110">Tertio modo: Abusiveque acceptio est in omnium ore et tunc explicatur per oppositum sui positivi cum adverbio magis vel minus secundum materiae exigentiam.</text:p>
      <text:p text:style-name="P233"/>
      <text:p text:style-name="Text_20_body"/>
      <text:p text:style-name="Text_20_body"/>
      <text:h text:style-name="P417" text:outline-level="2">De superlativo</text:h>
      <text:p text:style-name="P75">/394<text:span text:style-name="T69">b</text:span>/</text:p>
      <text:p text:style-name="Subtitle">Sequitur de superlativo.</text:p>
      <text:p text:style-name="P110">Superlativus bifariam in propositione ponitur.</text:p>
      <text:p text:style-name="P110">Uno modo cum genitivo sequenti, ut “Sola est pulcherrimus florum”, rosa est pulcher flos et omnis flos est pulcher flos et nullus flos est pulchrior rosa, negative exponendo.</text:p>
      <text:p text:style-name="P110">Si enim affirmative exponatur in tertia exponente dicatur “Rosa omne alio flore a se est pulchrior”.</text:p>
      <text:p text:style-name="P104"/>
      <text:p text:style-name="Text_20_body"/>
      <text:p text:style-name="Text_20_body"/>
      <text:h text:style-name="P417" text:outline-level="2">De infinito</text:h>
      <text:p text:style-name="P76">/396b/</text:p>
      <text:p text:style-name="Subtitle">Sequitur de infinito.</text:p>
      <text:p text:style-name="P110">Infinitum categorematice, ut magnitudini attribuitur, est quantum sine termino protensum, proportionabiliter de infinito discreto dicatur. Infinitum syncategorematice <text:span text:style-name="T144">ut</text:span> magnitudini ascribitur per aliquantum et non tantum quin magis, vel per ly ‘aliquantum’ et ‘quantumlibet magis’, aut per <text:span text:style-name="T145">replicationem specierum quantitatis continuae elucidatur.</text:span></text:p>
      <text:p text:style-name="P110">Alio modo competit quantitati discretae, et tunc conformiter per aliquot et non tot quin plura, aut per aliquot et quotlibet plura, aut per replicationem numeri manifestabitur.</text:p>
      <text:p text:style-name="P234"/>
      <text:p text:style-name="Text_20_body"/>
      <text:h text:style-name="P417" text:outline-level="2">De fit et factum est</text:h>
      <text:p text:style-name="P76">/398b/</text:p>
      <text:p text:style-name="Subtitle">Sequitur de fit, factum est et similibus.</text:p>
      <text:p text:style-name="P110">A calor fit sic exponitur, aliquid a cloris est a<text:span text:style-name="T146">c</text:span>quisitum et aliquid eius est continuo a<text:span text:style-name="T146">c</text:span>quirendum.</text:p>
      <text:p text:style-name="P104"/>
      <text:p text:style-name="Text_20_body"/>
      <text:p text:style-name="Text_20_body"/>
      <text:h text:style-name="P417" text:outline-level="2">De signo totus</text:h>
      <text:p text:style-name="P67">/399a/</text:p>
      <text:p text:style-name="Subtitle">Sequitur de signo totus.</text:p>
      <text:p text:style-name="P110">Totus syncategorematice acceptus per quaelibet pars extricatur. Alio modo tantum valet quantum aliquid et nihil est ipsius quin. Totum categorematice valet integrum vel quod non est pars alterius sive ens habens pars.</text:p>
      <text:p text:style-name="P104"/>
      <text:p text:style-name="P235"/>
      <text:p text:style-name="P66"/>
      <text:p text:style-name="Text_20_body"/>
      <text:p text:style-name="Text_20_body"/>
      <text:h text:style-name="P417" text:outline-level="2">De signis collectivis</text:h>
      <text:p text:style-name="P69">/400a/</text:p>
      <text:p text:style-name="Subtitle">Sequitur de signis collectivis.</text:p>
      <text:p text:style-name="P110">Omnes apostoli Dei sunt duodecim sic explicatur: </text:p>
      <text:p text:style-name="P110">Tota collectio apostolorum Dei est duodecim. <text:span text:style-name="T149">V</text:span>el: <text:span text:style-name="T148">M</text:span>axima multitudo apostolorum Dei est duodecim.</text:p>
      <text:p text:style-name="P110">Omnes apostoli Dei non sunt duodecim. <text:s/><text:span text:style-name="T148">M</text:span>axima multitudo apostolorum non est duodecim.</text:p>
      <text:p text:style-name="P110">Non omnes apostoli dei sunt duodecim. <text:span text:style-name="T148">N</text:span>on maxima multitudo apostolorum dei est duodecim.</text:p>
      <text:p text:style-name="P110">Non omnes apostoli Dei non sunt duodecim. <text:span text:style-name="T148">N</text:span>on maxima multitudo apostolorum Dei non est duodecim.</text:p>
      <text:p text:style-name="P110">Quo fit in plurali numero propositio de ly ‘omnes’, penes /400b/ <text:span text:style-name="T147">sensum districtivum et collectivum, distinguenda venit.</text:span></text:p>
      <text:p text:style-name="P237"/>
      <text:p text:style-name="P236"/>
      <text:p text:style-name="P104"/>
      <text:p text:style-name="P68"/>
      <text:p text:style-name="Text_20_body"/>
      <text:h text:style-name="P417" text:outline-level="2">De essentialiter et intrinsece</text:h>
      <text:p text:style-name="P98">/403b/</text:p>
      <text:p text:style-name="Subtitle">Sequitur de essentialiter et intrinsece.</text:p>
      <text:p text:style-name="P119">Praedicatum competere subiecto remque per subiectum repraesentatam non posse esse quin talis sit res qualis per praedicatum denotatur essentialiter et intrinsece in propositione affirmativa locatum denotat.</text:p>
      <text:p text:style-name="P119"><text:s/></text:p>
      <text:p text:style-name="P97"/>
      <text:h text:style-name="P416" text:outline-level="1">Quintus et finalis de locis dialecticis</text:h>
      <text:p text:style-name="P189">/<text:span text:style-name="T2">404</text:span><text:span text:style-name="T70">a</text:span>/</text:p>
      <text:h text:style-name="Heading_20_2" text:outline-level="2">De locis dialecticis</text:h>
      <text:p text:style-name="Subtitle">Incipit liber quintus de locis dialecticis.</text:p>
      <text:p text:style-name="P110">Conclusio est probabilis propositio, quaestio est dubitabilis enuntiatio.</text:p>
      <text:p text:style-name="P104"/>
      <text:p text:style-name="Text_20_body"/>
      <text:p text:style-name="Text_20_body"/>
      <text:h text:style-name="P417" text:outline-level="2">De locis intrinsecis</text:h>
      <text:p text:style-name="P71">/405a/</text:p>
      <text:p text:style-name="P110">Locus dialecticus sive maxima dialectica est oratio processus topicorum confirmativa.</text:p>
      <text:p text:style-name="P71">...</text:p>
      <text:p text:style-name="P110">Locorum quidem intrinsecus, quidem extrinsecus, quidem vero mediu<text:span text:style-name="T150">s</text:span>.</text:p>
      <text:p text:style-name="P110">Locus intrinsecus est cuius notio inferes et illata convertuntur, vel una /405b/ de alia cum additamento praepositionis verificatur.</text:p>
      <text:p text:style-name="P110">Locus extrinsecus est cuius dictu inferens et illata non convertuntur, nec mediante praepositione ‘in’ verificantur, nec <text:span text:style-name="T151">una nonnihil connotat pro quo alia supponit.</text:span></text:p>
      <text:p text:style-name="P110">In loco medio vocabulum inferens et illatum haud convertuntur, nec unum de alio cum praepositione ‘in’ verificatur, <text:span text:style-name="T152">verum unum eorum aliquid connotat pro quo aliud supponit, vel contra.</text:span></text:p>
      <text:p text:style-name="P238"/>
      <text:p text:style-name="P70"/>
      <text:p text:style-name="Text_20_body"/>
      <text:h text:style-name="P432" text:outline-level="2">De locis mediis</text:h>
      <text:p text:style-name="P189">/<text:span text:style-name="T71">412b</text:span>/</text:p>
      <text:p text:style-name="Subtitle">Sequitur de locis mediis.</text:p>
      <text:p text:style-name="P110">Locorum mediorum, alius a coniungatis, alius a casibus, alius a divisione. Coniugata sunt concretum et eius abstractum. Si concretum de concreto essentialiter praedicetur, abstractum de abstracto enuntiabitur, et contra tam constructive quam destructive.</text:p>
      <text:p text:style-name="P239"><text:s text:c="2"/></text:p>
      <text:p text:style-name="Text_20_body"/>
      <text:p text:style-name="Text_20_body"/>
      <text:h text:style-name="P417" text:outline-level="2">De locis extrinsecis</text:h>
      <text:p text:style-name="P73">/413a/</text:p>
      <text:p text:style-name="Subtitle">Sequitur de locis extrinsecis.</text:p>
      <text:p text:style-name="P110">Locorum extrinsecorum alius ab oppositis, alius a maiore, alius a minore, alius a simili, alius a proportione, alius autem ab auctoritate.</text:p>
      <text:p text:style-name="P240"/>
      <text:p text:style-name="P240"><text:s/></text:p>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91237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riginal" style:family="paragraph" style:parent-style-name="Text_20_body" style:master-page-name="">
      <style:paragraph-properties style:page-number="auto">
        <style:tab-stops/>
      </style:paragraph-properties>
      <style:text-properties fo:font-size="1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8T20:39:21.354766648</meta:creation-date>
    <meta:generator>LibreOffice/24.2.7.2$Linux_X86_64 LibreOffice_project/420$Build-2</meta:generator>
    <dc:date>2026-05-15T00:18:25.054061402</dc:date>
    <meta:editing-duration>P3DT23H46M32S</meta:editing-duration>
    <meta:editing-cycles>1667</meta:editing-cycles>
    <meta:document-statistic meta:table-count="0" meta:image-count="0" meta:object-count="0" meta:page-count="86" meta:paragraph-count="933" meta:word-count="11003" meta:character-count="83195" meta:non-whitespace-character-count="73056"/>
  </office:meta>
</office:document-meta>
</file>