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fo:break-before="page"/>
      <style:text-properties fo:font-style="normal" officeooo:paragraph-rsid="01df7734" style:font-style-asian="normal" style:font-style-complex="normal"/>
    </style:style>
    <style:style style:name="P2" style:family="paragraph" style:parent-style-name="Quotations">
      <style:text-properties fo:font-style="normal" style:font-style-asian="normal" style:font-style-complex="normal"/>
    </style:style>
    <style:style style:name="P3" style:family="paragraph" style:parent-style-name="Subtitle">
      <style:text-properties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officeooo:rsid="0261d741" officeooo:paragraph-rsid="0261d741" style:font-style-asian="normal" style:font-style-complex="normal"/>
    </style:style>
    <style:style style:name="P6" style:family="paragraph" style:parent-style-name="Text_20_body">
      <style:text-properties fo:font-style="normal" officeooo:rsid="0265ea73" officeooo:paragraph-rsid="0265ea73" style:font-style-asian="normal" style:font-style-complex="normal"/>
    </style:style>
    <style:style style:name="P7" style:family="paragraph" style:parent-style-name="Text_20_body">
      <style:text-properties fo:font-style="normal" officeooo:rsid="02526aaf" officeooo:paragraph-rsid="02526aaf" style:font-style-asian="normal" style:font-style-complex="normal"/>
    </style:style>
    <style:style style:name="P8" style:family="paragraph" style:parent-style-name="Text_20_body">
      <style:text-properties fo:font-style="normal" officeooo:rsid="01e2cef5" officeooo:paragraph-rsid="01e2cef5" style:font-style-asian="normal" style:font-style-complex="normal"/>
    </style:style>
    <style:style style:name="P9" style:family="paragraph" style:parent-style-name="Text_20_body">
      <style:text-properties fo:font-style="normal" officeooo:rsid="01e2cef5" officeooo:paragraph-rsid="01e5a53c" style:font-style-asian="normal" style:font-style-complex="normal"/>
    </style:style>
    <style:style style:name="P10" style:family="paragraph" style:parent-style-name="Text_20_body">
      <style:text-properties fo:font-style="normal" officeooo:rsid="01e2cef5" officeooo:paragraph-rsid="01eb7e9d" style:font-style-asian="normal" style:font-style-complex="normal"/>
    </style:style>
    <style:style style:name="P11" style:family="paragraph" style:parent-style-name="Text_20_body">
      <style:text-properties fo:font-style="normal" officeooo:rsid="01e2cef5" officeooo:paragraph-rsid="01eebc31" style:font-style-asian="normal" style:font-style-complex="normal"/>
    </style:style>
    <style:style style:name="P12" style:family="paragraph" style:parent-style-name="Text_20_body">
      <style:text-properties fo:font-style="normal" officeooo:rsid="01e7017a" officeooo:paragraph-rsid="01e89ad2" style:font-style-asian="normal" style:font-style-complex="normal"/>
    </style:style>
    <style:style style:name="P13" style:family="paragraph" style:parent-style-name="Text_20_body">
      <style:text-properties fo:font-style="normal" officeooo:rsid="01e89ad2" officeooo:paragraph-rsid="01eac9ae" style:font-style-asian="normal" style:font-style-complex="normal"/>
    </style:style>
    <style:style style:name="P14" style:family="paragraph" style:parent-style-name="Text_20_body">
      <style:text-properties fo:font-style="normal" officeooo:rsid="01ec2b9f" officeooo:paragraph-rsid="01ed9f7f" style:font-style-asian="normal" style:font-style-complex="normal"/>
    </style:style>
    <style:style style:name="P15" style:family="paragraph" style:parent-style-name="Text_20_body">
      <style:text-properties fo:font-style="normal" officeooo:rsid="01f4cc82" officeooo:paragraph-rsid="01f4cc82" style:font-style-asian="normal" style:font-style-complex="normal"/>
    </style:style>
    <style:style style:name="P16" style:family="paragraph" style:parent-style-name="Text_20_body">
      <style:text-properties fo:font-style="normal" officeooo:rsid="01f6d35d" officeooo:paragraph-rsid="01f6d35d" style:font-style-asian="normal" style:font-style-complex="normal"/>
    </style:style>
    <style:style style:name="P17" style:family="paragraph" style:parent-style-name="Text_20_body">
      <style:text-properties fo:font-style="normal" officeooo:rsid="01f9ac7f" officeooo:paragraph-rsid="01f9ac7f" style:font-style-asian="normal" style:font-style-complex="normal"/>
    </style:style>
    <style:style style:name="P18" style:family="paragraph" style:parent-style-name="Text_20_body">
      <style:text-properties fo:font-style="normal" officeooo:rsid="01fe37fe" officeooo:paragraph-rsid="01fe37fe" style:font-style-asian="normal" style:font-style-complex="normal"/>
    </style:style>
    <style:style style:name="P19" style:family="paragraph" style:parent-style-name="Text_20_body">
      <style:text-properties fo:font-style="normal" officeooo:rsid="0200999d" officeooo:paragraph-rsid="0200999d" style:font-style-asian="normal" style:font-style-complex="normal"/>
    </style:style>
    <style:style style:name="P20" style:family="paragraph" style:parent-style-name="Text_20_body">
      <style:text-properties fo:font-style="normal" officeooo:rsid="020440d6" officeooo:paragraph-rsid="020440d6" style:font-style-asian="normal" style:font-style-complex="normal"/>
    </style:style>
    <style:style style:name="P21" style:family="paragraph" style:parent-style-name="Text_20_body">
      <style:text-properties fo:font-style="normal" officeooo:rsid="0205d88a" officeooo:paragraph-rsid="0209eb48" style:font-style-asian="normal" style:font-style-complex="normal"/>
    </style:style>
    <style:style style:name="P22" style:family="paragraph" style:parent-style-name="Text_20_body">
      <style:text-properties fo:font-style="normal" officeooo:rsid="0209eb48" officeooo:paragraph-rsid="0209eb48" style:font-style-asian="normal" style:font-style-complex="normal"/>
    </style:style>
    <style:style style:name="P23" style:family="paragraph" style:parent-style-name="Text_20_body">
      <style:text-properties fo:font-style="normal" officeooo:rsid="020d20e8" officeooo:paragraph-rsid="020d20e8" style:font-style-asian="normal" style:font-style-complex="normal"/>
    </style:style>
    <style:style style:name="P24" style:family="paragraph" style:parent-style-name="Text_20_body">
      <style:text-properties fo:font-style="normal" officeooo:rsid="020e3511" officeooo:paragraph-rsid="020e3511" style:font-style-asian="normal" style:font-style-complex="normal"/>
    </style:style>
    <style:style style:name="P25" style:family="paragraph" style:parent-style-name="Text_20_body">
      <style:text-properties fo:font-style="normal" officeooo:paragraph-rsid="024b1f5f" style:font-style-asian="normal" style:font-style-complex="normal"/>
    </style:style>
    <style:style style:name="P26" style:family="paragraph" style:parent-style-name="Text_20_body">
      <style:text-properties fo:font-style="normal" officeooo:rsid="02175d36" officeooo:paragraph-rsid="02175d36" style:font-style-asian="normal" style:font-style-complex="normal"/>
    </style:style>
    <style:style style:name="P27" style:family="paragraph" style:parent-style-name="Text_20_body">
      <style:text-properties fo:font-style="normal" officeooo:rsid="02194955" officeooo:paragraph-rsid="0249c60c" style:font-style-asian="normal" style:font-style-complex="normal"/>
    </style:style>
    <style:style style:name="P28" style:family="paragraph" style:parent-style-name="Text_20_body">
      <style:text-properties fo:font-style="normal" officeooo:rsid="021b5024" officeooo:paragraph-rsid="0248beee" style:font-style-asian="normal" style:font-style-complex="normal"/>
    </style:style>
    <style:style style:name="P29" style:family="paragraph" style:parent-style-name="Text_20_body">
      <style:text-properties fo:font-style="normal" officeooo:rsid="021cfd7c" officeooo:paragraph-rsid="021dcde1" style:font-style-asian="normal" style:font-style-complex="normal"/>
    </style:style>
    <style:style style:name="P30" style:family="paragraph" style:parent-style-name="Text_20_body">
      <style:text-properties fo:font-style="normal" officeooo:rsid="021f7566" officeooo:paragraph-rsid="02485fd1" style:font-style-asian="normal" style:font-style-complex="normal"/>
    </style:style>
    <style:style style:name="P31" style:family="paragraph" style:parent-style-name="Text_20_body">
      <style:text-properties fo:font-style="normal" officeooo:paragraph-rsid="021f7566" style:font-style-asian="normal" style:font-style-complex="normal"/>
    </style:style>
    <style:style style:name="P32" style:family="paragraph" style:parent-style-name="Text_20_body">
      <style:text-properties fo:font-style="normal" officeooo:rsid="02284333" officeooo:paragraph-rsid="02284333" style:font-style-asian="normal" style:font-style-complex="normal"/>
    </style:style>
    <style:style style:name="P33" style:family="paragraph" style:parent-style-name="Text_20_body">
      <style:text-properties fo:font-style="normal" officeooo:rsid="02284333" officeooo:paragraph-rsid="02298629" style:font-style-asian="normal" style:font-style-complex="normal"/>
    </style:style>
    <style:style style:name="P34" style:family="paragraph" style:parent-style-name="Text_20_body">
      <style:text-properties fo:font-style="normal" officeooo:paragraph-rsid="02284333" style:font-style-asian="normal" style:font-style-complex="normal"/>
    </style:style>
    <style:style style:name="P35" style:family="paragraph" style:parent-style-name="Text_20_body">
      <style:text-properties fo:font-style="normal" officeooo:rsid="02298629" officeooo:paragraph-rsid="022ac254" style:font-style-asian="normal" style:font-style-complex="normal"/>
    </style:style>
    <style:style style:name="P36" style:family="paragraph" style:parent-style-name="Text_20_body">
      <style:text-properties fo:font-style="normal" officeooo:rsid="022c1a1b" officeooo:paragraph-rsid="022c1a1b" style:font-style-asian="normal" style:font-style-complex="normal"/>
    </style:style>
    <style:style style:name="P37" style:family="paragraph" style:parent-style-name="Text_20_body">
      <style:text-properties fo:font-style="normal" officeooo:rsid="022d34ad" officeooo:paragraph-rsid="022d34ad" style:font-style-asian="normal" style:font-style-complex="normal"/>
    </style:style>
    <style:style style:name="P38" style:family="paragraph" style:parent-style-name="Text_20_body">
      <style:text-properties fo:font-style="normal" officeooo:rsid="022da704" officeooo:paragraph-rsid="022da704" style:font-style-asian="normal" style:font-style-complex="normal"/>
    </style:style>
    <style:style style:name="P39" style:family="paragraph" style:parent-style-name="Text_20_body">
      <style:text-properties fo:font-style="normal" officeooo:rsid="022e0183" officeooo:paragraph-rsid="022e0183" style:font-style-asian="normal" style:font-style-complex="normal"/>
    </style:style>
    <style:style style:name="P40" style:family="paragraph" style:parent-style-name="Text_20_body">
      <style:text-properties fo:font-style="normal" officeooo:rsid="022f84ad" officeooo:paragraph-rsid="022f84ad" style:font-style-asian="normal" style:font-style-complex="normal"/>
    </style:style>
    <style:style style:name="P41" style:family="paragraph" style:parent-style-name="Text_20_body">
      <style:text-properties fo:font-style="normal" officeooo:rsid="02316dc0" officeooo:paragraph-rsid="02316dc0" style:font-style-asian="normal" style:font-style-complex="normal"/>
    </style:style>
    <style:style style:name="P42" style:family="paragraph" style:parent-style-name="Text_20_body">
      <style:text-properties fo:font-style="normal" officeooo:rsid="0232134a" officeooo:paragraph-rsid="0232134a" style:font-style-asian="normal" style:font-style-complex="normal"/>
    </style:style>
    <style:style style:name="P43" style:family="paragraph" style:parent-style-name="Text_20_body">
      <style:text-properties fo:font-style="normal" officeooo:rsid="023408f7" officeooo:paragraph-rsid="023408f7" style:font-style-asian="normal" style:font-style-complex="normal"/>
    </style:style>
    <style:style style:name="P44" style:family="paragraph" style:parent-style-name="Text_20_body">
      <style:text-properties fo:font-style="normal" officeooo:paragraph-rsid="023408f7" style:font-style-asian="normal" style:font-style-complex="normal"/>
    </style:style>
    <style:style style:name="P45" style:family="paragraph" style:parent-style-name="Text_20_body">
      <style:text-properties fo:font-style="normal" officeooo:rsid="0234b0cd" officeooo:paragraph-rsid="0234b0cd" style:font-style-asian="normal" style:font-style-complex="normal"/>
    </style:style>
    <style:style style:name="P46" style:family="paragraph" style:parent-style-name="Text_20_body">
      <style:text-properties fo:font-style="normal" officeooo:rsid="0236973e" officeooo:paragraph-rsid="0236973e" style:font-style-asian="normal" style:font-style-complex="normal"/>
    </style:style>
    <style:style style:name="P47" style:family="paragraph" style:parent-style-name="Text_20_body">
      <style:text-properties fo:font-style="normal" officeooo:rsid="0237c270" officeooo:paragraph-rsid="0237c270" style:font-style-asian="normal" style:font-style-complex="normal"/>
    </style:style>
    <style:style style:name="P48" style:family="paragraph" style:parent-style-name="Text_20_body">
      <style:text-properties fo:font-style="normal" officeooo:rsid="02396e4e" officeooo:paragraph-rsid="02396e4e" style:font-style-asian="normal" style:font-style-complex="normal"/>
    </style:style>
    <style:style style:name="P49" style:family="paragraph" style:parent-style-name="Text_20_body">
      <style:text-properties fo:font-style="normal" officeooo:rsid="023afdeb" officeooo:paragraph-rsid="023afdeb" style:font-style-asian="normal" style:font-style-complex="normal"/>
    </style:style>
    <style:style style:name="P50" style:family="paragraph" style:parent-style-name="Text_20_body">
      <style:text-properties fo:font-style="normal" officeooo:rsid="02417508" officeooo:paragraph-rsid="02417508" style:font-style-asian="normal" style:font-style-complex="normal"/>
    </style:style>
    <style:style style:name="P51" style:family="paragraph" style:parent-style-name="Text_20_body">
      <style:text-properties fo:font-style="normal" officeooo:paragraph-rsid="024d5d34" style:font-style-asian="normal" style:font-style-complex="normal"/>
    </style:style>
    <style:style style:name="P52" style:family="paragraph" style:parent-style-name="Text_20_body">
      <style:text-properties fo:font-style="normal" officeooo:paragraph-rsid="024e6430" style:font-style-asian="normal" style:font-style-complex="normal"/>
    </style:style>
    <style:style style:name="P53" style:family="paragraph" style:parent-style-name="Text_20_body">
      <style:text-properties fo:font-style="normal" officeooo:paragraph-rsid="024f2f9d" style:font-style-asian="normal" style:font-style-complex="normal"/>
    </style:style>
    <style:style style:name="P54" style:family="paragraph" style:parent-style-name="Text_20_body">
      <style:text-properties fo:font-style="normal" officeooo:paragraph-rsid="02643a18" style:font-style-asian="normal" style:font-style-complex="normal"/>
    </style:style>
    <style:style style:name="P55" style:family="paragraph" style:parent-style-name="Text_20_body">
      <style:text-properties fo:font-style="normal" officeooo:rsid="0266b3c7" officeooo:paragraph-rsid="0266b3c7" style:font-style-asian="normal" style:font-style-complex="normal"/>
    </style:style>
    <style:style style:name="P56" style:family="paragraph" style:parent-style-name="Text_20_body">
      <style:text-properties fo:font-style="normal" officeooo:rsid="0266b3c7" officeooo:paragraph-rsid="026e84da" style:font-style-asian="normal" style:font-style-complex="normal"/>
    </style:style>
    <style:style style:name="P57" style:family="paragraph" style:parent-style-name="Text_20_body">
      <style:text-properties fo:font-style="normal" officeooo:rsid="019af19e" officeooo:paragraph-rsid="019af19e" style:font-style-asian="normal" style:font-style-complex="normal"/>
    </style:style>
    <style:style style:name="P58" style:family="paragraph" style:parent-style-name="Text_20_body">
      <style:text-properties fo:font-style="normal" officeooo:rsid="019febf9" officeooo:paragraph-rsid="019febf9" style:font-style-asian="normal" style:font-style-complex="normal"/>
    </style:style>
    <style:style style:name="P59" style:family="paragraph" style:parent-style-name="Text_20_body">
      <style:text-properties fo:font-style="normal" officeooo:rsid="019febf9" officeooo:paragraph-rsid="01af3fff" style:font-style-asian="normal" style:font-style-complex="normal"/>
    </style:style>
    <style:style style:name="P60" style:family="paragraph" style:parent-style-name="Text_20_body">
      <style:text-properties fo:font-style="normal" officeooo:rsid="01a0ca1c" officeooo:paragraph-rsid="01a2376a" style:font-style-asian="normal" style:font-style-complex="normal"/>
    </style:style>
    <style:style style:name="P61" style:family="paragraph" style:parent-style-name="Text_20_body">
      <style:text-properties fo:font-style="normal" officeooo:rsid="01a3648b" officeooo:paragraph-rsid="01a3648b" style:font-style-asian="normal" style:font-style-complex="normal"/>
    </style:style>
    <style:style style:name="P62" style:family="paragraph" style:parent-style-name="Text_20_body">
      <style:text-properties fo:font-style="normal" officeooo:rsid="01a43619" officeooo:paragraph-rsid="01a43619" style:font-style-asian="normal" style:font-style-complex="normal"/>
    </style:style>
    <style:style style:name="P63" style:family="paragraph" style:parent-style-name="Text_20_body">
      <style:text-properties fo:font-style="normal" officeooo:rsid="01a4d560" officeooo:paragraph-rsid="01a4d560" style:font-style-asian="normal" style:font-style-complex="normal"/>
    </style:style>
    <style:style style:name="P64" style:family="paragraph" style:parent-style-name="Text_20_body">
      <style:text-properties fo:font-style="normal" officeooo:rsid="01abf326" officeooo:paragraph-rsid="01abf326" style:font-style-asian="normal" style:font-style-complex="normal"/>
    </style:style>
    <style:style style:name="P65" style:family="paragraph" style:parent-style-name="Text_20_body">
      <style:text-properties fo:font-style="normal" officeooo:rsid="01ad78b1" officeooo:paragraph-rsid="01ad78b1" style:font-style-asian="normal" style:font-style-complex="normal"/>
    </style:style>
    <style:style style:name="P66" style:family="paragraph" style:parent-style-name="Text_20_body">
      <style:text-properties fo:font-style="normal" officeooo:rsid="01ad78b1" officeooo:paragraph-rsid="01ad95a8" style:font-style-asian="normal" style:font-style-complex="normal"/>
    </style:style>
    <style:style style:name="P67" style:family="paragraph" style:parent-style-name="Text_20_body">
      <style:text-properties fo:font-style="normal" officeooo:rsid="01ad95a8" officeooo:paragraph-rsid="01ad95a8" style:font-style-asian="normal" style:font-style-complex="normal"/>
    </style:style>
    <style:style style:name="P68" style:family="paragraph" style:parent-style-name="Text_20_body">
      <style:text-properties fo:font-style="normal" officeooo:rsid="01b20c7d" officeooo:paragraph-rsid="01b20c7d" style:font-style-asian="normal" style:font-style-complex="normal"/>
    </style:style>
    <style:style style:name="P69" style:family="paragraph" style:parent-style-name="Text_20_body">
      <style:text-properties fo:font-style="normal" officeooo:rsid="01b381b2" officeooo:paragraph-rsid="01b381b2" style:font-style-asian="normal" style:font-style-complex="normal"/>
    </style:style>
    <style:style style:name="P70" style:family="paragraph" style:parent-style-name="Text_20_body">
      <style:text-properties fo:font-style="normal" officeooo:rsid="01b56978" officeooo:paragraph-rsid="01b56978" style:font-style-asian="normal" style:font-style-complex="normal"/>
    </style:style>
    <style:style style:name="P71" style:family="paragraph" style:parent-style-name="Text_20_body">
      <style:text-properties fo:font-style="normal" officeooo:rsid="01b6b6ba" officeooo:paragraph-rsid="01b6b6ba" style:font-style-asian="normal" style:font-style-complex="normal"/>
    </style:style>
    <style:style style:name="P72" style:family="paragraph" style:parent-style-name="Text_20_body">
      <style:text-properties fo:font-style="normal" officeooo:rsid="01b6b6ba" officeooo:paragraph-rsid="01b6fbc9" style:font-style-asian="normal" style:font-style-complex="normal"/>
    </style:style>
    <style:style style:name="P73" style:family="paragraph" style:parent-style-name="Text_20_body">
      <style:text-properties fo:font-style="normal" officeooo:rsid="01b83e29" officeooo:paragraph-rsid="01b83e29" style:font-style-asian="normal" style:font-style-complex="normal"/>
    </style:style>
    <style:style style:name="P74" style:family="paragraph" style:parent-style-name="Text_20_body">
      <style:text-properties fo:font-style="normal" officeooo:rsid="01b91373" officeooo:paragraph-rsid="01b91373" style:font-style-asian="normal" style:font-style-complex="normal"/>
    </style:style>
    <style:style style:name="P75" style:family="paragraph" style:parent-style-name="Text_20_body">
      <style:text-properties fo:font-style="normal" officeooo:rsid="01b9b64b" officeooo:paragraph-rsid="01b9b64b" style:font-style-asian="normal" style:font-style-complex="normal"/>
    </style:style>
    <style:style style:name="P76" style:family="paragraph" style:parent-style-name="Text_20_body">
      <style:text-properties fo:font-style="normal" officeooo:rsid="01c1f080" officeooo:paragraph-rsid="01c1f080" style:font-style-asian="normal" style:font-style-complex="normal"/>
    </style:style>
    <style:style style:name="P77" style:family="paragraph" style:parent-style-name="Text_20_body">
      <style:text-properties fo:font-style="normal" officeooo:paragraph-rsid="01ca0002" style:font-style-asian="normal" style:font-style-complex="normal"/>
    </style:style>
    <style:style style:name="P78" style:family="paragraph" style:parent-style-name="Text_20_body">
      <style:text-properties fo:font-style="normal" officeooo:rsid="01ca0002" officeooo:paragraph-rsid="01ca0002" style:font-style-asian="normal" style:font-style-complex="normal"/>
    </style:style>
    <style:style style:name="P79" style:family="paragraph" style:parent-style-name="Text_20_body">
      <style:text-properties fo:font-style="normal" officeooo:rsid="01ca0002" officeooo:paragraph-rsid="01cd0690" style:font-style-asian="normal" style:font-style-complex="normal"/>
    </style:style>
    <style:style style:name="P80" style:family="paragraph" style:parent-style-name="Text_20_body">
      <style:text-properties fo:font-style="normal" officeooo:rsid="01d085b6" officeooo:paragraph-rsid="01d085b6" style:font-style-asian="normal" style:font-style-complex="normal"/>
    </style:style>
    <style:style style:name="P81" style:family="paragraph" style:parent-style-name="Text_20_body">
      <style:text-properties fo:font-style="normal" officeooo:rsid="01d422f7" officeooo:paragraph-rsid="01d422f7" style:font-style-asian="normal" style:font-style-complex="normal"/>
    </style:style>
    <style:style style:name="P82" style:family="paragraph" style:parent-style-name="Text_20_body">
      <style:text-properties fo:font-style="normal" officeooo:rsid="027195ec" officeooo:paragraph-rsid="02719aff" style:font-style-asian="normal" style:font-style-complex="normal"/>
    </style:style>
    <style:style style:name="P83" style:family="paragraph" style:parent-style-name="Text_20_body">
      <style:text-properties fo:font-style="normal" officeooo:rsid="024d5d34" officeooo:paragraph-rsid="024d5d34" style:font-style-asian="normal" style:font-style-complex="normal"/>
    </style:style>
    <style:style style:name="P84" style:family="paragraph" style:parent-style-name="Text_20_body">
      <style:text-properties fo:font-style="normal" officeooo:rsid="024e6430" officeooo:paragraph-rsid="024e6430" style:font-style-asian="normal" style:font-style-complex="normal"/>
    </style:style>
    <style:style style:name="P85" style:family="paragraph" style:parent-style-name="Text_20_body">
      <style:text-properties fo:font-style="normal" officeooo:rsid="024f2f9d" officeooo:paragraph-rsid="024f2f9d" style:font-style-asian="normal" style:font-style-complex="normal"/>
    </style:style>
    <style:style style:name="P86" style:family="paragraph" style:parent-style-name="Text_20_body">
      <style:text-properties fo:font-style="normal" officeooo:rsid="02643a18" officeooo:paragraph-rsid="0265ea73" style:font-style-asian="normal" style:font-style-complex="normal"/>
    </style:style>
    <style:style style:name="P87" style:family="paragraph" style:parent-style-name="Text_20_body">
      <style:text-properties fo:font-style="normal" officeooo:rsid="026e84da" officeooo:paragraph-rsid="026e84da" style:font-style-asian="normal" style:font-style-complex="normal"/>
    </style:style>
    <style:style style:name="P88" style:family="paragraph" style:parent-style-name="Text_20_body">
      <style:text-properties fo:font-style="normal" officeooo:rsid="027ce3ba" officeooo:paragraph-rsid="027ce3ba" style:font-style-asian="normal" style:font-style-complex="normal"/>
    </style:style>
    <style:style style:name="P89" style:family="paragraph" style:parent-style-name="Text_20_body">
      <style:text-properties fo:font-style="normal" officeooo:rsid="027e8aac" officeooo:paragraph-rsid="027e8aac" style:font-style-asian="normal" style:font-style-complex="normal"/>
    </style:style>
    <style:style style:name="P90" style:family="paragraph" style:parent-style-name="Text_20_body">
      <style:text-properties fo:font-style="normal" officeooo:rsid="027eab28" officeooo:paragraph-rsid="027eab28" style:font-style-asian="normal" style:font-style-complex="normal"/>
    </style:style>
    <style:style style:name="P91" style:family="paragraph" style:parent-style-name="Text_20_body">
      <style:text-properties fo:font-style="normal" officeooo:rsid="028023d8" officeooo:paragraph-rsid="028023d8" style:font-style-asian="normal" style:font-style-complex="normal"/>
    </style:style>
    <style:style style:name="P92" style:family="paragraph" style:parent-style-name="Text_20_body">
      <style:text-properties fo:font-style="normal" officeooo:rsid="02813f3c" officeooo:paragraph-rsid="02813f3c" style:font-style-asian="normal" style:font-style-complex="normal"/>
    </style:style>
    <style:style style:name="P93" style:family="paragraph" style:parent-style-name="Text_20_body">
      <style:text-properties fo:font-style="normal" officeooo:rsid="027eecb1" officeooo:paragraph-rsid="027eecb1" style:font-style-asian="normal" style:font-style-complex="normal"/>
    </style:style>
    <style:style style:name="P94" style:family="paragraph" style:parent-style-name="Text_20_body">
      <style:text-properties fo:font-style="normal" officeooo:rsid="0282232c" officeooo:paragraph-rsid="02879650" style:font-style-asian="normal" style:font-style-complex="normal"/>
    </style:style>
    <style:style style:name="P95" style:family="paragraph" style:parent-style-name="Text_20_body">
      <style:text-properties fo:font-style="normal" officeooo:rsid="02881721" officeooo:paragraph-rsid="02881721" style:font-style-asian="normal" style:font-style-complex="normal"/>
    </style:style>
    <style:style style:name="P96" style:family="paragraph" style:parent-style-name="Text_20_body">
      <style:text-properties fo:font-style="normal" officeooo:rsid="028c9d4d" officeooo:paragraph-rsid="028c9d4d" style:font-style-asian="normal" style:font-style-complex="normal"/>
    </style:style>
    <style:style style:name="P97" style:family="paragraph" style:parent-style-name="Text_20_body">
      <style:paragraph-properties fo:margin-left="0in" fo:margin-right="0in" fo:text-indent="0in" style:auto-text-indent="false"/>
      <style:text-properties fo:font-style="normal" officeooo:rsid="028c9d4d" officeooo:paragraph-rsid="028c9d4d" style:font-style-asian="normal" style:font-style-complex="normal"/>
    </style:style>
    <style:style style:name="P98" style:family="paragraph" style:parent-style-name="Text_20_body">
      <style:text-properties fo:font-style="normal" officeooo:rsid="028c9d4d" officeooo:paragraph-rsid="028d40b1" style:font-style-asian="normal" style:font-style-complex="normal"/>
    </style:style>
    <style:style style:name="P99" style:family="paragraph" style:parent-style-name="Text_20_body">
      <style:text-properties fo:font-style="normal" officeooo:rsid="028f8fb0" officeooo:paragraph-rsid="028f8fb0" style:font-style-asian="normal" style:font-style-complex="normal"/>
    </style:style>
    <style:style style:name="P100" style:family="paragraph" style:parent-style-name="Text_20_body">
      <style:text-properties fo:font-style="normal" officeooo:rsid="029974d5" officeooo:paragraph-rsid="029974d5" style:font-style-asian="normal" style:font-style-complex="normal"/>
    </style:style>
    <style:style style:name="P101" style:family="paragraph" style:parent-style-name="Text_20_body">
      <style:text-properties fo:font-style="normal" officeooo:rsid="029acb45" officeooo:paragraph-rsid="029acb45" style:font-style-asian="normal" style:font-style-complex="normal"/>
    </style:style>
    <style:style style:name="P102" style:family="paragraph" style:parent-style-name="Text_20_body">
      <style:text-properties fo:font-style="normal" officeooo:rsid="029cb750" officeooo:paragraph-rsid="029cb750" style:font-style-asian="normal" style:font-style-complex="normal"/>
    </style:style>
    <style:style style:name="P103" style:family="paragraph" style:parent-style-name="Text_20_body">
      <style:text-properties fo:font-style="normal" officeooo:rsid="029ea028" officeooo:paragraph-rsid="029ea028" style:font-style-asian="normal" style:font-style-complex="normal"/>
    </style:style>
    <style:style style:name="P104" style:family="paragraph" style:parent-style-name="Text_20_body">
      <style:text-properties fo:font-style="normal" officeooo:rsid="029fc0fb" officeooo:paragraph-rsid="029fc0fb" style:font-style-asian="normal" style:font-style-complex="normal"/>
    </style:style>
    <style:style style:name="P105" style:family="paragraph" style:parent-style-name="Text_20_body">
      <style:text-properties fo:font-style="normal" officeooo:rsid="02aa3173" officeooo:paragraph-rsid="02aa3173" style:font-style-asian="normal" style:font-style-complex="normal"/>
    </style:style>
    <style:style style:name="P106" style:family="paragraph" style:parent-style-name="Text_20_body">
      <style:text-properties fo:font-style="normal" officeooo:rsid="02af6e7c" officeooo:paragraph-rsid="02af6e7c" style:font-style-asian="normal" style:font-style-complex="normal"/>
    </style:style>
    <style:style style:name="P107" style:family="paragraph" style:parent-style-name="Text_20_body">
      <style:text-properties fo:font-style="normal" officeooo:rsid="02b31880" officeooo:paragraph-rsid="02b31880" style:font-style-asian="normal" style:font-style-complex="normal"/>
    </style:style>
    <style:style style:name="P108" style:family="paragraph" style:parent-style-name="Text_20_body">
      <style:text-properties fo:font-style="normal" officeooo:rsid="02b512be" officeooo:paragraph-rsid="02b512be" style:font-style-asian="normal" style:font-style-complex="normal"/>
    </style:style>
    <style:style style:name="P109" style:family="paragraph" style:parent-style-name="Text_20_body">
      <style:text-properties fo:font-style="normal" officeooo:rsid="02b6e3c1" officeooo:paragraph-rsid="02b6e3c1" style:font-style-asian="normal" style:font-style-complex="normal"/>
    </style:style>
    <style:style style:name="P110" style:family="paragraph" style:parent-style-name="Text_20_body">
      <style:text-properties fo:font-style="normal" officeooo:rsid="02b988d5" officeooo:paragraph-rsid="02b988d5" style:font-style-asian="normal" style:font-style-complex="normal"/>
    </style:style>
    <style:style style:name="P111" style:family="paragraph" style:parent-style-name="Text_20_body">
      <style:text-properties fo:font-style="normal" officeooo:rsid="02ba9c0d" officeooo:paragraph-rsid="02ba9c0d" style:font-style-asian="normal" style:font-style-complex="normal"/>
    </style:style>
    <style:style style:name="P112" style:family="paragraph" style:parent-style-name="Text_20_body">
      <style:text-properties fo:font-style="normal" officeooo:rsid="02ba9c0d" officeooo:paragraph-rsid="02ca818e" style:font-style-asian="normal" style:font-style-complex="normal"/>
    </style:style>
    <style:style style:name="P113" style:family="paragraph" style:parent-style-name="Text_20_body">
      <style:text-properties fo:font-style="normal" officeooo:rsid="02bfb47b" officeooo:paragraph-rsid="02bfb47b" style:font-style-asian="normal" style:font-style-complex="normal"/>
    </style:style>
    <style:style style:name="P114" style:family="paragraph" style:parent-style-name="Text_20_body">
      <style:text-properties fo:font-style="normal" officeooo:rsid="02c187e7" officeooo:paragraph-rsid="02c187e7" style:font-style-asian="normal" style:font-style-complex="normal"/>
    </style:style>
    <style:style style:name="P115" style:family="paragraph" style:parent-style-name="Text_20_body">
      <style:text-properties fo:font-style="normal" officeooo:rsid="02c3164a" officeooo:paragraph-rsid="02c3164a" style:font-style-asian="normal" style:font-style-complex="normal"/>
    </style:style>
    <style:style style:name="P116" style:family="paragraph" style:parent-style-name="Text_20_body">
      <style:text-properties fo:font-style="normal" officeooo:rsid="02cea6f4" officeooo:paragraph-rsid="02cea6f4" style:font-style-asian="normal" style:font-style-complex="normal"/>
    </style:style>
    <style:style style:name="P117" style:family="paragraph" style:parent-style-name="Text_20_body">
      <style:text-properties fo:font-style="normal" officeooo:rsid="02d03925" officeooo:paragraph-rsid="02d03925" style:font-style-asian="normal" style:font-style-complex="normal"/>
    </style:style>
    <style:style style:name="P118" style:family="paragraph" style:parent-style-name="Text_20_body">
      <style:text-properties fo:font-style="normal" officeooo:rsid="02d03925" officeooo:paragraph-rsid="02d1b21e" style:font-style-asian="normal" style:font-style-complex="normal"/>
    </style:style>
    <style:style style:name="P119" style:family="paragraph" style:parent-style-name="Text_20_body">
      <style:text-properties fo:font-style="normal" officeooo:rsid="02d65e38" officeooo:paragraph-rsid="02d6f16d" style:font-style-asian="normal" style:font-style-complex="normal"/>
    </style:style>
    <style:style style:name="P120" style:family="paragraph" style:parent-style-name="Text_20_body">
      <style:text-properties fo:font-style="normal" officeooo:rsid="02d65e38" officeooo:paragraph-rsid="02d5191d" style:font-style-asian="normal" style:font-style-complex="normal"/>
    </style:style>
    <style:style style:name="P121" style:family="paragraph" style:parent-style-name="Text_20_body">
      <style:text-properties fo:font-style="normal" officeooo:rsid="02c6bd49" officeooo:paragraph-rsid="02c6bd49" style:font-style-asian="normal" style:font-style-complex="normal"/>
    </style:style>
    <style:style style:name="P122" style:family="paragraph" style:parent-style-name="Text_20_body">
      <style:text-properties fo:font-style="normal" officeooo:rsid="02c7e1e0" officeooo:paragraph-rsid="02c7e1e0" style:font-style-asian="normal" style:font-style-complex="normal"/>
    </style:style>
    <style:style style:name="P123" style:family="paragraph" style:parent-style-name="Text_20_body">
      <style:text-properties fo:font-style="normal" officeooo:rsid="02c83bbb" officeooo:paragraph-rsid="02c83bbb" style:font-style-asian="normal" style:font-style-complex="normal"/>
    </style:style>
    <style:style style:name="P124" style:family="paragraph" style:parent-style-name="Text_20_body">
      <style:text-properties fo:font-style="normal" officeooo:rsid="02d5191d" officeooo:paragraph-rsid="02d5191d" style:font-style-asian="normal" style:font-style-complex="normal"/>
    </style:style>
    <style:style style:name="P125" style:family="paragraph" style:parent-style-name="Text_20_body">
      <style:text-properties fo:font-style="normal" officeooo:rsid="02e18e13" officeooo:paragraph-rsid="02e18e13" style:font-style-asian="normal" style:font-style-complex="normal"/>
    </style:style>
    <style:style style:name="P126" style:family="paragraph" style:parent-style-name="Text_20_body">
      <style:text-properties fo:font-style="normal" officeooo:rsid="02dac6dc" officeooo:paragraph-rsid="02dac6dc" style:font-style-asian="normal" style:font-style-complex="normal"/>
    </style:style>
    <style:style style:name="P127" style:family="paragraph" style:parent-style-name="Text_20_body">
      <style:text-properties fo:font-style="normal" officeooo:rsid="02de71cc" officeooo:paragraph-rsid="02de71cc" style:font-style-asian="normal" style:font-style-complex="normal"/>
    </style:style>
    <style:style style:name="P128" style:family="paragraph" style:parent-style-name="Text_20_body">
      <style:text-properties fo:font-style="normal" officeooo:rsid="02e42bee" officeooo:paragraph-rsid="02e42bee" style:font-style-asian="normal" style:font-style-complex="normal"/>
    </style:style>
    <style:style style:name="P129" style:family="paragraph" style:parent-style-name="Text_20_body">
      <style:text-properties fo:font-style="normal" officeooo:rsid="02e47f97" officeooo:paragraph-rsid="02e47f97" style:font-style-asian="normal" style:font-style-complex="normal"/>
    </style:style>
    <style:style style:name="P130" style:family="paragraph" style:parent-style-name="Text_20_body">
      <style:text-properties fo:font-style="normal" officeooo:rsid="02e591d8" officeooo:paragraph-rsid="02e6e7a2" style:font-style-asian="normal" style:font-style-complex="normal"/>
    </style:style>
    <style:style style:name="P131" style:family="paragraph" style:parent-style-name="Text_20_body">
      <style:text-properties fo:font-style="normal" officeooo:rsid="02e6e7a2" officeooo:paragraph-rsid="02e759be" style:font-style-asian="normal" style:font-style-complex="normal"/>
    </style:style>
    <style:style style:name="P132" style:family="paragraph" style:parent-style-name="Text_20_body">
      <style:text-properties fo:font-style="normal" officeooo:rsid="02e7e05a" officeooo:paragraph-rsid="02eb2b2b" style:font-style-asian="normal" style:font-style-complex="normal"/>
    </style:style>
    <style:style style:name="P133" style:family="paragraph" style:parent-style-name="Text_20_body">
      <style:text-properties fo:font-style="normal" officeooo:rsid="02ecab14" officeooo:paragraph-rsid="02ecab14" style:font-style-asian="normal" style:font-style-complex="normal"/>
    </style:style>
    <style:style style:name="P134" style:family="paragraph" style:parent-style-name="Text_20_body">
      <style:text-properties fo:font-style="normal" officeooo:rsid="02ee12c8" officeooo:paragraph-rsid="02ee12c8" style:font-style-asian="normal" style:font-style-complex="normal"/>
    </style:style>
    <style:style style:name="P135" style:family="paragraph" style:parent-style-name="Text_20_body">
      <style:text-properties fo:font-style="normal" officeooo:rsid="02fae60b" officeooo:paragraph-rsid="02fae60b" style:font-style-asian="normal" style:font-style-complex="normal"/>
    </style:style>
    <style:style style:name="P136" style:family="paragraph" style:parent-style-name="Text_20_body">
      <style:text-properties fo:font-style="normal" officeooo:rsid="030104b8" officeooo:paragraph-rsid="030104b8" style:font-style-asian="normal" style:font-style-complex="normal"/>
    </style:style>
    <style:style style:name="P137" style:family="paragraph" style:parent-style-name="Text_20_body">
      <style:text-properties fo:font-style="normal" officeooo:rsid="03016a8c" officeooo:paragraph-rsid="03016a8c" style:font-style-asian="normal" style:font-style-complex="normal"/>
    </style:style>
    <style:style style:name="P138" style:family="paragraph" style:parent-style-name="Text_20_body">
      <style:text-properties fo:font-style="normal" officeooo:rsid="03016a8c" officeooo:paragraph-rsid="0302b670" style:font-style-asian="normal" style:font-style-complex="normal"/>
    </style:style>
    <style:style style:name="P139" style:family="paragraph" style:parent-style-name="Text_20_body">
      <style:text-properties fo:font-style="normal" officeooo:rsid="03016a8c" officeooo:paragraph-rsid="030e133f" style:font-style-asian="normal" style:font-style-complex="normal"/>
    </style:style>
    <style:style style:name="P140" style:family="paragraph" style:parent-style-name="Text_20_body">
      <style:text-properties fo:font-style="normal" officeooo:rsid="03016a8c" officeooo:paragraph-rsid="030fb331" style:font-style-asian="normal" style:font-style-complex="normal"/>
    </style:style>
    <style:style style:name="P141" style:family="paragraph" style:parent-style-name="Text_20_body">
      <style:text-properties fo:font-style="normal" officeooo:rsid="03057ce2" officeooo:paragraph-rsid="03057ce2" style:font-style-asian="normal" style:font-style-complex="normal"/>
    </style:style>
    <style:style style:name="P142" style:family="paragraph" style:parent-style-name="Text_20_body">
      <style:text-properties fo:font-style="normal" officeooo:rsid="03057ce2" officeooo:paragraph-rsid="0309a5e8" style:font-style-asian="normal" style:font-style-complex="normal"/>
    </style:style>
    <style:style style:name="P143" style:family="paragraph" style:parent-style-name="Text_20_body">
      <style:text-properties fo:font-style="normal" officeooo:rsid="0308efd1" officeooo:paragraph-rsid="0308efd1" style:font-style-asian="normal" style:font-style-complex="normal"/>
    </style:style>
    <style:style style:name="P144" style:family="paragraph" style:parent-style-name="Text_20_body">
      <style:text-properties fo:font-style="normal" officeooo:rsid="0309a5e8" officeooo:paragraph-rsid="0309a5e8" style:font-style-asian="normal" style:font-style-complex="normal"/>
    </style:style>
    <style:style style:name="P145" style:family="paragraph" style:parent-style-name="Text_20_body">
      <style:text-properties fo:font-style="normal" officeooo:rsid="030c4336" officeooo:paragraph-rsid="030c4336" style:font-style-asian="normal" style:font-style-complex="normal"/>
    </style:style>
    <style:style style:name="P146" style:family="paragraph" style:parent-style-name="Text_20_body">
      <style:text-properties fo:font-style="normal" officeooo:rsid="030fb331" officeooo:paragraph-rsid="030fb331" style:font-style-asian="normal" style:font-style-complex="normal"/>
    </style:style>
    <style:style style:name="P147" style:family="paragraph" style:parent-style-name="Text_20_body">
      <style:text-properties fo:font-style="normal" officeooo:rsid="0311959e" officeooo:paragraph-rsid="0311959e" style:font-style-asian="normal" style:font-style-complex="normal"/>
    </style:style>
    <style:style style:name="P148" style:family="paragraph" style:parent-style-name="Text_20_body">
      <style:text-properties fo:font-style="normal" officeooo:rsid="0319fc43" officeooo:paragraph-rsid="0319fc43" style:font-style-asian="normal" style:font-style-complex="normal"/>
    </style:style>
    <style:style style:name="P149" style:family="paragraph" style:parent-style-name="Text_20_body">
      <style:text-properties fo:font-style="normal" officeooo:rsid="031cf23e" officeooo:paragraph-rsid="031d9383" style:font-style-asian="normal" style:font-style-complex="normal"/>
    </style:style>
    <style:style style:name="P150" style:family="paragraph" style:parent-style-name="Text_20_body">
      <style:text-properties fo:font-style="normal" officeooo:rsid="031d9383" officeooo:paragraph-rsid="031d9383" style:font-style-asian="normal" style:font-style-complex="normal"/>
    </style:style>
    <style:style style:name="P151" style:family="paragraph" style:parent-style-name="Text_20_body">
      <style:text-properties fo:font-style="normal" officeooo:rsid="031dfe99" officeooo:paragraph-rsid="031dfe99" style:font-style-asian="normal" style:font-style-complex="normal"/>
    </style:style>
    <style:style style:name="P152" style:family="paragraph" style:parent-style-name="Text_20_body">
      <style:text-properties fo:font-style="normal" officeooo:rsid="031dfe99" officeooo:paragraph-rsid="031f9bee" style:font-style-asian="normal" style:font-style-complex="normal"/>
    </style:style>
    <style:style style:name="P153" style:family="paragraph" style:parent-style-name="Text_20_body">
      <style:text-properties fo:font-style="normal" officeooo:rsid="031f9bee" officeooo:paragraph-rsid="031f9bee" style:font-style-asian="normal" style:font-style-complex="normal"/>
    </style:style>
    <style:style style:name="P154" style:family="paragraph" style:parent-style-name="Text_20_body">
      <style:text-properties fo:font-style="normal" officeooo:rsid="03237c72" officeooo:paragraph-rsid="03237c72" style:font-style-asian="normal" style:font-style-complex="normal"/>
    </style:style>
    <style:style style:name="P155" style:family="paragraph" style:parent-style-name="Text_20_body">
      <style:text-properties fo:font-style="normal" officeooo:rsid="0329767e" officeooo:paragraph-rsid="0329767e" style:font-style-asian="normal" style:font-style-complex="normal"/>
    </style:style>
    <style:style style:name="P156" style:family="paragraph" style:parent-style-name="Text_20_body">
      <style:text-properties fo:font-style="normal" officeooo:rsid="032a2a03" officeooo:paragraph-rsid="032a2a03" style:font-style-asian="normal" style:font-style-complex="normal"/>
    </style:style>
    <style:style style:name="P157" style:family="paragraph" style:parent-style-name="Text_20_body">
      <style:text-properties fo:font-style="normal" officeooo:rsid="032d42ad" officeooo:paragraph-rsid="032d42ad" style:font-style-asian="normal" style:font-style-complex="normal"/>
    </style:style>
    <style:style style:name="P158" style:family="paragraph" style:parent-style-name="Text_20_body">
      <style:text-properties fo:font-style="normal" officeooo:rsid="032e6a12" officeooo:paragraph-rsid="032e6a12" style:font-style-asian="normal" style:font-style-complex="normal"/>
    </style:style>
    <style:style style:name="P159" style:family="paragraph" style:parent-style-name="Text_20_body">
      <style:text-properties fo:font-style="normal" officeooo:rsid="032e9f22" officeooo:paragraph-rsid="032e9f22" style:font-style-asian="normal" style:font-style-complex="normal"/>
    </style:style>
    <style:style style:name="P160" style:family="paragraph" style:parent-style-name="Text_20_body">
      <style:text-properties fo:font-style="normal" officeooo:rsid="032f807b" officeooo:paragraph-rsid="032f807b" style:font-style-asian="normal" style:font-style-complex="normal"/>
    </style:style>
    <style:style style:name="P161" style:family="paragraph" style:parent-style-name="Text_20_body">
      <style:text-properties fo:font-style="normal" officeooo:rsid="032fa62d" officeooo:paragraph-rsid="032fa62d" style:font-style-asian="normal" style:font-style-complex="normal"/>
    </style:style>
    <style:style style:name="P162" style:family="paragraph" style:parent-style-name="Text_20_body">
      <style:text-properties fo:font-style="normal" officeooo:rsid="0335b696" officeooo:paragraph-rsid="0335b696" style:font-style-asian="normal" style:font-style-complex="normal"/>
    </style:style>
    <style:style style:name="P163" style:family="paragraph" style:parent-style-name="Text_20_body">
      <style:text-properties fo:font-style="normal" officeooo:rsid="0336bbdf" officeooo:paragraph-rsid="0336cdff" style:font-style-asian="normal" style:font-style-complex="normal"/>
    </style:style>
    <style:style style:name="P164" style:family="paragraph" style:parent-style-name="Text_20_body">
      <style:text-properties fo:font-style="normal" officeooo:rsid="0337eff5" officeooo:paragraph-rsid="0337eff5" style:font-style-asian="normal" style:font-style-complex="normal"/>
    </style:style>
    <style:style style:name="P165" style:family="paragraph" style:parent-style-name="Text_20_body">
      <style:text-properties fo:font-style="normal" officeooo:rsid="0337eff5" officeooo:paragraph-rsid="0339a7de" style:font-style-asian="normal" style:font-style-complex="normal"/>
    </style:style>
    <style:style style:name="P166" style:family="paragraph" style:parent-style-name="Text_20_body">
      <style:text-properties fo:font-style="normal" officeooo:rsid="0337eff5" officeooo:paragraph-rsid="036be506" style:font-style-asian="normal" style:font-style-complex="normal"/>
    </style:style>
    <style:style style:name="P167" style:family="paragraph" style:parent-style-name="Text_20_body">
      <style:text-properties fo:font-style="normal" officeooo:rsid="0337eff5" officeooo:paragraph-rsid="036ec05a" style:font-style-asian="normal" style:font-style-complex="normal"/>
    </style:style>
    <style:style style:name="P168" style:family="paragraph" style:parent-style-name="Text_20_body">
      <style:text-properties fo:font-style="normal" officeooo:rsid="0337eff5" officeooo:paragraph-rsid="03719433" style:font-style-asian="normal" style:font-style-complex="normal"/>
    </style:style>
    <style:style style:name="P169" style:family="paragraph" style:parent-style-name="Text_20_body">
      <style:text-properties fo:font-style="normal" officeooo:rsid="033a6a65" officeooo:paragraph-rsid="033d1f31" style:font-style-asian="normal" style:font-style-complex="normal"/>
    </style:style>
    <style:style style:name="P170" style:family="paragraph" style:parent-style-name="Text_20_body">
      <style:text-properties fo:font-style="normal" officeooo:rsid="033d5d2c" officeooo:paragraph-rsid="033d5d2c" style:font-style-asian="normal" style:font-style-complex="normal"/>
    </style:style>
    <style:style style:name="P171" style:family="paragraph" style:parent-style-name="Text_20_body">
      <style:text-properties fo:font-style="normal" officeooo:rsid="0337928c" officeooo:paragraph-rsid="0337928c" style:font-style-asian="normal" style:font-style-complex="normal"/>
    </style:style>
    <style:style style:name="P172" style:family="paragraph" style:parent-style-name="Text_20_body">
      <style:text-properties fo:font-style="normal" officeooo:rsid="033dd872" officeooo:paragraph-rsid="034171ad" style:font-style-asian="normal" style:font-style-complex="normal"/>
    </style:style>
    <style:style style:name="P173" style:family="paragraph" style:parent-style-name="Text_20_body">
      <style:text-properties fo:font-style="normal" officeooo:rsid="034171ad" officeooo:paragraph-rsid="034171ad" style:font-style-asian="normal" style:font-style-complex="normal"/>
    </style:style>
    <style:style style:name="P174" style:family="paragraph" style:parent-style-name="Text_20_body">
      <style:text-properties fo:font-style="normal" officeooo:rsid="0344bfa3" officeooo:paragraph-rsid="0344bfa3" style:font-style-asian="normal" style:font-style-complex="normal"/>
    </style:style>
    <style:style style:name="P175" style:family="paragraph" style:parent-style-name="Text_20_body">
      <style:text-properties fo:font-style="normal" officeooo:rsid="0345e276" officeooo:paragraph-rsid="0345e276" style:font-style-asian="normal" style:font-style-complex="normal"/>
    </style:style>
    <style:style style:name="P176" style:family="paragraph" style:parent-style-name="Text_20_body">
      <style:text-properties fo:font-style="normal" officeooo:rsid="0345e276" officeooo:paragraph-rsid="0348f2c2" style:font-style-asian="normal" style:font-style-complex="normal"/>
    </style:style>
    <style:style style:name="P177" style:family="paragraph" style:parent-style-name="Text_20_body">
      <style:text-properties fo:font-style="normal" officeooo:rsid="0345e276" officeooo:paragraph-rsid="034ab418" style:font-style-asian="normal" style:font-style-complex="normal"/>
    </style:style>
    <style:style style:name="P178" style:family="paragraph" style:parent-style-name="Text_20_body">
      <style:text-properties fo:font-style="normal" officeooo:rsid="034debfb" officeooo:paragraph-rsid="034debfb" style:font-style-asian="normal" style:font-style-complex="normal"/>
    </style:style>
    <style:style style:name="P179" style:family="paragraph" style:parent-style-name="Text_20_body">
      <style:text-properties fo:font-style="normal" officeooo:rsid="034f141e" officeooo:paragraph-rsid="034f141e" style:font-style-asian="normal" style:font-style-complex="normal"/>
    </style:style>
    <style:style style:name="P180" style:family="paragraph" style:parent-style-name="Text_20_body">
      <style:text-properties fo:font-style="normal" officeooo:rsid="0354f214" officeooo:paragraph-rsid="0356d375" style:font-style-asian="normal" style:font-style-complex="normal"/>
    </style:style>
    <style:style style:name="P181" style:family="paragraph" style:parent-style-name="Text_20_body">
      <style:text-properties fo:font-style="normal" officeooo:rsid="035b76ea" officeooo:paragraph-rsid="035b76ea" style:font-style-asian="normal" style:font-style-complex="normal"/>
    </style:style>
    <style:style style:name="P182" style:family="paragraph" style:parent-style-name="Text_20_body">
      <style:text-properties fo:font-style="normal" officeooo:rsid="035e8e48" officeooo:paragraph-rsid="035e8e48" style:font-style-asian="normal" style:font-style-complex="normal"/>
    </style:style>
    <style:style style:name="P183" style:family="paragraph" style:parent-style-name="Text_20_body">
      <style:text-properties fo:font-style="normal" officeooo:rsid="03620773" officeooo:paragraph-rsid="03620773" style:font-style-asian="normal" style:font-style-complex="normal"/>
    </style:style>
    <style:style style:name="P184" style:family="paragraph" style:parent-style-name="Text_20_body">
      <style:text-properties fo:font-style="normal" officeooo:rsid="03638c38" officeooo:paragraph-rsid="03638c38" style:font-style-asian="normal" style:font-style-complex="normal"/>
    </style:style>
    <style:style style:name="P185" style:family="paragraph" style:parent-style-name="Text_20_body">
      <style:text-properties fo:font-style="normal" officeooo:rsid="0364842e" officeooo:paragraph-rsid="0364842e" style:font-style-asian="normal" style:font-style-complex="normal"/>
    </style:style>
    <style:style style:name="P186" style:family="paragraph" style:parent-style-name="Text_20_body">
      <style:text-properties fo:font-style="normal" officeooo:rsid="036be506" officeooo:paragraph-rsid="036be506" style:font-style-asian="normal" style:font-style-complex="normal"/>
    </style:style>
    <style:style style:name="P187" style:family="paragraph" style:parent-style-name="Text_20_body">
      <style:text-properties fo:font-style="normal" officeooo:rsid="036cc457" officeooo:paragraph-rsid="036cc457" style:font-style-asian="normal" style:font-style-complex="normal"/>
    </style:style>
    <style:style style:name="P188" style:family="paragraph" style:parent-style-name="Text_20_body">
      <style:text-properties fo:font-style="normal" officeooo:rsid="036e9593" officeooo:paragraph-rsid="036e9593" style:font-style-asian="normal" style:font-style-complex="normal"/>
    </style:style>
    <style:style style:name="P189" style:family="paragraph" style:parent-style-name="Text_20_body">
      <style:text-properties fo:font-style="normal" officeooo:rsid="036ec05a" officeooo:paragraph-rsid="036ec05a" style:font-style-asian="normal" style:font-style-complex="normal"/>
    </style:style>
    <style:style style:name="P190" style:family="paragraph" style:parent-style-name="Text_20_body">
      <style:text-properties fo:font-style="normal" officeooo:rsid="036fe8ad" officeooo:paragraph-rsid="036fe8ad" style:font-style-asian="normal" style:font-style-complex="normal"/>
    </style:style>
    <style:style style:name="P191" style:family="paragraph" style:parent-style-name="Text_20_body">
      <style:text-properties fo:font-style="normal" officeooo:rsid="03735add" officeooo:paragraph-rsid="03735add" style:font-style-asian="normal" style:font-style-complex="normal"/>
    </style:style>
    <style:style style:name="P192" style:family="paragraph" style:parent-style-name="Text_20_body">
      <style:text-properties fo:font-style="normal" officeooo:rsid="03756c41" officeooo:paragraph-rsid="03756c41" style:font-style-asian="normal" style:font-style-complex="normal"/>
    </style:style>
    <style:style style:name="P193" style:family="paragraph" style:parent-style-name="Text_20_body">
      <style:text-properties fo:font-style="normal" officeooo:rsid="037654be" officeooo:paragraph-rsid="037654be" style:font-style-asian="normal" style:font-style-complex="normal"/>
    </style:style>
    <style:style style:name="P194" style:family="paragraph" style:parent-style-name="Text_20_body">
      <style:text-properties fo:font-style="normal" officeooo:rsid="0376f764" officeooo:paragraph-rsid="0379a86d" style:font-style-asian="normal" style:font-style-complex="normal"/>
    </style:style>
    <style:style style:name="P195" style:family="paragraph" style:parent-style-name="Text_20_body">
      <style:text-properties fo:font-style="normal" officeooo:rsid="0376f764" officeooo:paragraph-rsid="03856df4" style:font-style-asian="normal" style:font-style-complex="normal"/>
    </style:style>
    <style:style style:name="P196" style:family="paragraph" style:parent-style-name="Text_20_body">
      <style:text-properties fo:font-style="normal" officeooo:rsid="037a4457" officeooo:paragraph-rsid="037a4457" style:font-style-asian="normal" style:font-style-complex="normal"/>
    </style:style>
    <style:style style:name="P197" style:family="paragraph" style:parent-style-name="Text_20_body">
      <style:text-properties fo:font-style="normal" officeooo:rsid="03885ce3" officeooo:paragraph-rsid="03885ce3" style:font-style-asian="normal" style:font-style-complex="normal"/>
    </style:style>
    <style:style style:name="P198" style:family="paragraph" style:parent-style-name="Text_20_body">
      <style:text-properties fo:font-style="normal" officeooo:rsid="03885ce3" officeooo:paragraph-rsid="038a3c59" style:font-style-asian="normal" style:font-style-complex="normal"/>
    </style:style>
    <style:style style:name="P199" style:family="paragraph" style:parent-style-name="Text_20_body">
      <style:text-properties fo:font-style="normal" officeooo:rsid="03885ce3" officeooo:paragraph-rsid="038eaed6" style:font-style-asian="normal" style:font-style-complex="normal"/>
    </style:style>
    <style:style style:name="P200" style:family="paragraph" style:parent-style-name="Text_20_body">
      <style:text-properties fo:font-style="normal" officeooo:rsid="03719433" officeooo:paragraph-rsid="03719433" style:font-style-asian="normal" style:font-style-complex="normal"/>
    </style:style>
    <style:style style:name="P201" style:family="paragraph" style:parent-style-name="Text_20_body">
      <style:text-properties fo:font-style="normal" officeooo:rsid="0371ef77" officeooo:paragraph-rsid="0371ef77" style:font-style-asian="normal" style:font-style-complex="normal"/>
    </style:style>
    <style:style style:name="P202" style:family="paragraph" style:parent-style-name="Text_20_body">
      <style:text-properties fo:font-style="normal" officeooo:rsid="0379a86d" officeooo:paragraph-rsid="0379a86d" style:font-style-asian="normal" style:font-style-complex="normal"/>
    </style:style>
    <style:style style:name="P203" style:family="paragraph" style:parent-style-name="Text_20_body">
      <style:text-properties fo:font-style="normal" officeooo:rsid="03904d04" officeooo:paragraph-rsid="03904d04" style:font-style-asian="normal" style:font-style-complex="normal"/>
    </style:style>
    <style:style style:name="P204" style:family="paragraph" style:parent-style-name="Text_20_body">
      <style:text-properties fo:font-style="normal" officeooo:rsid="0391af36" officeooo:paragraph-rsid="0391af36" style:font-style-asian="normal" style:font-style-complex="normal"/>
    </style:style>
    <style:style style:name="P205" style:family="paragraph" style:parent-style-name="Text_20_body">
      <style:text-properties fo:font-style="normal" officeooo:rsid="0391af36" officeooo:paragraph-rsid="03924a82" style:font-style-asian="normal" style:font-style-complex="normal"/>
    </style:style>
    <style:style style:name="P206" style:family="paragraph" style:parent-style-name="Text_20_body">
      <style:text-properties fo:font-style="normal" officeooo:rsid="038c3db4" officeooo:paragraph-rsid="038da41b" style:font-style-asian="normal" style:font-style-complex="normal"/>
    </style:style>
    <style:style style:name="P207" style:family="paragraph" style:parent-style-name="Text_20_body">
      <style:text-properties fo:font-style="normal" officeooo:rsid="038c3db4" officeooo:paragraph-rsid="038c3db4" style:font-style-asian="normal" style:font-style-complex="normal"/>
    </style:style>
    <style:style style:name="P208" style:family="paragraph" style:parent-style-name="Text_20_body">
      <style:text-properties fo:font-style="normal" officeooo:rsid="039042ba" officeooo:paragraph-rsid="039042ba" style:font-style-asian="normal" style:font-style-complex="normal"/>
    </style:style>
    <style:style style:name="P209" style:family="paragraph" style:parent-style-name="Text_20_body">
      <style:text-properties fo:font-style="normal" officeooo:rsid="039318b3" officeooo:paragraph-rsid="03933b53" style:font-style-asian="normal" style:font-style-complex="normal"/>
    </style:style>
    <style:style style:name="P210" style:family="paragraph" style:parent-style-name="Text_20_body">
      <style:text-properties fo:font-style="normal" officeooo:rsid="03924a82" officeooo:paragraph-rsid="03924a82" style:font-style-asian="normal" style:font-style-complex="normal"/>
    </style:style>
    <style:style style:name="P211" style:family="paragraph" style:parent-style-name="Text_20_body">
      <style:text-properties fo:font-style="normal" officeooo:rsid="041d27f3" officeooo:paragraph-rsid="041d27f3" style:font-style-asian="normal" style:font-style-complex="normal"/>
    </style:style>
    <style:style style:name="P212" style:family="paragraph" style:parent-style-name="Text_20_body">
      <style:text-properties fo:font-style="normal" officeooo:rsid="041d2a6e" officeooo:paragraph-rsid="041d2a6e" style:font-style-asian="normal" style:font-style-complex="normal"/>
    </style:style>
    <style:style style:name="P213" style:family="paragraph" style:parent-style-name="Text_20_body">
      <style:text-properties fo:font-style="normal" officeooo:rsid="041ebd24" officeooo:paragraph-rsid="041ebd24" style:font-style-asian="normal" style:font-style-complex="normal"/>
    </style:style>
    <style:style style:name="P214" style:family="paragraph" style:parent-style-name="Text_20_body">
      <style:text-properties fo:font-style="normal" officeooo:rsid="04345d4d" officeooo:paragraph-rsid="04345d4d" style:font-style-asian="normal" style:font-style-complex="normal"/>
    </style:style>
    <style:style style:name="P215" style:family="paragraph" style:parent-style-name="Text_20_body">
      <style:text-properties fo:font-style="normal" officeooo:rsid="0435cea8" officeooo:paragraph-rsid="0435cea8" style:font-style-asian="normal" style:font-style-complex="normal"/>
    </style:style>
    <style:style style:name="P216" style:family="paragraph" style:parent-style-name="Text_20_body">
      <style:text-properties fo:font-style="normal" officeooo:rsid="0435cea8" officeooo:paragraph-rsid="04454f17" style:font-style-asian="normal" style:font-style-complex="normal"/>
    </style:style>
    <style:style style:name="P217" style:family="paragraph" style:parent-style-name="Text_20_body">
      <style:text-properties fo:font-style="normal" officeooo:rsid="0435cea8" officeooo:paragraph-rsid="044a048b" style:font-style-asian="normal" style:font-style-complex="normal"/>
    </style:style>
    <style:style style:name="P218" style:family="paragraph" style:parent-style-name="Text_20_body">
      <style:text-properties fo:font-style="normal" officeooo:rsid="0435cea8" officeooo:paragraph-rsid="04519e06" style:font-style-asian="normal" style:font-style-complex="normal"/>
    </style:style>
    <style:style style:name="P219" style:family="paragraph" style:parent-style-name="Text_20_body">
      <style:text-properties fo:font-style="normal" officeooo:rsid="04364b71" officeooo:paragraph-rsid="04364b71" style:font-style-asian="normal" style:font-style-complex="normal"/>
    </style:style>
    <style:style style:name="P220" style:family="paragraph" style:parent-style-name="Text_20_body">
      <style:text-properties fo:font-style="normal" officeooo:rsid="04364b71" officeooo:paragraph-rsid="043eb460" style:font-style-asian="normal" style:font-style-complex="normal"/>
    </style:style>
    <style:style style:name="P221" style:family="paragraph" style:parent-style-name="Text_20_body">
      <style:text-properties fo:font-style="normal" officeooo:rsid="04364b71" officeooo:paragraph-rsid="04448878" style:font-style-asian="normal" style:font-style-complex="normal"/>
    </style:style>
    <style:style style:name="P222" style:family="paragraph" style:parent-style-name="Text_20_body">
      <style:text-properties fo:font-style="normal" officeooo:rsid="0439568b" officeooo:paragraph-rsid="043a1160" style:font-style-asian="normal" style:font-style-complex="normal"/>
    </style:style>
    <style:style style:name="P223" style:family="paragraph" style:parent-style-name="Text_20_body">
      <style:text-properties fo:font-style="normal" officeooo:rsid="043df92f" officeooo:paragraph-rsid="043df92f" style:font-style-asian="normal" style:font-style-complex="normal"/>
    </style:style>
    <style:style style:name="P224" style:family="paragraph" style:parent-style-name="Text_20_body">
      <style:text-properties fo:font-style="normal" officeooo:rsid="043eb460" officeooo:paragraph-rsid="043eb460" style:font-style-asian="normal" style:font-style-complex="normal"/>
    </style:style>
    <style:style style:name="P225" style:family="paragraph" style:parent-style-name="Text_20_body">
      <style:text-properties fo:font-style="normal" officeooo:rsid="044597df" officeooo:paragraph-rsid="044597df" style:font-style-asian="normal" style:font-style-complex="normal"/>
    </style:style>
    <style:style style:name="P226" style:family="paragraph" style:parent-style-name="Text_20_body">
      <style:text-properties fo:font-style="normal" officeooo:rsid="04462c69" officeooo:paragraph-rsid="04462c69" style:font-style-asian="normal" style:font-style-complex="normal"/>
    </style:style>
    <style:style style:name="P227" style:family="paragraph" style:parent-style-name="Text_20_body">
      <style:text-properties fo:font-style="normal" officeooo:rsid="0447ce36" officeooo:paragraph-rsid="0447ce36" style:font-style-asian="normal" style:font-style-complex="normal"/>
    </style:style>
    <style:style style:name="P228" style:family="paragraph" style:parent-style-name="Text_20_body">
      <style:text-properties fo:font-style="normal" officeooo:rsid="0447d990" officeooo:paragraph-rsid="04493063" style:font-style-asian="normal" style:font-style-complex="normal"/>
    </style:style>
    <style:style style:name="P229" style:family="paragraph" style:parent-style-name="Text_20_body">
      <style:text-properties fo:font-style="normal" officeooo:rsid="044da83e" officeooo:paragraph-rsid="044f790b" style:font-style-asian="normal" style:font-style-complex="normal"/>
    </style:style>
    <style:style style:name="P230" style:family="paragraph" style:parent-style-name="Text_20_body">
      <style:text-properties fo:font-style="normal" officeooo:rsid="0454a2fa" officeooo:paragraph-rsid="0454a2fa" style:font-style-asian="normal" style:font-style-complex="normal"/>
    </style:style>
    <style:style style:name="P231" style:family="paragraph" style:parent-style-name="Text_20_body">
      <style:text-properties fo:font-style="normal" officeooo:rsid="04555917" officeooo:paragraph-rsid="04555917" style:font-style-asian="normal" style:font-style-complex="normal"/>
    </style:style>
    <style:style style:name="P232" style:family="paragraph" style:parent-style-name="Title">
      <style:text-properties fo:font-style="normal" style:font-style-asian="normal" style:font-style-complex="normal"/>
    </style:style>
    <style:style style:name="P233" style:family="paragraph" style:parent-style-name="Title">
      <style:text-properties fo:font-style="normal" officeooo:rsid="01959ea9" officeooo:paragraph-rsid="01978e6d" style:font-style-asian="normal" style:font-style-complex="normal"/>
    </style:style>
    <style:style style:name="P234" style:family="paragraph" style:parent-style-name="Text_20_body">
      <style:paragraph-properties fo:margin-left="0in" fo:margin-right="0in" fo:text-indent="0in" style:auto-text-indent="false"/>
      <style:text-properties fo:font-style="normal" officeooo:rsid="02f0e237" officeooo:paragraph-rsid="02f0e237" style:font-style-asian="normal" style:font-style-complex="normal"/>
    </style:style>
    <style:style style:name="P235" style:family="paragraph" style:parent-style-name="Text_20_body">
      <style:paragraph-properties fo:margin-left="0in" fo:margin-right="0in" fo:text-indent="0in" style:auto-text-indent="false"/>
      <style:text-properties fo:font-style="normal" officeooo:rsid="02f42c9e" officeooo:paragraph-rsid="02f42c9e" style:font-style-asian="normal" style:font-style-complex="normal"/>
    </style:style>
    <style:style style:name="P236" style:family="paragraph" style:parent-style-name="Text_20_body">
      <style:paragraph-properties fo:margin-left="0in" fo:margin-right="0in" fo:text-indent="0in" style:auto-text-indent="false"/>
      <style:text-properties fo:font-style="normal" officeooo:rsid="02f630b4" officeooo:paragraph-rsid="02f71644" style:font-style-asian="normal" style:font-style-complex="normal"/>
    </style:style>
    <style:style style:name="P237" style:family="paragraph" style:parent-style-name="Text_20_body">
      <style:paragraph-properties fo:margin-left="0in" fo:margin-right="0in" fo:text-indent="0in" style:auto-text-indent="false"/>
      <style:text-properties fo:font-style="normal" officeooo:rsid="02f949ed" officeooo:paragraph-rsid="02f949ed" style:font-style-asian="normal" style:font-style-complex="normal"/>
    </style:style>
    <style:style style:name="P238" style:family="paragraph" style:parent-style-name="Text_20_body">
      <style:text-properties officeooo:paragraph-rsid="01bc25e5"/>
    </style:style>
    <style:style style:name="P239" style:family="paragraph" style:parent-style-name="Text_20_body">
      <style:text-properties officeooo:paragraph-rsid="01c1f080"/>
    </style:style>
    <style:style style:name="P240" style:family="paragraph" style:parent-style-name="Text_20_body">
      <style:text-properties officeooo:paragraph-rsid="01cea960"/>
    </style:style>
    <style:style style:name="P241" style:family="paragraph" style:parent-style-name="Text_20_body">
      <style:text-properties officeooo:rsid="0276bbc7" officeooo:paragraph-rsid="0276bbc7"/>
    </style:style>
    <style:style style:name="P242" style:family="paragraph" style:parent-style-name="Text_20_body">
      <style:text-properties officeooo:rsid="02771a56" officeooo:paragraph-rsid="02771a56"/>
    </style:style>
    <style:style style:name="P243" style:family="paragraph" style:parent-style-name="Text_20_body">
      <style:text-properties officeooo:rsid="02791582" officeooo:paragraph-rsid="02791582"/>
    </style:style>
    <style:style style:name="P244" style:family="paragraph" style:parent-style-name="Text_20_body">
      <style:text-properties officeooo:paragraph-rsid="02881721"/>
    </style:style>
    <style:style style:name="P245" style:family="paragraph" style:parent-style-name="Text_20_body">
      <style:text-properties officeooo:paragraph-rsid="028a1a02"/>
    </style:style>
    <style:style style:name="P246" style:family="paragraph" style:parent-style-name="Text_20_body">
      <style:text-properties officeooo:paragraph-rsid="028c9d4d"/>
    </style:style>
    <style:style style:name="P247" style:family="paragraph" style:parent-style-name="Text_20_body">
      <style:text-properties officeooo:rsid="029538bb" officeooo:paragraph-rsid="029538bb"/>
    </style:style>
    <style:style style:name="P248" style:family="paragraph" style:parent-style-name="Text_20_body">
      <style:text-properties officeooo:rsid="02969cd8" officeooo:paragraph-rsid="02969cd8"/>
    </style:style>
    <style:style style:name="P249" style:family="paragraph" style:parent-style-name="Text_20_body">
      <style:text-properties officeooo:rsid="02994f46" officeooo:paragraph-rsid="02994f46"/>
    </style:style>
    <style:style style:name="P250" style:family="paragraph" style:parent-style-name="Text_20_body">
      <style:text-properties officeooo:rsid="029fc0fb" officeooo:paragraph-rsid="029fc0fb"/>
    </style:style>
    <style:style style:name="P251" style:family="paragraph" style:parent-style-name="Text_20_body">
      <style:text-properties officeooo:rsid="02a165a1" officeooo:paragraph-rsid="02a165a1"/>
    </style:style>
    <style:style style:name="P252" style:family="paragraph" style:parent-style-name="Text_20_body">
      <style:text-properties officeooo:rsid="02aa3173" officeooo:paragraph-rsid="02aa874e"/>
    </style:style>
    <style:style style:name="P253" style:family="paragraph" style:parent-style-name="Text_20_body">
      <style:text-properties officeooo:rsid="02b08a9f" officeooo:paragraph-rsid="02b08a9f"/>
    </style:style>
    <style:style style:name="P254" style:family="paragraph" style:parent-style-name="Text_20_body">
      <style:text-properties officeooo:rsid="02b512be" officeooo:paragraph-rsid="02b6e3c1"/>
    </style:style>
    <style:style style:name="P255" style:family="paragraph" style:parent-style-name="Text_20_body">
      <style:text-properties officeooo:rsid="02b988d5" officeooo:paragraph-rsid="02b988d5"/>
    </style:style>
    <style:style style:name="P256" style:family="paragraph" style:parent-style-name="Text_20_body">
      <style:text-properties officeooo:rsid="02c07138" officeooo:paragraph-rsid="02c07138"/>
    </style:style>
    <style:style style:name="P257" style:family="paragraph" style:parent-style-name="Text_20_body">
      <style:text-properties officeooo:rsid="02c187e7" officeooo:paragraph-rsid="02c187e7"/>
    </style:style>
    <style:style style:name="P258" style:family="paragraph" style:parent-style-name="Text_20_body">
      <style:text-properties officeooo:rsid="02c276be" officeooo:paragraph-rsid="02c276be"/>
    </style:style>
    <style:style style:name="P259" style:family="paragraph" style:parent-style-name="Text_20_body">
      <style:text-properties officeooo:rsid="02c3164a" officeooo:paragraph-rsid="02c3164a"/>
    </style:style>
    <style:style style:name="P260" style:family="paragraph" style:parent-style-name="Text_20_body">
      <style:text-properties officeooo:rsid="02c3164a" officeooo:paragraph-rsid="02c6bd49"/>
    </style:style>
    <style:style style:name="P261" style:family="paragraph" style:parent-style-name="Text_20_body">
      <style:text-properties officeooo:rsid="02c3164a" officeooo:paragraph-rsid="02c83bbb"/>
    </style:style>
    <style:style style:name="P262" style:family="paragraph" style:parent-style-name="Text_20_body">
      <style:text-properties officeooo:paragraph-rsid="02dac6dc"/>
    </style:style>
    <style:style style:name="P263" style:family="paragraph" style:parent-style-name="Text_20_body">
      <style:text-properties officeooo:paragraph-rsid="02de71cc"/>
    </style:style>
    <style:style style:name="P264" style:family="paragraph" style:parent-style-name="Text_20_body">
      <style:text-properties officeooo:rsid="02e42bee" officeooo:paragraph-rsid="02e42bee"/>
    </style:style>
    <style:style style:name="P265" style:family="paragraph" style:parent-style-name="Text_20_body">
      <style:text-properties officeooo:paragraph-rsid="02edefa2"/>
    </style:style>
    <style:style style:name="P266" style:family="paragraph" style:parent-style-name="Text_20_body">
      <style:text-properties officeooo:paragraph-rsid="02ee12c8"/>
    </style:style>
    <style:style style:name="P267" style:family="paragraph" style:parent-style-name="Text_20_body">
      <style:text-properties officeooo:paragraph-rsid="0311959e"/>
    </style:style>
    <style:style style:name="P268" style:family="paragraph" style:parent-style-name="Text_20_body">
      <style:text-properties officeooo:rsid="0318347e" officeooo:paragraph-rsid="0318347e"/>
    </style:style>
    <style:style style:name="P269" style:family="paragraph" style:parent-style-name="Text_20_body">
      <style:text-properties officeooo:rsid="0319fc43" officeooo:paragraph-rsid="031cf23e"/>
    </style:style>
    <style:style style:name="P270" style:family="paragraph" style:parent-style-name="Text_20_body">
      <style:text-properties officeooo:paragraph-rsid="03237c72"/>
    </style:style>
    <style:style style:name="P271" style:family="paragraph" style:parent-style-name="Text_20_body">
      <style:text-properties officeooo:paragraph-rsid="03250f56"/>
    </style:style>
    <style:style style:name="P272" style:family="paragraph" style:parent-style-name="Text_20_body">
      <style:text-properties officeooo:paragraph-rsid="03261f47"/>
    </style:style>
    <style:style style:name="P273" style:family="paragraph" style:parent-style-name="Text_20_body">
      <style:text-properties officeooo:rsid="0329767e" officeooo:paragraph-rsid="0329767e"/>
    </style:style>
    <style:style style:name="P274" style:family="paragraph" style:parent-style-name="Text_20_body">
      <style:text-properties officeooo:rsid="032bc94d" officeooo:paragraph-rsid="032bc94d"/>
    </style:style>
    <style:style style:name="P275" style:family="paragraph" style:parent-style-name="Text_20_body">
      <style:text-properties officeooo:rsid="032d42ad" officeooo:paragraph-rsid="032e6a12"/>
    </style:style>
    <style:style style:name="P276" style:family="paragraph" style:parent-style-name="Text_20_body">
      <style:text-properties officeooo:rsid="032d42ad" officeooo:paragraph-rsid="032e9f22"/>
    </style:style>
    <style:style style:name="P277" style:family="paragraph" style:parent-style-name="Text_20_body">
      <style:text-properties officeooo:paragraph-rsid="0334a783"/>
    </style:style>
    <style:style style:name="P278" style:family="paragraph" style:parent-style-name="Text_20_body">
      <style:text-properties officeooo:paragraph-rsid="0336bbdf"/>
    </style:style>
    <style:style style:name="P279" style:family="paragraph" style:parent-style-name="Text_20_body">
      <style:text-properties officeooo:paragraph-rsid="0351e1f5"/>
    </style:style>
    <style:style style:name="P280" style:family="paragraph" style:parent-style-name="Text_20_body">
      <style:text-properties officeooo:paragraph-rsid="0354f214"/>
    </style:style>
    <style:style style:name="P281" style:family="paragraph" style:parent-style-name="Text_20_body">
      <style:text-properties officeooo:paragraph-rsid="0359218f"/>
    </style:style>
    <style:style style:name="P282" style:family="paragraph" style:parent-style-name="Text_20_body">
      <style:text-properties officeooo:paragraph-rsid="035b76ea"/>
    </style:style>
    <style:style style:name="P283" style:family="paragraph" style:parent-style-name="Text_20_body">
      <style:text-properties officeooo:paragraph-rsid="035eb8f3"/>
    </style:style>
    <style:style style:name="P284" style:family="paragraph" style:parent-style-name="Text_20_body">
      <style:text-properties officeooo:paragraph-rsid="03609530"/>
    </style:style>
    <style:style style:name="P285" style:family="paragraph" style:parent-style-name="Text_20_body">
      <style:text-properties officeooo:paragraph-rsid="03638c38"/>
    </style:style>
    <style:style style:name="P286" style:family="paragraph" style:parent-style-name="Text_20_body">
      <style:text-properties officeooo:paragraph-rsid="0364842e"/>
    </style:style>
    <style:style style:name="P287" style:family="paragraph" style:parent-style-name="Text_20_body">
      <style:text-properties officeooo:rsid="0397148a" officeooo:paragraph-rsid="0397148a"/>
    </style:style>
    <style:style style:name="P288" style:family="paragraph" style:parent-style-name="Text_20_body">
      <style:text-properties officeooo:rsid="0397148a" officeooo:paragraph-rsid="0397ad1b"/>
    </style:style>
    <style:style style:name="P289" style:family="paragraph" style:parent-style-name="Text_20_body">
      <style:text-properties officeooo:rsid="0397148a" officeooo:paragraph-rsid="039b0e17"/>
    </style:style>
    <style:style style:name="P290" style:family="paragraph" style:parent-style-name="Text_20_body">
      <style:text-properties officeooo:rsid="0397148a" officeooo:paragraph-rsid="039c4177"/>
    </style:style>
    <style:style style:name="P291" style:family="paragraph" style:parent-style-name="Text_20_body">
      <style:text-properties officeooo:rsid="039ca5e5" officeooo:paragraph-rsid="039ca5e5"/>
    </style:style>
    <style:style style:name="P292" style:family="paragraph" style:parent-style-name="Text_20_body">
      <style:text-properties officeooo:rsid="039f4425" officeooo:paragraph-rsid="039f4425"/>
    </style:style>
    <style:style style:name="P293" style:family="paragraph" style:parent-style-name="Text_20_body">
      <style:text-properties officeooo:rsid="03a1437c" officeooo:paragraph-rsid="03a1437c"/>
    </style:style>
    <style:style style:name="P294" style:family="paragraph" style:parent-style-name="Text_20_body">
      <style:text-properties officeooo:rsid="0397ad1b" officeooo:paragraph-rsid="0397ad1b"/>
    </style:style>
    <style:style style:name="P295" style:family="paragraph" style:parent-style-name="Text_20_body">
      <style:text-properties officeooo:rsid="039b0e17" officeooo:paragraph-rsid="039b0e17"/>
    </style:style>
    <style:style style:name="P296" style:family="paragraph" style:parent-style-name="Text_20_body">
      <style:text-properties officeooo:rsid="039c4177" officeooo:paragraph-rsid="039c4177"/>
    </style:style>
    <style:style style:name="P297" style:family="paragraph" style:parent-style-name="Text_20_body">
      <style:text-properties officeooo:rsid="03a398c6" officeooo:paragraph-rsid="03a398c6"/>
    </style:style>
    <style:style style:name="P298" style:family="paragraph" style:parent-style-name="Text_20_body">
      <style:text-properties officeooo:rsid="03a398c6" officeooo:paragraph-rsid="03a3e9ab"/>
    </style:style>
    <style:style style:name="P299" style:family="paragraph" style:parent-style-name="Text_20_body">
      <style:text-properties officeooo:rsid="03aa4b54" officeooo:paragraph-rsid="03adcd75"/>
    </style:style>
    <style:style style:name="P300" style:family="paragraph" style:parent-style-name="Text_20_body">
      <style:text-properties officeooo:rsid="03aa4b54" officeooo:paragraph-rsid="03b34d39"/>
    </style:style>
    <style:style style:name="P301" style:family="paragraph" style:parent-style-name="Text_20_body">
      <style:text-properties officeooo:rsid="03aa4b54" officeooo:paragraph-rsid="03b50ceb"/>
    </style:style>
    <style:style style:name="P302" style:family="paragraph" style:parent-style-name="Text_20_body">
      <style:text-properties officeooo:rsid="03add8aa" officeooo:paragraph-rsid="03add8aa"/>
    </style:style>
    <style:style style:name="P303" style:family="paragraph" style:parent-style-name="Text_20_body">
      <style:text-properties officeooo:rsid="03afa7aa" officeooo:paragraph-rsid="03afa7aa"/>
    </style:style>
    <style:style style:name="P304" style:family="paragraph" style:parent-style-name="Text_20_body">
      <style:text-properties officeooo:rsid="03b0f591" officeooo:paragraph-rsid="03b0f591"/>
    </style:style>
    <style:style style:name="P305" style:family="paragraph" style:parent-style-name="Text_20_body">
      <style:text-properties officeooo:rsid="03b5db52" officeooo:paragraph-rsid="03b5db52"/>
    </style:style>
    <style:style style:name="P306" style:family="paragraph" style:parent-style-name="Text_20_body">
      <style:text-properties officeooo:rsid="03b632ea" officeooo:paragraph-rsid="03b632ea"/>
    </style:style>
    <style:style style:name="P307" style:family="paragraph" style:parent-style-name="Text_20_body">
      <style:text-properties officeooo:rsid="03b75231" officeooo:paragraph-rsid="03b75231"/>
    </style:style>
    <style:style style:name="P308" style:family="paragraph" style:parent-style-name="Text_20_body">
      <style:text-properties officeooo:rsid="03b80173" officeooo:paragraph-rsid="03b80173"/>
    </style:style>
    <style:style style:name="P309" style:family="paragraph" style:parent-style-name="Text_20_body">
      <style:text-properties officeooo:rsid="03b80173" officeooo:paragraph-rsid="03bae71e"/>
    </style:style>
    <style:style style:name="P310" style:family="paragraph" style:parent-style-name="Text_20_body">
      <style:text-properties officeooo:rsid="03bc47bd" officeooo:paragraph-rsid="03bc47bd"/>
    </style:style>
    <style:style style:name="P311" style:family="paragraph" style:parent-style-name="Text_20_body">
      <style:text-properties officeooo:rsid="03bc47bd" officeooo:paragraph-rsid="03bd09de"/>
    </style:style>
    <style:style style:name="P312" style:family="paragraph" style:parent-style-name="Text_20_body">
      <style:text-properties officeooo:rsid="03c25fde" officeooo:paragraph-rsid="03c25fde"/>
    </style:style>
    <style:style style:name="P313" style:family="paragraph" style:parent-style-name="Text_20_body">
      <style:text-properties officeooo:rsid="03c3757b" officeooo:paragraph-rsid="03c3757b"/>
    </style:style>
    <style:style style:name="P314" style:family="paragraph" style:parent-style-name="Text_20_body">
      <style:text-properties officeooo:rsid="03bd09de" officeooo:paragraph-rsid="03bd09de"/>
    </style:style>
    <style:style style:name="P315" style:family="paragraph" style:parent-style-name="Text_20_body">
      <style:text-properties officeooo:rsid="03c4e213" officeooo:paragraph-rsid="03c4e213"/>
    </style:style>
    <style:style style:name="P316" style:family="paragraph" style:parent-style-name="Text_20_body">
      <style:text-properties officeooo:rsid="03c7f664" officeooo:paragraph-rsid="03c7f664"/>
    </style:style>
    <style:style style:name="P317" style:family="paragraph" style:parent-style-name="Text_20_body">
      <style:text-properties officeooo:rsid="03c9bd7d" officeooo:paragraph-rsid="03c9bd7d"/>
    </style:style>
    <style:style style:name="P318" style:family="paragraph" style:parent-style-name="Text_20_body">
      <style:text-properties officeooo:rsid="03ca66b4" officeooo:paragraph-rsid="03ca66b4"/>
    </style:style>
    <style:style style:name="P319" style:family="paragraph" style:parent-style-name="Text_20_body">
      <style:text-properties officeooo:rsid="03ca97a7" officeooo:paragraph-rsid="03ca97a7"/>
    </style:style>
    <style:style style:name="P320" style:family="paragraph" style:parent-style-name="Text_20_body">
      <style:text-properties officeooo:rsid="03c8c87e" officeooo:paragraph-rsid="03c63e89"/>
    </style:style>
    <style:style style:name="P321" style:family="paragraph" style:parent-style-name="Text_20_body">
      <style:text-properties officeooo:rsid="03d1a76d" officeooo:paragraph-rsid="03d1a76d"/>
    </style:style>
    <style:style style:name="P322" style:family="paragraph" style:parent-style-name="Text_20_body">
      <style:text-properties officeooo:rsid="03d1d368" officeooo:paragraph-rsid="03d1d368"/>
    </style:style>
    <style:style style:name="P323" style:family="paragraph" style:parent-style-name="Text_20_body">
      <style:text-properties officeooo:rsid="03d4a5f4" officeooo:paragraph-rsid="03d4a5f4"/>
    </style:style>
    <style:style style:name="P324" style:family="paragraph" style:parent-style-name="Text_20_body">
      <style:text-properties officeooo:rsid="03d4a5f4" officeooo:paragraph-rsid="03d50648"/>
    </style:style>
    <style:style style:name="P325" style:family="paragraph" style:parent-style-name="Text_20_body">
      <style:text-properties officeooo:rsid="03d50648" officeooo:paragraph-rsid="03d50648"/>
    </style:style>
    <style:style style:name="P326" style:family="paragraph" style:parent-style-name="Text_20_body">
      <style:text-properties officeooo:rsid="03dc90e2" officeooo:paragraph-rsid="03dc90e2"/>
    </style:style>
    <style:style style:name="P327" style:family="paragraph" style:parent-style-name="Text_20_body">
      <style:text-properties officeooo:rsid="03dc90e2" officeooo:paragraph-rsid="03e01066"/>
    </style:style>
    <style:style style:name="P328" style:family="paragraph" style:parent-style-name="Text_20_body">
      <style:text-properties officeooo:rsid="03de4560" officeooo:paragraph-rsid="03de4560"/>
    </style:style>
    <style:style style:name="P329" style:family="paragraph" style:parent-style-name="Text_20_body">
      <style:text-properties officeooo:paragraph-rsid="03e33645"/>
    </style:style>
    <style:style style:name="P330" style:family="paragraph" style:parent-style-name="Text_20_body">
      <style:text-properties officeooo:rsid="03e60719" officeooo:paragraph-rsid="03e60719"/>
    </style:style>
    <style:style style:name="P331" style:family="paragraph" style:parent-style-name="Text_20_body">
      <style:text-properties officeooo:rsid="03e60719" officeooo:paragraph-rsid="03ea2746"/>
    </style:style>
    <style:style style:name="P332" style:family="paragraph" style:parent-style-name="Text_20_body">
      <style:text-properties officeooo:rsid="03e01066" officeooo:paragraph-rsid="03e01066"/>
    </style:style>
    <style:style style:name="P333" style:family="paragraph" style:parent-style-name="Text_20_body">
      <style:text-properties officeooo:rsid="03e71ce9" officeooo:paragraph-rsid="03e71ce9"/>
    </style:style>
    <style:style style:name="P334" style:family="paragraph" style:parent-style-name="Text_20_body">
      <style:text-properties officeooo:rsid="03e842ce" officeooo:paragraph-rsid="03ec45fe"/>
    </style:style>
    <style:style style:name="P335" style:family="paragraph" style:parent-style-name="Text_20_body">
      <style:text-properties officeooo:rsid="03e842ce" officeooo:paragraph-rsid="03eceacb"/>
    </style:style>
    <style:style style:name="P336" style:family="paragraph" style:parent-style-name="Text_20_body">
      <style:text-properties officeooo:rsid="03ee8192" officeooo:paragraph-rsid="03ee8192"/>
    </style:style>
    <style:style style:name="P337" style:family="paragraph" style:parent-style-name="Text_20_body">
      <style:text-properties officeooo:rsid="03ec45fe" officeooo:paragraph-rsid="03ec45fe"/>
    </style:style>
    <style:style style:name="P338" style:family="paragraph" style:parent-style-name="Text_20_body">
      <style:text-properties officeooo:rsid="03f78830" officeooo:paragraph-rsid="03f78830"/>
    </style:style>
    <style:style style:name="P339" style:family="paragraph" style:parent-style-name="Text_20_body">
      <style:text-properties officeooo:rsid="03f78830" officeooo:paragraph-rsid="03fe3e48"/>
    </style:style>
    <style:style style:name="P340" style:family="paragraph" style:parent-style-name="Text_20_body">
      <style:text-properties officeooo:rsid="03f78830" officeooo:paragraph-rsid="03fe6ec0"/>
    </style:style>
    <style:style style:name="P341" style:family="paragraph" style:parent-style-name="Text_20_body">
      <style:text-properties officeooo:rsid="03f78830" officeooo:paragraph-rsid="03fead45"/>
    </style:style>
    <style:style style:name="P342" style:family="paragraph" style:parent-style-name="Text_20_body">
      <style:text-properties officeooo:rsid="03f963cd" officeooo:paragraph-rsid="03f963cd"/>
    </style:style>
    <style:style style:name="P343" style:family="paragraph" style:parent-style-name="Text_20_body">
      <style:text-properties officeooo:rsid="03fb1125" officeooo:paragraph-rsid="03fb1125"/>
    </style:style>
    <style:style style:name="P344" style:family="paragraph" style:parent-style-name="Text_20_body">
      <style:text-properties officeooo:rsid="03fe6ec0" officeooo:paragraph-rsid="03fe6ec0"/>
    </style:style>
    <style:style style:name="P345" style:family="paragraph" style:parent-style-name="Text_20_body">
      <style:text-properties officeooo:rsid="03fe3e48" officeooo:paragraph-rsid="03fe6ec0"/>
    </style:style>
    <style:style style:name="P346" style:family="paragraph" style:parent-style-name="Text_20_body">
      <style:text-properties officeooo:paragraph-rsid="04004f27"/>
    </style:style>
    <style:style style:name="P347" style:family="paragraph" style:parent-style-name="Text_20_body">
      <style:text-properties officeooo:rsid="04026499" officeooo:paragraph-rsid="04026499"/>
    </style:style>
    <style:style style:name="P348" style:family="paragraph" style:parent-style-name="Text_20_body">
      <style:text-properties officeooo:rsid="04026499" officeooo:paragraph-rsid="0403a25b"/>
    </style:style>
    <style:style style:name="P349" style:family="paragraph" style:parent-style-name="Text_20_body">
      <style:text-properties officeooo:rsid="040a06ec" officeooo:paragraph-rsid="040b3259"/>
    </style:style>
    <style:style style:name="P350" style:family="paragraph" style:parent-style-name="Text_20_body">
      <style:text-properties officeooo:rsid="040dcaf0" officeooo:paragraph-rsid="040dcaf0"/>
    </style:style>
    <style:style style:name="P351" style:family="paragraph" style:parent-style-name="Text_20_body">
      <style:text-properties officeooo:rsid="040f2d59" officeooo:paragraph-rsid="0410529b"/>
    </style:style>
    <style:style style:name="P352" style:family="paragraph" style:parent-style-name="Text_20_body">
      <style:text-properties officeooo:rsid="04116587" officeooo:paragraph-rsid="04116587"/>
    </style:style>
    <style:style style:name="P353" style:family="paragraph" style:parent-style-name="Text_20_body">
      <style:text-properties officeooo:rsid="04116587" officeooo:paragraph-rsid="04127171"/>
    </style:style>
    <style:style style:name="P354" style:family="paragraph" style:parent-style-name="Text_20_body">
      <style:text-properties officeooo:rsid="040b3259" officeooo:paragraph-rsid="040b3259"/>
    </style:style>
    <style:style style:name="P355" style:family="paragraph" style:parent-style-name="Text_20_body">
      <style:text-properties officeooo:rsid="0410529b" officeooo:paragraph-rsid="0410529b"/>
    </style:style>
    <style:style style:name="P356" style:family="paragraph" style:parent-style-name="Text_20_body">
      <style:text-properties officeooo:rsid="0412fbfc" officeooo:paragraph-rsid="0412fbfc"/>
    </style:style>
    <style:style style:name="P357" style:family="paragraph" style:parent-style-name="Text_20_body">
      <style:text-properties officeooo:paragraph-rsid="0413d8de"/>
    </style:style>
    <style:style style:name="P358" style:family="paragraph" style:parent-style-name="Text_20_body">
      <style:text-properties officeooo:rsid="0416ac6d" officeooo:paragraph-rsid="0416ac6d"/>
    </style:style>
    <style:style style:name="P359" style:family="paragraph" style:parent-style-name="Text_20_body">
      <style:text-properties officeooo:rsid="04127171" officeooo:paragraph-rsid="04127171"/>
    </style:style>
    <style:style style:name="P360" style:family="paragraph" style:parent-style-name="Text_20_body">
      <style:text-properties officeooo:rsid="0413d8de" officeooo:paragraph-rsid="0413d8de"/>
    </style:style>
    <style:style style:name="P361" style:family="paragraph" style:parent-style-name="Text_20_body">
      <style:text-properties officeooo:rsid="0413ec38" officeooo:paragraph-rsid="0413ec38"/>
    </style:style>
    <style:style style:name="P362" style:family="paragraph" style:parent-style-name="Text_20_body">
      <style:text-properties officeooo:rsid="04184904" officeooo:paragraph-rsid="04184904"/>
    </style:style>
    <style:style style:name="P363" style:family="paragraph" style:parent-style-name="Text_20_body">
      <style:text-properties officeooo:rsid="041976b8" officeooo:paragraph-rsid="041976b8"/>
    </style:style>
    <style:style style:name="P364" style:family="paragraph" style:parent-style-name="Text_20_body">
      <style:text-properties officeooo:rsid="0419b34f" officeooo:paragraph-rsid="0419b34f"/>
    </style:style>
    <style:style style:name="P365" style:family="paragraph" style:parent-style-name="Text_20_body">
      <style:text-properties officeooo:rsid="041c1a00" officeooo:paragraph-rsid="041c1a00"/>
    </style:style>
    <style:style style:name="P366" style:family="paragraph" style:parent-style-name="Text_20_body">
      <style:text-properties officeooo:rsid="041d103b" officeooo:paragraph-rsid="041d27f3"/>
    </style:style>
    <style:style style:name="P367" style:family="paragraph" style:parent-style-name="Text_20_body">
      <style:text-properties officeooo:rsid="04213418" officeooo:paragraph-rsid="04213418"/>
    </style:style>
    <style:style style:name="P368" style:family="paragraph" style:parent-style-name="Text_20_body">
      <style:text-properties officeooo:rsid="04213418" officeooo:paragraph-rsid="04258d4f"/>
    </style:style>
    <style:style style:name="P369" style:family="paragraph" style:parent-style-name="Text_20_body">
      <style:text-properties officeooo:rsid="04213418" officeooo:paragraph-rsid="042655dc"/>
    </style:style>
    <style:style style:name="P370" style:family="paragraph" style:parent-style-name="Text_20_body">
      <style:text-properties officeooo:rsid="042b1776" officeooo:paragraph-rsid="042b1776"/>
    </style:style>
    <style:style style:name="P371" style:family="paragraph" style:parent-style-name="Text_20_body">
      <style:text-properties officeooo:rsid="042b7efa" officeooo:paragraph-rsid="042b7efa"/>
    </style:style>
    <style:style style:name="P372" style:family="paragraph" style:parent-style-name="Text_20_body">
      <style:text-properties officeooo:rsid="042b7efa" officeooo:paragraph-rsid="042d523c"/>
    </style:style>
    <style:style style:name="P373" style:family="paragraph" style:parent-style-name="Text_20_body">
      <style:text-properties officeooo:rsid="042b7efa" officeooo:paragraph-rsid="042e71dc"/>
    </style:style>
    <style:style style:name="P374" style:family="paragraph" style:parent-style-name="Text_20_body">
      <style:text-properties officeooo:rsid="04258d4f" officeooo:paragraph-rsid="04258d4f"/>
    </style:style>
    <style:style style:name="P375" style:family="paragraph" style:parent-style-name="Text_20_body">
      <style:text-properties officeooo:rsid="042655dc" officeooo:paragraph-rsid="042655dc"/>
    </style:style>
    <style:style style:name="P376" style:family="paragraph" style:parent-style-name="Text_20_body">
      <style:text-properties officeooo:rsid="0427fb49" officeooo:paragraph-rsid="0427fb49"/>
    </style:style>
    <style:style style:name="P377" style:family="paragraph" style:parent-style-name="Text_20_body">
      <style:text-properties officeooo:paragraph-rsid="042e71dc"/>
    </style:style>
    <style:style style:name="P378" style:family="paragraph" style:parent-style-name="Text_20_body">
      <style:text-properties officeooo:rsid="042e71dc" officeooo:paragraph-rsid="042e71dc"/>
    </style:style>
    <style:style style:name="P379" style:family="paragraph" style:parent-style-name="Text_20_body">
      <style:text-properties officeooo:rsid="045952d0" officeooo:paragraph-rsid="045952d0"/>
    </style:style>
    <style:style style:name="P380" style:family="paragraph" style:parent-style-name="Text_20_body">
      <style:text-properties officeooo:rsid="045a5c87" officeooo:paragraph-rsid="045a5c87"/>
    </style:style>
    <style:style style:name="P381" style:family="paragraph" style:parent-style-name="Text_20_body">
      <style:text-properties officeooo:rsid="045a5c87" officeooo:paragraph-rsid="045d094a"/>
    </style:style>
    <style:style style:name="P382" style:family="paragraph" style:parent-style-name="Text_20_body">
      <style:text-properties officeooo:rsid="045de00c" officeooo:paragraph-rsid="045de00c"/>
    </style:style>
    <style:style style:name="P383" style:family="paragraph" style:parent-style-name="Text_20_body">
      <style:text-properties officeooo:rsid="045de00c" officeooo:paragraph-rsid="045f4bf5"/>
    </style:style>
    <style:style style:name="P384" style:family="paragraph" style:parent-style-name="Text_20_body">
      <style:text-properties officeooo:rsid="045b2032" officeooo:paragraph-rsid="045b2032"/>
    </style:style>
    <style:style style:name="P385" style:family="paragraph" style:parent-style-name="Text_20_body">
      <style:text-properties officeooo:rsid="04604cd2" officeooo:paragraph-rsid="04604cd2"/>
    </style:style>
    <style:style style:name="P386" style:family="paragraph" style:parent-style-name="Text_20_body">
      <style:text-properties officeooo:rsid="04619439" officeooo:paragraph-rsid="04619439"/>
    </style:style>
    <style:style style:name="P387" style:family="paragraph" style:parent-style-name="Text_20_body">
      <style:text-properties officeooo:rsid="04619439" officeooo:paragraph-rsid="04627f8f"/>
    </style:style>
    <style:style style:name="P388" style:family="paragraph" style:parent-style-name="Text_20_body">
      <style:text-properties officeooo:rsid="04619439" officeooo:paragraph-rsid="0460c4ec"/>
    </style:style>
    <style:style style:name="P389" style:family="paragraph" style:parent-style-name="Text_20_body">
      <style:text-properties officeooo:rsid="04619439" officeooo:paragraph-rsid="0465d131"/>
    </style:style>
    <style:style style:name="P390" style:family="paragraph" style:parent-style-name="Text_20_body">
      <style:text-properties officeooo:rsid="045f4bf5" officeooo:paragraph-rsid="045f4bf5"/>
    </style:style>
    <style:style style:name="P391" style:family="paragraph" style:parent-style-name="Text_20_body">
      <style:text-properties officeooo:rsid="0460c4ec" officeooo:paragraph-rsid="0461683d"/>
    </style:style>
    <style:style style:name="P392" style:family="paragraph" style:parent-style-name="Text_20_body">
      <style:text-properties officeooo:rsid="04625d46" officeooo:paragraph-rsid="04625d46"/>
    </style:style>
    <style:style style:name="P393" style:family="paragraph" style:parent-style-name="Text_20_body">
      <style:text-properties officeooo:rsid="04627f8f" officeooo:paragraph-rsid="04627f8f"/>
    </style:style>
    <style:style style:name="P394" style:family="paragraph" style:parent-style-name="Text_20_body">
      <style:text-properties officeooo:rsid="046ab807" officeooo:paragraph-rsid="046bace5"/>
    </style:style>
    <style:style style:name="P395" style:family="paragraph" style:parent-style-name="Text_20_body">
      <style:text-properties officeooo:rsid="046f18a7" officeooo:paragraph-rsid="046f18a7"/>
    </style:style>
    <style:style style:name="P396" style:family="paragraph" style:parent-style-name="Text_20_body">
      <style:text-properties officeooo:rsid="046f18a7" officeooo:paragraph-rsid="0472fae9"/>
    </style:style>
    <style:style style:name="P397" style:family="paragraph" style:parent-style-name="Text_20_body">
      <style:text-properties officeooo:rsid="046f18a7" officeooo:paragraph-rsid="0474ccf1"/>
    </style:style>
    <style:style style:name="P398" style:family="paragraph" style:parent-style-name="Text_20_body">
      <style:text-properties officeooo:rsid="046f18a7" officeooo:paragraph-rsid="0477ac6d"/>
    </style:style>
    <style:style style:name="P399" style:family="paragraph" style:parent-style-name="Text_20_body">
      <style:text-properties officeooo:rsid="046f18a7" officeooo:paragraph-rsid="0482a581"/>
    </style:style>
    <style:style style:name="P400" style:family="paragraph" style:parent-style-name="Text_20_body">
      <style:text-properties officeooo:rsid="04675426" officeooo:paragraph-rsid="04675426"/>
    </style:style>
    <style:style style:name="P401" style:family="paragraph" style:parent-style-name="Text_20_body">
      <style:text-properties officeooo:rsid="0468ec1b" officeooo:paragraph-rsid="0468ec1b"/>
    </style:style>
    <style:style style:name="P402" style:family="paragraph" style:parent-style-name="Text_20_body">
      <style:text-properties officeooo:rsid="046a9a02" officeooo:paragraph-rsid="046a9a02"/>
    </style:style>
    <style:style style:name="P403" style:family="paragraph" style:parent-style-name="Text_20_body">
      <style:text-properties officeooo:rsid="046bace5" officeooo:paragraph-rsid="046bace5"/>
    </style:style>
    <style:style style:name="P404" style:family="paragraph" style:parent-style-name="Text_20_body">
      <style:text-properties officeooo:paragraph-rsid="047d7bb0"/>
    </style:style>
    <style:style style:name="P405" style:family="paragraph" style:parent-style-name="Text_20_body">
      <style:text-properties officeooo:rsid="0472fae9" officeooo:paragraph-rsid="0474211f"/>
    </style:style>
    <style:style style:name="P406" style:family="paragraph" style:parent-style-name="Text_20_body">
      <style:text-properties officeooo:rsid="0475f5ec" officeooo:paragraph-rsid="0475f5ec"/>
    </style:style>
    <style:style style:name="P407" style:family="paragraph" style:parent-style-name="Text_20_body">
      <style:text-properties officeooo:rsid="0477ac6d" officeooo:paragraph-rsid="0477ac6d"/>
    </style:style>
    <style:style style:name="P408" style:family="paragraph" style:parent-style-name="Text_20_body">
      <style:text-properties officeooo:rsid="047929cc" officeooo:paragraph-rsid="047929cc"/>
    </style:style>
    <style:style style:name="P409" style:family="paragraph" style:parent-style-name="Text_20_body">
      <style:text-properties officeooo:rsid="047e6a6b" officeooo:paragraph-rsid="047e6a6b"/>
    </style:style>
    <style:style style:name="P410" style:family="paragraph" style:parent-style-name="Text_20_body">
      <style:text-properties officeooo:rsid="0484c0f4" officeooo:paragraph-rsid="0484c0f4"/>
    </style:style>
    <style:style style:name="P411" style:family="paragraph" style:parent-style-name="Text_20_body">
      <style:text-properties officeooo:rsid="0485c432" officeooo:paragraph-rsid="0485c432"/>
    </style:style>
    <style:style style:name="P412" style:family="paragraph" style:parent-style-name="Text_20_body">
      <style:text-properties officeooo:rsid="0485c432" officeooo:paragraph-rsid="0486d953"/>
    </style:style>
    <style:style style:name="P413" style:family="paragraph" style:parent-style-name="Text_20_body">
      <style:text-properties officeooo:rsid="0489861c" officeooo:paragraph-rsid="0489861c"/>
    </style:style>
    <style:style style:name="P414" style:family="paragraph" style:parent-style-name="Text_20_body">
      <style:text-properties officeooo:rsid="048a3b3e" officeooo:paragraph-rsid="048a3b3e"/>
    </style:style>
    <style:style style:name="P415" style:family="paragraph" style:parent-style-name="Text_20_body">
      <style:text-properties officeooo:rsid="048b1a64" officeooo:paragraph-rsid="048cc9f2"/>
    </style:style>
    <style:style style:name="P416" style:family="paragraph" style:parent-style-name="Text_20_body">
      <style:text-properties officeooo:rsid="0482a581" officeooo:paragraph-rsid="0482a581"/>
    </style:style>
    <style:style style:name="P417" style:family="paragraph" style:parent-style-name="Text_20_body">
      <style:text-properties officeooo:rsid="0486d953" officeooo:paragraph-rsid="0486d953"/>
    </style:style>
    <style:style style:name="P418" style:family="paragraph" style:parent-style-name="Text_20_body">
      <style:text-properties officeooo:rsid="048ede3a" officeooo:paragraph-rsid="0492080a"/>
    </style:style>
    <style:style style:name="P419" style:family="paragraph" style:parent-style-name="Text_20_body">
      <style:text-properties officeooo:rsid="0493991c" officeooo:paragraph-rsid="049647fc"/>
    </style:style>
    <style:style style:name="P420" style:family="paragraph" style:parent-style-name="Text_20_body">
      <style:text-properties officeooo:rsid="0496ea67" officeooo:paragraph-rsid="0496ea67"/>
    </style:style>
    <style:style style:name="P421" style:family="paragraph" style:parent-style-name="Text_20_body">
      <style:text-properties officeooo:rsid="049b417c" officeooo:paragraph-rsid="049b417c"/>
    </style:style>
    <style:style style:name="P422" style:family="paragraph" style:parent-style-name="Text_20_body">
      <style:text-properties officeooo:rsid="049ca48e" officeooo:paragraph-rsid="049ca48e"/>
    </style:style>
    <style:style style:name="P423" style:family="paragraph" style:parent-style-name="Text_20_body">
      <style:text-properties officeooo:rsid="0492080a" officeooo:paragraph-rsid="0492080a"/>
    </style:style>
    <style:style style:name="P424" style:family="paragraph" style:parent-style-name="Text_20_body">
      <style:text-properties officeooo:rsid="04a0185c" officeooo:paragraph-rsid="04a0185c"/>
    </style:style>
    <style:style style:name="P425" style:family="paragraph" style:parent-style-name="Text_20_body">
      <style:text-properties officeooo:rsid="04a2e1e9" officeooo:paragraph-rsid="04a2e1e9"/>
    </style:style>
    <style:style style:name="P426" style:family="paragraph" style:parent-style-name="Text_20_body">
      <style:text-properties officeooo:rsid="04a2e1e9" officeooo:paragraph-rsid="04a49640"/>
    </style:style>
    <style:style style:name="P427" style:family="paragraph" style:parent-style-name="Text_20_body">
      <style:text-properties officeooo:rsid="04a2e1e9" officeooo:paragraph-rsid="04a8e4cc"/>
    </style:style>
    <style:style style:name="P428" style:family="paragraph" style:parent-style-name="Text_20_body">
      <style:text-properties officeooo:rsid="04ac03ae" officeooo:paragraph-rsid="04aea031"/>
    </style:style>
    <style:style style:name="P429" style:family="paragraph" style:parent-style-name="Text_20_body">
      <style:text-properties officeooo:rsid="049e1a72" officeooo:paragraph-rsid="049e1a72"/>
    </style:style>
    <style:style style:name="P430" style:family="paragraph" style:parent-style-name="Text_20_body">
      <style:text-properties officeooo:rsid="04a8e4cc" officeooo:paragraph-rsid="04a8e4cc"/>
    </style:style>
    <style:style style:name="P431" style:family="paragraph" style:parent-style-name="Text_20_body">
      <style:text-properties officeooo:rsid="04aea031" officeooo:paragraph-rsid="04afb96e"/>
    </style:style>
    <style:style style:name="P432" style:family="paragraph" style:parent-style-name="Text_20_body">
      <style:text-properties officeooo:rsid="04afb96e" officeooo:paragraph-rsid="04afb96e"/>
    </style:style>
    <style:style style:name="P433" style:family="paragraph" style:parent-style-name="Text_20_body">
      <style:text-properties officeooo:rsid="04afb96e" officeooo:paragraph-rsid="04b23c7d"/>
    </style:style>
    <style:style style:name="P434" style:family="paragraph" style:parent-style-name="Text_20_body">
      <style:text-properties officeooo:rsid="04b2defe" officeooo:paragraph-rsid="04b4cd1b"/>
    </style:style>
    <style:style style:name="P435" style:family="paragraph" style:parent-style-name="Text_20_body">
      <style:text-properties officeooo:rsid="04b2defe" officeooo:paragraph-rsid="04b69b03"/>
    </style:style>
    <style:style style:name="P436" style:family="paragraph" style:parent-style-name="Text_20_body">
      <style:text-properties officeooo:rsid="04b2defe" officeooo:paragraph-rsid="04b75a70"/>
    </style:style>
    <style:style style:name="P437" style:family="paragraph" style:parent-style-name="Text_20_body">
      <style:text-properties officeooo:rsid="04b2defe" officeooo:paragraph-rsid="04b9c595"/>
    </style:style>
    <style:style style:name="P438" style:family="paragraph" style:parent-style-name="Text_20_body">
      <style:text-properties officeooo:rsid="04afe174" officeooo:paragraph-rsid="04afe174"/>
    </style:style>
    <style:style style:name="P439" style:family="paragraph" style:parent-style-name="Text_20_body">
      <style:text-properties officeooo:rsid="04b171bb" officeooo:paragraph-rsid="04b171bb"/>
    </style:style>
    <style:style style:name="P440" style:family="paragraph" style:parent-style-name="Text_20_body">
      <style:text-properties officeooo:rsid="04b1f93e" officeooo:paragraph-rsid="04b1f93e"/>
    </style:style>
    <style:style style:name="P441" style:family="paragraph" style:parent-style-name="Text_20_body">
      <style:text-properties officeooo:rsid="04b23c7d" officeooo:paragraph-rsid="04b23c7d"/>
    </style:style>
    <style:style style:name="P442" style:family="paragraph" style:parent-style-name="Text_20_body">
      <style:text-properties officeooo:rsid="04bb455f" officeooo:paragraph-rsid="04bb455f"/>
    </style:style>
    <style:style style:name="P443" style:family="paragraph" style:parent-style-name="Text_20_body">
      <style:text-properties officeooo:rsid="04bb519f" officeooo:paragraph-rsid="04bb519f"/>
    </style:style>
    <style:style style:name="P444" style:family="paragraph" style:parent-style-name="Text_20_body">
      <style:text-properties officeooo:rsid="04bd2c37" officeooo:paragraph-rsid="04bd2c37"/>
    </style:style>
    <style:style style:name="P445" style:family="paragraph" style:parent-style-name="Text_20_body">
      <style:text-properties officeooo:rsid="04bf2be6" officeooo:paragraph-rsid="04bf2be6"/>
    </style:style>
    <style:style style:name="P446" style:family="paragraph" style:parent-style-name="Text_20_body">
      <style:text-properties officeooo:rsid="04c0ece4" officeooo:paragraph-rsid="04c0ece4"/>
    </style:style>
    <style:style style:name="P447" style:family="paragraph" style:parent-style-name="Text_20_body">
      <style:text-properties officeooo:rsid="04c2dd6c" officeooo:paragraph-rsid="04c4ad56"/>
    </style:style>
    <style:style style:name="P448" style:family="paragraph" style:parent-style-name="Text_20_body">
      <style:text-properties officeooo:rsid="04c2dd6c" officeooo:paragraph-rsid="04c545a2"/>
    </style:style>
    <style:style style:name="P449" style:family="paragraph" style:parent-style-name="Text_20_body">
      <style:text-properties officeooo:rsid="04b9c595" officeooo:paragraph-rsid="04b9c595"/>
    </style:style>
    <style:style style:name="P450" style:family="paragraph" style:parent-style-name="Text_20_body">
      <style:text-properties officeooo:rsid="04c545a2" officeooo:paragraph-rsid="04c545a2"/>
    </style:style>
    <style:style style:name="P451" style:family="paragraph" style:parent-style-name="Text_20_body">
      <style:text-properties officeooo:rsid="04c89611" officeooo:paragraph-rsid="04c89611"/>
    </style:style>
    <style:style style:name="P452" style:family="paragraph" style:parent-style-name="Text_20_body">
      <style:text-properties officeooo:rsid="04cbdc4c" officeooo:paragraph-rsid="04cbdc4c"/>
    </style:style>
    <style:style style:name="P453" style:family="paragraph" style:parent-style-name="Text_20_body">
      <style:text-properties officeooo:rsid="04cc7225" officeooo:paragraph-rsid="04cc7225"/>
    </style:style>
    <style:style style:name="P454" style:family="paragraph" style:parent-style-name="Text_20_body">
      <style:text-properties officeooo:rsid="04cdd4fa" officeooo:paragraph-rsid="04ce8e23"/>
    </style:style>
    <style:style style:name="P455" style:family="paragraph" style:parent-style-name="Text_20_body">
      <style:text-properties officeooo:rsid="04cdd4fa" officeooo:paragraph-rsid="04cf24f7"/>
    </style:style>
    <style:style style:name="P456" style:family="paragraph" style:parent-style-name="Text_20_body">
      <style:text-properties officeooo:rsid="04d35ae3" officeooo:paragraph-rsid="04d35ae3"/>
    </style:style>
    <style:style style:name="P457" style:family="paragraph" style:parent-style-name="Standard">
      <style:paragraph-properties fo:margin-left="0.4925in" fo:margin-right="0in" fo:text-indent="0in" style:auto-text-indent="false"/>
    </style:style>
    <style:style style:name="P458" style:family="paragraph" style:parent-style-name="Text_20_body">
      <style:text-properties officeooo:rsid="04cf24f7" officeooo:paragraph-rsid="04cf24f7"/>
    </style:style>
    <style:style style:name="P459" style:family="paragraph" style:parent-style-name="Text_20_body">
      <style:text-properties officeooo:rsid="04d57b5d" officeooo:paragraph-rsid="04d57b5d"/>
    </style:style>
    <style:style style:name="P460" style:family="paragraph" style:parent-style-name="Text_20_body">
      <style:text-properties officeooo:rsid="04d5f938" officeooo:paragraph-rsid="04d8cb14"/>
    </style:style>
    <style:style style:name="P461" style:family="paragraph" style:parent-style-name="Text_20_body">
      <style:text-properties officeooo:paragraph-rsid="04da0927"/>
    </style:style>
    <style:style style:name="P462" style:family="paragraph" style:parent-style-name="Text_20_body">
      <style:text-properties officeooo:paragraph-rsid="04df4ad4"/>
    </style:style>
    <style:style style:name="P463" style:family="paragraph" style:parent-style-name="Text_20_body">
      <style:text-properties officeooo:paragraph-rsid="04e2457e"/>
    </style:style>
    <style:style style:name="P464" style:family="paragraph" style:parent-style-name="Text_20_body">
      <style:text-properties officeooo:paragraph-rsid="04e5a82a"/>
    </style:style>
    <style:style style:name="P465" style:family="paragraph" style:parent-style-name="Text_20_body">
      <style:text-properties officeooo:paragraph-rsid="04e5dce8"/>
    </style:style>
    <style:style style:name="P466" style:family="paragraph" style:parent-style-name="Heading_20_1">
      <style:paragraph-properties fo:break-before="page"/>
      <style:text-properties fo:font-style="normal" style:font-style-asian="normal" style:font-style-complex="normal"/>
    </style:style>
    <style:style style:name="P467" style:family="paragraph" style:parent-style-name="Heading_20_1">
      <style:paragraph-properties fo:break-before="page"/>
      <style:text-properties fo:font-style="normal" officeooo:paragraph-rsid="04590100" style:font-style-asian="normal" style:font-style-complex="normal"/>
    </style:style>
    <style:style style:name="P468" style:family="paragraph" style:parent-style-name="Heading_20_2">
      <style:text-properties fo:font-style="normal" style:font-style-asian="normal" style:font-style-complex="normal"/>
    </style:style>
    <style:style style:name="P469" style:family="paragraph" style:parent-style-name="Heading_20_2">
      <style:paragraph-properties fo:break-before="page"/>
      <style:text-properties fo:font-style="normal" officeooo:rsid="019ee2ac" officeooo:paragraph-rsid="019ee2ac" style:font-style-asian="normal" style:font-style-complex="normal"/>
    </style:style>
    <style:style style:name="P470" style:family="paragraph" style:parent-style-name="Heading_20_2">
      <style:text-properties officeooo:paragraph-rsid="02d34084"/>
    </style:style>
    <style:style style:name="P471" style:family="paragraph" style:parent-style-name="Heading_20_2">
      <style:text-properties officeooo:paragraph-rsid="035cd626"/>
    </style:style>
    <style:style style:name="P472" style:family="paragraph" style:parent-style-name="Heading_20_2">
      <style:text-properties officeooo:paragraph-rsid="03941497"/>
    </style:style>
    <style:style style:name="P473" style:family="paragraph" style:parent-style-name="Heading_20_2">
      <style:text-properties officeooo:paragraph-rsid="041b13cf"/>
    </style:style>
    <style:style style:name="P474" style:family="paragraph" style:parent-style-name="Heading_20_2">
      <style:text-properties officeooo:rsid="04590100"/>
    </style:style>
    <style:style style:name="P475" style:family="paragraph" style:parent-style-name="Heading_20_2">
      <style:text-properties officeooo:rsid="04a9a2a4"/>
    </style:style>
    <style:style style:name="P476" style:family="paragraph" style:parent-style-name="Heading_20_3">
      <style:text-properties fo:font-style="normal" style:font-style-asian="normal" style:font-style-complex="normal"/>
    </style:style>
    <style:style style:name="P477" style:family="paragraph" style:parent-style-name="Heading_20_3">
      <style:text-properties fo:font-style="normal" officeooo:paragraph-rsid="02126989" style:font-style-asian="normal" style:font-style-complex="normal"/>
    </style:style>
    <style:style style:name="P478" style:family="paragraph" style:parent-style-name="Heading_20_3">
      <style:text-properties fo:font-style="normal" officeooo:paragraph-rsid="024386f4" style:font-style-asian="normal" style:font-style-complex="normal"/>
    </style:style>
    <style:style style:name="P479" style:family="paragraph" style:parent-style-name="Heading_20_3">
      <style:text-properties officeooo:paragraph-rsid="02dd7e37"/>
    </style:style>
    <style:style style:name="P480" style:family="paragraph" style:parent-style-name="Heading_20_3">
      <style:text-properties officeooo:rsid="03941497" officeooo:paragraph-rsid="03957938"/>
    </style:style>
    <style:style style:name="P481" style:family="paragraph" style:parent-style-name="Heading_20_3">
      <style:text-properties officeooo:paragraph-rsid="04004f27"/>
    </style:style>
    <style:style style:name="P482" style:family="paragraph" style:parent-style-name="Heading_20_3">
      <style:text-properties officeooo:paragraph-rsid="041c1a00"/>
    </style:style>
    <style:style style:name="P483" style:family="paragraph" style:parent-style-name="Heading_20_3">
      <style:text-properties officeooo:paragraph-rsid="04208304"/>
    </style:style>
    <style:style style:name="P484" style:family="paragraph" style:parent-style-name="Heading_20_3">
      <style:text-properties officeooo:rsid="04291d78"/>
    </style:style>
    <style:style style:name="P485" style:family="paragraph" style:parent-style-name="Heading_20_3">
      <style:text-properties officeooo:rsid="04590100" officeooo:paragraph-rsid="04590100"/>
    </style:style>
    <style:style style:name="P486" style:family="paragraph" style:parent-style-name="Heading_20_3">
      <style:text-properties officeooo:rsid="04d9bbc6"/>
    </style:style>
    <style:style style:name="P487" style:family="paragraph" style:parent-style-name="Heading_20_4">
      <style:text-properties fo:font-style="normal" style:font-style-asian="normal" style:font-style-complex="normal"/>
    </style:style>
    <style:style style:name="P488" style:family="paragraph" style:parent-style-name="Heading_20_4">
      <style:text-properties fo:font-style="normal" officeooo:paragraph-rsid="01c65e37" style:font-style-asian="normal" style:font-style-complex="normal"/>
    </style:style>
    <style:style style:name="P489" style:family="paragraph" style:parent-style-name="Heading_20_4">
      <style:text-properties fo:font-style="normal" officeooo:paragraph-rsid="01c3651d" style:font-style-asian="normal" style:font-style-complex="normal"/>
    </style:style>
    <style:style style:name="P490" style:family="paragraph" style:parent-style-name="Heading_20_4">
      <style:text-properties fo:font-style="normal" officeooo:paragraph-rsid="01c4949a" style:font-style-asian="normal" style:font-style-complex="normal"/>
    </style:style>
    <style:style style:name="P491" style:family="paragraph" style:parent-style-name="Text_20_body" style:list-style-name="L1">
      <style:text-properties fo:font-style="normal" officeooo:rsid="02298629" officeooo:paragraph-rsid="02298629" style:font-style-asian="normal" style:font-style-complex="normal"/>
    </style:style>
    <style:style style:name="P492" style:family="paragraph" style:parent-style-name="Text_20_body" style:list-style-name="L1">
      <style:text-properties fo:font-style="normal" officeooo:rsid="02298629" officeooo:paragraph-rsid="022ac254" style:font-style-asian="normal" style:font-style-complex="normal"/>
    </style:style>
    <style:style style:name="P493" style:family="paragraph" style:parent-style-name="Text_20_body" style:list-style-name="L1">
      <style:text-properties fo:font-style="normal" officeooo:rsid="022ac254" officeooo:paragraph-rsid="022ac254" style:font-style-asian="normal" style:font-style-complex="normal"/>
    </style:style>
    <style:style style:name="P494" style:family="paragraph" style:parent-style-name="Text_20_body" style:list-style-name="L2">
      <style:text-properties fo:font-style="normal" officeooo:rsid="022da704" officeooo:paragraph-rsid="022da704" style:font-style-asian="normal" style:font-style-complex="normal"/>
    </style:style>
    <style:style style:name="P495" style:family="paragraph" style:parent-style-name="Text_20_body" style:list-style-name="L3">
      <style:text-properties fo:font-style="normal" officeooo:rsid="022f84ad" officeooo:paragraph-rsid="022f84ad" style:font-style-asian="normal" style:font-style-complex="normal"/>
    </style:style>
    <style:style style:name="P496" style:family="paragraph" style:parent-style-name="Text_20_body" style:list-style-name="L4">
      <style:text-properties fo:font-style="normal" officeooo:rsid="023afdeb" officeooo:paragraph-rsid="023afdeb" style:font-style-asian="normal" style:font-style-complex="normal"/>
    </style:style>
    <style:style style:name="P497" style:family="paragraph" style:parent-style-name="Text_20_body" style:list-style-name="L4">
      <style:text-properties fo:font-style="normal" officeooo:rsid="02396e4e" officeooo:paragraph-rsid="023afdeb" style:font-style-asian="normal" style:font-style-complex="normal"/>
    </style:style>
    <style:style style:name="P498" style:family="paragraph" style:parent-style-name="Text_20_body" style:list-style-name="L4">
      <style:text-properties fo:font-style="normal" officeooo:rsid="023ed835" officeooo:paragraph-rsid="02404dd1" style:font-style-asian="normal" style:font-style-complex="normal"/>
    </style:style>
    <style:style style:name="P499" style:family="paragraph" style:parent-style-name="Text_20_body" style:list-style-name="L5">
      <style:text-properties fo:font-style="normal" officeooo:paragraph-rsid="02543b18" style:font-style-asian="normal" style:font-style-complex="normal"/>
    </style:style>
    <style:style style:name="P500" style:family="paragraph" style:parent-style-name="Text_20_body" style:list-style-name="L5">
      <style:text-properties fo:font-style="normal" officeooo:rsid="025600ef" officeooo:paragraph-rsid="025600ef" style:font-style-asian="normal" style:font-style-complex="normal"/>
    </style:style>
    <style:style style:name="P501" style:family="paragraph" style:parent-style-name="Text_20_body" style:list-style-name="L5">
      <style:text-properties fo:font-style="normal" officeooo:rsid="025724db" officeooo:paragraph-rsid="025724db" style:font-style-asian="normal" style:font-style-complex="normal"/>
    </style:style>
    <style:style style:name="P502" style:family="paragraph" style:parent-style-name="Text_20_body" style:list-style-name="L5">
      <style:text-properties fo:font-style="normal" officeooo:rsid="02572799" officeooo:paragraph-rsid="02572799" style:font-style-asian="normal" style:font-style-complex="normal"/>
    </style:style>
    <style:style style:name="P503" style:family="paragraph" style:parent-style-name="Text_20_body" style:list-style-name="L5">
      <style:text-properties fo:font-style="normal" officeooo:rsid="0261d741" officeooo:paragraph-rsid="0261d741" style:font-style-asian="normal" style:font-style-complex="normal"/>
    </style:style>
    <style:style style:name="P504" style:family="paragraph" style:parent-style-name="Text_20_body" style:list-style-name="L6">
      <style:text-properties fo:font-style="normal" officeooo:rsid="0263700c" officeooo:paragraph-rsid="0263700c" style:font-style-asian="normal" style:font-style-complex="normal"/>
    </style:style>
    <style:style style:name="P505" style:family="paragraph" style:parent-style-name="Text_20_body" style:list-style-name="L7">
      <style:text-properties fo:font-style="normal" officeooo:rsid="02643a18" officeooo:paragraph-rsid="0265ea73" style:font-style-asian="normal" style:font-style-complex="normal"/>
    </style:style>
    <style:style style:name="P506" style:family="paragraph" style:parent-style-name="Text_20_body" style:list-style-name="L7">
      <style:text-properties fo:font-style="normal" officeooo:paragraph-rsid="0265ea73" style:font-style-asian="normal" style:font-style-complex="normal"/>
    </style:style>
    <style:style style:name="P507" style:family="paragraph" style:parent-style-name="Text_20_body" style:list-style-name="L8">
      <style:text-properties fo:font-style="normal" officeooo:rsid="026e84da" officeooo:paragraph-rsid="026f5dd8" style:font-style-asian="normal" style:font-style-complex="normal"/>
    </style:style>
    <style:style style:name="P508" style:family="paragraph" style:parent-style-name="Text_20_body" style:list-style-name="L9">
      <style:text-properties fo:font-style="normal" officeooo:rsid="027195ec" officeooo:paragraph-rsid="02719aff" style:font-style-asian="normal" style:font-style-complex="normal"/>
    </style:style>
    <style:style style:name="P509" style:family="paragraph" style:parent-style-name="Text_20_body" style:list-style-name="L9">
      <style:text-properties fo:font-style="normal" officeooo:rsid="027195ec" officeooo:paragraph-rsid="027195ec" style:font-style-asian="normal" style:font-style-complex="normal"/>
    </style:style>
    <style:style style:name="P510" style:family="paragraph" style:parent-style-name="Text_20_body" style:list-style-name="L11">
      <style:text-properties fo:font-style="normal" officeooo:rsid="028c9d4d" officeooo:paragraph-rsid="028d40b1" style:font-style-asian="normal" style:font-style-complex="normal"/>
    </style:style>
    <style:style style:name="P511" style:family="paragraph" style:parent-style-name="Text_20_body" style:list-style-name="L11">
      <style:text-properties fo:font-style="normal" officeooo:rsid="028f8fb0" officeooo:paragraph-rsid="028f8fb0" style:font-style-asian="normal" style:font-style-complex="normal"/>
    </style:style>
    <style:style style:name="P512" style:family="paragraph" style:parent-style-name="Text_20_body" style:list-style-name="L14">
      <style:text-properties fo:font-style="normal" officeooo:rsid="02be4720" officeooo:paragraph-rsid="02be4720" style:font-style-asian="normal" style:font-style-complex="normal"/>
    </style:style>
    <style:style style:name="P513" style:family="paragraph" style:parent-style-name="Text_20_body" style:list-style-name="L15">
      <style:text-properties fo:font-style="normal" officeooo:rsid="02be4720" officeooo:paragraph-rsid="02bfb47b" style:font-style-asian="normal" style:font-style-complex="normal"/>
    </style:style>
    <style:style style:name="P514" style:family="paragraph" style:parent-style-name="Text_20_body" style:list-style-name="L15">
      <style:text-properties fo:font-style="normal" officeooo:rsid="02bfb47b" officeooo:paragraph-rsid="02bfb47b" style:font-style-asian="normal" style:font-style-complex="normal"/>
    </style:style>
    <style:style style:name="P515" style:family="paragraph" style:parent-style-name="Text_20_body" style:list-style-name="L16">
      <style:text-properties fo:font-style="normal" officeooo:rsid="02ca818e" officeooo:paragraph-rsid="02cea6f4" style:font-style-asian="normal" style:font-style-complex="normal"/>
    </style:style>
    <style:style style:name="P516" style:family="paragraph" style:parent-style-name="Text_20_body" style:list-style-name="L16">
      <style:text-properties fo:font-style="normal" officeooo:rsid="02cea6f4" officeooo:paragraph-rsid="02cea6f4" style:font-style-asian="normal" style:font-style-complex="normal"/>
    </style:style>
    <style:style style:name="P517" style:family="paragraph" style:parent-style-name="Text_20_body" style:list-style-name="L17">
      <style:text-properties fo:font-style="normal" officeooo:rsid="02e91d26" officeooo:paragraph-rsid="02eb2b2b" style:font-style-asian="normal" style:font-style-complex="normal"/>
    </style:style>
    <style:style style:name="P518" style:family="paragraph" style:parent-style-name="Text_20_body" style:list-style-name="L18">
      <style:text-properties fo:font-style="normal" officeooo:rsid="02ee12c8" officeooo:paragraph-rsid="02ee12c8" style:font-style-asian="normal" style:font-style-complex="normal"/>
    </style:style>
    <style:style style:name="P519" style:family="paragraph" style:parent-style-name="Text_20_body" style:list-style-name="L19">
      <style:text-properties fo:font-style="normal" officeooo:rsid="02f630b4" officeooo:paragraph-rsid="02f9c4a4" style:font-style-asian="normal" style:font-style-complex="normal"/>
    </style:style>
    <style:style style:name="P520" style:family="paragraph" style:parent-style-name="Text_20_body" style:list-style-name="L19">
      <style:text-properties fo:font-style="normal" officeooo:rsid="02f9c4a4" officeooo:paragraph-rsid="02f9c4a4" style:font-style-asian="normal" style:font-style-complex="normal"/>
    </style:style>
    <style:style style:name="P521" style:family="paragraph" style:parent-style-name="Text_20_body" style:list-style-name="L20">
      <style:text-properties fo:font-style="normal" officeooo:rsid="03057ce2" officeooo:paragraph-rsid="03057ce2" style:font-style-asian="normal" style:font-style-complex="normal"/>
    </style:style>
    <style:style style:name="P522" style:family="paragraph" style:parent-style-name="Text_20_body" style:list-style-name="L21">
      <style:text-properties fo:font-style="normal" officeooo:rsid="032f807b" officeooo:paragraph-rsid="032f807b" style:font-style-asian="normal" style:font-style-complex="normal"/>
    </style:style>
    <style:style style:name="P523" style:family="paragraph" style:parent-style-name="Text_20_body" style:list-style-name="L22">
      <style:text-properties fo:font-style="normal" officeooo:rsid="03426fd3" officeooo:paragraph-rsid="03426fd3" style:font-style-asian="normal" style:font-style-complex="normal"/>
    </style:style>
    <style:style style:name="P524" style:family="paragraph" style:parent-style-name="Text_20_body" style:list-style-name="L23">
      <style:text-properties fo:font-style="normal" officeooo:rsid="03620773" officeooo:paragraph-rsid="0367ace1" style:font-style-asian="normal" style:font-style-complex="normal"/>
    </style:style>
    <style:style style:name="P525" style:family="paragraph" style:parent-style-name="Text_20_body" style:list-style-name="L23">
      <style:text-properties fo:font-style="normal" officeooo:rsid="0367ace1" officeooo:paragraph-rsid="0367ace1" style:font-style-asian="normal" style:font-style-complex="normal"/>
    </style:style>
    <style:style style:name="P526" style:family="paragraph" style:parent-style-name="Text_20_body" style:list-style-name="L36">
      <style:text-properties fo:font-style="normal" officeooo:rsid="041d103b" officeooo:paragraph-rsid="041d103b" style:font-style-asian="normal" style:font-style-complex="normal"/>
    </style:style>
    <style:style style:name="P527" style:family="paragraph" style:parent-style-name="Text_20_body" style:list-style-name="L38">
      <style:text-properties fo:font-style="normal" officeooo:rsid="04364b71" officeooo:paragraph-rsid="0442d54a" style:font-style-asian="normal" style:font-style-complex="normal"/>
    </style:style>
    <style:style style:name="P528" style:family="paragraph" style:parent-style-name="Text_20_body" style:list-style-name="L38">
      <style:text-properties fo:font-style="normal" officeooo:rsid="0442d54a" officeooo:paragraph-rsid="04448878" style:font-style-asian="normal" style:font-style-complex="normal"/>
    </style:style>
    <style:style style:name="P529" style:family="paragraph" style:parent-style-name="Text_20_body" style:list-style-name="L39">
      <style:text-properties fo:font-style="normal" officeooo:rsid="044ca57a" officeooo:paragraph-rsid="044ca57a" style:font-style-asian="normal" style:font-style-complex="normal"/>
    </style:style>
    <style:style style:name="P530" style:family="paragraph" style:parent-style-name="Text_20_body" style:list-style-name="L39">
      <style:text-properties fo:font-style="normal" officeooo:rsid="044ca57a" officeooo:paragraph-rsid="044f790b" style:font-style-asian="normal" style:font-style-complex="normal"/>
    </style:style>
    <style:style style:name="P531" style:family="paragraph" style:parent-style-name="Text_20_body" style:list-style-name="L40">
      <style:text-properties fo:font-style="normal" officeooo:rsid="0452cab0" officeooo:paragraph-rsid="0452cab0" style:font-style-asian="normal" style:font-style-complex="normal"/>
    </style:style>
    <style:style style:name="P532" style:family="paragraph" style:parent-style-name="Text_20_body" style:list-style-name="L40">
      <style:text-properties fo:font-style="normal" officeooo:rsid="04543113" officeooo:paragraph-rsid="04543113" style:font-style-asian="normal" style:font-style-complex="normal"/>
    </style:style>
    <style:style style:name="P533" style:family="paragraph" style:parent-style-name="Text_20_body" style:list-style-name="L41">
      <style:text-properties fo:font-style="normal" officeooo:rsid="04552343" officeooo:paragraph-rsid="04552343" style:font-style-asian="normal" style:font-style-complex="normal"/>
    </style:style>
    <style:style style:name="P534" style:family="paragraph" style:parent-style-name="Text_20_body" style:list-style-name="L42">
      <style:text-properties fo:font-style="normal" officeooo:rsid="04555917" officeooo:paragraph-rsid="045745b3" style:font-style-asian="normal" style:font-style-complex="normal"/>
    </style:style>
    <style:style style:name="P535" style:family="paragraph" style:parent-style-name="Text_20_body" style:list-style-name="L42">
      <style:text-properties fo:font-style="normal" officeooo:rsid="045745b3" officeooo:paragraph-rsid="045745b3" style:font-style-asian="normal" style:font-style-complex="normal"/>
    </style:style>
    <style:style style:name="P536" style:family="paragraph" style:parent-style-name="Text_20_body" style:list-style-name="L10">
      <style:text-properties officeooo:rsid="027a8333" officeooo:paragraph-rsid="027a8333"/>
    </style:style>
    <style:style style:name="P537" style:family="paragraph" style:parent-style-name="Text_20_body" style:list-style-name="L11">
      <style:text-properties officeooo:paragraph-rsid="028dac0a"/>
    </style:style>
    <style:style style:name="P538" style:family="paragraph" style:parent-style-name="Text_20_body" style:list-style-name="L11">
      <style:text-properties officeooo:rsid="028f8fb0" officeooo:paragraph-rsid="028f8fb0"/>
    </style:style>
    <style:style style:name="P539" style:family="paragraph" style:parent-style-name="Text_20_body" style:list-style-name="L12">
      <style:text-properties officeooo:rsid="02aa3173" officeooo:paragraph-rsid="02ab5101"/>
    </style:style>
    <style:style style:name="P540" style:family="paragraph" style:parent-style-name="Text_20_body" style:list-style-name="L13">
      <style:text-properties officeooo:rsid="02ad15f2" officeooo:paragraph-rsid="02ad15f2"/>
    </style:style>
    <style:style style:name="P541" style:family="paragraph" style:parent-style-name="Text_20_body" style:list-style-name="L13">
      <style:text-properties officeooo:rsid="02ad15f2" officeooo:paragraph-rsid="02af6e7c"/>
    </style:style>
    <style:style style:name="P542" style:family="paragraph" style:parent-style-name="Text_20_body" style:list-style-name="L13">
      <style:text-properties officeooo:rsid="02af6e7c" officeooo:paragraph-rsid="02af6e7c"/>
    </style:style>
    <style:style style:name="P543" style:family="paragraph" style:parent-style-name="Text_20_body" style:list-style-name="L17">
      <style:text-properties officeooo:paragraph-rsid="02eb2b2b"/>
    </style:style>
    <style:style style:name="P544" style:family="paragraph" style:parent-style-name="Text_20_body" style:list-style-name="L17">
      <style:text-properties officeooo:paragraph-rsid="02eb6212"/>
    </style:style>
    <style:style style:name="P545" style:family="paragraph" style:parent-style-name="Text_20_body" style:list-style-name="L18">
      <style:text-properties officeooo:paragraph-rsid="02ee12c8"/>
    </style:style>
    <style:style style:name="P546" style:family="paragraph" style:parent-style-name="Text_20_body" style:list-style-name="L23">
      <style:text-properties officeooo:paragraph-rsid="03662767"/>
    </style:style>
    <style:style style:name="P547" style:family="paragraph" style:parent-style-name="Text_20_body" style:list-style-name="L24">
      <style:text-properties officeooo:paragraph-rsid="03a6cf9f"/>
    </style:style>
    <style:style style:name="P548" style:family="paragraph" style:parent-style-name="Text_20_body" style:list-style-name="L24">
      <style:text-properties officeooo:paragraph-rsid="03a8ad06"/>
    </style:style>
    <style:style style:name="P549" style:family="paragraph" style:parent-style-name="Text_20_body" style:list-style-name="L25">
      <style:text-properties officeooo:rsid="03b51177" officeooo:paragraph-rsid="03b51177"/>
    </style:style>
    <style:style style:name="P550" style:family="paragraph" style:parent-style-name="Text_20_body" style:list-style-name="L26">
      <style:text-properties officeooo:rsid="03ba36fb" officeooo:paragraph-rsid="03ba36fb"/>
    </style:style>
    <style:style style:name="P551" style:family="paragraph" style:parent-style-name="Text_20_body" style:list-style-name="L27">
      <style:text-properties officeooo:rsid="03c08464" officeooo:paragraph-rsid="03c08464"/>
    </style:style>
    <style:style style:name="P552" style:family="paragraph" style:parent-style-name="Text_20_body" style:list-style-name="L28">
      <style:text-properties officeooo:rsid="03c7f664" officeooo:paragraph-rsid="03c7f664"/>
    </style:style>
    <style:style style:name="P553" style:family="paragraph" style:parent-style-name="Text_20_body" style:list-style-name="L29">
      <style:text-properties officeooo:rsid="03ce35fd" officeooo:paragraph-rsid="03ce35fd"/>
    </style:style>
    <style:style style:name="P554" style:family="paragraph" style:parent-style-name="Text_20_body" style:list-style-name="L29">
      <style:text-properties officeooo:rsid="03d1a76d" officeooo:paragraph-rsid="03d1a76d"/>
    </style:style>
    <style:style style:name="P555" style:family="paragraph" style:parent-style-name="Text_20_body" style:list-style-name="L30">
      <style:text-properties officeooo:rsid="03d27b33" officeooo:paragraph-rsid="03d27b33"/>
    </style:style>
    <style:style style:name="P556" style:family="paragraph" style:parent-style-name="Text_20_body" style:list-style-name="L31">
      <style:text-properties officeooo:rsid="03d50648" officeooo:paragraph-rsid="03d5f230"/>
    </style:style>
    <style:style style:name="P557" style:family="paragraph" style:parent-style-name="Text_20_body" style:list-style-name="L31">
      <style:text-properties officeooo:rsid="03d55b41" officeooo:paragraph-rsid="03d5f230"/>
    </style:style>
    <style:style style:name="P558" style:family="paragraph" style:parent-style-name="Text_20_body" style:list-style-name="L31">
      <style:text-properties officeooo:rsid="03d5ea1c" officeooo:paragraph-rsid="03d5f230"/>
    </style:style>
    <style:style style:name="P559" style:family="paragraph" style:parent-style-name="Text_20_body" style:list-style-name="L31">
      <style:text-properties officeooo:rsid="03d5ea1c" officeooo:paragraph-rsid="03d8498e"/>
    </style:style>
    <style:style style:name="P560" style:family="paragraph" style:parent-style-name="Text_20_body" style:list-style-name="L31">
      <style:text-properties officeooo:rsid="03d5ea1c" officeooo:paragraph-rsid="03db5747"/>
    </style:style>
    <style:style style:name="P561" style:family="paragraph" style:parent-style-name="Text_20_body" style:list-style-name="L31">
      <style:text-properties officeooo:rsid="03d5f230" officeooo:paragraph-rsid="03d5f230"/>
    </style:style>
    <style:style style:name="P562" style:family="paragraph" style:parent-style-name="Text_20_body" style:list-style-name="L31">
      <style:text-properties officeooo:rsid="03d8498e" officeooo:paragraph-rsid="03db5747"/>
    </style:style>
    <style:style style:name="P563" style:family="paragraph" style:parent-style-name="Text_20_body" style:list-style-name="L31">
      <style:text-properties officeooo:rsid="03dc7e2a" officeooo:paragraph-rsid="03dc90e2"/>
    </style:style>
    <style:style style:name="P564" style:family="paragraph" style:parent-style-name="Text_20_body" style:list-style-name="L31">
      <style:text-properties officeooo:rsid="03dc90e2" officeooo:paragraph-rsid="03dc90e2"/>
    </style:style>
    <style:style style:name="P565" style:family="paragraph" style:parent-style-name="Text_20_body" style:list-style-name="L32">
      <style:text-properties officeooo:paragraph-rsid="03e263ce"/>
    </style:style>
    <style:style style:name="P566" style:family="paragraph" style:parent-style-name="Text_20_body" style:list-style-name="L32">
      <style:text-properties officeooo:rsid="03e263ce" officeooo:paragraph-rsid="03e33645"/>
    </style:style>
    <style:style style:name="P567" style:family="paragraph" style:parent-style-name="Text_20_body" style:list-style-name="L32">
      <style:text-properties officeooo:rsid="03e33645" officeooo:paragraph-rsid="03e33645"/>
    </style:style>
    <style:style style:name="P568" style:family="paragraph" style:parent-style-name="Text_20_body" style:list-style-name="L33">
      <style:text-properties officeooo:rsid="03f19355" officeooo:paragraph-rsid="03eceacb"/>
    </style:style>
    <style:style style:name="P569" style:family="paragraph" style:parent-style-name="Text_20_body" style:list-style-name="L33">
      <style:text-properties officeooo:rsid="03f19355" officeooo:paragraph-rsid="03f19355"/>
    </style:style>
    <style:style style:name="P570" style:family="paragraph" style:parent-style-name="Text_20_body" style:list-style-name="L33">
      <style:text-properties officeooo:rsid="03f19355" officeooo:paragraph-rsid="03f2514b"/>
    </style:style>
    <style:style style:name="P571" style:family="paragraph" style:parent-style-name="Text_20_body" style:list-style-name="L33">
      <style:text-properties officeooo:rsid="03f2514b" officeooo:paragraph-rsid="03f2514b"/>
    </style:style>
    <style:style style:name="P572" style:family="paragraph" style:parent-style-name="Text_20_body" style:list-style-name="L33">
      <style:text-properties officeooo:rsid="03f45335" officeooo:paragraph-rsid="03f45335"/>
    </style:style>
    <style:style style:name="P573" style:family="paragraph" style:parent-style-name="Text_20_body" style:list-style-name="L34">
      <style:text-properties officeooo:rsid="03fe6ec0" officeooo:paragraph-rsid="03fe6ec0"/>
    </style:style>
    <style:style style:name="P574" style:family="paragraph" style:parent-style-name="Text_20_body" style:list-style-name="L35">
      <style:text-properties officeooo:rsid="04052948" officeooo:paragraph-rsid="04052948"/>
    </style:style>
    <style:style style:name="P575" style:family="paragraph" style:parent-style-name="Text_20_body" style:list-style-name="L35">
      <style:text-properties officeooo:rsid="03b80173" officeooo:paragraph-rsid="0406e7f8"/>
    </style:style>
    <style:style style:name="P576" style:family="paragraph" style:parent-style-name="Text_20_body" style:list-style-name="L35">
      <style:text-properties officeooo:rsid="0406e7f8" officeooo:paragraph-rsid="0406e7f8"/>
    </style:style>
    <style:style style:name="P577" style:family="paragraph" style:parent-style-name="Text_20_body" style:list-style-name="L37">
      <style:text-properties officeooo:rsid="04327c3a" officeooo:paragraph-rsid="04327c3a"/>
    </style:style>
    <style:style style:name="P578" style:family="paragraph" style:parent-style-name="Text_20_body" style:list-style-name="L43">
      <style:text-properties officeooo:rsid="047b45e2" officeooo:paragraph-rsid="047b45e2"/>
    </style:style>
    <style:style style:name="P579" style:family="paragraph" style:parent-style-name="Text_20_body" style:list-style-name="L44">
      <style:text-properties officeooo:rsid="048ede3a" officeooo:paragraph-rsid="0492080a"/>
    </style:style>
    <style:style style:name="P580" style:family="paragraph" style:parent-style-name="Text_20_body" style:list-style-name="L45">
      <style:text-properties officeooo:rsid="048ede3a" officeooo:paragraph-rsid="0492080a"/>
    </style:style>
    <style:style style:name="P581" style:family="paragraph" style:parent-style-name="Text_20_body" style:list-style-name="L46">
      <style:text-properties officeooo:rsid="04aa2f56" officeooo:paragraph-rsid="04aa2f56"/>
    </style:style>
    <style:style style:name="P582" style:family="paragraph" style:parent-style-name="Text_20_body" style:list-style-name="L47">
      <style:text-properties officeooo:paragraph-rsid="04bb455f"/>
    </style:style>
    <style:style style:name="P583" style:family="paragraph" style:parent-style-name="Text_20_body" style:list-style-name="L47">
      <style:text-properties officeooo:rsid="04bb455f" officeooo:paragraph-rsid="04bb455f"/>
    </style:style>
    <style:style style:name="P584" style:family="paragraph" style:parent-style-name="Text_20_body" style:list-style-name="L48">
      <style:text-properties officeooo:rsid="04bb519f" officeooo:paragraph-rsid="04bb519f"/>
    </style:style>
    <style:style style:name="P585" style:family="paragraph" style:parent-style-name="Text_20_body" style:list-style-name="L48">
      <style:text-properties officeooo:rsid="04bbaffa" officeooo:paragraph-rsid="04bbaffa"/>
    </style:style>
    <style:style style:name="P586" style:family="paragraph" style:parent-style-name="Text_20_body" style:list-style-name="L49">
      <style:text-properties officeooo:rsid="04bf2be6" officeooo:paragraph-rsid="04bf2be6"/>
    </style:style>
    <style:style style:name="P587" style:family="paragraph" style:parent-style-name="Text_20_body" style:list-style-name="L50">
      <style:text-properties officeooo:rsid="04c89611" officeooo:paragraph-rsid="04c89611"/>
    </style:style>
    <style:style style:name="P588" style:family="paragraph" style:parent-style-name="Text_20_body">
      <style:text-properties officeooo:rsid="04e082e9" officeooo:paragraph-rsid="04e082e9"/>
    </style:style>
    <style:style style:name="P589" style:family="paragraph" style:parent-style-name="Text_20_body">
      <style:text-properties officeooo:rsid="04e2ed3c" officeooo:paragraph-rsid="04e2ed3c"/>
    </style:style>
    <style:style style:name="P590" style:family="paragraph" style:parent-style-name="Text_20_body">
      <style:text-properties officeooo:rsid="04e32db5" officeooo:paragraph-rsid="04e32db5"/>
    </style:style>
    <style:style style:name="P591" style:family="paragraph" style:parent-style-name="Text_20_body">
      <style:text-properties officeooo:rsid="04e404a1" officeooo:paragraph-rsid="04e404a1"/>
    </style:style>
    <style:style style:name="P592" style:family="paragraph" style:parent-style-name="Text_20_body">
      <style:text-properties officeooo:rsid="04e5a82a" officeooo:paragraph-rsid="04e5a82a"/>
    </style:style>
    <style:style style:name="P593" style:family="paragraph">
      <style:paragraph-properties fo:margin-left="0in" fo:margin-right="0in" fo:text-indent="0in"/>
    </style:style>
    <style:style style:name="P594"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style:style>
    <style:style style:name="T1" style:family="text">
      <style:text-properties officeooo:rsid="01978e6d"/>
    </style:style>
    <style:style style:name="T2" style:family="text">
      <style:text-properties officeooo:rsid="01a0ca1c"/>
    </style:style>
    <style:style style:name="T3" style:family="text">
      <style:text-properties officeooo:rsid="01a2376a"/>
    </style:style>
    <style:style style:name="T4" style:family="text">
      <style:text-properties officeooo:rsid="01a2ba12"/>
    </style:style>
    <style:style style:name="T5" style:family="text">
      <style:text-properties officeooo:rsid="01a4d560"/>
    </style:style>
    <style:style style:name="T6" style:family="text">
      <style:text-properties officeooo:rsid="01a4df59"/>
    </style:style>
    <style:style style:name="T7" style:family="text">
      <style:text-properties officeooo:rsid="01a59061"/>
    </style:style>
    <style:style style:name="T8" style:family="text">
      <style:text-properties officeooo:rsid="01a9fa30"/>
    </style:style>
    <style:style style:name="T9" style:family="text">
      <style:text-properties officeooo:rsid="01ad78b1"/>
    </style:style>
    <style:style style:name="T10" style:family="text">
      <style:text-properties officeooo:rsid="01ad95a8"/>
    </style:style>
    <style:style style:name="T11" style:family="text">
      <style:text-properties officeooo:rsid="01b20c7d"/>
    </style:style>
    <style:style style:name="T12" style:family="text">
      <style:text-properties officeooo:rsid="01b381b2"/>
    </style:style>
    <style:style style:name="T13" style:family="text">
      <style:text-properties officeooo:rsid="01b56978"/>
    </style:style>
    <style:style style:name="T14" style:family="text">
      <style:text-properties officeooo:rsid="01b6fbc9"/>
    </style:style>
    <style:style style:name="T15" style:family="text">
      <style:text-properties officeooo:rsid="01b9b64b"/>
    </style:style>
    <style:style style:name="T16" style:family="text">
      <style:text-properties officeooo:rsid="01b9b71a"/>
    </style:style>
    <style:style style:name="T17" style:family="text">
      <style:text-properties officeooo:rsid="01bc25e5"/>
    </style:style>
    <style:style style:name="T18" style:family="text">
      <style:text-properties officeooo:rsid="01c65e37"/>
    </style:style>
    <style:style style:name="T19" style:family="text">
      <style:text-properties officeooo:rsid="01c6a0ea"/>
    </style:style>
    <style:style style:name="T20" style:family="text">
      <style:text-properties officeooo:rsid="01c893d0"/>
    </style:style>
    <style:style style:name="T21" style:family="text">
      <style:text-properties officeooo:rsid="01c99fba"/>
    </style:style>
    <style:style style:name="T22" style:family="text">
      <style:text-properties officeooo:rsid="01ca0002"/>
    </style:style>
    <style:style style:name="T23" style:family="text">
      <style:text-properties officeooo:rsid="01cb1c12"/>
    </style:style>
    <style:style style:name="T24" style:family="text">
      <style:text-properties officeooo:rsid="01cd0690"/>
    </style:style>
    <style:style style:name="T25" style:family="text">
      <style:text-properties officeooo:rsid="01d22fcf"/>
    </style:style>
    <style:style style:name="T26" style:family="text">
      <style:text-properties officeooo:rsid="01d59937"/>
    </style:style>
    <style:style style:name="T27" style:family="text">
      <style:text-properties officeooo:rsid="01da4673"/>
    </style:style>
    <style:style style:name="T28" style:family="text">
      <style:text-properties officeooo:rsid="01df7734"/>
    </style:style>
    <style:style style:name="T29" style:family="text">
      <style:text-properties officeooo:rsid="01e4c3fc"/>
    </style:style>
    <style:style style:name="T30" style:family="text">
      <style:text-properties officeooo:rsid="01e5a53c"/>
    </style:style>
    <style:style style:name="T31" style:family="text">
      <style:text-properties officeooo:rsid="01e7017a"/>
    </style:style>
    <style:style style:name="T32" style:family="text">
      <style:text-properties officeooo:rsid="01e89ad2"/>
    </style:style>
    <style:style style:name="T33" style:family="text">
      <style:text-properties officeooo:rsid="01ea6d8a"/>
    </style:style>
    <style:style style:name="T34" style:family="text">
      <style:text-properties officeooo:rsid="01eac9ae"/>
    </style:style>
    <style:style style:name="T35" style:family="text">
      <style:text-properties officeooo:rsid="01eb7e9d"/>
    </style:style>
    <style:style style:name="T36" style:family="text">
      <style:text-properties officeooo:rsid="01ec2b9f"/>
    </style:style>
    <style:style style:name="T37" style:family="text">
      <style:text-properties officeooo:rsid="01ed9f7f"/>
    </style:style>
    <style:style style:name="T38" style:family="text">
      <style:text-properties officeooo:rsid="01eebc31"/>
    </style:style>
    <style:style style:name="T39" style:family="text">
      <style:text-properties officeooo:rsid="01ef704f"/>
    </style:style>
    <style:style style:name="T40" style:family="text">
      <style:text-properties officeooo:rsid="01f15dd0"/>
    </style:style>
    <style:style style:name="T41" style:family="text">
      <style:text-properties officeooo:rsid="01f25861"/>
    </style:style>
    <style:style style:name="T42" style:family="text">
      <style:text-properties officeooo:rsid="01f58060"/>
    </style:style>
    <style:style style:name="T43" style:family="text">
      <style:text-properties officeooo:rsid="01fa99a7"/>
    </style:style>
    <style:style style:name="T44" style:family="text">
      <style:text-properties officeooo:rsid="01fc468c"/>
    </style:style>
    <style:style style:name="T45" style:family="text">
      <style:text-properties officeooo:rsid="01ffb138"/>
    </style:style>
    <style:style style:name="T46" style:family="text">
      <style:text-properties officeooo:rsid="020274b6"/>
    </style:style>
    <style:style style:name="T47" style:family="text">
      <style:text-properties officeooo:rsid="0203a917"/>
    </style:style>
    <style:style style:name="T48" style:family="text">
      <style:text-properties officeooo:rsid="0204c181"/>
    </style:style>
    <style:style style:name="T49" style:family="text">
      <style:text-properties officeooo:rsid="0207304c"/>
    </style:style>
    <style:style style:name="T50" style:family="text">
      <style:text-properties officeooo:rsid="01f4cc82"/>
    </style:style>
    <style:style style:name="T51" style:family="text">
      <style:text-properties officeooo:rsid="0209eb48"/>
    </style:style>
    <style:style style:name="T52" style:family="text">
      <style:text-properties officeooo:rsid="020d2ce4"/>
    </style:style>
    <style:style style:name="T53" style:family="text">
      <style:text-properties officeooo:rsid="020d9f57"/>
    </style:style>
    <style:style style:name="T54" style:family="text">
      <style:text-properties officeooo:rsid="02107808"/>
    </style:style>
    <style:style style:name="T55" style:family="text">
      <style:text-properties officeooo:rsid="02126989"/>
    </style:style>
    <style:style style:name="T56" style:family="text">
      <style:text-properties officeooo:rsid="02161864"/>
    </style:style>
    <style:style style:name="T57" style:family="text">
      <style:text-properties officeooo:rsid="02175d36"/>
    </style:style>
    <style:style style:name="T58" style:family="text">
      <style:text-properties officeooo:rsid="02194955"/>
    </style:style>
    <style:style style:name="T59" style:family="text">
      <style:text-properties officeooo:rsid="021cfd7c"/>
    </style:style>
    <style:style style:name="T60" style:family="text">
      <style:text-properties officeooo:rsid="021dcde1"/>
    </style:style>
    <style:style style:name="T61" style:family="text">
      <style:text-properties officeooo:rsid="02215421"/>
    </style:style>
    <style:style style:name="T62" style:family="text">
      <style:text-properties officeooo:rsid="021b5024"/>
    </style:style>
    <style:style style:name="T63" style:family="text">
      <style:text-properties officeooo:rsid="0227b69f"/>
    </style:style>
    <style:style style:name="T64" style:family="text">
      <style:text-properties officeooo:rsid="02284333"/>
    </style:style>
    <style:style style:name="T65" style:family="text">
      <style:text-properties officeooo:rsid="02298629"/>
    </style:style>
    <style:style style:name="T66" style:family="text">
      <style:text-properties officeooo:rsid="022ac254"/>
    </style:style>
    <style:style style:name="T67" style:family="text">
      <style:text-properties officeooo:rsid="022c1a1b"/>
    </style:style>
    <style:style style:name="T68" style:family="text">
      <style:text-properties officeooo:rsid="022da704"/>
    </style:style>
    <style:style style:name="T69" style:family="text">
      <style:text-properties officeooo:rsid="022f2864"/>
    </style:style>
    <style:style style:name="T70" style:family="text">
      <style:text-properties officeooo:rsid="023328b2"/>
    </style:style>
    <style:style style:name="T71" style:family="text">
      <style:text-properties officeooo:rsid="023408f7"/>
    </style:style>
    <style:style style:name="T72" style:family="text">
      <style:text-properties officeooo:rsid="0234b0cd"/>
    </style:style>
    <style:style style:name="T73" style:family="text">
      <style:text-properties officeooo:rsid="02396e4e"/>
    </style:style>
    <style:style style:name="T74" style:family="text">
      <style:text-properties officeooo:rsid="023afdeb"/>
    </style:style>
    <style:style style:name="T75" style:family="text">
      <style:text-properties officeooo:rsid="023cef5a"/>
    </style:style>
    <style:style style:name="T76" style:family="text">
      <style:text-properties officeooo:rsid="023ff0c2"/>
    </style:style>
    <style:style style:name="T77" style:family="text">
      <style:text-properties officeooo:rsid="02404dd1"/>
    </style:style>
    <style:style style:name="T78" style:family="text">
      <style:text-properties officeooo:rsid="0240853d"/>
    </style:style>
    <style:style style:name="T79" style:family="text">
      <style:text-properties officeooo:rsid="02421818"/>
    </style:style>
    <style:style style:name="T80" style:family="text">
      <style:text-properties officeooo:rsid="0243444a"/>
    </style:style>
    <style:style style:name="T81" style:family="text">
      <style:text-properties officeooo:rsid="024558c4"/>
    </style:style>
    <style:style style:name="T82" style:family="text">
      <style:text-properties officeooo:rsid="024690ba"/>
    </style:style>
    <style:style style:name="T83" style:family="text">
      <style:text-properties officeooo:rsid="02485fd1"/>
    </style:style>
    <style:style style:name="T84" style:family="text">
      <style:text-properties officeooo:rsid="0248beee"/>
    </style:style>
    <style:style style:name="T85" style:family="text">
      <style:text-properties officeooo:rsid="024b1f5f"/>
    </style:style>
    <style:style style:name="T86" style:family="text">
      <style:text-properties officeooo:rsid="024b3694"/>
    </style:style>
    <style:style style:name="T87" style:family="text">
      <style:text-properties officeooo:rsid="024d5d34"/>
    </style:style>
    <style:style style:name="T88" style:family="text">
      <style:text-properties officeooo:rsid="024dfb11"/>
    </style:style>
    <style:style style:name="T89" style:family="text">
      <style:text-properties officeooo:rsid="024e6430"/>
    </style:style>
    <style:style style:name="T90" style:family="text">
      <style:text-properties officeooo:rsid="024f2f9d"/>
    </style:style>
    <style:style style:name="T91" style:family="text">
      <style:text-properties officeooo:rsid="02512743"/>
    </style:style>
    <style:style style:name="T92" style:family="text">
      <style:text-properties officeooo:rsid="02543b18"/>
    </style:style>
    <style:style style:name="T93" style:family="text">
      <style:text-properties officeooo:rsid="02551ad3"/>
    </style:style>
    <style:style style:name="T94" style:family="text">
      <style:text-properties officeooo:rsid="025600ef"/>
    </style:style>
    <style:style style:name="T95" style:family="text">
      <style:text-properties fo:font-style="normal" style:font-style-asian="normal" style:font-style-complex="normal"/>
    </style:style>
    <style:style style:name="T96" style:family="text">
      <style:text-properties fo:font-style="normal" officeooo:rsid="0268d46c" style:font-style-asian="normal" style:font-style-complex="normal"/>
    </style:style>
    <style:style style:name="T97" style:family="text">
      <style:text-properties fo:font-style="normal" officeooo:rsid="01bc25e5" style:font-style-asian="normal" style:font-style-complex="normal"/>
    </style:style>
    <style:style style:name="T98" style:family="text">
      <style:text-properties fo:font-style="normal" officeooo:rsid="01bc3c21" style:font-style-asian="normal" style:font-style-complex="normal"/>
    </style:style>
    <style:style style:name="T99" style:family="text">
      <style:text-properties fo:font-style="normal" officeooo:rsid="01bc68c0" style:font-style-asian="normal" style:font-style-complex="normal"/>
    </style:style>
    <style:style style:name="T100" style:family="text">
      <style:text-properties fo:font-style="normal" officeooo:rsid="01c06d6c" style:font-style-asian="normal" style:font-style-complex="normal"/>
    </style:style>
    <style:style style:name="T101" style:family="text">
      <style:text-properties fo:font-style="normal" officeooo:rsid="01c1f080" style:font-style-asian="normal" style:font-style-complex="normal"/>
    </style:style>
    <style:style style:name="T102" style:family="text">
      <style:text-properties fo:font-style="normal" officeooo:rsid="026ac997" style:font-style-asian="normal" style:font-style-complex="normal"/>
    </style:style>
    <style:style style:name="T103" style:family="text">
      <style:text-properties fo:font-style="normal" officeooo:rsid="01cd0690" style:font-style-asian="normal" style:font-style-complex="normal"/>
    </style:style>
    <style:style style:name="T104" style:family="text">
      <style:text-properties fo:font-style="normal" officeooo:rsid="026c0d77" style:font-style-asian="normal" style:font-style-complex="normal"/>
    </style:style>
    <style:style style:name="T105" style:family="text">
      <style:text-properties fo:font-style="normal" officeooo:rsid="01d6e562" style:font-style-asian="normal" style:font-style-complex="normal"/>
    </style:style>
    <style:style style:name="T106" style:family="text">
      <style:text-properties fo:font-style="normal" officeooo:rsid="01cea960" style:font-style-asian="normal" style:font-style-complex="normal"/>
    </style:style>
    <style:style style:name="T107" style:family="text">
      <style:text-properties fo:font-style="normal" officeooo:rsid="01cecb7c" style:font-style-asian="normal" style:font-style-complex="normal"/>
    </style:style>
    <style:style style:name="T108" style:family="text">
      <style:text-properties fo:font-style="normal" officeooo:rsid="02879650" style:font-style-asian="normal" style:font-style-complex="normal"/>
    </style:style>
    <style:style style:name="T109" style:family="text">
      <style:text-properties fo:font-style="normal" officeooo:rsid="02881721" style:font-style-asian="normal" style:font-style-complex="normal"/>
    </style:style>
    <style:style style:name="T110" style:family="text">
      <style:text-properties fo:font-style="normal" officeooo:rsid="02894480" style:font-style-asian="normal" style:font-style-complex="normal"/>
    </style:style>
    <style:style style:name="T111" style:family="text">
      <style:text-properties fo:font-style="normal" officeooo:rsid="028a1a02" style:font-style-asian="normal" style:font-style-complex="normal"/>
    </style:style>
    <style:style style:name="T112" style:family="text">
      <style:text-properties fo:font-style="normal" officeooo:rsid="028b1f17" style:font-style-asian="normal" style:font-style-complex="normal"/>
    </style:style>
    <style:style style:name="T113" style:family="text">
      <style:text-properties fo:font-style="normal" officeooo:rsid="028c9d4d" style:font-style-asian="normal" style:font-style-complex="normal"/>
    </style:style>
    <style:style style:name="T114" style:family="text">
      <style:text-properties fo:font-style="normal" officeooo:rsid="028dac0a" style:font-style-asian="normal" style:font-style-complex="normal"/>
    </style:style>
    <style:style style:name="T115" style:family="text">
      <style:text-properties fo:font-style="normal" officeooo:rsid="028d40b1" style:font-style-asian="normal" style:font-style-complex="normal"/>
    </style:style>
    <style:style style:name="T116" style:family="text">
      <style:text-properties fo:font-style="normal" officeooo:rsid="029835c5" style:font-style-asian="normal" style:font-style-complex="normal"/>
    </style:style>
    <style:style style:name="T117" style:family="text">
      <style:text-properties fo:font-style="normal" officeooo:rsid="02a75b8a" style:font-style-asian="normal" style:font-style-complex="normal"/>
    </style:style>
    <style:style style:name="T118" style:family="text">
      <style:text-properties fo:font-style="normal" officeooo:rsid="02a93901" style:font-style-asian="normal" style:font-style-complex="normal"/>
    </style:style>
    <style:style style:name="T119" style:family="text">
      <style:text-properties fo:font-style="normal" officeooo:rsid="02aa3173" style:font-style-asian="normal" style:font-style-complex="normal"/>
    </style:style>
    <style:style style:name="T120" style:family="text">
      <style:text-properties fo:font-style="normal" officeooo:rsid="02aa874e" style:font-style-asian="normal" style:font-style-complex="normal"/>
    </style:style>
    <style:style style:name="T121" style:family="text">
      <style:text-properties fo:font-style="normal" officeooo:rsid="02ab5101" style:font-style-asian="normal" style:font-style-complex="normal"/>
    </style:style>
    <style:style style:name="T122" style:family="text">
      <style:text-properties fo:font-style="normal" officeooo:rsid="02ac7e24" style:font-style-asian="normal" style:font-style-complex="normal"/>
    </style:style>
    <style:style style:name="T123" style:family="text">
      <style:text-properties fo:font-style="normal" officeooo:rsid="02ad15f2" style:font-style-asian="normal" style:font-style-complex="normal"/>
    </style:style>
    <style:style style:name="T124" style:family="text">
      <style:text-properties fo:font-style="normal" officeooo:rsid="02ae9a83" style:font-style-asian="normal" style:font-style-complex="normal"/>
    </style:style>
    <style:style style:name="T125" style:family="text">
      <style:text-properties fo:font-style="normal" officeooo:rsid="02b13e1c" style:font-style-asian="normal" style:font-style-complex="normal"/>
    </style:style>
    <style:style style:name="T126" style:family="text">
      <style:text-properties fo:font-style="normal" officeooo:rsid="02b31880" style:font-style-asian="normal" style:font-style-complex="normal"/>
    </style:style>
    <style:style style:name="T127" style:family="text">
      <style:text-properties fo:font-style="normal" officeooo:rsid="02b6e3c1" style:font-style-asian="normal" style:font-style-complex="normal"/>
    </style:style>
    <style:style style:name="T128" style:family="text">
      <style:text-properties fo:font-style="normal" officeooo:rsid="02b796e9" style:font-style-asian="normal" style:font-style-complex="normal"/>
    </style:style>
    <style:style style:name="T129" style:family="text">
      <style:text-properties fo:font-style="normal" officeooo:rsid="02bfb47b" style:font-style-asian="normal" style:font-style-complex="normal"/>
    </style:style>
    <style:style style:name="T130" style:family="text">
      <style:text-properties fo:font-style="normal" officeooo:rsid="02c1fd9d" style:font-style-asian="normal" style:font-style-complex="normal"/>
    </style:style>
    <style:style style:name="T131" style:family="text">
      <style:text-properties fo:font-style="normal" officeooo:rsid="02c3b22a" style:font-style-asian="normal" style:font-style-complex="normal"/>
    </style:style>
    <style:style style:name="T132" style:family="text">
      <style:text-properties fo:font-style="normal" officeooo:rsid="02c47da1" style:font-style-asian="normal" style:font-style-complex="normal"/>
    </style:style>
    <style:style style:name="T133" style:family="text">
      <style:text-properties fo:font-style="normal" officeooo:rsid="02c6bd49" style:font-style-asian="normal" style:font-style-complex="normal"/>
    </style:style>
    <style:style style:name="T134" style:family="text">
      <style:text-properties fo:font-style="normal" officeooo:rsid="02c7e1e0" style:font-style-asian="normal" style:font-style-complex="normal"/>
    </style:style>
    <style:style style:name="T135" style:family="text">
      <style:text-properties fo:font-style="normal" officeooo:rsid="02c9274c" style:font-style-asian="normal" style:font-style-complex="normal"/>
    </style:style>
    <style:style style:name="T136" style:family="text">
      <style:text-properties fo:font-style="normal" officeooo:rsid="02d8a7bb" style:font-style-asian="normal" style:font-style-complex="normal"/>
    </style:style>
    <style:style style:name="T137" style:family="text">
      <style:text-properties fo:font-style="normal" officeooo:rsid="02da9f22" style:font-style-asian="normal" style:font-style-complex="normal"/>
    </style:style>
    <style:style style:name="T138" style:family="text">
      <style:text-properties fo:font-style="normal" officeooo:rsid="02d6f16d" style:font-style-asian="normal" style:font-style-complex="normal"/>
    </style:style>
    <style:style style:name="T139" style:family="text">
      <style:text-properties fo:font-style="normal" officeooo:rsid="02dac6dc" style:font-style-asian="normal" style:font-style-complex="normal"/>
    </style:style>
    <style:style style:name="T140" style:family="text">
      <style:text-properties fo:font-style="normal" officeooo:rsid="02db8c27" style:font-style-asian="normal" style:font-style-complex="normal"/>
    </style:style>
    <style:style style:name="T141" style:family="text">
      <style:text-properties fo:font-style="normal" officeooo:rsid="02dd7e37" style:font-style-asian="normal" style:font-style-complex="normal"/>
    </style:style>
    <style:style style:name="T142" style:family="text">
      <style:text-properties fo:font-style="normal" officeooo:rsid="02dddd3b" style:font-style-asian="normal" style:font-style-complex="normal"/>
    </style:style>
    <style:style style:name="T143" style:family="text">
      <style:text-properties fo:font-style="normal" officeooo:rsid="02de71cc" style:font-style-asian="normal" style:font-style-complex="normal"/>
    </style:style>
    <style:style style:name="T144" style:family="text">
      <style:text-properties fo:font-style="normal" officeooo:rsid="02e02357" style:font-style-asian="normal" style:font-style-complex="normal"/>
    </style:style>
    <style:style style:name="T145" style:family="text">
      <style:text-properties fo:font-style="normal" officeooo:rsid="02e401cb" style:font-style-asian="normal" style:font-style-complex="normal"/>
    </style:style>
    <style:style style:name="T146" style:family="text">
      <style:text-properties fo:font-style="normal" officeooo:rsid="02e7e05a" style:font-style-asian="normal" style:font-style-complex="normal"/>
    </style:style>
    <style:style style:name="T147" style:family="text">
      <style:text-properties fo:font-style="normal" officeooo:rsid="02e91d26" style:font-style-asian="normal" style:font-style-complex="normal"/>
    </style:style>
    <style:style style:name="T148" style:family="text">
      <style:text-properties fo:font-style="normal" officeooo:rsid="02e6e7a2" style:font-style-asian="normal" style:font-style-complex="normal"/>
    </style:style>
    <style:style style:name="T149" style:family="text">
      <style:text-properties fo:font-style="normal" officeooo:rsid="02ea64a9" style:font-style-asian="normal" style:font-style-complex="normal"/>
    </style:style>
    <style:style style:name="T150" style:family="text">
      <style:text-properties fo:font-style="normal" officeooo:rsid="02eb2b2b" style:font-style-asian="normal" style:font-style-complex="normal"/>
    </style:style>
    <style:style style:name="T151" style:family="text">
      <style:text-properties fo:font-style="normal" officeooo:rsid="02eb6212" style:font-style-asian="normal" style:font-style-complex="normal"/>
    </style:style>
    <style:style style:name="T152" style:family="text">
      <style:text-properties fo:font-style="normal" officeooo:rsid="02ecab14" style:font-style-asian="normal" style:font-style-complex="normal"/>
    </style:style>
    <style:style style:name="T153" style:family="text">
      <style:text-properties fo:font-style="normal" officeooo:rsid="02edefa2" style:font-style-asian="normal" style:font-style-complex="normal"/>
    </style:style>
    <style:style style:name="T154" style:family="text">
      <style:text-properties fo:font-style="normal" officeooo:rsid="02ee12c8" style:font-style-asian="normal" style:font-style-complex="normal"/>
    </style:style>
    <style:style style:name="T155" style:family="text">
      <style:text-properties fo:font-style="normal" officeooo:rsid="030fb331" style:font-style-asian="normal" style:font-style-complex="normal"/>
    </style:style>
    <style:style style:name="T156" style:family="text">
      <style:text-properties fo:font-style="normal" officeooo:rsid="0311959e" style:font-style-asian="normal" style:font-style-complex="normal"/>
    </style:style>
    <style:style style:name="T157" style:family="text">
      <style:text-properties fo:font-style="normal" officeooo:rsid="0319fc43" style:font-style-asian="normal" style:font-style-complex="normal"/>
    </style:style>
    <style:style style:name="T158" style:family="text">
      <style:text-properties fo:font-style="normal" officeooo:rsid="031cf23e" style:font-style-asian="normal" style:font-style-complex="normal"/>
    </style:style>
    <style:style style:name="T159" style:family="text">
      <style:text-properties fo:font-style="normal" officeooo:rsid="031f9bee" style:font-style-asian="normal" style:font-style-complex="normal"/>
    </style:style>
    <style:style style:name="T160" style:family="text">
      <style:text-properties fo:font-style="normal" officeooo:rsid="0320b282" style:font-style-asian="normal" style:font-style-complex="normal"/>
    </style:style>
    <style:style style:name="T161" style:family="text">
      <style:text-properties fo:font-style="normal" officeooo:rsid="0320b5fd" style:font-style-asian="normal" style:font-style-complex="normal"/>
    </style:style>
    <style:style style:name="T162" style:family="text">
      <style:text-properties fo:font-style="normal" officeooo:rsid="03237c72" style:font-style-asian="normal" style:font-style-complex="normal"/>
    </style:style>
    <style:style style:name="T163" style:family="text">
      <style:text-properties fo:font-style="normal" officeooo:rsid="03250f56" style:font-style-asian="normal" style:font-style-complex="normal"/>
    </style:style>
    <style:style style:name="T164" style:family="text">
      <style:text-properties fo:font-style="normal" officeooo:rsid="03261f47" style:font-style-asian="normal" style:font-style-complex="normal"/>
    </style:style>
    <style:style style:name="T165" style:family="text">
      <style:text-properties fo:font-style="normal" officeooo:rsid="0327e621" style:font-style-asian="normal" style:font-style-complex="normal"/>
    </style:style>
    <style:style style:name="T166" style:family="text">
      <style:text-properties fo:font-style="normal" officeooo:rsid="032a2a03" style:font-style-asian="normal" style:font-style-complex="normal"/>
    </style:style>
    <style:style style:name="T167" style:family="text">
      <style:text-properties fo:font-style="normal" officeooo:rsid="032d8036" style:font-style-asian="normal" style:font-style-complex="normal"/>
    </style:style>
    <style:style style:name="T168" style:family="text">
      <style:text-properties fo:font-style="normal" officeooo:rsid="032e6a12" style:font-style-asian="normal" style:font-style-complex="normal"/>
    </style:style>
    <style:style style:name="T169" style:family="text">
      <style:text-properties fo:font-style="normal" officeooo:rsid="032e9f22" style:font-style-asian="normal" style:font-style-complex="normal"/>
    </style:style>
    <style:style style:name="T170" style:family="text">
      <style:text-properties fo:font-style="normal" officeooo:rsid="0330321f" style:font-style-asian="normal" style:font-style-complex="normal"/>
    </style:style>
    <style:style style:name="T171" style:family="text">
      <style:text-properties fo:font-style="normal" officeooo:rsid="032fa62d" style:font-style-asian="normal" style:font-style-complex="normal"/>
    </style:style>
    <style:style style:name="T172" style:family="text">
      <style:text-properties fo:font-style="normal" officeooo:rsid="03317458" style:font-style-asian="normal" style:font-style-complex="normal"/>
    </style:style>
    <style:style style:name="T173" style:family="text">
      <style:text-properties fo:font-style="normal" officeooo:rsid="0335b696" style:font-style-asian="normal" style:font-style-complex="normal"/>
    </style:style>
    <style:style style:name="T174" style:family="text">
      <style:text-properties fo:font-style="normal" officeooo:rsid="0336bbdf" style:font-style-asian="normal" style:font-style-complex="normal"/>
    </style:style>
    <style:style style:name="T175" style:family="text">
      <style:text-properties fo:font-style="normal" officeooo:rsid="03505066" style:font-style-asian="normal" style:font-style-complex="normal"/>
    </style:style>
    <style:style style:name="T176" style:family="text">
      <style:text-properties fo:font-style="normal" officeooo:rsid="0351e1f5" style:font-style-asian="normal" style:font-style-complex="normal"/>
    </style:style>
    <style:style style:name="T177" style:family="text">
      <style:text-properties fo:font-style="normal" officeooo:rsid="0352c2b2" style:font-style-asian="normal" style:font-style-complex="normal"/>
    </style:style>
    <style:style style:name="T178" style:family="text">
      <style:text-properties fo:font-style="normal" officeooo:rsid="03530cc7" style:font-style-asian="normal" style:font-style-complex="normal"/>
    </style:style>
    <style:style style:name="T179" style:family="text">
      <style:text-properties fo:font-style="normal" officeooo:rsid="0354f214" style:font-style-asian="normal" style:font-style-complex="normal"/>
    </style:style>
    <style:style style:name="T180" style:family="text">
      <style:text-properties fo:font-style="normal" officeooo:rsid="035881e5" style:font-style-asian="normal" style:font-style-complex="normal"/>
    </style:style>
    <style:style style:name="T181" style:family="text">
      <style:text-properties fo:font-style="normal" officeooo:rsid="0359218f" style:font-style-asian="normal" style:font-style-complex="normal"/>
    </style:style>
    <style:style style:name="T182" style:family="text">
      <style:text-properties fo:font-style="normal" officeooo:rsid="035a3aee" style:font-style-asian="normal" style:font-style-complex="normal"/>
    </style:style>
    <style:style style:name="T183" style:family="text">
      <style:text-properties fo:font-style="normal" officeooo:rsid="035b76ea" style:font-style-asian="normal" style:font-style-complex="normal"/>
    </style:style>
    <style:style style:name="T184" style:family="text">
      <style:text-properties fo:font-style="normal" officeooo:rsid="0344bfa3" style:font-style-asian="normal" style:font-style-complex="normal"/>
    </style:style>
    <style:style style:name="T185" style:family="text">
      <style:text-properties fo:font-style="normal" officeooo:rsid="035eb8f3" style:font-style-asian="normal" style:font-style-complex="normal"/>
    </style:style>
    <style:style style:name="T186" style:family="text">
      <style:text-properties fo:font-style="normal" officeooo:rsid="035e8e48" style:font-style-asian="normal" style:font-style-complex="normal"/>
    </style:style>
    <style:style style:name="T187" style:family="text">
      <style:text-properties fo:font-style="normal" officeooo:rsid="03609530" style:font-style-asian="normal" style:font-style-complex="normal"/>
    </style:style>
    <style:style style:name="T188" style:family="text">
      <style:text-properties fo:font-style="normal" officeooo:rsid="03620773" style:font-style-asian="normal" style:font-style-complex="normal"/>
    </style:style>
    <style:style style:name="T189" style:family="text">
      <style:text-properties fo:font-style="normal" officeooo:rsid="03638c38" style:font-style-asian="normal" style:font-style-complex="normal"/>
    </style:style>
    <style:style style:name="T190" style:family="text">
      <style:text-properties fo:font-style="normal" officeooo:rsid="0364842e" style:font-style-asian="normal" style:font-style-complex="normal"/>
    </style:style>
    <style:style style:name="T191" style:family="text">
      <style:text-properties fo:font-style="normal" officeooo:rsid="036611c0" style:font-style-asian="normal" style:font-style-complex="normal"/>
    </style:style>
    <style:style style:name="T192" style:family="text">
      <style:text-properties fo:font-style="normal" officeooo:rsid="03662767" style:font-style-asian="normal" style:font-style-complex="normal"/>
    </style:style>
    <style:style style:name="T193" style:family="text">
      <style:text-properties fo:font-style="normal" officeooo:rsid="027eab28" style:font-style-asian="normal" style:font-style-complex="normal"/>
    </style:style>
    <style:style style:name="T194" style:family="text">
      <style:text-properties fo:font-style="normal" officeooo:rsid="041d27f3" style:font-style-asian="normal" style:font-style-complex="normal"/>
    </style:style>
    <style:style style:name="T195" style:family="text">
      <style:text-properties officeooo:rsid="02572799"/>
    </style:style>
    <style:style style:name="T196" style:family="text">
      <style:text-properties officeooo:rsid="025a0dd8"/>
    </style:style>
    <style:style style:name="T197" style:family="text">
      <style:text-properties officeooo:rsid="0261f345"/>
    </style:style>
    <style:style style:name="T198" style:family="text">
      <style:text-properties officeooo:rsid="02623f88"/>
    </style:style>
    <style:style style:name="T199" style:family="text">
      <style:text-properties officeooo:rsid="0263700c"/>
    </style:style>
    <style:style style:name="T200" style:family="text">
      <style:text-properties officeooo:rsid="02643a18"/>
    </style:style>
    <style:style style:name="T201" style:family="text">
      <style:text-properties officeooo:rsid="0265ea73"/>
    </style:style>
    <style:style style:name="T202" style:family="text">
      <style:text-properties officeooo:rsid="0266b3c7"/>
    </style:style>
    <style:style style:name="T203" style:family="text">
      <style:text-properties officeooo:rsid="025724db"/>
    </style:style>
    <style:style style:name="T204" style:family="text">
      <style:text-properties officeooo:rsid="0260769b"/>
    </style:style>
    <style:style style:name="T205" style:family="text">
      <style:text-properties officeooo:rsid="0261d741"/>
    </style:style>
    <style:style style:name="T206" style:family="text">
      <style:text-properties officeooo:rsid="026d193e"/>
    </style:style>
    <style:style style:name="T207" style:family="text">
      <style:text-properties officeooo:rsid="026e84da"/>
    </style:style>
    <style:style style:name="T208" style:family="text">
      <style:text-properties officeooo:rsid="0272a46d"/>
    </style:style>
    <style:style style:name="T209" style:family="text">
      <style:text-properties officeooo:rsid="0272da8e"/>
    </style:style>
    <style:style style:name="T210" style:family="text">
      <style:text-properties officeooo:rsid="02771a56"/>
    </style:style>
    <style:style style:name="T211" style:family="text">
      <style:text-properties officeooo:rsid="027a8333"/>
    </style:style>
    <style:style style:name="T212" style:family="text">
      <style:text-properties officeooo:rsid="027ac4d8"/>
    </style:style>
    <style:style style:name="T213" style:family="text">
      <style:text-properties officeooo:rsid="0282232c"/>
    </style:style>
    <style:style style:name="T214" style:family="text">
      <style:text-properties officeooo:rsid="0283962d"/>
    </style:style>
    <style:style style:name="T215" style:family="text">
      <style:text-properties officeooo:rsid="02879650"/>
    </style:style>
    <style:style style:name="T216" style:family="text">
      <style:text-properties officeooo:rsid="0293be84"/>
    </style:style>
    <style:style style:name="T217" style:family="text">
      <style:text-properties officeooo:rsid="02969cd8"/>
    </style:style>
    <style:style style:name="T218" style:family="text">
      <style:text-properties officeooo:rsid="02994f46"/>
    </style:style>
    <style:style style:name="T219" style:family="text">
      <style:text-properties officeooo:rsid="02b39492"/>
    </style:style>
    <style:style style:name="T220" style:family="text">
      <style:text-properties officeooo:rsid="02ba9c0d"/>
    </style:style>
    <style:style style:name="T221" style:family="text">
      <style:text-properties officeooo:rsid="02bfb47b"/>
    </style:style>
    <style:style style:name="T222" style:family="text">
      <style:text-properties fo:font-style="italic" style:font-style-asian="italic" style:font-style-complex="italic"/>
    </style:style>
    <style:style style:name="T223" style:family="text">
      <style:text-properties fo:font-style="italic" officeooo:rsid="02ee12c8" style:font-style-asian="italic" style:font-style-complex="italic"/>
    </style:style>
    <style:style style:name="T224" style:family="text">
      <style:text-properties officeooo:rsid="02cea6f4"/>
    </style:style>
    <style:style style:name="T225" style:family="text">
      <style:text-properties officeooo:rsid="02d1b21e"/>
    </style:style>
    <style:style style:name="T226" style:family="text">
      <style:text-properties style:font-name="Liberation Sans" fo:font-size="16.1000003814697pt" fo:font-weight="bold" officeooo:rsid="02d1ebe6" style:font-name-asian="Noto Sans CJK SC" style:font-size-asian="16.1000003814697pt" style:font-weight-asian="bold" style:font-name-complex="Lohit Devanagari1" style:font-size-complex="16.1000003814697pt" style:font-weight-complex="bold"/>
    </style:style>
    <style:style style:name="T227" style:family="text">
      <style:text-properties style:font-name="Liberation Sans" fo:font-size="16.1000003814697pt" fo:font-weight="bold" officeooo:rsid="02b39492" style:font-name-asian="Noto Sans CJK SC" style:font-size-asian="16.1000003814697pt" style:font-weight-asian="bold" style:font-name-complex="Lohit Devanagari1" style:font-size-complex="16.1000003814697pt" style:font-weight-complex="bold"/>
    </style:style>
    <style:style style:name="T228" style:family="text">
      <style:text-properties style:font-name="Liberation Sans" fo:font-size="16.1000003814697pt" fo:font-weight="bold" officeooo:rsid="02d34084" style:font-name-asian="Noto Sans CJK SC" style:font-size-asian="16.1000003814697pt" style:font-weight-asian="bold" style:font-name-complex="Lohit Devanagari1" style:font-size-complex="16.1000003814697pt" style:font-weight-complex="bold"/>
    </style:style>
    <style:style style:name="T229" style:family="text">
      <style:text-properties style:font-name="Liberation Sans" fo:font-size="16.1000003814697pt" fo:font-weight="bold" officeooo:rsid="031479a7" style:font-name-asian="Noto Sans CJK SC" style:font-size-asian="16.1000003814697pt" style:font-weight-asian="bold" style:font-name-complex="Lohit Devanagari1" style:font-size-complex="16.1000003814697pt" style:font-weight-complex="bold"/>
    </style:style>
    <style:style style:name="T230" style:family="text">
      <style:text-properties style:font-name="Liberation Sans" fo:font-size="16.1000003814697pt" fo:font-weight="bold" officeooo:rsid="03cfd4bd" style:font-name-asian="Noto Sans CJK SC" style:font-size-asian="16.1000003814697pt" style:font-weight-asian="bold" style:font-name-complex="Lohit Devanagari1" style:font-size-complex="16.1000003814697pt" style:font-weight-complex="bold"/>
    </style:style>
    <style:style style:name="T231" style:family="text">
      <style:text-properties style:font-name="Liberation Sans" fo:font-size="14.1000003814697pt" fo:font-weight="bold" officeooo:rsid="042370d4" style:font-name-asian="Noto Sans CJK SC" style:font-size-asian="14.1000003814697pt" style:font-weight-asian="bold" style:font-name-complex="Lohit Devanagari1" style:font-size-complex="14.1000003814697pt" style:font-weight-complex="bold"/>
    </style:style>
    <style:style style:name="T232" style:family="text">
      <style:text-properties officeooo:rsid="02d6f16d"/>
    </style:style>
    <style:style style:name="T233" style:family="text">
      <style:text-properties officeooo:rsid="02dd7e37"/>
    </style:style>
    <style:style style:name="T234" style:family="text">
      <style:text-properties officeooo:rsid="02e591d8"/>
    </style:style>
    <style:style style:name="T235" style:family="text">
      <style:text-properties officeooo:rsid="02e6e7a2"/>
    </style:style>
    <style:style style:name="T236" style:family="text">
      <style:text-properties officeooo:rsid="02e759be"/>
    </style:style>
    <style:style style:name="T237" style:family="text">
      <style:text-properties officeooo:rsid="02efa1ef"/>
    </style:style>
    <style:style style:name="T238" style:family="text">
      <style:text-properties officeooo:rsid="02f0e237"/>
    </style:style>
    <style:style style:name="T239" style:family="text">
      <style:text-properties officeooo:rsid="02f31acb"/>
    </style:style>
    <style:style style:name="T240" style:family="text">
      <style:text-properties officeooo:rsid="02f71214"/>
    </style:style>
    <style:style style:name="T241" style:family="text">
      <style:text-properties officeooo:rsid="02f71644"/>
    </style:style>
    <style:style style:name="T242" style:family="text">
      <style:text-properties officeooo:rsid="02f82a2e"/>
    </style:style>
    <style:style style:name="T243" style:family="text">
      <style:text-properties officeooo:rsid="02f9c4a4"/>
    </style:style>
    <style:style style:name="T244" style:family="text">
      <style:text-properties officeooo:rsid="02fae60b"/>
    </style:style>
    <style:style style:name="T245" style:family="text">
      <style:text-properties officeooo:rsid="030104b8"/>
    </style:style>
    <style:style style:name="T246" style:family="text">
      <style:text-properties officeooo:rsid="0302b670"/>
    </style:style>
    <style:style style:name="T247" style:family="text">
      <style:text-properties officeooo:rsid="0303eff0"/>
    </style:style>
    <style:style style:name="T248" style:family="text">
      <style:text-properties officeooo:rsid="0304e01c"/>
    </style:style>
    <style:style style:name="T249" style:family="text">
      <style:text-properties officeooo:rsid="0304f833"/>
    </style:style>
    <style:style style:name="T250" style:family="text">
      <style:text-properties officeooo:rsid="030a9bba"/>
    </style:style>
    <style:style style:name="T251" style:family="text">
      <style:text-properties officeooo:rsid="030c4336"/>
    </style:style>
    <style:style style:name="T252" style:family="text">
      <style:text-properties officeooo:rsid="030e133f"/>
    </style:style>
    <style:style style:name="T253" style:family="text">
      <style:text-properties officeooo:rsid="030fb331"/>
    </style:style>
    <style:style style:name="T254" style:family="text">
      <style:text-properties officeooo:rsid="03138fba"/>
    </style:style>
    <style:style style:name="T255" style:family="text">
      <style:text-properties officeooo:rsid="0336cdff"/>
    </style:style>
    <style:style style:name="T256" style:family="text">
      <style:text-properties officeooo:rsid="0339a7de"/>
    </style:style>
    <style:style style:name="T257" style:family="text">
      <style:text-properties officeooo:rsid="033baaa5"/>
    </style:style>
    <style:style style:name="T258" style:family="text">
      <style:text-properties officeooo:rsid="034171ad"/>
    </style:style>
    <style:style style:name="T259" style:family="text">
      <style:text-properties officeooo:rsid="03473ff6"/>
    </style:style>
    <style:style style:name="T260" style:family="text">
      <style:text-properties officeooo:rsid="0348f2c2"/>
    </style:style>
    <style:style style:name="T261" style:family="text">
      <style:text-properties officeooo:rsid="034ab418"/>
    </style:style>
    <style:style style:name="T262" style:family="text">
      <style:text-properties officeooo:rsid="034c110e"/>
    </style:style>
    <style:style style:name="T263" style:family="text">
      <style:text-properties officeooo:rsid="03662767"/>
    </style:style>
    <style:style style:name="T264" style:family="text">
      <style:text-properties officeooo:rsid="033a6a65"/>
    </style:style>
    <style:style style:name="T265" style:family="text">
      <style:text-properties officeooo:rsid="0367ace1"/>
    </style:style>
    <style:style style:name="T266" style:family="text">
      <style:text-properties officeooo:rsid="036b057b"/>
    </style:style>
    <style:style style:name="T267" style:family="text">
      <style:text-properties officeooo:rsid="036b9a1e"/>
    </style:style>
    <style:style style:name="T268" style:family="text">
      <style:text-properties officeooo:rsid="036be506"/>
    </style:style>
    <style:style style:name="T269" style:family="text">
      <style:text-properties officeooo:rsid="036e9593"/>
    </style:style>
    <style:style style:name="T270" style:family="text">
      <style:text-properties officeooo:rsid="036ec05a"/>
    </style:style>
    <style:style style:name="T271" style:family="text">
      <style:text-properties officeooo:rsid="036fe8ad"/>
    </style:style>
    <style:style style:name="T272" style:family="text">
      <style:text-properties officeooo:rsid="037120ad"/>
    </style:style>
    <style:style style:name="T273" style:family="text">
      <style:text-properties officeooo:rsid="03719433"/>
    </style:style>
    <style:style style:name="T274" style:family="text">
      <style:text-properties officeooo:rsid="037527cc"/>
    </style:style>
    <style:style style:name="T275" style:family="text">
      <style:text-properties officeooo:rsid="03756c41"/>
    </style:style>
    <style:style style:name="T276" style:family="text">
      <style:text-properties officeooo:rsid="0376f764"/>
    </style:style>
    <style:style style:name="T277" style:family="text">
      <style:text-properties officeooo:rsid="0377e6d8"/>
    </style:style>
    <style:style style:name="T278" style:family="text">
      <style:text-properties officeooo:rsid="0379a86d"/>
    </style:style>
    <style:style style:name="T279" style:family="text">
      <style:text-properties officeooo:rsid="037d7d4b"/>
    </style:style>
    <style:style style:name="T280" style:family="text">
      <style:text-properties officeooo:rsid="037e90e8"/>
    </style:style>
    <style:style style:name="T281" style:family="text">
      <style:text-properties officeooo:rsid="037f8f0d"/>
    </style:style>
    <style:style style:name="T282" style:family="text">
      <style:text-properties officeooo:rsid="03816161"/>
    </style:style>
    <style:style style:name="T283" style:family="text">
      <style:text-properties officeooo:rsid="0383d22e"/>
    </style:style>
    <style:style style:name="T284" style:family="text">
      <style:text-properties officeooo:rsid="03856df4"/>
    </style:style>
    <style:style style:name="T285" style:family="text">
      <style:text-properties officeooo:rsid="038765b1"/>
    </style:style>
    <style:style style:name="T286" style:family="text">
      <style:text-properties officeooo:rsid="038a3c59"/>
    </style:style>
    <style:style style:name="T287" style:family="text">
      <style:text-properties officeooo:rsid="038eaed6"/>
    </style:style>
    <style:style style:name="T288" style:family="text">
      <style:text-properties officeooo:rsid="03924a82"/>
    </style:style>
    <style:style style:name="T289" style:family="text">
      <style:text-properties officeooo:rsid="03933b53"/>
    </style:style>
    <style:style style:name="T290" style:family="text">
      <style:text-properties officeooo:rsid="0397ad1b"/>
    </style:style>
    <style:style style:name="T291" style:family="text">
      <style:text-properties officeooo:rsid="039816dd"/>
    </style:style>
    <style:style style:name="T292" style:family="text">
      <style:text-properties officeooo:rsid="039b0e17"/>
    </style:style>
    <style:style style:name="T293" style:family="text">
      <style:text-properties officeooo:rsid="039c4177"/>
    </style:style>
    <style:style style:name="T294" style:family="text">
      <style:text-properties officeooo:rsid="039de54b"/>
    </style:style>
    <style:style style:name="T295" style:family="text">
      <style:text-properties officeooo:rsid="03a2826c"/>
    </style:style>
    <style:style style:name="T296" style:family="text">
      <style:text-properties officeooo:rsid="03a398c6"/>
    </style:style>
    <style:style style:name="T297" style:family="text">
      <style:text-properties officeooo:rsid="03a3e9ab"/>
    </style:style>
    <style:style style:name="T298" style:family="text">
      <style:text-properties officeooo:rsid="03a6cf9f"/>
    </style:style>
    <style:style style:name="T299" style:family="text">
      <style:text-properties officeooo:rsid="03a8ad06"/>
    </style:style>
    <style:style style:name="T300" style:family="text">
      <style:text-properties officeooo:rsid="03adcd75"/>
    </style:style>
    <style:style style:name="T301" style:family="text">
      <style:text-properties officeooo:rsid="03b0f591"/>
    </style:style>
    <style:style style:name="T302" style:family="text">
      <style:text-properties officeooo:rsid="03b29369"/>
    </style:style>
    <style:style style:name="T303" style:family="text">
      <style:text-properties officeooo:rsid="03b34d39"/>
    </style:style>
    <style:style style:name="T304" style:family="text">
      <style:text-properties officeooo:rsid="03b50ceb"/>
    </style:style>
    <style:style style:name="T305" style:family="text">
      <style:text-properties officeooo:rsid="03b632ea"/>
    </style:style>
    <style:style style:name="T306" style:family="text">
      <style:text-properties officeooo:rsid="03b75231"/>
    </style:style>
    <style:style style:name="T307" style:family="text">
      <style:text-properties officeooo:rsid="03ba36fb"/>
    </style:style>
    <style:style style:name="T308" style:family="text">
      <style:text-properties officeooo:rsid="03bae71e"/>
    </style:style>
    <style:style style:name="T309" style:family="text">
      <style:text-properties officeooo:rsid="03bd09de"/>
    </style:style>
    <style:style style:name="T310" style:family="text">
      <style:text-properties officeooo:rsid="03c4e213"/>
    </style:style>
    <style:style style:name="T311" style:family="text">
      <style:text-properties officeooo:rsid="03cb89b4"/>
    </style:style>
    <style:style style:name="T312" style:family="text">
      <style:text-properties officeooo:rsid="03cc57aa"/>
    </style:style>
    <style:style style:name="T313" style:family="text">
      <style:text-properties officeooo:rsid="03cccbf6"/>
    </style:style>
    <style:style style:name="T314" style:family="text">
      <style:text-properties officeooo:rsid="03d1a76d"/>
    </style:style>
    <style:style style:name="T315" style:family="text">
      <style:text-properties officeooo:rsid="03d1d368"/>
    </style:style>
    <style:style style:name="T316" style:family="text">
      <style:text-properties officeooo:rsid="03d44eeb"/>
    </style:style>
    <style:style style:name="T317" style:family="text">
      <style:text-properties officeooo:rsid="03d50648"/>
    </style:style>
    <style:style style:name="T318" style:family="text">
      <style:text-properties officeooo:rsid="03d5f230"/>
    </style:style>
    <style:style style:name="T319" style:family="text">
      <style:text-properties officeooo:rsid="03d737e3"/>
    </style:style>
    <style:style style:name="T320" style:family="text">
      <style:text-properties officeooo:rsid="03d8498e"/>
    </style:style>
    <style:style style:name="T321" style:family="text">
      <style:text-properties officeooo:rsid="03d9fc1a"/>
    </style:style>
    <style:style style:name="T322" style:family="text">
      <style:text-properties officeooo:rsid="03da0f3e"/>
    </style:style>
    <style:style style:name="T323" style:family="text">
      <style:text-properties officeooo:rsid="03db5747"/>
    </style:style>
    <style:style style:name="T324" style:family="text">
      <style:text-properties officeooo:rsid="03de4560"/>
    </style:style>
    <style:style style:name="T325" style:family="text">
      <style:text-properties officeooo:rsid="03e01066"/>
    </style:style>
    <style:style style:name="T326" style:family="text">
      <style:text-properties officeooo:rsid="03e263ce"/>
    </style:style>
    <style:style style:name="T327" style:family="text">
      <style:text-properties officeooo:rsid="03e33645"/>
    </style:style>
    <style:style style:name="T328" style:family="text">
      <style:text-properties officeooo:rsid="03e4f06c"/>
    </style:style>
    <style:style style:name="T329" style:family="text">
      <style:text-properties officeooo:rsid="03e71ce9"/>
    </style:style>
    <style:style style:name="T330" style:family="text">
      <style:text-properties officeooo:rsid="03ea2746"/>
    </style:style>
    <style:style style:name="T331" style:family="text">
      <style:text-properties officeooo:rsid="03ec0c5b"/>
    </style:style>
    <style:style style:name="T332" style:family="text">
      <style:text-properties officeooo:rsid="03ec45fe"/>
    </style:style>
    <style:style style:name="T333" style:family="text">
      <style:text-properties officeooo:rsid="03eceacb"/>
    </style:style>
    <style:style style:name="T334" style:family="text">
      <style:text-properties officeooo:rsid="03edd294"/>
    </style:style>
    <style:style style:name="T335" style:family="text">
      <style:text-properties officeooo:rsid="03f2514b"/>
    </style:style>
    <style:style style:name="T336" style:family="text">
      <style:text-properties officeooo:rsid="03f32b74"/>
    </style:style>
    <style:style style:name="T337" style:family="text">
      <style:text-properties officeooo:rsid="03f45335"/>
    </style:style>
    <style:style style:name="T338" style:family="text">
      <style:text-properties officeooo:rsid="03f62e4e"/>
    </style:style>
    <style:style style:name="T339" style:family="text">
      <style:text-properties officeooo:rsid="03fc856d"/>
    </style:style>
    <style:style style:name="T340" style:family="text">
      <style:text-properties officeooo:rsid="03fe3e48"/>
    </style:style>
    <style:style style:name="T341" style:family="text">
      <style:text-properties officeooo:rsid="03fe6ec0"/>
    </style:style>
    <style:style style:name="T342" style:family="text">
      <style:text-properties officeooo:rsid="03fead45"/>
    </style:style>
    <style:style style:name="T343" style:family="text">
      <style:text-properties officeooo:rsid="03ff39a2"/>
    </style:style>
    <style:style style:name="T344" style:family="text">
      <style:text-properties officeooo:rsid="04026499"/>
    </style:style>
    <style:style style:name="T345" style:family="text">
      <style:text-properties officeooo:rsid="0400b3a7"/>
    </style:style>
    <style:style style:name="T346" style:family="text">
      <style:text-properties officeooo:rsid="04004f27"/>
    </style:style>
    <style:style style:name="T347" style:family="text">
      <style:text-properties officeooo:rsid="0403a25b"/>
    </style:style>
    <style:style style:name="T348" style:family="text">
      <style:text-properties officeooo:rsid="0406e7f8"/>
    </style:style>
    <style:style style:name="T349" style:family="text">
      <style:text-properties officeooo:rsid="040b3259"/>
    </style:style>
    <style:style style:name="T350" style:family="text">
      <style:text-properties officeooo:rsid="0410529b"/>
    </style:style>
    <style:style style:name="T351" style:family="text">
      <style:text-properties officeooo:rsid="04116587"/>
    </style:style>
    <style:style style:name="T352" style:family="text">
      <style:text-properties officeooo:rsid="04127171"/>
    </style:style>
    <style:style style:name="T353" style:family="text">
      <style:text-properties officeooo:rsid="0412fbfc"/>
    </style:style>
    <style:style style:name="T354" style:family="text">
      <style:text-properties officeooo:rsid="0413b22c"/>
    </style:style>
    <style:style style:name="T355" style:family="text">
      <style:text-properties officeooo:rsid="0413d8de"/>
    </style:style>
    <style:style style:name="T356" style:family="text">
      <style:text-properties officeooo:rsid="041976b8"/>
    </style:style>
    <style:style style:name="T357" style:family="text">
      <style:text-properties officeooo:rsid="0422fea7"/>
    </style:style>
    <style:style style:name="T358" style:family="text">
      <style:text-properties officeooo:rsid="0424c1a0"/>
    </style:style>
    <style:style style:name="T359" style:family="text">
      <style:text-properties officeooo:rsid="04258d4f"/>
    </style:style>
    <style:style style:name="T360" style:family="text">
      <style:text-properties officeooo:rsid="042655dc"/>
    </style:style>
    <style:style style:name="T361" style:family="text">
      <style:text-properties officeooo:rsid="042d523c"/>
    </style:style>
    <style:style style:name="T362" style:family="text">
      <style:text-properties officeooo:rsid="042e71dc"/>
    </style:style>
    <style:style style:name="T363" style:family="text">
      <style:text-properties officeooo:rsid="042fd731"/>
    </style:style>
    <style:style style:name="T364" style:family="text">
      <style:text-properties officeooo:rsid="0435cea8"/>
    </style:style>
    <style:style style:name="T365" style:family="text">
      <style:text-properties officeooo:rsid="043a1160"/>
    </style:style>
    <style:style style:name="T366" style:family="text">
      <style:text-properties officeooo:rsid="043bae45"/>
    </style:style>
    <style:style style:name="T367" style:family="text">
      <style:text-properties officeooo:rsid="043c9331"/>
    </style:style>
    <style:style style:name="T368" style:family="text">
      <style:text-properties officeooo:rsid="043da72d"/>
    </style:style>
    <style:style style:name="T369" style:family="text">
      <style:text-properties officeooo:rsid="043df92f"/>
    </style:style>
    <style:style style:name="T370" style:family="text">
      <style:text-properties officeooo:rsid="04410f00"/>
    </style:style>
    <style:style style:name="T371" style:family="text">
      <style:text-properties officeooo:rsid="0442d54a"/>
    </style:style>
    <style:style style:name="T372" style:family="text">
      <style:text-properties officeooo:rsid="04448878"/>
    </style:style>
    <style:style style:name="T373" style:family="text">
      <style:text-properties officeooo:rsid="04454f17"/>
    </style:style>
    <style:style style:name="T374" style:family="text">
      <style:text-properties officeooo:rsid="0447d990"/>
    </style:style>
    <style:style style:name="T375" style:family="text">
      <style:text-properties officeooo:rsid="04493063"/>
    </style:style>
    <style:style style:name="T376" style:family="text">
      <style:text-properties officeooo:rsid="044a048b"/>
    </style:style>
    <style:style style:name="T377" style:family="text">
      <style:text-properties officeooo:rsid="044f790b"/>
    </style:style>
    <style:style style:name="T378" style:family="text">
      <style:text-properties officeooo:rsid="04519e06"/>
    </style:style>
    <style:style style:name="T379" style:family="text">
      <style:text-properties officeooo:rsid="045745b3"/>
    </style:style>
    <style:style style:name="T380" style:family="text">
      <style:text-properties officeooo:rsid="045cd47f"/>
    </style:style>
    <style:style style:name="T381" style:family="text">
      <style:text-properties officeooo:rsid="045d094a"/>
    </style:style>
    <style:style style:name="T382" style:family="text">
      <style:text-properties officeooo:rsid="045de00c"/>
    </style:style>
    <style:style style:name="T383" style:family="text">
      <style:text-properties officeooo:rsid="04625d46"/>
    </style:style>
    <style:style style:name="T384" style:family="text">
      <style:text-properties officeooo:rsid="04627f8f"/>
    </style:style>
    <style:style style:name="T385" style:family="text">
      <style:text-properties officeooo:rsid="04644998"/>
    </style:style>
    <style:style style:name="T386" style:family="text">
      <style:text-properties officeooo:rsid="0465d131"/>
    </style:style>
    <style:style style:name="T387" style:family="text">
      <style:text-properties officeooo:rsid="046bace5"/>
    </style:style>
    <style:style style:name="T388" style:family="text">
      <style:text-properties officeooo:rsid="046da1d8"/>
    </style:style>
    <style:style style:name="T389" style:family="text">
      <style:text-properties officeooo:rsid="046e470d"/>
    </style:style>
    <style:style style:name="T390" style:family="text">
      <style:text-properties officeooo:rsid="04705981"/>
    </style:style>
    <style:style style:name="T391" style:family="text">
      <style:text-properties officeooo:rsid="047220b5"/>
    </style:style>
    <style:style style:name="T392" style:family="text">
      <style:text-properties officeooo:rsid="0472fae9"/>
    </style:style>
    <style:style style:name="T393" style:family="text">
      <style:text-properties officeooo:rsid="0474ccf1"/>
    </style:style>
    <style:style style:name="T394" style:family="text">
      <style:text-properties officeooo:rsid="0477ac6d"/>
    </style:style>
    <style:style style:name="T395" style:family="text">
      <style:text-properties officeooo:rsid="047cd7a0"/>
    </style:style>
    <style:style style:name="T396" style:family="text">
      <style:text-properties officeooo:rsid="047e6a6b"/>
    </style:style>
    <style:style style:name="T397" style:family="text">
      <style:text-properties officeooo:rsid="047f5524"/>
    </style:style>
    <style:style style:name="T398" style:family="text">
      <style:text-properties officeooo:rsid="0480623c"/>
    </style:style>
    <style:style style:name="T399" style:family="text">
      <style:text-properties officeooo:rsid="0481f54c"/>
    </style:style>
    <style:style style:name="T400" style:family="text">
      <style:text-properties officeooo:rsid="0482a581"/>
    </style:style>
    <style:style style:name="T401" style:family="text">
      <style:text-properties officeooo:rsid="0483290a"/>
    </style:style>
    <style:style style:name="T402" style:family="text">
      <style:text-properties officeooo:rsid="0486d953"/>
    </style:style>
    <style:style style:name="T403" style:family="text">
      <style:text-properties officeooo:rsid="048cc9f2"/>
    </style:style>
    <style:style style:name="T404" style:family="text">
      <style:text-properties officeooo:rsid="048d1417"/>
    </style:style>
    <style:style style:name="T405" style:family="text">
      <style:text-properties officeooo:rsid="048d84fe"/>
    </style:style>
    <style:style style:name="T406" style:family="text">
      <style:text-properties officeooo:rsid="0492080a"/>
    </style:style>
    <style:style style:name="T407" style:family="text">
      <style:text-properties officeooo:rsid="04922c23"/>
    </style:style>
    <style:style style:name="T408" style:family="text">
      <style:text-properties officeooo:rsid="049647fc"/>
    </style:style>
    <style:style style:name="T409" style:family="text">
      <style:text-properties officeooo:rsid="0496ea67"/>
    </style:style>
    <style:style style:name="T410" style:family="text">
      <style:text-properties officeooo:rsid="0498f6a2"/>
    </style:style>
    <style:style style:name="T411" style:family="text">
      <style:text-properties officeooo:rsid="049a7d76"/>
    </style:style>
    <style:style style:name="T412" style:family="text">
      <style:text-properties officeooo:rsid="049b6277"/>
    </style:style>
    <style:style style:name="T413" style:family="text">
      <style:text-properties officeooo:rsid="049e1a72"/>
    </style:style>
    <style:style style:name="T414" style:family="text">
      <style:text-properties officeooo:rsid="04a12b2e"/>
    </style:style>
    <style:style style:name="T415" style:family="text">
      <style:text-properties officeooo:rsid="04a297cf"/>
    </style:style>
    <style:style style:name="T416" style:family="text">
      <style:text-properties officeooo:rsid="04a2e40f"/>
    </style:style>
    <style:style style:name="T417" style:family="text">
      <style:text-properties officeooo:rsid="04a49640"/>
    </style:style>
    <style:style style:name="T418" style:family="text">
      <style:text-properties officeooo:rsid="04a66a97"/>
    </style:style>
    <style:style style:name="T419" style:family="text">
      <style:text-properties officeooo:rsid="04a83b5f"/>
    </style:style>
    <style:style style:name="T420" style:family="text">
      <style:text-properties officeooo:rsid="04acf51c"/>
    </style:style>
    <style:style style:name="T421" style:family="text">
      <style:text-properties officeooo:rsid="04aea031"/>
    </style:style>
    <style:style style:name="T422" style:family="text">
      <style:text-properties officeooo:rsid="04afb96e"/>
    </style:style>
    <style:style style:name="T423" style:family="text">
      <style:text-properties officeooo:rsid="04b1f93e"/>
    </style:style>
    <style:style style:name="T424" style:family="text">
      <style:text-properties officeooo:rsid="04b23c7d"/>
    </style:style>
    <style:style style:name="T425" style:family="text">
      <style:text-properties officeooo:rsid="04b4cd1b"/>
    </style:style>
    <style:style style:name="T426" style:family="text">
      <style:text-properties officeooo:rsid="04b69b03"/>
    </style:style>
    <style:style style:name="T427" style:family="text">
      <style:text-properties officeooo:rsid="04b75a70"/>
    </style:style>
    <style:style style:name="T428" style:family="text">
      <style:text-properties officeooo:rsid="04b93d82"/>
    </style:style>
    <style:style style:name="T429" style:family="text">
      <style:text-properties officeooo:rsid="04b9c595"/>
    </style:style>
    <style:style style:name="T430" style:family="text">
      <style:text-properties officeooo:rsid="04bb455f"/>
    </style:style>
    <style:style style:name="T431" style:family="text">
      <style:text-properties officeooo:rsid="04bb519f"/>
    </style:style>
    <style:style style:name="T432" style:family="text">
      <style:text-properties officeooo:rsid="04c4ad56"/>
    </style:style>
    <style:style style:name="T433" style:family="text">
      <style:text-properties officeooo:rsid="04c545a2"/>
    </style:style>
    <style:style style:name="T434" style:family="text">
      <style:text-properties officeooo:rsid="04c7b1fc"/>
    </style:style>
    <style:style style:name="T435" style:family="text">
      <style:text-properties officeooo:rsid="04c9f1a0"/>
    </style:style>
    <style:style style:name="T436" style:family="text">
      <style:text-properties officeooo:rsid="04cafe54"/>
    </style:style>
    <style:style style:name="T437" style:family="text">
      <style:text-properties officeooo:rsid="04ce8e23"/>
    </style:style>
    <style:style style:name="T438" style:family="text">
      <style:text-properties officeooo:rsid="04cf24f7"/>
    </style:style>
    <style:style style:name="T439" style:family="text">
      <style:text-properties officeooo:rsid="04d01bf7"/>
    </style:style>
    <style:style style:name="T440" style:family="text">
      <style:text-properties officeooo:rsid="04d21b3d"/>
    </style:style>
    <style:style style:name="T441" style:family="text">
      <style:text-properties officeooo:rsid="04d6dd1b"/>
    </style:style>
    <style:style style:name="T442" style:family="text">
      <style:text-properties officeooo:rsid="04d827d1"/>
    </style:style>
    <style:style style:name="T443" style:family="text">
      <style:text-properties officeooo:rsid="04d8cb14"/>
    </style:style>
    <style:style style:name="T444" style:family="text">
      <style:text-properties officeooo:rsid="04da0927"/>
    </style:style>
    <style:style style:name="T445" style:family="text">
      <style:text-properties officeooo:rsid="04db6238"/>
    </style:style>
    <style:style style:name="T446" style:family="text">
      <style:text-properties officeooo:rsid="04dd3fa1"/>
    </style:style>
    <style:style style:name="T447" style:family="text">
      <style:text-properties officeooo:rsid="04dd6ac8"/>
    </style:style>
    <style:style style:name="T448" style:family="text">
      <style:text-properties officeooo:rsid="04df4ad4"/>
    </style:style>
    <style:style style:name="T449" style:family="text">
      <style:text-properties officeooo:rsid="04e082e9"/>
    </style:style>
    <style:style style:name="T450" style:family="text">
      <style:text-properties officeooo:rsid="04e2457e"/>
    </style:style>
    <style:style style:name="T451" style:family="text">
      <style:text-properties officeooo:rsid="04e404a1"/>
    </style:style>
    <style:style style:name="T452" style:family="text">
      <style:text-properties officeooo:rsid="04e5a82a"/>
    </style:style>
    <style:style style:name="T453" style:family="text">
      <style:text-properties officeooo:rsid="04e5dce8"/>
    </style:style>
    <style:style style:name="T45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la" fo:country="VA"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3">Summulae </text:p>
      <text:p text:style-name="P3"><text:span text:style-name="T20">F</text:span>ratris <text:span text:style-name="T20">D</text:span>ominici Soto Segobiensis Ordinis Praedicatorum <text:span text:style-name="T1">artium magistri.</text:span></text:p>
      <text:p text:style-name="P1">Admodum reverendo</text:p>
      <text:p text:style-name="P3">ac religiosissimo patri fratri Bartholomeo Sayavedre provinciae Hispaniae priori provinciali, frater Dominicus Soto salutem et ob<text:span text:style-name="T28">s</text:span>ervantiam.</text:p>
      <text:p text:style-name="P8">/<text:span text:style-name="T39">2</text:span>/</text:p>
      <text:p text:style-name="P8">Postquam me pater observantissime saeculi undae in hunc monasterii vel portum vel secessum coniecerunt, nihil minus aut optabam, aut verebar, qua fortunam aliquam, aut casum, qui me rursum mundo proderat. Sane quem non negotiorum modo <text:s/>saeculiarium, sed studiorum etiam, rerumque omnium humanarum, satietas tanta teneret, ut non saeculum ipsum, sed si fieri posset, lucem quoque libens vitassem. Quod si necessitas aliqua vel ratio futura erat, per quam mihi meis votis et instituto frui non liceret, quamvis aliam potius optassem, quam ut rudimenta dialectices iterum ac deintegro tractando, versandoque, ingenii et eruditionis novum periculum facerem.</text:p>
      <text:p text:style-name="P8">Cum his prosus studiis, non solum vale renunciassem, sed eorum annorum me propemodum poeniteret, quos plures quam vellem, Parisius primo sub clarissimis quidem philosophis, ac deinde in insigni studio Complutensi tum hanc artem, tum alias philosophiae partes publice profitendo docendoque transegissem. Verum haec mea consilia, haec vota et cogitationis authoritas tua et praeceptum pater sapientissime prorsus disiecit.</text:p>
      <text:p text:style-name="P9"><text:span text:style-name="T29">Fratres enim nostri multum ac saepe apud te questi sunt, cum in aliis philosophiae partibus, tum praecipue in dialecticis se librorum, scriptorum ac doctorum turba confundi, obruique. Inter quos dum alius brevior est qua opus esset, alius contra prolixior, alius obscurior, alius negligentior, cum per multa scripta sint et acute et erudite, nihil tamen ex omni parte absolutum, aut quod instituendis </text:span><text:span text:style-name="T30">invenimus satis idoneum esset, videretur. Atque adeo et praeceptores et discipulos diu multumque, nec tanto tamen fructu, circa haec studia haerere ac laborare. Instare itaque ut aliqua ratione paternitas tua nostris scholis in hac parte consuleret. Quorum precibus et querellis adductus hoc oneris mihi imposuisti, ut veteri artificio in memoriam revocato, relectisque philosophis harumque artium veteribus novisque authoribus, aliquid scriberem, quod iuvenum studia iuvare, istaque difficultate ingenia liberare posset.</text:span></text:p>
      <text:p text:style-name="P12">Ego quamquam potuisse multa causari, quo me ab isto tam in suavi mihi labore eximerem, tamen non fuit consilium tanti patris voluntati et praecepto quoquo pacto adversari, memori scilicet illius quod nobis omnibus in ipso religionis ingressu primum datur mendatum, ut quidquid maioribus visum fuerit, boni consulamus, simpliciterque pareamus.</text:p>
      <text:p text:style-name="P13">Obsecutus igitur praeceptis tuis pater semper observandae hos dialectices commentarios, quos summula vulgo vocant, quanta potui cura ac diligentia absolvi. In quibus non tam mihi fuit studium, ut nova quaedam et inaudita traderem, qua ambitione nihil scribenti nocentius esse potest, qua ut primam dialectices institutionem place et perspicue expedirem.</text:p>
      <text:p text:style-name="P10"><text:span text:style-name="T33">Curavi etiam vitare diversarum opinionum placitorumque odiosam molem, quibus aut referendis aut refellendis plerique neotericorum tenebras lectoribus et auditoribus offundunt. </text:span><text:span text:style-name="T34">Qui dum invicem aut carpunt, aut scabunt, non saxum modo omne volunt, sed minutissimos etiam lapillos versant, </text:span><text:span text:style-name="T35">multas chartas, ut nihil amplius dicam, canonibus praeceptis, argumentis, tricis, certe non necessariis </text:span><text:soft-page-break/><text:span text:style-name="T35">complentes ut opus summularum quod breve esse oportuit, sit iam scriptus et in tergo necdum finitus Orestes.</text:span></text:p>
      <text:p text:style-name="P14">Quamquam me (fateor) aliquantulo prolixiorem fecerit quam optabam, quod cum tantus sit hac tempestate sophismatum usus, necessitate astrictus, nonnulla tempori dederim.</text:p>
      <text:p text:style-name="P11"><text:span text:style-name="T40">C</text:span><text:span text:style-name="T37">aeterum quamquam sum religione et necessitate (cui nec superi quidem repugnant) ad scribendi studium adductus, intelligo tamen me hominum sermones non vitaturum, qui pro cuiusque vel ingenio vel opinione variae de industria mea loquentur. Verum aequi iudices aut obedientiam meam probabunt, aut necessitati ignoscent, aut culpae veniam dabunt, quam certe numquam fuissem deprecaturus, si licuisset culpa vacare. Quod si caeteris satisfacere non potero, abunde fructum mei laboris cepisse putabo, si tum aliis maioribus meis, tum maxime tibi pater religiosissime industriam meam non ingratam fuisse intellexero, cui secundum superos imprimis placere studemus.</text:span></text:p>
      <text:p text:style-name="P11"><text:span text:style-name="T38">Vale.</text:span><text:span text:style-name="T36"> </text:span><text:span text:style-name="T35"><text:s/></text:span><text:span text:style-name="T34"><text:s/></text:span><text:span text:style-name="T32"><text:s/></text:span><text:span text:style-name="T31"><text:s/></text:span><text:span text:style-name="T30"><text:s/></text:span></text:p>
      <text:p text:style-name="P9"/>
      <text:h text:style-name="P466" text:outline-level="1">Prima pars introductionum</text:h>
      <text:h text:style-name="P468" text:outline-level="2">Prologus</text:h>
      <text:p text:style-name="P3">Incipiunt introductiones dialecticae fratris Dominici Soto <text:span text:style-name="T41">S</text:span>egobiensis ordinis praedicatorum artium magistri.</text:p>
      <text:p text:style-name="P4">Dialecticam artem profitentibus opus primum est peculiares eius terminos nosse. <text:span text:style-name="T50">Sunt enim quaedam eius instrumenta, quae quidem in unaquaque arte necessum est praecognoscere. Ob idque summulas magistri Petrus Hispanus commentari, Deo auctore, tentantes, brevem introductionum epilogum in ipso operis vestibulo praemittemus, ubi termini quibus nobis utendum est, exponatur. Quem tractatum duobus absolvemus.</text:span></text:p>
      <text:p text:style-name="P15">Primum namque usitatas terminorum definitiones et divisiones, ac deinde nonnullas eorum proprietates (ut sunt suppositio, ampliatio caeteraque id genus) quae ipsis in propositione contingunt, explanabimus. Non quod velimus de terminis tam strictim prima fronte disputare, ut currum bobus praeponentes, minus exercitate iuvenum ingenia argutiarum pondere praegravemus. <text:span text:style-name="T42">Quin potius velut introductionis modo et tamquam prima rudimenta tradentes, solas definitiones perfunctorie declarabimus,quibus iuvenes lactati, possint ad altiora conscendere. Id enim vel maxime in hoc nostro labore intendimus observare ut velut unamquamque materiam non nisi uno eodemque proprio loco tractemus, et eousque quoad ipsius rei natura (quod ait Primo Ethicorum Aristoteles) receperit.</text:span></text:p>
      <text:p text:style-name="P16">Solis discipulis morem gerentes, quibus res, etiam difficiles, si suis sedibus disputentur, mansuescunt, cum si intempestive praeponatur, ipse etiam faciles, appareant prorsus inaccessibiles. Ad haec duas aut plures opiniones tunc solummodo recensebimus, cum, ut ambae fuerit aeque probabiles, aut, si altera minus vera, eo tamen usque in scholis radicaverit, quae non nisi in medium producta et agitata evelli possit.</text:p>
      <text:p text:style-name="P17">Scimus namque inter numerosam opinionum <text:span text:style-name="T43">multitudinem sic </text:span><text:span text:style-name="T44">occultari veritatem, ut, sollertissimus etiam quisque, vix eam deligere sufficiat. Unde plurimis huius temporis fit, qui ea sint scientia contenti si unam quamlibet opinionem sine delectu amplectentes, consequenter ad eam (ut dicunt) respondere sciant. Quo miserabiliter praepediti, sinceram nequeunt assequi veritatem.</text:span></text:p>
      <text:p text:style-name="P18">Accipite ergo studiosi iuvenes annotationes quas et Parisius et deinde Compluti publice profitendo collectas, eas nunc in lucem mittere iussus accuratius retractavi. In quibus quamvis meo iure petere possum id apud vos auctoritatis quod iis qui mecum in hac militia meruerunt tribuitis, tamen abunde mihi gratiam pro industria relatam a vobis putabo, si sine praeiudicio ad legendum accedentes, non ex auctoribus, praesertim non tam antiquis, sed ex re ipsa, certoque iudicio ac ratione meam vel aliorum sententiam et opinionem p<text:span text:style-name="T45">ensaveritis</text:span>.</text:p>
      <text:p text:style-name="P19">Nec enim mihi integrum semper fuit contra meliorum scriptorum auctoritatem rationemque probabiliorem, recentiorum sententiam sectari, praesertim cum homines alioqui et ingeniosi et eruditi negligenter ista tractaverint et invicem sibi aut faventes aut contradicentes nulla antiquorum vel communis sensus rationem habere videantur. Quod si labor hic noster (in quo nihil nisi commodum vestrum semper intendimus) vobis utcumque conduxerit, benedicite Dominum qui est in saecula benedictus.</text:p>
      <text:h text:style-name="P468" text:outline-level="2"><text:soft-page-break/><text:span text:style-name="T46">Capitis primi. Lectio prima</text:span> <text:s text:c="2"/></text:h>
      <text:p text:style-name="P4">Ad rem tandem accedentes <text:span text:style-name="T49">q</text:span><text:span text:style-name="T47">uia omnis scientia (ut ex Aristotele Secundo Metaphysicae habetur) praesuponit modum sciendi, antequam aliquem terminum exponere aggrediamur, opus erit videre quot modis ignotum quodpiam manifestare contingat. Qui quidem dicuntur modi sciendi.</text:span></text:p>
      <text:p text:style-name="P2">Et enim modus sciendi est oratio alicuius ignoti manifestativa.</text:p>
      <text:p text:style-name="P20">Ut haec ‘Animal rationale’ manifestans /3b/ naturam hominis. <text:span text:style-name="T48">Unde omne ignotum, aut est incomplexum, id est, non propositio, ut complexum, id est, propositio.</text:span></text:p>
      <text:p text:style-name="P21">Si incomplexu<text:span text:style-name="T51">m manifestatur per aliquam orationem disiunctius eius significatum explicantem. Quod potest contingere dupliciter, ut cum explicat eius naturam, et tunc est definitio (ut superiori exemplo visum est) aut cum explicat eius multiplicitatem, et tunc dicitur divisio. Sicut manifestatur quotuplex sit animal, per hoc quod aliud est rationale aliud irrationale.</text:span></text:p>
      <text:p text:style-name="P22">Si autem tale ignotum est complexum, tunc manifestatur per argumentationem. Ut si voluptuoso ignoranti studiosam vitam delectabiliorem esse quam voluptuosam, manifestetur sic. Quod est convenientius naturae hominis, est ei delectabilius, sed vita studiosa est ei convenientior quam voluptuosa; ergo delectabilior.</text:p>
      <text:p text:style-name="P22">Est igitur triplex modus sciendi, scilicet, definitio, divisio et argumentatio, de quibus sigillatim videndum est.</text:p>
      <text:p text:style-name="P2">Definitio est oratio naturam rei aut termini significationem exponens.</text:p>
      <text:p text:style-name="P23">Ut haec oratio “Animal rationale” explicans naturam hominis, aut haec “Corpus habens albedinem” explicans significationem huius nominis ‘album’. Ubi advertendum tria cuivis bonae definitioni accidere.</text:p>
      <text:h text:style-name="P476" text:outline-level="3">Primum quo ad eius partes materiales</text:h>
      <text:p text:style-name="P2">Definitio constat ex genere et differentia definiti, vel ex se habentibus per modum generis et differentiae.</text:p>
      <text:h text:style-name="P477" text:outline-level="3">Genus</text:h>
      <text:p text:style-name="P4"><text:span text:style-name="T86">I</text:span>d est, terminus genericus <text:span text:style-name="T54">a</text:span><text:span text:style-name="T52">d alterum terminum communem (ut pro Terministarum captu loquamur) </text:span><text:span text:style-name="T53">est terminus quidditative superior ad ipsum, id est, qui praedicatur de altero universaliter sumpto et non ediverso, si fuerint termini absoluti, vel si fuerint connotativi, quorum abstractum unius praedicatur de abstracto alterius universaliter sumpto et non ediverso, vel ly ‘animal’ respectu de ly ‘homo’, et ly ‘coloratum’ respectu de ly ‘album’.</text:span></text:p>
      <text:p text:style-name="P24">Sed tale genus potest esse aut mediatum, ut quando inter ipsum et speciem mediat aliud superius ad speciem et inferius ad genus, sicut ly ‘corpus’ respectu de <text:s/>ly ‘homo’, inter quae mediat ly ‘animal’. Aut immediatum scilicet inter quod et speciem nihil mediat, ut ly ‘animal’ respectu de ly ‘homo’.</text:p>
      <text:p text:style-name="P24">Et hoc de proprium genus definiti, per quod quo ad fieri potest debet assignari definitio.</text:p>
      <text:h text:style-name="P476" text:outline-level="3"><text:soft-page-break/><text:span text:style-name="T57">Differentia </text:span><text:span text:style-name="T56">d</text:span><text:span text:style-name="T55">icitur </text:span><text:span text:style-name="T57">illud per quod differt definitum ab aliis contentis sub genere</text:span></text:h>
      <text:p text:style-name="P25"><text:span text:style-name="T85">E</text:span><text:span text:style-name="T57">t si connotative significet propriam formam. Dicitur se habere per modum differentiae. Unde (ut infra patebit) definitio ‘quid rei’ constat ex proprio genere et propia differentia, caetere vero ex se habentibus per modum generis et differentiae.</text:span></text:p>
      <text:p text:style-name="P26">Igitur in dicta definitione ly ‘oratio’ ponitur tamquam genus, quia omnis definitio est oratio et non ediverso. Caeterque ponuntur loco differentiae.</text:p>
      <text:p text:style-name="P26">Neque est hic examinandum utrum ens quo nihil est superius, possit definiri.</text:p>
      <text:h text:style-name="P476" text:outline-level="3"><text:span text:style-name="T58">Secunda conditio </text:span>quo ad eius formam. <text:span text:style-name="T57">Definitio clarius </text:span><text:span text:style-name="T58">distinctiusque significat quam definitum.</text:span></text:h>
      <text:p text:style-name="P27">Ex quo sequitur quod definitum non habet intrare definitionem, nam alias definitio non clarius significaret definitio, ac proinde non explicaret ipsum, quae est forma definitionis.</text:p>
      <text:h text:style-name="P476" text:outline-level="3"><text:span text:style-name="T62">Tertia conditio: Definitio non est re</text:span><text:span text:style-name="T59">dundans nec diminuta</text:span></text:h>
      <text:p text:style-name="P28"><text:span text:style-name="T84">I</text:span><text:span text:style-name="T59">d est, non continet plus aut minus quam requiritur ad expressionem definiti.</text:span></text:p>
      <text:p text:style-name="P29">Definitio enim logice accepta dicitur ad similitudinem definitionis realis, modo illa res dicitur aliam realiter definire seu circumscribere quae <text:span text:style-name="T60">continet eius omnes partes et nihil aliud, ut vas ad summum aeque plenum dicitur ipsam definire. Et ideo definitio logicalis sic debet ambire definitum, ut nec plus nec minus contineat quam est in ipso, nisi forte aliquid ob maiorem declarationem addatur. Verbi gratia, quia soli hominis sunt rationales, haec oratio “Animal rationale mortale”. Sed si dii (quod ait Porphyrius) essent animalia rationalia, haec oratio “Animal rationale” esse diminuta definitio hominis, nam addendum esset ‘mortale’ quod separaret nos a diis. Et propter hanc conditionem, Aristoteles Primo Topicorum, appellavit definitionem terminum definiti.</text:span></text:p>
      <text:h text:style-name="P476" text:outline-level="3">Ex hac conditione sequitur definitionem et definitum termino esse convertibiles</text:h>
      <text:p text:style-name="P30"><text:span text:style-name="T83">I</text:span>d est, de quocumque dicitur /4a/ definitio, dici et definitum et ediverso, et ab altero ad alterum valere argumentum affirmative et negative. Ut “Si Petrus est homo, Petrus est animal rationale” et caetera.</text:p>
      <text:h text:style-name="P476" text:outline-level="3">Per hoc demum solvitur illa quaestio. An videlicet de quocumque dicitur definitum cum aliqua determinatione, dicatur et definitio cum eadem et ediverso</text:h>
      <text:p text:style-name="P31"><text:span text:style-name="T61">Est namque natura omnium terminorum </text:span><text:span text:style-name="T63">convertibilium ut de quocumque dicatur alter cum aliqua determinatione, dicatur et alter cum eadem, nisi forte varietur appellatio, aut </text:span><text:span text:style-name="T64">quaevis alia proprietas logicalis. Quod definitioni et definito aeque convenit, ut saepius infra practicabitur. Hae conditiones eliciuntur ex Aristotele Sexto Topicorum.</text:span></text:p>
      <text:p text:style-name="P32"/>
      <text:h text:style-name="P476" text:outline-level="3"><text:soft-page-break/>Notandum est etiam quod si in aliqua definitione ponatur terminus denotans actionem</text:h>
      <text:p text:style-name="P34"><text:span text:style-name="T82">S</text:span><text:span text:style-name="T64">ive verbum sit sive nomen, non dicit talem actionem in actu sed in potentia propinqua, ut in definitione definitionis illud participium ‘exponens’ non dicit actum set aptitudinem.</text:span></text:p>
      <text:p text:style-name="P33">Ad hoc quod <text:span text:style-name="T65">aliqua oratio sit definitio, non requiritur quod actualiter explicet, sed sufficit quod possit explicare in potentia propinqua. Quod in praesenti materia est dicere quod possit explicare nulla facta mutatione ex parte ipsius, per quam novam potentiam significandi acquirat. Verbi gratia</text:span></text:p>
      <text:list text:style-name="L1">
        <text:list-item>
          <text:p text:style-name="P491">Illa oratio “Animal rationale” quae cras proferetur non est nunc definitio, dato quod nunc verum sit dicere quod potest explicare naturam hominis, quia hoc erit per hoc quod producatur, ac proinde per hoc quod acquiratur novam potentiam significandi.</text:p>
        </text:list-item>
        <text:list-item>
          <text:p text:style-name="P491">Secundo. Atramentum quod nunc est, ex quo similis oratio cras lineabitur, non est nunc definitio, esto nunc verum sit dicere quod potest explicare naturam hominis quia hoc erit acquirendo novam lineationem per quam sequenter acquiretur nova potentia significandi.</text:p>
        </text:list-item>
        <text:list-item>
          <text:p text:style-name="P492">Tertio: Si illa definitio “Animal rationale” quae nunc est in intellectu meo poneretur in lapide (ut solet admitti) <text:span text:style-name="T66">ibi non esset definitio, esto verum esset dicere quod potest explicare naturam et caetera, quia hoc erit mutando subiectum, id est, per hoc quod iterum ponatur in intellectu, per quam mutationem acquiret novam potentiam significandi. Forte ad nomen est an haec potentia propinqua remotave dicatur.</text:span></text:p>
        </text:list-item>
        <text:list-item>
          <text:p text:style-name="P493">Quarto: Haec duae littera ‘a’, ‘b’ quae cras imponentur ad significandum sicut “Animal rationale” non sunt nunc definitio, licet nunc verum sit dicere quod possunt explicare naturam et caetera, quia hoc erit facta nova impositione per quam acquiret novam potentia significandi.</text:p>
        </text:list-item>
      </text:list>
      <text:p text:style-name="P35"><text:span text:style-name="T66">Et hi quattuor modi potentiarum dicuntur potentiae remotae. Sed illa oratio “Animal rationale” </text:span><text:span text:style-name="T67">quae scripta est in libro clauso, rite est definitio, quamquam non actualiter explicet naturam et caetera, quia id potest facere nulla mutatione facta ex parte ipsius per quam acquiratur nova potentia significandi, quod est potentia propinqua.</text:span></text:p>
      <text:p text:style-name="P36">Dixerim ex parte ipsius quia non potest adhuc explicare naturam hominis nisi fiat mutatio ex parte potentiae cognitivae, quae acquiratur nova notitia. Et tamen propterea non tollitur potentia propinqua. Et per proportionabiliter exponuntur plures definitiones quae infra assignabuntur.</text:p>
      <text:h text:style-name="P476" text:outline-level="3">Definitionis multiplex est species</text:h>
      <text:p text:style-name="P37">In ipsa enim eius definitione innuitur duplicem esse definitionem scilicet quid rei, <text:span text:style-name="T68">quae explicat naturam rei. Et quid nominis, quae explicat nominis significationem, ut ibidem exemplis monstratum est.</text:span></text:p>
      <text:p text:style-name="P38">Rursus definitio quid rei est triplex, scilicet, quidditativa, descriptiva et causalis. Secundum quod natura rei potest explicari, aut per partes essentiales, aut per eius accidentia, aut per causas circumstantes. Accipitur enim tam extense explicatio naturae, ut unum nomen, tres species definitionis quid rei complectatur.</text:p>
      <text:p text:style-name="P38">Unde definitio quidditativa est definitio rei per eius partes essentiales. Et es duplex, scilicet:</text:p>
      <text:list text:style-name="L2">
        <text:list-item>
          <text:p text:style-name="P494"><text:soft-page-break/>Metaphysica, quae est definitio rei per proprium genus et propriam differentiam, ut animal rationale, respectu hominis.</text:p>
        </text:list-item>
        <text:list-item>
          <text:p text:style-name="P494">Et physica, quae est definitio rei per eius partes materialem et formalem, ut compositum ex corpore et anima rationali, respectu eiusdem.</text:p>
        </text:list-item>
      </text:list>
      <text:p text:style-name="P39">Utraeque enim sunt partes essentiales.</text:p>
      <text:p text:style-name="P39">Solet dicit quod definitio metaphysica sit quae datur per essentialia in recto, et physica quae datur per essentialia in obliquo. Quae tamen <text:span text:style-name="T69">definitiones non videntur omnino bonae. Cum quia non explicant partes metaphysicas aut physicas. Tum etiam, quia nihil vetat in definitione physica partes explicare in recto, ut si diceres “Homo est compositum quoddam, cuius partes sunt corpus et anima rationalis”.</text:span></text:p>
      <text:p text:style-name="P40">Definitio descriptiva est definitio rei per eius accidentia. Et sicut accidentium alia sunt propria, intrinseca et intransmutabilia, et alia communia, extrinseca, et transmutabilia. <text:span text:style-name="T196">I</text:span>ta descriptio /4b/ potest fieri, aut:</text:p>
      <text:list text:style-name="L3">
        <text:list-item>
          <text:p text:style-name="P495">Per accidentia primi generis ut si diceres “Homo est animal risibile, politicum, disciplinabile”</text:p>
        </text:list-item>
        <text:list-item>
          <text:p text:style-name="P495">Et per accidentia secundi generis, ut si diceres “Homo est animal magni, cerebri, pilosus, singulis manibus et pedibus quinque habens digitos et caetera”.</text:p>
        </text:list-item>
      </text:list>
      <text:p text:style-name="P41">Et prima dicitur proprie descriptiva, nam secunda congruentius diceretur accidentalis aut per additamentum.</text:p>
      <text:p text:style-name="P42">Definitio causalis est definitio rei per eius causas, ut si dicas: “Anima est quid creatum a Deo ad beatitudinem obtinendam”, <text:span text:style-name="T70">ubi exprimuntur causa efficiens et finalis quae </text:span><text:span text:style-name="T71">sunt extrinsece.</text:span></text:p>
      <text:p text:style-name="P43">Definitio tamen quae datur per causas materialem et formalem, est quidem quidditativa physica (ut visum est) cum eius modi causae sint intrinsecae.</text:p>
      <text:h text:style-name="P476" text:outline-level="3">Notantum tandem cuiuscumque definitionis quid rei duplex esse definitum</text:h>
      <text:p text:style-name="P44"><text:span text:style-name="T81">S</text:span><text:span text:style-name="T71">cilicet, rem cuius natura exprimitur per definitionem et eius nomen, ut huius definitionis “Animal rationale”, et illa res quae est homo est definitum et hoc nomen ‘homo’.</text:span></text:p>
      <text:p text:style-name="P43">Disputari tamen solet quodnam illorum dicatur propinquum quove remotum. Sed certe (ut re conveniamus) clarum est ly “Animal rationale” exponere non (ut quidam dicunt) naturam illius nominis ‘homo’, sed illius rei quae est homo. Et si dicitur definite ly ‘homo’ hoc est quia accipitur pro re ipsa iuxta modum loquendi, Aristoteles Primo Elenchorum capitulo primo, quia res <text:span text:style-name="T72">nobiscum ducere non possumus utimur pro rebus.</text:span></text:p>
      <text:p text:style-name="P45">Igitur, quantum ad nomen, res ipsa dicenda est definitum propinquum, quia propinquus definitur quam nomen, cum res non habeat a nomine, ut dicatur definitum.</text:p>
      <text:p text:style-name="P45">Dato enim quod non significaretur per illum terminum ‘homo’, definiretur per illam orationem. Sed nomen habet a re ut sit definitum, nam si illam non significaret, non esse definitum.</text:p>
      <text:p text:style-name="P45">At vero in definitione ‘quid nominis’ illa adminus quae nullo modo est quid rei, non est nisi unicum definitum, scilicet, terminus ipse, et illud dicitur propinquum, quia eius significatio exprimitur per definitionem.</text:p>
      <text:p text:style-name="P45"><text:soft-page-break/>Unde definitum propinquum est res cuius natura, ut terminus cuius significatio exprimitur per definitionem, secundum dicitur propter definitum definitionis quid nominis.</text:p>
      <text:p text:style-name="P46">Sed definitum remotum est terminus cuius significatum adaequatum et formale exprimitur per definitionem, ut ly ‘homo’ respectu de ly “Animal rationale”.</text:p>
      <text:p text:style-name="P47">Dicitur significatum adaequatum, nam ly ‘ens’ non est definitum remotum talis definitionis, et si eius significatum inadaequatum, utputa ‘homo’, exponatur per eam.</text:p>
      <text:p text:style-name="P47">Dicitur formale quia neque ly risibile dicitur eius definitum remotum, licet eius materiale significatum, scilicet ‘homo’ exponatur per eam.</text:p>
      <text:p text:style-name="P48">Ex quo sequitur quod definitum propinquum et remotum non dicuntur omnino relative, nam licet non possit esse definitum remotum nisi per respectum ad propinquum, a quo habet esse definitum, potest tamen esse propinquum sive remoto, cum ab illo non habeat esse definitum, ut patet in definitionibus ‘quid nominis’, illis maxime quae nullo modo sunt quid rei.</text:p>
      <text:p text:style-name="P48">Ex quo secundo sequitur idem esse definitum remotum et propinquum, ut patet de ly ‘definitum remotum’ quod est remotum et propinquum respectu suae definitionis. Sed tamen diversis rationibus. Et enim remotum quia est terminus cuius significatum et caetera exprimitur per dictam definitionem, et propinquum, quia est res cuius natura explicatur per eandem, quod quidem corollarium frequenter verificabitur in sequentibus.</text:p>
      <text:h text:style-name="P468" text:outline-level="2"><text:span text:style-name="T197">Capitis primi. </text:span>Lectio secunda</text:h>
      <text:h text:style-name="P478" text:outline-level="3"><text:span text:style-name="T74">An vero contra definitionem definitionis arguitur</text:span><text:span text:style-name="T73"> </text:span></text:h>
      <text:p text:style-name="P49">Haec oratio “Animal rationale” explicat significationem huius nominis homo, et tamen non est eius definitio ‘quid nominis’; ergo dicta definitio non est bona.</text:p>
      <text:list text:style-name="L4">
        <text:list-item>
          <text:p text:style-name="P496">Minor est nota ex usu universali omnium, dicentium illam esse ‘quid rei’ et nullo modo quid nominis, et maior probatur. Illa oratio distinctius significat id quod ille terminus ‘homo’ significat confuse; ergo explicat eius significationem.</text:p>
        </text:list-item>
        <text:list-item>
          <text:p text:style-name="P497"><text:span text:style-name="T74">Secundo: Haec oratio “Corpus habens albedinem” explicat quodammodo naturam corporis, utputa per modum eius accidentalem, quod est habere albedinem, et tamen non est eius definitio ‘quid rei’; ergo illa definitio non est bona. </text:span><text:span text:style-name="T75">Maior est nota et probatur minor, nam dato opposito sequeretur quod eadem esse definitio ‘quid rei’ et ‘quid nominis’,e t tunc membra primae divisionis definitionis coinciderent, ac proinde non esse bona.</text:span></text:p>
        </text:list-item>
        <text:list-item>
          <text:p text:style-name="P498">Tertio: Hace oratio “Laedens pedem” est definitio ‘quid nominis’ de ly ‘lapis’, et tamen non convertitur cum definitio; ergo ultima conditio /5a/ <text:span text:style-name="T76">bonae definitionis non requiritur. Maior videtur nota et minor patet, quia non omne laedens pedem est lapis.</text:span></text:p>
        </text:list-item>
      </text:list>
      <text:h text:style-name="P476" text:outline-level="3"><text:soft-page-break/><text:span text:style-name="T77">Pro solutione horum notandum significantias terminorum sumendas esse ex eorum etymolog</text:span><text:span text:style-name="T78">i</text:span><text:span text:style-name="T77">is </text:span><text:span text:style-name="T80">e</text:span><text:span text:style-name="T77">t ex usu plurium aut sapientiorum, et signanter in logica ex Aristotele.</text:span></text:h>
      <text:p text:style-name="P50">Igitur definitio ‘quid rei’ in rigore est illa quae explicat quidditatem rei, et ‘quid nominis’ quae explicat quidditatem nominis. Et cum quidditas rei non explicetur plene nisi per eius partes essentiales, sola definitio quidditativa esset proprie dicenda ‘quid rei’ et sic utitur homo nomine Aristotele Septimo Metaphysicae, capitulo decimo infra.</text:p>
      <text:p text:style-name="P51"><text:span text:style-name="T79">Sed iam usus (etiam apud viros doctos) paulo latius extendit hoc nomen definitio ‘quid rei’, ut scilicet quaecumque definitio explicans aut modum ali</text:span><text:span text:style-name="T87">quem rei, sive per essentialia sive per accidentalia, quantumcumque extrinseca, dictatur definitio ‘quid rei’, id est, explicans quodammodo rem.</text:span></text:p>
      <text:p text:style-name="P83">Rursus, quia quidditas nominis inquantum nomen est eius significatio, illa est definitio quid nominis quae explicat significationem nominis. Quod sic intelligebant antiqui, ut videlicet quaecumque oratio per quam manifestaretur quid per nomen significatur, diceretur definitio quid nominis, ut si diceres “Elephans est animal quadrupes, proceri corporis, proboscide longa e naribus pendente, pro manu utens et caetera”.</text:p>
      <text:p text:style-name="P52"><text:span text:style-name="T88">Itaque definitio quam supra diximus accidentalem dicitur apud eos quid nominis, ut definitio quid nominis distinguatur contra definitionem quid rei stricte accepta. </text:span><text:span text:style-name="T89">Et sic dicunt solos terminos ‘absolutos’, ‘incomplexo</text:span><text:span text:style-name="T195">s</text:span><text:span text:style-name="T89">’ veras res significantes definiri definitione quid rei.</text:span></text:p>
      <text:p text:style-name="P84">Sed definitione quid nominis et ipsos et omnes connotativos / complexos et quibus nullum significatum correspondet, ut ly ‘album’ / ly ‘obiectum adaequatum potentiae’ / ly ‘Chimaera’ et caetera.</text:p>
      <text:p text:style-name="P84">Quinetiam etiam et syncategoremata, ut si dicas “Cras significat sicut haec oratio ‘In die proximo sequenti’”. Iuniores autem solummodo vocant definitionem quid nominis orationem qua exprimitur aliquis modus obscurus significandi termini, sicut orationes explicant significatum formale et consignatum terminorum connotativorum, sicut est illa “Corpus habens albedinem respectu alibi”, et quibus exprimuntur modi significandi quorundam syncategorematum.</text:p>
      <text:p text:style-name="P85">Quare dicunt terminum absolutum non posse definire definitione quid nominis, quia non habet obscurum modum significandi, possunt tamen eorum impositiones manifestari. Neque hoc est ipsos definire. In his tamen quae ad nomen consistunt, cum sunt in usu ambo loquendi modi, sat est sine maiori examine, utriusque meminisse.</text:p>
      <text:p text:style-name="P53"><text:span text:style-name="T90">Pro solutione tertii argumenti advertito quod praeter dicta definitiones sunt etiam quaedam nominum interpretationes et etymologiae. </text:span><text:span text:style-name="T91">Unde interpretatio est unius linguae per aliam translatio, sive simplex nomen traducatur per simplex, it si dicas “Sophia est sapientia”, sive simplex per compositum, ut si diceres “Philosophus est amator sapientiae”.</text:span></text:p>
      <text:p text:style-name="P7">Etymologia vero (quae Latine sonat vera locutio) est oratio veram nominis originem manifestans, ut est illa sumpta in argumento. Quare ut peculiaribus nominibus haec nomina distinguatur, interpretatio et etymologia non sunt dicendae definitiones, maxime cum etymologia non convertatur cum ipso nomine, ut in minore argumenti probatur.</text:p>
      <text:p text:style-name="P7"><text:soft-page-break/>Item etiam dicta oratio non explicat modum concretivum significandi de ly ‘lapis’ (cum ly ‘lapis’ non significet lapidem cum illa connotatione). Quod tamen secundum modernos requiretur, ut esset definitio quid nominis.</text:p>
      <text:list text:style-name="L5">
        <text:list-item>
          <text:p text:style-name="P499"><text:span text:style-name="T92">Igitur a primum argumentum negatur maior, et negatur illa consequentia ly ‘animal rationale’ distinctius significat quam ly ‘homo’; ergo explicat eius significationem, sed requiritur id, vel quod explicat naturam rei. </text:span><text:span text:style-name="T93">Nam secundum modernos non explicat aliquem modum significandi obscurum de ly ‘homo’. Quod certe videtur manifestum, cum grammaticus (cuius est scire significantias nominum) clarius cognosceret significationem de ly ‘homo’ si diceret quod significat hominem, quam si diceres quod significat animal rationale, licet non ita clare cognosceret naturam rei quae est homo. Nec antiqui vocarent illam definitionem quid nomimis. </text:span><text:span text:style-name="T94">Quia de ratione definitionis quid nominis, secundum illos, est quod explicaret rem per accidentia extrinseca.</text:span></text:p>
        </text:list-item>
        <text:list-item>
          <text:p text:style-name="P500">Ad secundum conceditur totum argumentum, videlicet, quod illa oratio “Corpus habens albedinem” quae est definitio quid nominis de ly ‘album’, est quodammodo definitio quid rei corporis. <text:span text:style-name="T203">Non quidem stricto nomine, quia non proprie explicat eius naturam, /5b/ sed dicitur quodammodo quid rei, quia explicat aliqualem modum accidentalem reis, scilicet, habere albedinem. Sed quia illus est respectu diversorum et diversis rationibus, non sequitur quod illa divisio definitionis in quid rei et quid nominis non sit bona.</text:span></text:p>
          <text:p text:style-name="P501">Verum tamen definitionis in quid rei et quid nominis terminorum non habentium verum et reale significatum, sicut <text:span text:style-name="T195">est definitio de ly ‘vacuum’ et similium non sunt dicendae absolutae definitiones quid rei, sed quid rei imaginabiles.</text:span></text:p>
          <text:p text:style-name="P502">Definitiones vero syncategorematum, utputa horum terminorum ‘cras’, ‘hodie’ <text:span text:style-name="T204">et caetera, nullo modo sunt quid rei, quia tales termini non significant aliquo modo rem. Haec quae dicta sunt de definitione de ly ‘album’ intelliguntur quando definitur in concreto, nam in abstracto </text:span><text:span text:style-name="T205">potest definire definitione quid rei, eo modo quo accidens dicitur ens, quod alterius est disputare negotii.</text:span></text:p>
        </text:list-item>
        <text:list-item>
          <text:p text:style-name="P503">Ad tertium argumentum negatur maior, videlicet, quod dicta oratio sit definitio quid nominis de ly ‘lapis’, sed est etymologia (ut visum est) quam etiam vocant notationem.</text:p>
        </text:list-item>
      </text:list>
      <text:h text:style-name="P476" text:outline-level="3">Ex his sequitur secundum utramque opinionem non omnem definitionem quid nominis praedicari de suo definito personaliter sumpto</text:h>
      <text:p text:style-name="P5">Ut patet in definitionibus de ly ‘vacuum’, <text:span text:style-name="T198">de ly ‘Chimaera’ et caetera. Omnis tamen definitio quid nominis praedicatur de suo definito materialiter sumpto in propositione de actu signato.</text:span></text:p>
      <text:list text:style-name="L6">
        <text:list-item>
          <text:p text:style-name="P504">Propositio de actu signato est propositio cuius verbum est secundae intentionis, aut accipitur loco talis.</text:p>
        </text:list-item>
        <text:list-item>
          <text:p text:style-name="P504">Propositio de actu exercito est propositio cuius verbum est primae intentionis.</text:p>
        </text:list-item>
      </text:list>
      <text:p text:style-name="P54"><text:span text:style-name="T199">Verbi gratia propositiones “Homo significat animal”, “</text:span><text:span text:style-name="T200">Animal praedicatur de homine” et similes dicuntur de actu signato; sed haec “Homo est animal” dicitur de actu exercito, utpote in qua exercetur illud quod significatur per aliam.</text:span></text:p>
      <text:p text:style-name="P86">Volumus ergo dicere omnes has esse veras:</text:p>
      <text:list text:style-name="L7">
        <text:list-item>
          <text:p text:style-name="P505"><text:soft-page-break/>‘Chimaera’ significat eodem modo, id est, eadem connotatione, sicut haec oratio “Ens compositum ex capite et pectore leaenae et caetera”.</text:p>
        </text:list-item>
        <text:list-item>
          <text:p text:style-name="P506"><text:span text:style-name="T200">‘</text:span><text:span text:style-name="T201">Vacuum’ significat eodem modo, sicut haec oratio “Locus non repletus corpore et caetera”.</text:span></text:p>
        </text:list-item>
      </text:list>
      <text:p text:style-name="P6">Et secundum modernos hoc est evidens signum ad cognoscendum quae est definitio quid nominis alicuius terminus, utputa, si significet eodem modo sicut suum definitum, <text:span text:style-name="T202">dempto quod definitio potest significare complexe, definito significante incomplexe. Sed secundum antiquos non opus est quod definitum et definitio quid nominis significent eodem modo, quia definitio quid nominis termini absoluti significat connotative, definitio significante absolute. Sufficit enim quod significent idem.</text:span></text:p>
      <text:h text:style-name="P476" text:outline-level="3">Ultimo tandem notanda sunt interrogativa definitionum, cum eni<text:span text:style-name="T206">m</text:span> quaeritur</text:h>
      <text:p text:style-name="P55">Quae definitio est haec? Respondendum est quid nominis aut quid rei, quidditativa aut descriptiva et caetera.</text:p>
      <text:p text:style-name="P56">Sed cum quaeritur qualis <text:span text:style-name="T207">est, respondendum est bona vel mala. Unde definitio, quia non est propositio, non est vera vel falsa, sed bona vel mala.</text:span></text:p>
      <text:p text:style-name="P87">Item sunt etiam interrogativa circa ipsam rem pro singulis speciebus definitionis. Verbi gratia:</text:p>
      <text:list text:style-name="L8">
        <text:list-item>
          <text:p text:style-name="P507">“Quae est significatio huius nominis?” quaerit qua definitione quid nominis definitur.</text:p>
        </text:list-item>
        <text:list-item>
          <text:p text:style-name="P507">Sed “Quid?” quaerit definitionem quidditativam.</text:p>
        </text:list-item>
        <text:list-item>
          <text:p text:style-name="P507">“Quale?” definitionem descriptivam.</text:p>
        </text:list-item>
        <text:list-item>
          <text:p text:style-name="P507">“A quo?” definitionem per causam efficientem”.</text:p>
        </text:list-item>
        <text:list-item>
          <text:p text:style-name="P507">“Ex quo?” definitionem per causam materialem.</text:p>
        </text:list-item>
        <text:list-item>
          <text:p text:style-name="P507">“Per quid?” causam formalem.</text:p>
        </text:list-item>
        <text:list-item>
          <text:p text:style-name="P507">“Propter quid?” causam finalem”.</text:p>
        </text:list-item>
      </text:list>
      <text:p text:style-name="P82">Ut is quaeratur:</text:p>
      <text:list text:style-name="L9">
        <text:list-item>
          <text:p text:style-name="P508">“Quid est homo?”, respondendum: “Animal rationale”.</text:p>
        </text:list-item>
        <text:list-item>
          <text:p text:style-name="P509">“Qualis est homo?”, “Animal politico”.</text:p>
        </text:list-item>
        <text:list-item>
          <text:p text:style-name="P509">“A quo est homo?”, “A Deo”.</text:p>
        </text:list-item>
        <text:list-item>
          <text:p text:style-name="P509">“<text:span text:style-name="T208">Ex quo est homo?”, “Ex materia”.</text:span></text:p>
        </text:list-item>
        <text:list-item>
          <text:p text:style-name="P509">“<text:span text:style-name="T208">Per quid est homo?”, “Per anima</text:span><text:span text:style-name="T209">m</text:span><text:span text:style-name="T208"> rationalem”.</text:span></text:p>
        </text:list-item>
        <text:list-item>
          <text:p text:style-name="P509">“<text:span text:style-name="T208">Propter quid est homo?”, “Propter beatitudinem” qui est Deus in saecula benedictus.</text:span></text:p>
        </text:list-item>
      </text:list>
      <text:h text:style-name="Heading_20_2" text:outline-level="2"><text:soft-page-break/>Capitis secundi. Lectio prima</text:h>
      <text:h text:style-name="Heading_20_3" text:outline-level="3">Divisio: est oratio rem per suas partes, aut terminum per suas significationes distribuens</text:h>
      <text:p text:style-name="P241">Ut haec oratio “Animalium aliud rationale aliud irrationale”, distinguens multiplicitatem animalium. Et haec ‘canis’ alio conceptu significat: sidus, alio, picem et caetera. Distinguens aequivocationem de ly ‘canis’. Nam sicut in cumulo ex tritico et ordeo separantur ab invicem dictae partes, ut manifestetur eius confusio, sic ‘animal’ secatur in rationale et irrationale, ut eius communitas explicetur.</text:p>
      <text:p text:style-name="P241">Dixerim rem per suas partes distribuens, non quod sit divisio realis, sicut incisio panis in frusta. <text:span text:style-name="T210">Sed quod in hac divisione, animalium aliud rationale aliud irrationale, res ipsa logicaliter dividatur /6a/ aut terminus acceptus quod idem est (ut diximus de definitione quid rei) unde res potest dici divisum propinquum, et terminus remotum.</text:span></text:p>
      <text:p text:style-name="P242">Et accipitur divisio quandoque pro tota oratione composita ex divisio et membris dividentibus, ut haec, animalium aliud rationale aliud irrationale.</text:p>
      <text:p text:style-name="P242">Quandoque pro solo disiuncto ex membris dividentibus, ut rationale et irrationale. Et hoc modo accipietur infra quando dicemus quod divisio convertitur cum diviso.</text:p>
      <text:h text:style-name="Heading_20_3" text:outline-level="3">Notandum est hic cuius bonae divisioni rei tria contingere</text:h>
      <text:p text:style-name="P243">Sunt enim membra dividentia partes distin<text:span text:style-name="T211">ctivae divisi. Quare ad similitudinem partium rei, quibus convenit, ut singule sint minores toto et omnes simul adaequate componant totum, accidunt eis suae conditiones.</text:span></text:p>
      <text:list text:style-name="L10">
        <text:list-item>
          <text:p text:style-name="P536">Prima: Singula membra bonae divisionis sunt inferiora divisum. Hoc enim est esse logicaliter minora. Et possunt esse aut quidditative inferiora, aut solum essentialiter, aut accidentaliter (ut infra videbitur).</text:p>
        </text:list-item>
        <text:list-item>
          <text:p text:style-name="P536">Secunda: Membra simul sumpta adaequate exhauriunt totam confusionem divisi, id est, disiunctum ex membris dividentibus convertitur cum divisio, quod est membra dividentia adaequate divisum.</text:p>
        </text:list-item>
        <text:list-item>
          <text:p text:style-name="P536">Tertia: Membra dividentia sunt inter se opposita, id est, oppositas rationes formales habentia. Et ratio huius est nam alias talis membra non proprie dicerentur distinctiva divisi cum inter se esset permixta. Et possunt esse opposita realiter vel solum formaliter. Realiter quidem, aut contrarie, aut privative, aut contradictorie, aut forsan relative. Quos terminos infra, capitulo ultimo, habes expositos lectio secunda. Et i<text:span text:style-name="T212">n</text:span> diversis generibus divisionis (ut infra videbitur) membra dividentia, sicut diversimode sunt inferiora, it diversimode sunt opposita.</text:p>
        </text:list-item>
      </text:list>
      <text:p text:style-name="P88">At vero illi termini dicuntur solum formaliter opponi, qui licet possint de eodem verificari, eorum tamen rationes formales sunt omnino diverse, id est, quarum una potest cuicumque suo supposito convenire sine hoc quod alia eidem conveniat, ut membra huius usitate divisionis “Bonorum alius honestum, aliud utile, et aliud delectabile”, quae quidem non sunt realiter opposita cum in eodem possint reperiri, sed eorum rationes sunt omnino diversae quia nulla earum includit aliquid alterius, sed potest dici honestum quod nullo modo sit utile vel delectabile, et utile quod nullo modo sit delectabile vel honestum et caetera. </text:p>
      <text:p text:style-name="P88"><text:soft-page-break/>Non tamen sufficere membra esse aliquo modo formaliter diversa. Haec enim non est bona divisio (ut inquit Boethius) “Animalium, aliud rationale, aliud bipes”, quia cuicumque convenit ratio prima convenit secunda, nec potest oppositum contingere, et tunc certe illa membra non habent ut sint distinctiva divisi.</text:p>
      <text:p text:style-name="P89">Ex quo sequitur hanc non esse bonam divisionem (quam quidam fingunt) “Animalium, aliud ‘a’, aliud brutum”, si ly ‘a’ valeat tantum sicut homo vel equus, nam aliquid suppositum primi membri includitur necessario sub secundo, et ideo non sunt omnino diversa.</text:p>
      <text:p text:style-name="P90">Sequitur etiam ex primis duabus conditionibus hanc non esse bonam divisionem “Hominum, aliud animal album, aliud animal nigrum”, utramque enim conditio deficit ei. Nec est dialecticum inutiles has divisiones fingere.</text:p>
      <text:p text:style-name="P93">Sequitur tandem hanc non esse bonam divisionem “Animalium, aliud rationale quod est, aliud irrationale quod est”. Nam divisum mediante ly ‘erit’ verificatur de Antichristo, de quod mediante eadem copula non verificatur divisio, ac propterea membra non convertuntur cum divisio. Et si contra arguatur illa convertitur cum hac bona divisione “Animalium, aliud rationale, aliud irrationale”, cum termini eodem modo teneantur ergo illa est bona.</text:p>
      <text:p text:style-name="P91">Distinguitur antecedens vel quod concertantur quantum ad veritatem vel falsitatem, et sic conceditur (ut probat argumentum) sunt enim propositiones convertibiles, vel quod convertatur in sensu in quo sunt divisiones, et sic negatur.</text:p>
      <text:p text:style-name="P91">Impertinens enim est veritas vel falsitas ad bonitatem divisionis, cum haec sit bona divisio “Chimaerarum, alia ‘a’, alia ‘b’” si ly ‘a’ sit nomen discretum unius Chimaera, et ly ‘b’ commune omnium aliarum, et tamen si addas ly ‘est’ ut fiat propositio, est falsa.</text:p>
      <text:p text:style-name="P92">Quare divisio, sicut definitio, non est dicenda vera vel falsa, sed bona vel mala.</text:p>
      <text:p text:style-name="P92">Solet a neotericis superaddi <text:span text:style-name="T213">quarta conclusio, videlicet, quod diviso debet esse bimembris. Quam aliqui intelligunt sicut, id est, quod ad minus debet habere duo membra, sed certe superflueret tunc talis conditio, quippe quae tam evidenter sequatur ex ipso nomine divisionis. Non enim potest intelligi quod sit divisio quae ad minus non habeat duo membra.</text:span></text:p>
      <text:p text:style-name="P94">Alii sic illam intelligunt, scilicet, quod omnis divisio sit reducibilis ad /6b/ <text:span text:style-name="T214">duo membra, sed dato quod verum sit, omne divisionem esse sic reducibilem, utputa </text:span><text:span text:style-name="T215">per termino contradictore oppositos. Tamen hoc non videtur aliquam bonitatem divisioni superaddere, tam bone enim videtur haec divisio “Coloratorum, aliud nigrum, aliud album, aliud medium”, quam haec “Aliud album, aliud non album”. Et ideo certe non video quare illa conditio requiratur.</text:span></text:p>
      <text:p text:style-name="P244"><text:span text:style-name="T108">Verum est tamen quod (ut inquit Boethius) unde ipsi volunt dictam conditionem elicere, si non esset penuria nominum, omnis divisio debet fieri per duo membra. Verbi gratia, si esset aliquod nomen absolutum omnium brutorum, tunc genus </text:span><text:span text:style-name="T109">animal dividendum esset per duas species, scilicet, homo et ‘a’, quod (exempli gratia) esset tale nomen. Sed quia non est tale nomen, dividitur per suas differentia, scilicet, per rationale et irrationale, aut per membra contradictoriae opposita, ut per ‘homo’ et ‘non-homo’. Et hoc ut divisio conservatur cum diviso.</text:span></text:p>
      <text:p text:style-name="P95">Verum tamen hoc (ut ex dictis eius elicitur) intelligitur quando omnes species non possunt facile numerari, ut speciebus animalis contingit, sed quando possunt numerari non requiritur, quod divisio sit bimembris, nec quod reducatur ut sit bona ad bimembrem, ut dictum est de illa “Coloratorum, aliud album, aliud nigrum, aliud medium”.</text:p>
      <text:p text:style-name="P95"><text:soft-page-break/>Elicitur tamen ex hoc haec observanda regula:</text:p>
      <text:p text:style-name="Quotations">Diviso semper habet fieri per membra quam paucissima licuerit per nominum copiam.</text:p>
      <text:p text:style-name="P95">Verbi gratia, divisio termini in mentalem, vocalem et scriptum, melius fiet in mentalem et sensualem, deinde sensualis in vocalem et scriptum.</text:p>
      <text:p text:style-name="P245"><text:span text:style-name="T110">Dixerim in fronte huius, notabilis dictas conditiones requiri ad divisionem rei, nam ad divisionem nominis in suas significationes minime exigunt. Ut in hac divisione “Canum, alius caelestis, alius latrabilis, alius marinus”, neque <text:s/>aliquod membrorum est inferius ad divisum, neque disiunctum ex omnibus convertitur cum diviso. Cum enim divisum non significet illa mediante eodem conceptu, sed mediantibus tribus in </text:span><text:span text:style-name="T111">coniunctim sumptis (nihil enim est commune illis membris nisi solum nomen) non potest accipi secundum omnes tres conceptus sic sumptos, nam secundum quod sic acciperetur non esset unus terminus sed plures igitur, vel accipitur secundum conceptu quo significat sidus, et tunc convertitur cum primo membro, et respectu aliorum est terminus disparatus, vel accipitur secundum quemcumque alium, et idem probabitur quare in nulla significatione dictum divisum est superius ad aliquod membrum, nec convertibile cum omnibus, nec itaque illa membra dicuntur proprie opponi.</text:span></text:p>
      <text:h text:style-name="Heading_20_3" text:outline-level="3">Divisionis multiplex est species</text:h>
      <text:p text:style-name="P246"><text:span text:style-name="T112">In ipsa enim eius definitione innuitur duplex divisio, scilicet rei, quae est oratio distribuens rem per suas partes, aut (quod idem est) distribuens nomen acceptum pro rebus in suas partes subiectivas. Et divisio termini quae est oratio qua terminus aequivocus distribuitur in suas significationes, ut ibi exemplis monstratum est. D</text:span><text:span text:style-name="T113">ifferuntque haec duo membra sicut definitio quid rei quid nominis. Et divisione secundi generis, etiam propositio potest dividi, ut haec amphibologia “Animo Troianos, Romanos vicere posse” dividitur, quia aut significat quod Troiani possunt vincere Romanos, aut ediverso.</text:span></text:p>
      <text:p text:style-name="P96">Ad hoc genus divisionis reducitur divisio analogi in sua analogata, ut “Hominum, alius vivus, alius pictus” de qua infra.</text:p>
      <text:p text:style-name="P98">Divisione autem rei dividitur quidquid habet rationem totius:</text:p>
      <text:list text:style-name="L11">
        <text:list-item>
          <text:p text:style-name="P510">Unde prima divisio rei est generis in suas species, ut “Animalium, aliud homo, aliud aequus et caetera”. Et haec propriissime dicitur divisio per partes quidditative inferiores et contrarie oppositas, qui termini supra expositi sunt. Ad hanc divisionem potest reduci divisio speciei in individua. Ut “Hominum, alius Petrus, alius Paulus”. Sed quia haec ad nullam unquam scientiam ad aliquid conducit, relinquitur tamquam inutilis.</text:p>
        </text:list-item>
        <text:list-item>
          <text:p text:style-name="P537"><text:span text:style-name="T115">Secunda diviso est generis per suas differentias divisivas, ut “Animalium, aliud rationale, aliud irrationale”. Est haec per partes oppositas contrariae (opinor namque ly ‘rationale’ quamquam videtur privativum, accipi loco termini positivi communiter significantis omnes differentias brutorum) et solum essentialiter inferiores, quia scilicet significant connotative partem essentialem specie divisi. Et haec maxime conducit ad construendas definitiones, ut infra vide</text:span><text:span text:style-name="T114">bi</text:span><text:span text:style-name="T115">tur. </text:span></text:p>
          <text:p text:style-name="P537"><text:span text:style-name="T114">Dixerim divisas, nam differentia quae est constitutiva speciei, est divisiva generis, ut ly ‘rationale’, quae constituit definitionem hominis, dividit genus animal, quare genus in </text:span><text:soft-page-break/><text:span text:style-name="T114">divisione se habet ut totum et differentia, ut eius pars. Et in definitione speciei, genus se habet tamquam pars /7a/ materialis, et differentia tamquam pars formalis.</text:span></text:p>
        </text:list-item>
        <text:list-item>
          <text:p text:style-name="P538"><text:span text:style-name="T114">T</text:span><text:span text:style-name="T95">ertia divisio est accidentalis, quae potest tripliciter contingere.</text:span></text:p>
          <text:list>
            <text:list-item>
              <text:p text:style-name="P511">Primo, quando dividitur subiectum in sua accidentia, ut “Animalium, aliud album, aliud nigrum, aliud medium”.</text:p>
            </text:list-item>
            <text:list-item>
              <text:p text:style-name="P511">Secundo, quando dividitur accidens in sua subiecta, ut “Alborum, aliud nix, aliud lac et caetera”.</text:p>
            </text:list-item>
            <text:list-item>
              <text:p text:style-name="P511">Tertio, quando dividitur accidens in accidentia ei impertinentia, ut “Alborum, aliud dulce, aliud amarum”, “Dulcium, aliud album, aliud nigrum”.</text:p>
            </text:list-item>
          </text:list>
        </text:list-item>
      </text:list>
      <text:p text:style-name="P99">Potest etiam dividi totum integrale in suas partes, ut “Hominis, aliud caput, aliud manus et caetera”, aut in suas vires, ut “Animae, aliud vegetativum, aliud sensitivum et caetera”. Sed huiusmodi divisiones non sunt admodum in usu, sunt tamen reducendae ad aliquod genus divisionis supra nominatum, ut prima ad hanc “Partium hominum, alia caput et caetera”, et secunda ad hanc “Virium animae, aliae vegetativa et caetera”, quae sunt generis in suas species. Et in huiusmodi divisionibus membra dividentia sunt accidentaliter inferiora, id est, aut accidentaliter praedicantur de diviso, aut divisu de ipsis.</text:p>
      <text:h text:style-name="Heading_20_2" text:outline-level="2">Capitis secundi. Lectio secunda</text:h>
      <text:h text:style-name="Heading_20_3" text:outline-level="3">Contra primam definitionem arguitur: <text:span text:style-name="T216">H</text:span>aec est bona divisio rei “Quantitatum, alia continua, alia discreta” et tamen ly ‘quantitas discreta’ non est inferius ad divisum; ergo illa conditio non requiritur</text:h>
      <text:p text:style-name="P247">Maior est Aristotel<text:span text:style-name="T217">is</text:span> in Praedicamento, et minor probatur. Ly ‘quantitas discreta’ significat omne illud quod habet partes separatas, sed omnis quantitas, etiam continua, potest partes separatas habere; ergo ly ‘quantitas discreta’ tam commune est in significando quam ly ‘quantitas’, et ideo non est terminus inferior.</text:p>
      <text:p text:style-name="P248">Contra secunda arguitur: Haec est bona divisio “Animalium, alium album, aliud nigrum, aliud medium”, et tamen disiunctum ex membris dividentibus verificatur de lapide de quo non verificatur divisum; ergo et caetera.</text:p>
      <text:p text:style-name="P248">Contra tertiam arguitur sic: Haec est bona divisio, etiam divisio rei, scilicet “Actionum, ali bona, lia mala, alia indifferens (si sit aliqua actio indifferens)” et tamen membra dividentia non sunt opposita; ergo illa conditio non requiritur. Maior est nota advertenti singulas conditiones bonae divisionis, et minor patet, nam coenare in die vetito ab Ecclesia est bonum respectu appetitus et malum respectu rationis et caetera.</text:p>
      <text:h text:style-name="Heading_20_3" text:outline-level="3">Ad primum argumentum nonnulli Nominalium opinantium quantitate non distingui a re quanta concedunt totum antecedens et negant consequentia<text:span text:style-name="T218">m</text:span></text:h>
      <text:p text:style-name="P249"><text:span text:style-name="T116">D</text:span><text:span text:style-name="T95">icentes sufficere ad bonam divisionem quod membra dividentia addant is sua connotatione aliquid supra connotationem divisi, sicut ly ‘quantitas discreta’ supponit pro aliquo, connotando quod habeat partes quae possint separari, cum ly ‘quantitas’ non connotet nisi habere partes.</text:span></text:p>
      <text:p text:style-name="P100"><text:soft-page-break/>Sed revera non esset Dialecticum concedere quod quantitas discreta sit species ad ly ‘quantitas’ et quod non sit absolute inferius. Igitur absolute negatur minor. Ubi notato quod ly ‘quantitas discreta’ non connotat habere partes quae possunt separari (ut illi imaginantur), sed habere partes separatas, ac proinde <text:s/>tantum sicut ly ‘quantitas’ (quod solum connotat habere partes) nihilominus ratione modificandi signi formaliter non supponit, nisi per rebus separatas (non enim concedere quod ego sim numerus, quamvis sim plura entia). Igitur non solum in significando est inferius, sed in supponendo, ad minus mediante copula te praesenti, praeterito et futuro, quamquam omnis quantitas possit esse discreta.</text:p>
      <text:p text:style-name="P100">Et proportionabiliter opinor esse, dicendum secundum Reales, videlicet, quod quantitas continua significat accidens unum, et quantitas discreta plura separata, et ly ‘quantitas’ utrumque.</text:p>
      <text:p text:style-name="P101">Ad secundum respondetur distinguendo maiorem, videlicet, quod illa sit bona divisio, quia vel ly ‘album’ capiatur substantive, ita quod valeat ‘ens album’ et sic negatur, ut argumentum probat; vel accipitur adiective, ita quod quodlibet membrum includat divisum, et sic conceditur maior et negatur minor, nam sensus divisionis est “Animalium, aliud animal album, aliud animal nigrum, aliud animal medium”, quae quidem membra non verificantur de lapide.</text:p>
      <text:p text:style-name="P102">Idem dicatur de hac “Animalium, aliud homo, aliud non homo”, valet enim secundum membrum sicut “aliud animal non-homo”.</text:p>
      <text:p text:style-name="P103">Fiunt etiam contra hanc conditionem minutiora quaedam argumenta, quae tamen ab aliquibus magni aestimantur: Primo ly ‘animal’ verificatur de illo copulato divisive sumpto “Petrus et Favellus”, et tamen nullum membrum dividentium praedicatur de illo; ergo non requiritur mutua convertibilitas inter divisum et membra dividentia.</text:p>
      <text:p text:style-name="P250"><text:span text:style-name="T95">Ad hoc concesso antecedente, negatur consequentia, sufficit enim quod disiunctum ex ambobus membris verificetur de illo copulato, /</text:span><text:span text:style-name="T118">7b</text:span><text:span text:style-name="T95">/ verum est enim dicere “Petrus et Favellus est rationale vel irrationale”.</text:span></text:p>
      <text:p text:style-name="P104">Sed replicatur: De eodem copulato complexive sumpto verificatur divisum in plurali, verum est enim dicere “Petrus et Favellus sunt rationale vel irrationale”; ergo non requiritur dicta convertibilitas.</text:p>
      <text:p text:style-name="P251"><text:span text:style-name="T95">Ad hoc respondetur: </text:span><text:span text:style-name="T117">C</text:span><text:span text:style-name="T95">oncesso antecedente, negando </text:span><text:span text:style-name="T117">consequentiam, nam divisum in </text:span><text:span text:style-name="T119">talibus divisionibus semper accipitur loco termini singularis numeri reducitur enim dicta divisio ad hanc propositione “Omne animal est rationale vel irrationale”. Quare divisio non debet converti cum diviso pluraliter sed singulariter sumpto.</text:span></text:p>
      <text:p text:style-name="P105">Si tamen divideretur animal singulariter et pluraliter, esset danda divisio sic “Animalium, aliud rationale, aliud non-rationale”, ut termini singuli divisionis accipiantur disiunctive singulariter et pluraliter, ne opus sit tot membra (ut fieri solet) multiplicare.</text:p>
      <text:p text:style-name="P105">Adduntur etiam reflexiva quaedam argumenta, quae sunt usque ad insolubilia expectanda.</text:p>
      <text:p text:style-name="P252"><text:span text:style-name="T95">Ad tertium principale, negatur quod sit divisio, nam cum bonum et malum dicantur hic respective (est enim bonum quod alicui convenit, et malum quod alicui disconvenit) non dividunt genus actionis nisi addatur respectu eiusdem. Ut haec est divisio “Actionum, alia bona respectu rationis, alia mala respectu eiusdem”, <text:s/>pariter “Actionum alia bona respectu appetitus, alia mala respectu eiusdem, </text:span><text:span text:style-name="T120">vel alia indifferens (si talis ponenda)”.</text:span></text:p>
      <text:h text:style-name="Heading_20_3" text:outline-level="3"><text:soft-page-break/>Ex secunda conditione, quae praecipua est in hac materia (et murum quod tam facile a Modernis negetur) sequuntur loci arguendi dialectici</text:h>
      <text:list text:style-name="L12">
        <text:list-item>
          <text:p text:style-name="P539"><text:span text:style-name="T121">Primus: </text:span><text:span text:style-name="T122">A</text:span><text:span text:style-name="T121"> convertibilibus, scilicet, a diviso ad divisionem et ediverso, affirmative et negative.</text:span></text:p>
        </text:list-item>
        <text:list-item>
          <text:p text:style-name="P539"><text:span text:style-name="T121">Secundus: </text:span><text:span text:style-name="T122">A</text:span><text:span text:style-name="T121"> toto diviso, cum negatione unius membri ad positionem alterius si divisio sit bimembris, vel cum negationem duorum ad positionem tertium si divisio sit trimembris et caetera.</text:span></text:p>
        </text:list-item>
        <text:list-item>
          <text:p text:style-name="P539"><text:span text:style-name="T122">Tertius: </text:span><text:span text:style-name="T123">Sequitur ex tertia conditione. A positione unius membri ad negationem alterius in his membris quae realiter opponuntur. Quod addiderim, quia non sequitur “Hoc est honestum; ergo non est delectabile”.</text:span></text:p>
        </text:list-item>
      </text:list>
      <text:list text:style-name="L13">
        <text:list-item>
          <text:p text:style-name="P540"><text:span text:style-name="T95">Exemplum primi: </text:span><text:span text:style-name="T124">B</text:span><text:span text:style-name="T95">ene sequitur “Homo est animal; ergo rationale vel irrationale” et ediverso, et utroque modo etiam sequitur negative.</text:span></text:p>
        </text:list-item>
        <text:list-item>
          <text:p text:style-name="P541"><text:span text:style-name="T95">Exemplum </text:span><text:span text:style-name="T124">secundi: “Hoc est animal et non est rationale; ergo est irrationale”. Pariter “Hoc est coloratum, et non est album nec nigrum; ergo est medium”.</text:span></text:p>
        </text:list-item>
        <text:list-item>
          <text:p text:style-name="P542"><text:span text:style-name="T124">I</text:span><text:span text:style-name="T95">tem tertio modo sequitur: “Hoc est rationale; ergo non est irrationale”. Item hoc est album vel nigrum; ergo non est medium”.</text:span></text:p>
        </text:list-item>
      </text:list>
      <text:p text:style-name="P106">Et si arguas contra priores duos modos arguendi “Scutum pro mediate album et pro mediante nigrum est coloratum; et tamen nec est album neque nigrum neque medium et caetera”.</text:p>
      <text:p text:style-name="P106">Item contra tertium “Scutum miraculose positum in duobus locis, in quorum alter sit album et in altero nigrum, est album”, et tamen falsum est dicere quod non est nigrum, ergo.</text:p>
      <text:p text:style-name="P253"><text:span text:style-name="T95">Ad primum: </text:span><text:span text:style-name="T126">C</text:span><text:span text:style-name="T95">onceditur quod tale scutum sit coloratum. </text:span><text:span text:style-name="T125">E</text:span><text:span text:style-name="T95">tiam quod in rigore neque est album, neque nigrum, neque medium. </text:span><text:span text:style-name="T125">S</text:span><text:span text:style-name="T95">ed est addendum pro his minutiis quartum membrum, </text:span><text:span text:style-name="T126">scilicet, aliud est pluribus coloribus coloratum.</text:span></text:p>
      <text:p text:style-name="P107">Ad secundum: Conceditur totum quod videlicet illa consequentia non tenet supernaturaliter. Fundatur enim tertia regula in hoc quod duo contraria non possunt verificari de eodem, cuius oppositum si admittatur totus casus argumenti, potest facere Deus qui est laudabilis in aeternum.</text:p>
      <text:h text:style-name="Heading_20_2" text:outline-level="2">Capit<text:span text:style-name="T254">is</text:span> terti<text:span text:style-name="T219">i</text:span>. Lectio <text:span text:style-name="T226">prima</text:span></text:h>
      <text:h text:style-name="Heading_20_3" text:outline-level="3">Argumentum est propositio in qua laterum ex altero denotatur inferri</text:h>
      <text:p text:style-name="P108">Ut “Si Petrus disputat Petrus loquitur”, “Si Petrus disputaret, Petrus esset doctus”. Ubi advertendum est inter hos terminos ‘medium’, ‘argumentum’ et ‘argumentatio’ sic interesse:</text:p>
      <text:p text:style-name="P108">Medium est quidquid adducitur ad probandam aliquam conclusionem, sive probet illam sive non, ut est antecedens cuiusvis consequentiae, seu bonae seu malae auctoritas et similia. </text:p>
      <text:p text:style-name="P108">At argumentum addit supra medium quod sit probativum conclusionis et ideo dicitur argumentum quasi arguens mentem, id est, convinces (ut inquit Boethius) a quod et a Petro Hispano definitur sic:</text:p>
      <text:p text:style-name="Quotations">Argumentum est ratio rei dubiae faciens fidem.</text:p>
      <text:p text:style-name="P109"><text:soft-page-break/>Sed argumentatio est complexum ex argumento, seu medio et conclusione, quasi in ipsa manifestetur vis argumenti, licet argumentum quandoque accipitur pro argumentatione. Et argumentatio alio nomine dicitur consequentia, quo infra tamquam usitatiori utemur.</text:p>
      <text:p text:style-name="P254"><text:span text:style-name="T127">In dicta definitione ly ‘propositio’ ponit loco generis. Omnis enim consequentia est propositio et non ediverso, otum residuum ponitur loco differentiae.</text:span><text:span text:style-name="T95"> </text:span><text:span text:style-name="T127">Dixerim tamen alterum ex altero, et non propositionem ex propositione, propter /8a/ </text:span><text:span text:style-name="T128">conditionalem, in qua non oportet antecedens et consequens esse propositiones, sed sufficiat esse complexa proportionalia.</text:span></text:p>
      <text:p text:style-name="P255"><text:span text:style-name="T128">C</text:span><text:span text:style-name="T95">omplexum proportionale est oratio quae non est propositio, sed propter suum modum significandi potest esse antecedens et consequens in consequentia, ut ly “Petrus disputaret”. Quare ly “Petrum disputare non est complexum proportionale.</text:span></text:p>
      <text:p text:style-name="P110">Intelligatur alterum ex altero, formaliter vel virtualiter. Nam si ly ‘a’ imponatur ad significandum sicut illa consequentia “Si Petrus disputat Petrus loquitur”, tunc non denotatur in ea sequi alterum ex altero formaliter, sed bene virtualiter, scilicet, in propositione mentali cui subordinatur. Nec tamen inde sequitur hanc orationem “Sol lucente dies est” esse consequentiam formaliter aut virtualiter, non enim video quin in <text:span text:style-name="T220">mente sicut in voce possit esse talis orario de ablativo absoluto, quae quidem non erit ibi formaliter consequentia, ac proinde neque erit in voce virtualiter.</text:span></text:p>
      <text:p text:style-name="P111">Verum est tamen quod resolvitur per consequentiam, ut suo loco dicetur. Quare dicendum est quod aequivalenter est consequentia, non tamen virtualiter, nam differunt virtualiter et aequaliter, quod illud si subordinari consequentiae formali, hoc tamen inferre consequentiam, et ab ipsa inferri.</text:p>
      <text:p text:style-name="P111">Quod si contra arguas: Non oportet universaliter consequens esse alterum ab antecedente, nam potest fieri in duobus locis, negatur assumptum ad sensum definitionis. Est enim sensus quod consequens aut est alterum, aut alterum officium exercens quam antecedens.</text:p>
      <text:p text:style-name="P111">Dixerim in qua denotatur et non in qua sequitur, ut uno nomine complecterer, et consequentiam bonam, in qua consequens infertur ex antecedens, ut “Si Petrus disputat, Petrus loquitur”. Et malam, in qua non sequitur sed denotatur sequi, ut “Si Petrus disputaret, Petrus esset doctus”.</text:p>
      <text:p text:style-name="P111">Oratio illa ex qua alia denotatur sequi dicitur antecedens, ut ly “Petrus disputaret”. Illa autem quae denotatur ex alia sequi dicitur consequens, ut ly “Petrus est doctus”.</text:p>
      <text:p text:style-name="P112">Sed coniunctio qua mediante denotatur illatio dicitur coniunctio illativa aut nota illationis, ut ly ‘si’.</text:p>
      <text:p text:style-name="P112">Aliter solet definiri consequentia, quod scilicet sit aggregatum ex antecedente et consequente et nota illationis, sed illa est materialis, quae non explicat formam consequentiae, scilicet illationem, et quae multis argutiis ansam praebet.</text:p>
      <text:h text:style-name="Heading_20_3" text:outline-level="3">Rursus notandum quod iuxta numerum notarum illationis, triplex est consequentia</text:h>
      <text:list text:style-name="L14">
        <text:list-item>
          <text:p text:style-name="P512">Scilicet conditionalis: in qua illatio denotatur fieri mediante ly ‘si’, ut “Si Petrus disputat, Petrus loquitur”.</text:p>
        </text:list-item>
        <text:list-item>
          <text:p text:style-name="P512">Rationalis: in qua illatio denotatur fieri mediante ly ‘ergo’, ut “Petrus est rationalis; ergo Petrus est mortalis”.</text:p>
        </text:list-item>
        <text:list-item>
          <text:p text:style-name="P512">Causalis: in qua illatio denotatur fieri mediante ly ‘quia’, ut “Quia homo est animal rationale, Homo est risibilis”.</text:p>
        </text:list-item>
      </text:list>
      <text:list text:style-name="L15">
        <text:list-item>
          <text:p text:style-name="P513"><text:soft-page-break/>Et ad veritatem conditionalis, <text:span text:style-name="T221">sufficit consequentiam esse bonam.</text:span></text:p>
        </text:list-item>
        <text:list-item>
          <text:p text:style-name="P514">Ad veritatem rationalis requiritur, praeter hoc, quod antecedens et consequens sint vera.</text:p>
        </text:list-item>
        <text:list-item>
          <text:p text:style-name="P514">Ad veritatem causalis, etiam ultra hoc, quod antecedens sit causa consequentis, ut ipsis exemplis constat.</text:p>
        </text:list-item>
      </text:list>
      <text:p text:style-name="P113">Quare consequentia licet sit propositio, non tamen dicitur vera vel falsa, sed consequentia bona vel mala, et propositio vera vel falsa.</text:p>
      <text:p text:style-name="P113">Scito etiam quod in conditionali et causali, illa oratio dicitur antecedens quae ponitur immediate post notam illationis, alia vero, sive sequitur sive praecedat, <text:span text:style-name="T222">antecedens</text:span>. Sed in rationali, oratio quae praecedit notam illationis dicitur <text:span text:style-name="T222">antecedes</text:span>, quae vero sequitur dicitur <text:span text:style-name="T222">consequens</text:span>.</text:p>
      <text:p text:style-name="P113">Exemplum primi: sive dicas “Si Petrus disputat, Petrus loquitur”, sive “Petrus loquitur, Si Petrus disputat”, item <text:s/>sive dicas “Quia Petrus disputat, Petrus loquitur”, sive “Petrus loquitur, quia Petrus disputat”, utrobique ly “Petrus disputat” est antecedens, et ly “Petrus loquitur” consequens.</text:p>
      <text:p text:style-name="P256"><text:span text:style-name="T129">S</text:span><text:span text:style-name="T95">ed si dicas “Petrus loquitur; ergo Petrus disputat”, ly “Petrus loquitur” est antecedens, et ly “Petrus disputat” consequens.</text:span></text:p>
      <text:p text:style-name="P114">Item, consequentiarum, alia est categorica quae dicitur enthymematica, id est, cuius antecedens est categoricum ut patet exemplis superioribus, alia est hypothetica, id est, cuius antecedens est hypotheticum, ut:</text:p>
      <text:p text:style-name="P457">Omnis homo disputat</text:p>
      <text:p text:style-name="P457">Petrus est homo</text:p>
      <text:p text:style-name="P457">ergo</text:p>
      <text:p text:style-name="P457">Petrus disputat.</text:p>
      <text:p text:style-name="P457"/>
      <text:p text:style-name="P457">Petrus disputat et Paulus disputat</text:p>
      <text:p text:style-name="P457">ergo</text:p>
      <text:p text:style-name="P457">Uterque homo disputat.</text:p>
      <text:p text:style-name="P457"/>
      <text:p text:style-name="P114">Ubi prima propositio dicitur maior et secunda minor.</text:p>
      <text:p text:style-name="P257"><text:span text:style-name="T95">Itidem, </text:span><text:span text:style-name="T130">quando sub hoc tenore arguis “Si hoc esse verum, Sequeretur hoc. Consequens est falsum; ergo Et antecedens”, tota illa prima conditionalis dicitur maior, et illa “Consequens est falsum”, dicitur minor.</text:span></text:p>
      <text:p text:style-name="P258"><text:span text:style-name="T130">H</text:span><text:span text:style-name="T95">aec tamen divisio exactius assignabitur super </text:span><text:span text:style-name="T222">Primum Tractatum</text:span><text:span text:style-name="T95"> Petrus Hispanus, scilicet, in enthymema, syllogismum, inductionem et exemplum.</text:span></text:p>
      <text:p text:style-name="P115">Et notabunt Terministae modum respondendi. Proposita quanvis consequentia, tota semel resumatur maior, et si fuerit neganda, negetur ante resumptionem minoris, et ibi cessabit responsio.</text:p>
      <text:p text:style-name="P259"><text:span text:style-name="T95">Si vero maior fuerit vera aut distinguenda concedatur aut distinguatur, aut si indifferens argumento dicatur “Transeat” et resumatur minor, et ibi fiat (si faciendum est) sicut diximus de maiori. Et si negetur, </text:span><text:span text:style-name="T131">ibi cessabit responsio ante resumptionem consequentis. Quod /8b/ si minor fuerit concedenda resumatur antecedens, numquam tamen concedatur vel negetur, sed si est distinguendum distinguatur, et secundum hunc vel illum sensum consequentis, concedatur vel negetur consequentia.</text:span></text:p>
      <text:p text:style-name="P260"><text:soft-page-break/><text:span text:style-name="T132">Itaque </text:span><text:span text:style-name="T133">antecedens potest concedi, distingui vel negari. Consequens nec concedi nec negari, sed distingui. Consequentia vero numquam distinguitur, sed conceditur ut negatur. Sed arguens non permittat respondenti, cum dicit “Concedo” aut “Nego” amplus loqui, nisi forsan voluerit exigere rationem dati responsi. Cum tamen respondens distinxerit, licebit ei membra distinctionis breviter exponere.</text:span></text:p>
      <text:p text:style-name="P121">Iterum, duplex est consequentia, scilicet bona, id est, cuius antecedens non potest esse verum sine consequente, ut “Si Petrus disputat, Petrus loquitur”, et mala, id est, cuius antecedens posset esse verum sine consequente. Quae est duplex, quaedam apparens quae dicitur consequentia rhetorica ut “Si Petrus assidue disputaret; Petrus esse doctus”. Alia non apparens quae ad nullam scientiam est utilis, ut “Si Petrus disputat; Petrus sedet”.</text:p>
      <text:p text:style-name="P122">Non placet multis consequentiam malam, ad minus consequentiam non apparentem vocare consequentiam. At cum huiusmodi disputatio de nomine sit, conveniendum est cum communi modo loquendi, et clarum est quod communiter ad malam consequentiam respondetur negando consequentiam, ubi non negatur quod sit consequentia sed quod sit consequentia bona.</text:p>
      <text:p text:style-name="P123">Item etiam, cum coniunctio illativa in mala consequentia significative teneatur, videtur constituere consequentiam.</text:p>
      <text:p text:style-name="P123">Vocatur igitur tam bonas quam malas consequentias.</text:p>
      <text:h text:style-name="Heading_20_4" text:outline-level="4"><text:span text:style-name="T135">R</text:span><text:span text:style-name="T95">egulae bonae consequentiae</text:span></text:h>
      <text:p text:style-name="P261"><text:span text:style-name="T135">Notandae sunt regulae consequentiarum:</text:span><text:span text:style-name="T134"> </text:span><text:span text:style-name="T133"><text:s text:c="2"/></text:span><text:span text:style-name="T131"><text:s/></text:span><text:span text:style-name="T95"><text:s/></text:span></text:p>
      <text:list text:style-name="L16">
        <text:list-item>
          <text:p text:style-name="P515">Prima: Si consequentia <text:span text:style-name="T224">est bona et antecedens est verum, consequens est verum, ex qua sequitur.</text:span></text:p>
        </text:list-item>
        <text:list-item>
          <text:p text:style-name="P516">Secunda: Si consequentia est bona et antecedens est falsum, antecedens est falsum. Unde cum antecedens habet duas partes. Si consequens est falsum et altera pars antecedentis est vera, altera est falsa.</text:p>
        </text:list-item>
        <text:list-item>
          <text:p text:style-name="P516">Tertia: Si consequentia est bona et antecedens possibile, consequens est possibile, ex qua etiam sequitur.</text:p>
        </text:list-item>
        <text:list-item>
          <text:p text:style-name="P516">Quarta: Quod is consequens est impossibile, antecedens est impossibile.</text:p>
        </text:list-item>
        <text:list-item>
          <text:p text:style-name="P516">Quinta: Si una consequentia est bona et antecedens est necessarium, consequens est necessarium, ex qua sequitur.</text:p>
        </text:list-item>
        <text:list-item>
          <text:p text:style-name="P516">Sexta: Quod si consequens est contingens, antecedens non est necessarium.</text:p>
        </text:list-item>
      </text:list>
      <text:p text:style-name="P116">Quae omnes regulae demonstrabuntur in loco iam citato, ubi haec materia late tractabitur.</text:p>
      <text:h text:style-name="P470" text:outline-level="2"><text:span text:style-name="T226">Capit</text:span><text:span text:style-name="T229">is</text:span><text:span text:style-name="T226"> terti</text:span><text:span text:style-name="T227">i</text:span><text:span text:style-name="T226">. Lectio </text:span><text:span text:style-name="T228">secunda</text:span></text:h>
      <text:h text:style-name="Heading_20_3" text:outline-level="3">Sed contra definitionem consequentiae arguitur</text:h>
      <text:p text:style-name="P117">Haec propositio “In hac propositione denotatur alterum ex altero”, sequi (pronomine demonstrante eandem ipsam propositionem) est propositio in qua denotatur alterum ex altero sequi, et tamen non est consequentia; ergo definitio non est bona.</text:p>
      <text:p text:style-name="P117"><text:soft-page-break/>Minor est nota et maior etiam probatur. In ea significatur quod in ipsa denotatur alterum sequi, et caetera; ergo in ea denotatur alterum sequi et caetera, liquet consequentia, quia idem est denotatur et significatur.</text:p>
      <text:p text:style-name="P117">Idem argumentum potest fieri de hac “Ex hac propositione denotatur alterum sequi”, quae videtur esse propositio ex qua laterum et caetera, et tamen non est antecedens.</text:p>
      <text:p text:style-name="P117">Ad hoc argumentum negatur maior, scilicet, quod in dicta propositione denotatur alterum ex altero sequitur, et negatur illa consequentia “In hac propositione significatur alterum sequi” sed sequitur; ergo in ea denotatur quod denotetur alterum sequi et caetera, et propterea ipsa est falsa, quia significat quod in ea denotetur alterum sequi et caetera. Tamen in illa non denotatur nisi quod denotetur alterum sequit et caetera. Et per hoc patet responsio ad secundum de illa “Ex hac propositione denotatur aliud sequit”, quae videlicet bene significat quod ex illa denotatur et caetera, tamen non denotatur.</text:p>
      <text:p text:style-name="P118">Sed contra, haec propositio “Alterum sequitur ex altero” est propositio in qua denotatur alterum sequi ex altero, et tamen non est consequentia; ergo definitio est mala.</text:p>
      <text:p text:style-name="P118">Minor est nota et probatur maior. In <text:span text:style-name="T225">ipsa significatur quod alterum sequitur ex altero; ergo in ipsa denotatur quod alterum sequitur ex altero. Patet consequentia quia idem est significare et denotare.</text:span> <text:s/></text:p>
      <text:h text:style-name="Heading_20_3" text:outline-level="3">Pro solutione argumenti est notatum</text:h>
      <text:p text:style-name="P124">Quo ly ‘denotatur’ in definitionibus consequentiae, antecedentis et caetera, non dicitur actum signatum, sed actum exercitum, id est, dicit quod in ea significetur alterum sequi ex altero, sed quod in ipsa hoc exerceatur vel apparetur exerceri.</text:p>
      <text:p text:style-name="P120">Clarum enim est quod haec propositio “Si Petrus disputat; Petrus est doctus” non denotat in actu signato, id est, non significat quod consequens sequitur ex antecedente. Nam haec significatio est significatio propositionis categoricae. Nec illa nota illationis illud denotat, propter eandem rationem (significaret enim tunc) sicut haec categorica “Petrus est doctus” sequitur ex hoc quod Petrus disputat. Nec illa propositio “Petrus disputat” denotat, id est significat quod ex illa aliud sequitur, sed significat quod Petrus disputat.</text:p>
      <text:p text:style-name="P119">Tamen in tota propositione denotatur in actu exercito, quod consequens sequitur ex antecedente, id est, in tali /9a/ <text:span text:style-name="T232">propositione ponitur aliqua coniuncto illativa iuxta formam propositionis in qua unum sequitur ex alio, id enim est denotari sequi in actu exercito vel quod sequatur vel quod sit ibi forma sequelae.</text:span></text:p>
      <text:p text:style-name="P262"><text:span text:style-name="T136">Ex quod seq</text:span><text:span text:style-name="T137">uitur quod notam illationis significare illative non est significare quod unum sequatur ex alio, sed sic syncategorematice significare, quod mediante illa denotetur talis illatio in actu exercito, sicut ly ‘omnis’ significare distributive in hac “Omnis homo est animal” non est significare distributionem sed significare taliter syncategorematice, quod mediante illo distribuatur subiectum in actu exercito, quod (ut infra pa</text:span><text:span text:style-name="T139">tebit capitulo octavo) non tamen proprie dicitur significare quam exercere officium.</text:span></text:p>
      <text:p text:style-name="P126">Hanc distinctionem maxime notato, utpote ex cuius inadvertentia mille argutiae, et in hac et in pluribus aliis materiis pullulant, quae cum multa ingenia male vexaverint, adhuc permanent insolutae.</text:p>
      <text:p text:style-name="P126"><text:soft-page-break/>Igitur ad argumentum distinguitur maior, scilicet quod in dicta propositione denotetur et caetera, vel quod denotetur in actu signato id quod significetur in ea quod alterum sequatur ex altero, et sic conceditur. Conceditur etiam quod non sit consequentia nec propterea sequitur definitionem consequentiae non esse bonam, nam ly ‘denotatur’ in tali definitione dicit actum exercitum, vel quod in tali propositione denotetur alterum sequi et caetera in actu exercito, et sic negatur quia in illa nec sequitur unum ex altero, nec est forma illationis.</text:p>
      <text:p text:style-name="P126">Simile est de hac propositione “In hac propositione negatur praedicatum de subiecto”, in qua denotatur praedicatum negari de subiecto in actu signato, non tamen in actu exercito, quia non habet formam negative, sed in hac “Petrus non disputat” denotatur in actu exercito, et non in actu signato.</text:p>
      <text:p text:style-name="P126">Ex hac propositione sic intellecta sequitur certam distantiam requiri inter antecedens et consequens ut constituant consequentiam.</text:p>
      <text:p text:style-name="P126">Videtur enim ridiculum quod antecedens scriptum Salmantice et consequens Parisius et nota illationis Segobiae efficiant consequentiam, cum in ea non videatur denotari aliqua illatio.</text:p>
      <text:h text:style-name="P479" text:outline-level="3">Addunt nonnulli quartam speciem modi scienti, <text:span text:style-name="T233">i</text:span><text:span text:style-name="T140">d est, manifestan</text:span><text:span text:style-name="T141">di aliquod ignotum</text:span></text:h>
      <text:p text:style-name="P263"><text:span text:style-name="T141">Quae dicitur exempli positio, ut </text:span><text:span text:style-name="T142">si dicas “Consequentia est propositio et caetera”, ut “Si Petrus disputat; Petrus loquitur”, totum illud ut “Si Petrus disputat et caetera” est exempli positio, ac proinde modus sciendi, cum per ipsam orationem manifestentur aliquo modo definitio consequentiae. Sed certe talis modus sciendi reducitur ad genus argumentationis, ad minus secundum quod argumentatio est species modi sciendi accipitur enim ibi (ut ipsi fatentur) pro quocumque medio productivo assensus. Nam is acciperetur in suo rigore pro consequentia, cum propositio apprehensiva propositionis per se notae, auctoritas, et multa alia quae producunt assensum, sint modi sciendi, quae tamen non includerentur sub illis quattuor speciebus nisi argumentatio acciperetur sic large. </text:span><text:span text:style-name="T143">Hae tamen (quas vocant largas acceptiones) parum conducunt ad disputationem.</text:span></text:p>
      <text:p text:style-name="P127">Sufficiant ergo dixisse quid sit definitio, quid divisio, quid argumentatio secundum proprias nominum significantias. Si autem sint alii sciendi modi parum refert.</text:p>
      <text:h text:style-name="Heading_20_2" text:outline-level="2"><text:span text:style-name="T144">Capitis quarti. Lectio prima</text:span><text:span text:style-name="T139"> <text:s/></text:span><text:span text:style-name="T138"><text:s/></text:span></text:h>
      <text:h text:style-name="Heading_20_3" text:outline-level="3">Post haec, quia significatio est forma per quam voces aut scripturae dicuntur termini</text:h>
      <text:p text:style-name="P125">Sub cuius proinde consideratione, dialecticus definiti, dividit ac denique disputat de terminis, opere praetium est ante tractatum terminorum perfunctorie praelibare quid nomine significare intelligatur et quot modis contingat. </text:p>
      <text:h text:style-name="Heading_20_3" text:outline-level="3">Significare, generaliter dictum, est potentiae cognitivae aliud a se repraesentare. <text:span text:style-name="T145">Et signum est res aliud a se potentiae cognitivae repraesentans</text:span></text:h>
      <text:p text:style-name="P264"><text:span text:style-name="T145">S</text:span><text:span text:style-name="T95">ignificare enim et signum esse idem sunt, ut haec scriptura ‘homo’ dicitur signum hominum, et homines repraesentare, et vestigium pedis pulveri impressum dicitur signum animalis, quia ipsum repraesentat.</text:span></text:p>
      <text:p text:style-name="P128"><text:soft-page-break/>Ly ‘repraesentare’ ponitur tanquam genus definiti, et quia clarius significatque definitum, et fortasse quod etiam sit terminus magis communis.</text:p>
      <text:p text:style-name="P129">Est enim repraesentare quasi rem praesentem facere, ut haec scriptura ‘homo’ eo dicitur homines repraesentare, quia videntibus eam facit homines quasi praesentes. Non quod haec sit eius definitio quid nominis, nam multa sunt quae faciunt rem aliquam praesentem quae non dicuntur repraesentare (ut infra videbitur), sed est quaedam nominis etymologia per quam eius naturam rimari possumus.</text:p>
      <text:p text:style-name="P129">Potentiae cognitivae, quo uno nomine intelleximus potentiam intellectivam /9b/ et sensitivam etiam brutorum, nam cuicumque tali res aliqua repraesentat dicitur signum et significare.</text:p>
      <text:p text:style-name="P129">Aliud a se, quia et si quaecumque res obiecta visui sese tali potentiae repraesentet, non tamen exinde dicitur signum sui aut significare se, ut iamiam manifestabitur.</text:p>
      <text:p text:style-name="P129">Generaliter dictum, non (ut dicunt) quod illud sit improprie aut large significare, sed ut includamus omnes modos quibus doctores proprie utuntur nomine significare. Accipitur enim aliter ut particulariter attribuitur vocibus et scripturis, ut infra videbitur.</text:p>
      <text:h text:style-name="Heading_20_3" text:outline-level="3">Significare (sic in universum accepto nomine) dupliciter contingit, scilicet, formaliter et instrumentaliter</text:h>
      <text:p text:style-name="P129">Ubi no<text:span text:style-name="T234">tato ad hoc quod quis possit cognoscere rem aliquam quattuor causas concurrere, scilicet, efficientem, obiectivam, formalem et instrumentalem.</text:span></text:p>
      <text:p text:style-name="P130">Verbi gratia, cum ego video imaginem imperatoris, imago ipsa est causa obiectiva quae movet visum, visus dicitur causa efficiens, et visio ab utroque producta, dicitur causa formalis qua imaginem video. Sed respectu recordationis, quam ego formo imperatoris, talis imago dicitur instrumentum. Unde nonnulli existimantes idem esse repraesentare quod esse notitiam, aut eam efficere.</text:p>
      <text:p text:style-name="P130">Quattuor modis (dicunt) contigit repraesentare seu significare. At revera producere notitiam in genere causae efficientis nec dicitur significare nec repraesentare, ut ex ipsis nominibus constant. Potentiam enim producens notitiam imperatoris aut deus etiam cum ipsa generaliter concurrens, non dicuntur exinde imperatorem significare, cum non concurrant tamquam eius signa ad productionem dictae notitiae. <text:span text:style-name="T235">Sed nec dicuntur ipsum repraesentare cum potentia non faciat ipsum imperatorem sibi praesentem (quod sonat nomen repraesentare), sed notitia facit eum praesentem formaliter et imago instrumentaliter.</text:span></text:p>
      <text:p text:style-name="P131">Item etiam nec concurrere obiective ad producendam notitiam dicitur proprie significare. Ubi advertito quod illa res dicitur obiective producere notitiam, quae oblatae potentiae, movet em ad formandam notitiam suis ipsius, ut color respectu visionis suis ipsius. <text:span text:style-name="T236">Notitiam inquam suis ipsius sive adaequata, ut cum viso Petro prope te formares notitiam adaequatam illius aut inadaequata, ut cum ipso a longe viso formares notitiam ominum entium.</text:span></text:p>
      <text:p text:style-name="P132">Et est triplex obiectum, scilicet:</text:p>
      <text:list text:style-name="L17">
        <text:list-item>
          <text:p text:style-name="P543"><text:span text:style-name="T150">M</text:span><text:span text:style-name="T146">otivum tantum, quod videlicet </text:span><text:span text:style-name="T147">movet potentiam ad formandum notitiam non sui, sed alius repraesentativam.</text:span></text:p>
        </text:list-item>
        <text:list-item>
          <text:p text:style-name="P517">Et terminativum tantum, quod est res cognita per notitiam cuius non fuit causa.</text:p>
        </text:list-item>
        <text:list-item>
          <text:p text:style-name="P544"><text:soft-page-break/><text:span text:style-name="T147">Et </text:span><text:span text:style-name="T149">motivum et terminativum simul, quod videlicet movet naturaliter potentiam ad formandum notitiam suis ipsius </text:span><text:span text:style-name="T151">repraesentativam. Verbi gratia, visa imagine imperatoris formamus duas notitias, scilicet, ipsiusmet imaginis et imperatoris, et respectu primae talis imago dicitur obiectum motivum tantum, sed imperator respectu eiusdem secundae notitiae dicitur obiectum terminativum tantum.</text:span></text:p>
        </text:list-item>
      </text:list>
      <text:p text:style-name="P133">Et solus modus concurrendi tamquam obiectum motivum et terminum est repraesentare obiective. Nam obiectum motivum tantum potius est instrumentum, et terminativum tantum non dicitur repraesentare sed repraesentari.</text:p>
      <text:p text:style-name="P265"><text:span text:style-name="T152">Dicunt ergo </text:span><text:span text:style-name="T153">isti quod efficere cognitionem in ratione obiecti, dicuntur significare, et hoc postea vocant significare naturaliter communiter, quod certe videtur nomini/significare/contravenire. Nam res quae obiecta potentiae efficit suis ipsius notiam non id facit tamquam signum, et ideo neque dicitur significare.</text:span></text:p>
      <text:p text:style-name="P266"><text:span text:style-name="T153">Satis enim improprie et abusive dicitur res signum sui ipsius. Fortasse non tam improprie diceretur repraesentare se obiective, et propterea diximus quod significare sit aliud a se repraesentare, quod res aliquo modo possit dici repraesentare se, non tamen significare se. </text:span><text:span text:style-name="T154">Per ly ‘aliud a se’ intelligito vel ‘alia a se’ vel ‘aliter a se’ ut includantur termini significantes aliquid, et significantes aliqua, et significantes aliqualiter.</text:span></text:p>
      <text:p text:style-name="P266"><text:span text:style-name="T154">Neque digne sunt huiusmodi minutiae quibus definitiones onerentur, vel maxime cum sub uno nomine possit omnes doctrinaliter comprehendi. Quae quidem definitio elicitur cum ex Augustino, secundo </text:span><text:span text:style-name="T223">De Doctrina Christina,</text:span><text:span text:style-name="T154"> id solum appellante signum quod praeter speciem quam ingerit sensibus aliud a se facit in cognitionem venire, tum etiam ex universali usu, omnium loquentium de signis et significare. Neque est fingendum praeter talem usum quod significare se sit significare ad minus improprie, ne scientia extra proprios limites distendatur. Eo enim quod est improprium perdit nomen huius quod est significare.</text:span></text:p>
      <text:p text:style-name="P134">Igitur significare dupliciter /10a/ contingit, scilicet, formaliter et instrumentaliter:</text:p>
      <text:list text:style-name="L18">
        <text:list-item>
          <text:p text:style-name="P518">Significare formaliter est esse potentiae formalem notitiam, ut visio qua videmus colores et conceptus quod intelligimus deum. Nomine conceptus conprehendimus etiam actum.</text:p>
        </text:list-item>
        <text:list-item>
          <text:p text:style-name="P545"><text:span text:style-name="T154">Significare instrumentaliter dicitur res, quae praeexistente sui cognitione, aliud a se repraesentat. Ut haec scriptura ‘homo’ significans homines. </text:span><text:span text:style-name="T152"><text:s/></text:span><text:span text:style-name="T148"><text:s/></text:span></text:p>
        </text:list-item>
      </text:list>
      <text:p text:style-name="P97"><text:span text:style-name="T237">Unde ut res quaepiam aliam instrumentaliter repraesentet duae requiruntur notitiae, scilicet, notitia ipsius instrumenti, et notitia habitudinis quam habet ad significantum. Verbi gratia, ut </text:span><text:span text:style-name="T238">haec scriptura ‘homo’ repraesentet mihi homines praerequiritur notitia ipsius scripturae, quare caeco nihil repraesentare potest.</text:span></text:p>
      <text:p text:style-name="P234">Requiritur etiam ut sciam eius impositionem, quare Graeco non repraesentabit.</text:p>
      <text:p text:style-name="P234">Et tunc, demum, his duabus cognitionibus praeviis, illa scriptura faciet me cognoscere homines.</text:p>
      <text:p text:style-name="P234">Secunda tamen notitia, scilicet, impositionis non semper requiritur actualis, sed sufficit quod sciverim eam, cuius non sim habitualiter oblitus.</text:p>
      <text:p text:style-name="P234">Dixerim in definitione prae<text:span text:style-name="T239">ex</text:span>istente sui cognitione, et non mediante sui cognitione. Nam ly ‘homo’ (ut videbitur capitulo sexto, lectio secunda) licet significet homines prae<text:span text:style-name="T239">e</text:span>xistente sui cognitione, non tamen nisi mediante notitia omnium hominum.</text:p>
      <text:p text:style-name="P235"><text:soft-page-break/>Item etiam multiplex est genus instrumentorum. Quaedam enim sunt quae suapte nam repraesentant, ut gemitus infirmorum. Alia sunt instrumenta quae ex consuetudine significant, ut canis saepe visus praecedere dominum suum repraesentet ipsum. Alia sunt quae significant ex institutione, ut voces et scripturae.</text:p>
      <text:p text:style-name="P235">Igitur, facere cognoscere contingit quadrupliciter, scilicet effective, objective, formaliter et instrumentaliter. Sed significare solummodo dupliciter, ut puta formaliter et instrumentaliter. Ex quod sequitur quod magister etsi proponat exponatque obiecta cognoscibilia, quasi res praesentes quodam modo faciens, non tamen repraesentat, quia neque obiective, neque formaliter, neque instrumentaliter.</text:p>
      <text:h text:style-name="Heading_20_3" text:outline-level="3">Aliter solet etiam distingui significare, scilicet, significare naturaliter <text:span text:style-name="T240">ex consuetudine ad placitum</text:span></text:h>
      <text:p text:style-name="P236"><office:annotation office:name="__Annotation__10668_2842712597" loext:resolved="false"><dc:creator>Unknown Author</dc:creator><dc:date>2025-07-28T23:02:52.035751458</dc:date><text:p text:style-name="P593"><text:span text:style-name="T454">Significare naturaliter est significare ex ipsa natura rei, id est, quamvis impositione aut consuetudine semota. Vel (ut inquit auctor Summularum) idem est apud omnes repraesentare.</text:span></text:p></office:annotation><text:span text:style-name="T241">Significare naturaliter est significare ex ipsa natura rei, id est, quamvis impositione aut consuetudine semota, </text:span><text:span text:style-name="T242">v</text:span><text:span text:style-name="T241">el (ut inquit auctor Summularum) idem est apud omnes repraesentare.</text:span><office:annotation-end office:name="__Annotation__10668_2842712597"/></text:p>
      <text:p text:style-name="P237">Quod adhuc accidit dupliciter, naturaliter proprie, et tanquam instrumentum naturale.</text:p>
      <text:list text:style-name="L19">
        <text:list-item>
          <text:p text:style-name="P519"><office:annotation office:name="__Annotation__10685_2842712597" loext:resolved="false"><dc:creator>Unknown Author</dc:creator><dc:date>2025-07-28T23:24:32.126641160</dc:date><text:p text:style-name="P594"><text:span text:style-name="T454">Significare naturaliter proprie: est esse potentiae formalem notitiam, vel est significare se ipso et non mediante alio, quod idem est, ut cunctae notitiae repraesentant, quod supra appellavimus significare formaliter. Et dicitur notitia significare naturaliter proprie et formaliter, quia proprie et naturalis eius forma est significare.</text:span></text:p><text:p text:style-name="P594"><text:span text:style-name="T454"/></text:p><text:p text:style-name="P594"><text:span text:style-name="T454">Significare tamquam instrumentum naturale: est, praeexistente sui notitia, alius notitiam naturaliter efficere, ut fumus significat ignem, vestigium animal, et geminus infirmitatem. Et hoc solet dici significare ex instinctu naturae.</text:span></text:p></office:annotation><text:span text:style-name="T243">Significare naturaliter proprie est esse potentiae formalem notitiam, vel est significare se ipso et non mediante alio, quod idem est, ut cunctae notitiae repraesentant, quod supra appellavimus significare formaliter. Et dicitur notitia significare naturaliter proprie et formaliter, quia proprie et naturalis eius forma est significare.</text:span></text:p>
        </text:list-item>
        <text:list-item>
          <text:p text:style-name="P520">Significare tamquam instrumentum naturale est, praeexistente sui notitia, alius notitiam naturaliter efficere, ut fumus significat ignem, vestigium animal, et geminus infirmitatem. <text:span text:style-name="T244">Et hoc solet dici significare ex instinctu naturae.</text:span><office:annotation-end office:name="__Annotation__10685_2842712597"/></text:p>
        </text:list-item>
      </text:list>
      <text:p text:style-name="P135">At revera differt inter fumum et geminum, nam fumus non est a natura institutus ut repraesentet ignem, sed quia est effectus ignis repraesentat ipsum. Sed gemitus etsi repraesentet infirmitatem tamquam effectus suam causam, peculiari tamen modo, quia adhoc sollum institutus est ut sit signum infirmitatis, quaesi invito infirmo, expostulet medicinam. <text:span text:style-name="T245">Quare significare ex instinctu naturae est praeexistente cognitione sui, aliud a se ex naturali quadam destinatione repraesentare. Et hoc sonat ex instinctu naturae, id est, instigante natura.</text:span></text:p>
      <text:p text:style-name="P136">Dicitur ex naturali destinatione, id est ordinatione, ad differentiam fumi, vestigii et caetera.</text:p>
      <text:p text:style-name="P136">Dicitur praeexistente sui cognitione ad differentiam notitiae quae etiam, ex naturali destinatione, significat sed non praeexistente sui cognitione.</text:p>
      <text:p text:style-name="P137">Et modus significandi horum naturalium instrumentorum est efficere notitiam memorativam rerum praecognitarum. Nam videns fumum, nisi alias vidisset ignem, non intelligeret ipsum.</text:p>
      <text:p text:style-name="P137">Solet addi alia species huius quod est significare naturaliter, scilicet, significare naturaliter communiter. Et dicitur significare naturaliter communiter immutare potentia in ratione obiecti ad efficiendum notitiam suis ipsius, quod supra appellatum est repraesentare obiective. Et hoc modo (dicunt) quamlibet rem mundi significare se ipsam. Veruntamen (ut supra probatum est) improprie dicitur hoc significare, licet fortasse possit appellari repraesentare naturaliter communiter.</text:p>
      <text:h text:style-name="Heading_20_3" text:outline-level="3"><text:soft-page-break/>Significare ex consuetudine est significare ex usu quoda<text:span text:style-name="T246">m, seclusa quavis impositione</text:span></text:h>
      <text:p text:style-name="P138"><text:span text:style-name="T246">Ut canis saepe visus praecedere dominum suum significat ipsum dominum. </text:span><text:span text:style-name="T247">Aliqui vocant /10b/ </text:span><text:span text:style-name="T248">hoc significare ad placitum ex impositione consuetudinaria. Scilicet certe non non video quomodo sit significare ad placitum, si proprie accipiatur, cum nullo modo dependeat ex aliqua impositione voluntaria, sed quamcumque tali seclusa, canis ipse repraesentat dominum. Et cum neque signifi</text:span><text:span text:style-name="T249">cet eum a natura, placuit addere hoc tertium membrum quod nec includatur sub significare naturaliter, nec sub significare ad placitum.</text:span></text:p>
      <text:h text:style-name="Heading_20_3" text:outline-level="3">Significare ad placitum est significare ex impositione</text:h>
      <text:p text:style-name="P141">Ut ly ‘homo’ significat homines. Unde non dicitur terminus significare ad placitum, quia ex mera voluntate nulla ratione alliciente, fuerit impositus, cum impositores nominum ratione sumpta ex naturis rerum imponant nomina ipsis naturis congruentia (quod Adam ostenditur fecisse per illud omne quod vocavit Adam, ipsum est nomen eius, id est, omne nomen quod Adam imposuit rebus ipsum est quod erarum naturae maxime congruit).</text:p>
      <text:p text:style-name="P141">Dicitur ergo aliquis terminus significare ad placitum quia nec a natura, nec ex consuetudine sed ex institione significat. Et talis institutio ad significandum potest esse duplex, scilicet, autentica et non autentica:</text:p>
      <text:list text:style-name="L20">
        <text:list-item>
          <text:p text:style-name="P521">Autentica est quae fit a re publica vel ab habente autoritatem eius, et virtute talis impositionis simpliciter dicitur significare in tota republica, ut haec scriptura ‘homo’ inter Latinos significat homines.</text:p>
        </text:list-item>
        <text:list-item>
          <text:p text:style-name="P521">Impositio non autentica est quae fit a non habente auctoritatem, ut inter disputantes imponuntur literae ad sic vel sic significandum, et virtute talium impositionum, tales litterae non dicuntur simpliciter significare, sed solum durante disputatione.</text:p>
        </text:list-item>
      </text:list>
      <text:p text:style-name="P143">Rursus impositio est triplex, quaedam formalis, quae scilicet fit per terminos exprimentes ipsam impositionem, ut susceptores interrogati super fontem baptismi nomen infantis, respondent “Franciscus”, aut cum tempore professionis inquit profitenti prolatus, vocaberis dominicus.</text:p>
      <text:p text:style-name="P143">Alia dicitur impositio consecutiva, quae videlicet impositionem formalem consequitur ut quia hoc nomen “Maria” fuit impositum ad significandum matrem Dei, consequitur ut significet imagines ipsius repraesentativas.</text:p>
      <text:p text:style-name="P144">Alia est impositio consuetudinaria, et contingit quando aliquis terminus aut propositio ex quadam consuetudine fundata super primaria impositione, significat aliquid primario significato simile, ut cum ly ‘nero’ significat hominem crudelem, aut haec propositio “Latet anguis in herba” significat fraudem sub habitu humili latere. Unde non est idem significare ex consuetudinaria impositione et significare ex mera consuetudine, sicut canis repraesentat dominum, nam illud fundatur super aliqua impositione, hoc vero non.</text:p>
      <text:p text:style-name="P142"><text:span text:style-name="T250">Ergo ly ‘Nero’ significat hominem illum ex formali impositione, et eius imaginem ex consecutiva, et homines crudeles ex consuetudinaria. </text:span><text:span text:style-name="T251">Et sicut datur aliquis terminus significans ex consuetudine quae quidem consuetudo fundatur super impositione quadam voluntaria a qua dependet (ut iam visum est), ita datur aliqua res significans naturaliter quae quidem naturalis significatio fundatur super aliqua libera institutione, et datur etiam aliqua res significans naturaliter, quae quidem significatio fundatur super aliquam consuetudinem a qua dependet. Verbi gratia, imago imperatoris </text:span><text:soft-page-break/><text:span text:style-name="T251">ex institutione mere voluntaria pictorum habet, ut sit imago imperatoris, sed tali lineatione voluntaria supposita naturaliter dicitur significare imperatorem tamquam simile suum simile.</text:span> <text:s text:c="3"/></text:p>
      <text:p text:style-name="P145">Item etiam mappae mense superpositae ex consuetudine habent ut sit effectus prandii, quod est earum causa finalis, consuetudine tamen illa supposita, naturaliter repraesentant prandium tamquam effectus suam causam.</text:p>
      <text:p text:style-name="P139"><text:span text:style-name="T251">Ex quo sequitur signa aliqua naturaliter, id est, non libere repraesentare, quibus tamen existentibus possunt desinere significare, </text:span><text:span text:style-name="T252">ut si imago perderet lineationem quam habet, et mappae per oppositam consuetudinem non superponerentur mensis ad prandium. Et caesa huius est quia tales naturales significationes dependent ex placito.</text:span></text:p>
      <text:p text:style-name="P140"><text:span text:style-name="T252">Quare ab aliis solet dici quod mappae significant prandium ex impositione consuetudinaria, sed ce</text:span><text:span text:style-name="T253">r</text:span><text:span text:style-name="T252">te non videtur </text:span><text:span text:style-name="T253">tam proprie dictum cum mappae non sit inventae ad significandum prandium, sed decenter fiat.</text:span></text:p>
      <text:p text:style-name="P146">Ex dictis divisionibus colligitur significare formaliter, quod est membrum primae divisionis, coincidere cum significare naturaliter proprie, quod est membrum secundae, sed significare instrumentaliter subdividitur in significare tamquam instrumentum naturale, ex consuetudine et ad placitum.</text:p>
      <text:h text:style-name="Heading_20_3" text:outline-level="3">Significare sic universaliter acceptum (ut ex dictis constat) in hoc consistit, quod est facere cognoscere rem significatam immutando potentiam, aut formaliter aut instrumentaliter /11a/ ad ipsam cognoscendam</text:h>
      <text:p text:style-name="P267"><text:span text:style-name="T155">Aliter tamen accipitur ut vocibus </text:span><text:span text:style-name="T156">et scripturis, specialiter attribuitur quod videlicet significare sit conceptus mentis exprimere, iuxta id Aristotelis prologum Perihermeneias. Voces sunt signa earum passionum quae sunt in anima et scripturae, signa eorum quae sunt in voce. Ubi non innuitur quod vox homo prolata a me significet, id est, faciat audientes cognoscere conceptum hominis quem ego habeo (licet saepe id faciat), sed dicitur signum conceptus quia per ipsam vocem ego exprimo conceptum meum ut audiens formet conceptum similem, scilicet hominis. Et proportionabiliter scripturae dicuntur signa vocum, quia videlicet per ipsas exprimuntur voces absentibus, ut videlicet ipsi legentes similes voces forment.</text:span></text:p>
      <text:p text:style-name="P147">Itaque ly ‘homo’ quod ad placitum significat, id est, facit cognoscere hominem, sive in mente sive in voce sive in scripto. In voce tamen significat, id est exprimit, conceptum hominis, et in scripto significat, id est exprimit, dictam vocem.</text:p>
      <text:p text:style-name="P147">Quare illa vox ‘buf’ et similes, quibus conceptus rerum non exprimuntur, non dicuntur apud dialecticum significative. Ex quibus tandem omnibus elicito ly ‘signum’ aut significare apud dialecticum non accipi nisi pro re significante formaliter vel ad placitum.</text:p>
      <text:p text:style-name="P147">Haec enim significatio sola sufficit ut termini significantes supponant pro rebus significatis. Nam licet ly ‘buf’ aut ly ‘Petrus’ prolatum a Paulo significet Paulum tamquam instrumentum naturale, non tamen hoc sufficit ut dicti termini supponant pro Paulo, ob idque in definitionibus infra construendis hoc modo accipietur signum.</text:p>
      <text:h text:style-name="Heading_20_2" text:outline-level="2"><text:soft-page-break/><text:span text:style-name="T156">C</text:span><text:span text:style-name="T95">apitis quarti. Lectio secunda</text:span></text:h>
      <text:h text:style-name="Heading_20_3" text:outline-level="3">Contra dictam definitionem arguitur ly ‘homines’ significat et tamen non repraesentat aliud a se; ergo definitio non est bona</text:h>
      <text:p text:style-name="P268"><text:span text:style-name="T95">Minor probatur, ly ‘homines’ non significat aliquid potius sed aliqua ergo. Eodem modo potest argui de ly ‘omnis’ significat </text:span><text:span text:style-name="T157">enim, et tamen non repraesentat aliud a se quia non significat aliquid, sed potius aliqualiter.</text:span></text:p>
      <text:p text:style-name="P148">Secundo. Contra secunda definitione arguitur. Ly ‘Paulus’ significat Petrum et tamen nec naturaliter, nec ex consuetudine, nec ad placitum; ergo definitio non est bona.</text:p>
      <text:p text:style-name="P148">Minor nota, et probatur maior. Ly ‘Paulus’ verificatur de Petro, ut in hac propositione “Petrus imaginario est Paulus”; ergo significat ipsum, quia significare communius est quam verificari.</text:p>
      <text:p text:style-name="P269"><text:span text:style-name="T95">Tertio. Haec scriptura ‘homo’ significet sibi similes scripturas, voces et conceptus, et tamen nec ex consuetudine, nec ad placitum, nec naturaliter; </text:span><text:span text:style-name="T158">ergo divisio non est bona.</text:span></text:p>
      <text:p text:style-name="P149">Maior est nota, et minor etiam quo ad duas priores partes, quo ad tertiam probatur. Primo illa scriptura non eodem modo profertur a Latino et a Graeco; ergo non significat naturaliter vocem. Item si non esset similis conceptui in significando non significaret ipsum, sed talis similitudo est ad placitum; ergo non significat naturaliter conceptum ad minus ultimatum.</text:p>
      <text:p text:style-name="P150">Quarto tandem arguitur. Hic terminus non significans repraesentat aliud a se, et tamen non significat; ergo definitio non est bona.</text:p>
      <text:p text:style-name="P150">Mario est nota, quia repraesentat lapides et res alias quae non sunt signa, et probatur minor, non significans est non significans; ergo non significans non est significans, ac subinde non significat. Consequentia tenet ab affirmativa, ad negativam praedicato variato.</text:p>
      <text:h text:style-name="Heading_20_3" text:outline-level="3">Primum argumentum ex definitionis declaratione solvitur</text:h>
      <text:p text:style-name="P151">Ubi dictum est ly ‘aliud’ includere et alia et aliter, sed formatum est ut explanemus quid sit significare aliquid, et quid significare aliqua, et quid significare aliqualiter.</text:p>
      <text:p text:style-name="P152">Ad quod respondent nonnulli: Significare aliqua esse significare aliquas res mediante uno disiuncto composito ex infinitis copulatis quorum primum habeat duas partes, secundum tres, et sic quovis copulato una parte supra praecedens crescente. Verbi gratia. Ly ‘homines’ (inquiunt) subordinatur huic disiuncto “Homo et homo”, vel “Homo et homo et homo” et caetera” ita quod non stet illum terminum ‘homines’ supponere pro aliquo numero hominum quin detur aliquod copulatum illius disiuncti supponens pro illis.</text:p>
      <text:p text:style-name="P153">Et mirum est hanc opinionem subtilem et veram a quibusdam praedicari, ex qua tamen infertur:</text:p>
      <text:p text:style-name="P153">Primo (ut eius auctores fatentur) quod ly ‘homines’ sit terminus complexus.</text:p>
      <text:p text:style-name="P270"><office:annotation office:name="__Annotation__1609_708417374" loext:resolved="false"><dc:creator>Unknown Author</dc:creator><dc:date>2025-07-30T22:55:15.289439061</dc:date><text:p><text:span text:style-name="T454">Secundo quod non potest intellectus creatus formare totum copulatum cui, ratione suae impositionis, subordinaretur cum habeat infinitas partes. Ac subinde, quod intellectus maioris capacitatis maiorem conceptum formet, audita illa voce ‘homines’, quam intellectus minoris.</text:span></text:p></office:annotation><text:span text:style-name="T159">Secundo </text:span><text:span text:style-name="T160">quod non potest intellectus creatus formare totum copulatum cui, ratione suae impositionis, subordinaretur cum habeat infinitas partes. </text:span><text:span text:style-name="T161">A</text:span><text:span text:style-name="T160">c subinde, quod intellectus maioris capacitatis maiorem conceptum formet, audita illa voce ‘homines’, quam intellectus minoris.</text:span><office:annotation-end office:name="__Annotation__1609_708417374"/><text:span text:style-name="T160"> /11b/ </text:span><text:span text:style-name="T162">Quae revera non sunt relatu digna.</text:span></text:p>
      <text:p text:style-name="P154">Rursus contra experientiam videtur quod audita illa voce ‘homines’ tam multis conceptibus intellectus oneretur.</text:p>
      <text:p text:style-name="P271"><text:soft-page-break/><text:span text:style-name="T162">Secundus modus est fere modernorum, videlicet quod significa</text:span><text:span text:style-name="T163">re aliqua est significare aliquas pro quibus simul, et si non faciant unum supponere potest, ut ly ‘homines’ significat homines, et significare aliquid est significare aliquam rem pro qua potest supponere, ut ly ‘homo’ significat homines.</text:span></text:p>
      <text:p text:style-name="P272"><text:span text:style-name="T163">Haec verumtamen opinio, sicut praecedens, in hoc videtur deficere, quod definit significare per hoc quod est supponere, cum </text:span><office:annotation office:name="__Annotation__1627_2865381904" loext:resolved="false"><dc:creator>Unknown Author</dc:creator><dc:date>2025-07-31T22:42:14.451338055</dc:date><text:p><text:span text:style-name="T454">Supponere est posterius quam significare.</text:span></text:p></office:annotation><text:span text:style-name="T163">supponere sit posterius quam significare</text:span><office:annotation-end office:name="__Annotation__1627_2865381904"/><text:span text:style-name="T163">. </text:span><text:span text:style-name="T164">Quinetiam, si nulla unquam esset propositio, ac proinde hic terminus ‘homo’ nullum haberet respectum ad hoc quod est supponere, nihilominus significare al</text:span><text:span text:style-name="T165">i</text:span><text:span text:style-name="T164">quid.</text:span></text:p>
      <text:p text:style-name="P273"><office:annotation office:name="__Annotation__1665_2865381904" loext:resolved="false"><dc:creator>Unknown Author</dc:creator><dc:date>2025-07-31T22:45:27.093445249</dc:date><text:p><text:span text:style-name="T454">Igitur significare aliquid est potentiae cognitivae aliud a se repraesentare.</text:span></text:p><text:p><text:span text:style-name="T454"/></text:p><text:p><text:span text:style-name="T454">Significare aliqua est potentiae cognitivae ali a se repraesentare.</text:span></text:p><text:p><text:span text:style-name="T454"/></text:p><text:p><text:span text:style-name="T454">Significare aliqualiter est potentiae cognitivae aliter a se repraesentare.</text:span></text:p></office:annotation><text:span text:style-name="T164">I</text:span><text:span text:style-name="T95">gitur significare aliquid est potentiae cognitivae aliud a se repraesentare.</text:span></text:p>
      <text:p text:style-name="P155">Significare aliqua est potentiae cognitivae ali a se repraesentare.</text:p>
      <text:p text:style-name="P273"><text:span text:style-name="T95">Significare aliqualiter est potentiae cognitivae aliter a se repraesentare.</text:span><office:annotation-end office:name="__Annotation__1665_2865381904"/></text:p>
      <text:p text:style-name="P156">Nec video quid magistros huius temporis submovit, ut post definitionem de significare, inquirerent quid sit significare aliquid aut aliqua aut aliqualiter, cum omnes definiant significare quod sit repraesentare aliquid vel aliqua vel aliqualiter. Et prima particula (inquiunt) ponitur propter terminos significantes aliquid, et secunda propter significantes aliqua, et tertia propter significantes aliqualiter, ubi proinde singula membra definiunt.</text:p>
      <text:p text:style-name="P274"><text:span text:style-name="T166">V</text:span><text:span text:style-name="T95">erum est tamen ab effectu et tamquam a signo posse cognosci terminum aliquem significare aliquid, per hoc quod ex modo suae significationis non repugnet supponere pro aliquo. Et significare aliqua per hoc quod ex modo suae significationis non repugnet ei supponere pro aliquibus simum sumptis. Et significare aliqualiter per hoc quod ex modo suae significationis repugnet ei supponere pro aliquo vel aliquibus, adminus in terminis finitis et quavis reflexione seclusa.</text:span></text:p>
      <text:p text:style-name="P157">Alicui termino non repugnare et caetera est, quod si significatum eius esset talis terminus supponeret pro illo (pro terminis absolutis) vel (pro connotativis) quod si eius formale materiali adiaceret, talis terminus supponeret pro illo.</text:p>
      <text:p text:style-name="P157">Ex quod sequitur ly ‘Chimaera’ sicut ly ‘homo’ significare aliquid, et ly ‘Chimaera’ sicut ly ‘homines’ significare aliqua.</text:p>
      <text:p text:style-name="P157">Sequitur secundo quod nec ly ‘Petrus’ significat aliqua, nec ly ‘partes’, aut hoc copulatum materia et forma de significatione totali (ut opinor) significat aliquid. Nam licet ‘Petrus’ supponat pro materia et forma (si tenetur totum non distingui a suis partibus) ac subinde pro aliquibus, hoc non est de per se ratione significationis, quia stat illas res esse quando talis terminus non supponit pro illis, scilicet cum sint seiunctae, sed quia accidit quod illae res constituunt significatum illius termini.</text:p>
      <text:p text:style-name="P157">Aeque ratione licet ly ‘partes’ aut ly ‘materia et forma’ supponat pro ‘Petro’, hoc non est de per se ratione suae significationis, quia stat omnino sua propria et primaria significata, id est, quorum illi duo conceptus sunt similitudines, esse, quando non supponat pro aliquo, utputa in dicto casu, sed quia accidit res significatas per dictum copulatum esse rem quae est Petrus.</text:p>
      <text:p text:style-name="P157">Sequitur tertio quod ly ‘Parisii’ licet induat formam pluralis tamen in significando urbem significat aliquid, et in significando civitatem significat aliqua. Et idem est de ly ‘Segobia’ licet induat formam singularis.</text:p>
      <text:p text:style-name="P157"><text:soft-page-break/>Dixerim significationem cognosci posse per suppositionem in terminis finitis et seclusa reflexione.</text:p>
      <text:p text:style-name="P157">Primum quia significatio terminorum infinitorum debet cognosci penes terminos finitos, ut hic terminos non entia cognoscitur significare aliqua per hoc quod ly ‘entia’ significat aliqua. Dato quod ille significat negationem huius, et propterea ex modo suae significationis repugnat supponere pro pluribus, sicut ly ‘non-ens’ cognoscitur significare aliquid, per hoc quod ly ‘ens’ significat aliquid.</text:p>
      <text:p text:style-name="P157">Secundum positum est ad obviandum argumentis reflexivis quae solent fieri ad probandum terminos significativos non supponere. Ut ly ‘non-supponens’ et simila.</text:p>
      <text:p text:style-name="P275"><text:span text:style-name="T95">Remanet tamen sub dubio an ly ‘homo’ significans aliquid significet etiam aliqua. Item etiam an ly ‘homines’ significans aliqua significet etiam aliquid, et videtur quod sic. Nam ly ‘hominis’ in genitivo in hoc cognoscitur significare aliquid, quia mediante suo essentialiter synonymo potest supponere pro aliquo; ergo ly ‘homo’ significat aliqua, qu</text:span><text:span text:style-name="T167">i</text:span><text:span text:style-name="T95">a mediante suo essentialiter synonymo, utputa mediante ly ‘homines’, potest </text:span><text:span text:style-name="T168">supponere re pro pluribus, et ly ‘homines’ aliquid, quia mediante ly ‘homo’ potest supponere pro aliquo, cum ly ‘homo’ et ly ‘homines’ perinde sunt essentialiter synonyma ac ly ‘homo’ et ly ‘homines’.</text:span></text:p>
      <text:p text:style-name="P158">Etenim termini essentialiter synonymi sunt qui significant idem et eodem modo /12a/ logicaliter, id est qui secluso modo significandi grammaticaliter qui constituit synonymitatem accidentalem, eodem modo significat. Modo significare singulariter et pluraliter proprietas grammaticalis est, sicut significare in recto et in obliquo.</text:p>
      <text:p text:style-name="P276"><text:span text:style-name="T168">Item ly ‘homo’ dicitur significar</text:span><text:span text:style-name="T169">e omnes homines; ergo dicendus est significare aliqua. Ex alia parte videtur quod nec ly ‘homo’ significet aliqua nec ly ‘homines’ aliquid, quia si proprie loquamur, dicendum est ly ‘homo’ significare hominem et ly ‘homines’ homines; ergo ille solum aliquid et hic solum aliqua.</text:span></text:p>
      <text:p text:style-name="P159">Difficultas haec non est de re. Nam ly ‘homo’ et ly ‘homines’, sicut universaliter omnes casus eiusdem nominis unum nomen dicuntur, et idem logicaliter significant solumque differunt in modo significandi grammaticaliter. Sed est difficultas de nomine, an significare singulariter hominem sit significare aliquid et nullo modo aliqua, nisi forte sit terminus collectivus, et significare pluraliter sit significare aliqua et nullo modo aliquid. Et forsan secundus modus verior est, utputa quod nec ly ‘homo’ aliqua nec ly ‘homines’ dicatur significare aliquid, licet det intelligere hominem pluraliter, sicut ly ‘homo’ dat intelligere homines singulariter. Et ad primum argumentum dato, quod significatio obliquorum debet cognosci per suppositionem recti eiusdem numeri, non tamen significatio singularis per pluralem quia hoc variat significare aliquid vel aliqua.</text:p>
      <text:p text:style-name="P159">Ad secundum responsum est quod videlicet ly ‘homo’ significat homines singulariter tamen, et propterea non est dicendum significare aliqua. Si tamen vis eligere alium modum non omnino reprobo, exactius veruntamen examinabitur hoc super primus tractatus Petrus Hispanus, capitulo tertio, ubi videbitur quibus conceptibus subordinentur ly ‘homo’ et ly ‘homines’.</text:p>
      <text:p text:style-name="P160">Circa hoc quod est significare aliqualiter notato tripliciter id posse contingere:</text:p>
      <text:list text:style-name="L21">
        <text:list-item>
          <text:p text:style-name="P522">Uno modo quando terminus ex parte obiecti nullum realem modum significat sed facit intellectum, aliter terminos categorematicos, accipere quam acciperet sine illo, et hoc dicitur exercere officium in propositione, ut infra exactius explanabitur capitulo octavo, ut ly ‘omnis’ in hac propositione “Omnis homo est animal”.</text:p>
        </text:list-item>
        <text:list-item>
          <text:p text:style-name="P522"><text:soft-page-break/>Secundo modo quando ex parte obiecti aliquem modum significat in re, taliter tamen quod ex modo suae significationis repugnat supponere pro aliquo, et hoc potest dici significare aliqualiter obiective, ut ly ‘velociter’ in hac propositione “Petrus velociter currit” significat enim velocitatem, sed taliter quod ex modo suae significationis repugnat supponere pro ila aut pro veloci.</text:p>
        </text:list-item>
        <text:list-item>
          <text:p text:style-name="P522">Tertio modo significare aliqualiter est significare rem aliqualiter se habere, quod est propositioni peculiare. Et non dicitur significare mere aliqualiter, sed aliquid aliqualiter. Quam quidem divisionem creo plurimum dicendis inservire.</text:p>
        </text:list-item>
      </text:list>
      <text:p text:style-name="P160">Per haec primum argumentum principale cum sua confirmatione facile solvitur.</text:p>
      <text:h text:style-name="Heading_20_3" text:outline-level="3">Ad secundum solet nonnullis maiora distingui, videlicet, quod ly ‘Paulus’ significet Petrum, aut significatione (inquiunt) absoluta et sic negatur, aut respectiva et sic conceditur</text:h>
      <text:p text:style-name="P161">Et vocant significationem absolutam quae provenit ex natura sive impositione, quod videlicet sine respectu ad aliquam copulam ubicumque terminus ponatur, habeat talem significationem, ut significatio de ly ‘homo’ et similium.</text:p>
      <text:p text:style-name="P277"><text:span text:style-name="T171">Sed ea (aiunt) est significatio respectiva quae non provenit ex natura vel impositione, sed ex solo respectu ad copulam de imaginario. Et hoc modo ly ‘Paulus’ in hac propositione “Petrus imaginario est Paulus” significat Petrum, quinetiam quodlibet ens mundi. </text:span><text:span text:style-name="T170">Unde inferunt nullum esse terminum singularem in ordine ad dictam copulam, ac subinde non posse fieri ascensum sub huiusmodi terminis cum tam commune sit subiectum huius propositionis “Haec substantia imaginario est accidens”, quam subiectum huius “Substantia imaginario est accidens”.</text:span></text:p>
      <text:p text:style-name="P277"><text:span text:style-name="T170">At vero nimirum si haec opinio non consonat communi </text:span><text:span text:style-name="T172">hominum</text:span><text:span text:style-name="T170"> sensui. Habet enim concedere (ut argumentum principale probat) dictum terminum significare, et tamen nec naturale nec ex consuetudine nec ad placitum. </text:span></text:p>
      <text:p text:style-name="P162">Item quaeritur ab huiusmodi opinatibus an ly ‘Paulus’ significet Petrum mediante naturali similitudine Petri, an potius mediante naturali similitudine Pauli.</text:p>
      <text:p text:style-name="P162">Si primum ergo, in hac propositione “Petrus imaginario est Paulus”, cum ly ‘Petrus’ mediante eadem copula significet Paulum, eadem ratione ly ‘Petrus’ subordinaretur naturali similitudini Pauli, quod videtur omnium obviare.</text:p>
      <text:p text:style-name="P278"><text:span text:style-name="T173">Rursus, cum ambo termini significent omnia entia mundi, non videtur quare /12b/ </text:span><text:span text:style-name="T174">his potius quam illis conceptibus subordinentur.</text:span></text:p>
      <text:p text:style-name="P163">Si detur secundum, utputa quod ly ‘Paulus’ mediante naturali similitudine Pauli significet Perum, crete eadem ratione significabit ipsum, mediante naturali similitudine lapidis, non enim potius illa significat Petrum quam ad haec. Nec per imaginationem quidem apparet verum, cum hic <text:span text:style-name="T255">conceptus ‘Paulus’ in hac propositione, verbi gratia “Petrus est Paulus”, naturaliter proprie solum Paulum significet, quod per adventum cuiuscumque alius termini ‘aliquid’ aliud significet. Nam significare naturaliter proprie aliquid non intelligitur esse aliud quam esse quodam modo naturalem similitudinem illius, modo non est intelligibile quod id ipsum, quod modo non est naturalis similitudo ‘a’ fiat aliquo modo naturalis similitudo ipsi.</text:span></text:p>
      <text:p text:style-name="P171"><text:soft-page-break/>Igitur, ad argumentum negatur maior, scilicet, quod ly ‘Paulus’ aliquo modo significet Petrum, sed ubicumque ly ‘Paulus’ ponatur, non significat nisi Paulum. Et ad probationem, aut negatur antecedens, utputa quod sit vera haec propositio “Petrus imaginario est Paulus” quia ponit Petrum quodammodo esse Paulum (esto verum sit dicere quod Petrus imaginatur esse Paulus), aut ipso concesso, negetur quod exinde sequatur ly ‘Paulum’ aut significare Petrum, aut pro illo supponere.</text:p>
      <text:p text:style-name="P171">Et re vera cum conceditur quod Petrus imaginario est Paulus, res quae est Paulus affirmatur de re quae est Petrus, ac subinde ly ‘Paulus’ mediante conceptu Pauli accipitur et supponit pro Paulo et non pro Petro, et ly ‘Petrus’ pro Petro et non pro Paulo. <text:s/>Sed ad veritatem dictae propositionis sufficit quod extrema imaginentur supponere pro eodem, licet de de facto ita non sit.</text:p>
      <text:p text:style-name="P171">Sed contra, ly ‘significat’ ampliat ad quinque; ergo tantundem est dicere ‘Paulus’ significat Paulum ac si diceres vel “‘Paulus’ significat omne illud quod imaginatur esse Paulus”, vel (ut observetur appellatio) “Omne illud quod imaginatur esse Paulus”; ergo ly ‘Paulus’ significat Petrum aut Petrum significat.</text:p>
      <text:p text:style-name="P171">Hoc argumentum petit modum ampliandi de ly ‘significat’, quem expositum invenies capitulo quarto, secundae partis huius, ubi ambae illae propositiones negantur.</text:p>
      <text:h text:style-name="Heading_20_3" text:outline-level="3">Pro solutione tertii notandum illam scripturam ‘homo’ repraesentare sibi similes scripturas / voces / conceptum non-ultimatum et ultimatum diversimode tamen</text:h>
      <text:p text:style-name="P164">Nam scripturas non quidem significat, sed obiective repraesentat, quia simile repraesentare suum simile stat dupliciter, obiective scilicet et instrumentaliter, ut imago imperatoris (ut visum est) potest repraesentare se obiective vel adaequate, id est, per conceptum distinctum ipsius, vel inadaequate, id est, per unum conceptum quo se et sibi similes imagines repraesentat, qui exprimitur per hanc discretionem “Habens hanc lineationem et caetera”, quod quidem <text:s/>non appellavimus significare sed repraesentare se obiective inadaequate. Et per hunc modum haec scriptura ‘homo’ repraesentat sibi similes.</text:p>
      <text:p text:style-name="P165">Repraesentat etiam dicta imago imperatorem, producendo notitiam memorativam imperatoris absolutam, et respectu illius dicitur vere significare, quia tamquam instrumentum. Rursus scriptura ‘homo’ dicitur significare voces, et quidem dupliciter secundum aequivocationem superius expositam de ly ‘significare’. Nam significat vocem, id est’ exprimi ipsam sicut vox significat conceptum, et haec est propria significatio ad placitum. <text:span text:style-name="T256">Ad placitum namque fuit ut haec vox ‘homo’ illis caracteribus exprimeretur. Et illo modo dicit Aristoteles quod scripturae sunt signa eorum quae sunt in voce. Sed si accipiatur significare pro hoc quod est facere cognoscere dictam scripturam, non significat vocem proprie, quippe quae non fuit imposita ad significandum vocem, sed certe hominem, sicut vos ipsa.</text:span></text:p>
      <text:p text:style-name="P169">Dicitur tamen facere cognoscere vocem, fortasse argumentative, et quodammodo ad placitum, ex hoc scilicet quod ad placitum dicta vox exprimitur per illam scripturam. Item ly ‘homo’ significat <office:annotation office:name="__Annotation__11071_2405877663" loext:resolved="false"><dc:creator>Unknown Author</dc:creator><dc:date>2025-08-04T00:22:57.986639069</dc:date><text:p><text:span text:style-name="T454">Conceptum non-ultimatum, id est, conceptum sui ipsius tamquam simile suum simile.</text:span></text:p></office:annotation>conceptum non-ultimatum, id est, conceptum sui ipsius tamquam simile suum simile<office:annotation-end office:name="__Annotation__11071_2405877663"/>, et tandem significat conceptum ultimatu<text:span text:style-name="T257">m propter similitudinem quam secum habet in significatione, nam significat idem.</text:span></text:p>
      <text:p text:style-name="P169"><text:span text:style-name="T257">Sed cum illa similitudo ad placitum sit (ad placitum enim habet ly ‘homo’ quod significet sicut dictus conceptus) potest dici quod ly ‘homo’ significat ipsum conceptum vel ad placitum, impositione consecutiva, vel forte naturaliter, tamquam simile suum simile, licet illa similitudo sit </text:span><text:soft-page-break/><text:span text:style-name="T257">ad placitum, ut dictum est de illa re quae est imago imperatoris, quae cum ad placitum habeat ut sit imago ipsius, naturaliter tamen dicitur ipsum significare.</text:span></text:p>
      <text:p text:style-name="P170">Igitur, ad tertium argumentum concessa maiore, respondeatur ad singula membra minoris, secundum exigentiam eorum quae dicta sunt. /13a/</text:p>
      <text:h text:style-name="Heading_20_3" text:outline-level="3">Ad quartum quod pro iuvenum ludo formavimus, concessa maiore negatur minor, et ad illam consequentiam non-significans est non-significans; ergo non-significans non est significans, distinguitur antecedens</text:h>
      <text:p text:style-name="P172">Est enim sensus quod res quae est non-significans, utputa ‘<text:span text:style-name="T258">Lapis’ est non-significans.</text:span></text:p>
      <text:p text:style-name="P173">Et conceditur totum argumentum, utputa quod dicta res non significat, sed nihil iuvat intentionem arguentis, vel ambo extrema accipiuntur materialiter, et sic, concesso antecedente, negatur consequentia.</text:p>
      <text:p text:style-name="P173">Nec arguitur recte ab affirmativa ad negativam, quia ly ‘significans’ in antecedente tenetur materialiter, et in consequente personaliter.</text:p>
      <text:p text:style-name="P173">Si autem subiectum antecedentis tenetur materialiter et praedicatum personaliter (quod argumentum videtur praetendere) negatur. Nam sensus est quod ille terminus non significans non significet, quod est falsum.</text:p>
      <text:h text:style-name="Heading_20_3" text:outline-level="3">Solent circa modum significandi ad placitum minutiora quaedam dubia submoveri</text:h>
      <text:list text:style-name="L22">
        <text:list-item>
          <text:p text:style-name="P523">Primum. Quo pacto primus terminus fuerit impositus.</text:p>
        </text:list-item>
        <text:list-item>
          <text:p text:style-name="P523">Secundum. Possint ne omnes res, aeque ad significandum imponi.</text:p>
        </text:list-item>
        <text:list-item>
          <text:p text:style-name="P523">Tertium. Fit ne aliqua impositio dependens.</text:p>
        </text:list-item>
        <text:list-item>
          <text:p text:style-name="P523">Quartum. An per solam depositionem desinant termini significare.</text:p>
        </text:list-item>
      </text:list>
      <text:p text:style-name="P174">Ad primum, cum Adam primo imposuit nomina rebus, id fecit visis rebus, proferendo nomina, iuxta illud. Adduxit Deus universa animantia ad Adam, ut videret quid vocaret ea. Postea vero filiis suis manifestavit dictas impositiones ostendens eis res ipsas digito, aut quibus suis aliis icotibus, et proferendo nomina.</text:p>
      <text:p text:style-name="P174">At vero crescente nominum copia, potuerunt per alia nomina, aliorum nominum impositiones circumscribi, et hoc modo postea fuerunt nova nomina imposita, ut si ostensa re diceret aliquis haec res vocetur ‘a’. Aut sic, haec littera ‘a’ significet sicut ly ‘homo’. Nec inde sequitur quod voces cum proferuntur aut litterae cum scribuntur imponatur de novo ad significandum, sed fiunt tunc capaces primeve impositionis. Itaque, qui imposuit hoc nomen ‘homo’ ad significandum, imposuit simul omnes similes scripturas et voces quae possent esse. Item etiam cum quis interpretatur nomina, utputa cum quid docet linguam Latinam, non dicitur ipsa imponere, sed dicitur manifestare impositiones iam factas.</text:p>
      <text:p text:style-name="P175">Ad secundum solet fere videlicet concedi, quamlibet rem posse imponi ad significandum, et se et quodcumque aliud. Et sic dicunt angelos quinetiam Deum ipsum posse apud nos ad significandum imponi. Attamen cum res indivisibiles non possint sese nostris sensibus obiici, certe non video quomodo possint nobis esse aliorum signa. Quare superflua esset talis impositio.</text:p>
      <text:p text:style-name="P176"><text:soft-page-break/>Forte tamen apud ipsos angelos <text:span text:style-name="T259">possunt eius modi impositiones fieri. Quae quidem consideratio logice a dialectico distat. Sed quod res aliqua significet se adaequate ad placitum videtur intellectu difficilius. Nam significare ad placitum est quod significatio dependeat ex placito et voluntate alicuius, sed non est in cuiuspiam voluntate aut potestate quin res quaecumque sese naturaliter repraesentet; ergo nulla res potest se ad placitum repraesentare. </text:span><text:span text:style-name="T260">Et ideo superflua esset talis impositio quae res imponeretur ad significandum se, aut sua similia, quae scilicet obiective naturaliter repraesentat, quod eo dixerim, quia potest terminus imponi ad significandum, ratione cuius impositionis significet se inadaequate, ut ly ‘ens’ aut ly ‘terminus’.</text:span></text:p>
      <text:p text:style-name="P177"><text:span text:style-name="T260">Item etiam aequa ratione supervacuae imponerentur. Voces ad significandum suum prolatorem adaequate, id est, sub hac forma voces Petri significent Petrum. Nam cum ipsum naturaliter significent, non potest eorum significatio ex placito dependere, ac proinde neque ad placitum id significare, sed potest terminus quispiam imponi ad significandum, ratione cuius impositionis significet suum prolatorem </text:span><text:span text:style-name="T261">inadaequate, ut ly ‘prolator’, pariter et ly ‘ego’ qui terminus significat communiter hominem a quo profe</text:span><text:span text:style-name="T262">r</text:span><text:span text:style-name="T261">atur.</text:span></text:p>
      <text:p text:style-name="P178">Ad tertium, solent fieri inter sophistas, dependentes impositiones, utputa quando terminus imponitur sub aliqua conditione aut determinatione, ut ly ‘a’ imponatur ad significandum hoc vel illo modo si ponatur in tali propositione, aut si imponatur ad significandum homines cras et non hodie, tunc ly ‘a’ non significabit nisi cum in tali propositone ponitur, aut etiam tali die.</text:p>
      <text:p text:style-name="P179">Sed contrafacta tali impositione, non est in mea potestate videre illam litteram hodie aut etiam extra propositione, quin ego recorder sui significati, proinde ac si esset in <text:s/>propositione aut cras; ergo significatio talis termini non potest esse illo modo dependens.</text:p>
      <text:p text:style-name="P279"><text:span text:style-name="T175">Ad hoc concesso antecedente negatur consequentia. Nam </text:span><text:span text:style-name="T176">significatio</text:span><text:span text:style-name="T175"> /13b/ </text:span><text:span text:style-name="T176">vocis non consistit in hoc solum quod est facere cognoscere res, sed (ut supra dictum est) in hoc quod possumus uti tali voce tamquam signo ad exprimendum conceptum ipsius rei, modo clarum quod hodie non possum ego uti ly ‘a’ tamquam signo ad exprimendum conceptum hominis, si enim dixero “Hodie ‘a’ currit” non percipient audientes me velle dicere quod homo currit.</text:span></text:p>
      <text:p text:style-name="P280"><text:span text:style-name="T177">Et per hoc, demum ad ultimum dubium patet, terminum quam primum deponitur per authenticam depositionem </text:span><text:span text:style-name="T178">desinere significare ad placitum. Et si contra quis arguat hoc termino (verbi gratia) ‘homo’ deposito a sua significatione, non stat per aliquot </text:span><text:span text:style-name="T179">dies quemquam Latinum, ipsum videre, quin ens significationis recordetur; ergo non desinit significare immediate post depositione.</text:span></text:p>
      <text:p text:style-name="P180">Negatur pariter consequentia, nam immediate post depositionem non est amplius ly ‘homo’ certum signum, quo possimus uti, ad exprimendum conceptum hominis, licet ex consuetudine forte per aliquot dies sit signum recordationes. Dicunt praeterea nonnulli relative dependenter significare illud quod per antecedentia significatur, et non aliud. Quod secunda pars capituli de relativis examinabitur.</text:p>
      <text:p text:style-name="P281"><text:span text:style-name="T180">Item an ly ‘ego’, ‘tu’, ‘ultra’, ‘citra’ et simila solum dependenter significarent, videbitur super Primum Tractatum Petri Hispani. Hic veruntamen </text:span><text:span text:style-name="T181">notato unum pro modo loquendi in hac materia, quod secunda parte exactius declarabitur, videlicet ly ‘significat appellare proprium conceptum quem determinat, nisi aliunde talis appellatio impediatur. </text:span><text:span text:style-name="T182">Verbi gratia, cum dicitur “‘Homo’ significat hominem” denotatur ly ‘homo’ significare hominem mediante illo conceptu ‘homo’.</text:span></text:p>
      <text:p text:style-name="P282"><text:span text:style-name="T182">Dixerim nisi aliunde impediatur, quia cum dicitur “‘Homo’ significat Petrum inadaequate” non denotatur quod mediante conceptu proprio Petri. Igitur non concedas “‘Petrus’ significat materiam </text:span><text:soft-page-break/><text:span text:style-name="T182">Petri”, sed ‘Petrus’ significat materiam Petri de per accidens et caetera. Nec concedas ‘Album’ significat corpus, aut significat albedinem, sed significat corpus de materiali et albedinem de formali. </text:span><text:span text:style-name="T183">Et proportionabiliter in aliis.</text:span></text:p>
      <text:p text:style-name="P181">Multa alia missa fecimus quae a neotericis in hac parte disputari solent, partim quae commodius alibi tradentur, partim quae non tam rei dialecticae conducunt quam ipsam obnubilant.</text:p>
      <text:h text:style-name="P471" text:outline-level="2"><text:span text:style-name="T182">C</text:span><text:span text:style-name="T95">apitis quinti. Lectio unica</text:span></text:h>
      <text:h text:style-name="Heading_20_3" text:outline-level="3"><text:span text:style-name="T184">H</text:span><text:span text:style-name="T95">is denique tenui calamo praelibatis, primus ac universalissimus terminus exponendus est ipsa eadem dictio ‘terminus’</text:span></text:h>
      <text:p text:style-name="P182">De quo Aristoteles Primo Priorum:</text:p>
      <text:p text:style-name="Quotations">Terminum (inquit) voco in quem resolvitur propositio, ut in subiectum et praedicatum.</text:p>
      <text:p text:style-name="P283"><text:span text:style-name="T186">Ubi volunt nonnulli Aristotelis solo extrema propositionis appellasse terminos, instar termini physici qui est cuiuscumque rei extremitas. At non videtur verbum a ratione termini seclusisse, cum in ipsum etiam proposito resolvatur, sed posuit exempla de soli extremis propositionis, quia illa sola (ut ibi annotabimus) syllogistico negotio serviebant. </text:span><text:span text:style-name="T185">Aut</text:span><text:span text:style-name="T186"> forte </text:span><text:span text:style-name="T185">quia etiam verbum (ut capitulo de verbo probabimus) potest esse propositionis extremum. Unde Boethius Primo Topicorum, intentionem Aristotelis exponens:</text:span></text:p>
      <text:p text:style-name="Quotations">Terminos (inquit) voco nomina vel verba quibus nectitur propositio.</text:p>
      <text:p text:style-name="P284"><text:span text:style-name="T185">Ex quo tandem, in communi usu, </text:span><text:span text:style-name="T187">omnes propositionis partes solent termini appellari. Quasi idem fit apud dialecticos ‘terminus’, quod apud grammaticos ‘dictio’. Et dicitur terminus ad similitudinem, non quidem extremitatis, sed principiorum rei naturalis, quae dicuntur eius termini. Utputa a quibus incipit compositio, et in quos eius resolutio terminatur. Igitur iuxta doctrinam Aristotelis et termini etymologiam.</text:span></text:p>
      <text:h text:style-name="Heading_20_3" text:outline-level="3"><text:span text:style-name="T187">T</text:span><text:span text:style-name="T95">erminus est signum propositionis categorematicae con</text:span><text:span text:style-name="T188">s</text:span><text:span text:style-name="T95">ti</text:span><text:span text:style-name="T188">tutiv</text:span><text:span text:style-name="T95">um</text:span></text:h>
      <text:p text:style-name="P183">Ut singulae quinque partium huius propositionis “Non omnis homo est iustus”.</text:p>
      <text:p text:style-name="P285"><text:span text:style-name="T188">Signum ponitur tanquam genus immediatum definiti, et accipitur logice pro signo expressivo conceptus, aut (quod idem est) formaliter vel ad placitum significante. Quare tabella pendens prae foribus domus, sonus campanae et simila, licet sint proprie signa, verumtamen </text:span><text:span text:style-name="T189">nec sunt signa logicalia nec sunt aliquo modo dicenti termini.</text:span></text:p>
      <text:p text:style-name="P184">Constitutivum dicit potentia propinquam, iuxta modum supra declaratum, capitulo primo, lectio prima.</text:p>
      <text:p text:style-name="P184">Propositionis categoricae, ut secludatur propositio ipsa, a ratione termini, quae licet possit propositionem hypotheticam constituere, nusquam tamen apud antiquos appellatur terminus, ut est videre in supradictis Aristotelis et Boethiis definitionibus.</text:p>
      <text:p text:style-name="P184">Habent se enim terminus et propositio, sicut totum et pars, et ideo qui propositionem appellant terminum, videntur certe nomina confundere.</text:p>
      <text:p text:style-name="P286"><text:span text:style-name="T189">Nec opus fuit addere propositionis consuetae, quippe cum absolute dicitur propositio, intelligitur consueta, id est, qua aliqua scientia utitur. Nam propositiones quae ex /14a/ </text:span><text:span text:style-name="T190">lapidibus vel aliis rebus </text:span><text:soft-page-break/><text:span text:style-name="T190">fingi solent, nullo modo sunt dicendae propositiones. Nec res illae, dicuntur terminus, nisi ab illis qui disciplinas extra proprios limites pro libito distendunt.</text:span></text:p>
      <text:p text:style-name="P185">Addunt nonnulli dictae definitioni, tamquam pars propinqua, ut secludant syllabas et litteras. Excluduntur tamen sufficienter per hoc quod non sunt signa.</text:p>
      <text:h text:style-name="Heading_20_3" text:outline-level="3">Sed contra dictam definitionem arguitur. <text:span text:style-name="T191">Haec definitur ibi terminus mentalis, nec vocalis nec scriptus; ergo non definitur ibi terminus, ac proinde non est bona definitio termini</text:span></text:h>
      <text:list text:style-name="L23">
        <text:list-item>
          <text:p text:style-name="P546"><text:span text:style-name="T191">Consequentia tenet sufficienti divisione. </text:span><text:span text:style-name="T192">Omnis enim terminus vel est mentalis vel vocalis vel scriptus (ut iamiam videbitur) et probatur antecedens quo ad singulas partes. Si ibi definiretur terminus mentalis, sequeretur alicui convenire definitionem cui non conveniret definitum, utputa termino vocali et scripto, et idem sequeretur dato quocumque alio membro; ergo nullum eorum definitur.</text:span></text:p>
        </text:list-item>
        <text:list-item>
          <text:p text:style-name="P524"><text:span text:style-name="T263">Secundo: Alicui convenit definitum cum aliqua determinatione, cui non convenit cum eadem definitum; ergo illa definitio non omnino convertitur cum definitio, ac subinde non est bona. </text:span><text:span text:style-name="T265">Probatur antecedens, ly ‘homo’ solitarie sumptus est terminus extra propositionem, tamen non est signum constitutivum propositionis extra propositionem ergo.</text:span></text:p>
        </text:list-item>
        <text:list-item>
          <text:p text:style-name="P525">Tertio: Si illa particula ‘categorice’ esset addenda, maxime (ut dictum est) ad excludendam propositionem a ratione termini, sed adhuc haec propositio “Homo est animal” est signum constitutivum propositionis categoricae, scilicet huius “Homo est animal rationale”; ergo illa particula redundat in dicta definitione.</text:p>
        </text:list-item>
        <text:list-item>
          <text:p text:style-name="P525">Quarto: Ly ‘buf’ est terminus et tamen non est signum; ergo signum non est genus termini. Minor ex dictis est nota, et maior probatur ex communi fere usu modernorum appellativum ly ‘buf’ terminum non significativum. Secundo haec est consueta propositio “Buf est dictio”; ergo subiectum est terminus. Tertio quia ibi ly ‘buf’ supponit materialiter pro se, sed supponere est passio termini; ergo ly ‘buf’ est terminus.</text:p>
        </text:list-item>
      </text:list>
      <text:h text:style-name="Heading_20_3" text:outline-level="3"><text:span text:style-name="T266">Ad primum: Distinguitur antecedens</text:span><text:span text:style-name="T265"> </text:span><text:span text:style-name="T263"><text:s text:c="3"/></text:span><text:span text:style-name="T264"><text:s/></text:span></text:h>
      <text:p text:style-name="P166"><text:span text:style-name="T267">Quia vel illae tres dictiones accipiuntur materialiter, ut sit sensus quod nec definitur ly ‘terminus’ mentalis et caetera tamquam </text:span><text:span text:style-name="T268">definitum remotum et sic conceditur, quia non definitur nisi haec scriptura ‘terminus’ (si definitio detur in scripto) aut hac vox ‘terminus’ (si detur in voce) quae quidem dictio est communis omnibus terminis mentalis, vocalibus et scriptis. Sed tunc negatur consequentia cum infertur; ergo non definitur terminus.</text:span></text:p>
      <text:p text:style-name="P186">Neque arguitur a sufficienti divisione, cum termini teneantur materialiter, ut non sequitur per hanc definitionem ‘corpus sensibile’ non definitur ly ‘homo’ neque ly ‘equus’ et caetera; ergo non definitur ly ‘animal’. Vel dictae tres dictiones, accipiuntur personaliter, ut sit sensus quod non definiuntur res quae sunt termini mentales, aut res quae sunt termini vocales, singulae tamquam definita propinqua inadaequata et sic negatur antecedens. Nam cum ibi adaequate definitur res quae est terminus, inadaequate definitur res quae est terminus mentalis, et res quae est terminus vocalis et caetera, unde si dicti termini adhuc accipiantur materialiter, definiuntur tamquam definita propinqua inadaequata, sicut per hanc definitionem (animal rationale) inadaequate definitur res quae est Petrus.</text:p>
      <text:p text:style-name="P187"><text:soft-page-break/>Est ergo in dicta definitione definitum remotum, ly ‘terminus’ et definitum propinquum res quae est terminus. Ex quod sequitur idem esse definitum propinquum et remotum dictae definitionis, utputa ly ‘terminus’.</text:p>
      <text:p text:style-name="P187">Pro secundo argumento ubi examinatur regula illa supra posita de quocumque dicitur definitio, cum aliqua determinatione dicitur cum eadem definitum, advertito quod in hac propositione ly ‘homo’ est terminus extra propositionem pariter, et in hac ly ‘homo’ est signum constitutivum propositionis extra propositionem, potest ly ‘extra propositionem’ appellare, aut in significatum materiale sui determinabilis, aut in significatum formale, licet in rigore (ut infra examinabitur) secundo modo accipiatur.</text:p>
      <text:p text:style-name="P188">Si cadit supra significatum materiale, utraque est vera in casu argumenti, sunt enim earum sensus quod ly ‘homo’ est terminus et est nunc extra propositionem, et quod sit signum propositionis constitutivum et nunc sit extra propositionem.</text:p>
      <text:p text:style-name="P167"><text:span text:style-name="T269">Si autem </text:span><text:span text:style-name="T270">cadat in significatum formale utraque est falsa, cum utriusque sensus sit quod ly ‘homo’ postes constituere propositionem extra propositionem, dato quod prima non tam proprie /14b/ faciat hunc sensum sicut secunda.</text:span></text:p>
      <text:p text:style-name="P189">Igitur ad formandum argumenti, distinguitur utraque pars antecedentis, quia si in utraque ly ‘extra’ propositionem eodem modo appellet, negatur, si autem diversimode, negatur consequentia.</text:p>
      <text:p text:style-name="P190">Ad tertium concessa utraque parte antecedentis, negatur consequentia. Subintelligimus enim in definitione tamquam pars praecipua aut praecipue determinativa, modo nulla propositio significative sumpta potest esse extremum totale aut copula propositionis categorice, quas vocamus partes praecipuas, neque potest tales partes determinare seu modificare.</text:p>
      <text:p text:style-name="P168"><text:span text:style-name="T271">Dixerim significative sumpta </text:span><text:span text:style-name="T272">quia materialiter bene potest esse extremum in hac “Homo est </text:span><text:span text:style-name="T273">animal” est propositio, quod non sufficit ut dicatur terminus. Ex quod sequitur quod haec oratio “Utrum Petrus disputat”, “Petre scribe” et similes non sunt termini, quia non possunt significative sumpte esse totalia extrema propositionis, licet prima sit pars extremi in hac “Quaero utrum Petrus disputat”.</text:span></text:p>
      <text:p text:style-name="P200">Obliqui autem nominum, ut ‘Petri’, ‘Petre’ et caetera rite sunt termini, quia secundum suos essentialiter synonymos, utputa secundum rectos, possunt esse propositionis extrema.</text:p>
      <text:p text:style-name="P200">Et si dubites ergo ly ‘et’ copulative sumptum non est terminus, quia secundum talem significationem non potest dicto modo constituere propositionem categoricam, negatur consequentia, nam sufficit quod potest esse determinativum, hoc est, unitivum propositionis categorice.</text:p>
      <text:p text:style-name="P201">Propter quartum argumentum dicunt multi quod ly ‘signum’ in definitione termini accipitur large, ut videlicet includit res sese significantes. At re vera, ut ex supradictis constat, nullo modo potest ly ‘buf’ dici signum sui ipsius. Non enim secundum acceptionem dialecticorum, nam hoc modo solummodo voces expressivae conceptuum dicuntur signa. Et quomodocumque accipiatur, ad minus <text:s/>debet aliud a se repraesentare, ut ex Augustino quinetiam ex ipso nomine constat.</text:p>
      <text:p text:style-name="P191">Quis enim dicat aliquam rem signum <text:span text:style-name="T274">s</text:span>ui? <text:span text:style-name="T274">Igitur simpliciter ly ‘buf’ non est terminus, sed dicitur quodammodo terminus, no quia sit quodammodo signum, sed quia habet aliquam proprietatem termini, utputa posse constituere propositionem supponere et caetera, quod infra exactius disputabitur, capitulo duodecimo, </text:span><text:span text:style-name="T275">lectio prima.</text:span></text:p>
      <text:p text:style-name="P192"><text:soft-page-break/>Quare ad argumentum negatur maior, nec rationes illae probant nisi quod ly ‘buf’ habet aliquas convenientias cum termino. Et ideo, ne idem saepe repetamus ubicumque loquamur absolute de termino, intelligemus de termino significativo.</text:p>
      <text:p text:style-name="P193">Solent hic formari minutiora quaedam argumenta, utputa ly ‘non-terminus’ est signum propositionis constitutivum, et tamen non est terminus; ergo probatur minor. ‘<text:span text:style-name="T276">Non-terminus’ est non-terminus; ergo non-terminus non est terminus.</text:span></text:p>
      <text:p text:style-name="P194">Item etiam hoc complexum ‘<text:span text:style-name="T277">s</text:span>ignum quod non est propositionis constitutivum’ est terminus, et tamen non est signum propositionis constitutivum, quod patet est signum quod non est propositionis constitutivum; ergo non est signum propositionis constitu<text:span text:style-name="T278">t</text:span>ivum.</text:p>
      <text:p text:style-name="P202">Haec tamen et similia, ex eis quae diximus circa ly ‘non-significans’ et hic et in aliis quibus suis materiis facile formantur ac dissolvuntur, quare numquam amplius repetentur.</text:p>
      <text:p text:style-name="P196">Fiunt etiam nescio quae impositiones, utpote si ly ‘a’ imponatur ad significandum homines quando ponatur extra propositionem, et quod in propositione nihil significet, tunc ly ‘a’ videtur terminus, et tamen non est signum et caetera, quia significative sumptum non potest poni in propositione. Ad quod negatur minor quia ly ‘a’ in tali casu, secundum suum synonymum, videlicet secundum conceptum cui subordinatur, potest propositionem constituere. Nec potest per aliquam impositionem fieri quod talis conceptus, per hoc quod constituat propositionem, desinat significare cum id habeat a natura. At de his, quippe quae inutilia sunt, satis et caetera.</text:p>
      <text:h text:style-name="Heading_20_2" text:outline-level="2">Capitis sexti. Lectio prima</text:h>
      <text:h text:style-name="Heading_20_3" text:outline-level="3">Terminus primum a nonnullis dividitur in increatum et creatum</text:h>
      <text:p text:style-name="P195"><office:annotation office:name="__Annotation__2374_1837047019" loext:resolved="false"><dc:creator>Unknown Author</dc:creator><dc:date>2025-08-07T20:58:27.943080284</dc:date><text:p text:style-name="P594"><text:span text:style-name="T454">Deus ut terminus aut propositio: Deum ipsum terminum increatum appellantes, quod sit cuncta sibi et multa beatis repraesentans, dicentes subinde quod sit quodam modo ponibilis in propositione, quia ipse est propositio cum eminenter significet quod quaecumque propositio mundi significare potest. At re vera, satis improprie dicitur propositionem constituere quamquam omnia infallibiliter repraesentet.</text:span></text:p></office:annotation><text:span text:style-name="T279">Deum ipsum terminum increatum appellantes, quod sit cuncta sibi et multa be</text:span><text:span text:style-name="T282">a</text:span><text:span text:style-name="T279">tis repraesentans, dicentes subinde quod sit quodam modo ponibilis in propositione, quia ipse est propositio cum eminenter significet quod quaecumque propositio mundi significare potest.</text:span><text:span text:style-name="T278"> </text:span><text:span text:style-name="T280">At re ver</text:span><text:span text:style-name="T281">a</text:span><text:span text:style-name="T280">, satis improprie dicitur propositionem constituere quamquam omnia infallibiliter repraesentet.</text:span><office:annotation-end office:name="__Annotation__2374_1837047019"/></text:p>
      <text:p text:style-name="P195"><text:span text:style-name="T280">Igitur non intendimus ipsum dialecticis definitionibus ambire. Sed </text:span><text:span text:style-name="T283">iuxta ordinem doctrinae quem Aristoteles in praedicamentis edocuit, ut videlicet aequivocus (cuius non est unica consideratio) ab arte relinqueretur, veruntamen quia terminus et univocus et aequivocus per /15a/ </text:span><text:span text:style-name="T284">ordinem ad conceptus est definiendus, congruit </text:span><text:span text:style-name="T285">quidem post tractatum terminorum mentalium, dictam divisionem subiungere.</text:span></text:p>
      <text:h text:style-name="Heading_20_3" text:outline-level="3">Igitur, terminorum alius mentalis, alius vocalis et alius scriptus</text:h>
      <text:p text:style-name="P197">Aut si mavis, alius mentalis et alius sensualis. Et rursus, sensualis, alius vocalis, alius scriptus.</text:p>
      <text:p text:style-name="P198">Terminus mentalis est terminus potentiae cognitivae, <text:span text:style-name="T286">ut visio qua videmus colorem et intellectio qua ipsum intelligimus (cum audis intellectio accipe pro actu intelligendi).</text:span></text:p>
      <text:p text:style-name="P198"><text:span text:style-name="T286">‘Terminus’ ponitur tamquam genus et non ly ‘qualitas’ ut genere immediato definiti utemur. Non enim accipitur hic terminus mentalis in rigore pro solo actu intellectus, ut videlicet dicatur a mente. Sed ut includat omnes notitias cuiuscumque potentiae cognitivae. Et notato genitivum illum ‘potentiae’ denotare causam subiectivam et efficientem, itaque terminus ‘potentiae’ dicatur qui inest potentiae et ab ipsa effective producitur, vel (quod infra declarabitur) qui est ab ipsa naturaliter producibilis. </text:span><office:annotation office:name="__Annotation__2097_779957924" loext:resolved="false"><dc:creator>Unknown Author</dc:creator><dc:date>2025-08-11T20:11:25.193020441</dc:date><text:p><text:span text:style-name="T454">Quare licet nigredo huius termini ‘homo’ poneretur in potentia sensitiva bruti (ut quidam imaginatur) non tamen esset terminus mentalis, quia eius modi qualitas non est naturaliter producibilis a tali potentia, et ideo brutum non posset per ipsam formaliter cognoscere, quae est proprietas termini mentalis.</text:span></text:p></office:annotation><text:span text:style-name="T286">Quare licet nigredo huius termini ‘homo’ poneretur in potentia sensitiva bruti (ut </text:span><text:soft-page-break/><text:span text:style-name="T286">quidam imaginatur) non tamen esset terminus mentalis, quia eius modi qualitas non est naturaliter producibilis a tali potentia, et ideo brutum non posset per ipsam formaliter cognoscere, quae est proprietas termini mentalis.</text:span><office:annotation-end office:name="__Annotation__2097_779957924"/><text:span text:style-name="T286"> Esset tamen terminus scriptus, quia esset immutativus potentiae visivae sicut quando est in papyro.</text:span></text:p>
      <text:h text:style-name="Heading_20_3" text:outline-level="3">Sed ne Terministae omnino per ignota procedant, convenit grossa Minerva declarare quaenam res sit et quomodo fiat terminus mentalis</text:h>
      <text:p text:style-name="P206">Cum aliquod cognoscibile obicitur potentiae, verbi gratia, cum albedo obiicitur visui, producuntur ab ea usque ad visum entia, quaedam quae dicuntur species visibiles, quibus oculus informatus producit actum visionis qui est imago ipsius albedinis, qua albedinem formaliter videmus. Quod quidem ad sensum quodammodo apparet cum quispiam obiectus alterius oculo videtur, sibi videre in eius superficie suam ipsius imaginem. Quod contingit propter species proprie faciei in speculum productas ab eoque, usque ad oculum reflexas repraesentantesque subinde faciem in puncto reflexionis.</text:p>
      <text:p text:style-name="P206">Et idem dicatur de interioribus potentiis, sicut de intellectus, qui informatus speciebus illae sensibiles aut intelligibiles dicuntur, significare obiectum ipsum obiective (ut quibusdam placet) vel (quod verius existimo) effective concurrunt ad eius notitiam producendam, quia simul cum potentia faciunt unum principium ad productionem notitiae.</text:p>
      <text:p text:style-name="P207">Sed sensatio ipsa aut intellectio actus, formaliter et naturaliter proprie (ut supra declaratum est) significat idem obiectum qui quidam dicitur naturalis similitudo rei obiectiva, est quam terminus mentalis.</text:p>
      <text:p text:style-name="P199"><text:span text:style-name="T287">Contra haec tamen arguitur: </text:span><office:annotation office:name="__Annotation__2219_779957924" loext:resolved="false"><dc:creator>Unknown Author</dc:creator><dc:date>2025-08-11T20:25:39.209061477</dc:date><text:p><text:span text:style-name="T454">Si terminus mentalis significaret naturaliter proprie, non posset ab huiusmodi significatione cadere, sed ly ‘omnis’ distribuens subiectum huius propositionis vel ultimate “Omnis homo est animal” potest a tali significatione cadere; ergo non omnis terminus significat naturaliter proprie.</text:span></text:p></office:annotation><text:span text:style-name="T287">Si terminus mentalis significaret naturaliter proprie, non posset ab huiusmodi significatione cadere, sed ly ‘omnis’ distribuens subiectum huius propositionis vel ultimate “Omnis homo est animal” potest a tali significatione cadere; ergo non omnis terminus significat naturaliter proprie.</text:span><office:annotation-end office:name="__Annotation__2219_779957924"/></text:p>
      <text:p text:style-name="P208">Minor probatur, quia adveniente ly ‘non’ desinet distribuere, cum dicta syncategoremata mutuo se impediant.</text:p>
      <text:p text:style-name="P203">Secundo: Si terminus mentalis eo significaret naturaliter proprie, quia est naturalis similitudo obiecti, etiam obiectum significaret naturaliter proprie terminum ipsum, cum aeque sit naturalis similitudo illius.</text:p>
      <text:p text:style-name="P203">Item etiam species sensibiles aut intelligibiles cum, dicantur naturales similitudines obiecti, esset pari rationi termini mentales.</text:p>
      <text:h text:style-name="Heading_20_3" text:outline-level="3">Ad primum negatur a multis prima sequela, asserentibus quidem propter argumentum ly ‘omnis’, adveniente ly ‘non’, cadere a significatione quae est distribuere, et de novo significare impediendo</text:h>
      <text:p text:style-name="P204">At re vera non est facile intellectu, terminum ipso manente, perdere id quod naturaliter ei convenit. Igitur ad argumentum, concessa prima sequela et concessa minori, videlicet quod ly ‘omnis’ ante adventum negationis distribuit, et post adventum solummodo impedit, negatur consequentia cum implicite infertur; ergo cadit ab actuali significatione.</text:p>
      <text:p text:style-name="P204">Etenim eadem omnino est actualis tendentia de ly ‘ominis’, in terminum categorematicum quando ipsum distribuit, et quando impeditur a negatione, licet quando categorema ab altero /15b/ ipsorum <text:soft-page-break/>determinatur, maneat distributum, et quando ab ambobus non distribuatur. Sicut apparet de Sole qui eadem omnino actione et exsiccat lutum et liquefacit ceram ob diversas eorum dispositiones. Qui etiam si desineret et distribuere et impediere non proinde caderet a sua significatione.</text:p>
      <text:p text:style-name="P204">Potest enim restare ly ‘omnis’ in mente corrupto omni categoremate (ut capitulo octavo ad experientiam monstrabitur), et tunc licet non actualiter exerceat officium, nihilominus actualiter significat, id est, taliter immutat ut si aliquis terminus ei adiungeretur, distribueret eum.</text:p>
      <text:p text:style-name="P205">Ad secundum, negatur <text:span text:style-name="T288">utraque sequela. Similitudo namque obiectiva nec consistit in aliqua essentiali proprietate, nec in lineatione aut reali accidente, nec in hoc solum quod ab obiecto fuerit producta, sed certe conceptus ex eo solet vocari naturalis similitudo obiectiva, quia est naturalis forma per se repraesentativa obiecti, quod habet ex natura rei, quia videlicet ab intellectu speciebus eius informato producitur.</text:span></text:p>
      <text:p text:style-name="P210">Quare nec sequitur obiectum esse naturalem similitudinem obiectivam conceptus, nec species naturales similitudines obiectivas eiusdem obiecti. Sed obiectum dicitur quodammodo simile conceptui, quia est causa illius et propterea significat fortasse conceptum tamquam instrumentum naturale.</text:p>
      <text:p text:style-name="P210">Species vero appellantur naturales similitudines obiecti, non quidem formaliter et actualiter sicut notitiae sed virtualiter, et quodam modo habitualiter, quia habent vim producendi similitudinem obiecti, utputa notitiam, et sunt diuturniores ipsa, <text:s/>cum maneant in potentia quando eam non actualiter immutant.</text:p>
      <text:p text:style-name="P209">Notato praeterea quod sicut in voce et in scripto sunt termini significantes aliquid vel aliqua, et alii significantes aliqualiter ita in mente. <office:annotation office:name="__Annotation__2162_3515985288" loext:resolved="false"><dc:creator>Unknown Author</dc:creator><dc:date>2025-08-12T19:58:57.448142454</dc:date><text:p><text:span text:style-name="T454">Et mentales, illi qui significant aliquid, dicuntur naturales similitudines obiecti/cognitiones, id est, actus cognoscendi, conceptus et notitiae.</text:span></text:p></office:annotation>Et mentales, illi qui significant aliquid, dicuntur naturales similitudines obiecti/cognitiones, id est, actus cognoscendi, conceptus et notitiae<office:annotation-end office:name="__Annotation__2162_3515985288"/>. <office:annotation office:name="__Annotation__2164_3515985288" loext:resolved="false"><dc:creator>Unknown Author</dc:creator><dc:date>2025-08-12T19:59:07.752390400</dc:date><text:p><text:span text:style-name="T454">Illi vero qui significant aliqualiter dicuntur actus syncategorematici.</text:span></text:p></office:annotation>Illi vero qui significant aliqualiter dicuntur actus syncategorematici<office:annotation-end office:name="__Annotation__2164_3515985288"/>. Licet <text:span text:style-name="T289">quandoque brevitatis causa nomine cognitionis aut notitiae etiam intelligatur actus. Et sub his diversis nominibus terminus mentalis, multifariam dividitur.</text:span></text:p>
      <text:h text:style-name="P472" text:outline-level="2">Capitis sexti. Lectio secunda</text:h>
      <text:h text:style-name="P480" text:outline-level="3">Notitiarum alia intuitiva et alia abstractiva</text:h>
      <text:p text:style-name="P287"><office:annotation office:name="__Annotation__2331_3515985288" loext:resolved="false"><dc:creator>Unknown Author</dc:creator><dc:date>2025-08-12T20:04:06.281540431</dc:date><text:p><text:span text:style-name="T454">Notitia intuitiva est notitia rei praesentis, ut visio aut intellectio coloris existentis in praesentia nostra.</text:span></text:p></office:annotation>Notitia intuitiva est notitia rei praesentis, ut visio aut intellectio coloris existentis in praesentia nostra.<office:annotation-end office:name="__Annotation__2331_3515985288"/></text:p>
      <text:p text:style-name="P287"><office:annotation office:name="__Annotation__2333_3515985288" loext:resolved="false"><dc:creator>Unknown Author</dc:creator><dc:date>2025-08-12T20:04:16.873790422</dc:date><text:p><text:span text:style-name="T454">Notitia abstractiva est notitia rei absentis, ut notitia quam habeo patris mei mortui.</text:span></text:p></office:annotation>Notitia abstractiva est notitia rei absentis, ut notitia quam habeo patris mei mortui.<office:annotation-end office:name="__Annotation__2333_3515985288"/></text:p>
      <text:p text:style-name="P288">Pro quorum expositione notato rem aliquam dupliciter dici praesentem potentiae. <text:span text:style-name="T290">Uno modo in se et realiter, quando videlicet actualiter movet obiective potentiam, ut color qui obiectus visui mediantibus speciebus eum immutat. Non enim solum species, sed etiam color eius mediantibus producit et conservat visionem. Alio modo res aliqua dicitur esse praesens solum intentionaliter et in alio, videlicet quando ipsa non movet actualiter potentiam, sed aliquid aliud ab ea in potentia derelictum, ut pater meus defunctus est intellectui meo nunc praesens, non quod ipsum moveat, sed quod notitia producta ab speciebus derelictis ab ipso patre eum repraesentet, ac subinde intentionaliter praesentem faciat.</text:span></text:p>
      <text:p text:style-name="P294"><text:soft-page-break/>Accipimus ergo in dictis definitionibus rem praesentem primo modo, unde quae solum intentionaliter est praesens vocatur in proposito absens. Igitur genitivus/praesentis dicit causam obiectivam. Itaque sensus primae definitionis est.</text:p>
      <text:p text:style-name="P289"><office:annotation office:name="__Annotation__2413_3515985288" loext:resolved="false"><dc:creator>Unknown Author</dc:creator><dc:date>2025-08-12T20:12:46.567204996</dc:date><text:p><text:span text:style-name="T454">Notitia intuitiva est notitia rei dependens obiective ab ea, vel ab aliquo vices eius proportionabiliter supplente.</text:span></text:p></office:annotation><text:span text:style-name="T291">Notitia intuitiva est notitia rei dependens obiective ab ea, vel ab aliquo vices eius proportionabiliter supplente.</text:span><office:annotation-end office:name="__Annotation__2413_3515985288"/><text:span text:style-name="T291"> Quod eo addiderim, quia potest Deus se solo notitiam intuitivam rei producere. </text:span><text:span text:style-name="T292">Et propter notitia intuitivas quas habent de corporibus angeli, quae fortasse non producuntur ab eis corporibus, sed ab specibus inditis supplentibus vicem obiectorum, ac si ab ipsis praesentibus producerentur, quod alterius est disputare negotii. Et sensus secunde per oppositum, id est, notitia rei non dependens ab ea obiective.</text:span></text:p>
      <text:p text:style-name="P295">Et notato ‘obiective’ quod maxime naturam notitiae intuitivae elucidat. Nam si Deus in genere causae efficientis infunderet mihi notitiam sui, eo modo quo producit alias creaturas, et non obiective, id est, non eo modo quo producit notitiam sui in beatis, re vera non esset talis notitia intuitiva.</text:p>
      <text:p text:style-name="P290"><text:span text:style-name="T292">Et si dicas est notitia rei praesentis (nam Deus ubique est praesens) estque dependens a re ipsa ergo notitia intuitiva. Negatur </text:span><text:span text:style-name="T293">Deum</text:span><text:span text:style-name="T292"> /16a/ </text:span><text:span text:style-name="T293">dici tunc praesentem potentiae.</text:span></text:p>
      <text:p text:style-name="P296">Etenim nihil aliud est rem esse praesentem potentiae (ad minus ut hic accipitur) quam ipsam obiective immutare. Et clarum est modum agendi materiae est etiam alius, et sic de aliis causarum generibus.</text:p>
      <text:p text:style-name="P291">Adhuc verumtamen arguitur. Si notitia abstractiva quam habeo patris mei conservaretur in praesentia ipsius simul cum intuitiva, tunc talis notitia esset rei praesentis, quia obiective immutantis potentiam, et tamen non est intuitiva; ergo definitio non est bona.</text:p>
      <text:p text:style-name="P291">Propter hoc argumentum <text:span text:style-name="T294">addunt quidam dictae definitioni praesentis, ut praesens est. Sed certe id non est necessarium, quia secundum expositionem datam, notitia rei praesentis non dicitur quia sit rei obiective immutantis potentiam ad productionem alterius notitiae, sed quia ipsa obiective dependet a tali re. Quare negatur maior.</text:span></text:p>
      <text:h text:style-name="Heading_20_3" text:outline-level="3">Ex his habetur inter notitiam intuitivam et abstractivam multifariam differre</text:h>
      <text:p text:style-name="P292">Primum: <text:span text:style-name="T296">E</text:span>x parte causae, <text:span text:style-name="T296">n</text:span>am notitia intuitiva producitur ab obiecto, et potentia abstractiva vero a potentia et speciebus quae, in absentia obiecti, in memoria reservantur.</text:p>
      <text:p text:style-name="P293">Secundo: <text:span text:style-name="T296">E</text:span>x parte subiecti, nam notitia <text:span text:style-name="T295">intuitiva potest esse in intellectu et sensu, tam interiorique exteriori, abstractiva vero non potest esse in sensibus exterioribus.</text:span></text:p>
      <text:p text:style-name="P297">Tertio: Ex parte significationis, notitia enim intuitiva clare et distincte repraesentat, abstractiva vero non. Ad minus nostra a quod addiderim propter notitiam divinam simplicis intelligentiae. Ex qua sequitur quarta differentia, quod videlicet virtute notitiae intuitivae possumus certificari de existentia caeterisque exterioribus rei accidentibus de praesenti, de quibus non possumus per notitiam abstractivam, licet possimus per eam scire existentiam necessariorum et contingentium de praeterito.</text:p>
      <text:p text:style-name="P297">Quod si arguas contra, astrologus tempore eclipsis Lunae, licet ipsam non videat, est certus ipsam esse, et in tanta quantitate Lunam occultari et caetera; ergo notitia abstractiva est sufficiens producere scientiam eius modi accidentum de praesenti.</text:p>
      <text:p text:style-name="P297"><text:soft-page-break/>Ad hoc negatus consequentia. Notia namque abstractiva non producit eiusmodi certitudinem, sed certe scientia principiorum astrologiae.</text:p>
      <text:p text:style-name="P297">Satis sit Terministis, naturam intuitive et abstractive notitiae callere. Nam illud, an videlicet notitia intuitiva possit manere in absentia obiecti caeteraque id genus, aliorum est disputare. Notato tamen apud Sanctum Thomas caeterosque graves doctores vix nominari notitiam intuitivam et abstractivam sub dictis nominibus, sed vocantur (et quidem congrentius) notitia visionis et notitia simplicis intelligentiae.</text:p>
      <text:p text:style-name="P298"><office:annotation office:name="__Annotation__2308_372586858" loext:resolved="false"><dc:creator>Unknown Author</dc:creator><dc:date>2025-08-13T19:59:05.171778616</dc:date><text:p text:style-name="P594"><text:span text:style-name="T454">Notitia abstractiva singularis et notitia abstractiva communis: </text:span></text:p><text:p text:style-name="P594"><text:span text:style-name="T454"/></text:p><text:p><text:span text:style-name="T454">Dicitur notitia abstractiva dupliciter, vel singularis, quae videlicet abstrahit ab existentia rei, sicut est notitia patris mei defuncti, vel communis et universalis, quae videlicet abstrahit a conditionibus individuantibus ut notitia hominum in communi.</text:span></text:p></office:annotation>Et dicitur notitia abstractiva dupliciter, vel singularis, quae videlicet abstrahit ab existentia rei, sicut est notitia patris mei defuncti, vel <text:span text:style-name="T297">communis et universalis, quae videlicet abstrahit a conditionibus individuantibus ut notitia hominum in communi.</text:span><office:annotation-end office:name="__Annotation__2308_372586858"/><text:span text:style-name="T297"> De quibus satis.</text:span></text:p>
      <text:h text:style-name="Heading_20_3" text:outline-level="3">Conceptus alius ultimatus alius non ultimatus</text:h>
      <text:list text:style-name="L24">
        <text:list-item>
          <text:p text:style-name="P547"><office:annotation office:name="__Annotation__2445_372586858" loext:resolved="false"><dc:creator>Unknown Author</dc:creator><dc:date>2025-08-13T20:02:35.654357230</dc:date><text:p text:style-name="P594"><text:span text:style-name="T454">Conceptus non-ultimatus est conceptus distinctus termini, ut conceptus huius nominis ‘homo’.</text:span></text:p></office:annotation><text:span text:style-name="T298">Conceptus non-ultimatus est conceptus distinctus termini, ut conceptus huius nominis ‘homo’.</text:span><office:annotation-end office:name="__Annotation__2445_372586858"/></text:p>
        </text:list-item>
        <text:list-item>
          <text:p text:style-name="P548"><office:annotation office:name="__Annotation__2495_372586858" loext:resolved="false"><dc:creator>Unknown Author</dc:creator><dc:date>2025-08-13T20:03:11.198804255</dc:date><text:p text:style-name="P594"><text:span text:style-name="T454">Conceptus ultimatus est conceptus qui non est distinctus termini ut, conceptus hominis.</text:span></text:p></office:annotation><text:span text:style-name="T298">Conceptus ultimatus </text:span><text:span text:style-name="T299">est conceptus qui non est distinctus termini ut, conceptus hominis.</text:span><office:annotation-end office:name="__Annotation__2495_372586858"/></text:p>
        </text:list-item>
      </text:list>
      <text:p text:style-name="P299">Quae quidem definitiones ex nominum etymologiis habentur. Tunc enim dicimur non-ultimate cognoscere cum cognoscimus tamquam in via ad aliud cognoscendum, et tunc ultimate cum cognoscimus tanquam in termino. Verbi gratia, <text:span text:style-name="T300">audita hac voce ‘homo’ intelligimus et vocem ipsam, et tandem homines qui per ipsam significantur. Conceptus primus est via ad secundum, et ideo primus dicitur non-ultimatus et secundus ultimatus.</text:span></text:p>
      <text:p text:style-name="P302">‘Distinctus’ ponitur in dicta definitione, quia conceptus entium est quidem conceptus termini non tamen non-ultimatus, quia non est distinctus termini, nec sufficeret quod esse adaequatus, nam conceptus cui subordinatur ly ‘terminus’, est quidem adaequatus conceptus termini, non tamen est conceptus non-ultimatus.</text:p>
      <text:p text:style-name="P302">Et intelligimus per conceptum distinctum conceptum quo terminus significat obiective, aut se singulariter, aut se et sibi similes. Uterque enim est conceptus non-ultimatus. Ex quo sequitur conceptum huius scripturae ‘blitiri’ non esse conceptum non-ultimatum sed potius ultimatum.</text:p>
      <text:h text:style-name="Heading_20_3" text:outline-level="3">Unde conceptus non ultimatus praeter hoc quod significat terminum ipsum cuius est naturalis similitudo /16b/ naturaliter proprie</text:h>
      <text:p text:style-name="P303">Significat etiam ad placitum illud quod dictus terminus significat, ut conceptus huius scripturae ‘homo’ significat naturaliter proprie ipsam scripturam, et ad placitum homines. Etenim (ut saepe dictum est) cum terminus quispiam imponitur ad significandum, simul imponuntur omnes similes illi, cum igitur conceptus non-ultimatus, verbi gratia huius scripturae ‘homo’ sit et similis, fit ut significent idem.</text:p>
      <text:p text:style-name="P304">Adhuc, cum in absentia talis scripturae habemus notitiam abstractivam illius, talis notitia ducit etiam nos in cognitionem hominum; igitur non solum scriptura aut vox, sed etiam conceptus vocis significat ad placitum illud quod vox ipsa.</text:p>
      <text:p text:style-name="P300"><text:span text:style-name="T301">Sed est quaerere quaenam dictarum significationum dicatur ultimata quaeve non-ultimata. Ad quod </text:span><text:span text:style-name="T302">partim dicunt illam significationem qua ad placitum significat homines esse non-ultimata, quia non mediante se sed mediante naturali similitudine hominum significat ipsos, sed illam qua significat </text:span><text:soft-page-break/><text:span text:style-name="T302">terminum esse ultimatam, quia mediante se significat ipsum. Partim vero dicunt contra, illam videlicet qua significat terminum esse non-ultimatam, quod in illa non-ultimate sistat intellectus, sed aliam qua significat homines esse ultimatam. Unde inferunt utrique quemcumque conceptum non-ultimatum esse ultimatum.</text:span></text:p>
      <text:p text:style-name="P301"><text:span text:style-name="T303">At vero, licet significatio qua conceptus significat terminum sit non-ultimata propter dictam rationem, non tamen dicitur non-ultimata respectu significationis, qua idem conceptus ad placitum significat homines, sed certe respectu conceptus ultimati qui est naturalis similitudo hominum. Et si arguas, dictus conceptus significat homines ad placitum; ergo ultimate vel non-ultimate, negatur consequentia. Nam significare, generaliter dictum, non dividitur in significare ultimate vel non-ultimate, sed significare naturaliter proprie. </text:span><text:span text:style-name="T304">Est enim divisio conceptuum tantummodo, et non aut vocum aut scripturarum.</text:span></text:p>
      <text:list text:style-name="L25">
        <text:list-item>
          <text:p text:style-name="P549"><office:annotation office:name="__Annotation__3007_372586858" loext:resolved="false"><dc:creator>Unknown Author</dc:creator><dc:date>2025-08-13T20:28:30.997906933</dc:date><text:p text:style-name="P594"><text:span text:style-name="T454">Significare non-ultimate non est significare mediante alio, sed terminum formaliter significare.</text:span></text:p></office:annotation>Quare significare non-ultimate non est significare mediante alio, sed terminum formaliter significare.<office:annotation-end office:name="__Annotation__3007_372586858"/></text:p>
        </text:list-item>
        <text:list-item>
          <text:p text:style-name="P549"><office:annotation office:name="__Annotation__3063_372586858" loext:resolved="false"><dc:creator>Unknown Author</dc:creator><dc:date>2025-08-13T20:29:01.518551624</dc:date><text:p text:style-name="P594"><text:span text:style-name="T454">Significare ultimate est rem quae non est terminus formaliter significare.</text:span></text:p></office:annotation>Et significare ultimate est rem quae non est terminus formaliter significare.<office:annotation-end office:name="__Annotation__3063_372586858"/></text:p>
        </text:list-item>
      </text:list>
      <text:p text:style-name="P305">Ex quo sequitur nullum eundem conceptum esse simul ultimatum et non-ultimatum. Ad quod innuendum <text:span text:style-name="T305">dicta nomina per opposita definimus, ut videlicet conceptus ultimatus dicatur per negationem non-ultimatus.</text:span></text:p>
      <text:p text:style-name="P306">Sequitur secundo: Conceptum non-ultimatum huius propositionis “Homo est animal” neque esse propositionem ultimatam neque non-ultimatam. Ubi notato, dictam propositionem duplici conceptui non-ultimato subordinari posse. Conceptui videlicet simplici, collective significanti illos tres terminos, sicut ly ‘populus’ significat hominum collectionem. Item tribus conceptibus inconiunctim sumptis, qui singuli singulos trium terminorum significant. Et primus secundum significationem qua significat dictam propositionem, conceptus quidem est non-ultimatus, sed secundum illam non est propositio secundum vero significationem qua significat ad placitum hominem esse animal, propositio quidem est, sed neque ultimata neque non-ultimata (ut ex dictis claret). Sed illi tres conceptus, quibus diximus itidem dictam propositionem subordinari, inquantum eam obiective repraesentant, non sunt unus terminus sed plures. <text:span text:style-name="T306">Quare neque sunt propositio ultimata neque non-ultimata.</text:span></text:p>
      <text:p text:style-name="P307">Sequitur tertio: Naturalem similitudinem huius scripturae ‘omnis’ esse conceptum non ultimatum, quae quidem naturaliter proprie significat dictam scripturam, et ad placitum significat distributive.</text:p>
      <text:p text:style-name="P308">Sequitur ultimo: Terminum mentalem secundum quod repraesentat obiective, aut se adaequate, aut se et sibi similia neque esse conceptum ultimatum neque non-ultimatum. Alioquin, cum secundum dictam significationem non dicatur absolute terminus, nullam in sequentibus faciemus mentionem huiusmodi considerationis.</text:p>
      <text:h text:style-name="Heading_20_3" text:outline-level="3">Item, conceptuum alius directus alius reflexus</text:h>
      <text:list text:style-name="L26">
        <text:list-item>
          <text:p text:style-name="P550">Conceptus reflexus est conceptus distinctus alterius conceptus eiusdem potentiae.</text:p>
        </text:list-item>
        <text:list-item>
          <text:p text:style-name="P550">Conceptus directus est conceptus qui non est distinctus alterius conceptus eiusdem potentiae.</text:p>
        </text:list-item>
      </text:list>
      <text:p text:style-name="P309"><office:annotation office:name="__Annotation__2553_2340873902" loext:resolved="false"><dc:creator>Unknown Author</dc:creator><dc:date>2025-08-14T20:09:07.005419019</dc:date><text:p><text:span text:style-name="T454">Conceptus directus: conceptus quo homines extra cognoscimus.</text:span></text:p><text:p><text:span text:style-name="T454"/></text:p><text:p><text:span text:style-name="T454">Conceptus reflexus: Conceptus quo cognoscimus nos cognoscere.</text:span></text:p></office:annotation><text:span text:style-name="T307">Ut conceptus quo homines extra cognoscimus dicitur directus, sed conceptus quo cognoscimus nos cognoscere dicitur reflexus </text:span><text:span text:style-name="T308">instar reflexionis realis.</text:span><office:annotation-end office:name="__Annotation__2553_2340873902"/><text:span text:style-name="T308"> Nam sicut res aliqua dicitur reflecti quando ab <text:s/></text:span><text:soft-page-break/><text:span text:style-name="T308">aliquo loco egreditur in quem tandem regreditur, ita intellectus dicitur reflecti per conceptum, qui cum ab eo eliciatur, in eum etiam terminatur, alterum eius conceptum repraesentando.</text:span></text:p>
      <text:p text:style-name="P310">Distinctus ponitur in definitione sicut in definitione conceptus non-ultimati. /17a/ Nam conceptus universalis entis et conceptus cui subordinatur hic terminus ‘conceptus’ non sunt conceptus reflexi sed directi potius.</text:p>
      <text:p text:style-name="P311">Alterius conceptus eiusdem potentiae, nam cum angelus conceptum alterius intuetur, conceptus ille primi angeli, conceptus quidem est distinctus alterius conceptus, non tamen per ipsum talis angelus dicitur reflecti (quia non in se flectitur sed in aliud tendit). Igitur ad conceptum reflexum opus est conceptum alterum qui per ipsum cognoscitur esse, vel adminus fortasse sufficit quod fuisset in eadem potentia, ut cum cognosco me cognoscere, aut cum recordor <text:span text:style-name="T309">me olim cognovisse.</text:span></text:p>
      <text:p text:style-name="P314">Conceptus directus per oppositum definitur, quia non stat eundem esse conceptum reflexum et directum.</text:p>
      <text:h text:style-name="Heading_20_3" text:outline-level="3">Duo possunt hic dubium facere circa conceptum reflexum. Primum, an significet illud quod significat directus. Secundum, an sit conceptus non-ultimatus</text:h>
      <text:list text:style-name="L27">
        <text:list-item>
          <text:p text:style-name="P551">Ad primum: Duplex conceptus potest reflexus formari, primus qui significet conceptum directum absolute, utputa sub ratione qualitatis.</text:p>
        </text:list-item>
        <text:list-item>
          <text:p text:style-name="P551">Secundus: Qui significet ipsum sub ratione conceptus et similitudines ad extra.</text:p>
        </text:list-item>
      </text:list>
      <text:p text:style-name="P312">Primus non videtur significare rem ipsam quam significat directus, quia cum non sit imago directi sub ratione qua directus ipse est imago rei ad extra, non videtur reflexus quoquomodo esse imago eiusdem rei.</text:p>
      <text:p text:style-name="P312">Secundus vero reflexus cum sit imago directi sub ratione qua directus est imago rei, est quidem proinde imago eiusdem rei, per illam maximam, quaecumque sunt similia uni tertio sunt inter se similia. Et ideo talis reflexus significat rem quam significat directus, et forsan significat ipsam de formali, sicut diceres quod ly ‘pater’ significat filium, quia supponit pro aliquo sub respectu quem habet ad filium, vel forsan significat ipsam rem tamquam instrumentum naturale, utputa tamquam simile suum simile.</text:p>
      <text:p text:style-name="P313">Et per idem solvitur secundum dubium, nam primus conceptus reflexus, licet sit conceptus distinctus termini, non tamen est conceptus non-ultimatus, sed potius ultimatus, quia cum non sit conceptus terminus sub ratione qua est terminus, non est via ad cognoscendum tandem rem ipsam significatam per terminum cuius est conceptus.</text:p>
      <text:p text:style-name="P313">Secundus vero (per oppositam rationem) potest quidem dici conceptus non-ultimatus.</text:p>
      <text:p text:style-name="P313">Dubitatur tandem an notitia sit essen<text:span text:style-name="T310">tialiter notitia, id est, an possit manere quando non actualiter significet, et videtur quod sic, tum quia potest Deus suspendere activitatem qua concurrit cum notitia ad immutandum intellectum, et tunc ipsa manente in intellectus non significabit, tum etiam, quia potest ipsam ponere in lapide, ubi non significat.</text:span></text:p>
      <text:p text:style-name="P315">Sed in contrarium videtur quod tota essentia notitiae actualis est significare, et ideo dicitur significare formaliter et naturaliter proprie, et cum repugnet cuicumque quod manere sine eo quod sibi essentialiter convenit, videtur quod non possit manere qualitas illa quin sit notitia.</text:p>
      <text:p text:style-name="P315"><text:soft-page-break/>Et ad argumenta in oppositum posset dici quod si Deus suspenderet dictam activitatem, talis qualitas corrumperetur, quia non habet aliud esse quam significare, et quod Deus non posset ipsam ponere in lapide, quia repugnat naturae talis qualitatis. Sed quia hoc non videtur omnino satisfacere, cui primam partem tutare liberet, dicat quod significare actualiter est naturale notitiae, sicut actu ridere homini, quod potest nunc adesse et nunc abesse, sed ipsa non potest manere in intellectu, Deo concurrente, quin significet.</text:p>
      <text:p text:style-name="P315">Dividunt etiam hic multi notitiam in actualem et habitualem. Veruntamen consideratio habituum, qui ex propositionibus iudicativis relinquuntur in potentia, altioris est disputationis.</text:p>
      <text:h text:style-name="Heading_20_3" text:outline-level="3">Terminus vocalis est terminus auditu corporeo perceptibilis, ut vox ‘homo’</text:h>
      <text:p text:style-name="P316">Terminus scriptus est terminus visu corporeo perceptibilis, ut haec scriptura ‘homo’. Corporeo ponitur ad excludendum terminos mentales, qui visu et auditu spiritualibus percipiuntur. Cum enim angelus quipiam, intelligit cogitationem quam sibi alter repraesentat, dicitur audire, et videre mentaliter. Nec propterea cogitationes, aut conceptus sic visi et auditi, dicuntur termini aut vocales aut scripti, de quibus nunc loquimur.</text:p>
      <text:list text:style-name="L28">
        <text:list-item>
          <text:p text:style-name="P552">Et differunt hae terminorum species ex parte causae efficientis, quia mentales a potentia cognitiva, vocales ab ore animalis certis, mediantibus /17b/ instrumentis, scripti denique, a virtute motiva stilo mediante efficiuntur.</text:p>
        </text:list-item>
        <text:list-item>
          <text:p text:style-name="P552">Ex parte subiecti, quod terminus mentalis in potentia cognitiva, vocalis in aere, scriptum demum in corpore denso, nisi sit corpus ipsum subiectatur.</text:p>
        </text:list-item>
        <text:list-item>
          <text:p text:style-name="P552">Ex parte formae, nam terminus mentalis naturaliter proprie, caeteri vero ad placitum significant.</text:p>
        </text:list-item>
        <text:list-item>
          <text:p text:style-name="P552">Ac denique ex parte finis, nam terminus mentalis ordinatur immediate ad cognoscendum, sed vocalis, ut conceptus praesentibus hominibus exprimatur, scriptus vero ut exprimatur absentibus.</text:p>
        </text:list-item>
      </text:list>
      <text:p text:style-name="P320">Quodnam ens sit terminus vocalis, quomodo fiat, quomodo sit et quomodo significet explanabitur quodammodo super primum tractatum Petrus Hispanus, ubi horum omnium expresse meminit.</text:p>
      <text:p text:style-name="P317">Addunt iuniores dictae divisioni nescio quae alia membra, utputa quod alius sit terminus spiritualis et alius corporalis et alius mixtus ex his. Utputa si una pars sit in mente et alia in voce. At cum nullus similium propositionem consuetam construere possit, neque sunt termini neque de illis aliqua est habenda consideratio.</text:p>
      <text:p text:style-name="P318">Dividunt deinde terminum in significativum et non significativum. Cum tamen non significativus non dicatur absolute terminus, hanc divisionem sub silentio praeterivimus, eo vel maxime, quod dicta membra ex supradictis sufficienter elucescant.</text:p>
      <text:p text:style-name="P319">Congruit <text:span text:style-name="T312">hic adnotare quid sit terminum vocalem aut scriptum mentali in significando subordinari. Igitur </text:span>terminum subordinari conceptui in significando, <text:span text:style-name="T312">et</text:span> non posse sic significare nisi in mutando intellectum ad formandum talem conceptum, nec posse immutare ad formandum talem conceptum quin sic significet. Quare ly ‘homo’ <text:span text:style-name="T313">non</text:span> licet possit significare homines, nisi <text:span text:style-name="T311">im</text:span>mutando intellectum ad formandum conceptum non-ultimatum sui, quia tamen potest immutare ad formandum talem <text:soft-page-break/>conceptum quando non significaret homines (utputa si non esset impositus) non dicitur subordinari dicto conceptui in significando homines, sed soli conceptui eorum ultimato.</text:p>
      <text:h text:style-name="Heading_20_2" text:outline-level="2">Capitis septimi. Lectio <text:span text:style-name="T230">prima</text:span></text:h>
      <text:h text:style-name="Heading_20_3" text:outline-level="3">Terminorum, alius univocus alius aequivocus</text:h>
      <text:list text:style-name="L29">
        <text:list-item>
          <text:p text:style-name="P553">Terminus univocus est terminus sua <text:span text:style-name="T314">omnia significata eadem ratione significans. Ut ly ‘homo’ secundum significationem qua veros homines significat.</text:span></text:p>
        </text:list-item>
        <text:list-item>
          <text:p text:style-name="P554">Terminus aequivocus est terminus sua significata diversis rationibus significans. Ut ly ‘homo’ secundum quod veros homines et pictos significat.</text:p>
        </text:list-item>
      </text:list>
      <text:p text:style-name="P321">Ubi notato nomina univocum / aequivocum bifariam accipi. Aut videlicet pro terminis qui dicuntur univoca univocantia, aut pro rebus per terminos ipsos significatis, quae dicuntur univoca univocata, aut aequivoca aequivocata. Unde univoca univocata sunt res secundum quod per unum nomen eadem ratione significantur, ut terrestris canis et marinus inquantum per ly ‘animal’ significantur. Et aequivoca aequivocata dicuntur res secundum quod per unum nomen diversis conceptibus significantur, <text:span text:style-name="T315">ut dicta animalia secundum quod significantur per ly canis. Ex quo sequitur abusive dici in singulari univocum univocatum aut aequivocum aequivocatum.</text:span></text:p>
      <text:p text:style-name="P322">Sequitur secundo, res non esse univocatus aut aequivocatas ex natura, sed per comparationem ad rationes quibus per nomina significantius. Est enim univocari quasi plures res, uno nimine, eademque ratione vocari, et aequivocari, uno nomine, diversis rationibus vocari. Quae quidem duo innuit in praedicamentis Aristoteles dicens “Univoca dicuntur” et caetera.</text:p>
      <text:p text:style-name="P322">Univoca pluraliter, quasi una res non dicatur univoca. Dicuntur quasi non sint ex natura, sed per respectum ad nomina, quibus dicuntur seu significantur.</text:p>
      <text:p text:style-name="P322">At de huius modi univocis ibidem, nam hic de univocantibus et aequivocantibus terminus est sermo. Sed quia dictae definitiones per rationes analogorum clarius elucescent, congruit ante earum expositionem analoga describamus.</text:p>
      <text:h text:style-name="Heading_20_3" text:outline-level="3">Aequivocorum: aliud a casu et aliud a consilio</text:h>
      <text:list text:style-name="L30">
        <text:list-item>
          <text:p text:style-name="P555">Terminus aequivocus a casu est aequivocus sua significata aeque significans, ut ly ‘dominicus’.</text:p>
        </text:list-item>
        <text:list-item>
          <text:p text:style-name="P555">Terminus aequivocus /<text:span text:style-name="T316">18a</text:span>/ a consilio.</text:p>
        </text:list-item>
      </text:list>
      <text:p text:style-name="P323">Licet iuxta propriam nominum etymologiam fortasse non sit omnino idem qui analogus, verum quia ad placitum significant nomina, pro eodem iuxta communem usum accipiatur.</text:p>
      <text:p text:style-name="P323">Igitur, terminus analogus est terminus sua significata attributione quadam vel proportione significans, ut ridens, secundum quod homines significat atque pratum, et dicitur ille aequivocus a casu, quia accidit imponi ad significandum hunc aut illum hominem, sed hic aequivocus a consilio, quia ex consulto propter proportionalitatem, nam sicut risus ad hominem sic floriditas ad pratum, ob idque dicitur analogus, etenim analogia idem est quod Latine proportio.</text:p>
      <text:p text:style-name="P324">Ubi notato quod cum omnimoda univocatio consistat in hoc quod unum nomen eadem ratione, unam formam significet, et pura aequivocatio in hoc quod unum nomen, diversis rationibus, diversas formas significet, analogia medians quodam modo inter utrumque. In hoc consistit quod <text:soft-page-break/>unum nomen simili ac proportionali ratione, <text:span text:style-name="T317">similia se proportionabilia significet. Est namque similitudo inter unitatem et diversitatem media.</text:span></text:p>
      <text:p text:style-name="P325">Quare analogiae gradus quidam sunt, partim ad univocationem, partim ad aequivocationem accedentes:</text:p>
      <text:list text:style-name="L31">
        <text:list-item>
          <text:p text:style-name="P556">Primus: quando unum nomen eadem ratione eandem formam significat, quae tamen diversos gradus specificos continet, ut ly ‘animal’ et quodlibet genus significat suas species iuxta modum loquendi, Aristoteles <text:span text:style-name="T222">Decimo Metaphysicae</text:span>.</text:p>
          <text:p text:style-name="P557">In genere latent aequivocationes, quae potest dici analogia inaequalitatis. Sed haec abusive, immo secundum dialecticum, nullo modo est analogia, cum sit pura univocatio et conceptus et definitionis, sed quoddam modo secundum physicum analogia.</text:p>
        </text:list-item>
        <text:list-item>
          <text:p text:style-name="P558">Secundus: <text:span text:style-name="T318">Quando unum nomen plura de materiali significat, sed per diversas attributiones ad eandem formam, principium vel subiectum.</text:span></text:p>
          <text:p text:style-name="P561">Ad eandem formam, ut sanum significat urinam, medicinam et animal, sed animal quia habet sanitatem, urinam quia eandem significat, et medicinam quia eandem efficit.</text:p>
          <text:p text:style-name="P561">Ad idem principium, ut militare de equo, veste et ense.</text:p>
          <text:p text:style-name="P561">Ad idem subiectum, ut ens de substantia et accidentibus iuxta doctrinam Philosophi, Primo Ethicorum Sancto Thoma expositore.</text:p>
          <text:p text:style-name="P559"><text:span text:style-name="T318">Ad interest inter ly ‘sanum’ et ly ‘ens’. Nam forma significata per ly ‘sanum’ non est nisi in solo animali, a qua per diversas attributiones caetera denomina</text:span><text:span text:style-name="T319">tur, quare si teneas conceptum connotativum de formali solum, </text:span><text:span text:style-name="T320">significare formam convenientem materiali, tunc ly ‘sanum’ mediante eodem conceptu formali significat haec omnia, quia unica est forma significata. Sed si teneas significare et formam et eius habitudinem ad materiale (quod infra examinabitur capitulo decimo, lectio secunda), tunc diversis conceptibus significat, nam diversas attributiones significat et variae definitiones ei respondent.</text:span></text:p>
          <text:p text:style-name="P562">Et certe, hoc secundum apparet verum, nam cum haedus dicitur sanus aut agnus infirmus, videtur dubium an dicatur sanus quia in se habens, an potius quia nobis efficiens sanitatem, quod est signum aequivocationis de ly ‘sanum’. Et idem intelligitur de ly ‘militare’.</text:p>
          <text:p text:style-name="P562">Veruntamen id quod significat ens, scilicet esse vel entitas, formaliter est, sicut in substantia ita in qualitate et quantitate et caetera. Sed dicuntur dicta accidentia habere esse per attributionem ad substantiam, quia qualitas nullum habet aliud esse quam esse dispositionem substantiae. Non quod non possit esse sine substantia, immo est, ut in sacramento altaris, sed quod si abstraheres per intellectum a qualitate, quod non esset aptitudine dispositio substantiae, totus esse eius auferres, sicut si tolleres ab urina quod non esset signum sanitatis, tolleres esse sanam.</text:p>
          <text:p text:style-name="P560"><text:span text:style-name="T321">Igitur, quia alia praedicamenta per hunc modum in suis definitionibus participant substantiam, faciunt unitatem quandam analogiae, et ideo significantur per conceptum unum formalem, cui subordinatur ly ‘ens’, qui quidem conceptus significat substantiam per prius, et accidens per posterius, cui subinde, diversae definitiones respo</text:span><text:span text:style-name="T322">n</text:span><text:span text:style-name="T321">dent. </text:span><text:span text:style-name="T323">Unde Sanctus Thomas, in prologo Primi articulo secundo, dicit quod omnia praedicamenta participant unam rationem entis. Et Primo, quaestio nonagesima, articulo quinto, quod non parificantur </text:span><text:soft-page-break/><text:span text:style-name="T323">in eadem intentionem. Haec dixerim, fortasse terminos terminorum egressus, ut tamen scirent Terministae, non repugnare in mente.</text:span></text:p>
          <text:p text:style-name="P563">Sanctus Thomas nomen analogum, et quidem vere analogicum, mediante eodem conceptu, sua analogata significare. /18b/</text:p>
          <text:p text:style-name="P564">Gradus hic analogiae proprius univocatione quam aequivocationi appropinquat, et dicitur analogia attributionis.</text:p>
          <text:p text:style-name="P564">An tamen talis conceptus unum quodpiam, omnibus praedicamentis commune, an potius illa praedicamenta, sic analogice unum immediate significet, altioris est disputationis. Et fortasse hoc secundum et Aristoteles et Sanctus Thomas opinati sunt.</text:p>
        </text:list-item>
        <text:list-item>
          <text:p text:style-name="P564">Tertius gradus analogiae est quando unum nomen plures formas sed similes, pluribus rationibus sed similibus, significat, ut ridere de nobis et de pratis dictum. Qui quidem gradus ad aequivocationem proprius accedit, quia duobus conceptibus, dicta analogata significat. Quae proprie dicitur analogia proportionalitatis, et est vera analogia.</text:p>
        </text:list-item>
      </text:list>
      <text:h text:style-name="Heading_20_3" text:outline-level="3">Per haec univocorum aequivocorumque definitiones clarescunt</text:h>
      <text:p text:style-name="P326">Nam ratio accipitur, et pro essentia ipsa seu forma significata, et pro conceptum formali, ac denique pro definitione rei secundum eundem conceptum. Et ad omnimodam univocationem requiritur omnimoda identitas rationis, quomodocumque accipiatur ratio, sicut ly ‘homo’ significat veros homines significando unam essentiam, id est, inquantum sunt eiusdem speciei, et mediante eodem conceptu, secundum quem eadem ei respondet definitio. Et ly ‘album’ significat plura, significando unam formam accidentalem, et mediante eodem conceptu secundum eandem definitionem quid nominis.</text:p>
      <text:p text:style-name="P328">Et ad omnimodam aequivocationem requiritur omnimoda diversitas rationis, ut ly ‘canis’ significat terrestrem et marinum. Sed ad analogiam, quae est quodammodo univocatio et quodammodo aequivocatio, requiritur partim identitas et partim diversitas, ut quo modis exemplis monstratum est.</text:p>
      <text:p text:style-name="P327"><text:span text:style-name="T324">Ob idque non descripsimus univocum terminum (uti moderni so</text:span><text:span text:style-name="T325">lent) per hoc quod uno conceptu significet sua significata, cum quia id non sufficit tum maxime, quia univocatio in ipsa ratione, quae exprimitur per definitionem, praecipue consistit.</text:span></text:p>
      <text:p text:style-name="P332">Nec terminum analogum definimus per hoc quod unum significet per similitudinem ad aliud, nam sufficit (ut visum est) quod significet per attributionem aut proportionem, quod sonat nomen / analogia. Quare ly ‘omnes’, secundum quod distributive et collective sumitur, aequivocum est, sed secundum hanc vel illam significationem est univocum.</text:p>
      <text:p text:style-name="P332">Ex quo sequitur omnem terminum aequivocum, secundum aliquam significationem, esse univocum. Neque inde sequitur (ut reor) quemcumque terminum significativum esse univocum et aequivocum, quod videlicet alio conceptu significet se et alia sua significata. Nam licet hoc ad nomen expectet, veruntamen non est in usu dialecticorum vocare terminum aequivocum nisi secundum proprias significationes. Sed peius adhuc conceditur a quibusdam hanc propositionem “Homo est animal” esse propositionem plures, secundum quod sese et hominem esse animal significat. Etenim secundum primam significationem, licet sic eam appellare libeat, non est propositio, cum illa significatio non sit propositionalis.</text:p>
      <text:p text:style-name="P332"><text:soft-page-break/>Scito hic, terminum aequivocum non terminum sed terminos pluraliter appellari, quippe qui pluribus conceptibus inconiunctim sumptis subordinetur, et propositionem ex huiusmodi terminis constructam, non propositionem, sed propositionem plures vocari.</text:p>
      <text:p text:style-name="P332">Unum autem non tacitus praeteribo quod quamquam omnes Moderni Summulistae, immo nos quandoque quia iam abivit in usum, accipiant hunc terminum canis tamquam aequivocum a casu, nihilominus existimo esse univocum, adminus in significando sidus et canem domesticum, nam quia fabulatur inter poetas quendam canem fuisse in canem transformatum hoc nomen, secundum quod, significat illum canem accipitur pro sidere.</text:p>
      <text:p text:style-name="P332">Si autem desideras terminos vere aequivocos a casu, accipe singulares, scilicet Petrus, Paulus et caetera.</text:p>
      <text:h text:style-name="Heading_20_3" text:outline-level="3">Notandae sunt tandem duae regulae quae de analogis constitui solent</text:h>
      <text:list text:style-name="L32">
        <text:list-item>
          <text:p text:style-name="P566">Prima: Analogum per se sumptum stat pro famosiori significato, id est, analogum quod /19a/ nec restringitur a membro minus principali, neque subiicitur respectu illius, stat pro eo quod per prius significat, ut ly ‘homo’ in hac propositione “Homo est animal” stat pro homine vero.</text:p>
          <text:p text:style-name="P566">Pariter in hac “homo est vivus pictus” quia analogum non dicitur subiici respectu membri minus principalis, nisi quando tale membrum vel est totale praedicatum vel principalior pars.</text:p>
        </text:list-item>
        <text:list-item>
          <text:p text:style-name="P565"><text:span text:style-name="T326">Secunda: </text:span><text:span text:style-name="T327">Talis sunt subiecta qualia permittuntur ab eorum praedicatis, id est analogum, quod subiicitur respectu membri minus principalis, alienatur ab eo ad standum pro eius significato, ut ly ‘homo’ in hac “Homo est pictus” supponit solum pro hominem picto.</text:span></text:p>
          <text:p text:style-name="P567">Intelligatur haec tamen quando analogum non restringitur a membro principaliori, nam hic homo vivus est pictus, pro homine vivo supponit. Sed non subinde inferas in hac “Omnis homo est hoc pictum” subiectum pro solo hoc homine supponere, nam cum praedicatum non ratione acceptionis, sed ratione sue significationis alienet subiectum, quamquam restringatur quo ad acceptionem et singularizetur non restringit subiectum secundum tantam restrictionem.</text:p>
          <text:p text:style-name="P567">Non enim praedicatum restringit subiectum ad pauciora supposita, sed solum alienat ad impropria (ut capitulo quinto, secundae partis videbitur), quare dicta propositio falsa est.</text:p>
        </text:list-item>
      </text:list>
      <text:p text:style-name="P329"><text:span text:style-name="T327">Hae regula</text:span><text:span text:style-name="T328">e</text:span><text:span text:style-name="T327"> non aliter quam communi usu et hominum sensu firmantur. Etenim absolute conceditur quod omnis homo intelligit, ambulat et caetera, et negatur quod pictus homo est homo. </text:span>Quod non contingeret nisi prima <text:span text:style-name="T327">regula veritatem haberet. Nam si subiectum primae aut praedicatum secundae distribueretur pro vivis et pictis, falsificarentur dictae propositiones pro singularibus, in quibus sub dictis terminis demonstrarentur homines picti.</text:span></text:p>
      <text:p text:style-name="P330">Item, demonstrata effigie hominis, concedimus hic homo est pulchre pictus, quod non contingeret nisi secunda regula esset vera. Nam si subiectum supponeret pro homine vivo, extrema non supponerent pro eodem.</text:p>
      <text:p text:style-name="P331">Ex quo sequitur hanc esse veram “Omnis homo est <text:span text:style-name="T329">pictus”. Quare non sequitur:</text:span></text:p>
      <text:p text:style-name="P457">Omnis homo est vivus, et</text:p>
      <text:p text:style-name="P457">Omnis homo est pictus</text:p>
      <text:p text:style-name="P457">ergo</text:p>
      <text:p text:style-name="P457"><text:soft-page-break/>Homo pictus est homo vivus</text:p>
      <text:p text:style-name="Standard"/>
      <text:p text:style-name="P333">Nec sequitur:</text:p>
      <text:p text:style-name="P457">Nullus homo vivus est pictus</text:p>
      <text:p text:style-name="P457">Omnis homo est pictus</text:p>
      <text:p text:style-name="P457">ergo</text:p>
      <text:p text:style-name="P457">Nullus homo est homo vivus</text:p>
      <text:p text:style-name="Standard"/>
      <text:p text:style-name="P334">Quia <text:span text:style-name="T330">in prima consequentia arguitur in quattuor terminis, et in secunda non </text:span><text:span text:style-name="T331">fit de subiecto praedicatum, et in tertia non concluditur maior extremitas de minori. Quare praemissae primae consequentiae sunt inhabiles, et in secunda concludendum est “ergo Homo pictus est homo pictus”, et in tertia “ergo Nullus homo pictus est homo vivus” </text:span><text:span text:style-name="T332">et caetera.</text:span></text:p>
      <text:p text:style-name="P337">Sed per hac regula secunda maxime notato quod, quando analogum subordinatur pluribus conceptibus cum unum signum non possit cadere, nisi in unum illorum fit ut non distribuatur pro omnibus analogatis, sed pro illo pro quo tenetur sine tali signo. Et ideo hae conceditur vera “Omnis homo est pictus”, sed quando dicta analogata significantur mediante eodem conceptu, potest quidem pro omnibus talis conceptibus distribuit. Quare haec est falsa “Omne ens est qualitas” ut plane constat.</text:p>
      <text:p text:style-name="P335"><text:span text:style-name="T333">Fortasse non absone diceretur si restringeretur haec secunda regula sic, quod numquam analogum supponeret pro significato minus principali nisi cum demonstratur, ut in hac propositione “Hic homo est pulchre pictus” demonstrata effigie hominis. </text:span><text:span text:style-name="T334">Nec concedatur haec “Omnis homo est pictus” quae re vera communi hominum sensui non consonat. Sed quia regula absolute solet constitui, proprias aures unusquisque consulat.</text:span></text:p>
      <text:p text:style-name="P336">Hae autem regula non extenduntur usque ad aequivoca a casu. Nam in hac propositione “Canis est latrabilis” subiectum non solum accipitur pro cane latrabili, immo dicta propositio subordinatur tribus inconiunctum sumptis, quarum una est vera et duae falsae (si ly canis esset nomen aequivocum ad illa tria).</text:p>
      <text:h text:style-name="Heading_20_2" text:outline-level="2">Capitis septimi. Lectio secunda</text:h>
      <text:h text:style-name="Heading_20_3" text:outline-level="3">At vero contra haec arguitur: Hoc copulatum “Petrus et Paulus” est terminus univocus et tamen significat sua significata diversis conceptibus, quia mediantibus conceptu Petri et conceptu Pauli; ergo definitio non est bona</text:h>
      <text:list text:style-name="L33">
        <text:list-item>
          <text:p text:style-name="P568">Secundo: Ly ‘homo’ est terminus univocus in significando /19b/ homines veros, et tamen significat illo mediantibus diversis conceptibus, quia mihi significat mediante uno conceptu et tibi significat mediante alio, ergo.</text:p>
        </text:list-item>
        <text:list-item>
          <text:p text:style-name="P569">Tertio: Ly ‘homo’ significat hos homines eadem ratione (hominibus veris demonstratis), et hos homines eadem ratione (demonstratis pictis), ergo omnia sua significata eadem ratione significat et tamen aequivoce significat illa; ergo definitio non est bona.</text:p>
        </text:list-item>
        <text:list-item>
          <text:p text:style-name="P570">Quarto: Si ly ‘homo’ significaret analogice hominem verum et hominem pictum propter similitudinem inter eos repertam, <text:span text:style-name="T335">sequeretur quod notitia hominum, cui subordinatur in mente, etiam significaret veros et pictos propter eandem rationem.</text:span></text:p>
          <text:p text:style-name="P571"><text:soft-page-break/>Nec valeret significare pro differentia, quod notitia cum naturaliter significet, significat homines propter essentialem convenientiam, quae quidem non est inter vivos homines et pictus, sed ly ‘homo’ cum significet ad placitum, potest unum significare per prius et aliud per posterius. Non valeret inquam haec responsio quam quidam dant.</text:p>
          <text:p text:style-name="P570"><text:span text:style-name="T336">Perspicuum enim est ly ‘homo’ in voce absolute significare homines, ac subinde propter essentialem convenientiam. Quare si hoc non obstante </text:span><text:span text:style-name="T337">potest homines vivos principaliter et homines pictos minus principaliter significare, idem erit de notitia hominum in mente. Quare ly ‘homo’ in significando homines vivos et homines pictus eidem notitiae subordinatur, ac proinde ruit totum fundamentum analogorum.</text:span></text:p>
        </text:list-item>
        <text:list-item>
          <text:p text:style-name="P572">Quinto: Si ly ‘homo’ significaret analogice veros homines et pictos, et ly ‘angelus’ significaret eodem modo, sed nulla videtur esse convenientia inter veros angelos et pictos, cum illi spirituales, hi vero corporales sint. Et sequela patet nam haec etiam conce<text:span text:style-name="T338">ditur “Hic angelus est bene pictus” eius pictura demonstrata.</text:span></text:p>
        </text:list-item>
      </text:list>
      <text:h text:style-name="Heading_20_3" text:outline-level="3">Ad primum argumentum concedunt nonnulli totum quod intendit</text:h>
      <text:p text:style-name="P338">Quare dicunt definitioni aequivocorum addendum esse totalibus, ut secludatur dictum copulatum quod quamquam significet mediantibus diversis conceptibus non tamen non synonymis.</text:p>
      <text:p text:style-name="P338">Sed re vera id non opus est, nam cum dicimus ‘diversis’ intelligimus contradictorio modo ad ly ‘eodem’, id est, mediantibus rationibus seu conceptibus qui non sunt idem nec faciunt idem. Quare argumentum, concessa maiori negatur minor, et negatur illa consequentia, scilicet ly ‘Petrus et Paulus’ significant mediantibus conceptu Petri et conceptu Pauli; ergo mediantibus diversis conceptibus ad sensum definitionis, quia illi faciunt unum.</text:p>
      <text:p text:style-name="P338">Et proportionabiliter solvitur secundum: Concedunt namque illi pariter totum eius intentum, et dicunt addendum esse non synonymis. At cum dicitur ‘diversis’ intelligitur non synonymis, nam synonymi termini pro eodem reputantur a dialectico.</text:p>
      <text:p text:style-name="P338">Unde ad secundum, concessa maiori negatur minor, nam conceptus quo ly ‘homo’ mihi significat homines, non dicitur in praesentiarum diversus a conceptu quo tibi significat homines.</text:p>
      <text:p text:style-name="P338">Ad tertium negatur consequentia, nam ly ‘eadem’ licet ponatur post signum universale, nihilominus constituit suppositionem determinatam, ad minus in modo communi concipiendi, et ideo prius descendendum est sub ly ‘ratione’ quam sub ly ‘significata’. Quod patet in hac propositione “Omnia animalia sunt eiusdem speciei”, quae propter dictam rationem est falsa. Quamquam potest, admisso immediate ascensu sub termino distributo, negari adhuc consequentia, nam dantur sub eo aliae singulares falsae, demonstratis uno homine vivo simul cum uno picto.</text:p>
      <text:p text:style-name="P342">Propter quartum et quintum et minutiora quaedam argumenta negat quidam aliquem esse terminum analogum. Cum tamen et apud antiquos et apud modernos non sit nomen usitatius quam analogum. Et fortasse adhuc ille nomine ‘tantum’ et ‘non’ re negat analogiam, ut patere potest eius dicta inspicienti.</text:p>
      <text:p text:style-name="P342">Etenim, cum contra seipsum sic arguit. Visa imagine Caesaris, dicimus his est Caesar; ergo ly ‘Caesar’ significat Caesarem pictum. Concedit illam esse rectam locutionem, sed eo (inquit) quod ly ‘Caesar’ subordinatur huic conceptui / efficies Caesaris.</text:p>
      <text:p text:style-name="P343"><text:soft-page-break/>Et revera non aliud concedit communis opinio. Sed ex hoc /20a/ recte infert ly ‘Caesar’ esse terminum analogum, quod videlicet aliquando subordinetur conceptui Caesaris, et aliquando conceptui effigiei ipsius. Igitur ad quartum posset forsan rationabiliter negari sequela prima. Nam cum notitia significet tamquam forma a re ipsa per modum obiecti producta, fortasse veros homines a quibus obiective producitur, et non pictos a quibus non producitur, significat. Sed vox ‘homo’ cum significet ad placitum, potest utrosque inaeque significare.</text:p>
      <text:p text:style-name="P343">Sed data adhuc dicta sequela non tamen sequitur (ut argumentum imaginatur) quod notitia hominum mediante se et formaliter significet et veros et pictos, sed veros mediante se et pictos mediante alia notitia ipsorum, ab ipsis videlicet obiective producta. Quibus proinde haec scriptura ‘homo’ subordinatur in significando analogice et non uni tantum. Et dato adhuc (quod non est verum) quod ly ‘homo’ in significando analogice uni notitiae subordinetur, non obstat eius analogiae, ut patet de conceptu entis.</text:p>
      <text:p text:style-name="P343">Ad quintum conceditur quod ly ‘angelus’ etiam dicitur analogice. Et distinguitur quod nulla sit similitudo inter angelum et picturam, vel inter angelum secundum esse quod habet conceditur, vel inter angelum secundum quod eum non cognoscimus negatur.</text:p>
      <text:p text:style-name="P343">Non enim habemus pro hoc statu conceptum absolutum angeli sed connotativum, significantem proprietates angeli, utputa subitaneum eius motum qui alis, et perpetuitatem, quae iuvenili facie quodammodo figuratur.</text:p>
      <text:h text:style-name="Heading_20_3" text:outline-level="3">Quaeritur demum an in mente ultimata sit possibilis aequivocatio</text:h>
      <text:p text:style-name="P339"><text:span text:style-name="T339">Et praecipua huius quaestiunculae difficultas est exponere, quid sit dictum aequivocatio in mente ultimata, quandoquidem ex eius explanatione continuo appa</text:span><text:span text:style-name="T340">ret impossibilis.</text:span></text:p>
      <text:p text:style-name="P345">Igitur est dicere an sit possibilis conceptus quispiam ultimatus qui ultimate et formaliter significet plura aeque primo per modum plurium, id est, ut conveniunt in aliqua eadem ratione, verbi gratia, an sicut conceptus entis secundum viam Sanctus Dominus significat substantiam et accidens, unum per prius et aliud per posterius inquantum sunt analogice unum. Ita possit dari unus conceptus qui significaret hominem et lapidem aeque principaliter, et non ut sunt substantiae, vel ut sunt alba et caetera.</text:p>
      <text:p text:style-name="P340"><text:span text:style-name="T340">Sed quod significaret homines sicut ille conceptus ‘homo’ et ‘lapides’ sicut ille conceptus lapis, itaque uterque terminus subordinaretur illi, et dictus conceptus explicaretur per eosdem inconiunctim sumptos et non ut faciunt unum. </text:span><text:span text:style-name="T341">Ad quod respondetur quod est impossibilis talis conceptus, quod potissimum probatur quaecumque sunt similia uni tertio sunt inter se similia, sed res significatae per unum conceptum sunt eidem similes, id est, eidem conceptui; ergo et inter se ob idque vel non significantur per unum conceptum, vel significantur sub aliqua ratione qua conveniunt.</text:span></text:p>
      <text:p text:style-name="P344">Item, si idem conceptus significaret aliquas duas res sub propriis rationibus, sicut ‘homo’ significat sub ratione hominis et equus sub ratione equi, quibus videlicet inter se differunt, non posset intellectus per distinctos conceptus distinctas res sub eisdem rationibus concipere, nam una natura soli uni conceptui convenit, quare non posset eorum differentiam plene concipere. Quinetiam impossibilius apparet quam quod impugnatione indigeat, esse videlicet unum conceptum significantem aliqua, nisi significando illa per modum unius.</text:p>
      <text:p text:style-name="P344"><text:soft-page-break/>Sed contra: Multi opinati sunt et satis probabiliter propositionem mentalem esse simplicem notitiam, tunc verbi gratia, notitia simplex cui subordinatur haec propositio “Homo non est lapis” significat hominem et lapidem illo modo; ergo talis conceptus est aequivocus. Ad hoc data dicta opinione negatur dictam notitiam aequivoce significare, nam significat homines de significatione partiali, itaque est explicabilis per unam vocem complexam, quare non per modum plurium.</text:p>
      <text:p text:style-name="P344">Ex hac expositione potest praecipuum argumentum sumi contra opinantes, verbum in mente ultimata significare unitive et tempus, nam illa non videtur posse significare per modum unius, ac proinde daretur aequivocatio.</text:p>
      <text:p text:style-name="P344">Item et fortius contra opinantes hanc propositionem “Tantum creatura contingenter est substantia” esse in mente ultimata, et veram et falsam secundum quod a ly ‘tantum’ vel a ly ‘contingenter’ eius incipiat /20b/ resolutio.</text:p>
      <text:p text:style-name="P344">Concedunt namque esse aequivocam, duasque significationes naturales et proprias omnino contrarias, et utramque de significatione totali habere, quod est penitus intelligibile. Igitur talis propositioni ultimatae sic consonat naturaliter primus sensus, ut secundos omnino dissonet. At nihil vetat eundem conceptum, sive ultimatum sive non-ultimatum mediante se unum, et mediante alio conceptu aliud significare.</text:p>
      <text:p text:style-name="P344">Hanc termini sectionem, eo caeteris praeposuimus, ut terminum aequivocum inquantum aequivocum (quod Aristoteles in Praedicamentis docet) relinqueremus ab arte. Igitur ni sequentibus divisionibus divisum erit ly ‘terminus aequivocus’ licet non sic exprimatur, nam cum absolute dicitur terminus intelligitur univocus, cum aequivocus termini potius dicatur.</text:p>
      <text:h text:style-name="Heading_20_2" text:outline-level="2">Caput Octavum</text:h>
      <text:h text:style-name="Heading_20_3" text:outline-level="3">Terminorum: alius categorematicus et alius syncategorematicus</text:h>
      <text:list text:style-name="L34">
        <text:list-item>
          <text:p text:style-name="P573">Terminus categorematicus est terminus aliquid vel aliqua significans, ut ly ‘homo’.</text:p>
        </text:list-item>
        <text:list-item>
          <text:p text:style-name="P573">Terminus syncategorematicus est terminus solum aliqualiter significans, ut ly ‘omnis.</text:p>
        </text:list-item>
      </text:list>
      <text:p text:style-name="P341"><text:span text:style-name="T341">Et </text:span><text:span text:style-name="T342">dicitur categorematicus, id est, praedicativus, quia significative sumptus potest esse extremum totale praedicationis, et syncategorematicus, id est, compraedicativus, quia cum per se non possit esse extremum praedicationis coadiuvat tamen tamquam extremorum aut verbi modificativus. Et ideo comparatur cifrae et algorismo quae cum per se nihil valeat, caeteris tamen characteribus adiuncta eorum valorem auget.</text:span></text:p>
      <text:h text:style-name="P481" text:outline-level="3">Partiuntur moderni terminum categorematicum in terminum categorematicum officio tantum, significatione tantum, officio et significatione simul, <text:span text:style-name="T343">et pariter syncategorematicum</text:span></text:h>
      <text:p text:style-name="P346"><text:span text:style-name="T346">Terminus categorematicus officio tantum, qui est syncategorematicus significatione tantum, est terminus (inquiunt) qui cum nec significet aliquid nec aliqua, potest tamen in praedicatione officium praecipuum exercere, ut ly ‘est’. </text:span><text:span text:style-name="T345">Extrema enim et copula dicuntur praecipua officia in proposi</text:span><text:span text:style-name="T344">tione exercere.</text:span></text:p>
      <text:p text:style-name="P347">Terminus categorematicus significatione tantum, qui est syncategorematicus officio tantum, est terminus qui cum significet aliqua vel aliqua, non tamen potest in praedicatione officium <text:soft-page-break/>praecipuum exercere, ut sunt (aiunt) obliqui, adverbia temporalia et localia, relativum et adiectivum adiective tentum.</text:p>
      <text:p text:style-name="P347">Terminus pure categorematicus est terminus qui cum significet aliquid vel aliqua, potest etiam in praedicatione officium praecipuum exercere, ut ly homo.</text:p>
      <text:p text:style-name="P347">Terminus denique pure syncategorematicus est terminus qui cum solum aliqualiter significet, non potest in praedicatione praecipuum officium exercere, ut ly ‘omnis’.</text:p>
      <text:p text:style-name="P347">At nescio an haec distinctio veritati usquam quaquam consonet. Et enim obliqui cum mediantibus eorum essentialiter synonymis, utpote mediantibus suis rectis, possint esse totali extrema propositionis, sunt quidem pure categoremata.</text:p>
      <text:p text:style-name="P347">Item adverbia illa ‘cras’, ‘ubi’ et caetera, cum taliter significent ut ex modo suae significationis repugnet eis supponere, certe non aliquid, sed solum aliqualiter significant, quamquam eorum significationes per categoremata exponantur (quia enim sane diceret ly ‘cras’ quod exponit, id est, in <text:s/>die proxime sequenti, significet tantum sicut ly ‘dies’, ly ‘sequens’ et caetera) quare sunt pure syncategoremata significantia aliqualiter obiective.</text:p>
      <text:p text:style-name="P347">Item etiam relativum, licet alicubi non sit totale extremum, ut hic homo “Homo qui currit movetur” quod a fortiori caeteris relativorum generibus continget. Et ideo sunt mere categoremata.</text:p>
      <text:p text:style-name="P348">Adiectivum tandem cum adiective tenetur itidem est pure categorema. Significat enim aliquid et potest alicubi esse totale extremum, ut hic “Petrus est albus” (quod infra capitulo decimo, lectio secunda, exactius examinabitur). Igitur, forte (ni fallor) nullum est categorema significatione quin sit etiam officio. <text:span text:style-name="T347">Quinetiam terminum significet aliquid vel aliqua est universaliter causa, ut possit esse totale extremum secundum se vel suum essentialiter synonymum.</text:span></text:p>
      <text:p text:style-name="P348"><text:span text:style-name="T347">Et hoc quod est esse totale extremum, est certum signum quod significet aliquid vel aliqua, sed ly ‘est’ secundum adiacens, ut hic ‘homo est’ est quidem pure categorema, sicut quodcumque /21a/ aliud verbum adiectivum, utpote quod aliquid significet et sit totale extremum. Cum tamen est tertium adjacens, ut “Hic homo est albus” fortasse est syncategorema significatione et categorema officio (ut dictum est). Hoc tamen capite de verbo disputabitur. Unde cum Petrus Hispanus dicit nomina et verba esse categoremata, vel loquitur de ly ‘est’ secundo adiacente et de caeteris adiectivis verbis, vel accipit categorema pro categoremate officio. <text:s/></text:span><text:s text:c="5"/></text:p>
      <text:h text:style-name="Heading_20_3" text:outline-level="3">At contra haec arguitur: Si aliquis terminus esset syncategorematicus, potissimum ly ‘omnis’, sed ille significat aliquid; ergo nullus est</text:h>
      <text:list text:style-name="L35">
        <text:list-item>
          <text:p text:style-name="P574">Primo ly ‘omnis mentale’ est actus intellectus; ergo vitaliter ipsum immutat, ut tendat in aliquod obiectum; ergo est naturalis similitudo illius ac subinde significat aliquid.</text:p>
        </text:list-item>
        <text:list-item>
          <text:p text:style-name="P575"><text:span text:style-name="T348">Secundo: </text:span><office:annotation office:name="__Annotation__3010_1290455602" loext:resolved="false"><dc:creator>Unknown Author</dc:creator><dc:date>2025-08-28T20:26:16.463703499</dc:date><text:p><text:span text:style-name="T454">On the Production of Acts by the Intellect: Actus ille non producitur a solo intellectu, in cuius potestate non est actu quemquam producere nisi cum est ab alio motus; ergo vel producitur obiective a rebus significatis per terminos quod modificat vel a terminis ipsis. Et ab utrislibet producatur apparet ipsa tamquam obiecta significare.</text:span></text:p></office:annotation><text:span text:style-name="T348">Actus ille non producitur a solo intellectu, in cuius potestate non est actu quemquam producere nisi cum est ab alio motus; ergo vel producitur obiective a rebus significatis per terminos quod modificat vel a terminis ipsis. Et ab utrislibet producatur apparet ipsa tamquam obiecta significare.</text:span><office:annotation-end office:name="__Annotation__3010_1290455602"/></text:p>
        </text:list-item>
        <text:list-item>
          <text:p text:style-name="P576">Tertio: Ly ‘omnis’ significat aliqualiter; ergo aliqualiter est significatum per ly ‘omnis’, ac subinde significat aliquid.</text:p>
        </text:list-item>
      </text:list>
      <text:h text:style-name="Heading_20_3" text:outline-level="3"><text:soft-page-break/>Ad primum argumentum negatur minor, et ad primam probationem negatur illa consequentia, scilicet ly ‘omnis’ vitaliter immutat; ergo est naturalis similitudo obiecti</text:h>
      <text:p text:style-name="P349">No<text:span text:style-name="T349">n</text:span> <text:span text:style-name="T349">enim immutat intellectum sicut notitia ad cognoscendum obiectum, sed ad accipiendum universaliter terminos quibus additur, iuxta id Aristotelis ly ‘omnis’ non universale est est, sed universaliter significat.</text:span></text:p>
      <text:p text:style-name="P354">Quaeritur tamen exactius quid sit hoc universaliter significare. Et arguitur sic: Vel significare de ly ‘omnis’, verbi gratia in hac propositione “Omnis homo est animal” est facere quod intellectus cognoscat homines per illum terminum ‘homo’ aliter quam cognosceret sine ly ‘omnis’, vel facere quod accipiat dictum terminum ‘homo’ aliter quam acciperet sine ipso.</text:p>
      <text:p text:style-name="P350">Non primum (ut quidam imaginantur) quando quidem perspicuum sit eodem modo nos cognoscere homines per illum terminum ‘homo’ in dicta propositione, sicut in hac “Homo est animal”, utputa communiter indistincte et confuse. Nam si aliter maxime copulative (ut dicunt) sed si intelligant per ly ‘copulative’ quod formemus per adventum de ly ‘omnis’ distinctum conceptum huius hominis et distinctum illius et caetera, illud quidem est contra experientiam, sed si intelligunt quod cognoscamus hunc hominem et illum per eundem conceptum communem, re vera eodem modo cognoscimus sine ly ‘omnis’.</text:p>
      <text:p text:style-name="P350">Si detur secundum ergo facit quod intellectus cognoscat terminos, unde sequitur et quod significet aliquid, et quod per adventum eius intellectus se reflectat supra categoremata, ipsa cognoscendo.</text:p>
      <text:p text:style-name="P350">Huic quaestioni datur secundum membrum propter argumentum, sed negatur illa consequentia, ly ‘omnis’ facit quod intellectus accipiat terminum et caetera; ergo facit quod ipsum cognoscat.</text:p>
      <text:p text:style-name="P351">Etenim intellectum terminum quempiam accipere, non est ipsum concipere, sive concipere accipiatur pro hoc quod est cognoscere, ut res ad extra concipiuntur in ratione significati, sive pro hoc quod est formare ut notitiae dicuntur concipi in ratione signi, sed est ipsum cum altero per verbum componere. Et ideo intellectus dicitur mediante ly ‘omnis’ accipere ly ‘homo’ pro suis significatis copulative, quia per adventum de ly ‘omnis’ concipit per totam compositionem praedicatum cuicumque supposito subiecti convenire.</text:p>
      <text:p text:style-name="P355">Et si dubites “ergo ly ‘omnis’ extra propositionem non significat” multi concedunt consequentiam, veruntamen consequens manifeste experientiae repugnare videtur.</text:p>
      <text:p text:style-name="P351"><text:span text:style-name="T350">Perspicuum enim est visa sola scriptura ‘omnis’, aut minime aut quovis alio syncategoremate, aliquem conceptum ultimatum formare Latinum quem non format rusticus, nam praeter notitiam scripturae quam ambo formant, Latinus intelligit significationem ac proinde format conceptum ultimatum, et cum non possit esse actus in intellectu quin actualiter significet, certe ly ‘omnis’ extra propositionem significat. Nec </text:span><text:span text:style-name="T351">valet dicere tunc accipi categorematice, nam qualiscumque eius significatio potest /21b/ extra propositionem a Latino percipi, esto non possit exponi nisi per officium quod in ipsa exercet. Negatur igitur consequentia.</text:span></text:p>
      <text:p text:style-name="P352">Significare enim actuale de ly ‘omnis’ non et actualiter distribuere, sed sic intellectum immutare ut quemcumque terminum capacem distributionis, modo situaretur immediate post illus signum, virtute talis immutationis acciperet copulative. Itaque, sicut termini categorematici significant quidem extra propositionem, non tamen supponunt visi in propositione, ita ly ‘omnis’ et quodlibet syncategorema licet significet extra propositionem, non tamne exercet suum officium nisi cum adiungitur categorematibus, et maxime observato pro huius materiae intelligentia.</text:p>
      <text:p text:style-name="P352"><text:soft-page-break/>Sed contra: Si ly ‘est’ purum dixeris (inquit Aristoteles) ipsum quidem nihil est, sed significat quandam compositionem quam sine extremis non est intelligere (quod quidem de quolibet syncategoremate pariter intelligitur); ergo syncategorema sine syncategoremate non significat, negatur consequentia.</text:p>
      <text:p text:style-name="P352">Non enim intelligit per illud, Aristoteles, syncategorema non significare sine extremis, sed licet sine illis significet, eius tamen significatio terminatur quodammodo et tendit in categoremata, nec potest exprimi sine illis.</text:p>
      <text:h text:style-name="Heading_20_3" text:outline-level="3">Ad secundum qui dicunt ly ‘omnis’ non significare nisi cum actualiter distribuit</text:h>
      <text:p text:style-name="P353">Inferunt exinde numquam ly ‘omnis’ formari ab intellectu, nisi ab aliquo praevio categorema<text:span text:style-name="T352">te, vel a re significata categoremate mediante, verbi gratia, quantumcumque (aiunt) successive, et quidem valde morose audiamus “Omnis homo est animal” numquam formamus actum ultimatum ‘omnis’ quoad usque formaverimus conceptum homo, immo quoad usque formaverimus praedicatum (est enim pariter eius obiectum quod confunditur ad eo).</text:span></text:p>
      <text:p text:style-name="P359">Rursus asserunt quodcumque syncategorema, sic terminum a quod producitur modificare, ut aliud non synonymum modificare non possit, quinimmo sic ab illo dependere ut categoremate corrupto syncategorema continuo corrumpatur. Sed hoc etiam videtur communi omnium sensui contraire. Etenim cum audio successive “Omni homo est animal” re vera successive concipio primo ‘omnis’ secundo ‘homo’ et caetera. Quare si concepto ly ‘omnis’ loco de ly ‘homo’ poneretur aequus, certe ab eodem actu distribueretur.</text:p>
      <text:p text:style-name="P356"><office:annotation office:name="__Annotation__2912_1649002012" loext:resolved="false"><dc:creator>Unknown Author</dc:creator><dc:date>2025-09-01T20:14:17.421153955</dc:date><text:p><text:span text:style-name="T454">Igitur dicendum quod sicut notitia intuitiva fit ab obiecto, ita primus actus syncategorematicus producitur a rebus mediantibus categorematibus, verbi gratia, cognito per experientiam quod ignis est calefactivus et quod illud huic et illi igni contingit, effingimus actum quendam quo addito dictae propositioni, concipimus illud praedicatum cuicumque supposito subiecti convenire.</text:span></text:p><text:p><text:span text:style-name="T454">Tum postea, sicut post notitias intuitivas relinquuntur species, quibus postea intellectus producit notitias abstractivas in absentia obiecti, ita ab ipsis syncategorematicis actibus relinquitur quoddam speciebus proportionabile, a quo postea audita hac voce ‘omnis’ aut quovis alio oblato motivo, producitur similis actus quodammodo abstractivus (si sic eum licet vocare) sine cuiuscumque categorematis intelligentia.</text:span></text:p></office:annotation>Igitur dicendum quod sicut notitia intuitiva fit ab obiecto, ita primus actus syncategorematicus producitur a rebus mediantibus categorematibus, verbi gratia, cognito per experientiam quod ignis est calefactivus et quod illud huic et illi igni contingit, effingimus actum quendam quo addito dictae propositioni, concipimus illud praedicatum cuicumque supposito subiecti convenire.</text:p>
      <text:p text:style-name="P357"><text:span text:style-name="T353">Tum postea, sicut post notitias intuitivas relinquuntur species, quibus postea intellectus producit notitias abstractivas in absentia obiecti, ita </text:span><text:span text:style-name="T354">ab ipsis syncategorematicis actibus relinquitur quoddam speciebus proportionabile, a quo postea audita hac voce ‘omnis’ aut quovis alio oblato motivo, </text:span><text:span text:style-name="T355">producitur similis actus quodammodo abstractivus (si sic eum licet vocare) sine cuiuscumque categorematis intelligentia.</text:span><office:annotation-end office:name="__Annotation__2912_1649002012"/></text:p>
      <text:p text:style-name="P357"><text:span text:style-name="T355">Quare ly ‘omnis’ in hac propositione “Omnis homo est animal” non dependet a ly ‘homo’, sed prius tempore producitur, quo producto, potest, sicut ly ‘homo’, ita quaevis alium terminum eiusdem generis et numeri eadem actione distribuere. </text:span><text:span text:style-name="T353"><text:s text:c="2"/></text:span></text:p>
      <text:p text:style-name="P360">Et si dubites, notitia intuitiva sic dependet ab obiecto quod nec potest aliud significare neque in eius absentia manere; ergo eodem modo dependet actus syncategorematicus a categoremate quod determinat. Negatur consequentia, et enim notitia intuitiva est effectus obiecti et eius similitudo, cum tamen categorema neque semper producatur a categoremate, neque sit unquam eius similitudo. Unde ad argumentum quod de primo actu militat, negatur minor quod videlicet ab utrislibet producatur, significat ea quandoquidem non producatur per modum similitudinis obiecti.</text:p>
      <text:h text:style-name="Heading_20_3" text:outline-level="3"><text:soft-page-break/>Ad tertium negatur consequentia. Numquam enim sequitur ab activa ad passivam, nisi quando vis verbi cadit in accusativum</text:h>
      <text:p text:style-name="P361">Modo cum dicitur ly ‘omnis’ significat aliqualiter illud adverbium non est quasi accusativus explicans significatum, sed modus potius verbi explicans modum significandi.</text:p>
      <text:p text:style-name="P361">Quae de ly ‘omnis’ exempli gratia diximus de caeteris /22a/ syncategorematum generibus suo modo sentito. Siquid tamen particulare cuiquam aliorum contigerit, suo loco videbitur.</text:p>
      <text:h text:style-name="Heading_20_3" text:outline-level="3">Subdividitur terminus categorematicus in terminum collectivum et divisivum</text:h>
      <text:p text:style-name="P358">Terminus collectivus est terminus aliqua in singulari copulatim significans, ut ly ‘populus’, ‘exercitus’, ‘numerus’ et caetera.</text:p>
      <text:p text:style-name="P362">Terminus divisivus est terminus <text:span text:style-name="T356">aliquid in singulari significans, ut ly ‘homo’. Copulatim, id est, taliter quod non repugnet ei pro pluribus, licet non faciant unum supponere.</text:span></text:p>
      <text:p text:style-name="P363">In singulari, quia licet fortasse sit de nomine disputatio, non est tamen admodum in usu ly ‘homines’ et similes terminos pluralis numeris collectivos appellare, nisi fortasse cum plurale accipitur loco singularis, ut ly ‘Parisii’, ‘Burgi’ et caetera.</text:p>
      <text:p text:style-name="P364">Addunt tertium membrum, scilicet quod alius sit terminus partim collectivus et partim divisivus, qui scilicet aliquid et aliqua significat, ut ly ‘ens’ cum absolvitur a numero.</text:p>
      <text:p text:style-name="P364">Horum tamen consideratio potius grammatico quam dialectico incumbit. Notato tandem subsequentes omnes, subdivisiones esse huius, in quibus scilicet subdividitur terminus categorematicus.</text:p>
      <text:h text:style-name="P473" text:outline-level="2">Capitis noni. Lectio prima</text:h>
      <text:h text:style-name="P482" text:outline-level="3">Terminorum categorematicorum, alius communis et alius singularis seu discretus</text:h>
      <text:p text:style-name="P365"><text:span text:style-name="T193">Q</text:span><text:span text:style-name="T95">ui alias dicuntur dividuae et individuae significationis.</text:span></text:p>
      <text:list text:style-name="L36">
        <text:list-item>
          <text:p text:style-name="P526">Terminus communis est terminus plura divisim significans, ut ly ‘homo’.</text:p>
        </text:list-item>
        <text:list-item>
          <text:p text:style-name="P526">Terminus singularis est terminus unum tantum significans, ut ly ‘Petrus’.</text:p>
        </text:list-item>
      </text:list>
      <text:p text:style-name="P366"><text:span text:style-name="T95">Categorematicorum, nam termini </text:span><text:span text:style-name="T194">syncategorematici nec communes, proprie, neque singulares dicuntur.</text:span></text:p>
      <text:p text:style-name="P211">Divisim, id est, unum significans et aliud significans, ita ut plurale illud copulative resolvatur. Et cum significat absolute ponitur, designat significationem (ut supra visum est) virtute cuius convenit termino supponere pro significato. Quare neque ly ‘Petrus’ neque ly ‘Salmantica’ est terminus communis, licet ille plures partes et hic plures homines collective significet.</text:p>
      <text:p text:style-name="P212">Immo, licet ‘ille’ corpus significet et animam significet, et ‘hic’ significet unum hominem et significet alium hominem divisive de per accidens, id est, mediante conceptu totius, cuius illud est pars. Quia virtute talis significationis, nec illi pro solo corpore neque hic pro uno homine convenit supponere.</text:p>
      <text:p text:style-name="P212"><text:soft-page-break/>Idem intelligito de hoc copulato “Petrus et Paulus” quod videlicet licet significet plura collective de significationi totali et plura divisive de partiali, nihilominus est terminus singularis. Sed hoc disiunctum “Petrus vel Paulus” terminus est communis et fortasse totum copulatum divisive sumptum (ut in secunda parte videbitur, capitulo primo, lectio tertia).</text:p>
      <text:p text:style-name="P212">Item ly ‘hoc album’ incomplexe acceptum, licet significet divisive unum de materiali et aliud de formali, non tamen est terminus communis, quia virtute secundae significationis non convenit ei pro significato supponere. Igitur perinde valet prima definitio hac si dicatur:</text:p>
      <text:p text:style-name="Quotations">Terminus communis est terminus plura divisim significans de per se, id est, de significatione totali et de materiali si esset connotativus.</text:p>
      <text:h text:style-name="Heading_20_3" text:outline-level="3">Addunt primae definitioni ‘univoce’, nam alias (dicunt) ly ‘Petrus’ esset terminus communis</text:h>
      <text:p text:style-name="P213">Sed supradictum est quod cum terminus absolute sumptus definitur aut dividitur, accipitur pro termino univoco, quare ly ‘Petrus’ secundum quod aequivoce significat plures homines, per genus definitionis secluditur ab utraque.</text:p>
      <text:p text:style-name="P213">Addunt etiam immediate, nam (alias) dicunt ly ‘essentia divina’ quantumcumque singulariter et incomplexe acciperetur, esset terminus communis, cum significet tamquam significata mediata plures personas, pro quibus etiam divisive supponit.</text:p>
      <text:p text:style-name="P213">Horum tamen terminorum expositionem usque ad quartum tractatum Petrus Hispanus, et pro nunc damus eis quod pro inconvenienti inferunt. Immo ly ‘haec essentia divina’ usque adeo est terminus communis, qui nullatenus (quod ibi monstrabitur) est singularizabilis, ad minus ut sufficiat esse medium in syllogismo expositorio.</text:p>
      <text:p text:style-name="P213">Definitio termini singularis accipitur in sensu opposito ad definitionem termini communis. Itaque ly ‘tantum’, ‘unum’ valeat non plura divisim.</text:p>
      <text:p text:style-name="P213">/22b/</text:p>
      <text:h text:style-name="P483" text:outline-level="3">Distinguunt moderni terminum communem in communem in significando, quae descriptione superius assignata definitur, et communem in supponendo, qui est videlicet ille ille cui ex modo suae significationis non repugnat supponere pro pluribus divisim et caetera</text:h>
      <text:p text:style-name="P367">Sed certe, licet tali distinctione diverse proprietates eiusdem termini demonstrentur, nullus tamen (vel fallor) est terminus communis in significando quin sit communis in supponendo et ediverso. Quin etiam communitas termini in significando universaliter, est causa communitas in supponendo communitasque in supponendo certum signum communitatis in significando. Unde Petrus Hispanus suppositio (inquit) communis est quae fit per terminum communem, et discreta quae fit per terminum discretum. Et constat accipere communem et discretum in significando, nam alias idem per idem definiretur.</text:p>
      <text:h text:style-name="Heading_20_3" text:outline-level="3"><text:soft-page-break/>Ex his omnibus sequitur quod ly ‘<text:span text:style-name="T231">D</text:span>eus’, ly ‘<text:span text:style-name="T357">s</text:span>ol’, ly ‘mundus’ et caetera sunt termini communes</text:h>
      <text:p text:style-name="P368"><text:span text:style-name="T357">Et enim ly ‘sol’ non fuit impositus ad significandum singulariter unum solem sed communiter, virtute cuius significationis si esset plures </text:span><text:span text:style-name="T358">s</text:span><text:span text:style-name="T357">oles supponere pro illis. </text:span><text:span text:style-name="T359">Et si dubites, etiam ly ‘Petrus’, si esset plures Petri supponere pro illis (loquimur univoce).</text:span></text:p>
      <text:p text:style-name="P374">“Esse plures Petros”, intelligitur dupliciter, vel quod sint plures quorum quilibet sit hic, vel quorum nullus sit hic (nec vetat utrumque implicare contradictionem, nam quaerimus intrinsecam consequentiae bonitatem). Modo si esset plures Petri primo modo, ly ‘Petrus’ supponeret pro illis, sed illud non sufficit ut sit terminus communis. Si tamen essent plures secundo modo ly ‘Petrus’ non supponeret pro illis, et tamen si hoc modo essent plures Soles ly ‘Sol’ supponeret pro illis.</text:p>
      <text:p text:style-name="P369"><text:span text:style-name="T360">Sequitur secundo: Ly ‘omnis homo’</text:span><text:span text:style-name="T359"> </text:span><text:span text:style-name="T360">esse terminum communem, quia successive potest supponere pro pluribus. Pariter ly ‘omnis homo futurus’ (quod nonnulli male negant) nam si sit nunc solus Petrus qui etiam erit, et cras sit solus Paulus qui etiam post erit, verum est nunc dicere quod Petrus est omnis homo futurus, et cras quod Paulus est omnis homo futurus. Nam ly ‘homo’ non supponit nisi pro homine qui nunc est et erit.</text:span></text:p>
      <text:p text:style-name="P375">Et si dubites de hoc complexo ‘homo qui erit omnis homo’ (data falsitate huius “Adam fuit omnis homo” quam tamen veram opinor) pariter est terminus communis, licet non possit postquam supponit pro uno, postea supponere pro alio in sensu composito. Sufficit enim quod in sensu diviso potest supponere pro Petro, et potest supponere pro Paulo et caetera. Et idem dicitur de ly ‘homo’ qui potest esse omnis homo, quia ex modo suae significationis non repugnat supponere pro pluribus.</text:p>
      <text:h text:style-name="Heading_20_2" text:outline-level="2">Capitis noni. Lectio secunda</text:h>
      <text:p text:style-name="P376">Attamen contra haec arguitur: Ly ‘ens’ quod est genus / plura divisim significat, quia omne totum significat quidquid sua pars significat, et tamen non est terminus communis, cum ei repugnet supponere pro pluribus; ergo definitio non est bona.</text:p>
      <text:h text:style-name="P484" text:outline-level="3">Ad argumentum nonnulli asserunt, maiorem opinantes ly ‘ens’ quod est Petrus, de materiali significare omne ens, connotando quod sit Petrus</text:h>
      <text:p text:style-name="P370">At licet de partiali verum sit omne ens significare (quod probat argumentum), certe non est dicendum id significare de materiali. Naturale significare de materiali est significare de significatione totali, modo terminus connotativus de totali materiali non significat, nisi illud cui significatum formale non repugnat convenire, et claret huic quod est esse Petrum repugnare convenire alio a Petro.</text:p>
      <text:p text:style-name="P371">Igitur, ad argumentum negatur minor. Quinimo solum Petrum, sicut de formali, ita de materiali significat. Sed est dubium de ly ‘entia’ quae sunt Petrus.</text:p>
      <text:p text:style-name="P372">Dicunt enim quidam dictum terminum habere termino inferiores in supponendo, nam supponit pro materia et forma Petri, et pro eadem forma et tribus tertiis materiae (si extrema fiat media, et reuniantur), et haec (dicunt) non sunt illa. Unde partim inferunt terminum quidem esse communem in /23a/ supponendo, ac partim quod licet sit singularis, nihilominus habet terminos inferiores, cum tamen utrumque modo inte<text:span text:style-name="T361">lligendi dissonet.</text:span></text:p>
      <text:p text:style-name="P373"><text:soft-page-break/><text:span text:style-name="T361">Hic est dubium an haec materia per transpositionem partium composita sit eadem cum prima. Et videtur quod sic, nam cum ly ‘haec materia’ sit terminus absolutus, non connotat hunc vel illum modum compositionis partium. Et tunc non currit argumentum. Non enim stat ly ‘entia’ quae sunt Petrus supponere pro aliquo quin pro illo supponat haec entia quae sunt Petrus (haec forma et hac materia demonstratis). </text:span><text:span text:style-name="T362">Si tamen teneatur hanc materiam non esse illam, forsan quis diceret quod nec sit idem Petrus, quare etiam non currit arguentum, quia tunc ly ‘entia’ quae sunt Petrus non supponeret pro his. Sed certe illa variatio partium non tollit quin sit idem Perus, quinimo (ut primus tractatus monstrabitur) non tolleret quamquam aliqua pars perderetur. Et ideo dato quod haec materia non sit illa dicitur ad argumentum, quod cum haec entia fuerint illa.</text:span></text:p>
      <text:p text:style-name="P378">Hoc sufficit ut non dicantur plura, sufficienter ad hoc quod terminus supponens pro illis dicatur communis. Et inde sequitur dictum terminum non esse superiorem ad alios signatos.</text:p>
      <text:p text:style-name="P378">Non enim sufficit quod supponat pro utroque et quod possit supponere pro altero, altero non supponente, nam tunc ly ‘Petrus’ esset superior ad ly ‘Petrus albus’, et ly ‘Petrus niger’ (quod nullus sane diceret), sed requiritur quod supponat pro illo pro quo inferior, et pro aliquo alio quod non potest esse primum.</text:p>
      <text:p text:style-name="P377"><text:span text:style-name="T362">Aliter arguitur hic et quidem urgentius, ly ‘Petrus’ supponit pro Petro iuvenem et sene, pariter </text:span><text:span text:style-name="T363">pro toto Petro et pro eodem dempta manu et haec sunt plura; ergo supponit pro pluribus ac proinde est terminus communis. Sed hoc argumentum, quia videtur lactentibus Terministis duriusculum, in caput de quantitate propositionis ipsum reiecimus.</text:span></text:p>
      <text:h text:style-name="Heading_20_3" text:outline-level="3">Singulare duplex est, determinatu et vagum</text:h>
      <text:list text:style-name="L37">
        <text:list-item>
          <text:p text:style-name="P577">Singulare determinatum est quod grammatici dicunt nomen proprium, ut ly ‘Petrus’.</text:p>
        </text:list-item>
        <text:list-item>
          <text:p text:style-name="P577">Singulare vagum est nomen commune cum signo demonstrativo, ut ‘hic homo’.</text:p>
        </text:list-item>
      </text:list>
      <text:p text:style-name="P214">Fortasse tamen in mente tam hoc quam illud potest esse simplex notitia, sed differunt, quia per notitiam quae est singulare determinatum possumus certificari de omnibus accidentibus et praedicatis rei, quae notitia exprimitur per ly ‘Petrus’, quam forsan in via numquam habemus, sed per notitiam quae est singulare vagum non de omnibus, ut cum viso obiecto a remotis, concipimus notitiam eius singularem, quae exprimitur per ly ‘hoc ens’, ‘hoc animal’ et caetera.</text:p>
      <text:p text:style-name="P214">Additur a Porphyri<text:span text:style-name="T364">i singulare ex suppositione, ut Sophronisci filius (si solus Socrates sit ei filius). Sed hoc non est simpliciter dicendum singulare, qui nec tantum unum significat nec pro solo uno potest supponere.</text:span></text:p>
      <text:p text:style-name="P215">Sed circa singulare vagum fortasse quaeritur an possit pronomen demonstrare quem aliquam, nisi mediante termino eam significante. Nequaquam, non est enim intelligibilis haec propositio “Hic homo est lapis” lapide demonstrato, nisi intelligatur a parte subiecti nomen, significans lapidem, scilicet hoc existens homo est lapis, aut quomodocumque proportionabiliter.</text:p>
      <text:p text:style-name="P219">Quaeris deinde an nomen discretum possit singularizari. Potest quidem in voce ad tollendam aequivocationem, ut is dicas interest inter hunc et illum Petrum, et potest in voce distribui secundum aequivocam significationem ut si dicas: “Omnis Petrus habet patronum divum Petrum”. Et fortasse potest etiam distribui secundum univocam significationem, quando videlicet est complexum ex communi termino et singulari, ut hic “Omne ens quod est Petrus est homo”, quamquam fortasse recte dici ly ‘omne’ non totum sed parte distribuere.</text:p>
      <text:p text:style-name="P219"><text:soft-page-break/>In mente autem, cum ibi non detur unicus conceptus plures Petrus aequivoce significans, nec potest distribui nec congrue pro nomine demonstrativo determinari.</text:p>
      <text:p text:style-name="P222">Statuuntur communiter regulae quaedam ad cognoscendum inter terminos complexos, quis nam sit communis quisve singularis. <text:span text:style-name="T365">At re vera cum de particularibus non sit scientia, non possunt nisi minus certe et plures quam quae sub certo numero comprehendi possent constitui. Ob idque inutile duximus, eas in praesentiarum adducere. Neque potest aut brevius aut certius signum praefigi ad cognoscendum terminos communes /</text:span><text:span text:style-name="T368">23b</text:span><text:span text:style-name="T365">/ et discretos, etiam in terminis complexis quam definitiones ipsae.</text:span></text:p>
      <text:h text:style-name="Heading_20_3" text:outline-level="3"><office:annotation office:name="__Annotation__3614_1061363358" loext:resolved="false"><dc:creator>Unknown Author</dc:creator><dc:date>2025-09-04T21:04:29.576373716</dc:date><text:p text:style-name="P593"><text:span text:style-name="T454">Inter terminos communes, ille qui omne ens universaliter significat, appellatur transcendens.</text:span></text:p></office:annotation>Inter terminos communes, ille qui omne ens universaliter significat, appellatur transcendens<office:annotation-end office:name="__Annotation__3614_1061363358"/></text:h>
      <text:p text:style-name="P222"><office:annotation office:name="__Annotation__2893_763996628" loext:resolved="false"><dc:creator>Unknown Author</dc:creator><dc:date>2025-09-13T22:09:19.557064232</dc:date><text:p text:style-name="P594"><text:span text:style-name="T454">Qui de incomplexis sunt sex, designati per hanc dictionem Reubau, scilicet ‘res’, ‘ens’, ‘unum’, ‘bonum’, ‘aliquid’, ‘verum’. Quorum primus, secundus et quintus sunt absoluti, reliqui autem qui dicuntur passiones entis sunt connotativi.</text:span></text:p></office:annotation><text:span text:style-name="T366">Qui de incomplexis sunt sex, designati per hanc dictionem Reuba</text:span><text:span text:style-name="T367">u</text:span><text:span text:style-name="T366">, scilicet ‘res’, ‘ens’, ‘unum’, ‘bonum’, ‘aliquid’, ‘verum’. Quo</text:span><text:span text:style-name="T369">rum primus, secundus et quintus sunt absoluti, reliqui autem qui dicuntur passiones entis sunt connotativi.</text:span><office:annotation-end office:name="__Annotation__2893_763996628"/><text:span text:style-name="T366"> </text:span><text:span text:style-name="T365"><text:s/></text:span></text:p>
      <text:p text:style-name="P223">Connotat enim ly ‘unum’ quod sit sibi ipsi idem et a quocunque alio diversum, et ly ‘verum’ quod sit intellectus immutativum, et ly ‘bonum’ quid sit voluntatis attractivum.</text:p>
      <text:p text:style-name="P223">Aut (si mavis) ly verum significat ens ut habet ordinem, adeo tamquam ab eo procedens, et ly ‘bonum’ ordinem ad Deum tanquam ad eum tendens.</text:p>
      <text:p text:style-name="P223">In terminis autem complexis, plures sunt transcendentes quam qui facile numerari possent.</text:p>
      <text:p text:style-name="P223">Dividunt terminum transcendentem in transcendentem in significando et supponendo, et transcendentem in significandum tantum.</text:p>
      <text:p text:style-name="P223">Opinantes ly ‘Chimaera’ omne ens, etiam verum de materiali significare, pro quo tamen repugnat ei supponere. Sed iamiam probabitur nullo modo ly ‘Chimaera’ significare vera entia, quare omen transcendens in significando est etiam in supponendo iuxta mutuam connexionem significationis et suppositionis in omnibus observandam.</text:p>
      <text:p text:style-name="P224">Praeter hos sunt etiam termini supra transcendentes, utputa qui non solum pro veris, sed pro possibilis aut imaginabilibus entibus supponunt, ut ly ‘possibile’, ‘intelligibile’ et caetera.</text:p>
      <text:p text:style-name="P220"/>
      <text:h text:style-name="Heading_20_2" text:outline-level="2">Capitis decimi. Lectio prima</text:h>
      <text:h text:style-name="Heading_20_3" text:outline-level="3">Terminorum categorematicorum alius connotativus et alius absolutus</text:h>
      <text:list text:style-name="L38">
        <text:list-item>
          <text:p text:style-name="P527"><text:span text:style-name="T370">Terminus connotativus est terminus qui praeter suum materiale aliud adicere vel </text:span><text:span text:style-name="T371">non adiacere significat, ut ly ‘clarum’/ ly ‘obscurum’.</text:span></text:p>
        </text:list-item>
        <text:list-item>
          <text:p text:style-name="P528">Terminus absolutus est terminus qui praeter suum materiale nihil aliud adiacere vel non adiacere significat, ut ly ‘homo’.</text:p>
        </text:list-item>
      </text:list>
      <text:p text:style-name="P221"><text:span text:style-name="T372">Categorematicorum, nam termini syncategorematici, neque connotativi dicuntur neque absoluti, nisi fortasse secundum categorematicam significationem, ut conceptus non-ultimatus de ly ‘omnis’, quo se obiective repraesentat adaequate est absolutus, et quo se et sua similia connotativus.</text:span><text:span text:style-name="T369"> <text:s text:c="3"/></text:span><text:s text:c="2"/></text:p>
      <text:p text:style-name="P216"><text:soft-page-break/><text:span text:style-name="T373">Praeter suum materiale. Scito terminum connotativum duo significare, alterum secundum scilicet per modum alteri adiacentis , ut quomodolibet proportionabiliter se habentis, ut ‘album’ / ‘albedinem’, ‘creator’ / ‘creatura’. Alterum tanquam id cui aliud adiacet, ut ‘album corpus’. Et hoc quia significatur per modum materiae, pro quo subinde terminus natus est supponere dicitur materiale. Illud autem, quia significatur per modum formae appellatur formale.</text:span></text:p>
      <text:p text:style-name="P225">Aliud, id est, aliam rem vel aliqualem modum se habendi ipsius materialis, quandoquidem ly ‘idem’ et fortasse ly ‘vigilas’ / ‘dormiens’, caeteraque id genus, non significat de formali res a suis suppositis disiunctas.</text:p>
      <text:p text:style-name="P226">Adiacere vel quomodolibet proportionabiliter circa ipsum materiale se habere, ut et ly ‘creator’ significat creaturam, et ly ‘pater’ filium et caetera, quo fit ut ly ‘homo’ (supposito etiam ‘humanitas’ a supposito ‘humano’ distinguatur) non sit terminus terminus connotativus, quia licet significet naturam in supposito, non tamen per modum adiacentis.</text:p>
      <text:p text:style-name="P227">Nec convertuntur ‘connotativum’ et ‘concretum’, nam ly ‘notitia’, ‘scientia’ et caetera, abstrahentes a subiecto, termini sunt connotativi de materiali qualitates, et de formali immutationem significantes. Quare terminus connotativus non tam proprie dicitur praeter subiectum significare accidens quam praeter materiale, quod est dicere praeter id pro quo supponit. Notato tamen pro modo loquendi (quod quarto capitulo secundae partis plene habes expositum) non esse absolute concedendum ly ‘album’ significat corpus aut omne illud quod imaginatur esse album, sed album quod imaginatur esse, id est, illud cuius si esset, hic conceptus album esset naturalis similitudo.</text:p>
      <text:p text:style-name="P228">Ita enim habet exprimi ampliatio de ly ‘significat’, ut tamen servetur eius appellatio.</text:p>
      <text:p text:style-name="P217"><text:span text:style-name="T374">Sed quaeris quid de materiali significet terminus connotativus. /24a/ </text:span><text:span text:style-name="T375">Significat illud cui non repugnat ab eius formali denominari, verbi gratia, ly ‘album’ significat omne corpus, nam esto velles admittere ‘</text:span><text:span text:style-name="T376">albedinem’ indivisibilibus substantiis posse advenire, non tamen potest easdem nominare, et ly ‘risibile’ solos homines de materiali significat. Non enim possum assentire quodlibet ens de materiali significare.</text:span></text:p>
      <text:h text:style-name="Heading_20_3" text:outline-level="3">Statui solent duae regulae quibus terminus connotativus cognoscat</text:h>
      <text:list text:style-name="L39">
        <text:list-item>
          <text:p text:style-name="P529">Prima: Quando modus significandi termini exprimitur per ly ‘habens’, aut quodammodo se habens.</text:p>
        </text:list-item>
        <text:list-item>
          <text:p text:style-name="P530">Secunda: Quando terminus re eadem manente potest supponere et non supponere pro illa.</text:p>
        </text:list-item>
      </text:list>
      <text:p text:style-name="P229">Omnis enim terminus qui desinit supponere est propter defectum vel rei significatae vel connotationis. Sed revera prima non est omnino certa, nam ly ‘homo’ probe resolvitur per ly ‘habens humanitatem’, quinetiam theologi nequeunt ly ‘Deus’ absolute dictum et ut dicitur de Tribus Personis commodius resolvere quam per ly ‘habens deitatem’.</text:p>
      <text:p text:style-name="P218"><text:span text:style-name="T377">Secunda certa forsan est, sed par</text:span><text:span text:style-name="T378">ticularis pro terminis accidentaliter transmutabiliter connotativus. Nam in connotativis intrinsece non sequitur “Hic terminus non potest desinere supponere pro re pro qua modo supponit; ergo non est connotativus”, unde non sunt aliae certe universalesque regulae quibus terminus connotativus ab absoluto discernatur quam definitiones ipsae.</text:span></text:p>
      <text:h text:style-name="Heading_20_3" text:outline-level="3"><text:soft-page-break/>Terminorum connotativorum, alius essentialiter et alius connotat accidentaliter</text:h>
      <text:list text:style-name="L40">
        <text:list-item>
          <text:p text:style-name="P531">Essentialiter: qui tamen partem aliquam aut perfectionem essentialem suo materiali adiacere significat, ut ly ‘rationale’ / ‘spirituale’ et caetera.</text:p>
        </text:list-item>
        <text:list-item>
          <text:p text:style-name="P532">Accidentaliter: qui accidens aliquod suo materiali adicere vel non adiacere significat. Accidens inquam aut modum accidentalem, ut ly ‘album’ / ‘vigilans’ et caetera.</text:p>
        </text:list-item>
      </text:list>
      <text:p text:style-name="P230">Dixerim in prima definitione tamen, quia hoc complexum rationale ‘album’ et similia non quidem essentialiter sed accidentaliter dicuntur de significatione totali connotare.</text:p>
      <text:p text:style-name="P230">Et potest terminus accidentaliter connotare vel intrinsece vel extrinsece.</text:p>
      <text:list text:style-name="L41">
        <text:list-item>
          <text:p text:style-name="P533">Intrinsece: cum accidens proprium et intransmutabile suo materiali adiacere significat, ut ly ‘risibile’ / ‘hinnibile’ et caetera.</text:p>
        </text:list-item>
        <text:list-item>
          <text:p text:style-name="P533">Extrinsece: cum aliquod accidens commune et transmutabile suo materiali adiacere significat, ut ly ‘album’.</text:p>
        </text:list-item>
      </text:list>
      <text:p text:style-name="P231">Rursus terminorum connotativorum, alius positivus, alius negativus et alius privativus.</text:p>
      <text:list text:style-name="L42">
        <text:list-item>
          <text:p text:style-name="P534">Positivus: qui rem <text:span text:style-name="T379">a</text:span>liquam aut modum <text:span text:style-name="T379">aliquem se habendi circa suum materiale significat, ut ly ‘illuminatum’ / ly ‘videns’.</text:span></text:p>
        </text:list-item>
        <text:list-item>
          <text:p text:style-name="P535">Negativus: qui alicuius negationem circa suum materiale significat, ut ly ‘non illuminatum’ / ‘non videns’.</text:p>
        </text:list-item>
        <text:list-item>
          <text:p text:style-name="P534"><text:span text:style-name="T379">Privativus: qui carentiam formae in subiecto apto nato significat, ut ly ‘tenebrosum’, ‘caecus’ et caetera.</text:span> <text:s text:c="2"/></text:p>
        </text:list-item>
      </text:list>
      <text:h text:style-name="P474" text:outline-level="2">Capitis decimi. Lectio secunda</text:h>
      <text:h text:style-name="P485" text:outline-level="3">Contra haec tamen arguitur: Ly ‘Petrus’ est terminus connotativus et tamen praeter suum materiale nihil aliud adiacere significat; ergo prima definitio non est bona</text:h>
      <text:p text:style-name="P379">Probatur maior, stat ly ‘Petrus’ non supponere pro re pro qua nunc supponit ipsa existente ergo. Et monstratur antecedens. Ante baptismum Petri, ly ‘Petrus’ non verificabatur de illo et nunc verificatur, ergo. Tertio, post mortem Petri materia et forma quae significantur per ly ‘Petrus’ remanent, pro quibus tamen nunc temporis non supponit, ergo.</text:p>
      <text:p text:style-name="P380">Secundo: Ad principale arguitur, ly ‘album’ est terminus connotativus et tamen non significat materiale et formale, ergo dicta definitio nulla. Probatur minor ex Aristotele, in Praedicamentis, dicente ‘album’ solum qualitatem significat, quod Sanctus Thomas, tertio, distinctio quinta, confirmat dicens nomen adiectivum solam formam significare.</text:p>
      <text:p text:style-name="P384">Tertio: Ad idem principale, ly ‘Chimaera’ est terminus connotativus, et tamen nihil significat; ergo dicta definitio falsum supponit. Probatur minor, ly ‘Chimaera’ Chimaeram significat, et Chimaera nihil est; ergo nihil significat.</text:p>
      <text:h text:style-name="Heading_20_3" text:outline-level="3"><text:soft-page-break/>Ad primum, negatur maior</text:h>
      <text:p text:style-name="P381"><text:span text:style-name="T380">(</text:span><text:span text:style-name="T381">S</text:span><text:span text:style-name="T380">ecundum significationem qua significat Petrum verum, nam secundum quo analogice significat effigiem Petri, constat terminum esse connotativum) et ad probationem negatur antecedens, ad cuius primum /24b/ argumentum distinguitur antecedens, videlicet, quod ly ‘Petrus’ </text:span><text:span text:style-name="T382">ante baptismum Petri non verificaretur de illo vel in voce aut scripto, conceditur, nam tunc dictum nomen non erat illi impositum vel in mente, negatur.</text:span></text:p>
      <text:p text:style-name="P382">Modo ad hoc quod terminus sit absolutus, sat est conceptum eius ultimatum non posse non supponere pro re pro qua quandoque supponit, ipsa existente.</text:p>
      <text:p text:style-name="P383">Conceditur enim de Adam quod fuit homo licet vivens non sic Latine appellaretur, et de Deo hic ab aeterno fuit Deus, cum tamen ab aeterno non vocaretur Deus, ac proinde haec vocalis “Hic est Deus”, tempore Neo, non erat vera. Sufficit enim ad veritatem illius de praeterito quod it erat tunc, sicut significabatur per mentalem, cui haec “His est Deus” modo subordinatur.</text:p>
      <text:p text:style-name="P390">Ad secundam demum probatiunculam negatur consequentia, cum ex illo antecedente implicite infertur ly ‘Petrus’ esse connotativum. Nam requireretur ad illud quod manente re ipsa significata in singulari, dictus terminus non supponeret pro illa, quod est dicere quod si talis terminus desinit supponere ‘est’, quia res de per se significata desinit esse.</text:p>
      <text:p text:style-name="P390">Sed dubitabis fortasse de ly ‘homines’ sic. Stat res significatas per dictum terminus ‘existere’ quando non supponat pro illis; ergo est terminus connotativus.</text:p>
      <text:p text:style-name="P390">Antecedens patet. Mortibus hominibus, partibus remanentibus, et consequentia, quia cum pluraliter supponat pro illis, pluraliter est arguendum ad cognoscendum an propter defectum rerum, propter defectum vel connotationis desinat supponere.</text:p>
      <text:p text:style-name="P390">Hoc argumentum cum multis difficultatem faciat, nullam tamen videtur secum afferre. Igitur distinguitur antecedens vel res significatas de per accidens, transeat et negatur consequentia, vel de per se negatur.</text:p>
      <text:p text:style-name="P390">Res significatae de per se sunt homines, id est, homo et homo et caetera, et de per accidens materiae et formae, scilicet, materia et forma et materia et forma.</text:p>
      <text:p text:style-name="P385">Intelligitur ergo signum superius positum quod quando re aut rebus de per se significantis per terminum existentibus, talis terminus potest supponere et non supponere, cognoscitur terminus esse connotativus.</text:p>
      <text:p text:style-name="P385">Aliter posset hic suaderi ly ‘homo’ esse terminum connotativum, quia videlicet nunc non supponit pro residuo dempta manu qua abscisa supponeret pro illo; ergo connotat totalitatem, sed hoc in de quantitate propositionis.</text:p>
      <text:h text:style-name="Heading_20_3" text:outline-level="3">Pro solutione secundi principalis notato terminum connotativum dupliciter posse considerari, aut videlicet cum substantive aut cum adiective tenetur</text:h>
      <text:p text:style-name="P391">Cum enim tenetur substantive, significat et materiale et formale, et fortassis habitudinem inter utrumque.</text:p>
      <text:p text:style-name="P388">Dicitur enim ly ‘album’ significare albedinem concertando subiectum, unde videtur habitudo inter accidens et subiectum per dictum terminum significari. Quare diximus supra ly ‘sanum’ diversis <text:soft-page-break/>conceptibus significare animal et urinam, quia diversas habitudines significat, nisi fortasse diceres quod significat habitudinem communiter abstrahendo ab hac vel ab illa.</text:p>
      <text:p text:style-name="P386">Sed contra: Ergo terminus connotativus significat proportionaliter, nam verbi gratia, ‘album’ significat corpus, connotando quod habeat albedinem; ergo significat vere vel false.</text:p>
      <text:p text:style-name="P386">Negatur consequentia, nam dictum verbum (quod universaliter notato in explicationibus connotativorum terminorum) ponitur loco nominis exprimentis habitudinem connotative significatam. Itaque tantundem est dicere “Sanum significat animal” connotando quod habeat sanitatem, et urinam connotando quod significet, et medicinam connotando quod eam efficiat. Ac si diceres significat animal connotando habitudinem (ut sic loquar) sanitatis, et urinam connotando significationem, et medicinam connotando efficientiam sanitatis.</text:p>
      <text:p text:style-name="P392">Sed quaeris materiale ne an potius formale sit principalius significatum? Supponatur hic quid res habeat. Constat terminum connotativum non significare materiale nisi propter ordinem quem habet ad formale. Non enim ly ‘album’ potius significaret corpus quam ly ‘homo’ / ‘equum’, nisi quia corpus potest habere albedinem. Constat ex alia parte ly ‘album’ ex modo significandi concretivo significare habitudinem corporis ad albedinem. Itaque corpus sit radix habitudinis. Et ideo terminus dicitur illud significare in recto, et solum pro illo posse supponere /25a/.</text:p>
      <text:p text:style-name="P387"><text:span text:style-name="T383">Igitur quantum ad nomen fortasse propter primam rationem posset formale dici principalius, et materiale consignificatum, veruntamen iam abiit in usum ut propter secundam ma</text:span><text:span text:style-name="T384">teriale dicatur principalius, et significatio de formali dicatur connotatio termini.</text:span></text:p>
      <text:p text:style-name="P393">Cum autem terminum connotativus adiective tenetur, potest de illo dupliciter opinari.</text:p>
      <text:p text:style-name="P389"><text:span text:style-name="T384">Primo quod significet tantum formam, et fortasse habitudinem ad significandum sui substantivi, </text:span><text:span text:style-name="T385">non significando aliquid de materiali, ut ly ‘albus’ in hoc complexo ‘Petrus albus’ non significat aliquid de materiali sed albedinem in ordine ad Petrum iuxta modum loquendi grammaticorum, dicentium adiectivum esse quod adiectum substantivo significat in eo aliquod accidens, secundum quam opinionem adiectivum substan</text:span><text:span text:style-name="T386">tive tentum differunt quia hoc materiale, formale et habitudinem significat. Illud autem formale solum cum habitudine.</text:span></text:p>
      <text:p text:style-name="P400">Potest aliter dici adiectivum substantive tentum et adiective tentum idem significare solumque grammaticaliter differre, quod apparenter fulciri potest. Nam vel ly ‘albus’ significat solam albedinem (ut quidam volunt) et tunc nihil differret a ly ‘albedo’, vel albedinem cum habitudine ad significatum substantivi, et tunc videtur ipsum substantivum quodammodo significare.</text:p>
      <text:p text:style-name="P400">Non enim facile intelligitur significari habitudo, sine hoc quod quodammodo duo significentur extrema. Item ly ‘albus’ verificatur de Petro tamquam totale praedicatum in hac “Petrus est albus” (ut videbitur secunda parte huius); ergo quodammodo significat ipsum.</text:p>
      <text:p text:style-name="P401">Ad haec idem conceptus potest substantive et adiective teneri; ergo idem significat. Et probatur antecedens, quis non videtur quare conceptus ‘album’ qui prius solitarie ac proinde substantive tenetur, non possit adveniente ly ‘animal’ adiectivari cum illo. Quin etiam ita videtur contingere cum successive audio “Album animal currit”. Quare secundum hanc opinionem (dicunt quidam) differunt adiectivum substantive tentum et adiective tentum, quia hoc includit suum substantivum, illud vero non.</text:p>
      <text:p text:style-name="P402"><text:soft-page-break/>Non tamen potest plane intelligi modus ille quo ipsum includit. Et ideo dicendum quod differunt ex parte appellationis, nam hoc appellat suum formale adiacere, non suo materiali, sed significato sui substantivi, illud vero suo materiali, quod secunda parte exactius explanabitur.</text:p>
      <text:p text:style-name="P402">Et si contra arguas, ergo sensus huius propositionis “Petrus albus disputat” est huiusmodi: “Petrus corpus album disputat” qui est ineptus. Negatur consequentia, quia tamen appellat suum formale, non corpori in communi, sed soli Petro adiecere propter convenientiam grammaticalem quam habet cum ly ‘Petrus’ non potest illo modo exprimi sensus dictae propositionis. Igitur ad argumentum concessa maiori distinguitur minor, videlicet, quod ly ‘album’ non significet materiale et formale, aut scilicet cum substantive tenetur, negatur simpliciter.</text:p>
      <text:p text:style-name="P394">Nec auctoritates ille aut quaevis aliae te inpositum moveant. Antiqui enim nomine adiectivi semper intelligunt ipsum adiective tentum, nam cum substantive tenetur inter substantiva computatur ab illis censeturque subinde inferre secum suum substantivum (ut verbis Sanctus Thomas prima., quaestio tricesima nona utar), id est, <text:span text:style-name="T387">significare suum materiale pro quo supponit.</text:span></text:p>
      <text:p text:style-name="P403">Si autem intelligatur minor de adiectivo adiective tento, iuxta primam opinionem recitatam, conceditur quod tantum significat formale, sed nihil contra definitionem in qua ly ‘praeter’ non designat quod utrumque significat, sed quod alterum sit suppositum adiectivi et alterum eius significatum. Et propterea non diximus praeter materiale significatum, sed solum materiale.</text:p>
      <text:p text:style-name="P394"><text:span text:style-name="T388">Si quis secundo modo voluerit opinari (est enim uterque opinabilis) negata minore potest dici, ad illud Aristotelis, quod fortasse</text:span> <text:span text:style-name="T388">non habet sic vera lectio, sed sicut transfert Argyropylus “Album solum quale significat” et re vera Graeco non Pioteta, quod latine est qualitatem, sed Pion quod est quale legitur. Si autem imitaris translationem Boethii, dictio Aristotelis </text:span><text:span text:style-name="T389">solam formalem, reputasse significationem termini, et eodem modo respondendum est Sancti Thomae, quamquam hoc secunda parte huius accuratius examinabitur. <text:s text:c="2"/></text:span><text:span text:style-name="T388"><text:s text:c="2"/></text:span><text:s/></text:p>
      <text:h text:style-name="Heading_20_3" text:outline-level="3">Ad tertium Chimaera, quia mons quidam est Lyciae in vertice leonibus, in pedeque serpentibus abundans, et in medio caprarum pascuis, fingitur a poetis</text:h>
      <text:p text:style-name="P395">Ovidio narrante monstrum quo<text:span text:style-name="T391">d</text:span>dam esse ex capite leonis, cauda serpentis, et dorso /<text:span text:style-name="T390">25b</text:span>/ caprae, quae est eius definitio. Et fortasse est nomen absolutum illius speciei monstri. Dialectici tamen utuntur eo loco nominis connotativi.</text:p>
      <text:p text:style-name="P395">Sed adhuc hoc dato non bene definitur, quod sit ens compositum ex impossibilis posse componi. Nam certe tunc in sua connotatione involucret contradictionem, ob idque fortasse ex modo suae significationis repugnaret supponere pro aliquo, quod est falsum.</text:p>
      <text:p text:style-name="P396">Aliud enim est quod ly ‘Chimaera’ significet <text:span text:style-name="T392">aliquid impossibile (ut declarat prima descriptio) et aliud quod connotet ipsam impossibilitatem, ut declarat secunda.</text:span></text:p>
      <text:p text:style-name="P405">Dicunt deinde nonnulli, dictum nomen de materiali quodlibet ens mundi significare cum illa connotatione repugnante. Sed etiam hoc videtur cum communi modo concipiendi pugnare.</text:p>
      <text:p text:style-name="P397"><text:span text:style-name="T392">Mirum enim est dicere quod ly ‘Chimaera’, Deum, hominem, lapidem et caetera significet. Et probatur etiam repugnare rationi. Terminus connotativus solum significat de materiali illud cui formale non repugnat convenire, sed conpositioni importatae per ly ‘Chimaera’ intrinsece repugnat convenire homini, aut cuivis </text:span><text:span text:style-name="T393">vero enti (si enim esset Chimaera nec esset Deus nec creatura nec substantia nec accidens); ergo ly ‘Chimaera’ de materiali non significat vera entia, sed solum ens </text:span><text:soft-page-break/><text:span text:style-name="T393">ficticium et imaginabile. Ponitur tamen ly ‘ens’ in eius definitione quia non habemus aliud nomen communis impositum ad significandum illud ens ficticium.</text:span></text:p>
      <text:p text:style-name="P406">Igitur ad argumentum negatur minor, et ad probationem negatur consequentia. Arguitur enim a non amplo ad amplum negative ex parte illius termini ‘ens’ inclusi in ly ‘nihil’, nam ly ‘significat’ / ‘ampliat’ terminum rectum ab illo usque ad imaginabilia iuxta modum secunda parte, capitulo quarto, exponendum.</text:p>
      <text:p text:style-name="P398"><text:span text:style-name="T394">Dubitant plurimi de conceptu cui subordinatur ly ‘Chimaera’, partim opinantibus subordinari conceptui complexo suae definitionis, partim asserentibus ad minus illum conceptum semper supponere. Videtur tamen contra experientiam dicere quod audita haec voce ‘Chimaera’ tot conceptus formet intellectus. Quare (ut opinor) dicendum est, primum conceptum quem quis habet Chimaera conflari ex conceptibus capitis leonis et conceptum caudae draconis et caetera, effingitis unum simplicem connotativum significantem monstrum illud, postquam tamen pluries effingeretis. Re vera non opus est tot conceptus formare, sed quam primum audita voce ‘Chimaera’ producitur conceptus ille simplex ab speciebus ipsius. Et idem dicendum de quocumque conceptu rei quam non vidimus.</text:span></text:p>
      <text:p text:style-name="P407">Ly ‘homo irrationalis’, ‘angelus albus’ et similes eodem modo significant entia fictitia, sicut ly ‘Chimaera’, nam quamquam albedo possit poni in angelo miraculose fortasse non cum denominabit. Ly ‘non-intelligibile’ significat negationem intelligibilis.</text:p>
      <text:p text:style-name="P407">Et si arguis non-intelligibile non est intelligibile; ergo non est significabile; ergo ly ‘non-intelligibile’ non significat. Conceditur primum antecedens in quo negatur terminus finitus de seipso infinitato, et conceditur prima consequentia, nam significabile et intelligibile convertuntur, sed negatur secunda consequentia, quia solum sequitur quod ly ‘non-intelligibile’ non significat aliquod ens verum vel imaginabile; significat tamen negationem entis.</text:p>
      <text:p text:style-name="P408">Sed quaeris an possit supponere in ordine ad aliquam copulam. Certe (ut credo) non, quinimo habet non suppositionem annexam, sicut ly ‘non-significabile’. Detur enim quod in hac propositione “Non-intelligibile imaginario est”, subiectum supponat, tunc sic arguitur: “Ergo aliquod ei significatum respondet; ergo illud est significabile; ergo intelligibile, ac subinde non est non intelligibile”.</text:p>
      <text:h text:style-name="Heading_20_2" text:outline-level="2">Capitis undecimi. Lectio prima</text:h>
      <text:h text:style-name="Heading_20_3" text:outline-level="3">Terminorum categorematicorum, alius primae intentionis et alius secundae intentionis</text:h>
      <text:list text:style-name="L43">
        <text:list-item>
          <text:p text:style-name="P578">Terminus primae intentionis est terminus significans aliquid secundum illud quod in se habet ut ‘homo’, ‘album’.</text:p>
        </text:list-item>
        <text:list-item>
          <text:p text:style-name="P578">Terminus secundae intentionis est terminus significans aliquid secundum quod mentis intentioni subiicitur, ut species nomen.</text:p>
        </text:list-item>
      </text:list>
      <text:p text:style-name="P404"><text:span text:style-name="T395">Definitiones istae quae ex Sancto Thoma, opus</text:span><text:span text:style-name="T397">culum</text:span><text:span text:style-name="T395"> </text:span><text:span text:style-name="T398">42</text:span><text:span text:style-name="T395">, capitulo </text:span><text:span text:style-name="T398">12</text:span><text:span text:style-name="T395">, habentur pro sui, exacta expositione multa praesupponunt, quae tractatum praesentem exuperant, ut tamen in superficie Terministis appareant.</text:span></text:p>
      <text:p text:style-name="P409">Notandum primo aliqua esse quae conveniunt rei in se, quod est dicere quamvis intellectus operatione /26a/ seclusa, ut “Homini esse hominem / esse album” et caetera. Alia sunt quae <text:soft-page-break/>conveniunt rei ex sola intellectus operatione, ut “Homini esse speciem”, “Scripturae esse nomen” et caetera.</text:p>
      <text:p text:style-name="P399"><text:span text:style-name="T396">Cum enim dicimus “Homo est species” non est sensus (ut secunda parte huius manifestabitur) </text:span><text:span text:style-name="T399">quod hic terminus ‘homo’ est species, se quod res ipsa homo est species. Verumtamen proprietas illa non convenit ei nisi in ordine </text:span><text:span text:style-name="T400">ad intellectum, ut videlicet cognoscitur per hunc conceptum ‘homo’ abstrahente ab individuis, nam inquantum cognita per talem conceptum est praedicabilis de pluribus differentibus numero quae est proprietas, a qua res ipsa dicitur species.</text:span></text:p>
      <text:p text:style-name="P416">Item etiam huic scripturae ‘homo’ a parte rei convenit quod sit scriptura quod sit atramentum et caetera, sed quod sit nomen non convenit ei nisi in ordine ad intellectum, id est, quia exprimit conceptum significantem aliquid sine tempore.</text:p>
      <text:h text:style-name="Heading_20_3" text:outline-level="3"><office:annotation office:name="__Annotation__3212_2098517501" loext:resolved="false"><dc:creator>Unknown Author</dc:creator><dc:date>2025-09-18T19:53:54.715240096</dc:date><text:p text:style-name="P593"><text:span text:style-name="T454">Secundo notandum quod intentio iuxta nominis etymologiam est intellectus attentio, id est, cognitio ipsa qua intellectus tendit in rem, et cognitiones significantes proprietates primi generis, ut conceptus ‘homo’, ‘album’ et caetera.</text:span></text:p></office:annotation><text:span text:style-name="T400">Secundo notandum quod intentio iuxta nominis etymologiam est intellectus attentio, id est, cognitio ipsa qua intellectus tendit in rem, </text:span><text:span text:style-name="T401">et cognitiones significantes proprietates primi generis, ut conceptus ‘homo’, ‘album’ et caetera</text:span><office:annotation-end office:name="__Annotation__3212_2098517501"/></text:h>
      <text:p text:style-name="P410">Dicuntur primae intentionis, id est, cognitiones non praesupponentes alias priores, et cognitiones connotantes proprietates secundi generis, ut species ‘nomen’ dicuntur secundae intentionis. Nam cum significent proprietates, quae solum sunt in re per comparationem ad conceptus, praesupponunt conceptus ipso priores.</text:p>
      <text:p text:style-name="P411">Est verumtamen is usu appellare intentiones proprietates ipsas significatas, quae sunt velut obiecta conceptum. Itaque primae intentiones dicantur res ipsae quae sunt ‘homo’, ‘album’ et caetera, et secundae intentiones relationes illae, quae sunt praedicabilitas de pluribus, aut (sicut loquuntur) specieitas / nomineitas et caetera, quamquam primae non dicantur tam proprie intentiones quam secundae.</text:p>
      <text:p text:style-name="P412">Cum tamen dixerim, intentiones secundas esse relationes, non asserui esse res aliqua a suis fundamentis realiter distinctas, non enim possum imaginari, ex hoc quod res cognoscantur per hunc conceptum ‘homo’, aut per alium quemquam, entitatem aliquam pullulare in recognita, sed volui sentire (quod credo Sanctus Thomas et antiquos philosophos sensisse) quod sicut res dicitur alba per accidens quoddam illi inhaerens, ita dicitur species per hoc quod refertur ad talem conceptum, id est, inquantum cognita per conceptum ‘homo’ vel per conceptum ‘equus’ et caetera, quae quidem relatio, <text:span text:style-name="T402">non est nisi quidam modus qui habet in re solum esse intelligibile.</text:span></text:p>
      <text:p text:style-name="P417">Cum igitur audias secundas intentiones pullulare / fundari in re ceterasque id genus transitivas locutiones, sentito novos esse modos qui tantum intelliguntur esse in re.</text:p>
      <text:h text:style-name="Heading_20_3" text:outline-level="3">Ex dictis sequitur ad hoc quod res dicatur species (quod alii dicunt ad hoc quod pullulet intentio speciei) non requiri quod cognoscatur per notitiam comparativam</text:h>
      <text:p text:style-name="P413">Id est, quod cognoscatur esse praedicabilis de Petro, de Paulo et caetera, sed sufficit quod cognoscatur, verbi gratia, per illum conceptum ‘homo’ abstrahentem ab individuis. Et enim intellectum facere universalitatem in rebus (quod ait Avicenna) non est aliud quam abstrahere rem ab individuis, quod certe est cognoscere ipsam per conceptum communem.</text:p>
      <text:p text:style-name="P413"><text:soft-page-break/>Igitur res ut sic cognita, est iam praedicabilis de pluribus, licet numquam cognosceretur sub illa comparatione ad plura, quare cum cognoscitur cum tali comparatione non fit species, sed cognoscitur esse species. <office:annotation office:name="__Annotation__12935_2098517501" loext:resolved="false"><dc:creator>Unknown Author</dc:creator><dc:date>2025-09-18T20:22:18.218022231</dc:date><text:p><text:span text:style-name="T454">Quinetiam ut in re aliqua fundetur secunda intentio, non requiritur quod cognoscatur, nam haec scriptura ‘homo’ non quidem quia cognoscitur aut quia est cognoscibilis ab intellectu, sed quia exprimens eius conceptum fundat intentionem nominis, et dicitur esse nomen (quod in praesentiarum maxime notato).</text:span></text:p></office:annotation>Quinetiam ut in re aliqua fundetur secunda intentio, non requiritur quod cognoscatur, nam haec scriptura ‘homo’ non quidem quia cognoscitur aut quia est cognoscibilis ab intellectu, sed quia exprimens eius conceptum fundat intentionem nominis, et dicitur esse nomen (quod in praesentiarum maxime notato)<office:annotation-end office:name="__Annotation__12935_2098517501"/>.</text:p>
      <text:p text:style-name="P414"><office:annotation office:name="__Annotation__13093_2098517501" loext:resolved="false"><dc:creator>Unknown Author</dc:creator><dc:date>2025-09-18T20:25:50.171947961</dc:date><text:p><text:span text:style-name="T454">Sequitur secundo, quod secunda intentio quae est relatio, non dicitur secunda, quia aliam priorem in re praesupponat. Fingunt enim quidam ex prima cognitione, ut puta cum cognoscimus rem per istum conceptum ‘homo’ pullulare in re relationem quandam, scilicet, cognitionem passivam, quae dicitur prima intentio, cum tamen postea comparatur ad sua individua pullulare secundam, quae est specieitas.</text:span></text:p></office:annotation>Sequitur secundo, quod secunda intentio quae est relatio, non dicitur secunda, quia aliam priorem in re praesupponat. Fingunt enim quidam ex prima cognitione, ut puta cum cognoscimus rem per istum conceptum ‘homo’ pullulare in re relationem quandam, scilicet, cognitionem passivam, quae dicitur prima intentio, cum tamen postea comparatur ad sua individua pullulare secundam, quae est specieitas.<office:annotation-end office:name="__Annotation__13093_2098517501"/></text:p>
      <text:p text:style-name="P415"><office:annotation office:name="__Annotation__13176_2098517501" loext:resolved="false"><dc:creator>Unknown Author</dc:creator><dc:date>2025-09-18T20:27:51.549679697</dc:date><text:p><text:span text:style-name="T454">Sed certe (quidquid sit de illa cognitione passiva) illa non dicitur prima intentio, ut in praesentiarum accipimus quia (ut visum est) quam primum cognoscitur res per illum conceptum ‘homo’ pullulat intentio speciei, quare illa non est prior hac.</text:span></text:p></office:annotation>Sed <text:span text:style-name="T403">certe (quidquid sit de illa cognitione passiva) illa non dicitur prima intentio, ut in praesentiarum accipimus quia (ut visum est) quam primum cognoscitur res per illum conceptum ‘homo’ pullulat intentio speciei, quare illa non est prior hac.</text:span><office:annotation-end office:name="__Annotation__13176_2098517501"/></text:p>
      <text:p text:style-name="P415"><office:annotation office:name="__Annotation__13430_2098517501" loext:resolved="false"><dc:creator>Unknown Author</dc:creator><dc:date>2025-09-18T20:32:36.201859260</dc:date><text:p><text:span text:style-name="T454">Et si dicas adminus esse priorem natura, aliter arguitur: Sicut secunda intentio es proprietas quam significat nomen secundae intentionis, ita prima intentio est illud quod significat nomen primae intentionis, sed hi termini ‘homo’, ‘album’ et similes non significant dictas passivas cognitiones; ergo illae non dicuntur primae intentiones. Item maxime, intentio nominis non praesupponit in ipso nomine cognitionem passivam; ergo secunda intentio non praesupponit primam. Sed dicitur secunda intentio (ut monstratum est) quia est proprietas rei habens esse ex solo ordine ad intellectum, et prima intentio quod sit proprietas conveniens rei sine tali ordine ad intellectum.</text:span></text:p></office:annotation><text:span text:style-name="T403">Et si dicas adminus esse priorem natura, aliter arguitur: </text:span><text:span text:style-name="T404">Sicut secunda intentio es proprietas quam significat /26b/ nomen secundae intentionis, ita prima intentio est illud quod significat nomen primae intentionis, sed hi termini ‘homo’, ‘album’ et similes non significant dictas passivas cognitiones; ergo illae non dicuntur primae intentiones. Item maxime, intentio nominis non praesupponit in ipso nomine cognitionem passivam; ergo </text:span><text:span text:style-name="T405">secunda intentio non praesupponit primam. Sed dicitur secunda intentio (ut monstratum est) quia est proprietas rei habens esse ex solo ordine ad intellectum, et prima intentio quod sit proprietas conveniens rei sine tali ordine ad intellectum.</text:span><office:annotation-end office:name="__Annotation__13430_2098517501"/></text:p>
      <text:h text:style-name="Heading_20_3" text:outline-level="3">Igitur utroque modo potest accipi ly ‘intentio’ in definitione secunda, sed si accipiatur pro intentione obiectiva, quae est relatio, tunc sensus definitionum sunt huiusmodi</text:h>
      <text:list text:style-name="L44">
        <text:list-item>
          <text:p text:style-name="P579"><office:annotation office:name="__Annotation__3898_1429131485" loext:resolved="false"><dc:creator>Unknown Author</dc:creator><dc:date>2025-09-21T23:44:19.480225225</dc:date><text:p text:style-name="P594"><text:span text:style-name="T454">Nomen secundae intentionis est nomen significans rem ut subiicitur intentioni, id est, connotando intentionem, quae per solam considerationem intellectus dicitur esse in re ad extra tamquam in fundamento.</text:span></text:p></office:annotation>Nomen secundae intentionis est nomen significans rem ut <text:span text:style-name="T406">subiicitur intentioni, id est, connotando intentionem, quae per solam considerationem intellectus dicitur esse in re ad extra tamquam in fundamento.</text:span><office:annotation-end office:name="__Annotation__3898_1429131485"/></text:p>
        </text:list-item>
        <text:list-item>
          <text:p text:style-name="P579"><office:annotation office:name="__Annotation__3900_1429131485" loext:resolved="false"><dc:creator>Unknown Author</dc:creator><dc:date>2025-09-21T23:44:33.896669349</dc:date><text:p text:style-name="P594"><text:span text:style-name="T454">Nomen primae intentionis est nomen significans rem secundum illud quod is se habet, id est, non connotando talem intentionem.</text:span></text:p></office:annotation><text:span text:style-name="T406">Et nomen primae intentionis est nomen significans rem secundum illud quod is se habet, id est, non connotando talem intentionem.</text:span><office:annotation-end office:name="__Annotation__3900_1429131485"/></text:p>
        </text:list-item>
      </text:list>
      <text:p text:style-name="P423">Si tamen accipiatur intentio formaliter pro ipsa <text:s/>cognitione, tunc sensus, huiusmodi sunt.</text:p>
      <text:list text:style-name="L45">
        <text:list-item>
          <text:p text:style-name="P580"><office:annotation office:name="__Annotation__3902_1429131485" loext:resolved="false"><dc:creator>Unknown Author</dc:creator><dc:date>2025-09-21T23:45:57.642135846</dc:date><text:p text:style-name="P594"><text:span text:style-name="T454">Terminus secundae intentionis est terminus significans rem ut obiicitur intentioni, id est, connotando proprietatem quae convenit rei ut obiicitur intentioni quae est in intellectu, ut ly ‘species’, vel ut refertur ad intentionem ut ly ‘nomen’.</text:span></text:p></office:annotation><text:span text:style-name="T406">Terminus secundae intentionis est terminus significans rem ut obiicitur intentioni, id est, connotando proprietatem quae convenit rei ut obiicitur intentioni quae est in intellectu, ut ly ‘species’, vel ut refertur ad intentionem ut ly ‘nomen’.</text:span><office:annotation-end office:name="__Annotation__3902_1429131485"/></text:p>
        </text:list-item>
        <text:list-item>
          <text:p text:style-name="P580"><office:annotation office:name="__Annotation__3904_1429131485" loext:resolved="false"><dc:creator>Unknown Author</dc:creator><dc:date>2025-09-21T23:46:13.698411772</dc:date><text:p text:style-name="P594"><text:span text:style-name="T454">Et terminus primae intentionis est terminus non connotans talem proprietatem. Itaque prima definitio accipiatur per negationem contra secundam.</text:span></text:p></office:annotation><text:span text:style-name="T406">Et terminus primae intentionis est terminus non connotans talem proprietatem. </text:span><text:span text:style-name="T407">I</text:span><text:span text:style-name="T406">taque prima definitio accipiatur per negationem contra secundam.</text:span><office:annotation-end office:name="__Annotation__3904_1429131485"/></text:p>
        </text:list-item>
      </text:list>
      <text:p text:style-name="P419">Primus sensus est frequentior in usu apud multos Reales modernos, sed secundum opinor fuisse Sanctus Thomas opusculo 42 et 86.</text:p>
      <text:p text:style-name="P419">Caveto tamen <text:span text:style-name="T408">licet teneas hunc secundum modum, ne concedas terminum secundae intentionis connotare dictum ordinem ad conceptum. </text:span><text:span text:style-name="T409">Nam ly ‘species’ non significat rem connotando quod </text:span><text:soft-page-break/><text:span text:style-name="T409">cognoscatur per ly ‘homo’, sed certe connotando quod sit praedicabilis et caetera, quod convenit rei inquantum sic cognitae.</text:span></text:p>
      <text:p text:style-name="P420">Sequitur tandem hoc terminos ‘definitum propinquum’, ‘aequivocata’ caeteroque id genus esse secundae intentionis, nam significant rest ut subiiciuntur intentioni quomodocumque accipiatur intentio.</text:p>
      <text:h text:style-name="Heading_20_3" text:outline-level="3">Sunt qui terminum secundae intentionis aliter definiant ut puta, quod sit ille qui significat aliqua ea ratione quae est signum vel significatum</text:h>
      <text:p text:style-name="P418"><text:span text:style-name="T406"><text:s/></text:span><text:span text:style-name="T410">Quae tamen definitio neque est iuxta nominis etymologiam neque omnino cum definitio convertitur. Nam ly ‘praedicabile’, ly ‘genus’, ly ‘species’ et caetera, termini sunt secundae intentionis et tamen non significant aliquid ea ratione quae est signum vel significatum, tum quia significat res ipsas quae non sunt signa (ut secunda parte huius videbitur) </text:span><text:span text:style-name="T411">et non connotando quod sint significata, tum maxime, quia licet significent terminos ipsos (ut ipsi opinantur) non tamen connotant quod sint signa, aut quod significent, sed quod sint praedicabiles. Modo neque praedicari neque supponere est inferius ad significare, et adhuc non universaliter, nam termini non significativi dicuntur praedicari et supponere (ut supra visum est).</text:span></text:p>
      <text:p text:style-name="P421">Verum est tamen quod omnis terminus significans aliquid cum connotatione signi vel significati, aut connotatione inferiori, est terminus secundae intentionis, ut ly ‘nomen’, ly ‘definitum’ licet non ediverso.</text:p>
      <text:p text:style-name="P421">Alii adhuc aliter definiunt terminum secundae intentionis, utputa quod sit terminus significans aliquid sub aliqua proprietate grammatica, logica vel rhetorica. Sed nec huiusmodi definitio exponit omnino significantiam definiti, cum quia non est iuxta eius etymologiam, tum etiam quia non est facile percipere quaenam sint proprietates grammaticae, logicae vel rhetoricae. Possunt tamen iuvenes per hanc definitionem quodammodo manuduci ad intelligentiam qualemcumque definiti.</text:p>
      <text:h text:style-name="Heading_20_2" text:outline-level="2"><text:span text:style-name="T412">Capitis undecimi. </text:span>Lectio secunda</text:h>
      <text:h text:style-name="Heading_20_3" text:outline-level="3">Sed contra haec arguitur. Ly ‘terminus mentalis’ si accipiatur incomplexe loco huius complexi / notitia naturaliter proprie significans, est terminus secundae intentionis, et tamen non significat aliquid vt subicitur mentis intentioni; ergo definitio secundae non est bona</text:h>
      <text:p text:style-name="P422">Maior videtur nota, et /27a/ probatur minor. Dictus terminus significat (verbi gratia) illum conceptum ‘homo’, connotando quod significet naturaliter proprie, sed dicta proprietas non convenit tali conceptui ex operatione intellectus, sed ex natura proprie ergo.</text:p>
      <text:p text:style-name="P422">Non (inquam) convenit ei ex operatione intellectus, nam licet ipse conceptus habeat esse per operationem intellectus immo sit ipse terminus ‘operationis’ <text:span text:style-name="T413">significare, naturaliter proprie non convenit ei per ordinem ad operationem intellectus, id est, quantum exprimit conceptum vel inquantum obiicitur conceptui. Dato enim quod ille conceptus ‘homo’ numquam cognosceretur ab intellectu nec intellectus circa ipsum negotiaretur, nihilominus ‘homo’ esse terminus.</text:span></text:p>
      <text:p text:style-name="P429">Secundo arguitur: Hoc complexum ‘terminus primae intentionis’ significat aliquid ut subiicitur intellectus intentioni, et tamen non est terminus secundae intentionis ergo. Maior videtur nota, quia significat aliquid ea ratione quae est terminus quae est proprietas conveniens vocibus per ordinem <text:soft-page-break/>ad conceptus, et minor etiam patet. Terminus primae intentionis est terminus primae intentionis; ergo terminus primae intentionis non est terminus secundae intentionis.</text:p>
      <text:h text:style-name="Heading_20_3" text:outline-level="3">Minor prime argumenti sufficienter (vel fallor / suadetur ibidem)</text:h>
      <text:p text:style-name="P424">Nam certe sicut hoc quod est significare, generaliter dictum, non est proprietas conveniens rebus per ordinem ad conceptus ad sensum iam expositum, quinimo <text:span text:style-name="T414">f</text:span>umo aut vestigio non convenit significare ignem aut animal ex operatione intellectus, sed re vera ex hoc quod sunt eorum effectus. ita nec hoc quod est significare naturaliter proprie convenit conceptibus ex operatione intellectus, sed certe ex propria natura, nec dictae proprietates sunt logicae, grammaticae aut rhetoricae, sed potius physicae seu naturales. <text:span text:style-name="T415">Et ideo termini connotantes dictas proprietates, utputa ‘signum’, ‘conceptus’, ‘notitia’, ‘terminus mentalis’ (ut existimo) non sunt termini secundae intentionis. Unde ad argumentum negarem maiorem.</text:span></text:p>
      <text:p text:style-name="P425">Hoc autem quod est significare, id est exprimere conceptum, est quidem proprietas logicalis quae convenit vocibus per ordinem ad conceptus, de qua proinde dialecticus considerat principaliter, et ideo termini connotantes dictam proprietatem utpote nomen vocale, verbum scriptum vere sunt termini secundae intentionis. Quare cum supra diximus terminus omne significante aliquid ea ratione qua est signum esse secundae intentionis. Accipimus signum pro eo quod exprimit conceptum.</text:p>
      <text:p text:style-name="P426"><text:span text:style-name="T416">Sed est quaere an ly ‘terminus’ dictum univoce de mentali et vocali, ut videlicet connotat hoc quod est significare sive naturaliter sive ad placitum, sit terminus secundae intentionis. Ad hoc, nisi communi usui contravenirem fortasse, respondere negative. Qui tamen affirmativam partem tenere voluerit, dicat: “</text:span><text:span text:style-name="T417">S</text:span><text:span text:style-name="T416">ufficere ad terminum secundae intentionis quod connotet proprietatem quae in aliquo suorum suppositorum non reperitur nisi per ordinem ad conceptus”.</text:span></text:p>
      <text:p text:style-name="P427"><text:span text:style-name="T418">Ad secundum argumentum: Concessa maiori ad sensum proxime expositum, negatur minor, et ad probationem distinguitur antecedens, videlicet, terminus primae intentionis est terminus primae intentionis, quia vel ambo extrema accipiuntur personaliter et tunc conceditur, et conceditur etiam consequentia. </text:span><text:span text:style-name="T419">Sed nihil ad intentionem argumenti, vel ambo extra accipiuntur materialiter, et tunc etiam conceditur, sed negatur consequentia (in consequente subiecto materialiter, et praedicato personaliter tento) vel in dicto antecedente subiectum accipiatur materialiter, et praedicatum personaliter in quo sensu debet accipi pro probatione minoris, et tunc negatur.</text:span></text:p>
      <text:p text:style-name="P430">Haec et similia iuvenum ludo melius sentiuntur.</text:p>
      <text:p text:style-name="P430">Haud dubito aliqua me hic dixisse terminis difficilia, sed qui de terminis secundae intentionis non potui non aliquid dicere, cum sit res necessaria, certe non potui clarius dicere cum sit difficillima.</text:p>
      <text:h text:style-name="P475" text:outline-level="2">Capitis duodecimi. Lectio prima</text:h>
      <text:h text:style-name="Heading_20_3" text:outline-level="3">Terminorum alius complexus et alius incomplexus</text:h>
      <text:list text:style-name="L46">
        <text:list-item>
          <text:p text:style-name="P581">Terminus complexus est terminus habens plures partes significantes iuxta significatione totius, ut ly ‘Petrus et Paulus’.</text:p>
        </text:list-item>
        <text:list-item>
          <text:p text:style-name="P581">Terminus incomplexus est terminus est terminus non habens plures partes significantes iuxta significatione totius, ut ly ‘Petrus’.</text:p>
        </text:list-item>
      </text:list>
      <text:p text:style-name="P428"><text:soft-page-break/>Terminus aliquam habere plures partes significantes iuxta significationem totius est quod eius significatio ex /27b/ significationibus partium constet. Quid quidem duobus signis cognoscitur, <text:span text:style-name="T420">videlicet, exprimendo significationem totius, exprimantur significationes partium, et quod si aliqua pars deponeretur a sua significatione aliis omnibus invariatis, tunc totalis terminus desineret significare ut prius.</text:span></text:p>
      <text:p text:style-name="P428"><text:span text:style-name="T420">Verbi gratia, significatio illius </text:span><text:span text:style-name="T421">copulati ‘Petrus et Paulus’ cognoscitur constare ex significationibus partium. Nam si exprimatur significatio totius, dicendo ‘Petrus et Paulus’ significat Petrum et Paulum, ibi exprimuntur significationes partium, scilicet, quod Petrus significat Petrum et caetera. Et si aliqua pars, utputa si ly ‘Petrus’ non significare Petrum, totum non significaret Petrum et Paulum.</text:span></text:p>
      <text:p text:style-name="P431">Sed significatio de ly ‘dominus’ (quae est significare possidentem servum) non consta ex significationibus illarum partium, esto ly ‘do’ significat dare et ly ‘minus’ significet <text:span text:style-name="T422">nimus, nam cum dicitur ly ‘dominus’ significat dominum ibi non exprimitur quod ly ‘do’ significet dare et ly ‘minus’ minus significet minus. Item, licet utraque illarum partium deponeretur a sua significatione, nihilominus tota significaret sicut et nunc significat (et hoc secundum signum est securius) et ideo ly ‘dominus’ est terminus incomplexus. Idem dicas de ly ‘equiferus’ et similibus.</text:span></text:p>
      <text:p text:style-name="P432">Dixerim in definitione “habens plures partes et caetera” quod intelligatur formaliter vel virtualiter. Si enim ly ‘a’ imponatur ad significandum sicut ly ‘Petrus et Paulus’, esset tunc terminus complexus apud dialecticum, qui speculatur significantias terminorum, nam subordinaretur termino complexo, licet apud grammaticum qui solam vocum habitudines considerat, esset incomplexus, sicut ediverso ly ‘Marcus Tullius’ fortasse apud grammaticos esset complexus, et apud dialecticos incomplexus.</text:p>
      <text:p text:style-name="P438">Nec est idem quod aliquis terminus virtualiter habeat plures partes et quod aequivalenter habeat illa. Nam primum est quod subordinetur in significando conceptui habenti formaliter plures partes, quod sufficit ad terminum esse complexum. Et secundum est quod convertatur cum termino habente plures partes, quod non sufficit ad terminum esse complexum. Etenim ly ‘album’ licet convertatur cum ly ‘habens albedinem’, non tamen est terminus complexus.</text:p>
      <text:p text:style-name="P438">Omnis terminus complexus solet apud dialecticos appellari oratio, licet fortasse ille proprie esset dicendus oratio cuius partes per verbum aliquod coniunguntur.</text:p>
      <text:h text:style-name="Heading_20_3" text:outline-level="3">Complexorum aliud est complexum distans, aliud indistans</text:h>
      <text:p text:style-name="P439">Complexum distans est cuius partes principales aliqua coniunctione coniunguntur, ut ly ‘Petrus et Paulus’, ‘Petrus si est Paulus’, ‘Petrus qui est iustus’ et caetera. Cuius partes principales, quia hoc complexum ‘Petrus amans Deum et proximum’, cuius partes minus principales uniuntur per ly ‘et’ non est complexum complexione distanti, sed potius indistanti.</text:p>
      <text:p text:style-name="P440">Terminus complexus indistans (per oppositum) est terminus cuius partes principales non coniunguntur per aliquod coniungibile, ut ‘animal homo’, ‘Petrus doctus’, ‘Filius hominis’ et caetera. Neque inde sequitur propositionem esse terminum complexum quia non est terminus, licet sit signum complexum. Quare si hanc divisionem libet usque ad propositionem extendere, dicito, signorum localium, aliud complexum et aliud incomplexum.</text:p>
      <text:p text:style-name="P441">Contra hoc tamen arguitur hoc aggregatum “‘b’ est ‘b’” est signum logicale complexum et tamen non habet plures partes significantes iuxta significationem totius; ergo definitio non valet.</text:p>
      <text:p text:style-name="P433"><text:soft-page-break/><text:span text:style-name="T424">Maior ab omnibus conceditur, quia est propositio adhuc consueta, significans “literam ‘b’</text:span><text:span text:style-name="T423"> </text:span><text:span text:style-name="T424">esse literam ‘b’”.</text:span></text:p>
      <text:p text:style-name="P441">Et probatur minor: Illae litterae quae accipiuntur pro extremis non significant; ergo.</text:p>
      <text:p text:style-name="P434">Pro solutione huius argumenti notato quod aliud est conficere propositiones ex nominibus litterarum, ut si scriberes “‘be’ est ‘be’”, “‘be’ non est ‘ce’”, et aliud ex characteribus ipsis, ut si scriberes “‘b’ est ‘b’”, “‘b’ non est ‘c’”, nam primae sunt verae propositiones constantes ex nominibus propriae significationis, cum hoc nomen ‘be’ significet hunc caracterem ‘b’, sicut ly ‘dominicus’, ‘me’. Et ad designandum h<text:span text:style-name="T425">anc litteram “‘b’ esse hanc ‘b’”, et “non esse hanc ‘c’” scribendum per prima propositiones et non per secundas, sicut ad designandum lapidem esse lapidem, non utendum rebus ipsis, sed rerum nominibus.</text:span></text:p>
      <text:p text:style-name="P435"><text:span text:style-name="T425">Verum /28a/ </text:span><text:span text:style-name="T426">est</text:span><text:span text:style-name="T425"> tamen quod interest inter res quae non sunt litterae </text:span><text:span text:style-name="T426">et litteras seu voces. Nam illae neque sunt termini neque habent aliquam proprietatem termini, neque possunt propositiones consuetas conficere.</text:span></text:p>
      <text:p text:style-name="P436"><text:span text:style-name="T426">Litterae autem sicut caeteri termini non significativi, licet non sint termini, habent tamen aliquas terminorum proprietates, utputa conficere propositiones, supponere pro se et caetera, unde “</text:span><text:span text:style-name="T428">H</text:span><text:span text:style-name="T426">ae scripturae ‘</text:span><text:span text:style-name="T427">b’ est littera”, “‘buf’ non est terminus” iam is usu accipiuntur loco harum “‘be’ est littera”, “Haec scriptura ‘buf’ non est terminus”.</text:span></text:p>
      <text:p text:style-name="P437"><text:span text:style-name="T427">Igi</text:span><text:span text:style-name="T429">tur ad argumentum concessa maiori, distinguitur minor, vel quod formaliter non habeat plures partes significantes conceditur, vel virtualiter sic negatur. Nam subordinatur naturalibus similitudinibus illarum litterarum et actui verbali, quae omnes parte proprie significant.</text:span></text:p>
      <text:p text:style-name="P449">Adverte tamen hoc non sufficere ad hoc quod sit propositio, nam si inter duos lapides scriberetur ly ‘est’, illud totum non esset propositio, licet subordinaretur propositioni, sed cum hoc requiritur quod sit consuetum uti talibus rebus pro propositionibus.</text:p>
      <text:p text:style-name="P449">Haec autem propositio “‘a’ est ‘a’” est vere et propriissime propositio, nam sicut ly ‘be’ est nomen huius characteris ‘b’, ita hoc nomen ‘a’ huius characteris ‘a’, quod significat ad placitum. Nec inde sequitur ly ‘a’ imponi ad significandum solum illud quod naturaliter significabat, impositum est ‘a’ ad significandum ‘a’ sive vocale sive scriptum, quod non significabat naturaliter, loco propositionis, quod solum convenit conceptibus, vocibus et scripturis.</text:p>
      <text:p text:style-name="P449">Solet hic disputari de verbis adiectivis sintne in mente complexa an incomplexa potius. Cuius tamen definitionem usque ad caput de verbo expectato.</text:p>
      <text:h text:style-name="Heading_20_2" text:outline-level="2"><text:span text:style-name="T429">Capitis duodecimi. Lectio secunda <text:s/></text:span><text:span text:style-name="T426"><text:s/></text:span><text:span text:style-name="T425"><text:s text:c="2"/></text:span><text:s/></text:h>
      <text:h text:style-name="Heading_20_3" text:outline-level="3">Superest in calce huius primae partis, terminum in plurali numero seu in duali dividere</text:h>
      <text:p text:style-name="P442">Unde terminorum alii pertinentes et alii impertinentes:</text:p>
      <text:list text:style-name="L47">
        <text:list-item>
          <text:p text:style-name="P582"><text:span text:style-name="T430">Termini pertinentes sunt termini quorum alter, aut alterum infert </text:span><text:span text:style-name="T431">aut</text:span><text:span text:style-name="T430"> alteri repugnat, ut ‘homo’ / ‘risibile’, ‘homo’ / ‘equus’.</text:span></text:p>
        </text:list-item>
        <text:list-item>
          <text:p text:style-name="P583">Terminus impertinentes sunt termini quorum neuter, aut alterum infert aut alteri repugnat, ut ‘doctus’ / ‘iustus’.</text:p>
        </text:list-item>
      </text:list>
      <text:p text:style-name="P443"><text:soft-page-break/>Unde terminorum pertinentium alii pertinentes sequela, alii pertinentes repugnantia:</text:p>
      <text:list text:style-name="L48">
        <text:list-item>
          <text:p text:style-name="P584">Termini pertinentes sequela sunt termini quorum alter alterum infert, ut ‘homo’ / ‘risibile’, ‘homo’ / ‘animal’</text:p>
        </text:list-item>
        <text:list-item>
          <text:p text:style-name="P584">Termini pertinentes repugnantia (quod solent disparatos appellare) sunt termini ex quorum alterius affirmatione, alterius sequitur negatio.</text:p>
          <text:list>
            <text:list-item>
              <text:p text:style-name="P585">Et hoc vel simpliciter, ut sequitur “Hoc est homo; ergo hoc non est equus”.</text:p>
            </text:list-item>
            <text:list-item>
              <text:p text:style-name="P585">Vel solum naturaliter, ut sequitur “Hoc est album; ergo non est nigrum”.</text:p>
            </text:list-item>
          </text:list>
        </text:list-item>
      </text:list>
      <text:p text:style-name="P444">Terminorum pertinentium sequela, alli convertibiles, alii tanquam superior et inferior sese habentes.</text:p>
      <text:p text:style-name="P444">Termini convertibiles sunt termini quorum alter alterum infert et ediverso, ut ‘homo’ / ‘risibile’.</text:p>
      <text:p text:style-name="P444">Termini se habentes tanquam superior et inferior sunt termini quorum alter alterum infert et non ediverso, ut ‘homo’ / ‘animal’. Et inferens dicitur inferior, illatusque superior.</text:p>
      <text:p text:style-name="P445">Terminorum convertibilium alii synonymi alii non synonymi:</text:p>
      <text:list text:style-name="L49">
        <text:list-item>
          <text:p text:style-name="P586">Termini synonymi sunt termini eiusdem significationis, ut ‘mucro’, ‘ensis’, ‘gladius’.</text:p>
        </text:list-item>
        <text:list-item>
          <text:p text:style-name="P586">Termini non synonymi sunt termini non eiusdem significationis, ut ‘homo’ / ‘risibile’.</text:p>
        </text:list-item>
      </text:list>
      <text:p text:style-name="P446">Eiusdem significationis, id est, idem adaequate significantes eodem modo quoad modum significandi connotative et absolute, nam potest alter synonymorum significare ad placitum altero significante naturaliter proprie, ut vox ‘homo’ et conceptus ‘homo’. Sed adverte ad synonymitatem requiri diversitatem vocum, et iuxta modum loquendi sapientium et iuxta nominis etymologiam.</text:p>
      <text:p text:style-name="P447">Sunt enim synonymia simul nomina, id est, duo nomina eiusdem rei. Quare male confundunt nonnulli termino synonymos cum terminis identicis, hi quippe termini ‘homo’ ‘homo’, non quidem synonymi sed identici dicuntur, quin unus et idem terminus rep<text:span text:style-name="T432">utantur. Sed si libet, cum pluribus loqui, cum paucioribus tamen sentito.</text:span></text:p>
      <text:p text:style-name="P448"><text:span text:style-name="T432">Et memento quod singula membra includunt divisum ut sit sensus, alii convertibiles synonymi, alii convertibiles non-synonymi, nam alias excederent divisum, cum non solum non omnes termini non synony</text:span><text:span text:style-name="T433">m</text:span><text:span text:style-name="T432">i sint convertibiles, sed nec omnes synonymi. </text:span><text:span text:style-name="T433">Nam termini syncategorematici, utputa ‘nec’, ‘neque’ sunt quidem synonymi, cum synonymitas tantummodo significatione respiciat, nec tamen dicuntur convertibiles, quod respicit /28b/ praedicationem quae syncategorematibus non contingit.</text:span></text:p>
      <text:p text:style-name="P450">Ac demum, cum termini sunt eiusdem omnino significationis logicalis et grammaticalis, dicuntur synonymi essentialiter et accidentaliter, ut ‘ensis’, ‘gladius’. Cum tamen eius diverse proprietates grammaticae contingunt, dicuntur synonymi essentialiter, et non synonymi accidentaliter, ut ‘homo’, ‘hominis’, ‘homines’. Proprietas enim logicalis dicitur essentialiter, grammatica autem accidentaliter.</text:p>
      <text:h text:style-name="Heading_20_3" text:outline-level="3"><text:soft-page-break/>Terminorum repugnantium seu disparatorum, alii sunt disparati oppositi, et alii repugnantes seu disparati non oppositi. <text:span text:style-name="T434">Et oppositorum, alii sunt contradictorii, alii privativi, alii contrarii et alii relative oppositi</text:span></text:h>
      <text:list text:style-name="L50">
        <text:list-item>
          <text:p text:style-name="P587">Termini contradictorii sunt termini quorum alter connotat explicite negationem alterius, ut ‘homo’ / ‘no-homo’.</text:p>
        </text:list-item>
        <text:list-item>
          <text:p text:style-name="P587">Termini privativi sunt termini quorum alter connotat implicite negationem alterius, in subiecto apto nato, ut ‘videns’ / ‘caecus’.</text:p>
        </text:list-item>
        <text:list-item>
          <text:p text:style-name="P587">Termini contrarii sunt termini qualitates incompatibiles significantes, ut ‘album’ / ‘nigrum’, ‘albedo’ / ‘nigredo’, licet non sit tam in usu, terminos in abstracto quam in concreto appellare contrarios. <text:s/></text:p>
        </text:list-item>
        <text:list-item>
          <text:p text:style-name="P587">Termini relative oppositi sunt termini oppositos invicem, respectus significantes, ut ‘pater’ / ‘filius’.</text:p>
        </text:list-item>
      </text:list>
      <text:p text:style-name="P451"><text:span text:style-name="T435">Verbum ‘significat’ in definitionibus contrariorum et privatorum, intelligatur de significatione totali et positiva, etenim nec hi duo termini ‘videns album’ / ‘videns nigrum’, nec hi duo ‘album’ / ‘non-nigrum’ sunt contrarii. Unde </text:span><text:span text:style-name="T436">repugnantia inter terminos oppositos provenit vel ex modo significandi, sicut in contradictoriis et privativis, vel ex hoc quod connotat qualitates aut respectus incompatibiles, sicut in contrariis et relativis.</text:span></text:p>
      <text:p text:style-name="P452">Sed termini repugnantes seu disparati non oppositi, sunt quorum repugnantia non provenit ex modo significandi, nec ex hoc quod contraria significent, sed quia significant res omnino diversas, ut ‘homo’ / ‘lapis’ caeterique termini absoluti diversarum specierum. Et si sufficiat ad terminos esse disparatos quod naturaliter repugnent, tunc hi duo termini ‘Deus’ / ‘homo’, sicut hi ‘virgo’ / ‘mater’ sunt disparati. Sed si requiratur quod etiam repugnent supernaturaliter (quod universalior usus habet) sunt impertinentes.</text:p>
      <text:h text:style-name="Heading_20_3" text:outline-level="3">Ex significationis oppositione quae est formalis terminorum oppositio, accidit terminis contradictoriis et privativis, qui nec naturaliter nec supernaturaliter possint de eodem simul copulative praedicari</text:h>
      <text:p text:style-name="P453">Et terminis contrariis, ut non possint de eodem simul naturaliter praedicari, ac denique terminis relativis, ut non possint de eodem simul eademque ratione praedicari.</text:p>
      <text:p text:style-name="P454">De eodem, id est mediante eodem pronomine idem omnino demonstrante, simul, id est mediante copula de praesenti, pro eodem instanti adaequate uniente et seclusa ampliatione extrinseca. <text:span text:style-name="T437">Igitur, repugnantia horum terminorum ‘album’ / ‘nigrum’ non obstat veritati harum propositionum “Petrus erit albus”, “Petrus erit niger”, nec harum “Petrus est albus”, “Petrus est niger” (copula uniente pro tempore unius horae, in cuius prima parte Petrus sit albus, in secunda vero niger, nec harum “Petrus possibiliter est albus”, “Petrus possibiliter est niger”.</text:span></text:p>
      <text:p text:style-name="P458">De terminis autem contradictoriis, super primo tractatus Petrus Hispanus disputabitur, possint ne mediante copula de extrinseco tempore, de eodem verificari.</text:p>
      <text:p text:style-name="P455"><text:span text:style-name="T438">Dixerim seclusa ampliatione extrinseca, quia hi duo termini ‘</text:span><text:span text:style-name="T439">homo’, ‘mortuum’ (ut multis placet) licet non possint de se invicem verificari, seclusa ampliatione, quia tamen illa ampliatio est extrinseca, id est provenies a praedicato (illa enim quae provenit a copula dicitur extrinseca), non </text:span><text:soft-page-break/><text:span text:style-name="T440">sunt termini disparati. Quamquam re vera non absone posset oppositum defensari, cum nullo modo possint de eodem verificari, sic quod de illo de quo verum sit dicere quod est homo verum sit dicere quod est mortuum. </text:span><text:span text:style-name="T438"><text:s/></text:span><text:span text:style-name="T437"><text:s text:c="2"/></text:span></text:p>
      <text:p text:style-name="P456">Immo hi duo termini, ‘vivens’ / ‘mortuum’, non absurde dicerentur privative oppositi. Copulative, quia de Petro verum est dicere quod est homo et non-homo copulatim, id est homo et caput. Pariter potest esse albus et niger, si altera eius medietas alba, et altera sit nigra naturaliter, quia de eodem in duobus locis miraculose posito solet admitti quod possint in altero album et in altero esse nigrum. Eadem ratione quia idem potest esse pater et filius diversis rationibus seu respectu diversorum. Et si arguas verum est dicere “Petrus est vel Non est albus”, et “Petrus est vel Non est niger”, item “Non tantum Petrus non est albus” et “Non tamtum Petrus /29a/ non est niger”; ergo duo termini contrarii verificantur de eodem.</text:p>
      <text:p text:style-name="P456">Negatur consequentia, nam nomen ipsum verificari sonat vere praedicari in propositione affirmativa, non includente negationem non exponibili, et si quae sint aliae quisquiliae, indigne quae recitentur.</text:p>
      <text:p text:style-name="P456">Contingit etiam terminis contradictoriis quod quamto terminus finitus est superior, tanto terminus infinitus est inferior. Item quod disiunctum eorum sit <office:annotation office:name="__Annotation__4523_3960248216" loext:resolved="false"><dc:creator>Unknown Author</dc:creator><dc:date>2025-09-25T20:28:45.218212012</dc:date><text:p><text:span text:style-name="T454">Terminus transcendens, id est pro quacumque re supponens.</text:span></text:p></office:annotation>terminus transcendens, id est pro quacumque re supponens<office:annotation-end office:name="__Annotation__4523_3960248216"/>, quae omnia in diversis locis disputanda sunt.</text:p>
      <text:h text:style-name="Heading_20_3" text:outline-level="3">At de terminis oppositis dubium est, an possint in plurali numero verificari de eodem</text:h>
      <text:p text:style-name="P459">Arguitur enim sic: Admisso (ut solet admitti) quod ex materiis et formis Petri et Pauli, videntium fiat per transpositionem Iohannes et Thomas, quorum neuter videat, tunc Petrus et Paulus sunt videntes et simul non videntes, nam sunt non-videns et non-videns, utputa Iohannes et Thomas. Et eque ratione ostenduntur esse caeci, nam sunt caecus et caecus; ergo termini tam contradictorie quam etiam privative oppositi verificantur de eodem. </text:p>
      <text:h text:style-name="Heading_20_3" text:outline-level="3">Secundo: <text:span text:style-name="T441">Admisso quod album dicatur per cuius maiorem partem distenditur albedo (quod communi modo concipiendi consonat, nam si totus Petrus dempto pede esset albus certe diceretur albus) posito quod si scutum cuius altera medietas secundum longitudinem sit alba, altera vero nigra</text:span></text:h>
      <text:p text:style-name="P460"><text:span text:style-name="T442">A</text:span><text:span text:style-name="T441">rguitur sic: </text:span><text:span text:style-name="T443">Hoc scutum est hoc album, et hoc album (primo pronomine demonstrante medietatem album cum medietate medietatis nigrae secundum latitudinem divise, et secundo demonstrante eandem medietatem album, cum altera medietate eiusdem medietatis nigrae); ergo hoc scutum est alba. Parique ratione probabitur esse nigra.</text:span></text:p>
      <text:h text:style-name="P486" text:outline-level="3">Pro horum solutione notandum: Terminum pluralis numeri resolvi in copulatum complexive sumptum vel in disiunctum ex huiusmodi copulatis, quorum aliud ex duabus, aliud ex tribus, et caetera, partibus constat</text:h>
      <text:p text:style-name="P462"><text:span text:style-name="T444">Non quod illi subordinetur in significando (quod supra reprobatum est capitulo 4, lectio 2) sed quod ei aequivaleat in consequendo, per quod veritas propositionis de termino pluralis numeri manifestatur. Unde </text:span><text:span text:style-name="T445">quando est aliqua determinatio determinans terminum pluralis numeri, quia </text:span><text:soft-page-break/><text:span text:style-name="T445">ipsum, utpote unicum terminum unica acceptione respicit, </text:span><text:span text:style-name="T446">fit ut copulam in quod talis terminus resolvitur, unica etiam determinatione modificet, ita quod ly ‘non-videns’ non valet, sicut ly ‘non-videns’ et ‘non-videns’. </text:span><text:span text:style-name="T447">Sed sicut ly ‘non-videns’ et ‘videns’ ut termini contradictorii per contradictoria copulata resolvantur. </text:span><text:span text:style-name="T448">Quae quidem regula etiam determinationibus affirmativis est communis, discendisque valde utilis. Sed ly ‘caeci’, qui est unicus terminus non determinatus ab aliqua determinatione, videtur resolvendum esse in ly ‘caecus’ et caecus. Quare negatio inclusa cadit pluribus acceptionibus in illa partes, quamquam hoc 17 capitulo, primo tractatus examinabitur.</text:span></text:p>
      <text:p text:style-name="P588">Igitur ad argumentum primum negatur illa consequentia “Petrus et Paulus sunt non-videns et non-videns; ergo sunt non-videns”. Conceditur tamen illa “Sunt caecus et caucus; ergo sunt caeci”, unde licet duo termini contradictorii nec in singulari nec in plurali possint quoquo /29b/ modo de eodem verificari sine ampliatione, termini tamen privativi possunt quidem in plurali verificari de eisdem supernaturaliter.</text:p>
      <text:p text:style-name="P463"><text:span text:style-name="T449">Ad secundum conceditur: Illos terminos ‘alba’, ‘nigra’ verificari copulative de eodem naturaliter. Quare a multis negantur esse contrarii, licet in singulari numero sint contrarii, sed quia nomen in omnibus casibus et numeris reputatur unum et idem, malem dicere dictos terminos esse contrarios, maxime secundum nostram definitionem, nam connotant incompatibiles qualitates, asserereque subinde, terminis contrariis in plurali nuero non repugnare verificari de eodem, quin etiam potest dari corpus quod sit alba, nigra, rubea, viridia et caetera. </text:span><text:span text:style-name="T450">Quae omnia exercitio iuvenum limanda commendamus.</text:span></text:p>
      <text:h text:style-name="Heading_20_3" text:outline-level="3">Igitur ut summa eorum quae diffuse diximus prae oculis habeatur</text:h>
      <text:p text:style-name="P589">Omissa divisione illa termini in creatum et increatum aliisque id genus, utpote ad nihilum conducentibus, praeter missa etiam illa in significativum et non-significativum, quod terminus non significativus non sit terminus, partiti sumus primo terminum in mentalem, vocalem et scriptum, et mentalem in notitiam intuitivam et abstractivam, conceptum ultimatum et non-ultimatum, conceptum reflexivum et directum.</text:p>
      <text:p text:style-name="P590">Secundo: Terminum in univocum et aequivocum, et rursus aequivocum in aequivocum a casu et analogum.</text:p>
      <text:p text:style-name="P590">Tertio: Univocum in categorematicum et syncategorematicum, ac deinde categorematicum in pure categorematicum et categorematicum officio tantum, sicut syncategorematicum in pure categorematicum et syncategorematicum significatione tantum. Ac rursus, categorematicum in collectivum et divisivum.</text:p>
      <text:p text:style-name="P591">Quarto: Categorematicum in communem et singularem, et rursus communem in transcendentem et non-transcendentem.</text:p>
      <text:p text:style-name="P591">Quinto: Categorematicum in connotativum et absolutum, praeterea connotativum in connotativum essentialiter et connotativum accidentaliter. Deinde connotativum accidentaliter in connotativum intrinsece et connotativum extrinsece. Rursus connotativum in positivum, privativum et negativum.</text:p>
      <text:p text:style-name="P464"><text:span text:style-name="T451">Sexto: </text:span><text:span text:style-name="T452">Terminum categorematicum et terminum primae intentionis et terminum secundae intentionis.</text:span></text:p>
      <text:p text:style-name="P592">Septimo: Terminum seu signum logicale in terminum complexum et incomplexum, et complexum incomplexum distans et complexum indistans.</text:p>
      <text:p text:style-name="P465"><text:soft-page-break/><text:span text:style-name="T452">Octavo: Terminum in plurali numero, in termino pertinentes et impertinentes. Pertinentes in terminos pertinentes sequela et terminos pertinentes repugnantia. Pertinentes sequela in </text:span><text:span text:style-name="T453">terminos sese habentes tamquam superior et inferior et terminos convertibiles. Convertibiles in terminos synonymos et non synonymos. Et synonymos in synonymos solum essentialiter et synonymos essentialiter et accidentaliter. Sed terminos repugnantes in terminos oppositos et non-oppositos. Oppositos denique in terminos contradictorie, privative, contrarie et relative oppositos, ut arbor sequens ad oculum manifestat.</text:span></text:p>
      <text:p text:style-name="P465"><text:span text:style-name="T453">Benedictus Deus. </text:span><text:span text:style-name="T452"><text:s/></text:span><text:span text:style-name="T449"><text:s text:c="3"/></text:span><text:span text:style-name="T448"><text:s/></text:span></text:p>
      <text:p text:style-name="P461"/>
      <text:h text:style-name="P467" text:outline-level="1">Commentarii in quartum tractatum summularum</text:h>
      <text:p text:style-name="P57">Magistri Petrus Hispanus editi a fratre Dominico Soto Segobiensis. Ordinis praedicatorum, artium magistro.</text:p>
      <text:p text:style-name="Text_20_body"/>
      <text:h text:style-name="P469" text:outline-level="2">Sequitur tertia pars commentariorum fratris Dominici Soto in quartum tractatum summularum.</text:h>
      <text:h text:style-name="P476" text:outline-level="3">Caput primum</text:h>
      <text:p text:style-name="P58">273A</text:p>
      <text:h text:style-name="P487" text:outline-level="4">Superest in hac tertia parte de triplici syllogismo, </text:h>
      <text:p text:style-name="P59">videlicet, syllogismos expositorio, syllogismo in terminis divinis, ac denique de syllogismo in exponibilibus (quod in ipso huius operis vestibulo polliciti sumus) disputare.</text:p>
      <text:p text:style-name="P58">Igitur syllogismus expositorius est syllogismum medii singularis, ut “Christus est homo, Christus est Deus; ergo deus est homo”. Singularis inquam, aut communis, pronomine demonstrativo modificati, ut “hic homo est risibilis, hic homo est rationalis; ergo rationale est risibile”. <text:span text:style-name="T2">Dicitur expositorius, quia (ut Sanctus Thomas op.47 docet) est quaedam sensibilis resolutio ad sensum. Cum enim omnes syllogismi de medio communi, aut immediate (ut perfecti) aut mediate (ut imperfecti) innitantur naturae ac diffinitioni propositionis universalis, quae distans a sensu, a solo intellectu percipitur, syllogismus expositorius ad sensum exponit conclusionem.</text:span></text:p>
      <text:p text:style-name="P60">Ob idque huic formali principio innititur. Quaecumque sunt eadem uni tertio sunt eadem inter se (pro affirmativis) aut (pro negativis) quaecumque quorum unum est idem uni tertio cui aliud est diversum, sunt diversa inter se. Loquimur <text:span text:style-name="T3">pluraliter de eodem ac si essent plura, quia non possunt aliter congrue haec principia constitui.</text:span></text:p>
      <text:p text:style-name="P60"><text:span text:style-name="T3">Item </text:span><text:span text:style-name="T4">notandum syllogismum expositorium, eo in sola tertia figura apte constitui quod terminus discretus non potest directe praedicari de aliquo, ut in praedicamento substantiae docetur, cuius oppositum contingeret, si in prima aut secunda figura terminus discretus acciperetur pro medio. Unde ex praedicationibus indirectis in omni figura postes formari.</text:span></text:p>
      <text:h text:style-name="P487" text:outline-level="4">Ad syllogismum expositorium omnes</text:h>
      <text:p text:style-name="P61">quattuor conditiones essentiales syllogismi de medio communi aeque requiruntur. Quare non sequitur “quicquid tu amas est virtus, quidquid tu odis est vitium; ergo vitium est virtus”, quia medium, scilicet, ‘tu’ in neutra praemissarum est totale extremum. Ceterarum exempla instar syllogismi de medio communi inquirito.</text:p>
      <text:p text:style-name="P61">Item cum syllogismus expositorius possit ex terminis communibus pro extremitatibus confici, omni errore extrinseco quo syllogismus de medio communi, deficere potest, ut facile per omnes discurrens experiri potes.</text:p>
      <text:p text:style-name="P62">At defectus intrinseci non omnes contingunt syllogismo expositorio. Contingit autem ei primus videlicet aequivocationis, ut non sequitur “Iudas est in caelo, et Iudas est in inferno; ergo existens in inferno est in caelo”, si medium in maiori accipiatur pro Iuda Thadeo et in minori pro Scarioth.</text:p>
      <text:p text:style-name="P62">Item secundus, quare non sequitur “hoc album <text:span text:style-name="T5">et hoc nigrum erunt homines, nulli homines sunt vel erunt hoc album et hoc <text:s/>nigrum; ergo nulli homines sunt ver erunt homines”, ubi medium in maiori accipitur pluribus et in minori unica, si enim Petrus nunc sit albus qui nec erit albus nec niger, Palus vero erit niger qui nec est albus nec niger, erunt tamen ambo simul, praemissae sunt verae et conclusio falsa.</text:span></text:p>
      <text:p text:style-name="P63"><text:soft-page-break/>Tertius tamen, scilicet, quantitatis non potest ei contingere quemadmodum syllogismo de medio communi, quia terminus singularis univoce non distribuitur. At in terminis divinis <text:s/>contingit syllogismum expositorium quodammodo procedere ex particularibus quando videlicet singularis non aequivalet uni de omni, quod sequenti capite palam fiet.</text:p>
      <text:p text:style-name="P63">273B</text:p>
      <text:p text:style-name="P63">In terminis autem complete singularibus, id est, qui de pluribus realiter distinctis verificari non possunt, non contingit huiusmodi <text:span text:style-name="T6">defectus nisi aliqua eius pars esset particularitas quae non aequivaleret distributioni. Quod addiderim propter hunc paralogismum “hominis Brunellus non est animal, hominis Brunellus est equus; ergo equus non est animal”, </text:span><text:span text:style-name="T7">qui </text:span><text:span text:style-name="T8">quamquam sit de medio singulari, procedit tamen ex puris particularibus ratione determinationis, sed hic “Brunellus hominis non est animal, Brunellus hominis est equus; ergo equus non est animal”, quia maior aequivalet huic “nullius hominis Brunellus est animal”, bonus est. Et eadem ratione qui admitteret relativum harum praemissarum “Brunellus ipsiusmet non est animal, Brunellus ipsiusmet est equus” posse referre subiectum huiusmodi “homo est”, teneretur dicere dictas praemissas esse inhabiles ob particularitatem medii.</text:span></text:p>
      <text:p text:style-name="P64">Quartus defectus intrinsecus non habet hic locum, quia si totale medium sit terminis singularis, non supponit una pars in ordine ad aliam.</text:p>
      <text:p text:style-name="P64">Nec quintus quia in nulla supponit particulariter.</text:p>
      <text:p text:style-name="P64">Sextus autem potest quidem hic accidere, quia stabit medium supponere in affirmativa non supponente in negativa. Quare non sequitur “hoc album non est animal (demonstrato Petro nigro qui fuit albus), hoc album fuit homo qui est homo; ergo homo non est animal”, immo dictae praemissae sunt inhabiles, sicut hae “in aliquo loco Petrus non est substantia”, “Petrus est substantia”, “Brunellus Petri non est animal”, nec “equus Petri non est animal”, nam Petro possidente Favellum et Paulo Brunellum, praemissae sunt verae et conclusio falsa. Et eadem ratione ex primis non sequitur “substantia non est substantia”.</text:p>
      <text:p text:style-name="P64">Sept<text:span text:style-name="T19">i</text:span>mus denique, scilicet, ex puris negativis communis est huic syllogismo, ut facile est experiri.</text:p>
      <text:h text:style-name="P488" text:outline-level="4"><text:span text:style-name="T9">At vero </text:span>contra<text:span text:style-name="T9"> haec primo arguitur. Non </text:span></text:h>
      <text:p text:style-name="P65">sequitur “hoc animal est homo, et hoc animal est equus (primo pronomine demonstrante Petrum, et secundo Brunellum); ergo equus est homo”. Secundo nec sequitur “hoc animal si est Petrus est rationale, Brunellus est hoc animal si est Petrus (Petro utrobique demonstrato); ergo Brunellus est rationalis. Tertio. Nec sequitur “quod ego habeo tibi do, ego habeo oculos; ergo oculos tibi do”, nam si solum tibi darem librum quem habeo, praemissae essent verae et conclusio falsa. Quarto. Non sequitur “hic homo habens equum non equitat illum, hic homo habens equum est homo habens equum; ergo homo habens equum non equitat illum”, si enim quicumque homo haberet equum nullus tamen equitaret proprium sed alienum, praemissae essent verae et conclusio falsa. Et tamen in omnibus arguitur expositorie, ergo syllogismus expositorius non est formalis.</text:p>
      <text:h text:style-name="P487" text:outline-level="4">Ad primum concessa maiori negatur</text:h>
      <text:p text:style-name="P66"><text:span text:style-name="T18">m</text:span>inor videlicet dictum paralogismum esse expositorium, sed pro eius defectus assignatione multis modis distinguendum est, primo. Si placet pronomen demonstrativum non est partem subiecti, sed totius propositionis quam denominat singularem, tunc cum totale medium sit ly homo, nulla est tibi aequivocatio ex parte medii, sed defectus est quod singularizatur, ac subinde accipitur <text:span text:style-name="T10">pro diversis. </text:span><text:soft-page-break/><text:span text:style-name="T10">Nempe cum in diffinitione syllogismi additum est, aut termini communis singulariter tenti, subintelligendum est, pro eodem supposito singularizati, et haec certe est vera solutio. Si autem placet pronomen esse partem subiecti, tunc tenentes cum Dorp, idem pronomen posse univoce et communiter demonstrare diversa supposita, eumdem omnino assignabunt defectum quod videlicet totum complexum quod est medium, quamquam univoce, tamen pro diversis accipiatur. Praestat tamen dicere (ut I tra.c.8.n.7. diximus) quod pronomen idem univoce in mente non possit demonstrare diversa supposita, sed esse velut notitiam intuitivam quae a solo demonstrato efficitur, ac proinde id solum significat, <text:s/>nam si esset una notitia communis qua demonstraretur Petrus et demonstraretur Paulus, non esset facile assignare unde restringeretur, ut acciperetur nunc pro hoc et nunc pro alio, et ideo defectus esset tunc quod pronomen quid est pars medii tenetur aequivoce.</text:span></text:p>
      <text:p text:style-name="P67">274A</text:p>
      <text:h text:style-name="P489" text:outline-level="4">In hoc autem paralogismo, hoc est <text:span text:style-name="T11">necessarium,</text:span></text:h>
      <text:p text:style-name="P4">et hoc est atramentum, ergo atramentum est necessarium (utrobique demonstrata hace propositione “Deus est”) committitur aequivocatio respectu maioris extremitatis quae in maiori tenetur secundae intentionaliter pro necessaria.</text:p>
      <text:p text:style-name="P68">Sed in hoc “hoc est aliud quam te esse lapidem, et hoc est impossibile, et hoc est impossibile, ergo impossibile est aliud quam te esse lapidem (in utraque praemissa demonstrata hac propositione “homo est equus) si illud dictum “te esse lapidem tam in maiori quam in conclusione accipiatur significative et ly impossibile tam in maiori quam in conclusione accipiatur secundae intentionaliter, sed in conclusione ly aliud accipiatur significative tamquam pars principialis praedicati, ita quod totum praedicatum non sit unum dictum in quo cadat ly impossibile, ac proinde non sit modalis composita, nullus committitur defectus, immo, conclusio est vera sicut praemissae, est enim eius sensus quod aliqua propositio impossibilis est alia res, quam hoc quod est te esse lapidem, et idem esset si ‘ly’ te esse lapidem acciperetur materialiter pro propositione tam in maiori quam in conclusione, quia sensus maioris esset quod illa propositio demonstrata esset alia ab hac “tu est lapis” et sensus conclusionis, quod aliqua propositio impossibilis esset alia ab hac “tu est lapis” qui sensus sunt veri. Sed si in maiori ly impossibile redderet modalem compositam modificans totum illud “<text:span text:style-name="T12">aliud quam te esse lapidem” defectus esset in primis quod in maiori ly aliud acciperetur personaliter et conclusione esset pars dicti accepti simpliciter, item variaretur appellatio ex parte de ly impossibile quod in minori aliud modificat quam in conclusione.</text:span></text:p>
      <text:p text:style-name="P69">At in hoc “hoc ens creare est contingens, et hoc ens est Deus; ergo deus est contingens” (in utraque praemissa ly ‘ens’ personaliter pro deo singularizato) et in aliis id genus, apparet potius variari appellationem ex parte de ly contingens, scilicet, quod in maiori appellat super hoc quod est Deum creare, et in conclusione fertur absolute supra materiale subiecti, quam quod in maiori accipiatur secundae intentionaliter. Sicut in hoc “Petrus incipit esse hoc album, Petrus est vel immediate post hoc erit hoc album; ergo Petrus incipit esse Petrus”, variatur appellatio ex parte de ly incipit. Sed de his satis.</text:p>
      <text:h text:style-name="P490" text:outline-level="4">Ad secundum distinguitur maior. Nam consequentia ibi assumpta multiplex est,</text:h>
      <text:p text:style-name="P4"><text:span text:style-name="T12">si enim pronomen unica acceptione singularizet </text:span><text:span text:style-name="T13">totum conditionatum quod sit medium, negatur maior, immo dicta consequentia est syllogistica et minor est impossibilis, si vero singularizet solam primam partem tamquam medium quod erit tunc terminus concurrens, concessa maiori negatur </text:span><text:soft-page-break/><text:span text:style-name="T13">minor, quia medium nullibi est totale extremum, item arguitur ab amplo ad non amplum ex parte minoris extremitatis quae ampliatur in minori a conditionato accepto pluribus, si autem sola prima parte singularizata, totum conditionatum esset medium, argueretur ex puris particularibus, quia totum esset tunc terminus communis, et tunc sensus maioris est “si hoc animal est Petrus, hoc animal est rationale”, et sensus minoris “si Brunellus est Petrus, Brunellus est hoc animal”, qui sunt veri.</text:span></text:p>
      <text:p text:style-name="P70">Sed quisnam defectus in hic paralogismis “hoc animal est album, Petrus est hoc animal si est Petrus; ergo Petrus est albus si est Petrus”, “hoc animal est album, Brunellus est Petrus si est hoc animal; ergo Brunellus est Petrus si est albus” (ubicumque demonstrato Petro) in quibus illud quod se tenebat ex parte medi in minori concluditur cum maiori extremitate.</text:p>
      <text:p text:style-name="P70">274B</text:p>
      <text:p text:style-name="P71">In primo syllogizatur sub termino posito in consequenti conditionalis et in secundo sub termino posito in antecedenti, aut (si videtur tibi ieiunus hic defectus) variatur appellatio, id est, illatio inter illud quod se tenet ex parte medii in minori et medium, et ipsummet et maiorem extremitatem in conclusione.</text:p>
      <text:p text:style-name="P72">Idem est defectus huius paralogismi “posito hoc albo ponitur albedo, <text:span text:style-name="T14">hoc album est Petrus; ergo Petro ponitur albedo”, nam ly “hoc albo” est aequivalenter terminus inferens positus in antecedente conditionalis, reducitur enim ad hunc “si hoc album est, albedo est, hoc album est Petrus; ergo si Petrus est, albedo est”.</text:span></text:p>
      <text:p text:style-name="P73">Eadem ratione distinguendum est in caeteris complexis. Verbi gratia, si in hac consequentia “hic homo vel equus est homo, hic homo vel equus est equus; ergo equus est homo”, totum disiunctum unica acceptione singularizetur pro Petro qui in utraque praemissa demonstretur, nullus est defectus, et minor est impossibilis, si autem sola prima pars singularizetur, tunc si totum disiunctum accipiatur pro medio, arguitur ex puris particularibus, si autem sola pars singularizata, in neutra est totale extremum.</text:p>
      <text:h text:style-name="P487" text:outline-level="4">Ad tertium concessa maiori negatur minor,</text:h>
      <text:p text:style-name="P74">nam si totum illud complexum “quod ego habeo”, accipiatur pro medio, et minor accipiatur in hoc sensu “oculi sunt aliquid quod ego habeo”, arguitur ex puris particularibus, sed ad inferendam illam conclusionem aut assumendum esset in maiori “quidquid ego habeo”, <text:span text:style-name="T15">aut subsumendum in minori “oculi sunt omne illud quod ego habeo”. Si autem accipiatur pro medio solum pronomen ‘ego’, tunc illud quod se tenet ex parte ipsius in maiori, non concluditur cum minori extremitate. Quare inferendum esset “quod ego habens oculos habeo tibi do”.</text:span></text:p>
      <text:p text:style-name="P75">Par defectus est in hoc paralogismo “quod ego habeo tu non habes, ego habeo oculos; ergo tu non habes oculos”, quare licet non argueretur a non distributo ad distributum ex parte termini ‘oculos’, sed inferretur “tu oculos non habes”, consequentia non valeret, nam si eundem librum numero quem ego habeo, habere et tu, qui esset omnis liber, haberem ego tamen aliquam rem quam tu non habes, instaretur si loco de ly ‘oculos’ diceres librum. Haec si inferres “librum habens tu non est” (ad evitandum ne ex parte de ly habens arguatur a non distributo ad distributum) <text:span text:style-name="T16">sequeretur in simili “</text:span><text:span text:style-name="T17">quod tu habes tu non vides, tu habes equum; ergo tu equum videns non est”, nam si habere canem quem non videres et equum qui esset ominis equus quem tu solus videres, praemissae essent verae, et conclusio falsa. Igitur si solum pronomen ‘ego’ sit medium concludendum est ex primis praemissis “quod ego habens oculos habeo, tu non habes”, et ex secundis “quod tu habens equum </text:span><text:soft-page-break/><text:span text:style-name="T17">habes, non vides”, ut illud quod se tenet cum medio in maiori superaddatur toti minori extremitati in conclusione. Si tamen totum illud “quod ego non habeo”, accipiatur pro medio, esset totum distribuendum in maiori aut in minori ne argueretur ex puris particularibus, ut formaliter sequitur “quidquid ego habeo, tu non habes, oculos habeo; ergo oculos tu non habes”.</text:span></text:p>
      <text:h text:style-name="P487" text:outline-level="4">Ad quartum concessa maiori negatur minor</text:h>
      <text:p text:style-name="P238"><text:span text:style-name="T96">N</text:span><text:span text:style-name="T97">am ex parte relativi arguitur ab inferiori ad superius distributum. Dictum enim est de relativis quod relativum substantiae </text:span><text:span text:style-name="T98">non reciprocum referens antecedens eiusdem categorice refert ipsum restricte, id est, cum eadem habitudine terminorum extremi in quo situatur ipsum antecedens, et quia non refert reciproce, sit, ut quando singularizatur antecedens debet ipsum communiter supponens ex primi cum relativo, alias in ascensu argueretur ab inferiori ad suum superius et in descensu a superiori ad inferius. Verbi gratia, haec “hic homo habens equum non equitat illum”, aequivalet huic “hic homo non equitat equum quem hic homo habet”, nec refert ly ‘homo’ restringatur in primis a ly habens necne, et haec “homo habens equum non equitat illum”, </text:span><text:span text:style-name="T99">aequivalet huic “homo habens equum non equitat equum quem homo habet”. Quare ex illis praemissis “hic homo habens equum non equitat illum”, et “hic homo habens equum est homo habens equum”, inferendum est “ergo homo habens equum non equitat equum quem hic homo habet”, demonstrato eodem supposito quod demonstrabatur a parte medii. Sicut ex his “omnis homo habens equum equitat illum, hic homo habens equum est homo habens equum”, inferendum est “ergo hic homo habens equum equitat equum quem homo habet”, nam si inferres “</text:span><text:span text:style-name="T100">hic homo habens equum equitat illum” ex parte relativi argueretur a superiori ad inferius, et eodem casu praemissae essent verae et conclusio falsa. Aequa ratione ex his “Petrus habens hunc equum equitat illum, et Petrus habens hunc equum est Petrus habens equum”, non est inferendum “</text:span><text:span text:style-name="T101">Petrus habens equum non equitat illum”, nam si haberet duos equos quorum alterum equitaret alterum vero non, praemissae essent verae et conclusio falsa, sed inferendum est “Petrus habens equum non equitat hunc equum quem habet”.</text:span></text:p>
      <text:p text:style-name="P76">Haec autem non sunt peculiaria syllogismo expositorio, sed disputationi de relativis.</text:p>
      <text:h text:style-name="P476" text:outline-level="3">Solent hic de terminis infinitis iuxta materiam sexti defectus disputare</text:h>
      <text:p text:style-name="P239"><text:span text:style-name="T102">Q</text:span><text:span text:style-name="T101">uod videlicet non sequatur <text:s/>“hoc non creans possibiliter non est Deus, hoc non creans est Deus; ergo Deus possibiliter non est Deus”, nam quamquam in terminis finitis sequeretur, quia medium in negativa staret pro pluribus quam in affirmativa, in hic tamen infinitis oppositum contingit, quia ly ‘non creans’ (dicunt) in negativa stat pro eo quod non possibiliter est creans et ideo pro paucioribus quam in affirmativa de praesenti. Unde dicunt dictam maiorem esse necessariam, et Deo non creante ambas praemissas esse veras et quamcumque conclusionem falsam. Et idem esset si pro maiori assumeres “non creans impossibiliter est Deus”, quam pariter dicunt esse necessariam. Hanc tamen opinionem in de modalibus et allis pluribus locis satis elisam esse putamus, non enim infinitat negatio acceptionem termini, sed solam significationem. Et ideo subiectum maioris valet hoc complexum “hoc quod potest esse non creans”, id est, potest non creare, quare ibi stat pluribus quam in minori de praesenti, nec committitur proinde aliquis defectus, et dicta maior est impossibilis, cum subiectum et praedicatum supponat pro eodem. Sed de hic ac ceteris quae non sunt syllogismo expositorio peculiaria, satis.</text:span></text:p>
      <text:p text:style-name="P76"/>
      <text:h text:style-name="P466" text:outline-level="1">De obligatione</text:h>
      <text:p text:style-name="P232">Opusculum obligationum fratris Dominici Soto</text:p>
      <text:p text:style-name="P3"><text:span text:style-name="T21">S</text:span>egobiensis ordinis praedicatorum artium magistri.</text:p>
      <text:p text:style-name="P73">/<text:span text:style-name="T22">306b</text:span>/</text:p>
      <text:p text:style-name="P73">...</text:p>
      <text:h text:style-name="P476" text:outline-level="3">En ad portum destinati laboris utcumque ventum est</text:h>
      <text:p text:style-name="P77"><text:span text:style-name="T22">In quo, cum sophismatibus vela commiserim (quorum nonnullus usus ad artem disputandi obtinendam necessarius est) vereor ne eorum tempestate latius quam </text:span><text:span text:style-name="T23">animo</text:span><text:span text:style-name="T22"> constitueram iactatus sim.</text:span></text:p>
      <text:p text:style-name="P78">At vero prudentis cuiuscumque intererit sique ad praestitutum sibi sine parum conducentia offenderit, missa ea facere. Ea enim quae scitu sunt necessaria ab aliis sunt loco distincta. Quamcumque eos qui speculativa scientias medullitus calere optarint, per haec omnia transisse non paenitebit.</text:p>
      <text:p text:style-name="P79"><text:span text:style-name="T23">Accedit ad operis nonnullam prolixitatem quod nihil mihi magis in animo fuit </text:span><text:span text:style-name="T24">quam clare dicere, nihilque non expositum reliquere. Nec mirum si id non usque quaquam fuerim assecutus.</text:span></text:p>
      <text:p text:style-name="P240"><text:span text:style-name="T103">Sunt enim quaedam (inquit Augustinus </text:span><text:span text:style-name="T104">quarto</text:span><text:span text:style-name="T103"> De Doctrina </text:span><text:span text:style-name="T105">Christiana</text:span><text:span text:style-name="T103">) quae vi sua non intelliguntur, aut vix intelliguntur, quamvis planissime dicentis versentur eloquio. </text:span><text:span text:style-name="T106">Quorum plurimis expositoribus contingere solet ut claritatem plus nimio sectantes, a vero eorum sensu discedant. At </text:span><text:span text:style-name="T107">non haec in meae excusationem insufficientiae adduxerim, fateor namque et ingenii et eruditionis inopia in multis defecisse, in quibus subinde peritiorum limam aequo animo suscipiam.</text:span></text:p>
      <text:p text:style-name="P80">Tractatus secundum ac tertium eo summulistis non exposuimus, quo nec illius sunt scitu necessarii, nec possunt sine Aristotele intelligi, qui secunda lectura est dialecticis exponendus.</text:p>
      <text:p text:style-name="P80">At quintum et sextum quamquam sint revera utiles, tamen ne lecturam summularum ultra annum protenderemus eorum disputationem usque ad finem commentariorum super logicam Aristotelis, si Deus illuc dederit pervenire, duximus reponendam. <text:span text:style-name="T25">Ubi circa libros Topicorum et Elenchorum, loco</text:span><text:span text:style-name="T27">s</text:span><text:span text:style-name="T25"> omnes dialecticos, omnes quam fallaces illationes, brevi epilogo, Deo auctore, perstringemus.</text:span></text:p>
      <text:p text:style-name="P81">Interim, quibus hoc nostro labore aliquid emolumenti ad dialecticam capessendam, actum fuerit benedicite Dominum qui, utinam nobis vel saltem errata condonet. Amen.</text:p>
      <text:p text:style-name="P81">Registrum huius operis: a, b, c, d, e, f, g, h, i k, l, m, n, o, p, q, r, s, t, v, A. Omnes sunt quaterni praeter ‘s’ et ‘A’, quia sunt termini, et ‘v’ qui est duernus.</text:p>
      <text:p text:style-name="P232"><text:soft-page-break/><text:s/><text:span text:style-name="T26">Expliciunt summulae fratris Dominici Soto</text:span></text:p>
      <text:p text:style-name="P3">Segobiensis, ordinis praedicatorum artium magistri. Impressae Burgis, pridie calendas Maii. Anno Domini millesimo quingentesimo vigesimo non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la" fo:country="V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la" fo:country="V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91237c"/>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List_20_1_20_End" style:display-name="List 1 End" style:family="paragraph" style:parent-style-name="List" style:next-style-name="List_20_1" style:class="list">
      <style:paragraph-properties fo:margin-left="0.25in" fo:margin-right="0in" fo:margin-top="0in" fo:margin-bottom="0.166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8T20:39:21.354766648</meta:creation-date>
    <meta:generator>LibreOffice/24.2.7.2$Linux_X86_64 LibreOffice_project/420$Build-2</meta:generator>
    <dc:date>2026-02-25T19:56:08.528774796</dc:date>
    <meta:editing-duration>P4DT2H2M24S</meta:editing-duration>
    <meta:editing-cycles>1212</meta:editing-cycles>
    <meta:document-statistic meta:table-count="0" meta:image-count="0" meta:object-count="0" meta:page-count="87" meta:paragraph-count="992" meta:word-count="35632" meta:character-count="253730" meta:non-whitespace-character-count="219135"/>
  </office:meta>
</office:document-meta>
</file>